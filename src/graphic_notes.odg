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4"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4"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4"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Pictures/1000000100000500000004F1EF192BD0.png" manifest:media-type="image/png"/>
  <manifest:file-entry manifest:full-path="Pictures/10000000000002D80000032646F0B612.png" manifest:media-type="image/png"/>
  <manifest:file-entry manifest:full-path="Pictures/10000001000002800000017CB1ECEB8C.png" manifest:media-type="image/png"/>
  <manifest:file-entry manifest:full-path="Pictures/10000001000002800000017CBF93BF78.png" manifest:media-type="image/png"/>
  <manifest:file-entry manifest:full-path="Pictures/100009960000422500002746BB38F83E.svg" manifest:media-type="image/svg+xml"/>
  <manifest:file-entry manifest:full-path="Pictures/10000000000008CD000003AE13A2E865.png" manifest:media-type="image/png"/>
  <manifest:file-entry manifest:full-path="Pictures/100009960000422500002746C89C7BB4.svg" manifest:media-type="image/svg+xml"/>
  <manifest:file-entry manifest:full-path="Pictures/10000000000002B80000024480E99178.png" manifest:media-type="image/png"/>
  <manifest:file-entry manifest:full-path="Pictures/10000000000002C4000001EEEA2707B2.png" manifest:media-type="image/png"/>
  <manifest:file-entry manifest:full-path="Pictures/1000099600004225000027461A447516.svg" manifest:media-type="image/svg+xml"/>
  <manifest:file-entry manifest:full-path="Pictures/10000000000008DF000003B9CB1644F7.png" manifest:media-type="image/png"/>
  <manifest:file-entry manifest:full-path="Pictures/10000000000001D2000001C08A1E74B0.png" manifest:media-type="image/png"/>
  <manifest:file-entry manifest:full-path="Pictures/1000000000000271000001D51A725A94.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8000001F99B6A82D1.png" manifest:media-type="image/png"/>
  <manifest:file-entry manifest:full-path="Pictures/10000000000002B2000003BD26BB6070.png" manifest:media-type="image/png"/>
  <manifest:file-entry manifest:full-path="Pictures/10000000000003D00000024573F23757.png" manifest:media-type="image/png"/>
  <manifest:file-entry manifest:full-path="Pictures/100000000000022600000212DA83A646.png" manifest:media-type="image/png"/>
  <manifest:file-entry manifest:full-path="Pictures/10000000000003940000046C916862FF.png" manifest:media-type="image/png"/>
  <manifest:file-entry manifest:full-path="Pictures/10000000000002C5000001ADB823F0C7.png" manifest:media-type="image/png"/>
  <manifest:file-entry manifest:full-path="Pictures/10000001000002800000017C0782A2E4.png" manifest:media-type="image/png"/>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4"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4"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7" manifest:media-type=""/>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4" manifest:media-type="application/vnd.oasis.opendocument.formula"/>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fo:padding-top="0.5cm" fo:padding-left="0.1cm" fo:padding-right="0.5cm"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3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aaafc9"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svg:stroke-color="#6390c2" draw:fill="solid" draw:fill-color="#b4d2ea"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standard">
      <style:graphic-properties draw:stroke="solid" svg:stroke-color="#b2b2b2" draw:fill="solid" draw:fill-color="#ffffff" draw:textarea-horizontal-align="justify" draw:textarea-vertical-align="middle" draw:auto-grow-height="true" fo:min-height="0cm" fo:min-width="0cm" fo:padding-top="0.33cm" fo:wrap-option="wrap" style:writing-mode="lr-tb" loext:decorative="false"/>
      <style:paragraph-properties style:writing-mode="lr-tb"/>
    </style:style>
    <style:style style:name="gr267"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8" style:family="graphic" style:parent-style-name="objectwithoutfill">
      <style:graphic-properties draw:marker-end="Arrowheads_20_225" draw:marker-end-width="0.3cm" draw:fill="solid" draw:textarea-vertical-align="middle" loext:decorative="false"/>
    </style:style>
    <style:style style:name="gr269" style:family="graphic" style:parent-style-name="objectwithoutfill">
      <style:graphic-properties draw:marker-end="Arrowheads_20_228" draw:marker-end-width="0.3cm" draw:fill="solid" draw:textarea-vertical-align="middle" loext:decorative="false"/>
    </style:style>
    <style:style style:name="gr270" style:family="graphic" style:parent-style-name="objectwithoutfill">
      <style:graphic-properties draw:marker-end="Arrowheads_20_229" draw:marker-end-width="0.3cm" draw:fill="solid" draw:textarea-vertical-align="middle" loext:decorative="false"/>
    </style:style>
    <style:style style:name="gr271" style:family="graphic" style:parent-style-name="objectwithoutfill">
      <style:graphic-properties draw:marker-end="Arrowheads_20_230" draw:marker-end-width="0.3cm" draw:fill="solid" draw:textarea-vertical-align="middle" loext:decorative="false"/>
    </style:style>
    <style:style style:name="gr272" style:family="graphic" style:parent-style-name="objectwithoutfill">
      <style:graphic-properties draw:marker-end="Arrowheads_20_231" draw:marker-end-width="0.3cm" draw:fill="solid" draw:textarea-vertical-align="middle" loext:decorative="false"/>
    </style:style>
    <style:style style:name="gr273"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4" style:family="graphic" style:parent-style-name="objectwithoutfill">
      <style:graphic-properties draw:marker-end="Arrowheads_20_233" draw:marker-end-width="0.3cm" draw:fill="solid" draw:textarea-vertical-align="middle" loext:decorative="false"/>
    </style:style>
    <style:style style:name="gr275"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6" style:family="graphic" style:parent-style-name="standard">
      <style:graphic-properties draw:textarea-horizontal-align="center" draw:textarea-vertical-align="middle" loext:decorative="false"/>
      <style:paragraph-properties style:writing-mode="lr-tb"/>
    </style:style>
    <style:style style:name="gr277" style:family="graphic" style:parent-style-name="objectwithoutfill">
      <style:graphic-properties draw:marker-end="Arrowheads_20_234" draw:marker-end-width="0.3cm" draw:fill="solid" draw:textarea-vertical-align="middle" loext:decorative="false"/>
    </style:style>
    <style:style style:name="gr278" style:family="graphic" style:parent-style-name="objectwithoutfill">
      <style:graphic-properties draw:marker-end="Arrowheads_20_235" draw:marker-end-width="0.3cm" draw:fill="solid" draw:textarea-vertical-align="middle" loext:decorative="false"/>
    </style:style>
    <style:style style:name="gr279" style:family="graphic" style:parent-style-name="standard">
      <style:graphic-properties draw:stroke="solid" svg:stroke-color="#b2b2b2" draw:fill="solid" draw:fill-color="#ffffff" draw:textarea-horizontal-align="justify" draw:textarea-vertical-align="middle" draw:auto-grow-height="false" fo:min-height="1.214cm" fo:min-width="3.66cm" style:writing-mode="lr-tb" loext:decorative="false"/>
      <style:paragraph-properties style:writing-mode="lr-tb"/>
    </style:style>
    <style:style style:name="gr280" style:family="graphic" style:parent-style-name="standard">
      <style:graphic-properties svg:stroke-color="#70ae61" draw:fill="solid" draw:fill-color="#accda1" draw:textarea-vertical-align="middle"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objectwithoutfill">
      <style:graphic-properties draw:marker-end="Arrowheads_20_61" draw:marker-end-width="0.3cm" draw:fill="solid" draw:textarea-vertical-align="middle" loext:decorative="false"/>
    </style:style>
    <style:style style:name="gr295" style:family="graphic" style:parent-style-name="objectwithoutfill">
      <style:graphic-properties draw:marker-end="Arrowheads_20_62" draw:marker-end-width="0.3cm" draw:fill="solid" draw:textarea-vertical-align="middle" loext:decorative="false"/>
    </style:style>
    <style:style style:name="gr296" style:family="graphic" style:parent-style-name="objectwithoutfill">
      <style:graphic-properties draw:marker-end="Arrowheads_20_67" draw:marker-end-width="0.3cm" draw:fill="solid" draw:textarea-vertical-align="middle" loext:decorative="false"/>
    </style:style>
    <style:style style:name="gr297" style:family="graphic" style:parent-style-name="objectwithoutfill">
      <style:graphic-properties draw:marker-end="Arrowheads_20_68" draw:marker-end-width="0.3cm" draw:fill="solid" draw:textarea-vertical-align="middle" loext:decorative="false"/>
    </style:style>
    <style:style style:name="gr298" style:family="graphic" style:parent-style-name="objectwithoutfill">
      <style:graphic-properties draw:marker-end="Arrowheads_20_69" draw:marker-end-width="0.3cm" draw:fill="solid" draw:textarea-vertical-align="middle" loext:decorative="false"/>
    </style:style>
    <style:style style:name="gr299" style:family="graphic" style:parent-style-name="objectwithoutfill">
      <style:graphic-properties draw:marker-end="Arrowheads_20_70" draw:marker-end-width="0.3cm" draw:fill="solid" draw:textarea-vertical-align="middle" loext:decorative="false"/>
    </style:style>
    <style:style style:name="gr300" style:family="graphic" style:parent-style-name="objectwithoutfill">
      <style:graphic-properties draw:marker-end="Arrowheads_20_71" draw:marker-end-width="0.3cm" draw:fill="solid" draw:textarea-vertical-align="middle" loext:decorative="false"/>
    </style:style>
    <style:style style:name="gr301" style:family="graphic" style:parent-style-name="objectwithoutfill">
      <style:graphic-properties draw:marker-end="Arrowheads_20_100" draw:marker-end-width="0.3cm" draw:fill="solid" draw:textarea-vertical-align="middle" loext:decorative="false"/>
    </style:style>
    <style:style style:name="gr302" style:family="graphic" style:parent-style-name="objectwithoutfill">
      <style:graphic-properties draw:marker-end="Arrowheads_20_101" draw:marker-end-width="0.3cm" draw:fill="solid" draw:textarea-vertical-align="middle" loext:decorative="false"/>
    </style:style>
    <style:style style:name="gr303" style:family="graphic" style:parent-style-name="objectwithoutfill">
      <style:graphic-properties draw:marker-end="Arrowheads_20_215" draw:marker-end-width="0.3cm" draw:fill="solid" draw:textarea-vertical-align="middle" loext:decorative="false"/>
    </style:style>
    <style:style style:name="gr304" style:family="graphic" style:parent-style-name="standard">
      <style:graphic-properties svg:stroke-color="#6390c2" draw:fill="solid" draw:fill-color="#b4d2ea" draw:textarea-horizontal-align="justify" draw:textarea-vertical-align="middle" loext:decorative="false"/>
      <style:paragraph-properties style:writing-mode="lr-tb"/>
    </style:style>
    <style:style style:name="gr305" style:family="graphic" style:parent-style-name="objectwithoutfill">
      <style:graphic-properties draw:marker-end="Arrowheads_20_216" draw:marker-end-width="0.3cm" draw:fill="solid" draw:textarea-vertical-align="middle" loext:decorative="false"/>
    </style:style>
    <style:style style:name="gr306" style:family="graphic" style:parent-style-name="objectwithoutfill">
      <style:graphic-properties draw:marker-end="Arrowheads_20_217" draw:marker-end-width="0.3cm" draw:fill="solid" draw:textarea-vertical-align="middle" loext:decorative="false"/>
    </style:style>
    <style:style style:name="gr307" style:family="graphic" style:parent-style-name="objectwithoutfill">
      <style:graphic-properties draw:marker-end="Arrowheads_20_218" draw:marker-end-width="0.3cm" draw:fill="solid" draw:textarea-vertical-align="middle" loext:decorative="false"/>
    </style:style>
    <style:style style:name="gr308" style:family="graphic" style:parent-style-name="objectwithoutfill">
      <style:graphic-properties draw:marker-end="Arrowheads_20_219" draw:marker-end-width="0.3cm" draw:fill="solid" draw:textarea-vertical-align="middle" loext:decorative="false"/>
    </style:style>
    <style:style style:name="gr309" style:family="graphic" style:parent-style-name="objectwithoutfill">
      <style:graphic-properties draw:marker-end="Arrowheads_20_239" draw:marker-end-width="0.3cm" draw:fill="solid" draw:fill-color="#8fd7d7" draw:textarea-vertical-align="middle" loext:decorative="false"/>
    </style:style>
    <style:style style:name="gr310" style:family="graphic" style:parent-style-name="objectwithoutfill">
      <style:graphic-properties draw:marker-end="Arrowheads_20_240" draw:marker-end-width="0.3cm" draw:fill="solid" draw:fill-color="#8fd7d7" draw:textarea-vertical-align="middle" loext:decorative="false"/>
    </style:style>
    <style:style style:name="gr311" style:family="graphic" style:parent-style-name="objectwithoutfill">
      <style:graphic-properties draw:marker-end="Arrowheads_20_241" draw:marker-end-width="0.3cm" draw:fill="solid" draw:fill-color="#8fd7d7" draw:textarea-vertical-align="middle" loext:decorative="false"/>
    </style:style>
    <style:style style:name="gr312" style:family="graphic" style:parent-style-name="objectwithoutfill">
      <style:graphic-properties draw:marker-end="Arrowheads_20_242" draw:marker-end-width="0.3cm" draw:fill="solid" draw:fill-color="#8fd7d7" draw:textarea-vertical-align="middle" loext:decorative="false"/>
    </style:style>
    <style:style style:name="gr313" style:family="graphic" style:parent-style-name="objectwithoutfill">
      <style:graphic-properties draw:marker-end="Arrowheads_20_247" draw:marker-end-width="0.3cm" draw:fill="solid" draw:textarea-vertical-align="middle" loext:decorative="false"/>
    </style:style>
    <style:style style:name="gr314" style:family="graphic" style:parent-style-name="objectwithoutfill">
      <style:graphic-properties draw:marker-end="Arrowheads_20_248" draw:marker-end-width="0.3cm" draw:fill="solid" draw:textarea-vertical-align="middle" loext:decorative="false"/>
    </style:style>
    <style:style style:name="gr315" style:family="graphic" style:parent-style-name="objectwithoutfill">
      <style:graphic-properties draw:marker-end="Arrowheads_20_249" draw:marker-end-width="0.3cm" draw:fill="solid" draw:textarea-vertical-align="middle" loext:decorative="false"/>
    </style:style>
    <style:style style:name="gr316" style:family="graphic" style:parent-style-name="objectwithoutfill">
      <style:graphic-properties draw:marker-end="Arrowheads_20_251" draw:marker-end-width="0.3cm" draw:fill="solid" draw:textarea-vertical-align="middle" loext:decorative="false"/>
    </style:style>
    <style:style style:name="gr317"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318" style:family="graphic" style:parent-style-name="objectwithoutfill">
      <style:graphic-properties draw:marker-end="Arrowheads_20_253" draw:marker-end-width="0.3cm" draw:fill="solid" draw:textarea-vertical-align="middle" loext:decorative="false"/>
    </style:style>
    <style:style style:name="gr319" style:family="graphic" style:parent-style-name="objectwithoutfill">
      <style:graphic-properties draw:marker-end="Arrowheads_20_254" draw:marker-end-width="0.3cm" draw:fill="solid" draw:textarea-vertical-align="middle" loext:decorative="false"/>
    </style:style>
    <style:style style:name="gr320" style:family="graphic" style:parent-style-name="objectwithoutfill">
      <style:graphic-properties draw:marker-end="Arrowheads_20_255" draw:marker-end-width="0.3cm" draw:fill="solid" draw:textarea-vertical-align="middle" loext:decorative="false"/>
    </style:style>
    <style:style style:name="gr321" style:family="graphic" style:parent-style-name="objectwithoutfill">
      <style:graphic-properties draw:marker-end="Arrowheads_20_256" draw:marker-end-width="0.3cm" draw:fill="solid" draw:textarea-vertical-align="middle" loext:decorative="false"/>
    </style:style>
    <style:style style:name="gr322" style:family="graphic" style:parent-style-name="objectwithoutfill">
      <style:graphic-properties draw:marker-end="Arrowheads_20_257" draw:marker-end-width="0.3cm" draw:fill="solid" draw:textarea-vertical-align="middle" loext:decorative="false"/>
    </style:style>
    <style:style style:name="gr323" style:family="graphic" style:parent-style-name="objectwithoutfill">
      <style:graphic-properties draw:marker-end="Arrowheads_20_258" draw:marker-end-width="0.3cm" draw:fill="solid" draw:textarea-vertical-align="middle" loext:decorative="false"/>
    </style:style>
    <style:style style:name="gr324" style:family="graphic" style:parent-style-name="objectwithoutfill">
      <style:graphic-properties draw:marker-end="Arrowheads_20_259" draw:marker-end-width="0.3cm" draw:fill="solid" draw:textarea-vertical-align="middle" loext:decorative="false"/>
    </style:style>
    <style:style style:name="gr325" style:family="graphic" style:parent-style-name="objectwithoutfill">
      <style:graphic-properties draw:marker-end="Arrowheads_20_260" draw:marker-end-width="0.3cm" draw:fill="solid" draw:textarea-vertical-align="middle" loext:decorative="false"/>
    </style:style>
    <style:style style:name="gr326" style:family="graphic" style:parent-style-name="objectwithoutfill">
      <style:graphic-properties draw:marker-end="Arrowheads_20_261" draw:marker-end-width="0.3cm" draw:fill="solid" draw:textarea-vertical-align="middle" loext:decorative="false"/>
    </style:style>
    <style:style style:name="gr327" style:family="graphic" style:parent-style-name="objectwithoutfill">
      <style:graphic-properties draw:marker-end="Arrowheads_20_262" draw:marker-end-width="0.3cm" draw:fill="solid" draw:textarea-vertical-align="middle" loext:decorative="false"/>
    </style:style>
    <style:style style:name="gr3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29"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0"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2"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3"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4"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5" style:family="graphic" style:parent-style-name="standard">
      <style:graphic-properties draw:stroke="none" draw:fill="none" fo:min-height="1.447cm" loext:decorative="false"/>
      <style:paragraph-properties style:writing-mode="lr-tb"/>
    </style:style>
    <style:style style:name="gr336" style:family="graphic" style:parent-style-name="standard">
      <style:graphic-properties draw:stroke="none" draw:fill="none" fo:min-height="1.446cm" loext:decorative="false"/>
      <style:paragraph-properties style:writing-mode="lr-tb"/>
    </style:style>
    <style:style style:name="gr337"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8"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0" style:family="graphic" style:parent-style-name="objectwithoutfill">
      <style:graphic-properties draw:marker-end="Arrow" draw:marker-end-width="0.3cm" draw:fill="none" draw:textarea-vertical-align="middle" loext:decorative="false"/>
    </style:style>
    <style:style style:name="gr341" style:family="graphic" style:parent-style-name="standard">
      <style:graphic-properties draw:stroke="none" draw:fill="none" fo:min-height="2.167cm" loext:decorative="false"/>
      <style:paragraph-properties style:writing-mode="lr-tb"/>
    </style:style>
    <style:style style:name="gr342"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3"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4"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5" style:family="graphic" style:parent-style-name="standard">
      <style:graphic-properties draw:stroke="none" draw:fill="none" fo:min-height="1.343cm" loext:decorative="false"/>
      <style:paragraph-properties style:writing-mode="lr-tb"/>
    </style:style>
    <style:style style:name="gr346" style:family="graphic" style:parent-style-name="standard">
      <style:graphic-properties draw:stroke="none" draw:fill="none" fo:min-height="1.918cm" loext:decorative="false"/>
      <style:paragraph-properties style:writing-mode="lr-tb"/>
    </style:style>
    <style:style style:name="gr34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8"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49"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2"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4"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5"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6"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7"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0"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3" style:family="graphic" style:parent-style-name="standard">
      <style:graphic-properties draw:stroke="none" svg:stroke-width="0.044cm" draw:stroke-linejoin="miter" draw:fill="solid" draw:fill-color="#000000" loext:decorative="false"/>
    </style:style>
    <style:style style:name="gr364"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6"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7"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69"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0"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1"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2"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3"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5"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6" style:family="graphic" style:parent-style-name="standard">
      <style:graphic-properties draw:fill="solid" draw:fill-color="#e8995a" draw:textarea-vertical-align="middle" loext:decorative="false"/>
    </style:style>
    <style:style style:name="gr377" style:family="graphic" style:parent-style-name="standard">
      <style:graphic-properties draw:fill="solid" draw:fill-color="#c7bcda" draw:textarea-vertical-align="middle" loext:decorative="false"/>
      <style:paragraph-properties style:writing-mode="lr-tb"/>
    </style:style>
    <style:style style:name="gr378" style:family="graphic" style:parent-style-name="standard">
      <style:graphic-properties draw:fill="solid" draw:fill-color="#f9dc8c" draw:textarea-vertical-align="middle" loext:decorative="false"/>
      <style:paragraph-properties style:writing-mode="lr-tb"/>
    </style:style>
    <style:style style:name="gr379" style:family="graphic" style:parent-style-name="objectwithoutfill">
      <style:graphic-properties draw:marker-end="Arrowheads_20_167" draw:marker-end-width="0.3cm" draw:fill="solid" draw:textarea-vertical-align="middle" loext:decorative="false"/>
    </style:style>
    <style:style style:name="gr380" style:family="graphic" style:parent-style-name="objectwithoutfill">
      <style:graphic-properties draw:marker-end="Arrowheads_20_168" draw:marker-end-width="0.3cm" draw:fill="solid" draw:textarea-vertical-align="middle" loext:decorative="false"/>
    </style:style>
    <style:style style:name="gr381" style:family="graphic" style:parent-style-name="objectwithoutfill">
      <style:graphic-properties draw:marker-end="Arrowheads_20_264" draw:marker-end-width="0.3cm" draw:fill="solid" draw:textarea-vertical-align="middle" loext:decorative="false"/>
    </style:style>
    <style:style style:name="gr382" style:family="graphic" style:parent-style-name="objectwithoutfill">
      <style:graphic-properties draw:marker-end="Arrowheads_20_265" draw:marker-end-width="0.3cm" draw:fill="solid" draw:textarea-vertical-align="middle" loext:decorative="false"/>
    </style:style>
    <style:style style:name="gr383" style:family="graphic" style:parent-style-name="objectwithoutfill">
      <style:graphic-properties draw:marker-end="Arrowheads_20_266" draw:marker-end-width="0.3cm" draw:fill="solid" draw:textarea-vertical-align="middle" loext:decorative="false"/>
    </style:style>
    <style:style style:name="gr384"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5" style:family="graphic" style:parent-style-name="objectwithoutfill">
      <style:graphic-properties draw:marker-end="Arrowheads_20_268" draw:marker-end-width="0.3cm" draw:fill="solid" draw:textarea-vertical-align="middle" loext:decorative="false"/>
    </style:style>
    <style:style style:name="gr386" style:family="graphic" style:parent-style-name="objectwithoutfill">
      <style:graphic-properties draw:marker-end="Arrowheads_20_269" draw:marker-end-width="0.3cm" draw:fill="solid"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8" style:family="graphic" style:parent-style-name="standard">
      <style:graphic-properties draw:fill="solid" draw:fill-color="#d86a50" draw:textarea-vertical-align="middle"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0" style:family="graphic" style:parent-style-name="standard">
      <style:graphic-properties draw:fill="solid" draw:fill-color="#b4d2ea" draw:textarea-vertical-align="middle" loext:decorative="false"/>
    </style:style>
    <style:style style:name="gr391" style:family="graphic" style:parent-style-name="standard">
      <style:graphic-properties draw:fill="solid" draw:fill-color="#f6f5f8" draw:textarea-vertical-align="middle" loext:decorative="false"/>
      <style:paragraph-properties style:writing-mode="lr-tb"/>
    </style:style>
    <style:style style:name="gr392" style:family="graphic" style:parent-style-name="standard" style:list-style-name="L1">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objectwithoutfill">
      <style:graphic-properties draw:marker-end="Arrowheads_20_279" draw:marker-end-width="0.3cm" draw:fill="solid" draw:textarea-vertical-align="middle" loext:decorative="false"/>
    </style:style>
    <style:style style:name="gr395" style:family="graphic" style:parent-style-name="objectwithoutfill">
      <style:graphic-properties draw:marker-end="Arrowheads_20_280" draw:marker-end-width="0.3cm" draw:fill="solid" draw:textarea-vertical-align="middle" loext:decorative="false"/>
    </style:style>
    <style:style style:name="gr396" style:family="graphic" style:parent-style-name="objectwithoutfill">
      <style:graphic-properties draw:marker-end="Arrowheads_20_281" draw:marker-end-width="0.3cm" draw:fill="solid" draw:textarea-vertical-align="middle" loext:decorative="false"/>
    </style:style>
    <style:style style:name="gr397" style:family="graphic" style:parent-style-name="objectwithoutfill">
      <style:graphic-properties draw:marker-end="Arrowheads_20_282" draw:marker-end-width="0.3cm" draw:fill="solid" draw:textarea-vertical-align="middle" loext:decorative="false"/>
    </style:style>
    <style:style style:name="gr398" style:family="graphic" style:parent-style-name="objectwithoutfill">
      <style:graphic-properties draw:marker-end="Arrowheads_20_283" draw:marker-end-width="0.3cm" draw:fill="solid" draw:textarea-vertical-align="middle" loext:decorative="false"/>
    </style:style>
    <style:style style:name="gr399" style:family="graphic" style:parent-style-name="objectwithoutfill">
      <style:graphic-properties draw:marker-end="Arrowheads_20_284" draw:marker-end-width="0.3cm" draw:fill="solid" draw:textarea-vertical-align="middle" loext:decorative="false"/>
    </style:style>
    <style:style style:name="gr400" style:family="graphic" style:parent-style-name="objectwithoutfill">
      <style:graphic-properties draw:marker-end="Arrowheads_20_272" draw:marker-end-width="0.3cm" draw:fill="solid" draw:textarea-vertical-align="middle" loext:decorative="false"/>
    </style:style>
    <style:style style:name="gr401" style:family="graphic" style:parent-style-name="objectwithoutfill">
      <style:graphic-properties draw:marker-end="Arrowheads_20_273" draw:marker-end-width="0.3cm" draw:fill="solid" draw:textarea-vertical-align="middle" loext:decorative="false"/>
    </style:style>
    <style:style style:name="gr402" style:family="graphic" style:parent-style-name="objectwithoutfill">
      <style:graphic-properties draw:marker-end="Arrowheads_20_274" draw:marker-end-width="0.3cm" draw:fill="solid" draw:textarea-vertical-align="middle" loext:decorative="false"/>
    </style:style>
    <style:style style:name="gr403" style:family="graphic" style:parent-style-name="objectwithoutfill">
      <style:graphic-properties draw:marker-end="Arrowheads_20_275" draw:marker-end-width="0.3cm" draw:fill="solid" draw:textarea-vertical-align="middle" loext:decorative="false"/>
    </style:style>
    <style:style style:name="gr404" style:family="graphic" style:parent-style-name="objectwithoutfill">
      <style:graphic-properties draw:marker-end="Arrowheads_20_276" draw:marker-end-width="0.3cm" draw:fill="solid" draw:textarea-vertical-align="middle" loext:decorative="false"/>
    </style:style>
    <style:style style:name="gr405" style:family="graphic" style:parent-style-name="objectwithoutfill">
      <style:graphic-properties draw:marker-end="Arrowheads_20_285" draw:marker-end-width="0.3cm" draw:fill="solid" draw:textarea-vertical-align="middle" loext:decorative="false"/>
    </style:style>
    <style:style style:name="gr406" style:family="graphic" style:parent-style-name="objectwithoutfill">
      <style:graphic-properties draw:marker-end="Arrowheads_20_286" draw:marker-end-width="0.3cm" draw:fill="solid" draw:textarea-vertical-align="middle" loext:decorative="false"/>
    </style:style>
    <style:style style:name="gr407" style:family="graphic" style:parent-style-name="standard">
      <style:graphic-properties draw:fill="solid" draw:fill-color="#f9dc8c" draw:textarea-vertical-align="middle" loext:decorative="false"/>
    </style:style>
    <style:style style:name="gr408" style:family="graphic" style:parent-style-name="standard">
      <style:graphic-properties draw:fill="solid" draw:fill-color="#70ae61" draw:textarea-vertical-align="middle" loext:decorative="false"/>
      <style:paragraph-properties style:writing-mode="lr-tb"/>
    </style:style>
    <style:style style:name="gr409" style:family="graphic" style:parent-style-name="objectwithoutfill">
      <style:graphic-properties draw:marker-end="Arrowheads_20_288" draw:marker-end-width="0.3cm" draw:fill="solid" draw:textarea-vertical-align="middle" loext:decorative="false"/>
    </style:style>
    <style:style style:name="gr410" style:family="graphic" style:parent-style-name="standard">
      <style:graphic-properties draw:fill="solid" draw:fill-color="#9b592e" draw:textarea-vertical-align="middle" loext:decorative="false"/>
      <style:paragraph-properties style:writing-mode="lr-tb"/>
    </style:style>
    <style:style style:name="gr411"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4"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5" style:family="graphic" style:parent-style-name="objectwithoutfill">
      <style:graphic-properties draw:marker-end="Arrowheads_20_289" draw:marker-end-width="0.3cm" draw:fill="solid" draw:textarea-vertical-align="middle" loext:decorative="false"/>
    </style:style>
    <style:style style:name="gr416" style:family="graphic" style:parent-style-name="objectwithoutfill">
      <style:graphic-properties draw:marker-end="Arrowheads_20_290" draw:marker-end-width="0.3cm" draw:fill="solid" draw:textarea-vertical-align="middle" loext:decorative="false"/>
    </style:style>
    <style:style style:name="gr417" style:family="graphic" style:parent-style-name="objectwithoutfill">
      <style:graphic-properties draw:marker-end="Arrowheads_20_291" draw:marker-end-width="0.3cm" draw:fill="solid" draw:textarea-vertical-align="middle" loext:decorative="false"/>
    </style:style>
    <style:style style:name="gr418" style:family="graphic" style:parent-style-name="objectwithoutfill">
      <style:graphic-properties draw:marker-end="Arrowheads_20_292" draw:marker-end-width="0.3cm" draw:fill="solid" draw:textarea-vertical-align="middle" loext:decorative="false"/>
    </style:style>
    <style:style style:name="gr419" style:family="graphic" style:parent-style-name="objectwithoutfill">
      <style:graphic-properties draw:marker-end="Arrowheads_20_293" draw:marker-end-width="0.3cm" draw:fill="solid" draw:textarea-vertical-align="middle" loext:decorative="false"/>
    </style:style>
    <style:style style:name="gr420" style:family="graphic" style:parent-style-name="objectwithoutfill">
      <style:graphic-properties draw:marker-end="Arrowheads_20_294" draw:marker-end-width="0.3cm" draw:fill="solid" draw:textarea-vertical-align="middle" loext:decorative="false"/>
    </style:style>
    <style:style style:name="gr421" style:family="graphic" style:parent-style-name="objectwithoutfill">
      <style:graphic-properties draw:marker-end="Arrowheads_20_296" draw:marker-end-width="0.3cm" draw:fill="solid" draw:textarea-vertical-align="middle" loext:decorative="false"/>
    </style:style>
    <style:style style:name="gr422" style:family="graphic" style:parent-style-name="objectwithoutfill">
      <style:graphic-properties draw:marker-end="Arrowheads_20_300" draw:marker-end-width="0.3cm" draw:fill="solid" draw:textarea-vertical-align="middle" loext:decorative="false"/>
    </style:style>
    <style:style style:name="gr423" style:family="graphic" style:parent-style-name="objectwithoutfill">
      <style:graphic-properties draw:marker-end="Arrowheads_20_301" draw:marker-end-width="0.3cm" draw:fill="solid" draw:textarea-vertical-align="middle" loext:decorative="false"/>
    </style:style>
    <style:style style:name="gr424" style:family="graphic" style:parent-style-name="objectwithoutfill">
      <style:graphic-properties draw:marker-end="Arrowheads_20_302" draw:marker-end-width="0.3cm" draw:fill="solid" draw:textarea-vertical-align="middle" loext:decorative="false"/>
    </style:style>
    <style:style style:name="gr425" style:family="graphic" style:parent-style-name="objectwithoutfill">
      <style:graphic-properties draw:marker-end="Arrowheads_20_305" draw:marker-end-width="0.3cm" draw:fill="solid" draw:textarea-vertical-align="middle" loext:decorative="false"/>
    </style:style>
    <style:style style:name="gr426"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27" style:family="graphic" style:parent-style-name="objectwithoutfill">
      <style:graphic-properties draw:marker-end="Arrowheads_20_307" draw:marker-end-width="0.3cm" draw:fill="solid" draw:textarea-vertical-align="middle" loext:decorative="false"/>
    </style:style>
    <style:style style:name="gr428" style:family="graphic" style:parent-style-name="objectwithoutfill">
      <style:graphic-properties draw:marker-end="Arrowheads_20_308" draw:marker-end-width="0.3cm" draw:fill="solid" draw:textarea-vertical-align="middle" loext:decorative="false"/>
    </style:style>
    <style:style style:name="gr429" style:family="graphic" style:parent-style-name="objectwithoutfill">
      <style:graphic-properties draw:marker-end="Arrowheads_20_314" draw:marker-end-width="0.3cm" draw:fill="solid" draw:textarea-vertical-align="middle" loext:decorative="false"/>
    </style:style>
    <style:style style:name="gr430" style:family="graphic" style:parent-style-name="objectwithoutfill">
      <style:graphic-properties draw:marker-end="Arrowheads_20_315" draw:marker-end-width="0.3cm" draw:fill="solid" draw:textarea-vertical-align="middle" loext:decorative="false"/>
    </style:style>
    <style:style style:name="gr431" style:family="graphic" style:parent-style-name="objectwithoutfill">
      <style:graphic-properties draw:marker-end="Arrowheads_20_295" draw:marker-end-width="0.3cm" draw:fill="solid" draw:textarea-vertical-align="middle" loext:decorative="false"/>
    </style:style>
    <style:style style:name="gr432" style:family="graphic" style:parent-style-name="standard">
      <style:graphic-properties draw:fill="solid" draw:fill-color="#b4d2ea" draw:textarea-vertical-align="middle" loext:decorative="false"/>
      <style:paragraph-properties style:writing-mode="lr-tb"/>
    </style:style>
    <style:style style:name="gr433" style:family="graphic" style:parent-style-name="standard">
      <style:graphic-properties svg:stroke-color="#00b0be" draw:fill="solid" draw:fill-color="#b4d2ea" draw:textarea-vertical-align="middle" loext:decorative="false"/>
      <style:paragraph-properties style:writing-mode="lr-tb"/>
    </style:style>
    <style:style style:name="gr434" style:family="graphic" style:parent-style-name="objectwithoutfill">
      <style:graphic-properties svg:stroke-color="#d86a50" draw:marker-end="Arrowheads_20_339" draw:marker-end-width="0.3cm" draw:fill="solid" draw:textarea-vertical-align="middle" loext:decorative="false"/>
    </style:style>
    <style:style style:name="gr435" style:family="graphic" style:parent-style-name="objectwithoutfill">
      <style:graphic-properties svg:stroke-color="#d86a50" draw:marker-end="Arrowheads_20_340" draw:marker-end-width="0.3cm" draw:fill="solid" draw:textarea-vertical-align="middle" loext:decorative="false"/>
    </style:style>
    <style:style style:name="gr436" style:family="graphic" style:parent-style-name="objectwithoutfill">
      <style:graphic-properties svg:stroke-color="#d86a50" draw:marker-end="Arrowheads_20_341" draw:marker-end-width="0.3cm" draw:fill="solid" draw:textarea-vertical-align="middle" loext:decorative="false"/>
    </style:style>
    <style:style style:name="gr437" style:family="graphic" style:parent-style-name="objectwithoutfill">
      <style:graphic-properties draw:marker-end="Arrowheads_20_342" draw:marker-end-width="0.3cm" draw:fill="solid" draw:textarea-vertical-align="middle" loext:decorative="false"/>
    </style:style>
    <style:style style:name="gr438" style:family="graphic" style:parent-style-name="objectwithoutfill">
      <style:graphic-properties draw:marker-end="Arrowheads_20_348" draw:marker-end-width="0.3cm" draw:fill="solid" draw:textarea-vertical-align="middle" loext:decorative="false"/>
    </style:style>
    <style:style style:name="gr439" style:family="graphic" style:parent-style-name="objectwithoutfill">
      <style:graphic-properties draw:marker-end="Arrowheads_20_349" draw:marker-end-width="0.3cm" draw:fill="solid" draw:textarea-vertical-align="middle" loext:decorative="false"/>
    </style:style>
    <style:style style:name="gr440" style:family="graphic" style:parent-style-name="objectwithoutfill">
      <style:graphic-properties draw:marker-end="Arrowheads_20_350" draw:marker-end-width="0.3cm" draw:fill="solid" draw:textarea-vertical-align="middle" loext:decorative="false"/>
    </style:style>
    <style:style style:name="gr441" style:family="graphic" style:parent-style-name="standard">
      <style:graphic-properties draw:stroke="solid" svg:stroke-color="#345d95" draw:fill="solid" draw:fill-color="#6390c2" draw:textarea-vertical-align="middle" loext:decorative="false"/>
      <style:paragraph-properties style:writing-mode="lr-tb"/>
    </style:style>
    <style:style style:name="gr442" style:family="graphic" style:parent-style-name="standard">
      <style:graphic-properties draw:stroke="solid" svg:stroke-color="#d86a50" draw:fill="solid" draw:fill-color="#9b592e" draw:textarea-vertical-align="middle" loext:decorative="false"/>
      <style:paragraph-properties style:writing-mode="lr-tb"/>
    </style:style>
    <style:style style:name="gr443" style:family="graphic" style:parent-style-name="objectwithoutfill">
      <style:graphic-properties draw:marker-end="Arrowheads_20_351" draw:marker-end-width="0.3cm" draw:fill="solid" draw:textarea-vertical-align="middle" loext:decorative="false"/>
    </style:style>
    <style:style style:name="gr444" style:family="graphic" style:parent-style-name="objectwithoutfill">
      <style:graphic-properties draw:marker-end="Arrowheads_20_352" draw:marker-end-width="0.3cm" draw:fill="solid" draw:textarea-vertical-align="middle" loext:decorative="false"/>
    </style:style>
    <style:style style:name="gr445" style:family="graphic" style:parent-style-name="objectwithoutfill">
      <style:graphic-properties draw:marker-end="Arrowheads_20_353" draw:marker-end-width="0.3cm" draw:fill="solid" draw:textarea-vertical-align="middle" loext:decorative="false"/>
    </style:style>
    <style:style style:name="gr446" style:family="graphic" style:parent-style-name="objectwithoutfill">
      <style:graphic-properties draw:marker-end="Arrowheads_20_354" draw:marker-end-width="0.3cm" draw:fill="solid" draw:textarea-vertical-align="middle" loext:decorative="false"/>
    </style:style>
    <style:style style:name="gr447" style:family="graphic" style:parent-style-name="objectwithoutfill">
      <style:graphic-properties draw:marker-end="Arrowheads_20_355" draw:marker-end-width="0.3cm" draw:fill="solid" draw:textarea-vertical-align="middle" loext:decorative="false"/>
    </style:style>
    <style:style style:name="gr448" style:family="graphic" style:parent-style-name="objectwithoutfill">
      <style:graphic-properties draw:marker-end="Arrowheads_20_356" draw:marker-end-width="0.3cm" draw:fill="solid" draw:textarea-vertical-align="middle" loext:decorative="false"/>
    </style:style>
    <style:style style:name="gr449" style:family="graphic" style:parent-style-name="objectwithoutfill">
      <style:graphic-properties draw:marker-end="Arrowheads_20_357" draw:marker-end-width="0.3cm" draw:fill="solid" draw:textarea-vertical-align="middle" loext:decorative="false"/>
    </style:style>
    <style:style style:name="gr450"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51" style:family="graphic" style:parent-style-name="objectwithoutfill">
      <style:graphic-properties draw:marker-end="Arrowheads_20_377" draw:marker-end-width="0.3cm" draw:fill="solid" draw:textarea-vertical-align="middle" loext:decorative="false"/>
    </style:style>
    <style:style style:name="gr452" style:family="graphic" style:parent-style-name="objectwithoutfill">
      <style:graphic-properties draw:marker-end="Arrowheads_20_378" draw:marker-end-width="0.3cm" draw:fill="solid" draw:textarea-vertical-align="middle" loext:decorative="false"/>
    </style:style>
    <style:style style:name="gr453" style:family="graphic" style:parent-style-name="objectwithoutfill">
      <style:graphic-properties draw:marker-end="Arrowheads_20_379" draw:marker-end-width="0.3cm" draw:fill="solid" draw:textarea-vertical-align="middle" loext:decorative="false"/>
    </style:style>
    <style:style style:name="gr454" style:family="graphic" style:parent-style-name="objectwithoutfill">
      <style:graphic-properties draw:marker-end="Arrowheads_20_380" draw:marker-end-width="0.3cm" draw:fill="solid" draw:textarea-vertical-align="middle" loext:decorative="false"/>
    </style:style>
    <style:style style:name="gr455" style:family="graphic" style:parent-style-name="objectwithoutfill">
      <style:graphic-properties draw:marker-end="Arrowheads_20_381" draw:marker-end-width="0.3cm" draw:fill="solid" draw:textarea-vertical-align="middle" loext:decorative="false"/>
    </style:style>
    <style:style style:name="gr456"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57"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5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5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60"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61"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2"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3"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64"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65"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6"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67"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68"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69"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70"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71"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72"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73"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74"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75" style:family="graphic" style:parent-style-name="objectwithoutfill">
      <style:graphic-properties draw:stroke="dash" draw:stroke-dash="Long_20_Dash" svg:stroke-width="0.04cm" svg:stroke-color="#6390c2" draw:marker-start-width="0.26cm" draw:marker-end-width="0.26cm" draw:fill="solid" draw:fill-color="#8fd7d7" draw:opacity="50%" draw:textarea-vertical-align="middle" fo:padding-top="0.12cm" fo:padding-bottom="0.12cm" fo:padding-left="0.12cm" fo:padding-right="0.12cm" draw:shadow-opacity="50%" loext:decorative="false"/>
    </style:style>
    <style:style style:name="gr476"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77"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78" style:family="graphic" style:parent-style-name="objectwithoutfill">
      <style:graphic-properties draw:marker-end="Arrowheads_20_398" draw:marker-end-width="0.3cm" draw:fill="solid" draw:textarea-vertical-align="middle" loext:decorative="false"/>
    </style:style>
    <style:style style:name="gr479"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80"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481"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484" style:family="graphic" style:parent-style-name="standard">
      <style:graphic-properties draw:stroke="none" draw:fill="none" fo:min-height="0.32cm" loext:decorative="false"/>
      <style:paragraph-properties style:writing-mode="lr-tb"/>
    </style:style>
    <style:style style:name="gr485"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86"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487"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488"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489"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490" style:family="graphic" style:parent-style-name="standard">
      <style:graphic-properties draw:stroke="none" draw:fill="none" draw:textarea-horizontal-align="center" fo:min-height="1.273cm" loext:decorative="false"/>
      <style:paragraph-properties style:writing-mode="lr-tb"/>
    </style:style>
    <style:style style:name="gr491"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92"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493" style:family="graphic" style:parent-style-name="standard" style:list-style-name="L1">
      <style:graphic-properties draw:stroke="none" draw:fill="solid" draw:fill-color="#70ae61" draw:textarea-vertical-align="middle" draw:auto-grow-height="false" fo:min-height="1.455cm" fo:min-width="1.511cm" fo:wrap-option="wrap" style:writing-mode="lr-tb" loext:decorative="false"/>
      <style:paragraph-properties style:writing-mode="lr-tb"/>
    </style:style>
    <style:style style:name="gr494" style:family="graphic" style:parent-style-name="standard">
      <style:graphic-properties draw:stroke="none" svg:stroke-color="#000000" draw:fill="none" draw:fill-color="#ffffff" draw:textarea-horizontal-align="center" draw:auto-grow-height="true" draw:auto-grow-width="true" fo:min-height="0.908cm" fo:min-width="3.243cm" loext:decorative="false"/>
      <style:paragraph-properties style:writing-mode="lr-tb"/>
    </style:style>
    <style:style style:name="gr495" style:family="graphic" style:parent-style-name="standard">
      <style:graphic-properties draw:stroke="none" draw:fill="none" fo:min-height="0.637cm" loext:decorative="false"/>
      <style:paragraph-properties style:writing-mode="lr-tb"/>
    </style:style>
    <style:style style:name="gr496" style:family="graphic" style:parent-style-name="standard">
      <style:graphic-properties draw:stroke="dash" draw:stroke-dash="Long_20_Dash" svg:stroke-width="0.05cm" svg:stroke-color="#70ae61" draw:marker-start-width="0.28cm" draw:marker-end-width="0.28cm" draw:fill="solid" draw:fill-color="#70ae61" draw:textarea-vertical-align="middle" fo:padding-top="0.15cm" fo:padding-bottom="0.15cm" fo:padding-left="0.275cm" fo:padding-right="0.275cm" loext:decorative="false"/>
      <style:paragraph-properties style:writing-mode="lr-tb"/>
    </style:style>
    <style:style style:name="gr497"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498"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499"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500"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01"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02"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03" style:family="graphic" style:parent-style-name="objectwithoutfill">
      <style:graphic-properties draw:marker-end="" draw:marker-end-width="0.1cm" draw:fill="solid" draw:textarea-vertical-align="middle" loext:decorative="false"/>
    </style:style>
    <style:style style:name="gr504"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05" style:family="graphic" style:parent-style-name="objectwithoutfill">
      <style:graphic-properties draw:marker-start="Arrow_20_short" draw:marker-end="" draw:marker-end-width="0.2cm" draw:fill="solid" draw:textarea-vertical-align="middle" loext:decorative="false"/>
    </style:style>
    <style:style style:name="gr506" style:family="graphic" style:parent-style-name="objectwithoutfill">
      <style:graphic-properties draw:marker-start="" draw:marker-end="Arrow_20_short" draw:marker-end-width="0.2cm" draw:fill="solid" draw:textarea-vertical-align="middle" loext:decorative="false"/>
    </style:style>
    <style:style style:name="gr507"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08"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09"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10"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11" style:family="graphic" style:parent-style-name="standard">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2" style:family="graphic" style:parent-style-name="standard">
      <style:graphic-properties draw:stroke="none" draw:fill="solid" draw:fill-color="#6390c2" draw:textarea-horizontal-align="justify" draw:textarea-vertical-align="middle" draw:auto-grow-height="false" fo:min-height="0.782cm" fo:min-width="0.448cm" style:writing-mode="lr-tb" loext:decorative="false"/>
      <style:paragraph-properties style:writing-mode="lr-tb"/>
    </style:style>
    <style:style style:name="gr513"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4"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5"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16" style:family="graphic" style:parent-style-name="standard">
      <style:graphic-properties draw:stroke="none" draw:fill="solid" draw:fill-color="#6390c2" draw:textarea-horizontal-align="justify" draw:textarea-vertical-align="middle" draw:auto-grow-height="false" fo:min-height="0.783cm" fo:min-width="0.448cm" style:writing-mode="lr-tb" loext:decorative="false"/>
      <style:paragraph-properties style:writing-mode="lr-tb"/>
    </style:style>
    <style:style style:name="gr517" style:family="graphic" style:parent-style-name="standard">
      <style:graphic-properties draw:fill="none" draw:textarea-vertical-align="middle" draw:auto-grow-height="false" fo:min-height="5.322cm" fo:min-width="0cm" fo:wrap-option="wrap" loext:decorative="false"/>
    </style:style>
    <style:style style:name="gr518"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19" style:family="graphic" style:parent-style-name="standard">
      <style:graphic-properties draw:fill="none" draw:textarea-vertical-align="middle" draw:auto-grow-height="false" fo:min-height="8.775cm" fo:min-width="0.065cm" fo:wrap-option="wrap" loext:decorative="false"/>
    </style:style>
    <style:style style:name="gr520" style:family="graphic" style:parent-style-name="standard">
      <style:graphic-properties draw:stroke="none" svg:stroke-color="#000000" draw:fill="none" draw:fill-color="#ffffff" draw:textarea-horizontal-align="left" draw:auto-grow-height="true" draw:auto-grow-width="true" fo:min-height="3.691cm" fo:min-width="4.336cm" loext:decorative="false"/>
      <style:paragraph-properties style:writing-mode="lr-tb"/>
    </style:style>
    <style:style style:name="gr521" style:family="graphic" style:parent-style-name="Object_20_with_20_no_20_fill_20_and_20_no_20_line">
      <style:graphic-properties draw:textarea-horizontal-align="center" draw:textarea-vertical-align="middle" draw:ole-draw-aspect="1" style:protect="size" loext:decorative="false"/>
    </style:style>
    <style:style style:name="gr522"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3"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4"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5" style:family="graphic" style:parent-style-name="standard">
      <style:graphic-properties draw:stroke="none" draw:fill="solid" draw:fill-color="#808080" draw:opacity="75%" draw:textarea-horizontal-align="justify" draw:textarea-vertical-align="middle" draw:auto-grow-height="true" fo:min-height="0cm" fo:min-width="0cm" draw:shadow-opacity="75%" style:writing-mode="lr-tb" loext:decorative="false"/>
      <style:paragraph-properties style:writing-mode="lr-tb"/>
    </style:style>
    <style:style style:name="gr526" style:family="graphic" style:parent-style-name="objectwithoutfill">
      <style:graphic-properties draw:marker-end="Arrowheads_20_418" draw:marker-end-width="0.3cm" draw:fill="solid" draw:textarea-vertical-align="middle" loext:decorative="false"/>
    </style:style>
    <style:style style:name="gr52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29" style:family="graphic" style:parent-style-name="standard">
      <style:graphic-properties draw:stroke="none" draw:fill="none" draw:textarea-horizontal-align="center" fo:min-height="1.971cm" loext:decorative="false"/>
      <style:paragraph-properties style:writing-mode="lr-tb"/>
    </style:style>
    <style:style style:name="gr530" style:family="graphic" style:parent-style-name="standard">
      <style:graphic-properties draw:textarea-horizontal-align="justify" draw:textarea-vertical-align="middle" draw:auto-grow-height="false" fo:min-height="3.285cm" fo:min-width="2.618cm" loext:decorative="false"/>
    </style:style>
    <style:style style:name="gr531" style:family="graphic" style:parent-style-name="standard">
      <style:graphic-properties draw:stroke="none" draw:fill="solid" draw:fill-color="#345d95" draw:textarea-vertical-align="middle" draw:auto-grow-height="false" fo:min-height="0cm" fo:min-width="0cm" loext:decorative="false"/>
    </style:style>
    <style:style style:name="gr532"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33" style:family="graphic" style:parent-style-name="standard">
      <style:graphic-properties draw:stroke="none" draw:fill="solid" draw:fill-color="#b4d2ea" draw:textarea-vertical-align="middle" draw:auto-grow-height="false" fo:min-height="0cm" fo:min-width="0cm" loext:decorative="false"/>
    </style:style>
    <style:style style:name="gr534"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35"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36"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37"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38"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39"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40" style:family="graphic" style:parent-style-name="objectwithoutfill">
      <style:graphic-properties draw:marker-end="Arrowheads_20_419" draw:marker-end-width="0.2cm" draw:fill="solid" draw:textarea-vertical-align="middle" loext:decorative="false"/>
    </style:style>
    <style:style style:name="gr541"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44" style:family="graphic" style:parent-style-name="standard" style:list-style-name="L1">
      <style:graphic-properties draw:stroke="none" draw:fill="none" fo:min-height="0.48cm" loext:decorative="false"/>
      <style:paragraph-properties style:writing-mode="lr-tb"/>
    </style:style>
    <style:style style:name="gr545" style:family="graphic" style:parent-style-name="standard" style:list-style-name="L1">
      <style:graphic-properties draw:stroke="none" draw:fill="none" fo:min-height="0.48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47" style:family="graphic" style:parent-style-name="standard">
      <style:graphic-properties draw:marker-start="Arrow" draw:marker-start-width="0.05cm" draw:marker-end="Arrow" draw:marker-end-width="0.05cm" draw:textarea-vertical-align="middle" loext:decorative="false"/>
    </style:style>
    <style:style style:name="gr548"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49" style:family="graphic" style:parent-style-name="objectwithoutfill">
      <style:graphic-properties draw:marker-end="Arrow" draw:marker-end-width="0.2cm" draw:fill="solid" draw:textarea-vertical-align="middle" loext:decorative="false"/>
    </style:style>
    <style:style style:name="gr550"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51"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52" style:family="graphic" style:parent-style-name="standard">
      <style:graphic-properties draw:marker-end="Arrowheads_20_420" draw:textarea-vertical-align="middle" loext:decorative="false"/>
    </style:style>
    <style:style style:name="gr553"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54"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57"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58"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59"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60"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61" style:family="graphic" style:parent-style-name="standard">
      <style:graphic-properties draw:stroke="none" svg:stroke-color="#000000" draw:fill="none" draw:fill-color="#ffffff" draw:textarea-horizontal-align="center" draw:auto-grow-height="true" draw:auto-grow-width="true" fo:min-height="1.765cm" fo:min-width="4.56cm" loext:decorative="false"/>
      <style:paragraph-properties style:writing-mode="lr-tb"/>
    </style:style>
    <style:style style:name="gr562" style:family="graphic" style:parent-style-name="standard" style:list-style-name="L1">
      <style:graphic-properties draw:stroke="none" draw:fill="solid" draw:fill-color="#70ae61" draw:textarea-vertical-align="middle" draw:auto-grow-height="false" fo:min-height="1.455cm" fo:min-width="1.698cm" fo:wrap-option="wrap" style:writing-mode="lr-tb" loext:decorative="false"/>
      <style:paragraph-properties style:writing-mode="lr-tb"/>
    </style:style>
    <style:style style:name="gr563" style:family="graphic" style:parent-style-name="standard">
      <style:graphic-properties draw:stroke="none" draw:fill="none" draw:textarea-horizontal-align="center" fo:min-height="1.183cm" loext:decorative="false"/>
      <style:paragraph-properties style:writing-mode="lr-tb"/>
    </style:style>
    <style:style style:name="gr564"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65" style:family="graphic" style:parent-style-name="objectwithoutfill">
      <style:graphic-properties draw:marker-end="Arrow" draw:marker-end-width="0.1cm" draw:fill="solid" draw:textarea-vertical-align="middle" loext:decorative="false"/>
    </style:style>
    <style:style style:name="gr566" style:family="graphic" style:parent-style-name="standard">
      <style:graphic-properties draw:stroke="none" svg:stroke-color="#000000" draw:fill="none" draw:fill-color="#ffffff" draw:textarea-horizontal-align="left" draw:auto-grow-height="true" draw:auto-grow-width="true" fo:min-height="0.395cm" fo:min-width="3.458cm" loext:decorative="false"/>
      <style:paragraph-properties style:writing-mode="lr-tb"/>
    </style:style>
    <style:style style:name="gr567"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68"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69"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70"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71" style:family="graphic" style:parent-style-name="objectwithoutfill">
      <style:graphic-properties draw:marker-end="Arrow" draw:marker-end-width="0.1cm" draw:fill="solid" draw:textarea-vertical-align="bottom" loext:decorative="false"/>
    </style:style>
    <style:style style:name="gr572"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73" style:family="graphic" style:parent-style-name="Arrow_20_Line" style:list-style-name="L1">
      <style:graphic-properties draw:textarea-vertical-align="middle" draw:line-distance="0.14cm" loext:decorative="false"/>
      <style:paragraph-properties style:writing-mode="lr-tb"/>
    </style:style>
    <style:style style:name="gr574" style:family="graphic" style:parent-style-name="standard">
      <style:graphic-properties draw:stroke="none" draw:fill="none" draw:textarea-horizontal-align="center" fo:min-height="0.609cm" loext:decorative="false"/>
      <style:paragraph-properties style:writing-mode="lr-tb"/>
    </style:style>
    <style:style style:name="gr575" style:family="graphic" style:parent-style-name="standard" style:list-style-name="L1">
      <style:graphic-properties draw:stroke="none" draw:fill="solid" draw:fill-color="#70ae61" draw:textarea-vertical-align="middle" draw:auto-grow-height="false" fo:min-height="1.455cm" fo:min-width="1.698cm" fo:wrap-option="wrap" style:writing-mode="lr-tb" loext:decorative="false"/>
      <style:paragraph-properties style:writing-mode="lr-tb"/>
    </style:style>
    <style:style style:name="gr576" style:family="graphic" style:parent-style-name="standard">
      <style:graphic-properties draw:stroke="none" draw:fill="solid" draw:fill-color="#222222" draw:textarea-horizontal-align="left" draw:textarea-vertical-align="middle" draw:auto-grow-width="true" fo:min-height="0.739cm" fo:min-width="2.67cm" fo:padding-top="0cm" fo:padding-bottom="0cm" fo:padding-left="0cm" fo:padding-right="0cm" draw:shadow="hidden" loext:decorative="false"/>
    </style:style>
    <style:style style:name="gr577" style:family="graphic" style:parent-style-name="standard">
      <style:graphic-properties draw:stroke="none" draw:fill="solid" draw:fill-color="#222222" draw:textarea-horizontal-align="left" draw:textarea-vertical-align="middle" draw:auto-grow-width="true" fo:min-height="0.606cm" fo:min-width="0.712cm" fo:padding-top="0cm" fo:padding-bottom="0cm" fo:padding-left="0cm" fo:padding-right="0cm" draw:shadow="hidden" loext:decorative="false"/>
    </style:style>
    <style:style style:name="gr578" style:family="graphic" style:parent-style-name="standard">
      <style:graphic-properties draw:stroke="solid" draw:stroke-dash="Dash_20_Dot_20_4" svg:stroke-width="0.106cm" svg:stroke-color="#333333" draw:stroke-linejoin="round" svg:stroke-linecap="round" draw:textarea-horizontal-align="center" draw:textarea-vertical-align="middle" fo:padding-top="0.178cm" fo:padding-bottom="0.178cm" fo:padding-left="0.303cm" fo:padding-right="0.303cm" loext:decorative="false"/>
    </style:style>
    <style:style style:name="gr579" style:family="graphic" style:parent-style-name="standard">
      <style:graphic-properties draw:stroke="dash" draw:stroke-dash="Dash_20_Dot_20_4" svg:stroke-width="0cm" svg:stroke-color="#333333" draw:stroke-linejoin="none" svg:stroke-linecap="round" draw:fill="solid" draw:fill-color="#333333" draw:textarea-horizontal-align="center" draw:textarea-vertical-align="middle" loext:decorative="false"/>
    </style:style>
    <style:style style:name="gr580" style:family="graphic" style:parent-style-name="standard">
      <style:graphic-properties draw:stroke="dash" draw:stroke-dash="Dash_20_Dot_20_4" svg:stroke-width="0cm" svg:stroke-color="#333333" draw:stroke-linejoin="none" svg:stroke-linecap="round" draw:fill="solid" draw:fill-color="#ffffff" draw:textarea-horizontal-align="center" draw:textarea-vertical-align="middle" loext:decorative="false"/>
    </style:style>
    <style:style style:name="gr581" style:family="graphic" style:parent-style-name="standard">
      <style:graphic-properties draw:stroke="solid" draw:stroke-dash="Dash_20_Dot_20_4" svg:stroke-width="0.106cm" svg:stroke-color="#333333" draw:stroke-linejoin="miter" svg:stroke-linecap="butt" draw:fill="none" draw:fill-color="#ffffff" draw:textarea-horizontal-align="center" draw:textarea-vertical-align="middle" fo:padding-top="0.178cm" fo:padding-bottom="0.178cm" fo:padding-left="0.303cm" fo:padding-right="0.303cm" loext:decorative="false"/>
    </style:style>
    <style:style style:name="gr582" style:family="graphic" style:parent-style-name="standard">
      <style:graphic-properties draw:stroke="none" draw:fill="solid" draw:fill-color="#222222" draw:textarea-horizontal-align="left" draw:textarea-vertical-align="middle" draw:auto-grow-width="true" fo:min-height="0.739cm" fo:min-width="0.395cm" fo:padding-top="0cm" fo:padding-bottom="0cm" fo:padding-left="0cm" fo:padding-right="0cm" draw:shadow="hidden" loext:decorative="false"/>
    </style:style>
    <style:style style:name="gr583" style:family="graphic" style:parent-style-name="standard">
      <style:graphic-properties draw:stroke="none" draw:fill="solid" draw:fill-color="#222222" draw:textarea-horizontal-align="left" draw:textarea-vertical-align="middle" draw:auto-grow-width="true" fo:min-height="0.739cm" fo:min-width="2.935cm" fo:padding-top="0cm" fo:padding-bottom="0cm" fo:padding-left="0cm" fo:padding-right="0cm" draw:shadow="hidden" loext:decorative="false"/>
    </style:style>
    <style:style style:name="gr584" style:family="graphic" style:parent-style-name="standard">
      <style:graphic-properties draw:stroke="none" draw:fill="solid" draw:fill-color="#222222" draw:textarea-horizontal-align="left" draw:textarea-vertical-align="middle" draw:auto-grow-width="true" fo:min-height="0.739cm" fo:min-width="1.48cm" fo:padding-top="0cm" fo:padding-bottom="0cm" fo:padding-left="0cm" fo:padding-right="0cm" draw:shadow="hidden" loext:decorative="false"/>
    </style:style>
    <style:style style:name="gr585" style:family="graphic" style:parent-style-name="standard">
      <style:graphic-properties draw:stroke="none" draw:fill="solid" draw:fill-color="#222222" draw:textarea-horizontal-align="left" draw:textarea-vertical-align="middle" draw:auto-grow-width="true" fo:min-height="0.606cm" fo:min-width="0.845cm" fo:padding-top="0cm" fo:padding-bottom="0cm" fo:padding-left="0cm" fo:padding-right="0cm" draw:shadow="hidden" loext:decorative="false"/>
    </style:style>
    <style:style style:name="gr586" style:family="graphic" style:parent-style-name="standard">
      <style:graphic-properties draw:stroke="dash" draw:stroke-dash="Dash_20_Dot_20_4" svg:stroke-width="0cm" svg:stroke-color="#333333" draw:stroke-linejoin="none" svg:stroke-linecap="round" draw:fill="solid" draw:fill-color="#cfe8fa" draw:textarea-horizontal-align="center" draw:textarea-vertical-align="middle" loext:decorative="false"/>
    </style:style>
    <style:style style:name="gr587" style:family="graphic" style:parent-style-name="standard">
      <style:graphic-properties draw:stroke="solid" draw:stroke-dash="Dash_20_Dot_20_4" svg:stroke-width="0.106cm" svg:stroke-color="#456a96" draw:stroke-linejoin="miter" svg:stroke-linecap="butt" draw:fill="none" draw:fill-color="#cfe8fa" draw:textarea-horizontal-align="center" draw:textarea-vertical-align="middle" fo:padding-top="0.178cm" fo:padding-bottom="0.178cm" fo:padding-left="0.303cm" fo:padding-right="0.303cm" loext:decorative="false"/>
    </style:style>
    <style:style style:name="gr588" style:family="graphic" style:parent-style-name="standard">
      <style:graphic-properties draw:stroke="none" draw:fill="solid" draw:fill-color="#222222" draw:textarea-horizontal-align="left" draw:textarea-vertical-align="middle" draw:auto-grow-width="true" fo:min-height="0.818cm" fo:min-width="3.199cm" fo:padding-top="0cm" fo:padding-bottom="0cm" fo:padding-left="0cm" fo:padding-right="0cm" draw:shadow="hidden" loext:decorative="false"/>
    </style:style>
    <style:style style:name="gr589" style:family="graphic" style:parent-style-name="standard">
      <style:graphic-properties draw:stroke="none" draw:fill="solid" draw:fill-color="#222222" draw:textarea-horizontal-align="left" draw:textarea-vertical-align="middle" draw:auto-grow-width="true" fo:min-height="0.739cm" fo:min-width="2.855cm" fo:padding-top="0cm" fo:padding-bottom="0cm" fo:padding-left="0cm" fo:padding-right="0cm" draw:shadow="hidden" loext:decorative="false"/>
    </style:style>
    <style:style style:name="gr590" style:family="graphic" style:parent-style-name="standard">
      <style:graphic-properties draw:stroke="none" draw:fill="solid" draw:fill-color="#222222" draw:textarea-horizontal-align="left" draw:textarea-vertical-align="middle" draw:auto-grow-width="true" fo:min-height="0.739cm" fo:min-width="1.982cm" fo:padding-top="0cm" fo:padding-bottom="0cm" fo:padding-left="0cm" fo:padding-right="0cm" draw:shadow="hidden" loext:decorative="false"/>
    </style:style>
    <style:style style:name="gr591" style:family="graphic" style:parent-style-name="standard">
      <style:graphic-properties draw:stroke="dash" draw:stroke-dash="Dash_20_Dot_20_4" svg:stroke-width="0cm" svg:stroke-color="#333333" draw:stroke-linejoin="none" svg:stroke-linecap="round" draw:fill="solid" draw:fill-color="#bfe3bd" draw:textarea-horizontal-align="center" draw:textarea-vertical-align="middle" loext:decorative="false"/>
    </style:style>
    <style:style style:name="gr592" style:family="graphic" style:parent-style-name="standard">
      <style:graphic-properties draw:stroke="solid" draw:stroke-dash="Dash_20_Dot_20_4" svg:stroke-width="0.106cm" svg:stroke-color="#4a7c4c" draw:stroke-linejoin="miter" svg:stroke-linecap="butt" draw:fill="none" draw:fill-color="#bfe3bd" draw:textarea-horizontal-align="center" draw:textarea-vertical-align="middle" fo:padding-top="0.178cm" fo:padding-bottom="0.178cm" fo:padding-left="0.303cm" fo:padding-right="0.303cm" loext:decorative="false"/>
    </style:style>
    <style:style style:name="gr593" style:family="graphic" style:parent-style-name="standard">
      <style:graphic-properties draw:stroke="none" draw:fill="solid" draw:fill-color="#222222" draw:textarea-horizontal-align="left" draw:textarea-vertical-align="middle" draw:auto-grow-width="true" fo:min-height="0.818cm" fo:min-width="2.75cm" fo:padding-top="0cm" fo:padding-bottom="0cm" fo:padding-left="0cm" fo:padding-right="0cm" draw:shadow="hidden" loext:decorative="false"/>
    </style:style>
    <style:style style:name="gr594" style:family="graphic" style:parent-style-name="standard">
      <style:graphic-properties draw:stroke="none" draw:fill="solid" draw:fill-color="#222222" draw:textarea-horizontal-align="left" draw:textarea-vertical-align="middle" draw:auto-grow-width="true" fo:min-height="0.739cm" fo:min-width="2.194cm" fo:padding-top="0cm" fo:padding-bottom="0cm" fo:padding-left="0cm" fo:padding-right="0cm" draw:shadow="hidden" loext:decorative="false"/>
    </style:style>
    <style:style style:name="gr595" style:family="graphic" style:parent-style-name="standard">
      <style:graphic-properties draw:stroke="none" draw:fill="solid" draw:fill-color="#222222" draw:textarea-horizontal-align="left" draw:textarea-vertical-align="middle" draw:auto-grow-width="true" fo:min-height="0.606cm" fo:min-width="0.315cm" fo:padding-top="0cm" fo:padding-bottom="0cm" fo:padding-left="0cm" fo:padding-right="0cm" draw:shadow="hidden" loext:decorative="false"/>
    </style:style>
    <style:style style:name="gr596" style:family="graphic" style:parent-style-name="standard">
      <style:graphic-properties draw:stroke="none" draw:fill="solid" draw:fill-color="#222222" draw:textarea-horizontal-align="left" draw:textarea-vertical-align="middle" draw:auto-grow-width="true" fo:min-height="0.448cm" fo:min-width="0.21cm" fo:padding-top="0cm" fo:padding-bottom="0cm" fo:padding-left="0cm" fo:padding-right="0cm" draw:shadow="hidden" loext:decorative="false"/>
    </style:style>
    <style:style style:name="gr597" style:family="graphic" style:parent-style-name="standard">
      <style:graphic-properties draw:stroke="none" draw:fill="solid" draw:fill-color="#222222" draw:textarea-horizontal-align="left" draw:textarea-vertical-align="middle" draw:auto-grow-width="true" fo:min-height="0.606cm" fo:min-width="0.527cm" fo:padding-top="0cm" fo:padding-bottom="0cm" fo:padding-left="0cm" fo:padding-right="0cm" draw:shadow="hidden" loext:decorative="false"/>
    </style:style>
    <style:style style:name="gr598" style:family="graphic" style:parent-style-name="standard">
      <style:graphic-properties draw:stroke="none" draw:fill="solid" draw:fill-color="#222222" draw:textarea-horizontal-align="left" draw:textarea-vertical-align="middle" draw:auto-grow-width="true" fo:min-height="0.739cm" fo:min-width="3.517cm" fo:padding-top="0cm" fo:padding-bottom="0cm" fo:padding-left="0cm" fo:padding-right="0cm" draw:shadow="hidden" loext:decorative="false"/>
    </style:style>
    <style:style style:name="gr599" style:family="graphic" style:parent-style-name="standard">
      <style:graphic-properties draw:stroke="solid" draw:stroke-dash="Dash_20_Dot_20_4" svg:stroke-width="0.132cm" svg:stroke-color="#d36b42" draw:stroke-linejoin="round" svg:stroke-linecap="round" draw:textarea-horizontal-align="center" draw:textarea-vertical-align="middle" fo:padding-top="0.191cm" fo:padding-bottom="0.191cm" fo:padding-left="0.316cm" fo:padding-right="0.316cm" loext:decorative="false"/>
    </style:style>
    <style:style style:name="gr600" style:family="graphic" style:parent-style-name="standard">
      <style:graphic-properties draw:stroke="dash" draw:stroke-dash="Dash_20_Dot_20_4" svg:stroke-width="0cm" svg:stroke-color="#d36b42" draw:stroke-linejoin="none" svg:stroke-linecap="round" draw:fill="solid" draw:fill-color="#d36b42" draw:textarea-horizontal-align="center" draw:textarea-vertical-align="middle" loext:decorative="false"/>
    </style:style>
    <style:style style:name="gr601" style:family="graphic" style:parent-style-name="standard">
      <style:graphic-properties draw:stroke="dash" draw:stroke-dash="Dash_20_Dot_20_4" svg:stroke-width="0cm" svg:stroke-color="#d36b42" draw:stroke-linejoin="none" svg:stroke-linecap="round" draw:fill="solid" draw:fill-color="#f7d682" draw:textarea-horizontal-align="center" draw:textarea-vertical-align="middle" loext:decorative="false"/>
    </style:style>
    <style:style style:name="gr602" style:family="graphic" style:parent-style-name="standard">
      <style:graphic-properties draw:stroke="solid" draw:stroke-dash="Dash_20_Dot_20_4" svg:stroke-width="0.106cm" svg:stroke-color="#a37325" draw:stroke-linejoin="miter" svg:stroke-linecap="butt" draw:fill="none" draw:fill-color="#f7d682" draw:textarea-horizontal-align="center" draw:textarea-vertical-align="middle" fo:padding-top="0.178cm" fo:padding-bottom="0.178cm" fo:padding-left="0.303cm" fo:padding-right="0.303cm" loext:decorative="false"/>
    </style:style>
    <style:style style:name="gr603" style:family="graphic" style:parent-style-name="standard">
      <style:graphic-properties draw:stroke="none" draw:fill="solid" draw:fill-color="#222222" draw:textarea-horizontal-align="left" draw:textarea-vertical-align="middle" draw:auto-grow-width="true" fo:min-height="0.606cm" fo:min-width="0.792cm" fo:padding-top="0cm" fo:padding-bottom="0cm" fo:padding-left="0cm" fo:padding-right="0cm" draw:shadow="hidden" loext:decorative="false"/>
    </style:style>
    <style:style style:name="gr604" style:family="graphic" style:parent-style-name="standard">
      <style:graphic-properties draw:stroke="dash" draw:stroke-dash="Dash_20_Dot_20_4" svg:stroke-width="0cm" svg:stroke-color="#333333" draw:stroke-linejoin="none" svg:stroke-linecap="round" draw:fill="solid" draw:fill-color="#d6cce4" draw:textarea-horizontal-align="center" draw:textarea-vertical-align="middle" loext:decorative="false"/>
    </style:style>
    <style:style style:name="gr605" style:family="graphic" style:parent-style-name="standard">
      <style:graphic-properties draw:stroke="solid" draw:stroke-dash="Dash_20_Dot_20_4" svg:stroke-width="0.106cm" svg:stroke-color="#536b9d" draw:stroke-linejoin="miter" svg:stroke-linecap="butt" draw:fill="none" draw:fill-color="#d6cce4" draw:textarea-horizontal-align="center" draw:textarea-vertical-align="middle" fo:padding-top="0.178cm" fo:padding-bottom="0.178cm" fo:padding-left="0.303cm" fo:padding-right="0.303cm" loext:decorative="false"/>
    </style:style>
    <style:style style:name="gr606" style:family="graphic" style:parent-style-name="standard">
      <style:graphic-properties draw:stroke="none" draw:fill="solid" draw:fill-color="#222222" draw:textarea-horizontal-align="left" draw:textarea-vertical-align="middle" draw:auto-grow-width="true" fo:min-height="0.818cm" fo:min-width="2.353cm" fo:padding-top="0cm" fo:padding-bottom="0cm" fo:padding-left="0cm" fo:padding-right="0cm" draw:shadow="hidden" loext:decorative="false"/>
    </style:style>
    <style:style style:name="gr607" style:family="graphic" style:parent-style-name="standard">
      <style:graphic-properties draw:stroke="none" draw:fill="solid" draw:fill-color="#222222" draw:textarea-horizontal-align="left" draw:textarea-vertical-align="middle" draw:auto-grow-width="true" fo:min-height="0.739cm" fo:min-width="5.104cm" fo:padding-top="0cm" fo:padding-bottom="0cm" fo:padding-left="0cm" fo:padding-right="0cm" draw:shadow="hidden" loext:decorative="false"/>
    </style:style>
    <style:style style:name="gr608" style:family="graphic" style:parent-style-name="standard">
      <style:graphic-properties draw:stroke="none" draw:fill="solid" draw:fill-color="#222222" draw:textarea-horizontal-align="left" draw:textarea-vertical-align="middle" draw:auto-grow-width="true" fo:min-height="0.606cm" fo:min-width="0.289cm" fo:padding-top="0cm" fo:padding-bottom="0cm" fo:padding-left="0cm" fo:padding-right="0cm" draw:shadow="hidden" loext:decorative="false"/>
    </style:style>
    <style:style style:name="gr609" style:family="graphic" style:parent-style-name="standard">
      <style:graphic-properties draw:stroke="none" draw:fill="solid" draw:fill-color="#222222" draw:textarea-horizontal-align="left" draw:textarea-vertical-align="middle" draw:auto-grow-width="true" fo:min-height="0.448cm" fo:min-width="0.315cm" fo:padding-top="0cm" fo:padding-bottom="0cm" fo:padding-left="0cm" fo:padding-right="0cm" draw:shadow="hidden" loext:decorative="false"/>
    </style:style>
    <style:style style:name="gr610"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611" style:family="graphic" style:parent-style-name="standard">
      <style:graphic-properties draw:fill="none" draw:textarea-vertical-align="middle" draw:auto-grow-height="false" fo:min-height="1.481cm" fo:min-width="0cm" fo:wrap-option="wrap" loext:decorative="false"/>
    </style:style>
    <style:style style:name="gr612" style:family="graphic" style:parent-style-name="standard">
      <style:graphic-properties draw:stroke="none" svg:stroke-color="#000000" draw:fill="none" draw:fill-color="#ffffff" draw:textarea-horizontal-align="center" draw:auto-grow-height="true" draw:auto-grow-width="true" fo:min-height="2.646cm" fo:min-width="4.144cm" loext:decorative="false"/>
      <style:paragraph-properties style:writing-mode="lr-tb"/>
    </style:style>
    <style:style style:name="gr613" style:family="graphic" style:parent-style-name="standard">
      <style:graphic-properties draw:fill="none" draw:textarea-vertical-align="middle" draw:auto-grow-height="false" fo:min-height="1.095cm" fo:min-width="0cm" fo:wrap-option="wrap" loext:decorative="false"/>
    </style:style>
    <style:style style:name="gr614" style:family="graphic" style:parent-style-name="objectwithoutfill">
      <style:graphic-properties draw:marker-end="Arrowheads_20_399" draw:marker-end-width="0.1cm" draw:fill="solid" draw:textarea-vertical-align="middle" loext:decorative="false"/>
    </style:style>
    <style:style style:name="gr615" style:family="graphic" style:parent-style-name="objectwithoutfill">
      <style:graphic-properties draw:marker-end="Arrowheads_20_400" draw:marker-end-width="0.1cm" draw:fill="solid" draw:textarea-vertical-align="middle" loext:decorative="false"/>
    </style:style>
    <style:style style:name="gr616" style:family="graphic" style:parent-style-name="standard">
      <style:graphic-properties draw:stroke="none" svg:stroke-color="#000000" draw:fill="none" draw:fill-color="#ffffff" draw:textarea-horizontal-align="left" draw:auto-grow-height="true" draw:auto-grow-width="true" fo:min-height="0.949cm" fo:min-width="4.369cm" loext:decorative="false"/>
      <style:paragraph-properties style:writing-mode="lr-tb"/>
    </style:style>
    <style:style style:name="gr61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77cm" fo:min-width="2.033cm" fo:padding-top="0.55cm" fo:padding-bottom="0.25cm" fo:padding-left="0.27cm" fo:padding-right="0.27cm" style:writing-mode="lr-tb" loext:decorative="false"/>
      <style:paragraph-properties style:writing-mode="lr-tb"/>
    </style:style>
    <style:style style:name="gr618" style:family="graphic" style:parent-style-name="standard">
      <style:graphic-properties draw:textarea-horizontal-align="justify" draw:textarea-vertical-align="middle" draw:auto-grow-height="false" fo:min-height="0.436cm" fo:min-width="1.392cm" style:writing-mode="lr-tb" loext:decorative="false"/>
      <style:paragraph-properties style:writing-mode="lr-tb"/>
    </style:style>
    <style:style style:name="gr619" style:family="graphic" style:parent-style-name="standard">
      <style:graphic-properties svg:stroke-width="0.05cm" svg:stroke-color="#aaafc9" draw:marker-start-width="0.28cm" draw:marker-end-width="0.28cm" draw:fill="solid" draw:fill-color="#accda1" loext:fill-use-slide-background="false" draw:opacity="50%" draw:textarea-vertical-align="middle" fo:padding-top="0.15cm" fo:padding-bottom="0.15cm" fo:padding-left="0.275cm" fo:padding-right="0.275cm" draw:shadow-opacity="50%" loext:decorative="false"/>
    </style:style>
    <style:style style:name="gr620" style:family="graphic" style:parent-style-name="standard">
      <style:graphic-properties svg:stroke-width="0.05cm" svg:stroke-color="#aaafc9" draw:marker-start-width="0.28cm" draw:marker-end-width="0.28cm" draw:fill="solid" draw:fill-color="#b4d2ea" loext:fill-use-slide-background="false" draw:opacity="50%" draw:textarea-vertical-align="middle" fo:padding-top="0.15cm" fo:padding-bottom="0.15cm" fo:padding-left="0.275cm" fo:padding-right="0.275cm" draw:shadow-opacity="50%" loext:decorative="false"/>
    </style:style>
    <style:style style:name="gr621" style:family="graphic" style:parent-style-name="standard">
      <style:graphic-properties draw:stroke="none" svg:stroke-color="#000000" draw:fill="none" draw:fill-color="#ffffff" draw:textarea-horizontal-align="center" draw:auto-grow-height="true" draw:auto-grow-width="true" fo:min-height="1.575cm" fo:min-width="8.291cm" loext:decorative="false"/>
      <style:paragraph-properties style:writing-mode="lr-tb"/>
    </style:style>
    <style:style style:name="gr622" style:family="graphic" style:parent-style-name="objectwithoutfill">
      <style:graphic-properties draw:marker-start="Arrow" draw:marker-start-width="0.15cm" draw:marker-end="Arrow" draw:marker-end-width="0.15cm" draw:fill="solid" draw:textarea-vertical-align="middle" loext:decorative="false"/>
    </style:style>
    <style:style style:name="gr623" style:family="graphic" style:parent-style-name="objectwithoutfill">
      <style:graphic-properties draw:marker-start="" draw:marker-start-width="0.15cm" draw:marker-end="Arrow" draw:marker-end-width="0.15cm" draw:fill="solid" draw:textarea-vertical-align="middle" loext:decorative="false"/>
    </style:style>
    <style:style style:name="gr624" style:family="graphic" style:parent-style-name="standard">
      <style:graphic-properties draw:stroke="none" svg:stroke-color="#000000" draw:fill="none" draw:fill-color="#ffffff" draw:textarea-horizontal-align="left" draw:auto-grow-height="true" draw:auto-grow-width="true" fo:min-height="0.395cm" fo:min-width="3.537cm" loext:decorative="false"/>
      <style:paragraph-properties style:writing-mode="lr-tb"/>
    </style:style>
    <style:style style:name="gr625" style:family="graphic" style:parent-style-name="standard">
      <style:graphic-properties draw:stroke="none" svg:stroke-color="#000000" draw:fill="none" draw:fill-color="#ffffff" draw:textarea-horizontal-align="left" draw:auto-grow-height="true" draw:auto-grow-width="true" fo:min-height="0.395cm" fo:min-width="0.764cm" loext:decorative="false"/>
      <style:paragraph-properties style:writing-mode="lr-tb"/>
    </style:style>
    <style:style style:name="gr626" style:family="graphic" style:parent-style-name="standard">
      <style:graphic-properties draw:stroke="none" svg:stroke-color="#000000" draw:fill="none" draw:fill-color="#ffffff" draw:textarea-horizontal-align="left" draw:auto-grow-height="true" draw:auto-grow-width="true" fo:min-height="0.395cm" fo:min-width="0.979cm" loext:decorative="false"/>
      <style:paragraph-properties style:writing-mode="lr-tb"/>
    </style:style>
    <style:style style:name="gr62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073cm" fo:min-width="3.09cm" fo:padding-top="0.65cm" fo:padding-bottom="0.25cm" fo:padding-left="0.27cm" fo:padding-right="0.27cm" style:writing-mode="lr-tb" loext:decorative="false"/>
      <style:paragraph-properties style:writing-mode="lr-tb"/>
    </style:style>
    <style:style style:name="gr628" style:family="graphic" style:parent-style-name="standard">
      <style:graphic-properties draw:stroke="none" svg:stroke-color="#000000" draw:fill="none" draw:fill-color="#ffffff" draw:textarea-horizontal-align="center" draw:auto-grow-height="true" draw:auto-grow-width="true" fo:min-height="0.637cm" fo:min-width="1.169cm" loext:decorative="false"/>
      <style:paragraph-properties style:writing-mode="lr-tb"/>
    </style:style>
    <style:style style:name="gr629"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630"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631" style:family="graphic" style:parent-style-name="standard">
      <style:graphic-properties draw:stroke="none" svg:stroke-color="#000000" draw:fill="none" draw:fill-color="#ffffff" draw:textarea-horizontal-align="left" draw:auto-grow-height="true" draw:auto-grow-width="true" fo:min-height="0.319cm" fo:min-width="1.232cm" loext:decorative="false"/>
      <style:paragraph-properties style:writing-mode="lr-tb"/>
    </style:style>
    <style:style style:name="gr632" style:family="graphic" style:parent-style-name="standard">
      <style:graphic-properties draw:stroke="none" svg:stroke-color="#000000" draw:fill="none" draw:fill-color="#ffffff" draw:textarea-horizontal-align="left" draw:auto-grow-height="true" draw:auto-grow-width="true" fo:min-height="0.661cm" fo:min-width="2.296cm" loext:decorative="false"/>
      <style:paragraph-properties style:writing-mode="lr-tb"/>
    </style:style>
    <style:style style:name="gr633"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paragraph-properties style:writing-mode="lr-tb"/>
    </style:style>
    <style:style style:name="gr634"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bottom" fo:padding-top="0.145cm" fo:padding-bottom="0.145cm" fo:padding-left="0.27cm" fo:padding-right="0.27cm" loext:decorative="false"/>
      <style:paragraph-properties style:writing-mode="lr-tb"/>
    </style:style>
    <style:style style:name="gr635" style:family="graphic" style:parent-style-name="objectwithoutfill">
      <style:graphic-properties draw:marker-end="Arrowheads_20_309" draw:marker-end-width="0.3cm" draw:fill="solid" draw:textarea-vertical-align="middle" loext:decorative="false"/>
    </style:style>
    <style:style style:name="gr636" style:family="graphic" style:parent-style-name="objectwithoutfill">
      <style:graphic-properties draw:marker-end="Arrowheads_20_310" draw:marker-end-width="0.3cm" draw:fill="solid" draw:textarea-vertical-align="middle" loext:decorative="false"/>
    </style:style>
    <style:style style:name="gr637" style:family="graphic" style:parent-style-name="objectwithoutfill">
      <style:graphic-properties draw:marker-end="Arrowheads_20_311" draw:marker-end-width="0.3cm" draw:fill="solid" draw:textarea-vertical-align="middle" loext:decorative="false"/>
    </style:style>
    <style:style style:name="gr638" style:family="graphic" style:parent-style-name="objectwithoutfill">
      <style:graphic-properties draw:marker-end="Arrowheads_20_312" draw:marker-end-width="0.3cm" draw:fill="solid" draw:textarea-vertical-align="middle" loext:decorative="false"/>
    </style:style>
    <style:style style:name="gr639" style:family="graphic" style:parent-style-name="objectwithoutfill">
      <style:graphic-properties draw:marker-end="Arrowheads_20_313" draw:marker-end-width="0.3cm" draw:fill="solid" draw:textarea-vertical-align="middle" loext:decorative="false"/>
    </style:style>
    <style:style style:name="gr640" style:family="graphic" style:parent-style-name="standard">
      <style:graphic-properties draw:stroke="solid" svg:stroke-color="#b2b2b2" draw:fill="solid" draw:fill-color="#ffffff" draw:textarea-horizontal-align="justify" draw:textarea-vertical-align="middle" draw:auto-grow-height="false" fo:min-height="2.218cm" fo:min-width="4.061cm" style:writing-mode="lr-tb" loext:decorative="false"/>
      <style:paragraph-properties style:writing-mode="lr-tb"/>
    </style:style>
    <style:style style:name="gr641" style:family="graphic" style:parent-style-name="objectwithoutfill">
      <style:graphic-properties draw:marker-end="Arrowheads_20_331" draw:marker-end-width="0.3cm" draw:fill="solid" draw:textarea-vertical-align="middle" loext:decorative="false"/>
      <style:paragraph-properties style:writing-mode="lr-tb"/>
    </style:style>
    <style:style style:name="gr642"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643"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44" style:family="graphic" style:parent-style-name="standard">
      <style:graphic-properties draw:stroke="solid" draw:stroke-dash="Dash_20_Dot_20_4" svg:stroke-width="0.095cm" svg:stroke-color="#263238" draw:stroke-linejoin="round" svg:stroke-linecap="round" draw:textarea-horizontal-align="center" draw:textarea-vertical-align="middle" fo:padding-top="0.172cm" fo:padding-bottom="0.172cm" fo:padding-left="0.297cm" fo:padding-right="0.297cm" loext:decorative="false"/>
    </style:style>
    <style:style style:name="gr645" style:family="graphic" style:parent-style-name="standard">
      <style:graphic-properties draw:stroke="dash" draw:stroke-dash="Dash_20_Dot_20_4" svg:stroke-width="0cm" svg:stroke-color="#263238" draw:stroke-linejoin="none" svg:stroke-linecap="round" draw:fill="solid" draw:fill-color="#f4b183" draw:textarea-horizontal-align="center" draw:textarea-vertical-align="middle" loext:decorative="false"/>
    </style:style>
    <style:style style:name="gr646" style:family="graphic" style:parent-style-name="standard">
      <style:graphic-properties draw:stroke="solid" draw:stroke-dash="Dash_20_Dot_20_4" svg:stroke-width="0.095cm" svg:stroke-color="#263238" draw:stroke-linejoin="miter" svg:stroke-linecap="butt" draw:fill="none" draw:fill-color="#f4b183" draw:textarea-horizontal-align="center" draw:textarea-vertical-align="middle" fo:padding-top="0.172cm" fo:padding-bottom="0.172cm" fo:padding-left="0.297cm" fo:padding-right="0.297cm" loext:decorative="false"/>
    </style:style>
    <style:style style:name="gr647" style:family="graphic" style:parent-style-name="standard">
      <style:graphic-properties draw:stroke="dash" draw:stroke-dash="Dash_20_Dot_20_4" svg:stroke-width="0cm" svg:stroke-color="#263238" draw:stroke-linejoin="none" svg:stroke-linecap="butt" draw:fill="solid" draw:fill-color="#c96b5f" draw:textarea-horizontal-align="center" draw:textarea-vertical-align="middle" loext:decorative="false"/>
    </style:style>
    <style:style style:name="gr648" style:family="graphic" style:parent-style-name="standard">
      <style:graphic-properties draw:stroke="solid" draw:stroke-dash="Dash_20_Dot_20_4" svg:stroke-width="0.076cm" svg:stroke-color="#263238" draw:stroke-linejoin="miter" svg:stroke-linecap="butt" draw:fill="none" draw:fill-color="#c96b5f" draw:textarea-horizontal-align="center" draw:textarea-vertical-align="middle" fo:padding-top="0.163cm" fo:padding-bottom="0.163cm" fo:padding-left="0.288cm" fo:padding-right="0.288cm" loext:decorative="false"/>
    </style:style>
    <style:style style:name="gr649" style:family="graphic" style:parent-style-name="standard">
      <style:graphic-properties draw:stroke="dash" draw:stroke-dash="Dash_20_Dot_20_4" svg:stroke-width="0cm" svg:stroke-color="#263238" draw:stroke-linejoin="none" svg:stroke-linecap="butt" draw:fill="solid" draw:fill-color="#7f3f3f" draw:textarea-horizontal-align="center" draw:textarea-vertical-align="middle" loext:decorative="false"/>
    </style:style>
    <style:style style:name="gr650" style:family="graphic" style:parent-style-name="standard">
      <style:graphic-properties draw:stroke="dash" draw:stroke-dash="Dash_20_Dot_20_4" svg:stroke-width="0cm" svg:stroke-color="#263238" draw:stroke-linejoin="none" svg:stroke-linecap="round" draw:fill="solid" draw:fill-color="#a8dadc" draw:textarea-horizontal-align="center" draw:textarea-vertical-align="middle" loext:decorative="false"/>
    </style:style>
    <style:style style:name="gr651" style:family="graphic" style:parent-style-name="standard">
      <style:graphic-properties draw:stroke="solid" draw:stroke-dash="Dash_20_Dot_20_4" svg:stroke-width="0.076cm" svg:stroke-color="#263238" draw:stroke-linejoin="miter" svg:stroke-linecap="butt" draw:fill="none" draw:fill-color="#a8dadc" draw:textarea-horizontal-align="center" draw:textarea-vertical-align="middle" fo:padding-top="0.163cm" fo:padding-bottom="0.163cm" fo:padding-left="0.288cm" fo:padding-right="0.288cm" loext:decorative="false"/>
    </style:style>
    <style:style style:name="gr652" style:family="graphic" style:parent-style-name="standard">
      <style:graphic-properties draw:stroke="dash" draw:stroke-dash="Dash_20_Dot_20_4" svg:stroke-width="0cm" svg:stroke-color="#263238" draw:stroke-linejoin="none" svg:stroke-linecap="butt" draw:fill="solid" draw:fill-color="#a8dadc" draw:textarea-horizontal-align="center" draw:textarea-vertical-align="middle" loext:decorative="false"/>
    </style:style>
    <style:style style:name="gr653" style:family="graphic" style:parent-style-name="standard">
      <style:graphic-properties draw:stroke="solid" draw:stroke-dash="Dash_20_Dot_20_4" svg:stroke-width="0.057cm" svg:stroke-color="#263238" draw:stroke-linejoin="round" svg:stroke-linecap="round" draw:textarea-horizontal-align="center" draw:textarea-vertical-align="middle" fo:padding-top="0.153cm" fo:padding-bottom="0.153cm" fo:padding-left="0.278cm" fo:padding-right="0.278cm" loext:decorative="false"/>
    </style:style>
    <style:style style:name="gr654" style:family="graphic" style:parent-style-name="standard">
      <style:graphic-properties draw:stroke="dash" draw:stroke-dash="Dash_20_Dot_20_4" svg:stroke-width="0cm" svg:stroke-color="#263238" draw:stroke-linejoin="none" svg:stroke-linecap="round" draw:fill="solid" draw:fill-color="#263238" draw:textarea-horizontal-align="center" draw:textarea-vertical-align="middle" loext:decorative="false"/>
    </style:style>
    <style:style style:name="gr655" style:family="graphic" style:parent-style-name="standard">
      <style:graphic-properties draw:stroke="none" draw:fill="none" draw:fill-color="#ffffff" draw:textarea-horizontal-align="left" draw:auto-grow-width="true" fo:min-height="0.484cm" fo:min-width="1.85cm" fo:padding-top="0cm" fo:padding-bottom="0cm" fo:padding-left="0cm" fo:padding-right="0cm" loext:decorative="false"/>
      <style:paragraph-properties style:writing-mode="lr-tb"/>
    </style:style>
    <style:style style:name="gr656" style:family="graphic" style:parent-style-name="standard">
      <style:graphic-properties draw:stroke="none" draw:fill="none" draw:fill-color="#ffffff" draw:textarea-horizontal-align="left" draw:auto-grow-width="true" fo:min-height="0.484cm" fo:min-width="3.194cm" fo:padding-top="0cm" fo:padding-bottom="0cm" fo:padding-left="0cm" fo:padding-right="0cm" loext:decorative="false"/>
      <style:paragraph-properties style:writing-mode="lr-tb"/>
    </style:style>
    <style:style style:name="gr657" style:family="graphic" style:parent-style-name="standard">
      <style:graphic-properties draw:stroke="none" draw:fill="none" draw:fill-color="#ffffff" draw:textarea-horizontal-align="left" draw:auto-grow-width="true" fo:min-height="0.389cm" fo:min-width="1.287cm" fo:padding-top="0cm" fo:padding-bottom="0cm" fo:padding-left="0cm" fo:padding-right="0cm" loext:decorative="false"/>
      <style:paragraph-properties style:writing-mode="lr-tb"/>
    </style:style>
    <style:style style:name="gr658" style:family="graphic" style:parent-style-name="standard">
      <style:graphic-properties draw:stroke="none" draw:fill="none" draw:fill-color="#ffffff" draw:textarea-horizontal-align="left" draw:auto-grow-width="true" fo:min-height="0.484cm" fo:min-width="2.306cm" fo:padding-top="0cm" fo:padding-bottom="0cm" fo:padding-left="0cm" fo:padding-right="0cm" loext:decorative="false"/>
      <style:paragraph-properties style:writing-mode="lr-tb"/>
    </style:style>
    <style:style style:name="gr659" style:family="graphic" style:parent-style-name="standard">
      <style:graphic-properties draw:stroke="none" draw:fill="none" draw:fill-color="#ffffff" draw:textarea-horizontal-align="left" draw:auto-grow-width="true" fo:min-height="0.484cm" fo:min-width="2.666cm" fo:padding-top="0cm" fo:padding-bottom="0cm" fo:padding-left="0cm" fo:padding-right="0cm" loext:decorative="false"/>
      <style:paragraph-properties style:writing-mode="lr-tb"/>
    </style:style>
    <style:style style:name="gr660" style:family="graphic" style:parent-style-name="standard">
      <style:graphic-properties draw:stroke="none" draw:fill="none" draw:fill-color="#ffffff" draw:textarea-horizontal-align="left" draw:auto-grow-width="true" fo:min-height="0.389cm" fo:min-width="2.477cm" fo:padding-top="0cm" fo:padding-bottom="0cm" fo:padding-left="0cm" fo:padding-right="0cm" loext:decorative="false"/>
      <style:paragraph-properties style:writing-mode="lr-tb"/>
    </style:style>
    <style:style style:name="gr661" style:family="graphic" style:parent-style-name="standard">
      <style:graphic-properties draw:stroke="none" draw:fill="none" draw:fill-color="#ffffff" draw:textarea-horizontal-align="left" draw:auto-grow-width="true" fo:min-height="0.484cm" fo:min-width="2.858cm" fo:padding-top="0cm" fo:padding-bottom="0cm" fo:padding-left="0cm" fo:padding-right="0cm" loext:decorative="false"/>
      <style:paragraph-properties style:writing-mode="lr-tb"/>
    </style:style>
    <style:style style:name="gr662" style:family="graphic" style:parent-style-name="standard">
      <style:graphic-properties draw:stroke="none" draw:fill="none" draw:fill-color="#ffffff" draw:textarea-horizontal-align="left" draw:auto-grow-width="true" fo:min-height="0.389cm" fo:min-width="4.155cm" fo:padding-top="0cm" fo:padding-bottom="0cm" fo:padding-left="0cm" fo:padding-right="0cm" loext:decorative="false"/>
      <style:paragraph-properties style:writing-mode="lr-tb"/>
    </style:style>
    <style:style style:name="gr663" style:family="graphic" style:parent-style-name="standard" style:list-style-name="L1">
      <style:graphic-properties draw:stroke="none" draw:fill="solid" draw:fill-color="#ff5128" draw:textarea-vertical-align="middle" draw:auto-grow-height="false" fo:min-height="3.044cm" fo:min-width="3.452cm" fo:wrap-option="wrap" style:writing-mode="lr-tb" loext:decorative="false"/>
      <style:paragraph-properties style:writing-mode="lr-tb"/>
    </style:style>
    <style:style style:name="gr664" style:family="graphic" style:parent-style-name="standard">
      <style:graphic-properties svg:stroke-color="#e8995a" draw:fill="solid" draw:fill-color="#ffe0d9" draw:textarea-horizontal-align="justify" draw:textarea-vertical-align="middle" draw:auto-grow-height="false" fo:min-height="0.636cm" fo:min-width="1.343cm" style:writing-mode="lr-tb" loext:decorative="false"/>
      <style:paragraph-properties style:writing-mode="lr-tb"/>
    </style:style>
    <style:style style:name="gr665" style:family="graphic" style:parent-style-name="standard">
      <style:graphic-properties draw:stroke="none" svg:stroke-color="#000000" draw:fill="none" draw:fill-color="#ffffff" draw:textarea-horizontal-align="left" draw:auto-grow-height="true" draw:auto-grow-width="true" fo:min-height="0.949cm" fo:min-width="3.155cm" loext:decorative="false"/>
      <style:paragraph-properties style:writing-mode="lr-tb"/>
    </style:style>
    <style:style style:name="gr666" style:family="graphic" style:parent-style-name="standard">
      <style:graphic-properties draw:fill="solid" draw:fill-color="#f45f74" draw:textarea-horizontal-align="justify" draw:textarea-vertical-align="middle" draw:auto-grow-height="false" fo:min-height="1.333cm" fo:min-width="2.273cm" style:writing-mode="lr-tb" loext:decorative="false"/>
      <style:paragraph-properties style:writing-mode="lr-tb"/>
    </style:style>
    <style:style style:name="gr667" style:family="graphic" style:parent-style-name="standard">
      <style:graphic-properties draw:stroke="solid" svg:stroke-color="#b2b2b2" draw:fill="solid" draw:fill-color="#ffffff" draw:textarea-horizontal-align="justify" draw:textarea-vertical-align="middle" draw:auto-grow-height="false" fo:min-height="1.258cm" fo:min-width="1.976cm" style:writing-mode="lr-tb" loext:decorative="false"/>
      <style:paragraph-properties style:writing-mode="lr-tb"/>
    </style:style>
    <style:style style:name="gr66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66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style>
    <style:style style:name="gr670"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style>
    <style:style style:name="gr671"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style>
    <style:style style:name="gr672"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673"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674"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75"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76"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777cm" fo:min-width="2.033cm" fo:padding-top="0.55cm" fo:padding-bottom="0.25cm" fo:padding-left="0.27cm" fo:padding-right="0.27cm" style:writing-mode="lr-tb" loext:decorative="false"/>
      <style:paragraph-properties style:writing-mode="lr-tb"/>
    </style:style>
    <style:style style:name="gr677" style:family="graphic" style:parent-style-name="standard">
      <style:graphic-properties draw:textarea-horizontal-align="justify" draw:textarea-vertical-align="middle" draw:auto-grow-height="false" fo:min-height="0.775cm" fo:min-width="1.392cm" style:writing-mode="lr-tb" loext:decorative="false"/>
      <style:paragraph-properties style:writing-mode="lr-tb"/>
    </style:style>
    <style:style style:name="gr67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317cm" fo:min-width="3.09cm" fo:padding-top="0.65cm" fo:padding-bottom="0.25cm" fo:padding-left="0.27cm" fo:padding-right="0.27cm" style:writing-mode="lr-tb" loext:decorative="false"/>
      <style:paragraph-properties style:writing-mode="lr-tb"/>
    </style:style>
    <style:style style:name="gr679" style:family="graphic" style:parent-style-name="standard">
      <style:graphic-properties draw:stroke="none" svg:stroke-color="#000000" draw:fill="none" draw:fill-color="#ffffff" draw:textarea-horizontal-align="left" draw:auto-grow-height="true" draw:auto-grow-width="false" fo:min-height="0.405cm" fo:min-width="0cm" loext:decorative="false"/>
      <style:paragraph-properties style:writing-mode="lr-tb"/>
    </style:style>
    <style:style style:name="gr680"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566cm" fo:min-width="1.606cm" fo:padding-top="0.55cm" fo:padding-bottom="0.25cm" fo:padding-left="0.27cm" fo:padding-right="0.27cm" style:writing-mode="lr-tb" loext:decorative="false"/>
      <style:paragraph-properties style:writing-mode="lr-tb"/>
    </style:style>
    <style:style style:name="gr681" style:family="graphic" style:parent-style-name="standard">
      <style:graphic-properties draw:stroke="none" svg:stroke-color="#000000" draw:fill="none" draw:fill-color="#ffffff" draw:textarea-horizontal-align="left" draw:auto-grow-height="true" draw:auto-grow-width="true" fo:min-height="0.395cm" fo:min-width="0.842cm" loext:decorative="false"/>
      <style:paragraph-properties style:writing-mode="lr-tb"/>
    </style:style>
    <style:style style:name="gr682" style:family="graphic" style:parent-style-name="standard">
      <style:graphic-properties draw:stroke="none" draw:fill="none" fo:min-height="0.345cm" loext:decorative="false"/>
      <style:paragraph-properties style:writing-mode="lr-tb"/>
    </style:style>
    <style:style style:name="gr683" style:family="graphic" style:parent-style-name="standard">
      <style:graphic-properties draw:stroke="none" svg:stroke-color="#000000" draw:fill="none" draw:fill-color="#ffffff" draw:textarea-horizontal-align="left" draw:auto-grow-height="true" draw:auto-grow-width="true" fo:min-height="0.475cm" fo:min-width="3.995cm" loext:decorative="false"/>
      <style:paragraph-properties style:writing-mode="lr-tb"/>
    </style:style>
    <style:style style:name="gr684"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282cm" fo:min-width="1.214cm" fo:padding-top="0.55cm" fo:padding-bottom="0.25cm" fo:padding-left="0.27cm" fo:padding-right="0.27cm" style:writing-mode="lr-tb" loext:decorative="false"/>
      <style:paragraph-properties style:writing-mode="lr-tb"/>
    </style:style>
    <style:style style:name="gr685"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644cm" fo:min-width="1.626cm" fo:padding-top="1cm" fo:padding-bottom="0.25cm" fo:padding-left="0.27cm" fo:padding-right="0.27cm" style:writing-mode="lr-tb" loext:decorative="false"/>
      <style:paragraph-properties style:writing-mode="lr-tb"/>
    </style:style>
    <style:style style:name="gr686"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687"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688"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89"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194cm" fo:min-width="1.626cm" fo:padding-top="1cm" fo:padding-bottom="0.25cm" fo:padding-left="0.27cm" fo:padding-right="0.27cm" style:writing-mode="lr-tb" loext:decorative="false"/>
      <style:paragraph-properties style:writing-mode="lr-tb"/>
    </style:style>
    <style:style style:name="gr690"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91" style:family="graphic" style:parent-style-name="standard">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692"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693"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694" style:family="graphic" style:parent-style-name="standard" style:list-style-name="L1">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695" style:family="graphic" style:parent-style-name="standard">
      <style:graphic-properties draw:fill="none" draw:textarea-vertical-align="middle" draw:auto-grow-height="false" fo:min-height="4.992cm" fo:min-width="0cm" fo:wrap-option="wrap" loext:decorative="false"/>
    </style:style>
    <style:style style:name="gr696" style:family="graphic" style:parent-style-name="standard">
      <style:graphic-properties draw:stroke="none" svg:stroke-color="#000000" draw:fill="none" draw:fill-color="#ffffff" draw:textarea-horizontal-align="left" draw:auto-grow-height="true" draw:auto-grow-width="true" fo:min-height="1.423cm" fo:min-width="1.078cm" loext:decorative="false"/>
      <style:paragraph-properties style:writing-mode="lr-tb"/>
    </style:style>
    <style:style style:name="gr697" style:family="graphic" style:parent-style-name="standard">
      <style:graphic-properties draw:stroke="none" svg:stroke-color="#000000" draw:fill="none" draw:fill-color="#ffffff" draw:textarea-horizontal-align="left" draw:auto-grow-height="true" draw:auto-grow-width="true" fo:min-height="0.788cm" fo:min-width="1.73cm" loext:decorative="false"/>
      <style:paragraph-properties style:writing-mode="lr-tb"/>
    </style:style>
    <style:style style:name="gr698" style:family="graphic" style:parent-style-name="standard">
      <style:graphic-properties draw:stroke="none" svg:stroke-color="#000000" draw:fill="none" draw:fill-color="#ffffff" draw:textarea-horizontal-align="left" draw:auto-grow-height="true" draw:auto-grow-width="true" fo:min-height="0.788cm" fo:min-width="1.495cm" loext:decorative="false"/>
      <style:paragraph-properties style:writing-mode="lr-tb"/>
    </style:style>
    <style:style style:name="gr699" style:family="graphic" style:parent-style-name="standard">
      <style:graphic-properties draw:stroke="none" svg:stroke-color="#000000" draw:fill="none" draw:fill-color="#ffffff" draw:textarea-horizontal-align="left" draw:auto-grow-height="true" draw:auto-grow-width="true" fo:min-height="0.475cm" fo:min-width="9.261cm" loext:decorative="false"/>
      <style:paragraph-properties style:writing-mode="lr-tb"/>
    </style:style>
    <style:style style:name="gr700" style:family="graphic" style:parent-style-name="standard">
      <style:graphic-properties draw:stroke="none" svg:stroke-color="#000000" draw:fill="none" draw:fill-color="#ffffff" draw:textarea-horizontal-align="left" draw:auto-grow-height="true" draw:auto-grow-width="true" fo:min-height="0.949cm" fo:min-width="11.743cm" loext:decorative="false"/>
      <style:paragraph-properties style:writing-mode="lr-tb"/>
    </style:style>
    <style:style style:name="gr701" style:family="graphic" style:parent-style-name="standard">
      <style:graphic-properties draw:stroke="none" svg:stroke-color="#000000" draw:fill="none" draw:fill-color="#ffffff" draw:textarea-horizontal-align="left" draw:auto-grow-height="true" draw:auto-grow-width="true" fo:min-height="1.423cm" fo:min-width="10.355cm"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aaafc9"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b4d2ea"/>
      <style:paragraph-properties fo:text-align="center"/>
      <style:text-properties fo:color="#000000" loext:opacity="100%"/>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style:paragraph-properties fo:margin-top="0.42cm" fo:margin-bottom="0.35cm" fo:text-align="center"/>
    </style:style>
    <style:style style:name="P70" style:family="paragraph">
      <loext:graphic-properties draw:fill="solid" draw:fill-color="#ffffff"/>
      <style:paragraph-properties fo:margin-top="0.42cm" fo:margin-bottom="0.35cm" fo:text-align="center" style:writing-mode="lr-tb"/>
    </style:style>
    <style:style style:name="P71" style:family="paragraph">
      <loext:graphic-properties draw:fill="solid" draw:fill-color="#b4d2ea"/>
      <style:paragraph-properties fo:margin-left="0cm" fo:margin-right="0cm" fo:margin-top="0.42cm" fo:margin-bottom="0.35cm" fo:line-height="100%" fo:text-align="center" fo:text-indent="0cm"/>
      <style:text-properties fo:color="#000000" loext:opacity="100%"/>
    </style:style>
    <style:style style:name="P72" style:family="paragraph">
      <loext:graphic-properties draw:fill="solid" draw:fill-color="#accda1"/>
      <style:paragraph-properties fo:text-align="center"/>
    </style:style>
    <style:style style:name="P73" style:family="paragraph">
      <loext:graphic-properties draw:fill="solid" draw:fill-color="#b4d2ea"/>
      <style:paragraph-properties fo:margin-left="0cm" fo:margin-right="0cm" fo:text-align="center" fo:text-indent="0cm"/>
      <style:text-properties fo:color="#000000" loext:opacity="100%"/>
    </style:style>
    <style:style style:name="P74" style:family="paragraph">
      <style:paragraph-properties fo:margin-left="0cm" fo:margin-right="0cm" fo:text-align="center" fo:text-indent="0cm" style:text-autospace="ideograph-alpha"/>
    </style:style>
    <style:style style:name="P75" style:family="paragraph">
      <loext:graphic-properties draw:fill="solid" draw:fill-color="#b4d2ea"/>
      <style:paragraph-properties fo:text-align="center" style:text-autospace="none"/>
      <style:text-properties fo:color="#000000" loext:opacity="100%"/>
    </style:style>
    <style:style style:name="P76" style:family="paragraph">
      <style:paragraph-properties fo:margin-left="0cm" fo:margin-right="0cm" fo:margin-top="0cm" fo:margin-bottom="0cm" fo:text-align="center" fo:text-indent="0cm"/>
    </style:style>
    <style:style style:name="P77" style:family="paragraph">
      <loext:graphic-properties draw:fill="solid" draw:fill-color="#b4d2ea"/>
      <style:paragraph-properties fo:margin-top="0.42cm" fo:margin-bottom="0.35cm" fo:text-align="center"/>
      <style:text-properties fo:color="#000000" loext:opacity="100%"/>
    </style:style>
    <style:style style:name="P78" style:family="paragraph">
      <style:paragraph-properties fo:margin-left="0cm" fo:margin-right="0cm" fo:margin-top="0.42cm" fo:margin-bottom="0.35cm" fo:text-align="center" fo:text-indent="0cm"/>
    </style:style>
    <style:style style:name="P79" style:family="paragraph">
      <loext:graphic-properties draw:fill="none"/>
      <style:paragraph-properties fo:text-align="center"/>
      <style:text-properties fo:font-size="18pt"/>
    </style:style>
    <style:style style:name="P80"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81"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82" style:family="paragraph">
      <loext:graphic-properties draw:fill="solid" draw:fill-color="#00aaad"/>
      <style:paragraph-properties fo:text-align="center"/>
      <style:text-properties fo:font-size="18pt"/>
    </style:style>
    <style:style style:name="P83" style:family="paragraph">
      <loext:graphic-properties draw:fill="solid" draw:fill-color="#dde8cb"/>
      <style:paragraph-properties fo:text-align="center"/>
      <style:text-properties fo:font-size="18pt"/>
    </style:style>
    <style:style style:name="P84" style:family="paragraph">
      <loext:graphic-properties draw:fill="none"/>
      <style:paragraph-properties fo:text-align="center"/>
      <style:text-properties fo:font-size="18pt" style:font-size-asian="18pt" style:font-size-complex="18pt"/>
    </style:style>
    <style:style style:name="P85" style:family="paragraph">
      <loext:graphic-properties draw:fill="solid" draw:fill-color="#b3cac7"/>
      <style:paragraph-properties fo:text-align="center"/>
      <style:text-properties fo:font-size="18pt"/>
    </style:style>
    <style:style style:name="P86"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7" style:family="paragraph">
      <style:paragraph-properties fo:text-align="center"/>
      <style:text-properties fo:font-size="18pt"/>
    </style:style>
    <style:style style:name="P88" style:family="paragraph">
      <loext:graphic-properties draw:fill="none"/>
      <style:text-properties fo:font-size="18pt" style:font-size-asian="18pt" style:font-size-complex="18pt"/>
    </style:style>
    <style:style style:name="P89" style:family="paragraph">
      <loext:graphic-properties draw:fill="none"/>
      <style:text-properties fo:font-size="12pt" fo:font-weight="bold" style:font-size-asian="12pt" style:font-weight-asian="bold" style:font-size-complex="12pt" style:font-weight-complex="bold"/>
    </style:style>
    <style:style style:name="P90" style:family="paragraph">
      <loext:graphic-properties draw:fill="solid" draw:fill-color="#fffcdf"/>
    </style:style>
    <style:style style:name="P91" style:family="paragraph">
      <loext:graphic-properties draw:fill="solid" draw:fill-color="#00a65d"/>
      <style:paragraph-properties fo:text-align="center"/>
    </style:style>
    <style:style style:name="P92" style:family="paragraph">
      <loext:graphic-properties draw:fill="solid" draw:fill-color="#0066b3"/>
      <style:paragraph-properties fo:text-align="center"/>
    </style:style>
    <style:style style:name="P93" style:family="paragraph">
      <loext:graphic-properties draw:fill="solid" draw:fill-color="#28a127"/>
      <style:paragraph-properties fo:text-align="center"/>
    </style:style>
    <style:style style:name="P94" style:family="paragraph">
      <loext:graphic-properties draw:fill="solid" draw:fill-color="#bcaed5" draw:opacity="50%"/>
      <style:paragraph-properties fo:text-align="center"/>
    </style:style>
    <style:style style:name="P95" style:family="paragraph">
      <loext:graphic-properties draw:fill="solid" draw:fill-color="#bce4e5" draw:opacity="50%"/>
      <style:paragraph-properties fo:text-align="center"/>
    </style:style>
    <style:style style:name="P96" style:family="paragraph">
      <loext:graphic-properties draw:fill="solid" draw:fill-color="#bee3d3"/>
      <style:paragraph-properties fo:text-align="center"/>
      <style:text-properties fo:font-weight="bold" style:font-weight-asian="bold" style:font-weight-complex="bold"/>
    </style:style>
    <style:style style:name="P97" style:family="paragraph">
      <loext:graphic-properties draw:fill="none"/>
      <style:paragraph-properties fo:text-align="center"/>
      <style:text-properties fo:font-weight="normal"/>
    </style:style>
    <style:style style:name="P98" style:family="paragraph">
      <loext:graphic-properties draw:fill="solid" draw:fill-color="#000000"/>
    </style:style>
    <style:style style:name="P99" style:family="paragraph">
      <style:paragraph-properties style:writing-mode="lr-tb"/>
    </style:style>
    <style:style style:name="P100"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101"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102" style:family="paragraph">
      <loext:graphic-properties draw:fill="hatch" draw:fill-color="#ffffff" draw:fill-hatch-name="Hatching_20_7" draw:fill-hatch-solid="true"/>
      <style:paragraph-properties fo:text-align="center"/>
    </style:style>
    <style:style style:name="P103" style:family="paragraph">
      <loext:graphic-properties draw:fill="solid" draw:fill-color="#e8995a"/>
      <style:paragraph-properties fo:text-align="center"/>
    </style:style>
    <style:style style:name="P104" style:family="paragraph">
      <loext:graphic-properties draw:fill="solid" draw:fill-color="#c7bcda"/>
      <style:paragraph-properties fo:text-align="center"/>
    </style:style>
    <style:style style:name="P105" style:family="paragraph">
      <loext:graphic-properties draw:fill="solid" draw:fill-color="#f9dc8c"/>
      <style:paragraph-properties fo:text-align="center"/>
    </style:style>
    <style:style style:name="P106" style:family="paragraph">
      <loext:graphic-properties draw:fill="solid" draw:fill-color="#b4d2ea"/>
      <style:paragraph-properties fo:text-align="center"/>
    </style:style>
    <style:style style:name="P107" style:family="paragraph">
      <loext:graphic-properties draw:fill="solid" draw:fill-color="#f6f5f8"/>
      <style:paragraph-properties fo:text-align="center"/>
    </style:style>
    <style:style style:name="P108" style:family="paragraph">
      <loext:graphic-properties draw:fill="solid" draw:fill-color="#f6f5f8"/>
      <style:paragraph-properties fo:margin-left="0cm" fo:margin-right="0cm" fo:margin-top="0cm" fo:margin-bottom="0cm" fo:line-height="100%" fo:text-align="center" fo:text-indent="0cm"/>
    </style:style>
    <style:style style:name="P109"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10" style:family="paragraph">
      <loext:graphic-properties draw:fill="solid" draw:fill-color="#9b592e"/>
      <style:paragraph-properties fo:text-align="center"/>
      <style:text-properties fo:font-weight="normal" style:font-weight-asian="normal" style:font-weight-complex="normal"/>
    </style:style>
    <style:style style:name="P111" style:family="paragraph">
      <loext:graphic-properties draw:fill="solid" draw:fill-color="#d86a50"/>
      <style:paragraph-properties fo:text-align="center"/>
      <style:text-properties fo:font-weight="bold" fo:background-color="#ffffff" style:font-weight-asian="bold" style:font-weight-complex="bold"/>
    </style:style>
    <style:style style:name="P112"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13" style:family="paragraph">
      <loext:graphic-properties draw:fill="solid" draw:fill-color="#6390c2"/>
      <style:paragraph-properties fo:text-align="center"/>
    </style:style>
    <style:style style:name="P114" style:family="paragraph">
      <loext:graphic-properties draw:fill="solid" draw:fill-color="#ffffff"/>
      <style:paragraph-properties fo:text-align="center" style:writing-mode="lr-tb"/>
      <style:text-properties fo:font-size="8pt" style:font-size-asian="8pt" style:font-size-complex="8pt"/>
    </style:style>
    <style:style style:name="P115"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6"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7" style:family="paragraph">
      <loext:graphic-properties draw:fill="solid" draw:fill-color="#6390c2"/>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8"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9" style:family="paragraph">
      <style:paragraph-properties fo:text-align="start"/>
    </style:style>
    <style:style style:name="P120" style:family="paragraph">
      <loext:graphic-properties draw:fill="none" draw:fill-color="#ffffff"/>
      <style:paragraph-properties fo:text-align="start"/>
      <style:text-properties fo:font-size="10pt" style:font-size-asian="10pt" style:font-size-complex="10pt"/>
    </style:style>
    <style:style style:name="P121" style:family="paragraph">
      <loext:graphic-properties draw:fill="solid" draw:fill-color="#c7bcda" draw:opacity="100%"/>
      <style:paragraph-properties fo:text-align="center"/>
    </style:style>
    <style:style style:name="P122"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3"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4"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5"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6" style:family="paragraph">
      <loext:graphic-properties draw:fill="none" draw:fill-color="#ffffff"/>
      <style:paragraph-properties fo:text-align="center"/>
    </style:style>
    <style:style style:name="P127" style:family="paragraph">
      <style:paragraph-properties fo:margin-left="0cm" fo:margin-right="0cm" fo:margin-top="0.42cm" fo:margin-bottom="0.35cm" fo:line-height="100%" fo:text-align="center" fo:text-indent="0cm"/>
    </style:style>
    <style:style style:name="P128" style:family="paragraph">
      <loext:graphic-properties draw:fill="solid" draw:fill-color="#ff5128"/>
      <style:paragraph-properties fo:margin-left="0cm" fo:margin-right="0cm" fo:margin-top="0cm" fo:margin-bottom="0cm" fo:line-height="100%" fo:text-align="center" fo:text-indent="0cm" style:writing-mode="lr-tb"/>
    </style:style>
    <style:style style:name="P129" style:family="paragraph">
      <loext:graphic-properties draw:fill="none" draw:fill-color="#ffffff"/>
      <style:text-properties fo:color="#00b0be" loext:opacity="100%" fo:font-weight="bold" style:font-weight-asian="bold" style:font-weight-complex="bold"/>
    </style:style>
    <style:style style:name="P130" style:family="paragraph">
      <loext:graphic-properties draw:fill="solid" draw:fill-color="#8fd7d7" draw:opacity="50%"/>
      <style:paragraph-properties fo:text-align="center"/>
    </style:style>
    <style:style style:name="P131" style:family="paragraph">
      <loext:graphic-properties draw:fill="none" draw:fill-color="#ffffff"/>
      <style:paragraph-properties fo:text-align="center"/>
      <style:text-properties fo:color="#6390c2" loext:opacity="100%" fo:font-weight="bold" style:font-weight-asian="bold" style:font-weight-complex="bold"/>
    </style:style>
    <style:style style:name="P132" style:family="paragraph">
      <style:paragraph-properties fo:margin-top="0.42cm" fo:margin-bottom="0.35cm"/>
    </style:style>
    <style:style style:name="P133" style:family="paragraph">
      <style:paragraph-properties fo:text-align="center" style:writing-mode="lr-tb"/>
      <style:text-properties fo:font-size="10pt" style:font-size-asian="10pt" style:font-size-complex="10pt"/>
    </style:style>
    <style:style style:name="P134" style:family="paragraph">
      <loext:graphic-properties draw:fill="solid" draw:fill-color="#ffe0d9"/>
      <style:paragraph-properties fo:text-align="center" style:writing-mode="lr-tb"/>
      <style:text-properties fo:font-size="8pt" style:font-size-asian="8pt" style:font-size-complex="8pt"/>
    </style:style>
    <style:style style:name="P135" style:family="paragraph">
      <loext:graphic-properties draw:fill="solid" draw:fill-color="#ff5128"/>
      <style:paragraph-properties fo:text-align="center" style:writing-mode="lr-tb"/>
      <style:text-properties fo:font-size="8pt" style:font-size-asian="8pt" style:font-size-complex="8pt"/>
    </style:style>
    <style:style style:name="P136" style:family="paragraph">
      <style:paragraph-properties fo:margin-left="0cm" fo:margin-right="0cm" fo:margin-top="0.42cm" fo:margin-bottom="0.35cm" fo:line-height="100%" fo:text-align="center" fo:text-indent="0cm"/>
      <style:text-properties fo:font-size="10pt" style:font-size-asian="10pt" style:font-size-complex="10pt"/>
    </style:style>
    <style:style style:name="P137" style:family="paragraph">
      <loext:graphic-properties draw:fill="solid" draw:fill-color="#70ae61"/>
      <style:paragraph-properties fo:margin-left="0cm" fo:margin-right="0cm" fo:margin-top="0.42cm" fo:margin-bottom="0.35cm" fo:line-height="100%" fo:text-align="center" fo:text-indent="0cm" style:writing-mode="lr-tb"/>
      <style:text-properties fo:font-size="10pt" style:font-size-asian="10pt" style:font-size-complex="10pt"/>
    </style:style>
    <style:style style:name="P138" style:family="paragraph">
      <loext:graphic-properties draw:fill="none" draw:fill-color="#ffffff"/>
      <style:paragraph-properties fo:margin-top="0.42cm" fo:margin-bottom="0.35cm" fo:text-align="center"/>
      <style:text-properties fo:font-size="10pt" style:font-size-asian="10pt" style:font-size-complex="10pt"/>
    </style:style>
    <style:style style:name="P139" style:family="paragraph">
      <loext:graphic-properties draw:fill="solid" draw:fill-color="#70ae61"/>
      <style:paragraph-properties fo:text-align="center"/>
      <style:text-properties fo:color="#ffffff" loext:opacity="100%" fo:font-size="12pt" fo:font-weight="bold" style:font-size-asian="12pt" style:font-weight-asian="bold" style:font-size-complex="12pt" style:font-weight-complex="bold"/>
    </style:style>
    <style:style style:name="P140" style:family="paragraph">
      <loext:graphic-properties draw:fill="solid" draw:fill-color="#f2ff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41" style:family="paragraph">
      <style:paragraph-properties fo:text-align="center"/>
      <style:text-properties fo:color="#ffffff" loext:opacity="100%" fo:font-size="10pt" style:font-size-asian="10pt" style:font-size-complex="10pt"/>
    </style:style>
    <style:style style:name="P142"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43" style:family="paragraph">
      <loext:graphic-properties draw:fill="solid" draw:fill-color="#6390c2"/>
      <style:paragraph-properties fo:text-align="center" style:writing-mode="lr-tb"/>
      <style:text-properties fo:font-size="10pt" style:font-size-asian="10pt" style:font-size-complex="10pt"/>
    </style:style>
    <style:style style:name="P144" style:family="paragraph">
      <style:paragraph-properties fo:margin-left="0cm" fo:margin-right="0cm" fo:text-align="center" fo:text-indent="0cm"/>
      <style:text-properties fo:color="#ffffff" loext:opacity="100%" fo:font-size="10pt" style:font-size-asian="10pt" style:font-size-complex="10pt"/>
    </style:style>
    <style:style style:name="P145" style:family="paragraph">
      <loext:graphic-properties draw:fill="solid" draw:fill-color="#70ae61"/>
      <style:paragraph-properties fo:text-align="center"/>
      <style:text-properties fo:color="#ffffff" loext:opacity="100%" fo:font-size="8pt" style:font-size-asian="8pt" style:font-size-complex="8pt"/>
    </style:style>
    <style:style style:name="P146" style:family="paragraph">
      <loext:graphic-properties draw:fill="none" draw:fill-color="#ffffff"/>
      <style:text-properties fo:color="#ffffff" loext:opacity="100%" fo:font-size="8pt" style:font-size-asian="8pt" style:font-size-complex="8pt"/>
    </style:style>
    <style:style style:name="P147" style:family="paragraph">
      <style:paragraph-properties fo:text-align="center"/>
      <style:text-properties fo:color="#ffffff" loext:opacity="100%" fo:font-size="12pt" fo:font-weight="bold" style:font-size-asian="12pt" style:font-weight-asian="bold" style:font-size-complex="12pt" style:font-weight-complex="bold"/>
    </style:style>
    <style:style style:name="P148" style:family="paragraph">
      <loext:graphic-properties draw:fill="solid" draw:fill-color="#70ae61"/>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49" style:family="paragraph">
      <style:paragraph-properties fo:margin-left="0cm" fo:margin-right="0cm" fo:margin-top="0cm" fo:margin-bottom="0cm" fo:line-height="100%" fo:text-align="center" fo:text-indent="0cm"/>
      <style:text-properties fo:color="#ffffff" loext:opacity="100%" fo:font-size="10pt" fo:font-weight="bold" style:font-size-asian="10pt" style:font-weight-asian="bold" style:font-size-complex="10pt" style:font-weight-complex="bold"/>
    </style:style>
    <style:style style:name="P150" style:family="paragraph">
      <loext:graphic-properties draw:fill="solid" draw:fill-color="#70ae61"/>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51" style:family="paragraph">
      <style:paragraph-properties fo:margin-top="0.42cm" fo:margin-bottom="0.35cm" fo:text-align="center"/>
      <style:text-properties fo:font-size="14pt" fo:font-weight="bold" style:font-size-asian="14pt" style:font-weight-asian="bold" style:font-size-complex="14pt" style:font-weight-complex="bold"/>
    </style:style>
    <style:style style:name="P152" style:family="paragraph">
      <loext:graphic-properties draw:fill="solid" draw:fill-color="#6390c2"/>
      <style:paragraph-properties fo:margin-top="0.42cm" fo:margin-bottom="0.35cm" fo:text-align="center" style:writing-mode="lr-tb"/>
      <style:text-properties fo:font-size="14pt" fo:font-weight="bold" style:font-size-asian="14pt" style:font-weight-asian="bold" style:font-size-complex="14pt" style:font-weight-complex="bold"/>
    </style:style>
    <style:style style:name="P153" style:family="paragraph">
      <style:paragraph-properties fo:margin-left="0cm" fo:margin-right="0cm" fo:margin-top="0cm" fo:margin-bottom="0cm" fo:line-height="100%" fo:text-align="center" fo:text-indent="0cm"/>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4"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5" style:family="paragraph">
      <style:paragraph-properties fo:margin-top="0.42cm" fo:margin-bottom="0.35cm" fo:text-align="center"/>
      <style:text-properties fo:font-size="10pt" style:font-size-asian="10pt" style:font-size-complex="10pt"/>
    </style:style>
    <style:style style:name="P156"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57"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8"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9" style:family="paragraph">
      <loext:graphic-properties draw:fill="solid" draw:fill-color="#808080"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60" style:family="paragraph">
      <style:paragraph-properties fo:margin-top="0.42cm" fo:margin-bottom="0.35cm" fo:text-align="center"/>
      <style:text-properties fo:font-size="8pt" style:font-size-asian="8pt" style:font-size-complex="8pt"/>
    </style:style>
    <style:style style:name="P161"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62" style:family="paragraph">
      <loext:graphic-properties draw:fill="solid" draw:fill-color="#345d95"/>
      <style:paragraph-properties fo:text-align="center"/>
    </style:style>
    <style:style style:name="P163" style:family="paragraph">
      <loext:graphic-properties draw:fill="none" draw:fill-color="#ffffff"/>
      <style:paragraph-properties fo:text-align="center"/>
      <style:text-properties fo:font-size="8pt" style:font-size-asian="8pt" style:font-size-complex="8pt"/>
    </style:style>
    <style:style style:name="P164" style:family="paragraph">
      <loext:graphic-properties draw:fill="none" draw:fill-color="#ffffff"/>
      <style:text-properties fo:color="#f45f74" loext:opacity="100%" fo:font-size="8pt" style:font-size-asian="8pt" style:font-size-complex="8pt"/>
    </style:style>
    <style:style style:name="P165" style:family="paragraph">
      <style:paragraph-properties fo:margin-left="0cm" fo:margin-right="0cm" fo:margin-top="0.42cm" fo:margin-bottom="0.35cm" fo:line-height="100%" fo:text-indent="0cm"/>
    </style:style>
    <style:style style:name="P166"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67"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68"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69"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70" style:family="paragraph">
      <loext:graphic-properties draw:fill="none" draw:fill-color="#ffffff"/>
      <style:text-properties fo:font-size="10pt" fo:font-weight="bold" style:font-size-asian="10pt" style:font-weight-asian="bold" style:font-size-complex="10pt" style:font-weight-complex="bold"/>
    </style:style>
    <style:style style:name="P171" style:family="paragraph">
      <loext:graphic-properties draw:fill="solid" draw:fill-color="#e8995a"/>
      <style:paragraph-properties fo:text-align="center" style:writing-mode="lr-tb"/>
      <style:text-properties fo:font-size="10pt" style:font-size-asian="10pt" style:font-size-complex="10pt"/>
    </style:style>
    <style:style style:name="P17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4"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8.7000007629395pt" fo:font-style="normal" fo:text-shadow="none" style:text-underline-style="none" fo:font-weight="normal" style:text-underline-mode="continuous" style:text-overline-mode="continuous" style:text-line-through-mode="continuous" style:font-name-asian="Arial" style:font-size-asian="18.7000007629395pt" style:font-name-complex="Arial" style:font-size-complex="18.7000007629395pt" style:text-scale="100%" style:text-overline-style="none" style:text-overline-color="font-color"/>
    </style:style>
    <style:style style:name="P175"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5.8000001907349pt" fo:font-style="italic" fo:text-shadow="none" style:text-underline-style="none" fo:font-weight="normal" style:text-underline-mode="continuous" style:text-overline-mode="continuous" style:text-line-through-mode="continuous" style:font-name-asian="Arial" style:font-size-asian="15.8000001907349pt" style:font-name-complex="Arial" style:font-size-complex="15.8000001907349pt" style:text-scale="100%" style:text-overline-style="none" style:text-overline-color="font-color"/>
    </style:style>
    <style:style style:name="P176" style:family="paragraph">
      <loext:graphic-properties draw:fill="solid" draw:fill-color="#333333"/>
      <style:paragraph-properties fo:text-align="center"/>
    </style:style>
    <style:style style:name="P177" style:family="paragraph">
      <loext:graphic-properties draw:fill="solid" draw:fill-color="#ffffff"/>
      <style:paragraph-properties fo:text-align="center"/>
    </style:style>
    <style:style style:name="P178" style:family="paragraph">
      <loext:graphic-properties draw:fill="solid" draw:fill-color="#cfe8fa"/>
      <style:paragraph-properties fo:text-align="center"/>
    </style:style>
    <style:style style:name="P179" style:family="paragraph">
      <loext:graphic-properties draw:fill="none" draw:fill-color="#cfe8fa"/>
      <style:paragraph-properties fo:text-align="center"/>
    </style:style>
    <style:style style:name="P180"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21pt" fo:font-style="normal" fo:text-shadow="none" style:text-underline-style="none" fo:font-weight="normal" style:text-underline-mode="continuous" style:text-overline-mode="continuous" style:text-line-through-mode="continuous" style:font-name-asian="Arial" style:font-size-asian="21pt" style:font-name-complex="Arial" style:font-size-complex="21pt" style:text-scale="100%" style:text-overline-style="none" style:text-overline-color="font-color"/>
    </style:style>
    <style:style style:name="P181" style:family="paragraph">
      <loext:graphic-properties draw:fill="solid" draw:fill-color="#bfe3bd"/>
      <style:paragraph-properties fo:text-align="center"/>
    </style:style>
    <style:style style:name="P182" style:family="paragraph">
      <loext:graphic-properties draw:fill="none" draw:fill-color="#bfe3bd"/>
      <style:paragraph-properties fo:text-align="center"/>
    </style:style>
    <style:style style:name="P183"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1.3000001907349pt" fo:font-style="italic" fo:text-shadow="none" style:text-underline-style="none" fo:font-weight="normal"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184" style:family="paragraph">
      <loext:graphic-properties draw:fill="solid" draw:fill-color="#d36b42"/>
      <style:paragraph-properties fo:text-align="center"/>
    </style:style>
    <style:style style:name="P185" style:family="paragraph">
      <loext:graphic-properties draw:fill="solid" draw:fill-color="#f7d682"/>
      <style:paragraph-properties fo:text-align="center"/>
    </style:style>
    <style:style style:name="P186" style:family="paragraph">
      <loext:graphic-properties draw:fill="none" draw:fill-color="#f7d682"/>
      <style:paragraph-properties fo:text-align="center"/>
    </style:style>
    <style:style style:name="P187" style:family="paragraph">
      <loext:graphic-properties draw:fill="solid" draw:fill-color="#d6cce4"/>
      <style:paragraph-properties fo:text-align="center"/>
    </style:style>
    <style:style style:name="P188" style:family="paragraph">
      <loext:graphic-properties draw:fill="none" draw:fill-color="#d6cce4"/>
      <style:paragraph-properties fo:text-align="center"/>
    </style:style>
    <style:style style:name="P189" style:family="paragraph">
      <loext:graphic-properties draw:fill="none" draw:fill-color="#ffffff"/>
      <style:text-properties fo:font-size="18pt" style:font-size-asian="18pt" style:font-size-complex="18pt"/>
    </style:style>
    <style:style style:name="P190" style:family="paragraph">
      <loext:graphic-properties draw:fill="solid" draw:fill-color="#accda1" draw:opacity="50%"/>
      <style:paragraph-properties fo:text-align="center"/>
    </style:style>
    <style:style style:name="P191" style:family="paragraph">
      <loext:graphic-properties draw:fill="solid" draw:fill-color="#b4d2ea" draw:opacity="50%"/>
      <style:paragraph-properties fo:text-align="center"/>
    </style:style>
    <style:style style:name="P192" style:family="paragraph">
      <loext:graphic-properties draw:fill="none" draw:fill-color="#ffffff"/>
      <style:paragraph-properties fo:text-align="center"/>
      <style:text-properties fo:color="#00b0be" loext:opacity="100%" fo:font-size="20pt" fo:font-weight="bold" fo:background-color="transparent" style:font-size-asian="20pt" style:font-weight-asian="bold" style:font-size-complex="20pt" style:font-weight-complex="bold"/>
    </style:style>
    <style:style style:name="P193" style:family="paragraph">
      <loext:graphic-properties draw:fill="none" draw:fill-color="#ffffff"/>
      <style:text-properties fo:font-size="10pt" style:font-size-asian="10pt" style:font-size-complex="10pt"/>
    </style:style>
    <style:style style:name="P194" style:family="paragraph">
      <loext:graphic-properties draw:fill="none" draw:fill-color="#ffffff"/>
      <style:paragraph-properties fo:text-align="center"/>
      <style:text-properties fo:color="#ffffff" loext:opacity="100%" fo:font-size="8pt" style:font-size-asian="8pt" style:font-size-complex="8pt"/>
    </style:style>
    <style:style style:name="P195" style:family="paragraph">
      <loext:graphic-properties draw:fill="none" draw:fill-color="#ffffff"/>
      <style:text-properties fo:color="#ffffff" loext:opacity="100%" fo:font-size="8pt" fo:font-weight="bold" style:font-size-asian="8pt" style:font-weight-asian="bold" style:font-size-complex="8pt" style:font-weight-complex="bold"/>
    </style:style>
    <style:style style:name="P196" style:family="paragraph">
      <loext:graphic-properties draw:fill="none"/>
      <style:text-properties fo:font-weight="bold" style:font-weight-asian="bold" style:font-weight-complex="bold"/>
    </style:style>
    <style:style style:name="P197" style:family="paragraph">
      <loext:graphic-properties draw:fill="none" draw:fill-color="#ffffff"/>
      <style:paragraph-properties fo:margin-left="0cm" fo:margin-right="0cm" fo:margin-top="0cm" fo:margin-bottom="0cm" fo:line-height="100%" fo:text-align="center" fo:text-indent="0cm"/>
      <style:text-properties fo:color="#bb63c2" loext:opacity="100%" fo:font-size="16pt" fo:background-color="#6390c2" style:font-size-asian="16pt" style:font-size-complex="16pt"/>
    </style:style>
    <style:style style:name="P198" style:family="paragraph">
      <loext:graphic-properties draw:fill="solid" draw:fill-color="#f4b183"/>
      <style:paragraph-properties fo:text-align="center"/>
    </style:style>
    <style:style style:name="P199" style:family="paragraph">
      <loext:graphic-properties draw:fill="none" draw:fill-color="#f4b183"/>
      <style:paragraph-properties fo:text-align="center"/>
    </style:style>
    <style:style style:name="P200" style:family="paragraph">
      <loext:graphic-properties draw:fill="solid" draw:fill-color="#c96b5f"/>
      <style:paragraph-properties fo:text-align="center"/>
    </style:style>
    <style:style style:name="P201" style:family="paragraph">
      <loext:graphic-properties draw:fill="none" draw:fill-color="#c96b5f"/>
      <style:paragraph-properties fo:text-align="center"/>
    </style:style>
    <style:style style:name="P202" style:family="paragraph">
      <loext:graphic-properties draw:fill="solid" draw:fill-color="#7f3f3f"/>
      <style:paragraph-properties fo:text-align="center"/>
    </style:style>
    <style:style style:name="P203" style:family="paragraph">
      <loext:graphic-properties draw:fill="solid" draw:fill-color="#a8dadc"/>
      <style:paragraph-properties fo:text-align="center"/>
    </style:style>
    <style:style style:name="P204" style:family="paragraph">
      <loext:graphic-properties draw:fill="none" draw:fill-color="#a8dadc"/>
      <style:paragraph-properties fo:text-align="center"/>
    </style:style>
    <style:style style:name="P205" style:family="paragraph">
      <loext:graphic-properties draw:fill="solid" draw:fill-color="#263238"/>
      <style:paragraph-properties fo:text-align="center"/>
    </style:style>
    <style:style style:name="P206" style:family="paragraph">
      <loext:graphic-properties draw:fill="none" draw:fill-color="#ffffff"/>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P207" style:family="paragraph">
      <loext:graphic-properties draw:fill="none" draw:fill-color="#ffffff"/>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P208" style:family="paragraph">
      <loext:graphic-properties draw:fill="none" draw:fill-color="#ffffff"/>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P209" style:family="paragraph">
      <loext:graphic-properties draw:fill="solid" draw:fill-color="#ff5128"/>
      <style:paragraph-properties fo:margin-left="0cm" fo:margin-right="0cm" fo:margin-top="0.42cm" fo:margin-bottom="0.35cm" fo:line-height="100%" fo:text-align="center" fo:text-indent="0cm" style:writing-mode="lr-tb"/>
    </style:style>
    <style:style style:name="P210" style:family="paragraph">
      <loext:graphic-properties draw:fill="solid" draw:fill-color="#f45f74"/>
      <style:paragraph-properties fo:text-align="center" style:writing-mode="lr-tb"/>
    </style:style>
    <style:style style:name="P211" style:family="paragraph">
      <loext:graphic-properties draw:fill="solid" draw:fill-color="#6390c2"/>
      <style:paragraph-properties fo:text-align="center"/>
      <style:text-properties style:use-window-font-color="true" loext:opacity="0%" fo:font-size="12pt" style:font-size-asian="18pt" style:font-size-complex="12pt"/>
    </style:style>
    <style:style style:name="P212" style:family="paragraph">
      <loext:graphic-properties draw:fill="none" draw:fill-color="#ffffff"/>
      <style:text-properties fo:color="#00b0be" loext:opacity="100%" fo:font-size="10pt" fo:font-weight="bold" style:font-size-asian="10pt" style:font-weight-asian="bold" style:font-size-complex="10pt" style:font-weight-complex="bold"/>
    </style:style>
    <style:style style:name="P213" style:family="paragraph">
      <style:paragraph-properties fo:margin-left="0cm" fo:margin-right="0cm" fo:margin-top="0cm" fo:margin-bottom="0cm" fo:line-height="100%" fo:text-indent="0cm"/>
    </style:style>
    <style:style style:name="P214" style:family="paragraph">
      <style:paragraph-properties fo:text-align="center"/>
      <style:text-properties fo:color="#ffffff" loext:opacity="100%" fo:font-size="10pt" fo:font-weight="bold" style:font-size-asian="10pt" style:font-weight-asian="bold" style:font-size-complex="10pt" style:font-weight-complex="bold"/>
    </style:style>
    <style:style style:name="P215" style:family="paragraph">
      <style:paragraph-properties fo:margin-left="0cm" fo:margin-right="0cm" fo:text-align="center" fo:text-indent="0cm"/>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216" style:family="paragraph">
      <loext:graphic-properties draw:fill="none" draw:fill-color="#ffffff"/>
      <style:text-properties fo:font-size="20pt" fo:font-weight="bold" style:font-size-asian="20pt" style:font-weight-asian="bold" style:font-size-complex="20pt" style:font-weight-complex="bold"/>
    </style:style>
    <style:style style:name="P217" style:family="paragraph">
      <loext:graphic-properties draw:fill="none" draw:fill-color="#ffffff"/>
      <style:text-properties fo:font-size="20pt" style:font-size-asian="20pt" style:font-size-complex="20pt"/>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T30" style:family="text">
      <style:text-properties fo:font-size="18pt" fo:text-shadow="none" fo:font-weight="normal" style:font-size-asian="18pt" style:font-weight-asian="normal" style:font-size-complex="18pt" style:font-weight-complex="normal"/>
    </style:style>
    <style:style style:name="T31" style:family="text">
      <style:text-properties fo:font-size="18pt" fo:text-shadow="none" fo:font-weight="bold" style:font-size-asian="18pt" style:font-weight-asian="bold" style:font-size-complex="18pt" style:font-weight-complex="bold"/>
    </style:style>
    <style:style style:name="T32" style:family="text">
      <style:text-properties style:font-name="Calibri" fo:font-size="12pt" fo:font-weight="bold" style:font-size-asian="12pt" style:font-weight-asian="bold" style:font-size-complex="12pt" style:font-weight-complex="bold"/>
    </style:style>
    <style:style style:name="T33" style:family="text">
      <style:text-properties fo:color="#00a65d" loext:opacity="100%" fo:font-size="16pt" fo:font-weight="bold" style:font-size-asian="16pt" style:font-weight-asian="bold" style:font-size-complex="16pt" style:font-weight-complex="bold"/>
    </style:style>
    <style:style style:name="T34" style:family="text">
      <style:text-properties fo:color="#aa55a1" loext:opacity="100%" fo:font-size="16pt" fo:font-weight="bold" style:font-size-asian="16pt" style:font-weight-asian="bold" style:font-size-complex="16pt" style:font-weight-complex="bold"/>
    </style:style>
    <style:style style:name="T35" style:family="text">
      <style:text-properties fo:color="#ffffff" loext:opacity="100%" fo:font-weight="normal" style:font-weight-asian="normal" style:font-weight-complex="normal"/>
    </style:style>
    <style:style style:name="T36" style:family="text">
      <style:text-properties fo:color="#ffffff" loext:opacity="100%" fo:font-size="10pt" fo:font-weight="normal" style:font-size-asian="10pt" style:font-weight-asian="normal" style:font-size-complex="10pt" style:font-weight-complex="normal"/>
    </style:style>
    <style:style style:name="T37"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8" style:family="text">
      <style:text-properties fo:color="#ffffff" loext:opacity="100%" fo:font-size="10pt" fo:font-weight="bold" fo:background-color="#ffffff" style:font-size-asian="10pt" style:font-weight-asian="bold" style:font-size-complex="10pt" style:font-weight-complex="bold"/>
    </style:style>
    <style:style style:name="T39" style:family="text">
      <style:text-properties fo:color="#00b0be" loext:opacity="100%" fo:font-weight="bold" style:font-weight-asian="bold" style:font-weight-complex="bold"/>
    </style:style>
    <style:style style:name="T40" style:family="text">
      <style:text-properties fo:color="#6390c2" loext:opacity="100%" fo:font-weight="bold" style:font-weight-asian="bold" style:font-weight-complex="bold"/>
    </style:style>
    <style:style style:name="T41" style:family="text">
      <style:text-properties fo:color="#6390c2" loext:opacity="100%" fo:font-size="8pt" fo:font-weight="bold" style:font-size-asian="8pt" style:font-weight-asian="bold" style:font-size-complex="8pt" style:font-weight-complex="bold"/>
    </style:style>
    <style:style style:name="T42" style:family="text">
      <style:text-properties style:text-position="sub 58%" fo:font-size="8pt" style:font-size-asian="8pt" style:font-size-complex="8pt"/>
    </style:style>
    <style:style style:name="T43" style:family="text">
      <style:text-properties style:text-position="super 58%" fo:font-size="8pt" style:font-size-asian="8pt" style:font-size-complex="8pt"/>
    </style:style>
    <style:style style:name="T44" style:family="text">
      <style:text-properties style:text-position="0% 100%" fo:font-size="8pt" style:font-size-asian="8pt" style:font-size-complex="8pt"/>
    </style:style>
    <style:style style:name="T45" style:family="text">
      <style:text-properties fo:color="#ffffff" loext:opacity="100%" fo:font-size="9pt" fo:font-weight="bold" style:font-size-asian="9pt" style:font-weight-asian="bold" style:font-size-complex="9pt" style:font-weight-complex="bold"/>
    </style:style>
    <style:style style:name="T46" style:family="text">
      <style:text-properties fo:color="#ffffff" loext:opacity="100%" fo:font-size="12pt" fo:font-weight="bold" style:font-size-asian="12pt" style:font-weight-asian="bold" style:font-size-complex="12pt" style:font-weight-complex="bold"/>
    </style:style>
    <style:style style:name="T47" style:family="text">
      <style:text-properties fo:color="#ffffff" loext:opacity="100%" fo:font-size="10pt" style:font-size-asian="10pt" style:font-size-complex="10pt"/>
    </style:style>
    <style:style style:name="T48"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49" style:family="text">
      <style:text-properties fo:color="#ffffff" loext:opacity="100%" fo:font-size="8pt" style:font-size-asian="8pt" style:font-size-complex="8pt"/>
    </style:style>
    <style:style style:name="T50" style:family="text">
      <style:text-properties fo:color="#ffffff" loext:opacity="100%" style:text-position="sub 58%" fo:font-size="12pt" fo:font-weight="bold" style:font-size-asian="12pt" style:font-weight-asian="bold" style:font-size-complex="12pt" style:font-weight-complex="bold"/>
    </style:style>
    <style:style style:name="T51" style:family="text">
      <style:text-properties fo:font-size="14pt" fo:font-weight="bold" style:font-size-asian="14pt" style:font-weight-asian="bold" style:font-size-complex="14pt" style:font-weight-complex="bold"/>
    </style:style>
    <style:style style:name="T52" style:family="text">
      <style:text-properties fo:color="#ffffff" loext:opacity="100%" style:font-name="Liberation Sans" fo:font-size="12pt" fo:language="en" fo:country="US" fo:font-weight="bold" style:letter-kerning="true" style:font-name-asian="Noto Sans CJK SC" style:font-size-asian="12pt" style:font-weight-asian="bold" style:font-name-complex="Lohit Devanagari" style:font-size-complex="12pt" style:font-weight-complex="bold"/>
    </style:style>
    <style:style style:name="T53" style:family="text">
      <style:text-properties fo:color="#ffffff" loext:opacity="100%" style:text-position="sub 58%" style:font-name="Liberation Sans" fo:font-size="12pt" fo:language="en" fo:country="US" fo:font-weight="bold" style:letter-kerning="true" style:font-name-asian="Noto Sans CJK SC" style:font-size-asian="12pt" style:font-weight-asian="bold" style:font-name-complex="Lohit Devanagari" style:font-size-complex="12pt" style:font-weight-complex="bold"/>
    </style:style>
    <style:style style:name="T54" style:family="text">
      <style:text-properties fo:color="#f45f74" loext:opacity="100%" fo:font-size="8pt" style:font-size-asian="8pt" style:font-size-complex="8pt"/>
    </style:style>
    <style:style style:name="T55" style:family="text">
      <style:text-properties fo:font-size="10pt" fo:font-weight="bold" style:font-size-asian="10pt" style:font-weight-asian="bold" style:font-size-complex="10pt" style:font-weight-complex="bold"/>
    </style:style>
    <style:style style:name="T56" style:family="text">
      <style:text-properties fo:color="#00b0be" loext:opacity="100%" fo:font-size="15pt" fo:font-weight="bold" fo:background-color="transparent" style:font-size-asian="15pt" style:font-weight-asian="bold" style:font-size-complex="15pt" style:font-weight-complex="bold"/>
    </style:style>
    <style:style style:name="T57" style:family="text">
      <style:text-properties fo:font-variant="normal" fo:text-transform="none" style:use-window-font-color="true" loext:opacity="0%" style:text-outline="false" style:text-line-through-style="none" style:text-line-through-type="none"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8" style:family="text">
      <style:text-properties fo:font-size="18pt" style:font-size-asian="18pt" style:font-size-complex="18pt"/>
    </style:style>
    <style:style style:name="T59"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60" style:family="text">
      <style:text-properties style:text-position="sub 58%"/>
    </style:style>
    <style:style style:name="T61" style:family="text">
      <style:text-properties style:text-position="super 58%"/>
    </style:style>
    <style:style style:name="T62" style:family="text">
      <style:text-properties fo:color="#00b0be" loext:opacity="100%" fo:font-size="20pt" fo:font-weight="bold" fo:background-color="transparent" style:font-size-asian="20pt" style:font-weight-asian="bold" style:font-size-complex="20pt" style:font-weight-complex="bold"/>
    </style:style>
    <style:style style:name="T63" style:family="text">
      <style:text-properties fo:color="#ffffff" loext:opacity="100%" fo:font-size="8pt" fo:font-weight="bold" style:font-size-asian="8pt" style:font-weight-asian="bold" style:font-size-complex="8pt" style:font-weight-complex="bold"/>
    </style:style>
    <style:style style:name="T64" style:family="text">
      <style:text-properties fo:font-variant="normal" fo:text-transform="none" fo:color="#000000" loext:opacity="100%" style:text-outline="false" style:text-line-through-style="none" style:text-line-through-type="none" style:font-name="JetBrains Mono" fo:font-size="8pt" fo:language="en" fo:country="US"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65" style:family="text">
      <style:text-properties fo:font-size="8pt" fo:font-weight="bold" style:font-size-asian="8pt" style:font-weight-asian="bold" style:font-size-complex="8pt" style:font-weight-complex="bold"/>
    </style:style>
    <style:style style:name="T66" style:family="text">
      <style:text-properties fo:font-size="8pt" fo:font-weight="normal" style:font-size-asian="8pt" style:font-weight-asian="normal" style:font-size-complex="8pt" style:font-weight-complex="normal"/>
    </style:style>
    <style:style style:name="T67" style:family="text">
      <style:text-properties fo:color="#bb63c2" loext:opacity="100%" fo:font-size="16pt" fo:font-weight="bold" style:font-size-asian="16pt" style:font-weight-asian="bold" style:font-size-complex="16pt" style:font-weight-complex="bold"/>
    </style:style>
    <style:style style:name="T68" style:family="text">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T69" style:family="text">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T70" style:family="text">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T71" style:family="text">
      <style:text-properties style:text-position="sub 58%" fo:font-size="10pt" fo:font-weight="bold" style:font-size-asian="10pt" style:font-weight-asian="bold" style:font-size-complex="10pt" style:font-weight-complex="bold"/>
    </style:style>
    <style:style style:name="T72" style:family="text">
      <style:text-properties fo:color="#00b0be" loext:opacity="100%" fo:font-size="10pt" fo:font-weight="bold" style:font-size-asian="10pt" style:font-weight-asian="bold" style:font-size-complex="10pt" style:font-weight-complex="bold"/>
    </style:style>
    <style:style style:name="T73" style:family="text">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T74" style:family="text">
      <style:text-properties fo:font-size="20pt" fo:font-weight="bold" style:font-size-asian="20pt" style:font-weight-asian="bold" style:font-size-complex="20pt" style:font-weight-complex="bold"/>
    </style:style>
    <style:style style:name="T75" style:family="text">
      <style:text-properties fo:font-size="20pt" style:font-size-asian="20pt" style:font-size-complex="20pt"/>
    </style:style>
    <style:style style:name="T76"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text:span><text:span text:style-name="T1">nso</text:span><text:span text:style-name="T1">rs</text:span><text:span text:style-name="T1"><text:line-break/></text:span><text:span text:style-name="T1">(rec</text:span><text:span text:style-name="T1">ept</text:span><text:span text:style-name="T1">ors)</text:span></text:p>
        </draw:rect>
        <draw:rect draw:style-name="gr3" draw:text-style-name="P4" xml:id="id2" draw:id="id2" draw:layer="layout" svg:width="2.162cm" svg:height="0.775cm" svg:x="-20.89cm" svg:y="23.295cm">
          <text:p text:style-name="P5"><text:span text:style-name="T2">Per</text:span><text:span text:style-name="T2">cep</text:span><text:span text:style-name="T2">tion</text:span></text:p>
        </draw:rect>
        <draw:rect draw:style-name="gr4" draw:text-style-name="P6" xml:id="id1" draw:id="id1" draw:layer="layout" svg:width="1.692cm" svg:height="0.915cm" svg:x="-16.897cm" svg:y="26.98cm">
          <text:p text:style-name="P5"><text:span text:style-name="T3">pl</text:span><text:span text:style-name="T3">a</text:span><text:span text:style-name="T3">n</text:span><text:span text:style-name="T3">n</text:span><text:span text:style-name="T3">e</text:span><text:span text:style-name="T3">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xt:span><text:span text:style-name="T5">term</text:span><text:span text:style-name="T5"><text:line-break/></text:span><text:span text:style-name="T5">Memory</text:span><text:span text:style-name="T5"><text:line-break/></text:span><text:span text:style-name="T5">(I.e </text:span><text:span text:style-name="T5">episodic</text:span><text:span text:style-name="T5">)</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ler</text:span></text:p>
        </draw:rect>
        <draw:rect draw:style-name="gr3" draw:text-style-name="P4" xml:id="id5" draw:id="id5" draw:layer="layout" svg:width="2.015cm" svg:height="0.775cm" svg:x="-28.86cm" svg:y="29.015cm">
          <text:p text:style-name="P5"><text:span text:style-name="T2">actuator</text:span></text:p>
        </draw:rect>
        <draw:frame draw:style-name="gr10" draw:text-style-name="P11" draw:layer="layout" svg:width="2.247cm" svg:height="1.205cm" svg:x="-18.559cm" svg:y="28.652cm">
          <draw:text-box>
            <text:p><text:span text:style-name="T6">gi</text:span><text:span text:style-name="T6">v</text:span><text:span text:style-name="T6">e</text:span><text:span text:style-name="T6">s </text:span><text:span text:style-name="T6">pl</text:span><text:span text:style-name="T6">a</text:span><text:span text:style-name="T6">n</text:span><text:span text:style-name="T6"><text:line-break/></text:span><text:span text:style-name="T6">(</text:span><text:span text:style-name="T6">o</text:span><text:span text:style-name="T6">n</text:span><text:span text:style-name="T6">e </text:span><text:span text:style-name="T6">a</text:span><text:span text:style-name="T6">ct</text:span><text:span text:style-name="T6">io</text:span><text:span text:style-name="T6">n/</text:span><text:span text:style-name="T6">g</text:span><text:span text:style-name="T6">o</text:span><text:span text:style-name="T6">al</text:span><text:span text:style-name="T6">)</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text:span><text:span text:style-name="T2">o</text:span><text:span text:style-name="T2">n</text:span><text:span text:style-name="T2">tr</text:span><text:span text:style-name="T2">o</text:span><text:span text:style-name="T2">l</text:span><text:span text:style-name="T2"><text:line-break/></text:span><text:span text:style-name="T2">i</text:span><text:span text:style-name="T2">n</text:span><text:span text:style-name="T2">p</text:span><text:span text:style-name="T2">u</text:span><text:span text:style-name="T2">t</text:span></text:p>
        </draw:connector>
        <draw:frame draw:style-name="gr12" draw:text-style-name="P13" draw:layer="layout" svg:width="3.475cm" svg:height="0.878cm" svg:x="-26.337cm" svg:y="22.285cm">
          <draw:text-box>
            <text:p text:style-name="P3"><text:span text:style-name="T7">L</text:span><text:span text:style-name="T7">e</text:span><text:span text:style-name="T7">a</text:span><text:span text:style-name="T7">d</text:span><text:span text:style-name="T7">e</text:span><text:span text:style-name="T7">r</text:span></text:p>
          </draw:text-box>
        </draw:frame>
        <draw:frame draw:style-name="gr13" draw:text-style-name="P14" draw:layer="layout" svg:width="3.881cm" svg:height="0.878cm" svg:x="-33.66cm" svg:y="19.568cm">
          <draw:text-box>
            <text:p text:style-name="P3"><text:span text:style-name="T8">e</text:span><text:span text:style-name="T8">n</text:span><text:span text:style-name="T8">v</text:span><text:span text:style-name="T8">i</text:span><text:span text:style-name="T8">r</text:span><text:span text:style-name="T8">o</text:span><text:span text:style-name="T8">n</text:span><text:span text:style-name="T8">m</text:span><text:span text:style-name="T8">e</text:span><text:span text:style-name="T8">n</text:span><text:span text:style-name="T8">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text:span><text:span text:style-name="T4">at</text:span><text:span text:style-name="T4">e/</text:span><text:span text:style-name="T4">F</text:span><text:span text:style-name="T4">e</text:span><text:span text:style-name="T4">e</text:span><text:span text:style-name="T4">d</text:span><text:span text:style-name="T4">b</text:span><text:span text:style-name="T4">a</text:span><text:span text:style-name="T4">c</text:span><text:span text:style-name="T4">k</text:span><text:span text:style-name="T4"><text:line-break/></text:span><text:span text:style-name="T4">o</text:span><text:span text:style-name="T4">b</text:span><text:span text:style-name="T4">s</text:span><text:span text:style-name="T4">e</text:span><text:span text:style-name="T4">rv</text:span><text:span text:style-name="T4">at</text:span><text:span text:style-name="T4">io</text:span><text:span text:style-name="T4">n</text:span></text:p>
          </draw:text-box>
        </draw:frame>
        <draw:frame draw:style-name="gr15" draw:text-style-name="P11" draw:layer="layout" svg:width="1.495cm" svg:height="0.888cm" svg:x="-25.659cm" svg:y="29.801cm">
          <draw:text-box>
            <text:p><text:span text:style-name="T4">C</text:span><text:span text:style-name="T4">o</text:span><text:span text:style-name="T4">nt</text:span><text:span text:style-name="T4">r</text:span><text:span text:style-name="T4">ol </text:span><text:span text:style-name="T4"><text:line-break/></text:span><text:span text:style-name="T4">si</text:span><text:span text:style-name="T4">g</text:span><text:span text:style-name="T4">n</text:span><text:span text:style-name="T4">al</text:span></text:p>
          </draw:text-box>
        </draw:frame>
        <draw:frame draw:style-name="gr16" draw:text-style-name="P11" draw:layer="layout" svg:width="2.535cm" svg:height="1.206cm" svg:x="-21.817cm" svg:y="27.421cm">
          <draw:text-box>
            <text:p><text:span text:style-name="T9">D</text:span><text:span text:style-name="T9">ef</text:span><text:span text:style-name="T9">a</text:span><text:span text:style-name="T9">ul</text:span><text:span text:style-name="T9">t </text:span><text:span text:style-name="T9">lif</text:span><text:span text:style-name="T9">e </text:span><text:span text:style-name="T9">ti</text:span><text:span text:style-name="T9">m</text:span><text:span text:style-name="T9">e </text:span><text:span text:style-name="T9"><text:line-break/></text:span><text:span text:style-name="T9">g</text:span><text:span text:style-name="T9">o</text:span><text:span text:style-name="T9">al </text:span><text:span text:style-name="T9">a</text:span><text:span text:style-name="T9">n</text:span><text:span text:style-name="T9">d </text:span><text:span text:style-name="T9">a</text:span><text:span text:style-name="T9">ct</text:span><text:span text:style-name="T9">io</text:span><text:span text:style-name="T9">n</text:span><text:span text:style-name="T9"><text:line-break/></text:span><text:span text:style-name="T9">tr</text:span><text:span text:style-name="T9">e</text:span><text:span text:style-name="T9">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text:span><text:span text:style-name="T4">e</text:span><text:span text:style-name="T4">d</text:span><text:span text:style-name="T4">b</text:span><text:span text:style-name="T4">a</text:span><text:span text:style-name="T4">c</text:span><text:span text:style-name="T4">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text:span><text:span text:style-name="T4">c</text:span><text:span text:style-name="T4">o</text:span><text:span text:style-name="T4">n</text:span><text:span text:style-name="T4">c</text:span><text:span text:style-name="T4">e</text:span><text:span text:style-name="T4">pt</text:span><text:span text:style-name="T4"><text:line-break/></text:span><text:span text:style-name="T4">(l</text:span><text:span text:style-name="T4">a</text:span><text:span text:style-name="T4">n</text:span><text:span text:style-name="T4">g</text:span><text:span text:style-name="T4">u</text:span><text:span text:style-name="T4">a</text:span><text:span text:style-name="T4">g</text:span><text:span text:style-name="T4">e </text:span><text:span text:style-name="T4"><text:line-break/></text:span><text:span text:style-name="T4">c</text:span><text:span text:style-name="T4">o</text:span><text:span text:style-name="T4">m</text:span><text:span text:style-name="T4">p</text:span><text:span text:style-name="T4">o</text:span><text:span text:style-name="T4">n</text:span><text:span text:style-name="T4">e</text:span><text:span text:style-name="T4">nt</text:span><text:span text:style-name="T4">s)</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ext:span><text:span text:style-name="T3">ti</text:span><text:span text:style-name="T3">m</text:span><text:span text:style-name="T3">u</text:span><text:span text:style-name="T3">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wer</text:span></text:p>
        </draw:path>
        <draw:path draw:style-name="gr2" draw:text-style-name="P2" draw:layer="layout" svg:width="31.019cm" svg:height="9.451cm" svg:x="-46.366cm" svg:y="38.047cm" svg:viewBox="0 0 31020 9452"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481 409-2122 129-314-136-675 64-992-77-320-140-1138-208-1171-372-46-229-371-403-727-455-323-47-616-165-956-174-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178-643-68-829 106-189 347-517 715-567 319-44 770-427 1085-466 336-41 593 37 922 78 724 92 1176-50 1739-207 321-89 716 276 1018 165 277-102 580-136 882-173 93 0 188 0 282 0 95 36 190 72 285 110 17 16 35 31 51 47z">
          <text:p/>
        </draw:path>
        <draw:frame draw:style-name="gr33" draw:text-style-name="P11" draw:layer="layout" svg:width="0.947cm" svg:height="0.646cm" svg:x="-45.835cm" svg:y="69.468cm">
          <draw:text-box>
            <text:p><text:span text:style-name="T12">W</text:span><text:span text:style-name="T13">0</text:span></text:p>
          </draw:text-box>
        </draw:frame>
        <draw:frame draw:style-name="gr33" draw:text-style-name="P11" draw:layer="layout" svg:width="0.947cm" svg:height="0.646cm" svg:x="-45.834cm" svg:y="69.468cm">
          <draw:text-box>
            <text:p><text:span text:style-name="T12">W</text:span><text:span text:style-name="T13">0</text:span></text:p>
          </draw:text-box>
        </draw:frame>
        <draw:frame draw:style-name="gr33" draw:text-style-name="P11" draw:layer="layout" svg:width="0.947cm" svg:height="0.646cm" svg:x="-39.918cm" svg:y="69.468cm">
          <draw:text-box>
            <text:p><text:span text:style-name="T12">W</text:span><text:span text:style-name="T13">p</text:span></text:p>
          </draw:text-box>
        </draw:frame>
        <draw:frame draw:style-name="gr33" draw:text-style-name="P11" draw:layer="layout" svg:width="0.947cm" svg:height="0.646cm" svg:x="-33.916cm" svg:y="69.46cm">
          <draw:text-box>
            <text:p><text:span text:style-name="T12">W</text:span><text:span text:style-name="T13">p</text:span></text:p>
          </draw:text-box>
        </draw:frame>
        <draw:custom-shape draw:style-name="gr34" draw:text-style-name="P26" xml:id="id17" draw:id="id17" draw:layer="layout" svg:width="0.891cm" svg:height="0.97cm" svg:x="-45.899cm" svg:y="72.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3.898cm" svg:y="72.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3.064cm" svg:x2="-45.008cm" svg:y2="73.064cm" draw:start-shape="id16" draw:start-glue-point="6" draw:end-shape="id17" draw:end-glue-point="10" svg:d="M-43898 73064h-1110" svg:viewBox="0 0 1111 1">
          <text:p/>
        </draw:connector>
        <draw:rect draw:style-name="gr37" draw:text-style-name="P28" xml:id="id345" draw:id="id345"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46" draw:id="id346" draw:layer="layout" svg:width="3.125cm" svg:height="1.728cm" svg:x="-31.444cm" svg:y="14.393cm">
          <text:p><text:span text:style-name="T15">Auto</text:span><text:span text:style-name="T15">poie</text:span><text:span text:style-name="T15">sis</text:span><text:span text:style-name="T2"><text:line-break/></text:span><text:span text:style-name="T2">(whol</text:span><text:span text:style-name="T2">e self </text:span><text:span text:style-name="T2">or</text:span><text:span text:style-name="T2"><text:line-break/></text:span><text:span text:style-name="T2">part </text:span><text:span text:style-name="T2">repro</text:span><text:span text:style-name="T2">ducti</text:span><text:span text:style-name="T2">on)</text:span></text:p>
        </draw:rect>
        <draw:rect draw:style-name="gr38" draw:text-style-name="P4" xml:id="id385" draw:id="id385" draw:layer="layout" svg:width="2.714cm" svg:height="1.756cm" svg:x="-24.51cm" svg:y="14.393cm">
          <text:p text:style-name="P5"><text:span text:style-name="T2">Homeostatis</text:span><text:span text:style-name="T2"><text:line-break/></text:span><text:span text:style-name="T2">keeping</text:span></text:p>
        </draw:rect>
        <draw:rect draw:style-name="gr38" draw:text-style-name="P29" xml:id="id347" draw:id="id347" draw:layer="layout" svg:width="2.714cm" svg:height="1.895cm" svg:x="-21.147cm" svg:y="14.393cm">
          <text:p text:style-name="P5"><text:span text:style-name="T2">Epistem</text:span><text:span text:style-name="T2">ic </text:span><text:span text:style-name="T2"><text:line-break/></text:span><text:span text:style-name="T2">foraging</text:span></text:p>
        </draw:rect>
        <draw:rect draw:style-name="gr39" draw:text-style-name="P31" xml:id="id348" draw:id="id348" draw:layer="layout" svg:width="2.714cm" svg:height="1.895cm" svg:x="-17.784cm" svg:y="14.393cm">
          <text:p text:style-name="P30"><text:span text:style-name="T16">All</text:span><text:span text:style-name="T16">ost</text:span><text:span text:style-name="T16">asi</text:span><text:span text:style-name="T16">s</text:span><text:span text:style-name="T16"><text:line-break/></text:span><text:span text:style-name="T16">(en</text:span><text:span text:style-name="T16">erg</text:span><text:span text:style-name="T16">y</text:span><text:span text:style-name="T16"><text:line-break/></text:span><text:span text:style-name="T16">adj</text:span><text:span text:style-name="T16">ust</text:span><text:span text:style-name="T16">mn</text:span><text:span text:style-name="T16">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text:span><text:span text:style-name="T17">m</text:span><text:span text:style-name="T17">or</text:span><text:span text:style-name="T17">y </text:span><text:span text:style-name="T17">co</text:span><text:span text:style-name="T17">m</text:span><text:span text:style-name="T17">po</text:span><text:span text:style-name="T17">ne</text:span><text:span text:style-name="T17">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7cm" svg:x="236.71cm" svg:y="14.986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86cm" svg:x2="241.848cm" svg:y2="13.474cm" draw:start-shape="id36" draw:start-glue-point="4" draw:end-shape="id37" draw:end-glue-point="8" svg:d="M237714 14986c0-1134 4134-378 4134-1512" svg:viewBox="0 0 4135 1513">
            <text:p/>
          </draw:connector>
          <draw:custom-shape draw:style-name="gr64" draw:text-style-name="P45" xml:id="id38" draw:id="id38" draw:layer="layout" svg:width="2.331cm" svg:height="1.027cm" svg:x="245.051cm" svg:y="14.986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86cm" svg:x2="241.847cm" svg:y2="13.474cm" draw:start-shape="id38" draw:start-glue-point="4" draw:end-shape="id37" svg:d="M246217 14986c0-1134-4370-378-4370-1512" svg:viewBox="0 0 4371 1513">
            <text:p/>
          </draw:connector>
          <draw:custom-shape draw:style-name="gr64" draw:text-style-name="P45" xml:id="id39" draw:id="id39" draw:layer="layout" svg:width="2.773cm" svg:height="1.027cm" svg:x="234.618cm" svg:y="17.186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7cm" svg:x="237.756cm" svg:y="17.161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86cm" svg:x2="237.714cm" svg:y2="16.013cm" draw:start-shape="id39" draw:start-glue-point="4" draw:end-shape="id36" draw:end-glue-point="8" svg:d="M236005 17186c0-880 1709-294 1709-1173" svg:viewBox="0 0 1710 1174">
            <text:p/>
          </draw:connector>
          <draw:connector draw:style-name="gr68" draw:text-style-name="P15" draw:layer="layout" draw:type="curve" svg:x1="239.509cm" svg:y1="17.161cm" svg:x2="237.714cm" svg:y2="16.013cm" draw:start-shape="id40" draw:start-glue-point="4" draw:end-shape="id36" draw:end-glue-point="8" svg:d="M239509 17161c0-861-1795-287-1795-1148" svg:viewBox="0 0 1796 1149">
            <text:p/>
          </draw:connector>
          <draw:custom-shape draw:style-name="gr64" draw:text-style-name="P45" xml:id="id41" draw:id="id41" draw:layer="layout" svg:width="2.173cm" svg:height="1.027cm" svg:x="243.624cm" svg:y="17.186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7cm" svg:x="246.862cm" svg:y="17.161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86cm" svg:x2="246.217cm" svg:y2="16.013cm" draw:start-shape="id41" draw:start-glue-point="4" draw:end-shape="id38" draw:end-glue-point="8" svg:d="M244711 17186c0-880 1506-294 1506-1173" svg:viewBox="0 0 1507 1174">
            <text:p/>
          </draw:connector>
          <draw:connector draw:style-name="gr70" draw:text-style-name="P15" draw:layer="layout" draw:type="curve" svg:x1="248.215cm" svg:y1="17.161cm" svg:x2="246.217cm" svg:y2="16.013cm" draw:start-shape="id42" draw:start-glue-point="4" draw:end-shape="id38" draw:end-glue-point="8" svg:d="M248215 17161c0-861-1998-287-1998-1148" svg:viewBox="0 0 1999 1149">
            <text:p/>
          </draw:connector>
          <draw:custom-shape draw:style-name="gr64" draw:text-style-name="P45" xml:id="id43" draw:id="id43" draw:layer="layout" svg:width="3.539cm" svg:height="1.025cm" svg:x="236.021cm" svg:y="20.062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7cm" svg:x="240.231cm" svg:y="19.936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62cm" svg:x2="239.509cm" svg:y2="18.188cm" draw:start-shape="id43" draw:start-glue-point="4" draw:end-shape="id40" draw:end-glue-point="8" svg:d="M237791 20062c0-1405 1718-469 1718-1874" svg:viewBox="0 0 1719 1875">
            <text:p/>
          </draw:connector>
          <draw:connector draw:style-name="gr72" draw:text-style-name="P15" draw:layer="layout" draw:type="curve" svg:x1="241.584cm" svg:y1="19.936cm" svg:x2="239.509cm" svg:y2="18.188cm" draw:start-shape="id44" draw:start-glue-point="4" draw:end-shape="id40" draw:end-glue-point="8" svg:d="M241584 19936c0-1311-2075-437-2075-1748" svg:viewBox="0 0 2076 1749">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5cm" svg:x2="249.055cm" svg:y2="13.159cm" draw:start-shape="id38" draw:start-glue-point="10" draw:end-shape="id45" draw:end-glue-point="3" svg:d="M247382 15500c1255 0 419-2341 1673-2341" svg:viewBox="0 0 1674 2342">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7cm" svg:x="246.862cm" svg:y="17.162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text:span><text:span text:style-name="T23">m</text:span><text:span text:style-name="T23">p</text:span><text:span text:style-name="T23">r</text:span><text:span text:style-name="T23">o</text:span><text:span text:style-name="T23">v</text:span><text:span text:style-name="T23">e</text:span><text:span text:style-name="T23">m</text:span><text:span text:style-name="T23">e</text:span><text:span text:style-name="T23">nt</text:span><text:span text:style-name="T23">s</text:span></text:p>
        </draw:rect>
        <draw:rect draw:style-name="gr79" draw:text-style-name="P51" xml:id="id60" draw:id="id60" draw:layer="layout" svg:width="4.8cm" svg:height="1.3cm" svg:x="244.234cm" svg:y="64.91cm">
          <text:p text:style-name="P8"><text:span text:style-name="T23">Human in loop</text:span><text:span text:style-name="T23"><text:line-break/></text:span><text:span text:style-name="T23">sensory-motor learning</text:span></text:p>
        </draw:rect>
        <draw:rect draw:style-name="gr79" draw:text-style-name="P51" xml:id="id59" draw:id="id59" draw:layer="layout" svg:width="4.3cm" svg:height="1.425cm" svg:x="245.934cm" svg:y="54.81cm">
          <text:p text:style-name="P30"><text:span text:style-name="T24">Homeostasis in MRS</text:span></text:p>
        </draw:rect>
        <draw:rect draw:style-name="gr79" draw:text-style-name="P51" xml:id="id58" draw:id="id58" draw:layer="layout" svg:width="4cm" svg:height="1.119cm" svg:x="246.634cm" svg:y="61.435cm">
          <text:p text:style-name="P30"><text:span text:style-name="T24">Homeosta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text:span><text:span text:style-name="T12">e</text:span><text:span text:style-name="T12">p</text:span><text:span text:style-name="T12">e</text:span><text:span text:style-name="T12">at </text:span><text:span text:style-name="T12"><text:line-break/></text:span><text:span text:style-name="T12">fo</text:span><text:span text:style-name="T12">r </text:span><text:span text:style-name="T12">al</text:span><text:span text:style-name="T12">l </text:span><text:span text:style-name="T12"><text:line-break/></text:span><text:span text:style-name="T12">s</text:span><text:span text:style-name="T12">e</text:span><text:span text:style-name="T12">n</text:span><text:span text:style-name="T12">s</text:span><text:span text:style-name="T12">o</text:span><text:span text:style-name="T12">rs</text:span><text:span text:style-name="T12"><text:line-break/></text:span><text:span text:style-name="T12">a</text:span><text:span text:style-name="T12">n</text:span><text:span text:style-name="T12">d </text:span><text:span text:style-name="T12"><text:line-break/></text:span><text:span text:style-name="T12">fu</text:span><text:span text:style-name="T12">si</text:span><text:span text:style-name="T12">o</text:span><text:span text:style-name="T12">n</text:span><text:span text:style-name="T12">s</text:span><text:span text:style-name="T12"><text:line-break/></text:span><text:span text:style-name="T12">et</text:span><text:span text:style-name="T12">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text:span><text:span text:style-name="T26">o:</text:span><text:span text:style-name="T26"><text:line-break/></text:span><text:span text:style-name="T26">c</text:span><text:span text:style-name="T26">all </text:span><text:span text:style-name="T26">h</text:span><text:span text:style-name="T26">u</text:span><text:span text:style-name="T26">m</text:span><text:span text:style-name="T26">a</text:span><text:span text:style-name="T26">n </text:span><text:span text:style-name="T26"><text:line-break/></text:span><text:span text:style-name="T26">a</text:span><text:span text:style-name="T26">ss</text:span><text:span text:style-name="T26">ist</text:span><text:span text:style-name="T26">a</text:span><text:span text:style-name="T26">n</text:span><text:span text:style-name="T26">c</text:span><text:span text:style-name="T26">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text:span><text:span text:style-name="T27">e</text:span><text:span text:style-name="T27">ci</text:span><text:span text:style-name="T27">si</text:span><text:span text:style-name="T27">o</text:span><text:span text:style-name="T27">n </text:span><text:span text:style-name="T27">m</text:span><text:span text:style-name="T27">a</text:span><text:span text:style-name="T27">ki</text:span><text:span text:style-name="T27">n</text:span><text:span text:style-name="T27">g</text:span></text:p>
          </draw:rect>
          <draw:rect draw:style-name="gr171" draw:text-style-name="P62" draw:layer="layout" svg:width="2.296cm" svg:height="1.076cm" svg:x="-95.376cm" svg:y="134.922cm">
            <text:p text:style-name="P8"><text:span text:style-name="T27">pl</text:span><text:span text:style-name="T27">a</text:span><text:span text:style-name="T27">n</text:span><text:span text:style-name="T27">ni</text:span><text:span text:style-name="T27">n</text:span><text:span text:style-name="T27">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text:span><text:span text:style-name="T17">nti</text:span><text:span text:style-name="T17">nu</text:span><text:span text:style-name="T17">al </text:span><text:span text:style-name="T17"><text:line-break/></text:span><text:span text:style-name="T17">lea</text:span><text:span text:style-name="T17">rni</text:span><text:span text:style-name="T17">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text:span><text:span text:style-name="T17">n</text:span><text:span text:style-name="T17"><text:line-break/></text:span><text:span text:style-name="T17">sequenc</text:span><text:span text:style-name="T17">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text:span><text:span text:style-name="T28">pi</text:span><text:span text:style-name="T28">st</text:span><text:span text:style-name="T28">e</text:span><text:span text:style-name="T28">m</text:span><text:span text:style-name="T28">ic</text:span><text:span text:style-name="T28"><text:line-break/></text:span><text:span text:style-name="T28">fo</text:span><text:span text:style-name="T28">ra</text:span><text:span text:style-name="T28">gi</text:span><text:span text:style-name="T28">n</text:span><text:span text:style-name="T28">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text:span><text:span text:style-name="T28">me</text:span><text:span text:style-name="T28">ost</text:span><text:span text:style-name="T28">asi</text:span><text:span text:style-name="T28">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8"><text:span text:style-name="T29">Limb</text:span><text:span text:style-name="T29"><text:line-break/></text:span><text:span text:style-name="T29">(actuator)</text:span></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8"><text:span text:style-name="T29">nervous system</text:span></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49cm" svg:y1="43.47cm" svg:x2="87.961cm" svg:y2="46.79cm" draw:start-shape="id196" draw:start-glue-point="2" draw:end-shape="id197" draw:end-glue-point="0" svg:d="M88549 43470c0 2490-588 830-588 3320" svg:viewBox="0 0 589 3321">
          <text:p/>
        </draw:connector>
        <draw:rect draw:style-name="gr255" draw:text-style-name="P67" xml:id="id201" draw:id="id201" draw:layer="layout" svg:width="2.4cm" svg:height="1cm" svg:x="83.626cm" svg:y="38.775cm">
          <text:p text:style-name="P8"><text:span text:style-name="T29">co</text:span><text:span text:style-name="T29">gni</text:span><text:span text:style-name="T29">tiv</text:span><text:span text:style-name="T29">e</text:span><text:span text:style-name="T29"><text:line-break/></text:span><text:span text:style-name="T29">pr</text:span><text:span text:style-name="T29">oc</text:span><text:span text:style-name="T29">es</text:span><text:span text:style-name="T29">se</text:span><text:span text:style-name="T29">s</text:span></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6.566cm" svg:y="46.79cm">
          <text:p text:style-name="P5">Decision<text:line-break/>making</text:p>
        </draw:rect>
        <draw:rect draw:style-name="gr41" draw:text-style-name="P5" xml:id="id199" draw:id="id199" draw:layer="layout" svg:width="2.79cm" svg:height="0.955cm" svg:x="83.366cm" svg:y="46.782cm">
          <text:p text:style-name="P5">Planning</text:p>
        </draw:rect>
        <draw:connector draw:style-name="gr257" draw:text-style-name="P15" draw:layer="layout" draw:type="curve" svg:x1="88.549cm" svg:y1="43.47cm" svg:x2="84.761cm" svg:y2="46.782cm" draw:start-shape="id196" draw:start-glue-point="2" draw:end-shape="id199" draw:end-glue-point="0" svg:d="M88549 43470c0 2484-3788 828-3788 3312" svg:viewBox="0 0 3789 3313">
          <text:p/>
        </draw:connector>
        <draw:rect draw:style-name="gr41" draw:text-style-name="P5" xml:id="id200" draw:id="id200" draw:layer="layout" svg:width="2.79cm" svg:height="0.955cm" svg:x="89.668cm" svg:y="46.79cm">
          <text:p text:style-name="P5">Concept<text:line-break/>formation</text:p>
        </draw:rect>
        <draw:connector draw:style-name="gr258" draw:text-style-name="P15" draw:layer="layout" draw:type="curve" svg:x1="88.549cm" svg:y1="43.47cm" svg:x2="91.063cm" svg:y2="46.79cm" draw:start-shape="id196" draw:start-glue-point="2" draw:end-shape="id200" svg:d="M88549 43470c0 2490 2514 830 2514 3320" svg:viewBox="0 0 2515 3321">
          <text:p/>
        </draw:connector>
        <draw:rect draw:style-name="gr41" draw:text-style-name="P5" xml:id="id196" draw:id="id196"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196" draw:end-glue-point="0" svg:d="M84826 39775c0 2055 3723 685 3723 2740" svg:viewBox="0 0 3724 2741">
          <text:p/>
        </draw:connector>
        <draw:rect draw:style-name="gr41" draw:text-style-name="P5" xml:id="id207" draw:id="id207" draw:layer="layout" svg:width="2.79cm" svg:height="0.955cm" svg:x="83.872cm" svg:y="42.449cm">
          <text:p text:style-name="P5">learning</text:p>
        </draw:rect>
        <draw:rect draw:style-name="gr41" draw:text-style-name="P5" xml:id="id202" draw:id="id202" draw:layer="layout" svg:width="2.79cm" svg:height="0.955cm" svg:x="90.833cm" svg:y="42.515cm">
          <text:p text:style-name="P5">perception</text:p>
        </draw:rect>
        <draw:rect draw:style-name="gr41" draw:text-style-name="P5" xml:id="id204" draw:id="id204"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2"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3"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4" svg:d="M84826 39775c0 2055 11761 685 11761 2740" svg:viewBox="0 0 11762 2741">
          <text:p/>
        </draw:connector>
        <draw:rect draw:style-name="gr41" draw:text-style-name="P5" xml:id="id205" draw:id="id205" draw:layer="layout" svg:width="2.79cm" svg:height="0.955cm" svg:x="92.921cm" svg:y="46.79cm">
          <text:p text:style-name="P5">Problem<text:line-break/>solving</text:p>
        </draw:rect>
        <draw:rect draw:style-name="gr41" draw:text-style-name="P5" xml:id="id206" draw:id="id206" draw:layer="layout" svg:width="2.79cm" svg:height="0.955cm" svg:x="96.043cm" svg:y="46.79cm">
          <text:p text:style-name="P5">Reasoning</text:p>
        </draw:rect>
        <draw:connector draw:style-name="gr263" draw:text-style-name="P15" draw:layer="layout" draw:type="curve" svg:x1="88.549cm" svg:y1="43.47cm" svg:x2="94.316cm" svg:y2="46.79cm" draw:start-shape="id196" draw:start-glue-point="2" draw:end-shape="id205" svg:d="M88549 43470c0 2490 5767 830 5767 3320" svg:viewBox="0 0 5768 3321">
          <text:p/>
        </draw:connector>
        <draw:connector draw:style-name="gr264" draw:text-style-name="P15" draw:layer="layout" draw:type="curve" svg:x1="88.549cm" svg:y1="43.47cm" svg:x2="97.438cm" svg:y2="46.79cm" draw:start-shape="id196" draw:start-glue-point="2" draw:end-shape="id206" draw:end-glue-point="0" svg:d="M88549 43470c0 2490 8889 830 8889 3320" svg:viewBox="0 0 8890 3321">
          <text:p/>
        </draw:connector>
        <draw:connector draw:style-name="gr265" draw:text-style-name="P15" draw:layer="layout" draw:type="curve" svg:x1="84.826cm" svg:y1="39.775cm" svg:x2="85.267cm" svg:y2="42.449cm" draw:start-shape="id201" draw:start-glue-point="2" draw:end-shape="id207" draw:end-glue-point="0" svg:d="M84826 39775c0 2005 441 669 441 2674" svg:viewBox="0 0 442 2675">
          <text:p/>
        </draw:connector>
        <draw:connector draw:style-name="gr46" draw:text-style-name="P15" draw:layer="layout" draw:type="curve" svg:x1="85.267cm" svg:y1="42.449cm" svg:x2="81.639cm" svg:y2="39.866cm" draw:start-shape="id207" draw:start-glue-point="0" draw:end-shape="id208" draw:end-glue-point="7" svg:d="M85267 42449c0-1722-1209-2583-3628-2583" svg:viewBox="0 0 3629 2584">
          <text:p/>
        </draw:connector>
        <draw:custom-shape draw:name="comment box 4" draw:style-name="gr266" draw:text-style-name="P70" xml:id="id208" draw:id="id208" draw:layer="layout" svg:width="3.82cm" svg:height="3.055cm" svg:x="77.819cm" svg:y="38.338cm">
          <text:p text:style-name="P69"><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7" draw:text-style-name="P68" xml:id="id209" draw:id="id209"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09" draw:end-glue-point="6" svg:d="M133450 26509c0-1380 3568-460 3568-1841" svg:viewBox="0 0 3569 1842">
          <text:p/>
        </draw:connector>
        <draw:custom-shape draw:name="comment box 5" draw:style-name="gr266" draw:text-style-name="P70" xml:id="id210" draw:id="id210" draw:layer="layout" svg:width="3.82cm" svg:height="2.201cm" svg:x="87.313cm" svg:y="38.476cm">
          <text:p text:style-name="P69"><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677cm" draw:start-shape="id196" draw:start-glue-point="0" draw:end-shape="id210" draw:end-glue-point="6" svg:d="M88549 42515c0-1378 674-460 674-1838" svg:viewBox="0 0 675 1839">
          <text:p/>
        </draw:connector>
        <draw:rect draw:style-name="gr255" draw:text-style-name="P67" xml:id="id212" draw:id="id212" draw:layer="layout" svg:width="2.4cm" svg:height="1.412cm" svg:x="105.792cm" svg:y="34.46cm">
          <text:p text:style-name="P8"><text:span text:style-name="T29">Meta</text:span><text:span text:style-name="T29"><text:line-break/></text:span><text:span text:style-name="T29">cognition</text:span></text:p>
        </draw:rect>
        <draw:rect draw:style-name="gr255" draw:text-style-name="P67" xml:id="id211" draw:id="id211" draw:layer="layout" svg:width="2.4cm" svg:height="1cm" svg:x="91.63cm" svg:y="35.148cm">
          <text:p text:style-name="P8"><text:span text:style-name="T29">Object</text:span><text:span text:style-name="T29"><text:line-break/></text:span><text:span text:style-name="T29">level</text:span></text:p>
        </draw:rect>
        <draw:connector draw:style-name="gr268" draw:text-style-name="P15" draw:layer="layout" draw:type="curve" svg:x1="92.83cm" svg:y1="36.148cm" svg:x2="84.826cm" svg:y2="38.775cm" draw:start-shape="id211" draw:start-glue-point="2" draw:end-shape="id201" draw:end-glue-point="0" svg:d="M92830 36148c0 1971-8004 658-8004 2627" svg:viewBox="0 0 8005 2628">
          <text:p/>
        </draw:connector>
        <draw:rect draw:style-name="gr255" draw:text-style-name="P71" xml:id="id213" draw:id="id213" draw:layer="layout" svg:width="2.885cm" svg:height="1cm" svg:x="101.415cm" svg:y="37.365cm">
          <text:p text:style-name="P3"><text:span text:style-name="T29">Self-</text:span><text:span text:style-name="T29"><text:line-break/></text:span><text:span text:style-name="T29">consciousness</text:span></text:p>
        </draw:rect>
        <draw:connector draw:style-name="gr269" draw:text-style-name="P15" draw:layer="layout" draw:type="curve" svg:x1="106.992cm" svg:y1="35.872cm" svg:x2="102.857cm" svg:y2="37.365cm" draw:start-shape="id212" draw:start-glue-point="2" draw:end-shape="id213" draw:end-glue-point="0" svg:d="M106992 35872c0 1120-4135 374-4135 1493" svg:viewBox="0 0 4136 1494">
          <text:p/>
        </draw:connector>
        <draw:rect draw:style-name="gr255" draw:text-style-name="P67" xml:id="id214" draw:id="id214" draw:layer="layout" svg:width="2.8cm" svg:height="1.2cm" svg:x="125.553cm" svg:y="28.971cm">
          <text:p text:style-name="P8"><text:span text:style-name="T29">Organ</text:span><text:span text:style-name="T29"><text:line-break/></text:span><text:span text:style-name="T29">(link)</text:span></text:p>
        </draw:rect>
        <draw:connector draw:style-name="gr270" draw:text-style-name="P15" draw:layer="layout" draw:type="curve" svg:x1="133.45cm" svg:y1="27.509cm" svg:x2="126.953cm" svg:y2="28.971cm" draw:start-shape="id188" draw:start-glue-point="2" draw:end-shape="id214"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1"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5" draw:id="id215" draw:layer="layout" svg:width="3.331cm" svg:height="1.431cm" svg:x="147.038cm" svg:y="36.861cm">
          <text:p text:style-name="P5">Peripheral<text:line-break/>nerves</text:p>
        </draw:rect>
        <draw:connector draw:style-name="gr272" draw:text-style-name="P15" draw:layer="layout" draw:type="curve" svg:x1="137.15cm" svg:y1="30.109cm" svg:x2="148.703cm" svg:y2="36.861cm" draw:start-shape="id190" draw:start-glue-point="2" draw:end-shape="id215" draw:end-glue-point="0" svg:d="M137150 30109c0 5064 11553 1688 11553 6752" svg:viewBox="0 0 11554 6753">
          <text:p/>
        </draw:connector>
        <draw:custom-shape draw:style-name="gr273" draw:text-style-name="P68" xml:id="id216" draw:id="id216"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4" draw:start-glue-point="0" draw:end-shape="id216"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648cm" svg:y2="38.017cm" draw:start-shape="id195" draw:start-glue-point="0" draw:end-shape="id217" draw:end-glue-point="6" svg:d="M141081 39048c0-772 1567-257 1567-1031" svg:viewBox="0 0 1568 1032">
          <text:p/>
        </draw:connector>
        <draw:connector draw:style-name="gr274"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5" draw:text-style-name="P68" xml:id="id218" draw:id="id218"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8" draw:end-glue-point="6" svg:d="M132337 28909c0-1065-2267-355-2267-1420" svg:viewBox="0 0 2268 1421">
          <text:p/>
        </draw:connector>
        <draw:rect draw:style-name="gr276" draw:text-style-name="P5" xml:id="id220" draw:id="id220" draw:layer="layout" svg:width="2.475cm" svg:height="0.752cm" svg:x="144.938cm" svg:y="42.835cm">
          <text:p text:style-name="P30"><text:span text:style-name="T28">Enteric</text:span></text:p>
        </draw:rect>
        <draw:connector draw:style-name="gr277" draw:text-style-name="P15" draw:layer="layout" draw:type="curve" svg:x1="146.179cm" svg:y1="41.453cm" svg:x2="146.175cm" svg:y2="42.835cm" draw:start-shape="id219" draw:start-glue-point="2" draw:end-shape="id220" svg:d="M146179 41453c0 1036-4 346-4 1382" svg:viewBox="0 0 5 1383">
          <text:p/>
        </draw:connector>
        <draw:rect draw:style-name="gr41" draw:text-style-name="P5" xml:id="id219" draw:id="id219" draw:layer="layout" svg:width="2.426cm" svg:height="1.051cm" svg:x="144.966cm" svg:y="40.402cm">
          <text:p text:style-name="P5">Automatic</text:p>
        </draw:rect>
        <draw:connector draw:style-name="gr278" draw:text-style-name="P15" draw:layer="layout" draw:type="curve" svg:x1="148.703cm" svg:y1="38.292cm" svg:x2="146.179cm" svg:y2="40.402cm" draw:start-shape="id215" draw:start-glue-point="2" draw:end-shape="id219" draw:end-glue-point="0" svg:d="M148703 38292c0 1582-2524 528-2524 2110" svg:viewBox="0 0 2525 2111">
          <text:p/>
        </draw:connector>
        <draw:custom-shape draw:style-name="gr279" draw:text-style-name="P68" xml:id="id217" draw:id="id217" draw:layer="layout" svg:width="4.159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ed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80" draw:text-style-name="P72" xml:id="id221" draw:id="id221" draw:layer="layout" svg:width="2.138cm" svg:height="1.014cm" svg:x="127.181cm" svg:y="31.128cm">
          <text:p text:style-name="P8"><text:span text:style-name="T27">M</text:span><text:span text:style-name="T27">ot</text:span><text:span text:style-name="T27">or </text:span><text:span text:style-name="T27"><text:line-break/></text:span><text:span text:style-name="T27">n</text:span><text:span text:style-name="T27">e</text:span><text:span text:style-name="T27">ur</text:span><text:span text:style-name="T27">o</text:span><text:span text:style-name="T27">ns</text:span></text:p>
        </draw:rect>
        <draw:connector draw:style-name="gr281" draw:text-style-name="P15" draw:layer="layout" draw:type="curve" svg:x1="128.25cm" svg:y1="31.128cm" svg:x2="132.337cm" svg:y2="30.109cm" draw:start-shape="id221"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2" draw:start-glue-point="2" draw:end-shape="id192" draw:end-glue-point="0" svg:d="M130925 38049c0 864-227 289-227 1151" svg:viewBox="0 0 228 1152">
          <text:p/>
        </draw:connector>
        <draw:rect draw:style-name="gr280" draw:text-style-name="P72" xml:id="id222" draw:id="id222" draw:layer="layout" svg:width="2.138cm" svg:height="1.014cm" svg:x="129.856cm" svg:y="37.035cm">
          <text:p text:style-name="P8"><text:span text:style-name="T27">projecti</text:span><text:span text:style-name="T27">on </text:span><text:span text:style-name="T27"><text:line-break/></text:span><text:span text:style-name="T27">neuron</text:span><text:span text:style-name="T27">s</text:span></text:p>
        </draw:rect>
        <draw:custom-shape draw:style-name="gr283" draw:text-style-name="P68" xml:id="id223" draw:id="id223"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3" draw:start-glue-point="6" draw:end-shape="id222" draw:end-glue-point="0" svg:d="M129583 35929c0 831 1342 278 1342 1106" svg:viewBox="0 0 1343 1107">
          <text:p/>
        </draw:connector>
        <draw:rect draw:style-name="gr255" draw:text-style-name="P67" xml:id="id224" draw:id="id224" draw:layer="layout" svg:width="3.056cm" svg:height="1cm" svg:x="95.087cm" svg:y="39.17cm">
          <text:p text:style-name="P8"><text:span text:style-name="T29">non-</text:span><text:span text:style-name="T29">cogniti</text:span><text:span text:style-name="T29">ve</text:span><text:span text:style-name="T29"><text:line-break/></text:span><text:span text:style-name="T29">proces</text:span><text:span text:style-name="T29">ses</text:span></text:p>
        </draw:rect>
        <draw:connector draw:style-name="gr285" draw:text-style-name="P15" draw:layer="layout" draw:type="curve" svg:x1="92.83cm" svg:y1="36.148cm" svg:x2="96.615cm" svg:y2="39.17cm" draw:start-shape="id211" draw:start-glue-point="2" draw:end-shape="id224" draw:end-glue-point="0" svg:d="M92830 36148c0 2266 3785 756 3785 3022" svg:viewBox="0 0 3786 3023">
          <text:p/>
        </draw:connector>
        <draw:rect draw:style-name="gr41" draw:text-style-name="P5" xml:id="id225" draw:id="id225" draw:layer="layout" svg:width="2.449cm" svg:height="1.254cm" svg:x="150.041cm" svg:y="40.2cm">
          <text:p text:style-name="P69"><text:span text:style-name="T12">So</text:span><text:span text:style-name="T12">m</text:span><text:span text:style-name="T12">ati</text:span><text:span text:style-name="T12">c</text:span><text:span text:style-name="T12"><text:line-break/></text:span><text:span text:style-name="T12">(v</text:span><text:span text:style-name="T12">ol</text:span><text:span text:style-name="T12">un</text:span><text:span text:style-name="T12">tar</text:span><text:span text:style-name="T12">y)</text:span></text:p>
        </draw:rect>
        <draw:connector draw:style-name="gr286" draw:text-style-name="P15" draw:layer="layout" draw:type="curve" svg:x1="148.703cm" svg:y1="38.292cm" svg:x2="151.265cm" svg:y2="40.2cm" draw:start-shape="id215" draw:start-glue-point="2" draw:end-shape="id225" draw:end-glue-point="0" svg:d="M148703 38292c0 1431 2562 477 2562 1908" svg:viewBox="0 0 2563 1909">
          <text:p/>
        </draw:connector>
        <draw:rect draw:style-name="gr255" draw:text-style-name="P67" xml:id="id226" draw:id="id226" draw:layer="layout" svg:width="2.5cm" svg:height="1cm" svg:x="55.004cm" svg:y="51.128cm">
          <text:p text:style-name="P8"><text:span text:style-name="T29">explicit</text:span></text:p>
        </draw:rect>
        <draw:rect draw:style-name="gr255" draw:text-style-name="P67" xml:id="id227" draw:id="id227" draw:layer="layout" svg:width="2.3cm" svg:height="1cm" svg:x="45.104cm" svg:y="53.528cm">
          <text:p text:style-name="P8"><text:span text:style-name="T29">long </text:span><text:span text:style-name="T29">term</text:span></text:p>
        </draw:rect>
        <draw:connector draw:style-name="gr287" draw:text-style-name="P15" draw:layer="layout" draw:type="curve" svg:x1="69.716cm" svg:y1="45.549cm" svg:x2="56.254cm" svg:y2="51.128cm" draw:start-shape="id203" draw:start-glue-point="2" draw:end-shape="id226" svg:d="M69716 45549c0 4185-13462 1396-13462 5579" svg:viewBox="0 0 13463 5580">
          <text:p/>
        </draw:connector>
        <draw:connector draw:style-name="gr288" draw:text-style-name="P15" draw:layer="layout" draw:type="curve" svg:x1="56.254cm" svg:y1="52.128cm" svg:x2="46.254cm" svg:y2="53.528cm" draw:start-shape="id226" draw:start-glue-point="2" draw:end-shape="id227" draw:end-glue-point="0" svg:d="M56254 52128c0 1050-10000 350-10000 1400" svg:viewBox="0 0 10001 1401">
          <text:p/>
        </draw:connector>
        <draw:rect draw:style-name="gr255" draw:text-style-name="P67" xml:id="id228" draw:id="id228" draw:layer="layout" svg:width="2.5cm" svg:height="1cm" svg:x="67.504cm" svg:y="52.628cm">
          <text:p text:style-name="P8"><text:span text:style-name="T29">implicit</text:span></text:p>
        </draw:rect>
        <draw:connector draw:style-name="gr289" draw:text-style-name="P15" draw:layer="layout" draw:type="curve" svg:x1="69.716cm" svg:y1="45.549cm" svg:x2="68.754cm" svg:y2="52.628cm" draw:start-shape="id203" draw:start-glue-point="2" draw:end-shape="id228" draw:end-glue-point="0" svg:d="M69716 45549c0 5310-962 1771-962 7079" svg:viewBox="0 0 963 7080">
          <text:p/>
        </draw:connector>
        <draw:rect draw:style-name="gr255" draw:text-style-name="P67" xml:id="id230" draw:id="id230" draw:layer="layout" svg:width="2.5cm" svg:height="1cm" svg:x="69.004cm" svg:y="55.028cm">
          <text:p text:style-name="P8"><text:span text:style-name="T29">Repetition </text:span><text:span text:style-name="T29"><text:line-break/></text:span><text:span text:style-name="T29">priming</text:span></text:p>
        </draw:rect>
        <draw:rect draw:style-name="gr255" draw:text-style-name="P67" xml:id="id229" draw:id="id229" draw:layer="layout" svg:width="2.5cm" svg:height="1cm" svg:x="66.004cm" svg:y="55.028cm">
          <text:p text:style-name="P8"><text:span text:style-name="T29">skills</text:span></text:p>
        </draw:rect>
        <draw:connector draw:style-name="gr290" draw:text-style-name="P15" draw:layer="layout" draw:type="curve" svg:x1="68.754cm" svg:y1="53.628cm" svg:x2="67.254cm" svg:y2="55.028cm" draw:start-shape="id228" draw:start-glue-point="2" draw:end-shape="id229" draw:end-glue-point="0" svg:d="M68754 53628c0 1050-1500 350-1500 1400" svg:viewBox="0 0 1501 1401">
          <text:p/>
        </draw:connector>
        <draw:connector draw:style-name="gr291" draw:text-style-name="P15" draw:layer="layout" draw:type="curve" svg:x1="68.754cm" svg:y1="53.628cm" svg:x2="70.254cm" svg:y2="55.028cm" draw:start-shape="id228" draw:start-glue-point="2" draw:end-shape="id230" draw:end-glue-point="0" svg:d="M68754 53628c0 1050 1500 350 1500 1400" svg:viewBox="0 0 1501 1401">
          <text:p/>
        </draw:connector>
        <draw:rect draw:style-name="gr255" draw:text-style-name="P67" xml:id="id232" draw:id="id232" draw:layer="layout" svg:width="2.56cm" svg:height="1.113cm" svg:x="35.83cm" svg:y="57.001cm">
          <text:p text:style-name="P8"><text:span text:style-name="T29">episodic</text:span></text:p>
        </draw:rect>
        <draw:rect draw:style-name="gr255" draw:text-style-name="P67" xml:id="id231" draw:id="id231" draw:layer="layout" svg:width="2.3cm" svg:height="1cm" svg:x="45.104cm" svg:y="56.528cm">
          <text:p text:style-name="P8"><text:span text:style-name="T29">semantic</text:span></text:p>
        </draw:rect>
        <draw:connector draw:style-name="gr65" draw:text-style-name="P15" draw:layer="layout" draw:type="curve" svg:x1="46.254cm" svg:y1="54.528cm" svg:x2="46.254cm" svg:y2="56.528cm" draw:start-shape="id227" draw:start-glue-point="2" draw:end-shape="id231" draw:end-glue-point="0" svg:d="M46254 54528v2000" svg:viewBox="0 0 1 2001">
          <text:p/>
        </draw:connector>
        <draw:connector draw:style-name="gr66" draw:text-style-name="P15" draw:layer="layout" draw:type="curve" svg:x1="46.254cm" svg:y1="54.528cm" svg:x2="37.11cm" svg:y2="57.001cm" draw:start-shape="id227" draw:start-glue-point="2" draw:end-shape="id232" draw:end-glue-point="0" svg:d="M46254 54528c0 1855-9144 619-9144 2473" svg:viewBox="0 0 9145 2474">
          <text:p/>
        </draw:connector>
        <draw:rect draw:style-name="gr292" draw:text-style-name="P35" xml:id="id245" draw:id="id245"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0" draw:start-glue-point="2" draw:end-shape="id233" draw:end-glue-point="0" svg:d="M70254 56028c0 1350 800 450 800 1800" svg:viewBox="0 0 801 1801">
          <text:p/>
        </draw:connector>
        <draw:rect draw:style-name="gr255" draw:text-style-name="P67" xml:id="id234" draw:id="id234" draw:layer="layout" svg:width="2.3cm" svg:height="1cm" svg:x="52.804cm" svg:y="56.528cm">
          <text:p text:style-name="P8"><text:span text:style-name="T29">item </text:span><text:span text:style-name="T29"><text:line-break/></text:span><text:span text:style-name="T29">memory</text:span></text:p>
        </draw:rect>
        <draw:connector draw:style-name="gr70" draw:text-style-name="P15" draw:layer="layout" draw:type="curve" svg:x1="46.254cm" svg:y1="54.528cm" svg:x2="53.954cm" svg:y2="56.528cm" draw:start-shape="id227" draw:start-glue-point="2" draw:end-shape="id234" draw:end-glue-point="0" svg:d="M46254 54528c0 1500 7700 500 7700 2000" svg:viewBox="0 0 7701 2001">
          <text:p/>
        </draw:connector>
        <draw:rect draw:style-name="gr255" draw:text-style-name="P67" xml:id="id235" draw:id="id235" draw:layer="layout" svg:width="2.3cm" svg:height="1cm" svg:x="52.804cm" svg:y="59.228cm">
          <text:p text:style-name="P8"><text:span text:style-name="T29">knowing</text:span></text:p>
        </draw:rect>
        <draw:connector draw:style-name="gr71" draw:text-style-name="P15" draw:layer="layout" draw:type="curve" svg:x1="53.954cm" svg:y1="57.528cm" svg:x2="53.954cm" svg:y2="59.228cm" draw:start-shape="id234" draw:start-glue-point="2" draw:end-shape="id235" svg:d="M53954 57528v1700" svg:viewBox="0 0 1 1701">
          <text:p/>
        </draw:connector>
        <draw:connector draw:style-name="gr72" draw:text-style-name="P15" draw:layer="layout" draw:type="curve" svg:x1="46.254cm" svg:y1="57.528cm" svg:x2="53.954cm" svg:y2="59.228cm" draw:start-shape="id231" draw:start-glue-point="2" draw:end-shape="id235" draw:end-glue-point="0" svg:d="M46254 57528c0 1275 7700 425 7700 1700" svg:viewBox="0 0 7701 1701">
          <text:p/>
        </draw:connector>
        <draw:rect draw:name="memory" draw:style-name="gr40" draw:text-style-name="P63" xml:id="id203" draw:id="id203" draw:layer="layout" svg:width="2.4cm" svg:height="1cm" svg:x="68.516cm" svg:y="44.549cm">
          <text:p text:style-name="P5"><text:span text:style-name="T17">memor</text:span><text:span text:style-name="T17">y</text:span></text:p>
        </draw:rect>
        <draw:rect draw:style-name="gr255" draw:text-style-name="P67" xml:id="id236" draw:id="id236" draw:layer="layout" svg:width="2.3cm" svg:height="1cm" svg:x="59.804cm" svg:y="53.528cm">
          <text:p text:style-name="P8"><text:span text:style-name="T29">S</text:span><text:span text:style-name="T29">h</text:span><text:span text:style-name="T29">o</text:span><text:span text:style-name="T29">rt</text:span><text:span text:style-name="T29"><text:line-break/></text:span><text:span text:style-name="T29">t</text:span><text:span text:style-name="T29">e</text:span><text:span text:style-name="T29">r</text:span><text:span text:style-name="T29">m</text:span></text:p>
        </draw:rect>
        <draw:connector draw:style-name="gr293" draw:text-style-name="P15" draw:layer="layout" draw:type="curve" svg:x1="56.254cm" svg:y1="52.128cm" svg:x2="60.954cm" svg:y2="53.528cm" draw:start-shape="id226" draw:start-glue-point="2" draw:end-shape="id236" draw:end-glue-point="0" svg:d="M56254 52128c0 1050 4700 350 4700 1400" svg:viewBox="0 0 4701 1401">
          <text:p/>
        </draw:connector>
        <draw:rect draw:style-name="gr255" draw:text-style-name="P67" xml:id="id237" draw:id="id237" draw:layer="layout" svg:width="2.3cm" svg:height="1cm" svg:x="52.804cm" svg:y="61.228cm">
          <text:p text:style-name="P8"><text:span text:style-name="T29">Familiarity</text:span></text:p>
        </draw:rect>
        <draw:connector draw:style-name="gr293" draw:text-style-name="P15" draw:layer="layout" draw:type="curve" svg:x1="53.954cm" svg:y1="60.228cm" svg:x2="53.954cm" svg:y2="61.228cm" draw:start-shape="id235" draw:start-glue-point="2" draw:end-shape="id237" draw:end-glue-point="0" svg:d="M53954 60228v1000" svg:viewBox="0 0 1 1001">
          <text:p/>
        </draw:connector>
        <draw:rect draw:style-name="gr292" draw:text-style-name="P35" xml:id="id239" draw:id="id239" draw:layer="layout" svg:width="2.3cm" svg:height="1cm" svg:x="24.504cm" svg:y="72.628cm">
          <text:p text:style-name="P5">Goal</text:p>
        </draw:rect>
        <draw:connector draw:style-name="gr69" draw:text-style-name="P15" draw:layer="layout" draw:type="curve" svg:x1="23.654cm" svg:y1="70.528cm" svg:x2="25.654cm" svg:y2="72.628cm" draw:start-shape="id238" draw:end-shape="id239" draw:end-glue-point="0" svg:d="M23654 70528c0 1575 2000 525 2000 2100" svg:viewBox="0 0 2001 2101">
          <text:p/>
        </draw:connector>
        <draw:rect draw:style-name="gr292" draw:text-style-name="P35" xml:id="id238" draw:id="id238" draw:layer="layout" svg:width="2.3cm" svg:height="1cm" svg:x="22.504cm" svg:y="69.528cm">
          <text:p text:style-name="P5">Normal<text:line-break/>scenario</text:p>
        </draw:rect>
        <draw:rect draw:style-name="gr292" draw:text-style-name="P35" xml:id="id260" draw:id="id260" draw:layer="layout" svg:width="2.3cm" svg:height="1cm" svg:x="27.314cm" svg:y="69.587cm">
          <text:p text:style-name="P5">follow<text:line-break/>scenario</text:p>
        </draw:rect>
        <draw:rect draw:style-name="gr292" draw:text-style-name="P35" xml:id="id240" draw:id="id240" draw:layer="layout" svg:width="2.3cm" svg:height="1cm" svg:x="31.504cm" svg:y="72.528cm">
          <text:p text:style-name="P5">sensors</text:p>
        </draw:rect>
        <draw:connector draw:style-name="gr92" draw:text-style-name="P15" draw:layer="layout" draw:type="curve" svg:x1="23.654cm" svg:y1="70.528cm" svg:x2="32.654cm" svg:y2="72.528cm" draw:start-shape="id238" draw:start-glue-point="2" draw:end-shape="id240" draw:end-glue-point="0" svg:d="M23654 70528c0 1500 9000 500 9000 2000" svg:viewBox="0 0 9001 2001">
          <text:p/>
        </draw:connector>
        <draw:rect draw:style-name="gr292" draw:text-style-name="P35" xml:id="id241" draw:id="id241" draw:layer="layout" svg:width="2.3cm" svg:height="1cm" svg:x="27.504cm" svg:y="74.728cm">
          <text:p text:style-name="P5">Lidar <text:line-break/>ranges</text:p>
        </draw:rect>
        <draw:connector draw:style-name="gr94" draw:text-style-name="P15" draw:layer="layout" draw:type="curve" svg:x1="32.654cm" svg:y1="73.528cm" svg:x2="28.654cm" svg:y2="74.728cm" draw:start-shape="id240" draw:start-glue-point="2" draw:end-shape="id241" svg:d="M32654 73528c0 900-4000 300-4000 1200" svg:viewBox="0 0 4001 1201">
          <text:p/>
        </draw:connector>
        <draw:rect draw:style-name="gr292" draw:text-style-name="P35" xml:id="id242" draw:id="id242" draw:layer="layout" svg:width="2.3cm" svg:height="1cm" svg:x="30.204cm" svg:y="74.728cm">
          <text:p text:style-name="P5">GPS</text:p>
        </draw:rect>
        <draw:connector draw:style-name="gr95" draw:text-style-name="P15" draw:layer="layout" draw:type="curve" svg:x1="32.654cm" svg:y1="73.528cm" svg:x2="31.354cm" svg:y2="74.728cm" draw:start-shape="id240" draw:start-glue-point="2" draw:end-shape="id242" svg:d="M32654 73528c0 900-1300 300-1300 1200" svg:viewBox="0 0 1301 1201">
          <text:p/>
        </draw:connector>
        <draw:rect draw:style-name="gr255" draw:text-style-name="P73" xml:id="id244" draw:id="id244" draw:layer="layout" svg:width="3.154cm" svg:height="1.57cm" svg:x="29.31cm" svg:y="63.161cm">
          <text:p text:style-name="P8"><text:span text:style-name="T29">E</text:span><text:span text:style-name="T29">v</text:span><text:span text:style-name="T29">e</text:span><text:span text:style-name="T29">n</text:span><text:span text:style-name="T29">t</text:span><text:span text:style-name="T29"><text:line-break/></text:span><text:span text:style-name="T29">s</text:span><text:span text:style-name="T29">p</text:span><text:span text:style-name="T29">e</text:span><text:span text:style-name="T29">c</text:span><text:span text:style-name="T29">i</text:span><text:span text:style-name="T29">f</text:span><text:span text:style-name="T29">i</text:span><text:span text:style-name="T29">c</text:span><text:span text:style-name="T29"><text:line-break/></text:span><text:span text:style-name="T29">k</text:span><text:span text:style-name="T29">n</text:span><text:span text:style-name="T29">o</text:span><text:span text:style-name="T29">w</text:span><text:span text:style-name="T29">l</text:span><text:span text:style-name="T29">e</text:span><text:span text:style-name="T29">d</text:span><text:span text:style-name="T29">g</text:span><text:span text:style-name="T29">e</text:span></text:p>
        </draw:rect>
        <draw:connector draw:style-name="gr293" draw:text-style-name="P15" draw:layer="layout" draw:type="curve" svg:x1="34.472cm" svg:y1="61.781cm" svg:x2="30.887cm" svg:y2="63.161cm" draw:start-shape="id243" draw:start-glue-point="2" draw:end-shape="id244" draw:end-glue-point="0" svg:d="M34472 61781c0 1035-3585 345-3585 1380" svg:viewBox="0 0 3586 1381">
          <text:p/>
        </draw:connector>
        <draw:rect draw:style-name="gr292" draw:text-style-name="P35" xml:id="id248" draw:id="id248" draw:layer="layout" svg:width="2.3cm" svg:height="1cm" svg:x="29.634cm" svg:y="66.468cm">
          <text:p text:style-name="P5">oldest</text:p>
        </draw:rect>
        <draw:rect draw:style-name="gr292" draw:text-style-name="P35" xml:id="id233" draw:id="id233" draw:layer="layout" svg:width="2.3cm" svg:height="1cm" svg:x="69.904cm" svg:y="57.828cm">
          <text:p text:style-name="P5">Robotic lab</text:p>
        </draw:rect>
        <draw:connector draw:style-name="gr293" draw:text-style-name="P15" draw:layer="layout" draw:type="curve" svg:x1="71.054cm" svg:y1="58.828cm" svg:x2="71.054cm" svg:y2="59.828cm" draw:start-shape="id233" draw:start-glue-point="2" draw:end-shape="id245" draw:end-glue-point="0" svg:d="M71054 58828v1000" svg:viewBox="0 0 1 1001">
          <text:p/>
        </draw:connector>
        <draw:rect draw:style-name="gr292" draw:text-style-name="P35" xml:id="id246" draw:id="id246" draw:layer="layout" svg:width="2.9cm" svg:height="1.2cm" svg:x="67.004cm" svg:y="62.528cm">
          <text:p text:style-name="P5">Architecture</text:p>
        </draw:rect>
        <draw:rect draw:style-name="gr292" draw:text-style-name="P35" xml:id="id247" draw:id="id247" draw:layer="layout" svg:width="2.9cm" svg:height="1.2cm" svg:x="72.304cm" svg:y="62.528cm">
          <text:p text:style-name="P5">Training config</text:p>
        </draw:rect>
        <draw:connector draw:style-name="gr293" draw:text-style-name="P15" draw:layer="layout" draw:type="curve" svg:x1="71.054cm" svg:y1="61.428cm" svg:x2="68.454cm" svg:y2="62.528cm" draw:start-shape="id245" draw:start-glue-point="2" draw:end-shape="id246" svg:d="M71054 61428c0 825-2600 275-2600 1100" svg:viewBox="0 0 2601 1101">
          <text:p/>
        </draw:connector>
        <draw:connector draw:style-name="gr293" draw:text-style-name="P15" draw:layer="layout" draw:type="curve" svg:x1="71.054cm" svg:y1="61.428cm" svg:x2="73.754cm" svg:y2="62.528cm" draw:start-shape="id245" draw:start-glue-point="2" draw:end-shape="id247" draw:end-glue-point="0" svg:d="M71054 61428c0 825 2700 275 2700 1100" svg:viewBox="0 0 2701 1101">
          <text:p/>
        </draw:connector>
        <draw:connector draw:style-name="gr293" draw:text-style-name="P15" draw:layer="layout" draw:type="curve" svg:x1="30.784cm" svg:y1="67.468cm" svg:x2="23.654cm" svg:y2="69.528cm" draw:start-shape="id248" draw:start-glue-point="2" draw:end-shape="id238" draw:end-glue-point="0" svg:d="M30784 67468c0 1545-7130 515-7130 2060" svg:viewBox="0 0 7131 2061">
          <text:p/>
        </draw:connector>
        <draw:rect draw:style-name="gr292" draw:text-style-name="P35" xml:id="id249" draw:id="id249" draw:layer="layout" svg:width="2.3cm" svg:height="1cm" svg:x="21.804cm" svg:y="72.628cm">
          <text:p text:style-name="P5">Actions</text:p>
        </draw:rect>
        <draw:rect draw:style-name="gr292" draw:text-style-name="P35" xml:id="id250" draw:id="id250" draw:layer="layout" svg:width="2.3cm" svg:height="1cm" svg:x="19.004cm" svg:y="72.628cm">
          <text:p text:style-name="P5">Plans</text:p>
        </draw:rect>
        <draw:connector draw:style-name="gr294" draw:text-style-name="P15" draw:layer="layout" draw:type="curve" svg:x1="23.654cm" svg:y1="70.528cm" svg:x2="22.954cm" svg:y2="72.628cm" draw:start-shape="id238" draw:start-glue-point="2" draw:end-shape="id249" draw:end-glue-point="0" svg:d="M23654 70528c0 1575-700 525-700 2100" svg:viewBox="0 0 701 2101">
          <text:p/>
        </draw:connector>
        <draw:connector draw:style-name="gr295" draw:text-style-name="P15" draw:layer="layout" draw:type="curve" svg:x1="23.654cm" svg:y1="70.528cm" svg:x2="20.154cm" svg:y2="72.628cm" draw:start-shape="id238" draw:start-glue-point="2" draw:end-shape="id250" svg:d="M23654 70528c0 1575-3500 525-3500 2100" svg:viewBox="0 0 3501 2101">
          <text:p/>
        </draw:connector>
        <draw:rect draw:style-name="gr254" draw:text-style-name="P33" xml:id="id251" draw:id="id251" draw:layer="layout" svg:width="2.5cm" svg:height="1cm" svg:x="84.808cm" svg:y="53.174cm">
          <text:p text:style-name="P5">action</text:p>
        </draw:rect>
        <draw:connector draw:style-name="gr296" draw:text-style-name="P15" draw:layer="layout" draw:type="curve" svg:x1="69.716cm" svg:y1="45.549cm" svg:x2="86.058cm" svg:y2="53.174cm" draw:start-shape="id203" draw:start-glue-point="2" draw:end-shape="id251" draw:end-glue-point="0" svg:d="M69716 45549c0 5719 16342 1907 16342 7625" svg:viewBox="0 0 16343 7626">
          <text:p/>
        </draw:connector>
        <draw:rect draw:style-name="gr280" draw:text-style-name="P72" xml:id="id252" draw:id="id252" draw:layer="layout" svg:width="2.5cm" svg:height="1cm" svg:x="80.004cm" svg:y="57.328cm">
          <text:p text:style-name="P5">Segregarion</text:p>
        </draw:rect>
        <draw:rect draw:style-name="gr292" draw:text-style-name="P35" xml:id="id253" draw:id="id253" draw:layer="layout" svg:width="2.5cm" svg:height="1cm" svg:x="76.904cm" svg:y="60.528cm">
          <text:p text:style-name="P8"><text:span text:style-name="T27">Auto </text:span><text:span text:style-name="T27"><text:line-break/></text:span><text:span text:style-name="T27">correlation</text:span></text:p>
        </draw:rect>
        <draw:rect draw:style-name="gr292" draw:text-style-name="P35" xml:id="id254" draw:id="id254" draw:layer="layout" svg:width="2.5cm" svg:height="1cm" svg:x="79.871cm" svg:y="60.528cm">
          <text:p text:style-name="P8"><text:span text:style-name="T27">s</text:span><text:span text:style-name="T27">pli</text:span><text:span text:style-name="T27">t</text:span></text:p>
        </draw:rect>
        <draw:rect draw:style-name="gr292" draw:text-style-name="P35" xml:id="id255" draw:id="id255" draw:layer="layout" svg:width="2.5cm" svg:height="1cm" svg:x="82.837cm" svg:y="60.528cm">
          <text:p text:style-name="P8"><text:span text:style-name="T27">cluster</text:span><text:span text:style-name="T27">ing</text:span></text:p>
        </draw:rect>
        <draw:connector draw:style-name="gr297" draw:text-style-name="P15" draw:layer="layout" draw:type="curve" svg:x1="81.254cm" svg:y1="58.328cm" svg:x2="78.154cm" svg:y2="60.528cm" draw:start-shape="id252" draw:start-glue-point="2" draw:end-shape="id253" draw:end-glue-point="0" svg:d="M81254 58328c0 1650-3100 550-3100 2200" svg:viewBox="0 0 3101 2201">
          <text:p/>
        </draw:connector>
        <draw:connector draw:style-name="gr298" draw:text-style-name="P15" draw:layer="layout" draw:type="curve" svg:x1="81.254cm" svg:y1="58.328cm" svg:x2="81.121cm" svg:y2="60.528cm" draw:start-shape="id252" draw:start-glue-point="2" draw:end-shape="id254" draw:end-glue-point="0" svg:d="M81254 58328c0 1650-133 550-133 2200" svg:viewBox="0 0 134 2201">
          <text:p/>
        </draw:connector>
        <draw:connector draw:style-name="gr299" draw:text-style-name="P15" draw:layer="layout" draw:type="curve" svg:x1="81.254cm" svg:y1="58.328cm" svg:x2="84.087cm" svg:y2="60.528cm" draw:start-shape="id252" draw:start-glue-point="2" draw:end-shape="id255" svg:d="M81254 58328c0 1650 2833 550 2833 2200" svg:viewBox="0 0 2834 2201">
          <text:p/>
        </draw:connector>
        <draw:connector draw:style-name="gr300" draw:text-style-name="P15" draw:layer="layout" draw:type="curve" svg:x1="86.058cm" svg:y1="54.174cm" svg:x2="81.254cm" svg:y2="57.328cm" draw:start-shape="id251" draw:start-glue-point="2" draw:end-shape="id252" draw:end-glue-point="0" svg:d="M86058 54174c0 2365-4804 789-4804 3154" svg:viewBox="0 0 4805 3155">
          <text:p/>
        </draw:connector>
        <draw:rect draw:style-name="gr292" draw:text-style-name="P35" xml:id="id478" draw:id="id478" draw:layer="layout" svg:width="2.5cm" svg:height="1cm" svg:x="85.804cm" svg:y="60.528cm">
          <text:p text:style-name="P8"><text:span text:style-name="T27">F</text:span><text:span text:style-name="T27">e</text:span><text:span text:style-name="T27">at</text:span><text:span text:style-name="T27">ur</text:span><text:span text:style-name="T27">e</text:span><text:span text:style-name="T27"><text:line-break/></text:span><text:span text:style-name="T27">sli</text:span><text:span text:style-name="T27">c</text:span><text:span text:style-name="T27">e</text:span></text:p>
        </draw:rect>
        <draw:rect draw:style-name="gr292" draw:text-style-name="P35" xml:id="id256" draw:id="id256" draw:layer="layout" svg:width="2.3cm" svg:height="1cm" svg:x="48.472cm" svg:y="59.941cm">
          <text:p text:style-name="P5">Goal<text:line-break/>types</text:p>
        </draw:rect>
        <draw:connector draw:style-name="gr301" draw:text-style-name="P15" draw:layer="layout" draw:type="curve" svg:x1="46.254cm" svg:y1="57.528cm" svg:x2="49.622cm" svg:y2="59.941cm" draw:start-shape="id231" draw:start-glue-point="2" draw:end-shape="id256" draw:end-glue-point="0" svg:d="M46254 57528c0 1810 3368 604 3368 2413" svg:viewBox="0 0 3369 2414">
          <text:p/>
        </draw:connector>
        <draw:rect draw:style-name="gr292" draw:text-style-name="P35" xml:id="id257" draw:id="id257" draw:layer="layout" svg:width="2.3cm" svg:height="1cm" svg:x="48.418cm" svg:y="61.675cm">
          <text:p text:style-name="P5">Suprise<text:line-break/>reduction</text:p>
        </draw:rect>
        <draw:connector draw:style-name="gr302" draw:text-style-name="P15" draw:layer="layout" draw:type="curve" svg:x1="49.622cm" svg:y1="60.941cm" svg:x2="49.568cm" svg:y2="61.675cm" draw:start-shape="id256" draw:start-glue-point="2" draw:end-shape="id257" draw:end-glue-point="0" svg:d="M49622 60941c0 550-54 184-54 734" svg:viewBox="0 0 55 735">
          <text:p/>
        </draw:connector>
        <draw:rect draw:style-name="gr255" draw:text-style-name="P67" xml:id="id258" draw:id="id258" draw:layer="layout" svg:width="3.154cm" svg:height="1.57cm" svg:x="36.695cm" svg:y="63.161cm">
          <text:p text:style-name="P8"><text:span text:style-name="T29">G</text:span><text:span text:style-name="T29">e</text:span><text:span text:style-name="T29">n</text:span><text:span text:style-name="T29">e</text:span><text:span text:style-name="T29">r</text:span><text:span text:style-name="T29">a</text:span><text:span text:style-name="T29">l </text:span><text:span text:style-name="T29">e</text:span><text:span text:style-name="T29">v</text:span><text:span text:style-name="T29">e</text:span><text:span text:style-name="T29">n</text:span><text:span text:style-name="T29">t</text:span><text:span text:style-name="T29">s</text:span></text:p>
        </draw:rect>
        <draw:connector draw:style-name="gr303" draw:text-style-name="P15" draw:layer="layout" draw:type="curve" svg:x1="34.472cm" svg:y1="61.781cm" svg:x2="38.272cm" svg:y2="63.161cm" draw:start-shape="id243" draw:start-glue-point="2" draw:end-shape="id258" draw:end-glue-point="0" svg:d="M34472 61781c0 1035 3800 345 3800 1380" svg:viewBox="0 0 3801 1381">
          <text:p/>
        </draw:connector>
        <draw:rect draw:style-name="gr304" draw:text-style-name="P75" xml:id="id259" draw:id="id259" draw:layer="layout" svg:width="3.154cm" svg:height="1.57cm" svg:x="33.003cm" svg:y="63.161cm">
          <text:p text:style-name="P74"><text:span text:style-name="T29">lifetime</text:span></text:p>
        </draw:rect>
        <draw:connector draw:style-name="gr305" draw:text-style-name="P15" draw:layer="layout" draw:type="curve" svg:x1="34.472cm" svg:y1="61.781cm" svg:x2="34.58cm" svg:y2="63.161cm" draw:start-shape="id243" draw:end-shape="id259" draw:end-glue-point="0" svg:d="M34472 61781c0 1035 108 345 108 1380" svg:viewBox="0 0 109 1381">
          <text:p/>
        </draw:connector>
        <draw:connector draw:style-name="gr306" draw:text-style-name="P15" draw:layer="layout" draw:type="curve" svg:x1="30.887cm" svg:y1="64.731cm" svg:x2="30.784cm" svg:y2="66.468cm" draw:start-shape="id244" draw:start-glue-point="2" draw:end-shape="id248" draw:end-glue-point="0" svg:d="M30887 64731c0 1303-103 435-103 1737" svg:viewBox="0 0 104 1738">
          <text:p/>
        </draw:connector>
        <draw:connector draw:style-name="gr307" draw:text-style-name="P15" draw:layer="layout" draw:type="curve" svg:x1="30.784cm" svg:y1="67.468cm" svg:x2="28.464cm" svg:y2="69.587cm" draw:start-shape="id248" draw:start-glue-point="2" draw:end-shape="id260" draw:end-glue-point="0" svg:d="M30784 67468c0 1590-2320 531-2320 2119" svg:viewBox="0 0 2321 2120">
          <text:p/>
        </draw:connector>
        <draw:rect draw:style-name="gr255" draw:text-style-name="P67" xml:id="id243" draw:id="id243" draw:layer="layout" svg:width="3.804cm" svg:height="1cm" svg:x="32.57cm" svg:y="60.781cm">
          <text:p text:style-name="P8"><text:span text:style-name="T29">Autobi</text:span><text:span text:style-name="T29">ograph</text:span><text:span text:style-name="T29">ic</text:span></text:p>
        </draw:rect>
        <draw:connector draw:style-name="gr308" draw:text-style-name="P15" draw:layer="layout" draw:type="curve" svg:x1="37.11cm" svg:y1="58.114cm" svg:x2="34.472cm" svg:y2="60.781cm" draw:start-shape="id232" draw:end-shape="id243" draw:end-glue-point="0" svg:d="M37110 58114c0 2001-2638 668-2638 2667" svg:viewBox="0 0 2639 2668">
          <text:p/>
        </draw:connector>
        <draw:rect draw:style-name="gr292" draw:text-style-name="P35" xml:id="id261" draw:id="id261" draw:layer="layout" svg:width="2.138cm" svg:height="1.014cm" svg:x="119.674cm" svg:y="37.646cm">
          <text:p text:style-name="P5">neurons</text:p>
        </draw:rect>
        <draw:rect draw:style-name="gr255" draw:text-style-name="P67" xml:id="id264" draw:id="id264" draw:layer="layout" svg:width="2.411cm" svg:height="0.984cm" svg:x="123.657cm" svg:y="40.623cm">
          <text:p text:style-name="P8"><text:span text:style-name="T29">Sensory</text:span><text:span text:style-name="T29"><text:line-break/></text:span><text:span text:style-name="T29">neurons</text:span></text:p>
        </draw:rect>
        <draw:rect draw:style-name="gr255" draw:text-style-name="P67" xml:id="id263" draw:id="id263" draw:layer="layout" svg:width="2.138cm" svg:height="1.014cm" svg:x="121.158cm" svg:y="40.526cm">
          <text:p text:style-name="P8"><text:span text:style-name="T29">M</text:span><text:span text:style-name="T29">ot</text:span><text:span text:style-name="T29">or </text:span><text:span text:style-name="T29"><text:line-break/></text:span><text:span text:style-name="T29">n</text:span><text:span text:style-name="T29">e</text:span><text:span text:style-name="T29">ur</text:span><text:span text:style-name="T29">o</text:span><text:span text:style-name="T29">n</text:span><text:span text:style-name="T29">s</text:span></text:p>
        </draw:rect>
        <draw:rect draw:style-name="gr255" draw:text-style-name="P67" xml:id="id262" draw:id="id262" draw:layer="layout" svg:width="2.138cm" svg:height="1.014cm" svg:x="118.571cm" svg:y="40.55cm">
          <text:p text:style-name="P8"><text:span text:style-name="T29">projection </text:span><text:span text:style-name="T29"><text:line-break/></text:span><text:span text:style-name="T29">neurons</text:span></text:p>
        </draw:rect>
        <draw:connector draw:style-name="gr309" draw:text-style-name="P46" draw:layer="layout" draw:type="curve" svg:x1="120.743cm" svg:y1="38.66cm" svg:x2="119.64cm" svg:y2="40.55cm" draw:start-shape="id261" draw:start-glue-point="2" draw:end-shape="id262" svg:d="M120743 38660c0 1417-1103 473-1103 1890" svg:viewBox="0 0 1104 1891">
          <text:p/>
        </draw:connector>
        <draw:connector draw:style-name="gr310" draw:text-style-name="P46" draw:layer="layout" draw:type="curve" svg:x1="120.743cm" svg:y1="38.66cm" svg:x2="122.227cm" svg:y2="40.526cm" draw:start-shape="id261" draw:start-glue-point="2" draw:end-shape="id263" draw:end-glue-point="0" svg:d="M120743 38660c0 1399 1484 467 1484 1866" svg:viewBox="0 0 1485 1867">
          <text:p/>
        </draw:connector>
        <draw:connector draw:style-name="gr311" draw:text-style-name="P46" draw:layer="layout" draw:type="curve" svg:x1="120.743cm" svg:y1="38.66cm" svg:x2="124.862cm" svg:y2="40.623cm" draw:start-shape="id261" draw:start-glue-point="2" draw:end-shape="id264" draw:end-glue-point="0" svg:d="M120743 38660c0 1473 4119 492 4119 1963" svg:viewBox="0 0 4120 1964">
          <text:p/>
        </draw:connector>
        <draw:rect draw:style-name="gr255" draw:text-style-name="P67" xml:id="id265" draw:id="id265" draw:layer="layout" svg:width="2.51cm" svg:height="1.014cm" svg:x="115.804cm" svg:y="40.53cm">
          <text:p text:style-name="P8"><text:span text:style-name="T29">Inter-</text:span><text:span text:style-name="T29">neuro</text:span><text:span text:style-name="T29">n </text:span><text:span text:style-name="T29"><text:line-break/></text:span><text:span text:style-name="T29">neuro</text:span><text:span text:style-name="T29">ns</text:span></text:p>
        </draw:rect>
        <draw:connector draw:style-name="gr312" draw:text-style-name="P46" draw:layer="layout" draw:type="curve" svg:x1="120.743cm" svg:y1="38.66cm" svg:x2="117.059cm" svg:y2="40.53cm" draw:start-shape="id261" draw:start-glue-point="2" draw:end-shape="id265" draw:end-glue-point="0" svg:d="M120743 38660c0 1402-3684 468-3684 1870" svg:viewBox="0 0 3685 1871">
          <text:p/>
        </draw:connector>
        <draw:rect draw:style-name="gr255" draw:text-style-name="P67" xml:id="id323" draw:id="id323" draw:layer="layout" svg:width="2.4cm" svg:height="1cm" svg:x="111.805cm" svg:y="32.625cm">
          <text:p text:style-name="P8"><text:span text:style-name="T29">awar</text:span><text:span text:style-name="T29">enes</text:span><text:span text:style-name="T29">s</text:span></text:p>
        </draw:rect>
        <draw:rect draw:style-name="gr255" draw:text-style-name="P77" xml:id="id267" draw:id="id267" draw:layer="layout" svg:width="2.962cm" svg:height="1cm" svg:x="111.461cm" svg:y="30.205cm">
          <text:p text:style-name="P76"><text:span text:style-name="T29">Consciousness</text:span></text:p>
        </draw:rect>
        <draw:connector draw:style-name="gr313" draw:text-style-name="P15" draw:layer="layout" draw:type="curve" svg:x1="115.171cm" svg:y1="28.951cm" svg:x2="112.942cm" svg:y2="30.205cm" draw:start-shape="id266" draw:start-glue-point="2" draw:end-shape="id267" draw:end-glue-point="0" svg:d="M115171 28951c0 314-557 627-1115 627-557 0-1114 314-1114 627" svg:viewBox="0 0 2230 1255">
          <text:p/>
        </draw:connector>
        <draw:rect draw:style-name="gr255" draw:text-style-name="P77" xml:id="id268" draw:id="id268" draw:layer="layout" svg:width="3.448cm" svg:height="1cm" svg:x="115.797cm" svg:y="30.671cm">
          <text:p text:style-name="P76"><text:span text:style-name="T29">unc</text:span><text:span text:style-name="T29">ons</text:span><text:span text:style-name="T29">ciou</text:span><text:span text:style-name="T29">sne</text:span><text:span text:style-name="T29">ss</text:span></text:p>
        </draw:rect>
        <draw:connector draw:style-name="gr314" draw:text-style-name="P15" draw:layer="layout" draw:type="curve" svg:x1="115.171cm" svg:y1="28.951cm" svg:x2="117.521cm" svg:y2="30.671cm" draw:start-shape="id266" draw:start-glue-point="2" draw:end-shape="id268" draw:end-glue-point="0" svg:d="M115171 28951c0 1290 2350 430 2350 1720" svg:viewBox="0 0 2351 1721">
          <text:p/>
        </draw:connector>
        <draw:rect draw:style-name="gr255" draw:text-style-name="P67" xml:id="id269" draw:id="id269" draw:layer="layout" svg:width="2.4cm" svg:height="1cm" svg:x="101.7cm" svg:y="39.065cm">
          <text:p text:style-name="P8"><text:span text:style-name="T29">Self-</text:span><text:span text:style-name="T29"><text:line-break/></text:span><text:span text:style-name="T29">awareness</text:span></text:p>
        </draw:rect>
        <draw:connector draw:style-name="gr315" draw:text-style-name="P15" draw:layer="layout" draw:type="curve" svg:x1="102.857cm" svg:y1="38.365cm" svg:x2="102.9cm" svg:y2="39.065cm" draw:start-shape="id213" draw:start-glue-point="2" draw:end-shape="id269" draw:end-glue-point="0" svg:d="M102857 38365c0 525 43 175 43 700" svg:viewBox="0 0 44 701">
          <text:p/>
        </draw:connector>
        <draw:rect draw:style-name="gr41" draw:text-style-name="P5" xml:id="id270" draw:id="id270" draw:layer="layout" svg:width="2.143cm" svg:height="1.085cm" svg:x="101.829cm" svg:y="40.952cm">
          <text:p text:style-name="P5">Body<text:line-break/>awareness</text:p>
        </draw:rect>
        <draw:connector draw:style-name="gr316" draw:text-style-name="P15" draw:layer="layout" draw:type="curve" svg:x1="102.9cm" svg:y1="40.065cm" svg:x2="102.9cm" svg:y2="40.952cm" draw:start-shape="id269" draw:start-glue-point="2" draw:end-shape="id270" draw:end-glue-point="0" svg:d="M102900 40065v887" svg:viewBox="0 0 1 888">
          <text:p/>
        </draw:connector>
        <draw:custom-shape draw:style-name="gr317" draw:text-style-name="P68" xml:id="id272" draw:id="id272"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6" draw:id="id266" draw:layer="layout" svg:width="2.4cm" svg:height="1cm" svg:x="113.971cm" svg:y="27.951cm">
          <text:p text:style-name="P8"><text:span text:style-name="T29">P</text:span><text:span text:style-name="T29">s</text:span><text:span text:style-name="T29">y</text:span><text:span text:style-name="T29">c</text:span><text:span text:style-name="T29">h</text:span><text:span text:style-name="T29">e</text:span></text:p>
        </draw:rect>
        <draw:connector draw:style-name="gr318" draw:text-style-name="P15" draw:layer="layout" draw:type="curve" svg:x1="110.471cm" svg:y1="27.075cm" svg:x2="115.171cm" svg:y2="27.951cm" draw:start-shape="id187" draw:start-glue-point="2" draw:end-shape="id266" draw:end-glue-point="0" svg:d="M110471 27075c0 251 624 501 1248 501 623 0 1247-32 1247-63 0-32 551-63 1103-63 551 0 1102 251 1102 501" svg:viewBox="0 0 4701 877">
          <text:p/>
        </draw:connector>
        <draw:rect draw:style-name="gr255" draw:text-style-name="P67" xml:id="id271" draw:id="id271" draw:layer="layout" svg:width="2.4cm" svg:height="1.412cm" svg:x="102.126cm" svg:y="29.926cm">
          <text:p text:style-name="P8"><text:span text:style-name="T29">Cognition</text:span></text:p>
        </draw:rect>
        <draw:connector draw:style-name="gr319" draw:text-style-name="P15" draw:layer="layout" draw:type="curve" svg:x1="103.326cm" svg:y1="31.338cm" svg:x2="106.992cm" svg:y2="34.46cm" draw:start-shape="id271" draw:start-glue-point="2" draw:end-shape="id212" draw:end-glue-point="0" svg:d="M103326 31338c0 2341 3666 781 3666 3122" svg:viewBox="0 0 3667 3123">
          <text:p/>
        </draw:connector>
        <draw:connector draw:style-name="gr320" draw:text-style-name="P15" draw:layer="layout" draw:type="curve" svg:x1="103.326cm" svg:y1="31.338cm" svg:x2="92.83cm" svg:y2="35.148cm" draw:start-shape="id271" draw:start-glue-point="2" draw:end-shape="id211" draw:end-glue-point="0" svg:d="M103326 31338c0 2857-10496 953-10496 3810" svg:viewBox="0 0 10497 3811">
          <text:p/>
        </draw:connector>
        <draw:connector draw:style-name="gr321" draw:text-style-name="P15" draw:layer="layout" draw:type="curve" svg:x1="110.471cm" svg:y1="27.075cm" svg:x2="103.326cm" svg:y2="29.926cm" draw:start-shape="id187" draw:start-glue-point="2" draw:end-shape="id271" draw:end-glue-point="0" svg:d="M110471 27075c0 2139-7145 714-7145 2851" svg:viewBox="0 0 7146 2852">
          <text:p/>
        </draw:connector>
        <draw:connector draw:style-name="gr284" draw:text-style-name="P15" draw:layer="layout" draw:type="curve" svg:x1="102.857cm" svg:y1="37.365cm" svg:x2="103.55cm" svg:y2="36.083cm" draw:start-shape="id213" draw:end-shape="id272" draw:end-glue-point="6" svg:d="M102857 37365c0-961 693-321 693-1282" svg:viewBox="0 0 694 1283">
          <text:p/>
        </draw:connector>
        <draw:rect draw:style-name="gr255" draw:text-style-name="P71" xml:id="id273" draw:id="id273" draw:layer="layout" svg:width="2.4cm" svg:height="1cm" svg:x="104.817cm" svg:y="37.308cm">
          <text:p text:style-name="P3"><text:span text:style-name="T29">Self-</text:span><text:span text:style-name="T29"><text:line-break/></text:span><text:span text:style-name="T29">monitori</text:span><text:span text:style-name="T29">ng</text:span></text:p>
        </draw:rect>
        <draw:rect draw:style-name="gr255" draw:text-style-name="P77" xml:id="id274" draw:id="id274" draw:layer="layout" svg:width="2.4cm" svg:height="1cm" svg:x="107.733cm" svg:y="37.27cm">
          <text:p text:style-name="P78"><text:span text:style-name="T29">Self-</text:span><text:span text:style-name="T29"><text:line-break/></text:span><text:span text:style-name="T29">evaluation</text:span></text:p>
        </draw:rect>
        <draw:rect draw:style-name="gr255" draw:text-style-name="P71" xml:id="id275" draw:id="id275" draw:layer="layout" svg:width="2.4cm" svg:height="1cm" svg:x="110.65cm" svg:y="37.27cm">
          <text:p text:style-name="P3"><text:span text:style-name="T29">Self-</text:span><text:span text:style-name="T29"><text:line-break/></text:span><text:span text:style-name="T29">regulation</text:span></text:p>
        </draw:rect>
        <draw:connector draw:style-name="gr322" draw:text-style-name="P15" draw:layer="layout" draw:type="curve" svg:x1="106.992cm" svg:y1="35.872cm" svg:x2="106.017cm" svg:y2="37.308cm" draw:start-shape="id212" draw:start-glue-point="2" draw:end-shape="id273" draw:end-glue-point="0" svg:d="M106992 35872c0 1077-975 359-975 1436" svg:viewBox="0 0 976 1437">
          <text:p/>
        </draw:connector>
        <draw:connector draw:style-name="gr323" draw:text-style-name="P15" draw:layer="layout" draw:type="curve" svg:x1="106.992cm" svg:y1="35.872cm" svg:x2="108.933cm" svg:y2="37.27cm" draw:start-shape="id212" draw:start-glue-point="2" draw:end-shape="id274" draw:end-glue-point="0" svg:d="M106992 35872c0 1048 1941 350 1941 1398" svg:viewBox="0 0 1942 1399">
          <text:p/>
        </draw:connector>
        <draw:connector draw:style-name="gr324" draw:text-style-name="P15" draw:layer="layout" draw:type="curve" svg:x1="106.992cm" svg:y1="35.872cm" svg:x2="111.85cm" svg:y2="37.27cm" draw:start-shape="id212" draw:start-glue-point="2" draw:end-shape="id275" draw:end-glue-point="0" svg:d="M106992 35872c0 1048 4858 350 4858 1398" svg:viewBox="0 0 4859 1399">
          <text:p/>
        </draw:connector>
        <draw:connector draw:style-name="gr325" draw:text-style-name="P15" draw:layer="layout" draw:type="curve" svg:x1="122.751cm" svg:y1="35.691cm" svg:x2="120.743cm" svg:y2="37.646cm" draw:start-shape="id276" draw:start-glue-point="2" draw:end-shape="id261" draw:end-glue-point="0" svg:d="M122751 35691c0 1467-2008 490-2008 1955" svg:viewBox="0 0 2009 1956">
          <text:p/>
        </draw:connector>
        <draw:rect draw:style-name="gr292" draw:text-style-name="P35" xml:id="id277" draw:id="id277" draw:layer="layout" svg:width="2.138cm" svg:height="1.014cm" svg:x="123.702cm" svg:y="37.693cm">
          <text:p text:style-name="P5">Nerve</text:p>
        </draw:rect>
        <draw:connector draw:style-name="gr326" draw:text-style-name="P15" draw:layer="layout" draw:type="curve" svg:x1="122.751cm" svg:y1="35.691cm" svg:x2="124.771cm" svg:y2="37.693cm" draw:start-shape="id276" draw:start-glue-point="2" draw:end-shape="id277" draw:end-glue-point="0" svg:d="M122751 35691c0 1501 2020 501 2020 2002" svg:viewBox="0 0 2021 2003">
          <text:p/>
        </draw:connector>
        <draw:rect draw:style-name="gr254" draw:text-style-name="P33" xml:id="id276" draw:id="id276" draw:layer="layout" svg:width="2.411cm" svg:height="0.984cm" svg:x="121.546cm" svg:y="34.707cm">
          <text:p text:style-name="P5">shared</text:p>
        </draw:rect>
        <draw:connector draw:style-name="gr327" draw:text-style-name="P15" draw:layer="layout" draw:type="curve" svg:x1="137.15cm" svg:y1="30.109cm" svg:x2="122.751cm" svg:y2="34.707cm" draw:start-shape="id190" draw:start-glue-point="2" draw:end-shape="id276" draw:end-glue-point="0" svg:d="M137150 30109c0 3448-14399 1150-14399 4598" svg:viewBox="0 0 14400 4599">
          <text:p/>
        </draw:connector>
        <draw:g draw:style-name="gr31">
          <draw:frame draw:style-name="gr328" draw:text-style-name="P79" draw:layer="layout" svg:width="2.753cm" svg:height="1.947cm" svg:x="-103.881cm" svg:y="74.399cm">
            <draw:image xlink:href="Pictures/100000010000032000000236D36E8DB6.png" xlink:type="simple" xlink:show="embed" xlink:actuate="onLoad" draw:mime-type="image/png">
              <text:p/>
            </draw:image>
          </draw:frame>
          <draw:frame draw:style-name="gr328" draw:text-style-name="P79" draw:layer="layout" svg:width="2.753cm" svg:height="1.948cm" svg:x="-103.881cm" svg:y="67.807cm">
            <draw:image xlink:href="Pictures/100000010000032000000236D36E8DB6.png" xlink:type="simple" xlink:show="embed" xlink:actuate="onLoad" draw:mime-type="image/png">
              <text:p/>
            </draw:image>
          </draw:frame>
          <draw:connector draw:style-name="gr329" draw:text-style-name="P79" draw:layer="layout" draw:type="line" svg:x1="-101.046cm" svg:y1="68.701cm" svg:x2="-98.561cm" svg:y2="68.713cm" svg:d="M-101046 68701l2485 12" svg:viewBox="0 0 2486 13">
            <text:p/>
          </draw:connector>
          <draw:connector draw:style-name="gr329" draw:text-style-name="P79" draw:layer="layout" draw:type="line" svg:x1="-101.056cm" svg:y1="75.29cm" svg:x2="-98.571cm" svg:y2="75.3cm" svg:d="M-101056 75290l2485 10" svg:viewBox="0 0 2486 11">
            <text:p/>
          </draw:connector>
          <draw:custom-shape draw:style-name="gr330" draw:text-style-name="P80" xml:id="id278" draw:id="id278"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1" draw:text-style-name="P81" draw:layer="layout" svg:width="4.719cm" svg:height="3.139cm" draw:transform="rotate (1.5707963267949) translate (-102.479cm 74.219cm)">
            <draw:text-box>
              <text:p text:style-name="P3"><text:span text:style-name="T30">Exter</text:span><text:span text:style-name="T30">ocep</text:span><text:span text:style-name="T30">tive </text:span></text:p>
              <text:p text:style-name="P3"><text:span text:style-name="T30">and </text:span></text:p>
              <text:p text:style-name="P3"><text:span text:style-name="T30">propr</text:span><text:span text:style-name="T30">ioce</text:span><text:span text:style-name="T30">ptive </text:span></text:p>
              <text:p text:style-name="P3"><text:span text:style-name="T30">data</text:span></text:p>
            </draw:text-box>
          </draw:frame>
          <draw:custom-shape draw:style-name="gr332" draw:text-style-name="P82" xml:id="id279" draw:id="id279"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5.15cm" svg:y1="71.967cm" svg:x2="-93.325cm" svg:y2="72.02cm" draw:start-shape="id278" draw:start-glue-point="1" draw:end-shape="id279" draw:end-glue-point="6" svg:d="M-95150 71967l1825 53" svg:viewBox="0 0 1826 54">
            <text:p/>
          </draw:connector>
          <draw:custom-shape draw:style-name="gr332" draw:text-style-name="P82" xml:id="id280" draw:id="id280"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3" draw:text-style-name="P82" xml:id="id282" draw:id="id282"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2.923cm" svg:y1="72.02cm" svg:x2="-92.172cm" svg:y2="69.475cm" draw:start-shape="id279" draw:start-glue-point="10" draw:end-shape="id280" draw:end-glue-point="8" svg:d="M-92923 72020l751-2545" svg:viewBox="0 0 752 2546">
            <text:p/>
          </draw:connector>
          <draw:custom-shape draw:style-name="gr334" draw:text-style-name="P83" xml:id="id281" draw:id="id281"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5" draw:text-style-name="P84" draw:layer="layout" svg:width="5.423cm" svg:height="1.697cm" svg:x="-87.435cm" svg:y="66.065cm">
            <draw:text-box>
              <text:p text:style-name="P5"><text:span text:style-name="T31">Clus</text:span><text:span text:style-name="T31">terin</text:span><text:span text:style-name="T31">g </text:span></text:p>
              <text:p text:style-name="P5"><text:span text:style-name="T31">abst</text:span><text:span text:style-name="T31">racti</text:span><text:span text:style-name="T31">on</text:span></text:p>
            </draw:text-box>
          </draw:frame>
          <draw:frame draw:style-name="gr336" draw:text-style-name="P84" draw:layer="layout" svg:width="3.515cm" svg:height="1.696cm" draw:transform="rotate (1.5707963267949) translate (-78.895cm 72.031cm)">
            <draw:text-box>
              <text:p text:style-name="P5"><text:span text:style-name="T31">Offli</text:span><text:span text:style-name="T31">ne </text:span></text:p>
              <text:p text:style-name="P5"><text:span text:style-name="T31">lear</text:span><text:span text:style-name="T31">ning</text:span></text:p>
            </draw:text-box>
          </draw:frame>
          <draw:custom-shape draw:style-name="gr337" draw:text-style-name="P83"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4" draw:text-style-name="P83" xml:id="id283" draw:id="id283"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8" draw:text-style-name="P85"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39" draw:text-style-name="P85"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0" draw:text-style-name="P79" draw:layer="layout" svg:x1="-92.172cm" svg:y1="69.065cm" svg:x2="-89.265cm" svg:y2="66.815cm" draw:start-shape="id280" draw:start-glue-point="4" draw:end-shape="id281" draw:end-glue-point="0" svg:d="M-92172 69065v-2250h2907" svg:viewBox="0 0 2908 2251">
            <text:p/>
          </draw:connector>
          <draw:connector draw:style-name="gr340" draw:text-style-name="P79" draw:layer="layout" svg:x1="-92.178cm" svg:y1="74.897cm" svg:x2="-89.265cm" svg:y2="77.107cm" draw:start-shape="id282" draw:start-glue-point="8" draw:end-shape="id283" draw:end-glue-point="0" svg:d="M-92178 74897v2210h2913" svg:viewBox="0 0 2914 2211">
            <text:p/>
          </draw:connector>
          <draw:frame draw:style-name="gr336" draw:text-style-name="P84" draw:layer="layout" svg:width="5.422cm" svg:height="1.696cm" svg:x="-87.433cm" svg:y="76.42cm">
            <draw:text-box>
              <text:p text:style-name="P5"><text:span text:style-name="T31">Abn</text:span><text:span text:style-name="T31">orm</text:span><text:span text:style-name="T31">ality</text:span></text:p>
              <text:p text:style-name="P5"><text:span text:style-name="T31">dete</text:span><text:span text:style-name="T31">ctio</text:span><text:span text:style-name="T31">n</text:span></text:p>
            </draw:text-box>
          </draw:frame>
          <draw:frame draw:style-name="gr341" draw:text-style-name="P84" draw:layer="layout" svg:width="4.203cm" svg:height="2.417cm" draw:transform="rotate (1.5707963267949) translate (-79.09cm 79.256cm)">
            <draw:text-box>
              <text:p text:style-name="P5"><text:span text:style-name="T31">Onli</text:span><text:span text:style-name="T31">ne</text:span></text:p>
              <text:p text:style-name="P5"><text:span text:style-name="T31">infer</text:span><text:span text:style-name="T31">ence</text:span></text:p>
            </draw:text-box>
          </draw:frame>
          <draw:custom-shape draw:style-name="gr342" draw:text-style-name="P79"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5" draw:text-style-name="P86" draw:layer="layout" svg:width="6.047cm" svg:height="1.697cm" draw:transform="rotate (1.5707963267949) translate (-87.207cm 75.046cm)">
            <draw:text-box>
              <text:p text:style-name="P5"><text:span text:style-name="T31">Prop</text:span><text:span text:style-name="T31">rioc</text:span><text:span text:style-name="T31">eptiv</text:span><text:span text:style-name="T31">e </text:span><text:span text:style-name="T31">DBN</text:span></text:p>
            </draw:text-box>
          </draw:frame>
          <draw:frame draw:style-name="gr336" draw:text-style-name="P86" draw:layer="layout" svg:width="6.047cm" svg:height="1.696cm" draw:transform="rotate (1.5707963267949) translate (-83.337cm 75.046cm)">
            <draw:text-box>
              <text:p text:style-name="P5"><text:span text:style-name="T31">Exte</text:span><text:span text:style-name="T31">roce</text:span><text:span text:style-name="T31">ptive </text:span></text:p>
              <text:p text:style-name="P5"><text:span text:style-name="T31">DBN</text:span></text:p>
            </draw:text-box>
          </draw:frame>
          <draw:connector draw:style-name="gr343" draw:text-style-name="P79" draw:layer="layout" draw:type="line" svg:x1="-86.991cm" svg:y1="67.564cm" svg:x2="-86.96cm" svg:y2="69.289cm" svg:d="M-86991 67564l31 1725" svg:viewBox="0 0 32 1726">
            <text:p/>
          </draw:connector>
          <draw:connector draw:style-name="gr343" draw:text-style-name="P79" draw:layer="layout" draw:type="line" svg:x1="-82.745cm" svg:y1="67.553cm" svg:x2="-82.713cm" svg:y2="69.28cm" svg:d="M-82745 67553l32 1727" svg:viewBox="0 0 33 1728">
            <text:p/>
          </draw:connector>
          <draw:connector draw:style-name="gr343" draw:text-style-name="P79" draw:layer="layout" draw:type="line" svg:x1="-86.672cm" svg:y1="74.463cm" svg:x2="-86.641cm" svg:y2="76.188cm" svg:d="M-86672 74463l31 1725" svg:viewBox="0 0 32 1726">
            <text:p/>
          </draw:connector>
          <draw:connector draw:style-name="gr343" draw:text-style-name="P79" draw:layer="layout" draw:type="line" svg:x1="-82.424cm" svg:y1="74.453cm" svg:x2="-82.395cm" svg:y2="76.178cm" svg:d="M-82424 74453l29 1725" svg:viewBox="0 0 30 1726">
            <text:p/>
          </draw:connector>
          <draw:connector draw:style-name="gr344" draw:text-style-name="P87" draw:layer="layout" svg:x1="-89.265cm" svg:y1="78.209cm" svg:x2="-92.982cm" svg:y2="72.165cm" draw:start-shape="id283" draw:start-glue-point="4" draw:end-shape="id279" draw:end-glue-point="9" svg:d="M-89265 78209h-1828v-6044h-1889" svg:viewBox="0 0 3718 6045">
            <text:p/>
          </draw:connector>
          <draw:frame draw:style-name="gr345" draw:text-style-name="P88" draw:layer="layout" svg:width="4.985cm" svg:height="1.593cm" draw:transform="rotate (1.5707963267949) translate (-97.297cm 74.331cm)">
            <draw:text-box>
              <text:p><text:span text:style-name="T31">Prep</text:span><text:span text:style-name="T31">roce</text:span><text:span text:style-name="T31">ssin</text:span><text:span text:style-name="T31">g</text:span></text:p>
            </draw:text-box>
          </draw:frame>
          <draw:frame draw:style-name="gr346" draw:text-style-name="P89" draw:layer="layout" svg:width="3.073cm" svg:height="2.168cm" svg:x="-92.954cm" svg:y="71.578cm">
            <draw:text-box>
              <text:p><text:span text:style-name="T32">Create/</text:span><text:span text:style-name="T32">update</text:span><text:span text:style-name="T32"><text:line-break/></text:span><text:span text:style-name="T32">models</text:span></text:p>
            </draw:text-box>
          </draw:frame>
        </draw:g>
        <draw:g draw:style-name="gr31">
          <draw:custom-shape draw:style-name="gr347" draw:text-style-name="P90"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1"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3"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255cm" svg:height="0.248cm" svg:x="-100.65cm" svg:y="83.496cm" svg:viewBox="0 0 256 249" draw:points="0,41 38,4 126,92 218,0 256,37 163,130 245,210 206,249 126,168 47,245 11,206 88,130">
                <draw:glue-point draw:id="4" svg:x="-0.04cm" svg:y="0.329cm"/>
                <text:p/>
              </draw:polygon>
              <draw:custom-shape draw:style-name="gr355" draw:text-style-name="P93"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6" draw:text-style-name="P94"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7" draw:text-style-name="P95"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96" xml:id="id284" draw:id="id284"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5" draw:id="id285"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6" draw:id="id286"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5cm" svg:y1="75.144cm" svg:x2="-115.355cm" svg:y2="75.931cm" draw:start-shape="id284" draw:start-glue-point="8" draw:end-shape="id285" draw:end-glue-point="0" svg:d="M-115355 75144v787" svg:viewBox="0 0 1 788">
            <text:p/>
          </draw:connector>
          <draw:connector draw:style-name="gr360" draw:text-style-name="P97" draw:layer="layout" draw:type="line" svg:x1="-115.355cm" svg:y1="76.838cm" svg:x2="-115.355cm" svg:y2="77.647cm" draw:start-shape="id285" draw:start-glue-point="8" draw:end-shape="id286" draw:end-glue-point="4" svg:d="M-115355 76838v809" svg:viewBox="0 0 1 810">
            <text:p/>
          </draw:connector>
          <draw:custom-shape draw:style-name="gr361" draw:text-style-name="P96" xml:id="id287" draw:id="id287"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88" draw:id="id288"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6" xml:id="id289" draw:id="id289"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3cm" svg:y1="75.147cm" svg:x2="-110.363cm" svg:y2="75.931cm" draw:start-shape="id287" draw:start-glue-point="8" draw:end-shape="id288" draw:end-glue-point="0" svg:d="M-110363 75147v784" svg:viewBox="0 0 1 785">
            <text:p/>
          </draw:connector>
          <draw:connector draw:style-name="gr360" draw:text-style-name="P97" draw:layer="layout" draw:type="line" svg:x1="-110.363cm" svg:y1="76.838cm" svg:x2="-110.363cm" svg:y2="77.649cm" draw:start-shape="id288" draw:start-glue-point="8" draw:end-shape="id289" draw:end-glue-point="4" svg:d="M-110363 76838v811" svg:viewBox="0 0 1 812">
            <text:p/>
          </draw:connector>
          <draw:connector draw:style-name="gr360" draw:text-style-name="P97" draw:layer="layout" draw:type="line" svg:x1="-114.848cm" svg:y1="74.692cm" svg:x2="-110.871cm" svg:y2="74.694cm" draw:start-shape="id284" draw:start-glue-point="10" draw:end-shape="id287" draw:end-glue-point="6" svg:d="M-114848 74692l3977 2" svg:viewBox="0 0 3978 3">
            <text:p/>
          </draw:connector>
          <draw:connector draw:style-name="gr360" draw:text-style-name="P97" draw:layer="layout" draw:type="line" svg:x1="-114.848cm" svg:y1="76.385cm" svg:x2="-110.871cm" svg:y2="76.385cm" draw:start-shape="id285" draw:start-glue-point="10" draw:end-shape="id288" draw:end-glue-point="6" svg:d="M-114848 76385h3977" svg:viewBox="0 0 3978 1">
            <text:p/>
          </draw:connector>
          <draw:g draw:style-name="gr23">
            <svg:title>TexMaths</svg:title>
            <svg:desc>14§display§\lambda_{X^{1}S^{2}}§svg§600§FALSE§</svg:desc>
            <draw:path draw:style-name="gr363" draw:text-style-name="P98"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3" draw:text-style-name="P98"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3" draw:text-style-name="P98" draw:layer="layout" svg:width="0.068cm" svg:height="0.11cm" svg:x="-108.942cm" svg:y="75.389cm" svg:viewBox="0 0 69 111" svg:d="M44 5c0-5-1-5-7-5-11 11-31 11-34 11h-3v7h3c4 0 14-1 24-4v83c0 5 0 8-17 8h-8v6c9 0 25 0 34 0s24 0 33 0v-6h-8c-17 0-17-3-17-8z">
              <text:p/>
            </draw:path>
            <draw:path draw:style-name="gr363" draw:text-style-name="P98"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3" draw:text-style-name="P98"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3" draw:text-style-name="P98"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086cm" svg:height="0.155cm" svg:x="-113.076cm" svg:y="74.24cm" svg:viewBox="0 0 87 156" svg:d="M53 7c0-7-1-7-7-7-15 15-36 15-46 15v9c5 0 21 0 34-8v121c0 7 0 10-23 10h-9v9c4 0 34-2 42-2 7 0 37 2 43 2v-9h-10c-24 0-24-3-24-10z">
              <text:p/>
            </draw:path>
            <draw:path draw:style-name="gr363" draw:text-style-name="P98"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3" draw:text-style-name="P98"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085cm" svg:height="0.154cm" svg:x="-113.076cm" svg:y="75.967cm" svg:viewBox="0 0 86 155" svg:d="M53 7c0-7-1-7-7-7-15 15-36 15-46 15v9c5 0 21 0 34-8v120c0 8 0 11-23 11h-9v8c4 0 33-1 42-1 7 0 37 1 42 1v-8h-9c-24 0-24-3-24-11z">
              <text:p/>
            </draw:path>
            <draw:path draw:style-name="gr363" draw:text-style-name="P98"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3" draw:text-style-name="P98"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086cm" svg:height="0.154cm" svg:x="-115.427cm" svg:y="74.481cm" svg:viewBox="0 0 87 155" svg:d="M53 7c0-7 0-7-7-7-15 15-36 15-46 15v9c5 0 21 0 34-8v120c0 8 0 11-23 11h-9v8c4 0 34-1 42-1 7 0 37 1 43 1v-8h-10c-24 0-24-3-24-11z">
              <text:p/>
            </draw:path>
            <draw:path draw:style-name="gr363" draw:text-style-name="P98"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7cm" svg:y="74.792cm" svg:viewBox="0 0 159 12" svg:d="M150 12c3 0 9 0 9-6s-6-6-9-6h-141c-4 0-9 0-9 6s5 6 9 6z">
              <text:p/>
            </draw:path>
            <draw:path draw:style-name="gr363" draw:text-style-name="P98"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3" draw:text-style-name="P98"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086cm" svg:height="0.154cm" svg:x="-115.379cm" svg:y="76.178cm" svg:viewBox="0 0 87 155" svg:d="M53 7c0-7 0-7-7-7-15 15-36 15-46 15v9c5 0 21 0 34-8v120c0 8 0 11-23 11h-9v8c4 0 34-1 42-1 7 0 37 1 43 1v-8h-10c-24 0-24-3-24-11z">
              <text:p/>
            </draw:path>
            <draw:path draw:style-name="gr363" draw:text-style-name="P98"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05cm" svg:y="76.489cm" svg:viewBox="0 0 159 12" svg:d="M150 12c3 0 9 0 9-6s-6-6-9-6h-141c-4 0-9 0-9 6s5 6 9 6z">
              <text:p/>
            </draw:path>
            <draw:path draw:style-name="gr363" draw:text-style-name="P98"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3" draw:text-style-name="P98"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5.41cm" svg:y="77.893cm" svg:viewBox="0 0 87 155" svg:d="M53 7c0-7-1-7-7-7-15 15-36 15-46 15v9c5 0 21 0 34-8v120c0 8 0 11-23 11h-9v8c4 0 34-1 42-1 7 0 37 1 43 1v-8h-10c-24 0-24-3-24-11z">
              <text:p/>
            </draw:path>
            <draw:path draw:style-name="gr363" draw:text-style-name="P98"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4cm" svg:y="78.205cm" svg:viewBox="0 0 159 12" svg:d="M150 12c3 0 9 0 9-6s-6-6-9-6h-141c-4 0-9 0-9 6s5 6 9 6z">
              <text:p/>
            </draw:path>
            <draw:path draw:style-name="gr363" draw:text-style-name="P98"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3" draw:text-style-name="P98"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3" draw:text-style-name="P98" draw:layer="layout" svg:width="0.085cm" svg:height="0.154cm" svg:x="-110.269cm" svg:y="74.483cm" svg:viewBox="0 0 86 155" svg:d="M53 7c0-7 0-7-7-7-15 15-36 15-46 15v9c5 0 21 0 34-8v120c0 8 0 11-23 11h-9v8c4 0 33-1 42-1 7 0 37 1 42 1v-8h-9c-24 0-24-3-24-11z">
              <text:p/>
            </draw:path>
            <draw:path draw:style-name="gr363" draw:text-style-name="P98"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3" draw:text-style-name="P98"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3" draw:text-style-name="P98" draw:layer="layout" svg:width="0.085cm" svg:height="0.154cm" svg:x="-110.223cm" svg:y="76.178cm" svg:viewBox="0 0 86 155" svg:d="M53 7c0-7 0-7-7-7-15 15-36 15-46 15v9c5 0 21 0 34-8v120c0 8 0 11-23 11h-9v8c4 0 33-1 42-1 7 0 37 1 42 1v-8h-9c-24 0-24-3-24-11z">
              <text:p/>
            </draw:path>
            <draw:path draw:style-name="gr363" draw:text-style-name="P98"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3" draw:text-style-name="P98"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0.252cm" svg:y="77.893cm" svg:viewBox="0 0 87 155" svg:d="M53 7c0-7-1-7-7-7-15 15-36 15-46 15v9c5 0 21 0 34-8v120c0 8 0 11-23 11h-9v8c4 0 34-1 42-1 7 0 37 1 43 1v-8h-10c-24 0-24-3-24-11z">
              <text:p/>
            </draw:path>
            <draw:path draw:style-name="gr363" draw:text-style-name="P98"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1" draw:text-style-name="P96" xml:id="id291" draw:id="id291"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96" xml:id="id290" draw:id="id290"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92" draw:id="id292"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9cm" svg:y1="69.615cm" svg:x2="-115.359cm" svg:y2="68.829cm" draw:start-shape="id290" draw:start-glue-point="4" draw:end-shape="id291" draw:end-glue-point="8" svg:d="M-115359 69615v-786" svg:viewBox="0 0 1 787">
            <text:p/>
          </draw:connector>
          <draw:connector draw:style-name="gr360" draw:text-style-name="P97" draw:layer="layout" draw:type="line" svg:x1="-115.359cm" svg:y1="71.329cm" svg:x2="-115.359cm" svg:y2="70.521cm" draw:start-shape="id292" draw:start-glue-point="4" draw:end-shape="id290" draw:end-glue-point="8" svg:d="M-115359 71329v-808" svg:viewBox="0 0 1 809">
            <text:p/>
          </draw:connector>
          <draw:custom-shape draw:style-name="gr365" draw:text-style-name="P96" xml:id="id294" draw:id="id294"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3" draw:id="id293"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5" draw:id="id295"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6cm" svg:y1="69.615cm" svg:x2="-110.366cm" svg:y2="68.829cm" draw:start-shape="id293" draw:start-glue-point="4" draw:end-shape="id294" draw:end-glue-point="8" svg:d="M-110366 69615v-786" svg:viewBox="0 0 1 787">
            <text:p/>
          </draw:connector>
          <draw:connector draw:style-name="gr360" draw:text-style-name="P97" draw:layer="layout" draw:type="line" svg:x1="-110.366cm" svg:y1="71.332cm" svg:x2="-110.366cm" svg:y2="70.521cm" draw:start-shape="id295" draw:start-glue-point="4" draw:end-shape="id293" draw:end-glue-point="8" svg:d="M-110366 71332v-811" svg:viewBox="0 0 1 812">
            <text:p/>
          </draw:connector>
          <draw:connector draw:style-name="gr360" draw:text-style-name="P97" draw:layer="layout" draw:type="line" svg:x1="-114.851cm" svg:y1="71.784cm" svg:x2="-110.875cm" svg:y2="71.785cm" draw:start-shape="id292" draw:start-glue-point="10" draw:end-shape="id295" draw:end-glue-point="6" svg:d="M-114851 71784l3976 1" svg:viewBox="0 0 3977 2">
            <text:p/>
          </draw:connector>
          <draw:connector draw:style-name="gr360" draw:text-style-name="P97" draw:layer="layout" draw:type="line" svg:x1="-114.851cm" svg:y1="70.068cm" svg:x2="-110.875cm" svg:y2="70.068cm" draw:start-shape="id290" draw:start-glue-point="10" draw:end-shape="id293" draw:end-glue-point="6" svg:d="M-114851 70068h3976" svg:viewBox="0 0 3977 1">
            <text:p/>
          </draw:connector>
          <draw:g draw:style-name="gr23">
            <svg:title>TexMaths</svg:title>
            <svg:desc>14§display§X_{t-1}^{2}§svg§600§FALSE§</svg:desc>
            <draw:path draw:style-name="gr363" draw:text-style-name="P98"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1cm" svg:y="70.171cm" svg:viewBox="0 0 159 12" svg:d="M150 12c3 0 9 0 9-6s-6-6-9-6h-141c-4 0-9 0-9 6s5 6 9 6z">
              <text:p/>
            </draw:path>
            <draw:path draw:style-name="gr363" draw:text-style-name="P98"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3" draw:text-style-name="P98"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7cm" svg:y="68.495cm" svg:viewBox="0 0 159 12" svg:d="M150 12c3 0 9 0 9-6s-6-6-9-6h-141c-4 0-9 0-9 6s5 6 9 6z">
              <text:p/>
            </draw:path>
            <draw:path draw:style-name="gr363" draw:text-style-name="P98"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3" draw:text-style-name="P98"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3" draw:text-style-name="P98"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3" draw:text-style-name="P98"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4" draw:text-style-name="P96" xml:id="id296" draw:id="id296"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97" draw:id="id297"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4.358cm" svg:y1="73.522cm" svg:x2="-115.355cm" svg:y2="74.24cm" draw:start-shape="id296" draw:start-glue-point="7" draw:end-shape="id284" draw:end-glue-point="4" svg:d="M-114358 73522l-997 718" svg:viewBox="0 0 998 719">
            <text:p/>
          </draw:connector>
          <draw:connector draw:style-name="gr360" draw:text-style-name="P97" draw:layer="layout" draw:type="line" svg:x1="-114.358cm" svg:y1="72.88cm" svg:x2="-115.359cm" svg:y2="72.238cm" draw:start-shape="id296" draw:start-glue-point="5" draw:end-shape="id292" draw:end-glue-point="8" svg:d="M-114358 72880l-1001-642" svg:viewBox="0 0 1002 643">
            <text:p/>
          </draw:connector>
          <draw:connector draw:style-name="gr360" draw:text-style-name="P97" draw:layer="layout" draw:type="line" svg:x1="-111.36cm" svg:y1="73.523cm" svg:x2="-110.723cm" svg:y2="74.372cm" draw:start-shape="id297" draw:start-glue-point="9" draw:end-shape="id287" draw:end-glue-point="5" svg:d="M-111360 73523l637 849" svg:viewBox="0 0 638 850">
            <text:p/>
          </draw:connector>
          <draw:connector draw:style-name="gr360" draw:text-style-name="P97" draw:layer="layout" draw:type="line" svg:x1="-111.36cm" svg:y1="72.88cm" svg:x2="-110.726cm" svg:y2="72.106cm" draw:start-shape="id297" draw:start-glue-point="11" draw:end-shape="id295" draw:end-glue-point="7" svg:d="M-111360 72880l634-774" svg:viewBox="0 0 635 775">
            <text:p/>
          </draw:connector>
          <draw:connector draw:style-name="gr360" draw:text-style-name="P97" draw:layer="layout" draw:type="line" svg:x1="-113.49cm" svg:y1="73.201cm" svg:x2="-112.228cm" svg:y2="73.202cm" draw:start-shape="id296" draw:start-glue-point="10" draw:end-shape="id297" draw:end-glue-point="6" svg:d="M-113490 73201l1262 1" svg:viewBox="0 0 1263 2">
            <text:p/>
          </draw:connector>
          <draw:g draw:style-name="gr23">
            <svg:title>TexMaths</svg:title>
            <svg:desc>14§display§D_{t-1}§svg§600§FALSE§</svg:desc>
            <draw:path draw:style-name="gr363" draw:text-style-name="P98"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3" draw:text-style-name="P98"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3.913cm" svg:y="73.258cm" svg:viewBox="0 0 159 12" svg:d="M150 12c3 0 9 0 9-6s-6-6-9-6h-141c-4 0-9 0-9 6s5 6 9 6z">
              <text:p/>
            </draw:path>
            <draw:path draw:style-name="gr363" draw:text-style-name="P98"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3" draw:text-style-name="P98"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3" draw:text-style-name="P98"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6" draw:text-style-name="P41" draw:layer="layout" draw:type="curve" svg:x1="-109.858cm" svg:y1="71.785cm" svg:x2="-109.855cm" svg:y2="76.384cm" draw:start-shape="id295" draw:start-glue-point="10" draw:end-shape="id288" svg:d="M-109858 71785c775 0 774 4599 3 4599" svg:viewBox="0 0 582 4600">
            <text:p/>
          </draw:connector>
          <draw:connector draw:style-name="gr366" draw:text-style-name="P41" draw:layer="layout" draw:type="curve" svg:x1="-109.855cm" svg:y1="74.694cm" svg:x2="-109.858cm" svg:y2="70.068cm" draw:start-shape="id287" draw:start-glue-point="10" draw:end-shape="id293" draw:end-glue-point="10" svg:d="M-109855 74694c771 0 772-4626-3-4626" svg:viewBox="0 0 582 4627">
            <text:p/>
          </draw:connector>
          <draw:connector draw:style-name="gr366" draw:text-style-name="P41" draw:layer="layout" draw:type="curve" svg:x1="-115.867cm" svg:y1="71.784cm" svg:x2="-115.863cm" svg:y2="76.385cm" draw:start-shape="id292" draw:start-glue-point="6" draw:end-shape="id285" draw:end-glue-point="6" svg:d="M-115867 71784c-769 0-771 4601 4 4601" svg:viewBox="0 0 582 4602">
            <text:p/>
          </draw:connector>
          <draw:connector draw:style-name="gr366" draw:text-style-name="P41" draw:layer="layout" draw:type="curve" svg:x1="-115.863cm" svg:y1="74.692cm" svg:x2="-115.867cm" svg:y2="70.068cm" draw:start-shape="id284" draw:start-glue-point="6" draw:end-shape="id290" draw:end-glue-point="6" svg:d="M-115863 74692c-775 0-773-4624-4-4624" svg:viewBox="0 0 582 4625">
            <text:p/>
          </draw:connector>
          <draw:g draw:style-name="gr23">
            <svg:title>TexMaths</svg:title>
            <svg:desc>14§display§\pi_{SS}^{2}§svg§600§FALSE§</svg:desc>
            <draw:path draw:style-name="gr363" draw:text-style-name="P98"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3" draw:text-style-name="P98"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3" draw:text-style-name="P98"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3" draw:text-style-name="P98"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3" draw:text-style-name="P98"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3" draw:text-style-name="P98"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3" draw:text-style-name="P98"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5cm" svg:y="71.875cm" svg:viewBox="0 0 159 12" svg:d="M150 12c3 0 9 0 9-6s-6-6-9-6h-141c-4 0-9 0-9 6s5 6 9 6z">
              <text:p/>
            </draw:path>
            <draw:path draw:style-name="gr363" draw:text-style-name="P98"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3" draw:text-style-name="P98"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3" draw:text-style-name="P98"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3" draw:text-style-name="P98"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3" draw:text-style-name="P98"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086cm" svg:height="0.155cm" svg:x="-110.874cm" svg:y="75.275cm" svg:viewBox="0 0 87 156" svg:d="M53 7c0-7 0-7-7-7-15 15-36 15-46 15v9c5 0 21 0 34-8v121c0 7 0 10-23 10h-9v9c4 0 34-2 42-2 7 0 37 2 43 2v-9h-10c-24 0-24-3-24-10z">
              <text:p/>
            </draw:path>
            <draw:path draw:style-name="gr363" draw:text-style-name="P98"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3" draw:text-style-name="P98"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3" draw:text-style-name="P98"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3" draw:text-style-name="P98"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3" draw:text-style-name="P98"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3" draw:text-style-name="P98"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3" draw:text-style-name="P98" draw:layer="layout" svg:width="0.068cm" svg:height="0.11cm" svg:x="-108.634cm" svg:y="70.912cm" svg:viewBox="0 0 69 111" svg:d="M44 5c0-5-1-5-7-5-11 11-31 11-34 11h-3v7h3c4 0 14-1 24-4v83c0 5 0 8-17 8h-8v6c9 0 25 0 33 0 10 0 24 0 34 0v-6h-8c-17 0-17-3-17-8z">
              <text:p/>
            </draw:path>
          </draw:g>
          <draw:frame draw:style-name="gr367" draw:text-style-name="P100" draw:layer="layout" svg:width="2.93cm" svg:height="1.096cm" draw:transform="rotate (1.5707963267949) translate (-108.336cm 77.328cm)">
            <draw:text-box>
              <text:p text:style-name="P99"><text:span text:style-name="T33">robot </text:span><text:span text:style-name="T33">1</text:span></text:p>
            </draw:text-box>
          </draw:frame>
          <draw:frame draw:style-name="gr367" draw:text-style-name="P101" draw:layer="layout" svg:width="2.93cm" svg:height="1.096cm" draw:transform="rotate (1.5707963267949) translate (-108.291cm 70.891cm)">
            <draw:text-box>
              <text:p text:style-name="P99"><text:span text:style-name="T34">robot </text:span><text:span text:style-name="T34">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8" draw:text-style-name="P90"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69"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0"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3"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8cm" svg:height="0.349cm" svg:x="-94.922cm" svg:y="94.33cm" svg:viewBox="0 0 359 350" draw:points="0,58 53,6 177,129 306,0 359,52 229,182 344,295 289,350 177,236 66,344 15,289 124,182">
                <draw:glue-point draw:id="4" svg:x="-0.04cm" svg:y="0.329cm"/>
                <text:p/>
              </draw:polygon>
              <draw:custom-shape draw:style-name="gr355" draw:text-style-name="P93"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1" draw:text-style-name="P90"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2" draw:text-style-name="P102"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3" draw:text-style-name="P41" draw:layer="layout" svg:width="6.626cm" svg:height="5.551cm" svg:x="-114.456cm" svg:y="91.543cm" svg:viewBox="0 0 6627 5552" draw:points="567,5552 527,4131 31,4131 0,1499 556,1499 567,0 6627,0 6627,5552">
            <text:p/>
          </draw:polygon>
          <draw:polygon draw:style-name="gr374" draw:text-style-name="P41" draw:layer="layout" svg:width="9.94cm" svg:height="9.345cm" svg:x="-115.862cm" svg:y="89.664cm" svg:viewBox="0 0 9941 9346" draw:points="54,9346 0,5962 473,5948 527,3337 68,3325 54,0 9941,0 9941,9346">
            <text:p/>
          </draw:polygon>
          <draw:custom-shape draw:style-name="gr375" draw:text-style-name="P102"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3"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1cm" svg:height="0.343cm" svg:x="-114.597cm" svg:y="94.137cm" svg:viewBox="0 0 352 344" draw:points="0,57 53,6 173,129 301,0 352,51 225,179 337,291 287,344 173,230 67,337 15,287 121,179">
                <draw:glue-point draw:id="4" svg:x="-0.04cm" svg:y="0.329cm"/>
                <text:p/>
              </draw:polygon>
              <draw:custom-shape draw:style-name="gr355" draw:text-style-name="P93"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298" draw:id="id298" draw:layer="layout" svg:width="2.6cm" svg:height="1.4cm" svg:x="30.735cm" svg:y="58.2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34.472cm" svg:y1="60.781cm" svg:x2="32.035cm" svg:y2="59.634cm" draw:start-shape="id243" draw:start-glue-point="0" draw:end-shape="id298" draw:end-glue-point="6" svg:d="M34472 60781c0-859-2437-286-2437-1147" svg:viewBox="0 0 2438 1148">
          <text:p/>
        </draw:connector>
        <draw:g draw:style-name="gr31">
          <draw:rect draw:style-name="gr376" draw:text-style-name="P103" draw:layer="layout" svg:width="3.611cm" svg:height="7.25cm" svg:x="236.382cm" svg:y="-9.872cm">
            <text:p/>
          </draw:rect>
          <draw:rect draw:style-name="gr377" draw:text-style-name="P104" xml:id="id299" draw:id="id299" draw:layer="layout" svg:width="3.01cm" svg:height="1.489cm" svg:x="211.272cm" svg:y="-7.578cm">
            <text:p text:style-name="P5">stimulus</text:p>
          </draw:rect>
          <draw:rect draw:style-name="gr378" draw:text-style-name="P105" xml:id="id307" draw:id="id307" draw:layer="layout" svg:width="3.01cm" svg:height="1.489cm" svg:x="236.645cm" svg:y="-9.278cm">
            <text:p text:style-name="P5">trace</text:p>
          </draw:rect>
          <draw:connector draw:style-name="gr379" draw:text-style-name="P15" draw:layer="layout" draw:type="curve" svg:x1="214.282cm" svg:y1="-6.833cm" svg:x2="215.346cm" svg:y2="-6.833cm" draw:start-shape="id299" draw:start-glue-point="1" draw:end-shape="id300" draw:end-glue-point="3" svg:d="M214282-6833h1064" svg:viewBox="0 0 1065 1">
            <text:p/>
          </draw:connector>
          <draw:connector draw:style-name="gr380" draw:text-style-name="P15" draw:layer="layout" draw:type="curve" svg:x1="235.58cm" svg:y1="-6.833cm" svg:x2="236.645cm" svg:y2="-6.832cm" draw:start-shape="id301" draw:start-glue-point="1" draw:end-shape="id302" draw:end-glue-point="3" svg:d="M235580-6833c799 0 267 1 1065 1" svg:viewBox="0 0 1066 2">
            <text:p/>
          </draw:connector>
          <draw:rect draw:style-name="gr377" draw:text-style-name="P104" xml:id="id301" draw:id="id301" draw:layer="layout" svg:width="3.01cm" svg:height="1.489cm" svg:x="232.57cm" svg:y="-7.578cm">
            <text:p text:style-name="P5">brain</text:p>
          </draw:rect>
          <draw:rect draw:style-name="gr377" draw:text-style-name="P104" xml:id="id303" draw:id="id303" draw:layer="layout" svg:width="3.01cm" svg:height="1.489cm" svg:x="207.197cm" svg:y="-7.578cm">
            <text:p text:style-name="P5">Inner style<text:line-break/>environment</text:p>
          </draw:rect>
          <draw:connector draw:style-name="gr381" draw:text-style-name="P15" draw:layer="layout" draw:type="curve" svg:x1="210.207cm" svg:y1="-6.833cm" svg:x2="211.272cm" svg:y2="-6.833cm" draw:start-shape="id303" draw:start-glue-point="1" draw:end-shape="id299" draw:end-glue-point="3" svg:d="M210207-6833h1065" svg:viewBox="0 0 1066 1">
            <text:p/>
          </draw:connector>
          <draw:rect draw:style-name="gr377" draw:text-style-name="P104" xml:id="id300" draw:id="id300" draw:layer="layout" svg:width="3.01cm" svg:height="1.489cm" svg:x="215.346cm" svg:y="-7.578cm">
            <text:p text:style-name="P5">Target<text:line-break/>robot<text:line-break/>(Self)</text:p>
          </draw:rect>
          <draw:connector draw:style-name="gr382" draw:text-style-name="P15" draw:layer="layout" draw:type="curve" svg:x1="218.356cm" svg:y1="-6.833cm" svg:x2="219.496cm" svg:y2="-6.833cm" draw:start-shape="id300" draw:start-glue-point="1" draw:end-shape="id304" draw:end-glue-point="3" svg:d="M218356-6833h1140" svg:viewBox="0 0 1141 1">
            <text:p/>
          </draw:connector>
          <draw:rect draw:style-name="gr377" draw:text-style-name="P104" xml:id="id304" draw:id="id304" draw:layer="layout" svg:width="3.01cm" svg:height="1.489cm" svg:x="219.496cm" svg:y="-7.578cm">
            <text:p text:style-name="P5">Neuron<text:line-break/>network</text:p>
          </draw:rect>
          <draw:connector draw:style-name="gr383" draw:text-style-name="P15" draw:layer="layout" draw:type="curve" svg:x1="226.892cm" svg:y1="-6.833cm" svg:x2="228.625cm" svg:y2="-6.833cm" draw:start-shape="id305" draw:start-glue-point="1" draw:end-shape="id306" draw:end-glue-point="3" svg:d="M226892-6833h1733" svg:viewBox="0 0 1734 1">
            <text:p/>
          </draw:connector>
          <draw:custom-shape draw:name="comment box 7" draw:style-name="gr384" draw:text-style-name="P52" xml:id="id308" draw:id="id308"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7" draw:start-glue-point="1" draw:end-shape="id308" draw:end-glue-point="6" svg:d="M239655-8533c482 0 723-963 723-2889" svg:viewBox="0 0 724 2890">
            <text:p/>
          </draw:connector>
          <draw:rect draw:style-name="gr377" draw:text-style-name="P104" xml:id="id306" draw:id="id306" draw:layer="layout" svg:width="3.01cm" svg:height="1.489cm" svg:x="228.625cm" svg:y="-7.578cm">
            <text:p text:style-name="P5">Neural<text:line-break/>coding</text:p>
          </draw:rect>
          <draw:connector draw:style-name="gr385" draw:text-style-name="P15" draw:layer="layout" draw:type="curve" svg:x1="231.635cm" svg:y1="-6.833cm" svg:x2="232.57cm" svg:y2="-6.833cm" draw:start-shape="id306" draw:start-glue-point="1" draw:end-shape="id301" draw:end-glue-point="3" svg:d="M231635-6833h935" svg:viewBox="0 0 936 1">
            <text:p/>
          </draw:connector>
          <draw:rect draw:style-name="gr377" draw:text-style-name="P104" xml:id="id305" draw:id="id305" draw:layer="layout" svg:width="3.01cm" svg:height="1.489cm" svg:x="223.882cm" svg:y="-7.578cm">
            <text:p text:style-name="P5">Action<text:line-break/>potential<text:line-break/>train</text:p>
          </draw:rect>
          <draw:connector draw:style-name="gr386" draw:text-style-name="P15" draw:layer="layout" draw:type="curve" svg:x1="222.506cm" svg:y1="-6.833cm" svg:x2="223.882cm" svg:y2="-6.833cm" draw:start-shape="id304" draw:start-glue-point="1" draw:end-shape="id305"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8" draw:text-style-name="P105" xml:id="id313" draw:id="id313" draw:layer="layout" svg:width="3.01cm" svg:height="1.489cm" svg:x="236.645cm" svg:y="-4.277cm">
            <text:p text:style-name="P5">trace</text:p>
          </draw:rect>
          <draw:rect draw:style-name="gr378" draw:text-style-name="P105" xml:id="id302" draw:id="id302" draw:layer="layout" svg:width="3.01cm" svg:height="1.489cm" svg:x="236.645cm" svg:y="-7.577cm">
            <text:p text:style-name="P5">trace</text:p>
          </draw:rect>
          <draw:frame draw:style-name="gr387"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8" draw:text-style-name="P23" xml:id="id309" draw:id="id309" draw:layer="layout" svg:width="3.01cm" svg:height="1.489cm" svg:x="241.467cm" svg:y="-7.032cm">
            <text:p text:style-name="P5">Episode</text:p>
          </draw:rect>
          <draw:frame draw:style-name="gr389" draw:text-style-name="P38" xml:id="id314" draw:id="id314" draw:layer="layout" svg:width="2.775cm" svg:height="0.725cm" svg:x="236.375cm" svg:y="-9.938cm">
            <draw:text-box>
              <text:p>Trace group</text:p>
            </draw:text-box>
          </draw:frame>
          <draw:rect draw:style-name="gr390" draw:text-style-name="P106" draw:layer="layout" svg:width="4.727cm" svg:height="7.25cm" svg:x="245.382cm" svg:y="-9.872cm">
            <text:p/>
          </draw:rect>
          <draw:rect draw:style-name="gr391" draw:text-style-name="P107" xml:id="id310" draw:id="id310" draw:layer="layout" svg:width="4.153cm" svg:height="1.489cm" svg:x="245.645cm" svg:y="-9.278cm">
            <text:p text:style-name="P5">Modality<text:line-break/>(ie times-ranges)</text:p>
          </draw:rect>
          <draw:rect draw:style-name="gr392" draw:text-style-name="P108" xml:id="id312" draw:id="id312" draw:layer="layout" svg:width="4.153cm" svg:height="1.489cm" svg:x="245.645cm" svg:y="-4.277cm">
            <text:p text:style-name="P3">Modality</text:p>
          </draw:rect>
          <draw:rect draw:style-name="gr393" draw:text-style-name="P108" xml:id="id311" draw:id="id311" draw:layer="layout" svg:width="4.153cm" svg:height="1.489cm" svg:x="245.645cm" svg:y="-7.577cm">
            <text:p text:style-name="P3">Modality<text:line-break/>(ie time-positions)</text:p>
          </draw:rect>
          <draw:frame draw:style-name="gr387"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89" draw:text-style-name="P38" draw:layer="layout" svg:width="2.775cm" svg:height="0.725cm" svg:x="245.375cm" svg:y="-9.938cm">
            <draw:text-box>
              <text:p>modalities</text:p>
            </draw:text-box>
          </draw:frame>
          <draw:connector draw:style-name="gr394" draw:text-style-name="P15" draw:layer="layout" draw:type="curve" svg:x1="244.477cm" svg:y1="-6.287cm" svg:x2="245.645cm" svg:y2="-8.533cm" draw:start-shape="id309" draw:start-glue-point="1" draw:end-shape="id310" draw:end-glue-point="3" svg:d="M244477-6287c876 0 292-2246 1168-2246" svg:viewBox="0 0 1169 2247">
            <text:p/>
          </draw:connector>
          <draw:connector draw:style-name="gr395" draw:text-style-name="P15" draw:layer="layout" draw:type="curve" svg:x1="244.477cm" svg:y1="-6.287cm" svg:x2="245.645cm" svg:y2="-6.832cm" draw:start-shape="id309" draw:start-glue-point="1" draw:end-shape="id311" svg:d="M244477-6287c876 0 292-545 1168-545" svg:viewBox="0 0 1169 546">
            <text:p/>
          </draw:connector>
          <draw:connector draw:style-name="gr396" draw:text-style-name="P15" draw:layer="layout" draw:type="curve" svg:x1="244.477cm" svg:y1="-6.287cm" svg:x2="245.645cm" svg:y2="-3.532cm" draw:start-shape="id309" draw:start-glue-point="1" draw:end-shape="id312" draw:end-glue-point="3" svg:d="M244477-6287c876 0 292 2755 1168 2755" svg:viewBox="0 0 1169 2756">
            <text:p/>
          </draw:connector>
          <draw:connector draw:style-name="gr397" draw:text-style-name="P15" draw:layer="layout" draw:type="curve" svg:x1="239.655cm" svg:y1="-8.533cm" svg:x2="241.467cm" svg:y2="-6.287cm" draw:start-shape="id307" draw:start-glue-point="1" draw:end-shape="id309" draw:end-glue-point="3" svg:d="M239655-8533c1359 0 453 2246 1812 2246" svg:viewBox="0 0 1813 2247">
            <text:p/>
          </draw:connector>
          <draw:connector draw:style-name="gr398" draw:text-style-name="P15" draw:layer="layout" draw:type="curve" svg:x1="239.655cm" svg:y1="-6.832cm" svg:x2="241.467cm" svg:y2="-6.287cm" draw:start-shape="id302" draw:start-glue-point="1" draw:end-shape="id309" draw:end-glue-point="3" svg:d="M239655-6832c1359 0 453 545 1812 545" svg:viewBox="0 0 1813 546">
            <text:p/>
          </draw:connector>
          <draw:connector draw:style-name="gr399" draw:text-style-name="P15" draw:layer="layout" draw:type="curve" svg:x1="239.655cm" svg:y1="-3.532cm" svg:x2="241.467cm" svg:y2="-6.287cm" draw:start-shape="id313" draw:start-glue-point="1" draw:end-shape="id309" draw:end-glue-point="3" svg:d="M239655-3532c1359 0 453-2755 1812-2755" svg:viewBox="0 0 1813 2756">
            <text:p/>
          </draw:connector>
          <draw:custom-shape draw:name="comment box 8" draw:style-name="gr384" draw:text-style-name="P52" xml:id="id315" draw:id="id315"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4" draw:end-shape="id315" draw:end-glue-point="6" svg:d="M237762-9938c0-1458-3139-485-3139-1946" svg:viewBox="0 0 3140 1947">
            <text:p/>
          </draw:connector>
        </draw:g>
        <draw:rect draw:style-name="gr41" draw:text-style-name="P5" xml:id="id316" draw:id="id316" draw:layer="layout" svg:width="3.01cm" svg:height="1.489cm" svg:x="258.162cm" svg:y="-7.1cm">
          <text:p text:style-name="P5">Episode</text:p>
        </draw:rect>
        <draw:rect draw:style-name="gr41" draw:text-style-name="P5" xml:id="id317" draw:id="id317" draw:layer="layout" svg:width="3.01cm" svg:height="1.489cm" svg:x="258.162cm" svg:y="-3.883cm">
          <text:p text:style-name="P5">parts</text:p>
        </draw:rect>
        <draw:rect draw:style-name="gr41" draw:text-style-name="P5" xml:id="id321" draw:id="id321" draw:layer="layout" svg:width="3.01cm" svg:height="1.489cm" svg:x="261.697cm" svg:y="3.118cm">
          <text:p text:style-name="P5">action</text:p>
        </draw:rect>
        <draw:rect draw:style-name="gr41" draw:text-style-name="P5" xml:id="id322" draw:id="id322" draw:layer="layout" svg:width="3.01cm" svg:height="1.489cm" svg:x="261.67cm" svg:y="5.897cm">
          <text:p text:style-name="P5">property</text:p>
        </draw:rect>
        <draw:rect draw:style-name="gr41" draw:text-style-name="P5" xml:id="id319" draw:id="id319" draw:layer="layout" svg:width="3.01cm" svg:height="1.489cm" svg:x="258.162cm" svg:y="0.338cm">
          <text:p text:style-name="P5">time</text:p>
        </draw:rect>
        <draw:rect draw:style-name="gr41" draw:text-style-name="P5" xml:id="id318" draw:id="id318" draw:layer="layout" svg:width="3.01cm" svg:height="1.489cm" svg:x="254.728cm" svg:y="0.338cm">
          <text:p text:style-name="P5">location</text:p>
        </draw:rect>
        <draw:connector draw:style-name="gr400" draw:text-style-name="P15" draw:layer="layout" draw:type="curve" svg:x1="259.667cm" svg:y1="-5.611cm" svg:x2="259.667cm" svg:y2="-3.883cm" draw:start-shape="id316" draw:start-glue-point="2" draw:end-shape="id317" draw:end-glue-point="0" svg:d="M259667-5611v1728" svg:viewBox="0 0 1 1729">
          <text:p/>
        </draw:connector>
        <draw:connector draw:style-name="gr401" draw:text-style-name="P15" draw:layer="layout" draw:type="curve" svg:x1="259.667cm" svg:y1="-2.394cm" svg:x2="256.233cm" svg:y2="0.338cm" draw:start-shape="id317" draw:start-glue-point="2" draw:end-shape="id318" draw:end-glue-point="0" svg:d="M259667-2394c0 2050-3434 685-3434 2732" svg:viewBox="0 0 3435 2733">
          <text:p/>
        </draw:connector>
        <draw:connector draw:style-name="gr402" draw:text-style-name="P15" draw:layer="layout" draw:type="curve" svg:x1="259.667cm" svg:y1="-2.394cm" svg:x2="259.667cm" svg:y2="0.338cm" draw:start-shape="id317" draw:start-glue-point="2" draw:end-shape="id319" draw:end-glue-point="0" svg:d="M259667-2394v2732" svg:viewBox="0 0 1 2733">
          <text:p/>
        </draw:connector>
        <draw:connector draw:style-name="gr403" draw:text-style-name="P15" draw:layer="layout" draw:type="curve" svg:x1="263.136cm" svg:y1="1.827cm" svg:x2="263.202cm" svg:y2="3.118cm" draw:start-shape="id320" draw:end-shape="id321" draw:end-glue-point="0" svg:d="M263136 1827c0 969 66 324 66 1291" svg:viewBox="0 0 67 1292">
          <text:p/>
        </draw:connector>
        <draw:connector draw:style-name="gr404" draw:text-style-name="P15" draw:layer="layout" draw:type="curve" svg:x1="263.202cm" svg:y1="4.607cm" svg:x2="263.175cm" svg:y2="5.897cm" draw:start-shape="id321" draw:start-glue-point="2" draw:end-shape="id322" draw:end-glue-point="0" svg:d="M263202 4607c0 967-27 323-27 1290" svg:viewBox="0 0 28 1291">
          <text:p/>
        </draw:connector>
        <draw:rect draw:style-name="gr41" draw:text-style-name="P5" xml:id="id320" draw:id="id320" draw:layer="layout" svg:width="3.01cm" svg:height="1.489cm" svg:x="261.631cm" svg:y="0.338cm">
          <text:p text:style-name="P5">event</text:p>
        </draw:rect>
        <draw:connector draw:style-name="gr405" draw:text-style-name="P15" draw:layer="layout" draw:type="curve" svg:x1="259.667cm" svg:y1="-2.394cm" svg:x2="263.136cm" svg:y2="0.338cm" draw:start-shape="id317" draw:start-glue-point="2" draw:end-shape="id320"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6" draw:text-style-name="P15" draw:layer="layout" draw:type="curve" svg:x1="112.942cm" svg:y1="31.205cm" svg:x2="113.005cm" svg:y2="32.625cm" draw:start-shape="id267" draw:start-glue-point="2" draw:end-shape="id323" svg:d="M112942 31205c0 1065 63 355 63 1420" svg:viewBox="0 0 64 1421">
          <text:p/>
        </draw:connector>
        <draw:frame draw:style-name="gr135" draw:text-style-name="P41" draw:layer="layout" svg:width="18.252cm" svg:height="25.316cm" svg:x="105.306cm" svg:y="-33.832cm">
          <draw:image xlink:href="Pictures/10000000000002B2000003BD26BB6070.png" xlink:type="simple" xlink:show="embed" xlink:actuate="onLoad" draw:mime-type="image/png">
            <text:p/>
          </draw:image>
        </draw:frame>
        <draw:rect draw:style-name="gr407" draw:text-style-name="P105" draw:layer="layout" svg:width="3.439cm" svg:height="4.472cm" svg:x="-55.906cm" svg:y="15.663cm">
          <text:p/>
        </draw:rect>
        <draw:rect draw:style-name="gr408" draw:text-style-name="P109" xml:id="id325" draw:id="id325" draw:layer="layout" svg:width="2.256cm" svg:height="1.003cm" svg:x="-55.314cm" svg:y="18.923cm">
          <text:p text:style-name="P5"><text:span text:style-name="T35">S</text:span><text:span text:style-name="T35">u</text:span><text:span text:style-name="T35">pr</text:span><text:span text:style-name="T35">is</text:span><text:span text:style-name="T35">e </text:span><text:span text:style-name="T35"><text:line-break/></text:span><text:span text:style-name="T35">P</text:span><text:span text:style-name="T35">oi</text:span><text:span text:style-name="T35">se</text:span></text:p>
        </draw:rect>
        <draw:connector draw:style-name="gr409" draw:text-style-name="P15" draw:layer="layout" draw:type="curve" svg:x1="-54.186cm" svg:y1="17.186cm" svg:x2="-54.186cm" svg:y2="18.923cm" draw:start-shape="id324" draw:start-glue-point="2" draw:end-shape="id325" draw:end-glue-point="0" svg:d="M-54186 17186v1737" svg:viewBox="0 0 1 1738">
          <text:p/>
        </draw:connector>
        <draw:rect draw:style-name="gr410" draw:text-style-name="P110" xml:id="id324" draw:id="id324" draw:layer="layout" svg:width="2.726cm" svg:height="1.24cm" svg:x="-55.549cm" svg:y="15.946cm">
          <text:p text:style-name="P5"><text:span text:style-name="T26">compo</text:span><text:span text:style-name="T26">site</text:span><text:span text:style-name="T26"><text:line-break/></text:span><text:span text:style-name="T26">goal</text:span></text:p>
        </draw:rect>
        <draw:rect draw:style-name="gr388" draw:text-style-name="P111" draw:layer="layout" svg:width="2.256cm" svg:height="1.003cm" svg:x="-51.234cm" svg:y="17.569cm">
          <text:p text:style-name="P5"><text:span text:style-name="T17">Pl</text:span><text:span text:style-name="T17">a</text:span><text:span text:style-name="T17">n</text:span><text:span text:style-name="T17">ni</text:span><text:span text:style-name="T17">n</text:span><text:span text:style-name="T17">g</text:span></text:p>
        </draw:rect>
        <draw:rect draw:style-name="gr407" draw:text-style-name="P105" draw:layer="layout" svg:width="3.439cm" svg:height="4.472cm" svg:x="-47.912cm" svg:y="15.663cm">
          <text:p/>
        </draw:rect>
        <draw:rect draw:style-name="gr408" draw:text-style-name="P112" xml:id="id327" draw:id="id327" draw:layer="layout" svg:width="2.256cm" svg:height="1.003cm" svg:x="-47.32cm" svg:y="18.923cm">
          <text:p text:style-name="P5"><text:span text:style-name="T35">S</text:span><text:span text:style-name="T35">u</text:span><text:span text:style-name="T35">pr</text:span><text:span text:style-name="T35">is</text:span><text:span text:style-name="T35">e </text:span><text:span text:style-name="T35"><text:line-break/></text:span><text:span text:style-name="T35">re</text:span><text:span text:style-name="T35">d</text:span><text:span text:style-name="T35">uc</text:span><text:span text:style-name="T35">tio</text:span><text:span text:style-name="T35">n</text:span></text:p>
        </draw:rect>
        <draw:connector draw:style-name="gr409" draw:text-style-name="P15" draw:layer="layout" draw:type="curve" svg:x1="-46.192cm" svg:y1="17.186cm" svg:x2="-46.192cm" svg:y2="18.923cm" draw:start-shape="id326" draw:start-glue-point="2" draw:end-shape="id327" draw:end-glue-point="0" svg:d="M-46192 17186v1737" svg:viewBox="0 0 1 1738">
          <text:p/>
        </draw:connector>
        <draw:rect draw:style-name="gr410" draw:text-style-name="P110" xml:id="id326" draw:id="id326" draw:layer="layout" svg:width="2.726cm" svg:height="1.24cm" svg:x="-47.555cm" svg:y="15.946cm">
          <text:p text:style-name="P5"><text:span text:style-name="T26">co</text:span><text:span text:style-name="T26">mp</text:span><text:span text:style-name="T26">osi</text:span><text:span text:style-name="T26">te</text:span><text:span text:style-name="T26"><text:line-break/></text:span><text:span text:style-name="T26">act</text:span><text:span text:style-name="T26">ion</text:span></text:p>
        </draw:rect>
        <draw:custom-shape draw:style-name="gr411"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2" draw:text-style-name="P38" draw:layer="layout" svg:width="1.306cm" svg:height="0.725cm" svg:x="-43.754cm" svg:y="17.552cm">
          <draw:text-box>
            <text:p>plan</text:p>
          </draw:text-box>
        </draw:frame>
        <draw:custom-shape draw:style-name="gr411"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99cm" svg:height="0.725cm" svg:x="-58.208cm" svg:y="17.564cm">
          <draw:text-box>
            <text:p>Goal</text:p>
          </draw:text-box>
        </draw:frame>
        <draw:custom-shape draw:style-name="gr414" draw:text-style-name="P113"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4" draw:text-style-name="P113"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14" xml:id="id328" draw:id="id328"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5" draw:start-glue-point="1" draw:end-shape="id328" draw:end-glue-point="6" svg:d="M-53058 19424c890 0 1334-1368 1334-4105" svg:viewBox="0 0 1335 4106">
          <text:p/>
        </draw:connector>
        <draw:rect draw:style-name="gr408" draw:text-style-name="P115" xml:id="id329" draw:id="id329" draw:layer="layout" svg:width="2.714cm" svg:height="1.841cm" svg:x="-47.549cm" svg:y="23.785cm">
          <text:p text:style-name="P5"><text:span text:style-name="T36">Build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connector draw:style-name="gr415" draw:text-style-name="P15" draw:layer="layout" draw:type="curve" svg:x1="-46.192cm" svg:y1="23.785cm" svg:x2="-46.192cm" svg:y2="22.771cm" draw:start-shape="id329" draw:start-glue-point="0" draw:end-shape="id330" draw:end-glue-point="2" svg:d="M-46192 23785v-1014" svg:viewBox="0 0 1 1015">
          <text:p/>
        </draw:connector>
        <draw:rect draw:style-name="gr408" draw:text-style-name="P115" xml:id="id330" draw:id="id330" draw:layer="layout" svg:width="2.714cm" svg:height="1.841cm" svg:x="-47.549cm" svg:y="20.93cm">
          <text:p text:style-name="P5"><text:span text:style-name="T36">Lea</text:span><text:span text:style-name="T36">rnin</text:span><text:span text:style-name="T36">g </text:span><text:span text:style-name="T36">by </text:span><text:span text:style-name="T36"><text:line-break/></text:span><text:span text:style-name="T36">de</text:span><text:span text:style-name="T36">mo</text:span><text:span text:style-name="T36">nstr</text:span><text:span text:style-name="T36">atio</text:span><text:span text:style-name="T36">n</text:span></text:p>
        </draw:rect>
        <draw:connector draw:style-name="gr416" draw:text-style-name="P15" draw:layer="layout" draw:type="curve" svg:x1="-46.192cm" svg:y1="20.93cm" svg:x2="-46.192cm" svg:y2="19.926cm" draw:start-shape="id330" draw:start-glue-point="0" draw:end-shape="id327" draw:end-glue-point="2" svg:d="M-46192 20930v-1004" svg:viewBox="0 0 1 1005">
          <text:p/>
        </draw:connector>
        <draw:rect draw:style-name="gr408" draw:text-style-name="P115" xml:id="id331" draw:id="id331" draw:layer="layout" svg:width="2.714cm" svg:height="1.841cm" svg:x="-47.549cm" svg:y="26.586cm">
          <text:p text:style-name="P5"><text:span text:style-name="T36">improv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rect draw:style-name="gr408" draw:text-style-name="P115" draw:layer="layout" svg:width="2.714cm" svg:height="1.841cm" svg:x="-49.606cm" svg:y="29.466cm">
          <text:p text:style-name="P5"><text:span text:style-name="T36">Clustering</text:span><text:span text:style-name="T36"><text:line-break/></text:span><text:span text:style-name="T36">then training</text:span><text:span text:style-name="T36"><text:line-break/></text:span><text:span text:style-name="T36">forecasting</text:span></text:p>
        </draw:rect>
        <draw:connector draw:style-name="gr417" draw:text-style-name="P15" draw:layer="layout" draw:type="curve" svg:x1="-46.192cm" svg:y1="26.586cm" svg:x2="-46.192cm" svg:y2="25.626cm" draw:start-shape="id331" draw:start-glue-point="0" draw:end-shape="id329" draw:end-glue-point="2" svg:d="M-46192 26586v-960" svg:viewBox="0 0 1 961">
          <text:p/>
        </draw:connector>
        <draw:connector draw:style-name="gr418" draw:text-style-name="P15" draw:layer="layout" draw:type="curve" svg:x1="-47.406cm" svg:y1="29.466cm" svg:x2="-46.192cm" svg:y2="28.427cm" draw:end-shape="id331" draw:end-glue-point="2" svg:d="M-47406 29466c0-403 1214 116 1214-1039" svg:viewBox="0 0 1215 1040">
          <text:p/>
        </draw:connector>
        <draw:rect draw:style-name="gr408" draw:text-style-name="P115" xml:id="id332" draw:id="id332" draw:layer="layout" svg:width="2.714cm" svg:height="1.841cm" svg:x="-45.835cm" svg:y="29.484cm">
          <text:p text:style-name="P5"><text:span text:style-name="T36">Using KF</text:span><text:span text:style-name="T36"><text:line-break/></text:span><text:span text:style-name="T36">in predictions</text:span></text:p>
        </draw:rect>
        <draw:connector draw:style-name="gr419" draw:text-style-name="P15" draw:layer="layout" draw:type="curve" svg:x1="-44.478cm" svg:y1="29.484cm" svg:x2="-46.192cm" svg:y2="28.427cm" draw:start-shape="id332" draw:start-glue-point="0" draw:end-shape="id331"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8" draw:text-style-name="P23" xml:id="id333" draw:id="id333" draw:layer="layout" svg:width="4.06cm" svg:height="1.64cm" svg:x="-25.434cm" svg:y="0.57cm">
          <text:p text:style-name="P5">Default biological <text:line-break/>goals</text:p>
        </draw:rect>
        <draw:connector draw:style-name="gr420" draw:text-style-name="P15" draw:layer="layout" draw:type="curve" svg:x1="-23.404cm" svg:y1="2.21cm" svg:x2="-30.212cm" svg:y2="4.909cm" draw:start-shape="id333" draw:start-glue-point="2" draw:end-shape="id334" svg:d="M-23404 2210c0 2025-6808 676-6808 2699" svg:viewBox="0 0 6809 2700">
          <text:p/>
        </draw:connector>
        <draw:connector draw:style-name="gr421" draw:text-style-name="P15" draw:layer="layout" draw:type="curve" svg:x1="-23.404cm" svg:y1="2.21cm" svg:x2="-25.726cm" svg:y2="4.925cm" draw:start-shape="id333" draw:start-glue-point="2" draw:end-shape="id335" svg:d="M-23404 2210c0 2037-2322 680-2322 2715" svg:viewBox="0 0 2323 2716">
          <text:p/>
        </draw:connector>
        <draw:rect draw:style-name="gr37" draw:text-style-name="P116" xml:id="id334" draw:id="id334" draw:layer="layout" svg:width="3.177cm" svg:height="1.897cm" svg:x="-31.801cm" svg:y="4.909cm">
          <text:p text:style-name="P8"><text:span text:style-name="T5">Sur</text:span><text:span text:style-name="T5">pris</text:span><text:span text:style-name="T5">e </text:span><text:span text:style-name="T5">poi</text:span><text:span text:style-name="T5">se</text:span><text:span text:style-name="T5"><text:line-break/></text:span><text:span text:style-name="T5">(ke</text:span><text:span text:style-name="T5">epi</text:span><text:span text:style-name="T5">ng </text:span><text:span text:style-name="T5">sur</text:span><text:span text:style-name="T5">pris</text:span><text:span text:style-name="T5">e</text:span><text:span text:style-name="T5"><text:line-break/></text:span><text:span text:style-name="T5">bel</text:span><text:span text:style-name="T5">ow </text:span><text:span text:style-name="T5">a </text:span><text:span text:style-name="T5">tole</text:span><text:span text:style-name="T5">ran</text:span><text:span text:style-name="T5">ce)</text:span></text:p>
        </draw:rect>
        <draw:rect draw:style-name="gr38" draw:text-style-name="P4" xml:id="id335" draw:id="id335" draw:layer="layout" svg:width="3.67cm" svg:height="1.892cm" svg:x="-27.561cm" svg:y="4.925cm">
          <text:p text:style-name="P5"><text:span text:style-name="T2">Ho</text:span><text:span text:style-name="T2">me</text:span><text:span text:style-name="T2">ost</text:span><text:span text:style-name="T2">asi</text:span><text:span text:style-name="T2">s</text:span><text:span text:style-name="T2"><text:line-break/></text:span><text:span text:style-name="T2">(ke</text:span><text:span text:style-name="T2">epi</text:span><text:span text:style-name="T2">ng </text:span><text:span text:style-name="T2">the </text:span><text:span text:style-name="T2">phy</text:span><text:span text:style-name="T2">sic</text:span><text:span text:style-name="T2">al</text:span><text:span text:style-name="T2"><text:line-break/></text:span><text:span text:style-name="T2">and </text:span><text:span text:style-name="T2">che</text:span><text:span text:style-name="T2">mic</text:span><text:span text:style-name="T2">al </text:span><text:span text:style-name="T2"><text:line-break/></text:span><text:span text:style-name="T2">con</text:span><text:span text:style-name="T2">diti</text:span><text:span text:style-name="T2">ons</text:span><text:span text:style-name="T2">, </text:span><text:span text:style-name="T2">bal</text:span><text:span text:style-name="T2">anc</text:span><text:span text:style-name="T2">ed)</text:span></text:p>
        </draw:rect>
        <draw:rect draw:style-name="gr292" draw:text-style-name="P35" xml:id="id336" draw:id="id336" draw:layer="layout" svg:width="2.3cm" svg:height="1cm" svg:x="45.707cm" svg:y="59.941cm">
          <text:p text:style-name="P5">Action<text:line-break/>types</text:p>
        </draw:rect>
        <draw:connector draw:style-name="gr422" draw:text-style-name="P15" draw:layer="layout" draw:type="curve" svg:x1="46.254cm" svg:y1="57.528cm" svg:x2="46.857cm" svg:y2="59.941cm" draw:start-shape="id231" draw:start-glue-point="2" draw:end-shape="id336" draw:end-glue-point="0" svg:d="M46254 57528c0 1810 603 604 603 2413" svg:viewBox="0 0 604 2414">
          <text:p/>
        </draw:connector>
        <draw:rect draw:style-name="gr292" draw:text-style-name="P35" xml:id="id338" draw:id="id338" draw:layer="layout" svg:width="2.3cm" svg:height="1cm" svg:x="41.538cm" svg:y="59.541cm">
          <text:p text:style-name="P5">Plan</text:p>
        </draw:rect>
        <draw:rect draw:style-name="gr292" draw:text-style-name="P35" xml:id="id337" draw:id="id337" draw:layer="layout" svg:width="2.3cm" svg:height="1cm" svg:x="45.707cm" svg:y="61.675cm">
          <text:p text:style-name="P5">Suprise<text:line-break/>poise</text:p>
        </draw:rect>
        <draw:connector draw:style-name="gr423" draw:text-style-name="P15" draw:layer="layout" draw:type="curve" svg:x1="46.857cm" svg:y1="60.941cm" svg:x2="46.857cm" svg:y2="61.675cm" draw:start-shape="id336" draw:start-glue-point="2" draw:end-shape="id337" draw:end-glue-point="0" svg:d="M46857 60941v734" svg:viewBox="0 0 1 735">
          <text:p/>
        </draw:connector>
        <draw:connector draw:style-name="gr424" draw:text-style-name="P15" draw:layer="layout" draw:type="curve" svg:x1="46.254cm" svg:y1="57.528cm" svg:x2="42.688cm" svg:y2="59.541cm" draw:start-shape="id231" draw:start-glue-point="2" draw:end-shape="id338" draw:end-glue-point="0" svg:d="M46254 57528c0 1510-3566 504-3566 2013" svg:viewBox="0 0 3567 2014">
          <text:p/>
        </draw:connector>
        <draw:rect draw:style-name="gr292" draw:text-style-name="P35" xml:id="id339" draw:id="id339" draw:layer="layout" svg:width="2.3cm" svg:height="1cm" svg:x="63.329cm" svg:y="55.972cm">
          <text:p text:style-name="P5">Running<text:line-break/>plan</text:p>
        </draw:rect>
        <draw:connector draw:style-name="gr425" draw:text-style-name="P15" draw:layer="layout" draw:type="curve" svg:x1="60.954cm" svg:y1="54.528cm" svg:x2="64.479cm" svg:y2="55.972cm" draw:start-shape="id236" draw:start-glue-point="2" draw:end-shape="id339" draw:end-glue-point="0" svg:d="M60954 54528c0 1083 3525 361 3525 1444" svg:viewBox="0 0 3526 1445">
          <text:p/>
        </draw:connector>
        <draw:rect draw:style-name="gr292" draw:text-style-name="P35" xml:id="id340" draw:id="id340" draw:layer="layout" svg:width="2.3cm" svg:height="1cm" svg:x="60.945cm" svg:y="58.704cm">
          <text:p text:style-name="P5">Goal<text:line-break/>composite</text:p>
        </draw:rect>
        <draw:rect draw:style-name="gr292" draw:text-style-name="P35" xml:id="id341" draw:id="id341" draw:layer="layout" svg:width="2.3cm" svg:height="1cm" svg:x="65.867cm" svg:y="58.704cm">
          <text:p text:style-name="P5">Action<text:line-break/>composite</text:p>
        </draw:rect>
        <draw:connector draw:style-name="gr426" draw:text-style-name="P15" draw:layer="layout" draw:type="curve" svg:x1="63.245cm" svg:y1="59.204cm" svg:x2="65.867cm" svg:y2="59.204cm" draw:start-shape="id340" draw:start-glue-point="1" draw:end-shape="id341" draw:end-glue-point="3" svg:d="M63245 59204h2622" svg:viewBox="0 0 2623 1">
          <text:p text:style-name="P5">updates</text:p>
        </draw:connector>
        <draw:connector draw:style-name="gr427" draw:text-style-name="P15" draw:layer="layout" draw:type="curve" svg:x1="64.479cm" svg:y1="56.972cm" svg:x2="62.095cm" svg:y2="58.704cm" draw:start-shape="id339" draw:start-glue-point="2" draw:end-shape="id340" draw:end-glue-point="0" svg:d="M64479 56972c0 1299-2384 433-2384 1732" svg:viewBox="0 0 2385 1733">
          <text:p/>
        </draw:connector>
        <draw:connector draw:style-name="gr428" draw:text-style-name="P15" draw:layer="layout" draw:type="curve" svg:x1="64.479cm" svg:y1="56.972cm" svg:x2="67.017cm" svg:y2="58.704cm" draw:start-shape="id339" draw:start-glue-point="2" draw:end-shape="id341" draw:end-glue-point="0" svg:d="M64479 56972c0 1299 2538 433 2538 1732" svg:viewBox="0 0 2539 1733">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42" draw:id="id342" draw:layer="layout" svg:width="2.714cm" svg:height="1.895cm" svg:x="-22.366cm" svg:y="4.979cm">
          <text:p text:style-name="P5"><text:span text:style-name="T2">Epistemi</text:span><text:span text:style-name="T2">c </text:span><text:span text:style-name="T2"><text:line-break/></text:span><text:span text:style-name="T2">foraging</text:span><text:span text:style-name="T2"><text:line-break/></text:span><text:span text:style-name="T2">(seeking </text:span><text:span text:style-name="T2">env for </text:span><text:span text:style-name="T2"><text:line-break/></text:span><text:span text:style-name="T2">food </text:span><text:span text:style-name="T2">info)</text:span></text:p>
        </draw:rect>
        <draw:rect draw:style-name="gr39" draw:text-style-name="P31" xml:id="id343" draw:id="id343" draw:layer="layout" svg:width="2.714cm" svg:height="1.895cm" svg:x="-17.65cm" svg:y="5.008cm">
          <text:p text:style-name="P30"><text:span text:style-name="T16">All</text:span><text:span text:style-name="T16">os</text:span><text:span text:style-name="T16">ta</text:span><text:span text:style-name="T16">si</text:span><text:span text:style-name="T16">s</text:span><text:span text:style-name="T16"><text:line-break/></text:span><text:span text:style-name="T16">(e</text:span><text:span text:style-name="T16">ne</text:span><text:span text:style-name="T16">rg</text:span><text:span text:style-name="T16">y</text:span><text:span text:style-name="T16"><text:line-break/></text:span><text:span text:style-name="T16">ad</text:span><text:span text:style-name="T16">ju</text:span><text:span text:style-name="T16">st</text:span><text:span text:style-name="T16">m</text:span><text:span text:style-name="T16">nt</text:span><text:span text:style-name="T16">)</text:span></text:p>
        </draw:rect>
        <draw:connector draw:style-name="gr429" draw:text-style-name="P15" draw:layer="layout" draw:type="curve" svg:x1="-23.404cm" svg:y1="2.21cm" svg:x2="-21.009cm" svg:y2="4.979cm" draw:start-shape="id333" draw:start-glue-point="2" draw:end-shape="id342" draw:end-glue-point="0" svg:d="M-23404 2210c0 2077 2395 693 2395 2769" svg:viewBox="0 0 2396 2770">
          <text:p/>
        </draw:connector>
        <draw:connector draw:style-name="gr430" draw:text-style-name="P15" draw:layer="layout" draw:type="curve" svg:x1="-23.404cm" svg:y1="2.21cm" svg:x2="-16.293cm" svg:y2="5.008cm" draw:start-shape="id333" draw:start-glue-point="2" draw:end-shape="id343" draw:end-glue-point="0" svg:d="M-23404 2210c0 2098 7111 700 7111 2798" svg:viewBox="0 0 7112 2799">
          <text:p/>
        </draw:connector>
        <draw:rect draw:name="goal kinds 6" draw:style-name="gr388" draw:text-style-name="P23" xml:id="id344" draw:id="id344" draw:layer="layout" svg:width="4.06cm" svg:height="1.64cm" svg:x="-25.168cm" svg:y="10.138cm">
          <text:p text:style-name="P5">Biological <text:line-break/>goals that I know of</text:p>
        </draw:rect>
        <draw:connector draw:style-name="gr420" draw:text-style-name="P15" draw:layer="layout" draw:type="curve" svg:x1="-23.138cm" svg:y1="11.778cm" svg:x2="-26.517cm" svg:y2="14.393cm" draw:start-shape="id344" draw:start-glue-point="2" draw:end-shape="id345" draw:end-glue-point="0" svg:d="M-23138 11778c0 1962-3379 655-3379 2615" svg:viewBox="0 0 3380 2616">
          <text:p/>
        </draw:connector>
        <draw:connector draw:style-name="gr431" draw:text-style-name="P15" draw:layer="layout" draw:type="curve" svg:x1="-23.138cm" svg:y1="11.778cm" svg:x2="-29.881cm" svg:y2="14.393cm" draw:start-shape="id344" draw:start-glue-point="2" draw:end-shape="id346" draw:end-glue-point="0" svg:d="M-23138 11778c0 1962-6743 655-6743 2615" svg:viewBox="0 0 6744 2616">
          <text:p/>
        </draw:connector>
        <draw:connector draw:style-name="gr429" draw:text-style-name="P15" draw:layer="layout" draw:type="curve" svg:x1="-23.138cm" svg:y1="11.778cm" svg:x2="-19.79cm" svg:y2="14.393cm" draw:start-shape="id344" draw:start-glue-point="2" draw:end-shape="id347" draw:end-glue-point="0" svg:d="M-23138 11778c0 1962 3348 655 3348 2615" svg:viewBox="0 0 3349 2616">
          <text:p/>
        </draw:connector>
        <draw:connector draw:style-name="gr430" draw:text-style-name="P15" draw:layer="layout" draw:type="curve" svg:x1="-23.138cm" svg:y1="11.778cm" svg:x2="-16.427cm" svg:y2="14.393cm" draw:start-shape="id344" draw:start-glue-point="2" draw:end-shape="id348" draw:end-glue-point="0" svg:d="M-23138 11778c0 1962 6711 655 6711 2615" svg:viewBox="0 0 6712 2616">
          <text:p/>
        </draw:connector>
        <draw:rect draw:name="goal kinds 7" draw:style-name="gr388" draw:text-style-name="P23" xml:id="id384" draw:id="id384" draw:layer="layout" svg:width="4.06cm" svg:height="1.64cm" svg:x="-25.168cm" svg:y="10.138cm">
          <text:p text:style-name="P5">Biological <text:line-break/>actions</text:p>
        </draw:rect>
        <draw:rect draw:style-name="gr255" draw:text-style-name="P106" xml:id="id356" draw:id="id356" draw:layer="layout" svg:width="2.022cm" svg:height="1.04cm" svg:x="15.446cm" svg:y="98.421cm">
          <text:p text:style-name="P5">Control</text:p>
        </draw:rect>
        <draw:g draw:style-name="gr23">
          <draw:rect draw:style-name="gr432" draw:text-style-name="P106" draw:layer="layout" svg:width="2.022cm" svg:height="1.04cm" svg:x="-26.217cm" svg:y="99.337cm">
            <text:p text:style-name="P5">Action</text:p>
          </draw:rect>
          <draw:rect draw:style-name="gr433" draw:text-style-name="P106" xml:id="id349" draw:id="id349" draw:layer="layout" svg:width="4.3cm" svg:height="2.151cm" svg:x="-27.377cm" svg:y="98.226cm">
            <text:p text:style-name="P5">Control<text:line-break/>signal<text:line-break/>(generated by<text:line-break/>Flight controller)</text:p>
          </draw:rect>
          <draw:rect draw:style-name="gr433" draw:text-style-name="P106" xml:id="id351" draw:id="id351" draw:layer="layout" svg:width="2.022cm" svg:height="1.04cm" svg:x="-28.232cm" svg:y="103.515cm">
            <text:p text:style-name="P5">Goal gain</text:p>
          </draw:rect>
          <draw:rect draw:style-name="gr432" draw:text-style-name="P106" draw:layer="layout" svg:width="2.022cm" svg:height="1.04cm" svg:x="-26.217cm" svg:y="101.337cm">
            <text:p text:style-name="P5">Action</text:p>
          </draw:rect>
          <draw:rect draw:style-name="gr433" draw:text-style-name="P106" xml:id="id350" draw:id="id350" draw:layer="layout" svg:width="2.022cm" svg:height="1.04cm" svg:x="-26.217cm" svg:y="101.337cm">
            <text:p text:style-name="P5">Feedback</text:p>
          </draw:rect>
          <draw:rect draw:style-name="gr433" draw:text-style-name="P106" xml:id="id352" draw:id="id352" draw:layer="layout" svg:width="2.022cm" svg:height="1.04cm" svg:x="-24.19cm" svg:y="103.49cm">
            <text:p text:style-name="P5">Resource <text:line-break/>gain</text:p>
          </draw:rect>
          <draw:connector draw:style-name="gr434" draw:text-style-name="P15" draw:layer="layout" draw:type="curve" svg:x1="-25.227cm" svg:y1="100.377cm" svg:x2="-25.206cm" svg:y2="101.337cm" draw:start-shape="id349" draw:start-glue-point="2" draw:end-shape="id350" draw:end-glue-point="0" svg:d="M-25227 100377c0 720 21 240 21 960" svg:viewBox="0 0 22 961">
            <text:p/>
          </draw:connector>
          <draw:connector draw:style-name="gr435" draw:text-style-name="P15" draw:layer="layout" draw:type="curve" svg:x1="-25.206cm" svg:y1="102.377cm" svg:x2="-27.221cm" svg:y2="103.515cm" draw:start-shape="id350" draw:start-glue-point="2" draw:end-shape="id351" draw:end-glue-point="0" svg:d="M-25206 102377c0 853-2015 285-2015 1138" svg:viewBox="0 0 2016 1139">
            <text:p/>
          </draw:connector>
          <draw:connector draw:style-name="gr436" draw:text-style-name="P15" draw:layer="layout" draw:type="curve" svg:x1="-25.206cm" svg:y1="102.377cm" svg:x2="-23.179cm" svg:y2="103.49cm" draw:start-shape="id350" draw:start-glue-point="2" draw:end-shape="id352" draw:end-glue-point="0" svg:d="M-25206 102377c0 835 2027 279 2027 1113" svg:viewBox="0 0 2028 1114">
            <text:p/>
          </draw:connector>
          <draw:rect draw:style-name="gr433" draw:text-style-name="P106" xml:id="id353" draw:id="id353" draw:layer="layout" svg:width="2.022cm" svg:height="1.04cm" svg:x="-23.837cm" svg:y="105.651cm">
            <text:p text:style-name="P5">Battery</text:p>
          </draw:rect>
          <draw:connector draw:style-name="gr436" draw:text-style-name="P15" draw:layer="layout" draw:type="curve" svg:x1="-23.179cm" svg:y1="104.53cm" svg:x2="-22.826cm" svg:y2="105.651cm" draw:start-shape="id352" draw:start-glue-point="2" draw:end-shape="id353" draw:end-glue-point="0" svg:d="M-23179 104530c0 841 353 281 353 1121" svg:viewBox="0 0 354 1122">
            <text:p/>
          </draw:connector>
          <draw:rect draw:style-name="gr433" draw:text-style-name="P106" xml:id="id354" draw:id="id354" draw:layer="layout" svg:width="2.022cm" svg:height="1.04cm" svg:x="-30.196cm" svg:y="105.688cm">
            <text:p text:style-name="P5">From <text:line-break/>pose</text:p>
          </draw:rect>
          <draw:connector draw:style-name="gr436" draw:text-style-name="P15" draw:layer="layout" draw:type="curve" svg:x1="-27.221cm" svg:y1="104.555cm" svg:x2="-29.185cm" svg:y2="105.688cm" draw:start-shape="id351" draw:start-glue-point="2" draw:end-shape="id354" draw:end-glue-point="0" svg:d="M-27221 104555c0 850-1964 284-1964 1133" svg:viewBox="0 0 1965 1134">
            <text:p/>
          </draw:connector>
          <draw:rect draw:style-name="gr433" draw:text-style-name="P106" xml:id="id355" draw:id="id355" draw:layer="layout" svg:width="2.502cm" svg:height="1.583cm" svg:x="-27.241cm" svg:y="106.129cm">
            <text:p text:style-name="P5">From<text:line-break/>anomaly|<text:line-break/>reduction</text:p>
          </draw:rect>
          <draw:connector draw:style-name="gr436" draw:text-style-name="P15" draw:layer="layout" draw:type="curve" svg:x1="-27.221cm" svg:y1="104.556cm" svg:x2="-25.99cm" svg:y2="106.129cm" draw:end-shape="id355" draw:end-glue-point="0" svg:d="M-27221 104556c0 804 1231 18 1231 1573" svg:viewBox="0 0 1232 1574">
            <text:p/>
          </draw:connector>
        </draw:g>
        <draw:rect draw:style-name="gr41" draw:text-style-name="P5" xml:id="id364" draw:id="id364" draw:layer="layout" svg:width="2.434cm" svg:height="1.059cm" svg:x="17.411cm" svg:y="102.937cm">
          <text:p text:style-name="P5">behavior</text:p>
        </draw:rect>
        <draw:rect draw:style-name="gr255" draw:text-style-name="P106" xml:id="id359" draw:id="id359" draw:layer="layout" svg:width="2.022cm" svg:height="1.04cm" svg:x="27.053cm" svg:y="101.034cm">
          <text:p text:style-name="P5">Planing</text:p>
        </draw:rect>
        <draw:rect draw:style-name="gr255" draw:text-style-name="P106" xml:id="id446" draw:id="id446" draw:layer="layout" svg:width="2.022cm" svg:height="1.04cm" svg:x="29.798cm" svg:y="107.092cm">
          <text:p text:style-name="P5">Decision</text:p>
        </draw:rect>
        <draw:rect draw:style-name="gr41" draw:text-style-name="P5" xml:id="id357" draw:id="id357" draw:layer="layout" svg:width="2.064cm" svg:height="1.085cm" svg:x="14.199cm" svg:y="102.754cm">
          <text:p text:style-name="P5">open-loop</text:p>
        </draw:rect>
        <draw:connector draw:style-name="gr437" draw:text-style-name="P15" draw:layer="layout" draw:type="curve" svg:x1="16.457cm" svg:y1="99.461cm" svg:x2="15.231cm" svg:y2="102.754cm" draw:start-shape="id356" draw:start-glue-point="2" draw:end-shape="id357" draw:end-glue-point="0" svg:d="M16457 99461c0 824-307 1647-613 1647-307 0-613 823-613 1646" svg:viewBox="0 0 1227 3294">
          <text:p/>
        </draw:connector>
        <draw:rect draw:style-name="gr255" draw:text-style-name="P106" xml:id="id365" draw:id="id365" draw:layer="layout" svg:width="2.022cm" svg:height="1.04cm" svg:x="21.776cm" svg:y="102.207cm">
          <text:p text:style-name="P5">Attention</text:p>
        </draw:rect>
        <draw:rect draw:style-name="gr255" draw:text-style-name="P106" xml:id="id358" draw:id="id358" draw:layer="layout" svg:width="2.022cm" svg:height="1.04cm" svg:x="26.074cm" svg:y="103.745cm">
          <text:p text:style-name="P5">Motion<text:line-break/>planing</text:p>
        </draw:rect>
        <draw:connector draw:style-name="gr438" draw:text-style-name="P15" draw:layer="layout" draw:type="curve" svg:x1="27.085cm" svg:y1="103.745cm" svg:x2="28.064cm" svg:y2="102.074cm" draw:start-shape="id358" draw:start-glue-point="0" draw:end-shape="id359" draw:end-glue-point="2" svg:d="M27085 103745c0-1252 979-417 979-1671" svg:viewBox="0 0 980 1672">
          <text:p/>
        </draw:connector>
        <draw:rect draw:style-name="gr41" draw:text-style-name="P5" xml:id="id360" draw:id="id360" draw:layer="layout" svg:width="2.79cm" svg:height="0.955cm" svg:x="79.36cm" svg:y="44.135cm">
          <text:p text:style-name="P5">executive<text:line-break/>functions</text:p>
        </draw:rect>
        <draw:connector draw:style-name="gr439" draw:text-style-name="P15" draw:layer="layout" draw:type="curve" svg:x1="84.826cm" svg:y1="39.775cm" svg:x2="80.755cm" svg:y2="44.135cm" draw:start-shape="id201" draw:start-glue-point="2" draw:end-shape="id360" svg:d="M84826 39775c0 3270-4071 1090-4071 4360" svg:viewBox="0 0 4072 4361">
          <text:p/>
        </draw:connector>
        <draw:rect draw:style-name="gr41" draw:text-style-name="P5" xml:id="id361" draw:id="id361" draw:layer="layout" svg:width="2.79cm" svg:height="0.955cm" svg:x="79.382cm" svg:y="46.861cm">
          <text:p text:style-name="P5">Working<text:line-break/>memory</text:p>
        </draw:rect>
        <draw:connector draw:style-name="gr440" draw:text-style-name="P15" draw:layer="layout" draw:type="curve" svg:x1="80.755cm" svg:y1="45.09cm" svg:x2="80.777cm" svg:y2="46.861cm" draw:start-shape="id360" draw:start-glue-point="2" draw:end-shape="id361" draw:end-glue-point="0" svg:d="M80755 45090c0 1329 22 444 22 1771" svg:viewBox="0 0 23 1772">
          <text:p/>
        </draw:connector>
        <draw:rect draw:style-name="gr441" draw:text-style-name="P117" xml:id="id363" draw:id="id363" draw:layer="layout" svg:width="1.859cm" svg:height="0.972cm" svg:x="21.208cm" svg:y="97.838cm">
          <text:p text:style-name="P5"><text:span text:style-name="T36">Working</text:span><text:span text:style-name="T36"><text:line-break/></text:span><text:span text:style-name="T36">memory</text:span></text:p>
        </draw:rect>
        <draw:rect draw:style-name="gr255" draw:text-style-name="P106" xml:id="id366" draw:id="id366" draw:layer="layout" svg:width="2.022cm" svg:height="1.04cm" svg:x="25.567cm" svg:y="97.929cm">
          <text:p text:style-name="P5">Short term<text:line-break/>memory</text:p>
        </draw:rect>
        <draw:rect draw:style-name="gr442" draw:text-style-name="P118" xml:id="id362" draw:id="id362" draw:layer="layout" svg:width="1.859cm" svg:height="0.972cm" svg:x="20.302cm" svg:y="95.627cm">
          <text:p text:style-name="P5"><text:span text:style-name="T36">Ex</text:span><text:span text:style-name="T36">ec</text:span><text:span text:style-name="T36">uti</text:span><text:span text:style-name="T36">ve</text:span><text:span text:style-name="T36"><text:line-break/></text:span><text:span text:style-name="T36">fu</text:span><text:span text:style-name="T36">nc</text:span><text:span text:style-name="T36">tio</text:span><text:span text:style-name="T36">ns</text:span></text:p>
        </draw:rect>
        <draw:connector draw:style-name="gr443" draw:text-style-name="P15" draw:layer="layout" draw:type="curve" svg:x1="21.231cm" svg:y1="96.599cm" svg:x2="22.137cm" svg:y2="97.838cm" draw:start-shape="id362" draw:start-glue-point="2" draw:end-shape="id363" svg:d="M21231 96599c0 930 906 311 906 1239" svg:viewBox="0 0 907 1240">
          <text:p/>
        </draw:connector>
        <draw:connector draw:style-name="gr444" draw:text-style-name="P15" draw:layer="layout" draw:type="curve" svg:x1="21.231cm" svg:y1="96.599cm" svg:x2="16.457cm" svg:y2="98.421cm" draw:start-shape="id362" draw:start-glue-point="2" draw:end-shape="id356" svg:d="M21231 96599c0 1366-4774 456-4774 1822" svg:viewBox="0 0 4775 1823">
          <text:p/>
        </draw:connector>
        <draw:connector draw:style-name="gr445" draw:text-style-name="P15" draw:layer="layout" draw:type="curve" svg:x1="22.137cm" svg:y1="98.81cm" svg:x2="18.628cm" svg:y2="102.937cm" draw:start-shape="id363" draw:start-glue-point="2" draw:end-shape="id364" draw:end-glue-point="0" svg:d="M22137 98810c0 3096-3509 1033-3509 4127" svg:viewBox="0 0 3510 4128">
          <text:p/>
        </draw:connector>
        <draw:connector draw:style-name="gr446" draw:text-style-name="P15" draw:layer="layout" draw:type="curve" svg:x1="22.137cm" svg:y1="98.81cm" svg:x2="22.787cm" svg:y2="102.207cm" draw:start-shape="id363" draw:start-glue-point="2" draw:end-shape="id365" svg:d="M22137 98810c0 2548 650 850 650 3397" svg:viewBox="0 0 651 3398">
          <text:p/>
        </draw:connector>
        <draw:connector draw:style-name="gr447" draw:text-style-name="P15" draw:layer="layout" draw:type="curve" svg:x1="23.067cm" svg:y1="98.324cm" svg:x2="25.567cm" svg:y2="98.449cm" draw:start-shape="id363" draw:start-glue-point="1" draw:end-shape="id366" draw:end-glue-point="3" svg:d="M23067 98324c1875 0 625 125 2500 125" svg:viewBox="0 0 2501 126">
          <text:p/>
        </draw:connector>
        <draw:connector draw:style-name="gr448" draw:text-style-name="P15" draw:layer="layout" draw:type="curve" svg:x1="22.137cm" svg:y1="98.81cm" svg:x2="28.064cm" svg:y2="101.034cm" draw:start-shape="id363" draw:start-glue-point="2" draw:end-shape="id359" draw:end-glue-point="0" svg:d="M22137 98810c0 1668 5927 556 5927 2224" svg:viewBox="0 0 5928 2225">
          <text:p/>
        </draw:connector>
        <draw:rect draw:style-name="gr255" draw:text-style-name="P106" xml:id="id367" draw:id="id367" draw:layer="layout" svg:width="2.022cm" svg:height="1.04cm" svg:x="29.396cm" svg:y="104.739cm">
          <text:p text:style-name="P5">Motor<text:line-break/>planning</text:p>
        </draw:rect>
        <draw:connector draw:style-name="gr449" draw:text-style-name="P15" draw:layer="layout" draw:type="curve" svg:x1="30.407cm" svg:y1="104.739cm" svg:x2="28.064cm" svg:y2="102.074cm" draw:start-shape="id367" draw:start-glue-point="0" draw:end-shape="id359" draw:end-glue-point="2" svg:d="M30407 104739c0-1998-2343-666-2343-2665" svg:viewBox="0 0 2344 2666">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50" draw:text-style-name="P120" draw:layer="layout" svg:width="9.739cm" svg:height="2.221cm" svg:x="-96.545cm" svg:y="31.437cm">
            <draw:text-box>
              <text:p text:style-name="P119"><text:span text:style-name="T12">F</text:span><text:span text:style-name="T12">r</text:span><text:span text:style-name="T12">o</text:span><text:span text:style-name="T12">m</text:span><text:span text:style-name="T12"> </text:span><text:span text:style-name="T12">A</text:span><text:span text:style-name="T12"> </text:span><text:span text:style-name="T12">N</text:span><text:span text:style-name="T12">e</text:span><text:span text:style-name="T12">u</text:span><text:span text:style-name="T12">r</text:span><text:span text:style-name="T12">o</text:span><text:span text:style-name="T12">c</text:span><text:span text:style-name="T12">o</text:span><text:span text:style-name="T12">g</text:span><text:span text:style-name="T12">n</text:span><text:span text:style-name="T12">it</text:span><text:span text:style-name="T12">i</text:span><text:span text:style-name="T12">v</text:span><text:span text:style-name="T12">e </text:span><text:span text:style-name="T12">P</text:span><text:span text:style-name="T12">e</text:span><text:span text:style-name="T12">r</text:span><text:span text:style-name="T12">s</text:span><text:span text:style-name="T12">p</text:span><text:span text:style-name="T12">e</text:span><text:span text:style-name="T12">c</text:span><text:span text:style-name="T12">ti</text:span><text:span text:style-name="T12">v</text:span><text:span text:style-name="T12">e </text:span><text:span text:style-name="T12">o</text:span><text:span text:style-name="T12">n </text:span><text:span text:style-name="T12">t</text:span><text:span text:style-name="T12">h</text:span><text:span text:style-name="T12">e</text:span></text:p>
              <text:p text:style-name="P119"><text:span text:style-name="T12">F</text:span><text:span text:style-name="T12">o</text:span><text:span text:style-name="T12">r</text:span><text:span text:style-name="T12">m</text:span><text:span text:style-name="T12">s </text:span><text:span text:style-name="T12">a</text:span><text:span text:style-name="T12">n</text:span><text:span text:style-name="T12">d </text:span><text:span text:style-name="T12">F</text:span><text:span text:style-name="T12">u</text:span><text:span text:style-name="T12">n</text:span><text:span text:style-name="T12">c</text:span><text:span text:style-name="T12">ti</text:span><text:span text:style-name="T12">o</text:span><text:span text:style-name="T12">n</text:span><text:span text:style-name="T12">s </text:span><text:span text:style-name="T12">o</text:span><text:span text:style-name="T12">f </text:span><text:span text:style-name="T12">A</text:span><text:span text:style-name="T12">u</text:span><text:span text:style-name="T12">t</text:span><text:span text:style-name="T12">o</text:span><text:span text:style-name="T12">b</text:span><text:span text:style-name="T12">i</text:span><text:span text:style-name="T12">o</text:span><text:span text:style-name="T12">g</text:span><text:span text:style-name="T12">r</text:span><text:span text:style-name="T12">a</text:span><text:span text:style-name="T12">p</text:span><text:span text:style-name="T12">h</text:span><text:span text:style-name="T12">i</text:span><text:span text:style-name="T12">c</text:span><text:span text:style-name="T12">a</text:span><text:span text:style-name="T12">l </text:span><text:span text:style-name="T12">M</text:span><text:span text:style-name="T12">e</text:span><text:span text:style-name="T12">m</text:span><text:span text:style-name="T12">o</text:span><text:span text:style-name="T12">r</text:span><text:span text:style-name="T12">y </text:span><text:span text:style-name="T12">R</text:span><text:span text:style-name="T12">e</text:span><text:span text:style-name="T12">t</text:span><text:span text:style-name="T12">ri</text:span><text:span text:style-name="T12">e</text:span><text:span text:style-name="T12">v</text:span><text:span text:style-name="T12">a</text:span><text:span text:style-name="T12">l</text:span><text:span text:style-name="T12"><text:line-break/></text:span><text:span text:style-name="T12">a</text:span><text:span text:style-name="T12">n</text:span><text:span text:style-name="T12">d </text:span><text:span text:style-name="T12">t</text:span><text:span text:style-name="T12">h</text:span><text:span text:style-name="T12">e </text:span><text:span text:style-name="T12">C</text:span><text:span text:style-name="T12">o</text:span><text:span text:style-name="T12">n</text:span><text:span text:style-name="T12">s</text:span><text:span text:style-name="T12">t</text:span><text:span text:style-name="T12">r</text:span><text:span text:style-name="T12">u</text:span><text:span text:style-name="T12">c</text:span><text:span text:style-name="T12">ti</text:span><text:span text:style-name="T12">o</text:span><text:span text:style-name="T12">n </text:span><text:span text:style-name="T12">o</text:span><text:span text:style-name="T12">f </text:span><text:span text:style-name="T12">A</text:span><text:span text:style-name="T12">u</text:span><text:span text:style-name="T12">t</text:span><text:span text:style-name="T12">o</text:span><text:span text:style-name="T12">b</text:span><text:span text:style-name="T12">i</text:span><text:span text:style-name="T12">o</text:span><text:span text:style-name="T12">g</text:span><text:span text:style-name="T12">r</text:span><text:span text:style-name="T12">a</text:span><text:span text:style-name="T12">p</text:span><text:span text:style-name="T12">h</text:span><text:span text:style-name="T12">i</text:span><text:span text:style-name="T12">c</text:span><text:span text:style-name="T12">a</text:span><text:span text:style-name="T12">l </text:span><text:span text:style-name="T12">M</text:span><text:span text:style-name="T12">e</text:span><text:span text:style-name="T12">m</text:span><text:span text:style-name="T12">o</text:span><text:span text:style-name="T12">ri</text:span><text:span text:style-name="T12">e</text:span><text:span text:style-name="T12">s</text:span></text:p>
              <text:p text:style-name="P119"><text:span text:style-name="T12">i</text:span><text:span text:style-name="T12">n </text:span><text:span text:style-name="T12">t</text:span><text:span text:style-name="T12">h</text:span><text:span text:style-name="T12">e </text:span><text:span text:style-name="T12">S</text:span><text:span text:style-name="T12">e</text:span><text:span text:style-name="T12">lf</text:span><text:span text:style-name="T12">-</text:span><text:span text:style-name="T12">M</text:span><text:span text:style-name="T12">e</text:span><text:span text:style-name="T12">m</text:span><text:span text:style-name="T12">o</text:span><text:span text:style-name="T12">r</text:span><text:span text:style-name="T12">y </text:span><text:span text:style-name="T12">S</text:span><text:span text:style-name="T12">y</text:span><text:span text:style-name="T12">s</text:span><text:span text:style-name="T12">t</text:span><text:span text:style-name="T12">e</text:span><text:span text:style-name="T12">m</text:span><text:span text:style-name="T12"> </text:span><text:span text:style-name="T12">a</text:span><text:span text:style-name="T12">n</text:span><text:span text:style-name="T12">d </text:span><text:span text:style-name="T12">A</text:span><text:span text:style-name="T12">I</text:span></text:p>
              <text:p text:style-name="P119"><text:span text:style-name="T12"/></text:p>
            </draw:text-box>
          </draw:frame>
        </draw:g>
        <draw:g draw:style-name="gr23">
          <draw:rect draw:style-name="gr3" draw:text-style-name="P4" xml:id="id369" draw:id="id369" draw:layer="layout" svg:width="2.015cm" svg:height="0.775cm" svg:x="-4.369cm" svg:y="26.431cm">
            <text:p text:style-name="P5"><text:span text:style-name="T2">e</text:span><text:span text:style-name="T2">v</text:span><text:span text:style-name="T2">e</text:span><text:span text:style-name="T2">n</text:span><text:span text:style-name="T2">t</text:span></text:p>
          </draw:rect>
          <draw:rect draw:style-name="gr4" draw:text-style-name="P6" xml:id="id368" draw:id="id368" draw:layer="layout" svg:width="2.324cm" svg:height="0.915cm" svg:x="-1.811cm" svg:y="23.973cm">
            <text:p text:style-name="P5"><text:span text:style-name="T3">Perception</text:span></text:p>
          </draw:rect>
          <draw:connector draw:style-name="gr451" draw:text-style-name="P15" draw:layer="layout" draw:type="curve" svg:x1="-0.649cm" svg:y1="24.888cm" svg:x2="-3.361cm" svg:y2="26.431cm" draw:start-shape="id368" draw:start-glue-point="2" draw:end-shape="id369" draw:end-glue-point="0" svg:d="M-649 24888c0 1158-2712 387-2712 1543" svg:viewBox="0 0 2713 1544">
            <text:p/>
          </draw:connector>
          <draw:rect draw:style-name="gr3" draw:text-style-name="P4" xml:id="id370" draw:id="id370" draw:layer="layout" svg:width="2.015cm" svg:height="0.775cm" svg:x="-1.579cm" svg:y="26.412cm">
            <text:p text:style-name="P5"><text:span text:style-name="T2">ob</text:span><text:span text:style-name="T2">jec</text:span><text:span text:style-name="T2">t</text:span></text:p>
          </draw:rect>
          <draw:connector draw:style-name="gr452" draw:text-style-name="P15" draw:layer="layout" draw:type="curve" svg:x1="-0.649cm" svg:y1="24.888cm" svg:x2="-0.571cm" svg:y2="26.412cm" draw:start-shape="id368" draw:start-glue-point="2" draw:end-shape="id370" draw:end-glue-point="0" svg:d="M-649 24888c0 1143 78 381 78 1524" svg:viewBox="0 0 79 1525">
            <text:p/>
          </draw:connector>
          <draw:rect draw:style-name="gr3" draw:text-style-name="P4" xml:id="id371" draw:id="id371" draw:layer="layout" svg:width="2.015cm" svg:height="1.511cm" svg:x="1.129cm" svg:y="26.474cm">
            <text:p text:style-name="P5"><text:span text:style-name="T2">Up</text:span><text:span text:style-name="T2">da</text:span><text:span text:style-name="T2">te/</text:span><text:span text:style-name="T2">ad</text:span><text:span text:style-name="T2">d</text:span><text:span text:style-name="T2"><text:line-break/></text:span><text:span text:style-name="T2">St</text:span><text:span text:style-name="T2">at</text:span><text:span text:style-name="T2">e</text:span><text:span text:style-name="T2"><text:line-break/></text:span><text:span text:style-name="T2">m</text:span><text:span text:style-name="T2">od</text:span><text:span text:style-name="T2">el</text:span></text:p>
          </draw:rect>
          <draw:connector draw:style-name="gr453" draw:text-style-name="P15" draw:layer="layout" draw:type="curve" svg:x1="-0.649cm" svg:y1="24.888cm" svg:x2="2.136cm" svg:y2="26.474cm" draw:start-shape="id368" draw:start-glue-point="2" draw:end-shape="id371" draw:end-glue-point="0" svg:d="M-649 24888c0 1189 2785 397 2785 1586" svg:viewBox="0 0 2786 1587">
            <text:p/>
          </draw:connector>
          <draw:connector draw:style-name="gr451" draw:text-style-name="P15" draw:layer="layout" draw:type="curve" svg:x1="-0.605cm" svg:y1="22.246cm" svg:x2="-0.649cm" svg:y2="23.973cm" draw:end-shape="id368" draw:end-glue-point="0" svg:d="M-605 22246c0 919-44 56-44 1727" svg:viewBox="0 0 45 1728">
            <text:p/>
          </draw:connector>
          <draw:rect draw:style-name="gr3" draw:text-style-name="P4" xml:id="id372" draw:id="id372" draw:layer="layout" svg:width="2.015cm" svg:height="0.775cm" svg:x="-4.772cm" svg:y="28.979cm">
            <text:p text:style-name="P5"><text:span text:style-name="T2">M</text:span><text:span text:style-name="T2">en</text:span><text:span text:style-name="T2">tal</text:span><text:span text:style-name="T2"><text:line-break/></text:span><text:span text:style-name="T2">st</text:span><text:span text:style-name="T2">at</text:span><text:span text:style-name="T2">e </text:span><text:span text:style-name="T2">ch</text:span><text:span text:style-name="T2">an</text:span><text:span text:style-name="T2">ge</text:span></text:p>
          </draw:rect>
          <draw:connector draw:style-name="gr454" draw:text-style-name="P15" draw:layer="layout" draw:type="curve" svg:x1="-3.361cm" svg:y1="27.206cm" svg:x2="-3.764cm" svg:y2="28.979cm" draw:start-shape="id369" draw:start-glue-point="2" draw:end-shape="id372" svg:d="M-3361 27206c0 1330-403 444-403 1773" svg:viewBox="0 0 404 1774">
            <text:p/>
          </draw:connector>
          <draw:rect draw:style-name="gr3" draw:text-style-name="P4" xml:id="id373" draw:id="id373" draw:layer="layout" svg:width="2.741cm" svg:height="1.541cm" svg:x="-6.255cm" svg:y="31.683cm">
            <text:p text:style-name="P5"><text:span text:style-name="T2">Ch</text:span><text:span text:style-name="T2">ang</text:span><text:span text:style-name="T2">e to </text:span><text:span text:style-name="T2"><text:line-break/></text:span><text:span text:style-name="T2">min</text:span><text:span text:style-name="T2">d </text:span><text:span text:style-name="T2">wa</text:span><text:span text:style-name="T2">nde</text:span><text:span text:style-name="T2">ring </text:span><text:span text:style-name="T2"><text:line-break/></text:span><text:span text:style-name="T2">mo</text:span><text:span text:style-name="T2">de</text:span></text:p>
          </draw:rect>
          <draw:connector draw:style-name="gr455" draw:text-style-name="P15" draw:layer="layout" draw:type="curve" svg:x1="-3.764cm" svg:y1="29.754cm" svg:x2="-4.884cm" svg:y2="31.683cm" draw:start-shape="id372" draw:start-glue-point="2" draw:end-shape="id373" draw:end-glue-point="0" svg:d="M-3764 29754c0 1449-1120 485-1120 1929" svg:viewBox="0 0 1121 1930">
            <text:p/>
          </draw:connector>
          <draw:path draw:style-name="gr456" draw:text-style-name="P121"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57"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82" draw:id="id382" draw:layer="layout" svg:width="2.501cm" svg:height="1.419cm" svg:x="-37.0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spike)</text:span></text:p>
        </draw:rect>
        <draw:custom-shape draw:style-name="gr458" draw:text-style-name="P123" xml:id="id375" draw:id="id375" draw:layer="layout" svg:width="0.323cm" svg:height="0.323cm" svg:x="-43.371cm" svg:y="40.411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9" draw:text-style-name="P7" draw:layer="layout" draw:type="curve" svg:x1="-40.74cm" svg:y1="40.783cm" svg:x2="-43.048cm" svg:y2="40.573cm" draw:start-shape="id374" draw:start-glue-point="3" draw:end-shape="id375" draw:end-glue-point="10" svg:d="M-40740 40783c-1729 0-576-210-2308-210" svg:viewBox="0 0 2309 211">
          <text:p text:style-name="P5"><text:span text:style-name="T4">Action</text:span><text:span text:style-name="T4"><text:line-break/></text:span><text:span text:style-name="T4">potential</text:span></text:p>
        </draw:connector>
        <draw:custom-shape draw:style-name="gr460" draw:text-style-name="P125" xml:id="id377" draw:id="id377" draw:layer="layout" svg:width="0.323cm" svg:height="0.323cm" svg:x="-43.357cm" svg:y="43.572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1" draw:text-style-name="P7" draw:layer="layout" draw:type="curve" svg:x1="-40.74cm" svg:y1="43.498cm" svg:x2="-43.034cm" svg:y2="43.734cm" draw:start-shape="id376" draw:start-glue-point="3" draw:end-shape="id377" draw:end-glue-point="10" svg:d="M-40740 43498c-1719 0-572 236-2294 236" svg:viewBox="0 0 2295 237">
          <text:p text:style-name="P5"><text:span text:style-name="T4">Action</text:span><text:span text:style-name="T4"><text:line-break/></text:span><text:span text:style-name="T4">potential</text:span></text:p>
        </draw:connector>
        <draw:custom-shape draw:style-name="gr460" draw:text-style-name="P125" xml:id="id379" draw:id="id379" draw:layer="layout" svg:width="0.323cm" svg:height="0.323cm" svg:x="-43.679cm" svg:y="41.978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2" draw:text-style-name="P7" draw:layer="layout" draw:type="curve" svg:x1="-40.74cm" svg:y1="42.14cm" svg:x2="-43.356cm" svg:y2="42.14cm" draw:start-shape="id378" draw:start-glue-point="3" draw:end-shape="id379" draw:end-glue-point="10" svg:d="M-40740 42140h-2616" svg:viewBox="0 0 2617 1">
          <text:p text:style-name="P5"><text:span text:style-name="T4">Action</text:span><text:span text:style-name="T4"><text:line-break/></text:span><text:span text:style-name="T4">potential</text:span></text:p>
        </draw:connector>
        <draw:custom-shape draw:style-name="gr460" draw:text-style-name="P125" xml:id="id381" draw:id="id381" draw:layer="layout" svg:width="0.323cm" svg:height="0.323cm" svg:x="-43.61cm" svg:y="44.873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43.708cm 45.215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46.424cm" svg:y="42.213cm">
          <draw:text-box>
            <text:p text:style-name="P5">Sensors<text:line-break/>(receptors)</text:p>
          </draw:text-box>
        </draw:frame>
        <draw:connector draw:style-name="gr465" draw:text-style-name="P7" draw:layer="layout" draw:type="curve" svg:x1="-40.74cm" svg:y1="44.855cm" svg:x2="-43.287cm" svg:y2="45.035cm" draw:start-shape="id380" draw:start-glue-point="3" draw:end-shape="id381" draw:end-glue-point="10" svg:d="M-40740 44855c-1909 0-636 180-2547 180" svg:viewBox="0 0 2548 181">
          <text:p text:style-name="P5"><text:span text:style-name="T4">Action</text:span><text:span text:style-name="T4"><text:line-break/></text:span><text:span text:style-name="T4">potential</text:span></text:p>
        </draw:connector>
        <draw:custom-shape draw:style-name="gr466" draw:text-style-name="P128" draw:layer="layout" svg:width="2.381cm" svg:height="1.985cm" svg:x="-48.849cm" svg:y="41.842cm">
          <text:p text:style-name="P127"><text:span text:style-name="T3">physical</text:span><text:span text:style-name="T3"><text:line-break/></text:span><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399" draw:id="id399" draw:layer="layout" svg:width="2.574cm" svg:height="1.396cm" svg:x="-27.018cm" svg:y="42.029cm">
          <text:p text:style-name="P5"><text:span text:style-name="T4">Trace</text:span><text:span text:style-name="T4"><text:line-break/></text:span><text:span text:style-name="T4">(labeled</text:span><text:span text:style-name="T4"><text:line-break/></text:span><text:span text:style-name="T4">sensory </text:span><text:span text:style-name="T4">data)</text:span></text:p>
        </draw:rect>
        <draw:rect draw:style-name="gr41" draw:text-style-name="P19" xml:id="id383" draw:id="id383" draw:layer="layout" svg:width="2.141cm" svg:height="1.419cm" svg:x="-33.461cm" svg:y="42.107cm">
          <text:p text:style-name="P5"><text:span text:style-name="T4">Neural</text:span><text:span text:style-name="T4"><text:line-break/></text:span><text:span text:style-name="T4">coding</text:span><text:span text:style-name="T4"><text:line-break/></text:span><text:span text:style-name="T4">(encoded FMM</text:span><text:span text:style-name="T4"><text:line-break/></text:span><text:span text:style-name="T4">wave params)</text:span></text:p>
        </draw:rect>
        <draw:rect draw:style-name="gr41" draw:text-style-name="P19" xml:id="id374" draw:id="id374" draw:layer="layout" svg:width="1.265cm" svg:height="1.082cm" svg:x="-40.74cm" svg:y="40.242cm">
          <text:p text:style-name="P5"><text:span text:style-name="T4">Action</text:span><text:span text:style-name="T4"><text:line-break/></text:span><text:span text:style-name="T4">potential</text:span><text:span text:style-name="T4"><text:line-break/></text:span><text:span text:style-name="T4">train</text:span></text:p>
        </draw:rect>
        <draw:connector draw:style-name="gr468" draw:text-style-name="P7" draw:layer="layout" draw:type="curve" svg:x1="-37.022cm" svg:y1="42.815cm" svg:x2="-39.475cm" svg:y2="40.783cm" draw:start-shape="id382" draw:start-glue-point="3" draw:end-shape="id374" draw:end-glue-point="1" svg:d="M-37022 42815c-1839 0-613-2032-2453-2032" svg:viewBox="0 0 2454 2033">
          <text:p/>
        </draw:connector>
        <draw:rect draw:style-name="gr41" draw:text-style-name="P19" xml:id="id378" draw:id="id378" draw:layer="layout" svg:width="1.265cm" svg:height="1.082cm" svg:x="-40.74cm" svg:y="41.599cm">
          <text:p text:style-name="P5"><text:span text:style-name="T4">A</text:span><text:span text:style-name="T4">ct</text:span><text:span text:style-name="T4">io</text:span><text:span text:style-name="T4">n</text:span><text:span text:style-name="T4"><text:line-break/></text:span><text:span text:style-name="T4">p</text:span><text:span text:style-name="T4">ot</text:span><text:span text:style-name="T4">e</text:span><text:span text:style-name="T4">nt</text:span><text:span text:style-name="T4">ia</text:span><text:span text:style-name="T4">l</text:span><text:span text:style-name="T4"><text:line-break/></text:span><text:span text:style-name="T4">tr</text:span><text:span text:style-name="T4">ai</text:span><text:span text:style-name="T4">n</text:span></text:p>
        </draw:rect>
        <draw:rect draw:style-name="gr41" draw:text-style-name="P19" xml:id="id376" draw:id="id376" draw:layer="layout" svg:width="1.265cm" svg:height="1.082cm" svg:x="-40.74cm" svg:y="42.957cm">
          <text:p text:style-name="P5"><text:span text:style-name="T4">Act</text:span><text:span text:style-name="T4">ion</text:span><text:span text:style-name="T4"><text:line-break/></text:span><text:span text:style-name="T4">pot</text:span><text:span text:style-name="T4">ent</text:span><text:span text:style-name="T4">ial</text:span><text:span text:style-name="T4"><text:line-break/></text:span><text:span text:style-name="T4">trai</text:span><text:span text:style-name="T4">n</text:span></text:p>
        </draw:rect>
        <draw:rect draw:style-name="gr41" draw:text-style-name="P19" xml:id="id380" draw:id="id380" draw:layer="layout" svg:width="1.265cm" svg:height="1.082cm" svg:x="-40.74cm" svg:y="44.314cm">
          <text:p text:style-name="P5"><text:span text:style-name="T4">A</text:span><text:span text:style-name="T4">cti</text:span><text:span text:style-name="T4">o</text:span><text:span text:style-name="T4">n</text:span><text:span text:style-name="T4"><text:line-break/></text:span><text:span text:style-name="T4">p</text:span><text:span text:style-name="T4">ot</text:span><text:span text:style-name="T4">e</text:span><text:span text:style-name="T4">nti</text:span><text:span text:style-name="T4">al</text:span><text:span text:style-name="T4"><text:line-break/></text:span><text:span text:style-name="T4">tr</text:span><text:span text:style-name="T4">ai</text:span><text:span text:style-name="T4">n</text:span></text:p>
        </draw:rect>
        <draw:connector draw:style-name="gr469" draw:text-style-name="P7" draw:layer="layout" draw:type="curve" svg:x1="-37.022cm" svg:y1="42.815cm" svg:x2="-39.475cm" svg:y2="42.14cm" draw:start-shape="id382" draw:start-glue-point="3" draw:end-shape="id378" draw:end-glue-point="1" svg:d="M-37022 42815c-1839 0-613-675-2453-675" svg:viewBox="0 0 2454 676">
          <text:p/>
        </draw:connector>
        <draw:connector draw:style-name="gr470" draw:text-style-name="P7" draw:layer="layout" draw:type="curve" svg:x1="-37.022cm" svg:y1="42.815cm" svg:x2="-39.475cm" svg:y2="43.498cm" draw:start-shape="id382" draw:start-glue-point="3" draw:end-shape="id376" draw:end-glue-point="1" svg:d="M-37022 42815c-1839 0-613 683-2453 683" svg:viewBox="0 0 2454 684">
          <text:p/>
        </draw:connector>
        <draw:connector draw:style-name="gr36" draw:text-style-name="P7" draw:layer="layout" draw:type="curve" svg:x1="-37.022cm" svg:y1="42.815cm" svg:x2="-39.475cm" svg:y2="44.855cm" draw:start-shape="id382" draw:start-glue-point="3" draw:end-shape="id380" draw:end-glue-point="1" svg:d="M-37022 42815c-1839 0-613 2040-2453 2040" svg:viewBox="0 0 2454 2041">
          <text:p/>
        </draw:connector>
        <draw:custom-shape draw:style-name="gr471" draw:text-style-name="P41" draw:layer="layout" svg:width="0.215cm" svg:height="1.199cm" draw:transform="rotate (-1.5707963267949) translate (-39.619cm 39.766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2" draw:text-style-name="P16" draw:layer="layout" svg:width="1.632cm" svg:height="0.569cm" svg:x="-40.927cm" svg:y="39.205cm">
          <draw:text-box>
            <text:p><text:span text:style-name="T4">Buffering</text:span></text:p>
          </draw:text-box>
        </draw:frame>
        <draw:connector draw:style-name="gr473" draw:text-style-name="P15" draw:layer="layout" draw:type="line" svg:x1="-27.845cm" svg:y1="44.056cm" svg:x2="-22.439cm" svg:y2="44.01cm" svg:d="M-27845 44056l5406-46" svg:viewBox="0 0 5407 47">
          <text:p/>
        </draw:connector>
        <draw:frame draw:style-name="gr474" draw:text-style-name="P129" draw:layer="layout" svg:width="3.263cm" svg:height="1.199cm" svg:x="-27.926cm" svg:y="44.049cm">
          <draw:text-box>
            <text:p><text:span text:style-name="T39">Semanti</text:span><text:span text:style-name="T39">c</text:span></text:p>
          </draw:text-box>
        </draw:frame>
        <draw:connector draw:style-name="gr36" draw:text-style-name="P7" draw:layer="layout" draw:type="curve" svg:x1="-33.461cm" svg:y1="42.816cm" svg:x2="-34.521cm" svg:y2="42.815cm" draw:start-shape="id383" draw:start-glue-point="3" draw:end-shape="id382" draw:end-glue-point="1" svg:d="M-33461 42816c-793 0-264-1-1060-1" svg:viewBox="0 0 1061 2">
          <text:p/>
        </draw:connector>
        <draw:g draw:style-name="gr23">
          <draw:path draw:style-name="gr475" draw:text-style-name="P130" xml:id="id400" draw:id="id400" draw:layer="layout" svg:width="2.434cm" svg:height="7.621cm" svg:x="-30.2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29.617cm 43.97cm)">
            <draw:text-box>
              <text:p text:style-name="P5"><text:span text:style-name="T40">Percepti</text:span><text:span text:style-name="T40">on</text:span><text:span text:style-name="T40"><text:line-break/></text:span><text:span text:style-name="T41">(clustering</text:span><text:span text:style-name="T41"><text:line-break/></text:span><text:span text:style-name="T41">hierarchy)</text:span></text:p>
            </draw:text-box>
          </draw:frame>
        </draw:g>
        <draw:rect draw:style-name="gr467" draw:text-style-name="P19" xml:id="id397" draw:id="id397" draw:layer="layout" svg:width="2.574cm" svg:height="1.396cm" svg:x="-19.9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36.644cm" svg:y1="44.056cm" svg:x2="-31.238cm" svg:y2="44.01cm" svg:d="M-36644 44056l5406-46" svg:viewBox="0 0 5407 47">
          <text:p/>
        </draw:connector>
        <draw:frame draw:style-name="gr474" draw:text-style-name="P129" draw:layer="layout" svg:width="3.263cm" svg:height="1.199cm" svg:x="-33.725cm" svg:y="44.149cm">
          <draw:text-box>
            <text:p><text:span text:style-name="T39">signal-level</text:span></text:p>
          </draw:text-box>
        </draw:frame>
        <draw:rect draw:style-name="gr467" draw:text-style-name="P19" xml:id="id398" draw:id="id398" draw:layer="layout" svg:width="2.574cm" svg:height="1.396cm" svg:x="-23.371cm" svg:y="42.029cm">
          <text:p text:style-name="P5"><text:span text:style-name="T4">internal</text:span><text:span text:style-name="T4"><text:line-break/></text:span><text:span text:style-name="T4">language</text:span><text:span text:style-name="T4"><text:line-break/></text:span><text:span text:style-name="T4">(inner speech)</text:span></text:p>
        </draw:rect>
        <draw:connector draw:style-name="gr478" draw:text-style-name="P15" draw:layer="layout" draw:type="curve" svg:x1="-23.138cm" svg:y1="11.778cm" svg:x2="-23.153cm" svg:y2="14.393cm" draw:start-shape="id384" draw:start-glue-point="2" draw:end-shape="id385" svg:d="M-23138 11778c0 1962-15 655-15 2615" svg:viewBox="0 0 16 2616">
          <text:p/>
        </draw:connector>
        <draw:custom-shape draw:style-name="gr34" draw:text-style-name="P26" xml:id="id387" draw:id="id387" draw:layer="layout" svg:width="0.891cm" svg:height="0.97cm" svg:x="-41.899cm" svg:y="72.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6" draw:id="id386" draw:layer="layout" svg:width="0.891cm" svg:height="0.97cm" svg:x="-39.898cm" svg:y="72.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9.898cm" svg:y1="73.064cm" svg:x2="-41.008cm" svg:y2="73.064cm" draw:start-shape="id386" draw:start-glue-point="6" draw:end-shape="id387" draw:end-glue-point="10" svg:d="M-39898 73064h-1110" svg:viewBox="0 0 1111 1">
          <text:p/>
        </draw:connector>
        <draw:connector draw:style-name="gr36" draw:text-style-name="P7" draw:layer="layout" draw:type="curve" svg:x1="-41.899cm" svg:y1="73.064cm" svg:x2="-43.007cm" svg:y2="73.064cm" draw:start-shape="id387" draw:start-glue-point="6" draw:end-shape="id16" draw:end-glue-point="10" svg:d="M-41899 73064h-1108" svg:viewBox="0 0 1109 1">
          <text:p/>
        </draw:connector>
        <draw:custom-shape draw:style-name="gr34" draw:text-style-name="P26" xml:id="id389" draw:id="id389" draw:layer="layout" svg:width="0.891cm" svg:height="0.97cm" svg:x="-34.899cm" svg:y="72.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8" draw:id="id388" draw:layer="layout" svg:width="0.891cm" svg:height="0.97cm" svg:x="-32.898cm" svg:y="72.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898cm" svg:y1="73.064cm" svg:x2="-34.008cm" svg:y2="73.064cm" draw:start-shape="id388" draw:start-glue-point="6" draw:end-shape="id389" draw:end-glue-point="10" svg:d="M-32898 73064h-1110" svg:viewBox="0 0 1111 1">
          <text:p/>
        </draw:connector>
        <draw:custom-shape draw:style-name="gr479" draw:text-style-name="P106" draw:layer="layout" svg:width="16.317cm" svg:height="1.952cm" svg:x="-47.303cm" svg:y="70.113cm">
          <text:p/>
          <draw:enhanced-geometry svg:viewBox="0 0 21600 21600" draw:type="rectangle" draw:enhanced-path="M 0 0 L 21600 0 21600 21600 0 21600 0 0 Z N"/>
        </draw:custom-shape>
        <draw:frame draw:style-name="gr480" draw:text-style-name="P38" draw:layer="layout" svg:width="1.966cm" svg:height="1.433cm" svg:x="-40.749cm" svg:y="70.42cm">
          <draw:text-box>
            <text:p text:style-name="P132"><text:span text:style-name="T12">Dynami</text:span><text:span text:style-name="T12">c </text:span><text:span text:style-name="T12"><text:line-break/></text:span><text:span text:style-name="T12">Time </text:span><text:span text:style-name="T12"><text:line-break/></text:span><text:span text:style-name="T12">Warpin</text:span><text:span text:style-name="T12">g</text:span></text:p>
          </draw:text-box>
        </draw:frame>
        <draw:custom-shape draw:style-name="gr481" draw:text-style-name="P133" draw:layer="layout" svg:width="4.16cm" svg:height="0.97cm" svg:x="-47.351cm" svg:y="68.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2" draw:text-style-name="P38" draw:layer="layout" svg:width="0.749cm" svg:height="0.725cm" svg:x="-38.98cm" svg:y="70.774cm">
          <draw:text-box>
            <text:p>+</text:p>
          </draw:text-box>
        </draw:frame>
        <draw:frame draw:style-name="gr483" draw:text-style-name="P38" draw:layer="layout" svg:width="1.849cm" svg:height="1.039cm" svg:x="-44.949cm" svg:y="70.617cm">
          <draw:text-box>
            <text:p text:style-name="P132"><text:span text:style-name="T12">Sliding</text:span><text:span text:style-name="T12"><text:line-break/></text:span><text:span text:style-name="T12">window</text:span><text:span text:style-name="T12">s</text:span></text:p>
          </draw:text-box>
        </draw:frame>
        <draw:frame draw:style-name="gr482" draw:text-style-name="P38" draw:layer="layout" svg:width="0.749cm" svg:height="0.725cm" svg:x="-43.279cm" svg:y="70.774cm">
          <draw:text-box>
            <text:p>+</text:p>
          </draw:text-box>
        </draw:frame>
        <draw:frame draw:style-name="gr484" draw:text-style-name="P11" draw:layer="layout" svg:width="1.684cm" svg:height="0.57cm" svg:x="-38.281cm" svg:y="70.851cm">
          <draw:text-box>
            <text:p><text:span text:style-name="T4">DBSCAN</text:span></text:p>
          </draw:text-box>
        </draw:frame>
        <draw:custom-shape draw:style-name="gr485" draw:text-style-name="P134" draw:layer="layout" svg:width="1.539cm" svg:height="1.287cm" draw:transform="rotate (1.5707963267949) translate (-36.535cm 71.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81" draw:text-style-name="P133" draw:layer="layout" svg:width="4.16cm" svg:height="0.97cm" svg:x="-41.351cm" svg:y="68.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1.093cm" svg:y="68.679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0.043cm" svg:y="68.679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39.001cm" svg:y="68.679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37.948cm" svg:y="68.679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0.564cm" svg:y1="68.944cm" svg:x2="-40.059cm" svg:y2="68.962cm">
            <text:p/>
          </draw:line>
          <draw:line draw:style-name="gr488" draw:text-style-name="P15" draw:layer="layout" svg:x1="-39.511cm" svg:y1="68.961cm" svg:x2="-39.013cm" svg:y2="68.956cm">
            <text:p/>
          </draw:line>
          <draw:line draw:style-name="gr488" draw:text-style-name="P15" draw:layer="layout" svg:x1="-38.465cm" svg:y1="68.961cm" svg:x2="-37.948cm" svg:y2="68.956cm">
            <text:p/>
          </draw:line>
        </draw:g>
        <draw:connector draw:style-name="gr489" draw:text-style-name="P7" draw:layer="layout" draw:type="curve" svg:x1="-35.312cm" svg:y1="73.023cm" svg:x2="-38.625cm" svg:y2="73.026cm" svg:d="M-35312 73023c-2484 0-828 3-3313 3" svg:viewBox="0 0 3314 4">
          <text:p/>
        </draw:connector>
        <draw:connector draw:style-name="gr489" draw:text-style-name="P7" draw:layer="layout" draw:type="curve" svg:x1="-41.797cm" svg:y1="68.923cm" svg:x2="-42.878cm" svg:y2="68.927cm" svg:d="M-41797 68923c-810 0-270 4-1081 4" svg:viewBox="0 0 1082 5">
          <text:p/>
        </draw:connector>
        <draw:connector draw:style-name="gr489" draw:text-style-name="P7" draw:layer="layout" draw:type="curve" svg:x1="-35.807cm" svg:y1="68.923cm" svg:x2="-36.888cm" svg:y2="68.927cm" svg:d="M-35807 68923c-810 0-270 4-1081 4" svg:viewBox="0 0 1082 5">
          <text:p/>
        </draw:connector>
        <draw:custom-shape draw:style-name="gr481" draw:text-style-name="P133" draw:layer="layout" svg:width="4.16cm" svg:height="0.97cm" svg:x="-35.349cm" svg:y="68.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47.302cm" svg:y="74.113cm">
          <text:p/>
          <draw:enhanced-geometry svg:viewBox="0 0 21600 21600" draw:type="rectangle" draw:enhanced-path="M 0 0 L 21600 0 21600 21600 0 21600 0 0 Z N"/>
        </draw:custom-shape>
        <draw:frame draw:style-name="gr490" draw:text-style-name="P41" draw:layer="layout" svg:width="2.259cm" svg:height="1.523cm" svg:x="-40.28cm" svg:y="74.451cm">
          <draw:text-box>
            <text:p text:style-name="P5"><text:span text:style-name="T4">Clusterin</text:span><text:span text:style-name="T4">g on </text:span><text:span text:style-name="T4">0</text:span><text:span text:style-name="T43">th</text:span><text:span text:style-name="T44">and</text:span><text:span text:style-name="T44"><text:line-break/></text:span><text:span text:style-name="T44">2</text:span><text:span text:style-name="T43">nd</text:span></text:p>
          </draw:text-box>
        </draw:frame>
        <draw:custom-shape draw:style-name="gr491" draw:text-style-name="P134" draw:layer="layout" svg:width="1.539cm" svg:height="1.287cm" draw:transform="rotate (1.5707963267949) translate (-36.534cm 75.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391" draw:id="id391" draw:layer="layout" svg:width="0.891cm" svg:height="0.97cm" svg:x="-45.899cm" svg:y="76.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0" draw:id="id390" draw:layer="layout" svg:width="0.891cm" svg:height="0.97cm" svg:x="-43.898cm" svg:y="76.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7.064cm" svg:x2="-45.008cm" svg:y2="77.064cm" draw:start-shape="id390" draw:start-glue-point="6" draw:end-shape="id391" draw:end-glue-point="10" svg:d="M-43898 77064h-1110" svg:viewBox="0 0 1111 1">
          <text:p/>
        </draw:connector>
        <draw:custom-shape draw:style-name="gr34" draw:text-style-name="P26" xml:id="id393" draw:id="id393" draw:layer="layout" svg:width="0.891cm" svg:height="0.97cm" svg:x="-41.899cm" svg:y="76.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2" draw:id="id392" draw:layer="layout" svg:width="0.891cm" svg:height="0.97cm" svg:x="-39.898cm" svg:y="76.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9.898cm" svg:y1="77.064cm" svg:x2="-41.008cm" svg:y2="77.064cm" draw:start-shape="id392" draw:start-glue-point="6" draw:end-shape="id393" draw:end-glue-point="10" svg:d="M-39898 77064h-1110" svg:viewBox="0 0 1111 1">
          <text:p/>
        </draw:connector>
        <draw:connector draw:style-name="gr36" draw:text-style-name="P7" draw:layer="layout" draw:type="curve" svg:x1="-41.899cm" svg:y1="77.064cm" svg:x2="-43.007cm" svg:y2="77.064cm" draw:start-shape="id393" draw:start-glue-point="6" draw:end-shape="id390" draw:end-glue-point="10" svg:d="M-41899 77064h-1108" svg:viewBox="0 0 1109 1">
          <text:p/>
        </draw:connector>
        <draw:custom-shape draw:style-name="gr34" draw:text-style-name="P26" xml:id="id395" draw:id="id395" draw:layer="layout" svg:width="0.891cm" svg:height="0.97cm" svg:x="-34.899cm" svg:y="76.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4" draw:id="id394" draw:layer="layout" svg:width="0.891cm" svg:height="0.97cm" svg:x="-32.898cm" svg:y="76.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898cm" svg:y1="77.064cm" svg:x2="-34.008cm" svg:y2="77.064cm" draw:start-shape="id394" draw:start-glue-point="6" draw:end-shape="id395" draw:end-glue-point="10" svg:d="M-32898 77064h-1110" svg:viewBox="0 0 1111 1">
          <text:p/>
        </draw:connector>
        <draw:connector draw:style-name="gr489" draw:text-style-name="P7" draw:layer="layout" draw:type="curve" svg:x1="-35.312cm" svg:y1="77.023cm" svg:x2="-38.625cm" svg:y2="77.026cm" svg:d="M-35312 77023c-2484 0-828 3-3313 3" svg:viewBox="0 0 3314 4">
          <text:p/>
        </draw:connector>
        <draw:custom-shape draw:style-name="gr479" draw:text-style-name="P106" draw:layer="layout" svg:width="16.317cm" svg:height="1.952cm" svg:x="-47.301cm" svg:y="77.913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36.534cm 79.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3" draw:text-style-name="P137" draw:layer="layout" svg:width="2.011cm" svg:height="1.705cm" svg:x="-40.457cm" svg:y="78.092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79" draw:text-style-name="P106" draw:layer="layout" svg:width="16.317cm" svg:height="1.952cm" svg:x="-47.302cm" svg:y="70.113cm">
          <text:p/>
          <draw:enhanced-geometry svg:viewBox="0 0 21600 21600" draw:type="rectangle" draw:enhanced-path="M 0 0 L 21600 0 21600 21600 0 21600 0 0 Z N"/>
        </draw:custom-shape>
        <draw:frame draw:style-name="gr494" draw:text-style-name="P138" draw:layer="layout" svg:width="3.743cm" svg:height="1.158cm" svg:x="-42.519cm" svg:y="70.64cm">
          <draw:text-box>
            <text:p text:style-name="P69"><text:span text:style-name="T12">Matrix-</text:span><text:span text:style-name="T12">Profile-</text:span><text:span text:style-name="T12">based </text:span><text:span text:style-name="T12"><text:line-break/></text:span><text:span text:style-name="T12">Motif </text:span><text:span text:style-name="T12">Discove</text:span><text:span text:style-name="T12">ry</text:span></text:p>
          </draw:text-box>
        </draw:frame>
        <draw:frame draw:style-name="gr482" draw:text-style-name="P38" draw:layer="layout" svg:width="0.749cm" svg:height="0.725cm" svg:x="-38.979cm" svg:y="70.774cm">
          <draw:text-box>
            <text:p>+</text:p>
          </draw:text-box>
        </draw:frame>
        <draw:frame draw:style-name="gr483" draw:text-style-name="P38" draw:layer="layout" svg:width="1.849cm" svg:height="1.039cm" svg:x="-44.948cm" svg:y="70.617cm">
          <draw:text-box>
            <text:p text:style-name="P132"><text:span text:style-name="T12">Sliding</text:span><text:span text:style-name="T12"><text:line-break/></text:span><text:span text:style-name="T12">window</text:span><text:span text:style-name="T12">s</text:span></text:p>
          </draw:text-box>
        </draw:frame>
        <draw:frame draw:style-name="gr482" draw:text-style-name="P38" draw:layer="layout" svg:width="0.749cm" svg:height="0.725cm" svg:x="-43.278cm" svg:y="70.774cm">
          <draw:text-box>
            <text:p>+</text:p>
          </draw:text-box>
        </draw:frame>
        <draw:frame draw:style-name="gr495" draw:text-style-name="P11" draw:layer="layout" svg:width="1.895cm" svg:height="0.887cm" svg:x="-38.28cm" svg:y="70.851cm">
          <draw:text-box>
            <text:p><text:span text:style-name="T4">Clusterin</text:span><text:span text:style-name="T4">g</text:span></text:p>
          </draw:text-box>
        </draw:frame>
        <draw:custom-shape draw:style-name="gr491" draw:text-style-name="P134" draw:layer="layout" svg:width="1.539cm" svg:height="1.287cm" draw:transform="rotate (1.5707963267949) translate (-36.534cm 71.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47.303cm" svg:y="66.113cm">
          <text:p/>
          <draw:enhanced-geometry svg:viewBox="0 0 21600 21600" draw:type="rectangle" draw:enhanced-path="M 0 0 L 21600 0 21600 21600 0 21600 0 0 Z N"/>
        </draw:custom-shape>
        <draw:frame draw:style-name="gr480" draw:text-style-name="P38" draw:layer="layout" svg:width="1.966cm" svg:height="1.433cm" svg:x="-40.749cm" svg:y="66.42cm">
          <draw:text-box>
            <text:p text:style-name="P132"><text:span text:style-name="T12">Dynami</text:span><text:span text:style-name="T12">c </text:span><text:span text:style-name="T12"><text:line-break/></text:span><text:span text:style-name="T12">Time </text:span><text:span text:style-name="T12"><text:line-break/></text:span><text:span text:style-name="T12">Warpin</text:span><text:span text:style-name="T12">g</text:span></text:p>
          </draw:text-box>
        </draw:frame>
        <draw:frame draw:style-name="gr482" draw:text-style-name="P38" draw:layer="layout" svg:width="0.749cm" svg:height="0.725cm" svg:x="-38.98cm" svg:y="66.774cm">
          <draw:text-box>
            <text:p>+</text:p>
          </draw:text-box>
        </draw:frame>
        <draw:frame draw:style-name="gr483" draw:text-style-name="P38" draw:layer="layout" svg:width="1.849cm" svg:height="1.039cm" svg:x="-42.949cm" svg:y="66.617cm">
          <draw:text-box>
            <text:p text:style-name="P132"><text:span text:style-name="T12">Sliding</text:span><text:span text:style-name="T12"><text:line-break/></text:span><text:span text:style-name="T12">window</text:span><text:span text:style-name="T12">s</text:span></text:p>
          </draw:text-box>
        </draw:frame>
        <draw:frame draw:style-name="gr482" draw:text-style-name="P38" draw:layer="layout" svg:width="0.749cm" svg:height="0.725cm" svg:x="-41.279cm" svg:y="66.774cm">
          <draw:text-box>
            <text:p>+</text:p>
          </draw:text-box>
        </draw:frame>
        <draw:frame draw:style-name="gr484" draw:text-style-name="P11" draw:layer="layout" svg:width="1.684cm" svg:height="0.57cm" svg:x="-38.281cm" svg:y="66.851cm">
          <draw:text-box>
            <text:p><text:span text:style-name="T4">DBSCAN</text:span></text:p>
          </draw:text-box>
        </draw:frame>
        <draw:custom-shape draw:style-name="gr485" draw:text-style-name="P134" draw:layer="layout" svg:width="1.539cm" svg:height="1.287cm" draw:transform="rotate (1.5707963267949) translate (-36.535cm 67.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47.302cm" svg:y="66.113cm">
          <text:p/>
          <draw:enhanced-geometry svg:viewBox="0 0 21600 21600" draw:type="rectangle" draw:enhanced-path="M 0 0 L 21600 0 21600 21600 0 21600 0 0 Z N"/>
        </draw:custom-shape>
        <draw:frame draw:style-name="gr482" draw:text-style-name="P38" draw:layer="layout" svg:width="0.749cm" svg:height="0.725cm" svg:x="-38.979cm" svg:y="66.774cm">
          <draw:text-box>
            <text:p>+</text:p>
          </draw:text-box>
        </draw:frame>
        <draw:frame draw:style-name="gr483" draw:text-style-name="P38" draw:layer="layout" svg:width="1.849cm" svg:height="1.039cm" svg:x="-44.948cm" svg:y="66.617cm">
          <draw:text-box>
            <text:p text:style-name="P132"><text:span text:style-name="T12">Sliding</text:span><text:span text:style-name="T12"><text:line-break/></text:span><text:span text:style-name="T12">window</text:span><text:span text:style-name="T12">s</text:span></text:p>
          </draw:text-box>
        </draw:frame>
        <draw:frame draw:style-name="gr482" draw:text-style-name="P38" draw:layer="layout" svg:width="0.749cm" svg:height="0.725cm" svg:x="-43.278cm" svg:y="66.774cm">
          <draw:text-box>
            <text:p>+</text:p>
          </draw:text-box>
        </draw:frame>
        <draw:frame draw:style-name="gr495" draw:text-style-name="P11" draw:layer="layout" svg:width="1.919cm" svg:height="0.887cm" svg:x="-38.28cm" svg:y="66.851cm">
          <draw:text-box>
            <text:p><text:span text:style-name="T4">Clustrein</text:span><text:span text:style-name="T4">g</text:span></text:p>
          </draw:text-box>
        </draw:frame>
        <draw:custom-shape draw:style-name="gr491" draw:text-style-name="P134" draw:layer="layout" svg:width="1.539cm" svg:height="1.287cm" draw:transform="rotate (1.5707963267949) translate (-36.534cm 67.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5.835cm" svg:y="65.469cm">
          <draw:text-box>
            <text:p><text:span text:style-name="T12">S</text:span><text:span text:style-name="T13">0</text:span></text:p>
          </draw:text-box>
        </draw:frame>
        <draw:frame draw:style-name="gr33" draw:text-style-name="P11" draw:layer="layout" svg:width="0.947cm" svg:height="0.646cm" svg:x="-39.918cm" svg:y="65.469cm">
          <draw:text-box>
            <text:p><text:span text:style-name="T12">S</text:span><text:span text:style-name="T13">p</text:span></text:p>
          </draw:text-box>
        </draw:frame>
        <draw:frame draw:style-name="gr33" draw:text-style-name="P11" draw:layer="layout" svg:width="0.947cm" svg:height="0.646cm" svg:x="-33.916cm" svg:y="65.461cm">
          <draw:text-box>
            <text:p><text:span text:style-name="T12">S</text:span><text:span text:style-name="T13">p</text:span></text:p>
          </draw:text-box>
        </draw:frame>
        <draw:custom-shape draw:style-name="gr481" draw:text-style-name="P133" draw:layer="layout" svg:width="4.16cm" svg:height="0.97cm" svg:x="-47.351cm" svg:y="6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1.351cm" svg:y="6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1.138cm" svg:y="64.68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0.093cm" svg:y="64.68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39.114cm" svg:y="64.68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37.99cm" svg:y="64.68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0.583cm" svg:y1="64.948cm" svg:x2="-40.133cm" svg:y2="64.938cm">
            <text:p/>
          </draw:line>
          <draw:line draw:style-name="gr488" draw:text-style-name="P15" draw:layer="layout" svg:x1="-39.511cm" svg:y1="64.962cm" svg:x2="-39.088cm" svg:y2="64.951cm">
            <text:p/>
          </draw:line>
          <draw:line draw:style-name="gr488" draw:text-style-name="P15" draw:layer="layout" svg:x1="-38.465cm" svg:y1="64.962cm" svg:x2="-37.95cm" svg:y2="64.965cm">
            <text:p/>
          </draw:line>
        </draw:g>
        <draw:connector draw:style-name="gr489" draw:text-style-name="P7" draw:layer="layout" draw:type="curve" svg:x1="-41.797cm" svg:y1="64.924cm" svg:x2="-42.878cm" svg:y2="64.928cm" svg:d="M-41797 64924c-810 0-270 4-1081 4" svg:viewBox="0 0 1082 5">
          <text:p/>
        </draw:connector>
        <draw:connector draw:style-name="gr489" draw:text-style-name="P7" draw:layer="layout" draw:type="curve" svg:x1="-35.807cm" svg:y1="64.924cm" svg:x2="-36.888cm" svg:y2="64.928cm" svg:d="M-35807 64924c-810 0-270 4-1081 4" svg:viewBox="0 0 1082 5">
          <text:p/>
        </draw:connector>
        <draw:custom-shape draw:style-name="gr481" draw:text-style-name="P133" draw:layer="layout" svg:width="4.16cm" svg:height="0.97cm" svg:x="-35.349cm" svg:y="64.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96" draw:text-style-name="P139" xml:id="id396" draw:id="id396" draw:layer="layout" svg:width="5.693cm" svg:height="3.474cm" svg:x="-16.503cm" svg:y="49.103cm">
          <text:p text:style-name="P5"><text:span text:style-name="T46">Black</text:span><text:span text:style-name="T46">board</text:span><text:span text:style-name="T46"><text:line-break/></text:span><text:span text:style-name="T46">for </text:span><text:span text:style-name="T46">shari</text:span><text:span text:style-name="T46">ng </text:span><text:span text:style-name="T46"><text:line-break/></text:span><text:span text:style-name="T46">each </text:span><text:span text:style-name="T46">robot</text:span><text:span text:style-name="T46">s</text:span><text:span text:style-name="T46"><text:line-break/></text:span><text:span text:style-name="T46">recen</text:span><text:span text:style-name="T46">t </text:span><text:span text:style-name="T46">uttera</text:span><text:span text:style-name="T46">nces</text:span><text:span text:style-name="T46"><text:line-break/></text:span><text:span text:style-name="T46">and </text:span><text:span text:style-name="T46">deco</text:span><text:span text:style-name="T46">ders</text:span><text:span text:style-name="T46"><text:line-break/></text:span><text:span text:style-name="T46">(Stim</text:span><text:span text:style-name="T46">uli </text:span><text:span text:style-name="T46">with </text:span><text:span text:style-name="T46">langu</text:span><text:span text:style-name="T46">age</text:span><text:span text:style-name="T46"><text:line-break/></text:span><text:span text:style-name="T46">medi</text:span><text:span text:style-name="T46">um)</text:span></text:p>
        </draw:rect>
        <draw:connector draw:style-name="gr36" draw:text-style-name="P7" draw:layer="layout" draw:type="curve" svg:x1="-13.656cm" svg:y1="49.103cm" svg:x2="-18.631cm" svg:y2="43.425cm" draw:start-shape="id396" draw:start-glue-point="0" draw:end-shape="id397" draw:end-glue-point="2" svg:d="M-13656 49103c0-4258-4975-1420-4975-5678" svg:viewBox="0 0 4976 5679">
          <text:p/>
        </draw:connector>
        <draw:connector draw:style-name="gr36" draw:text-style-name="P7" draw:layer="layout" draw:type="curve" svg:x1="-23.371cm" svg:y1="42.727cm" svg:x2="-24.444cm" svg:y2="42.727cm" draw:start-shape="id398" draw:start-glue-point="3" draw:end-shape="id399" draw:end-glue-point="1" svg:d="M-23371 42727h-1073" svg:viewBox="0 0 1074 1">
          <text:p/>
        </draw:connector>
        <draw:connector draw:style-name="gr36" draw:text-style-name="P7" draw:layer="layout" draw:type="curve" svg:x1="-19.918cm" svg:y1="42.727cm" svg:x2="-20.797cm" svg:y2="42.727cm" draw:start-shape="id397" draw:start-glue-point="3" draw:end-shape="id398" draw:end-glue-point="1" svg:d="M-19918 42727h-879" svg:viewBox="0 0 880 1">
          <text:p/>
        </draw:connector>
        <draw:connector draw:style-name="gr36" draw:text-style-name="P7" draw:layer="layout" draw:type="curve" svg:x1="-30.222cm" svg:y1="42.794cm" svg:x2="-31.32cm" svg:y2="42.816cm" draw:start-shape="id400" draw:end-shape="id383" draw:end-glue-point="1" svg:d="M-30222 42794c-837 0-288 22-1098 22" svg:viewBox="0 0 1099 23">
          <text:p/>
        </draw:connector>
        <draw:path draw:style-name="gr497" draw:text-style-name="P140" draw:layer="layout" svg:width="23.609cm" svg:height="6.044cm" svg:x="-42.674cm" svg:y="49.187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498" draw:text-style-name="P13" draw:layer="layout" svg:width="3.475cm" svg:height="0.878cm" svg:x="-36.072cm" svg:y="39.061cm">
          <draw:text-box>
            <text:p text:style-name="P3"><text:span text:style-name="T7">Ro</text:span><text:span text:style-name="T7">bot </text:span><text:span text:style-name="T7">1</text:span></text:p>
          </draw:text-box>
        </draw:frame>
        <draw:connector draw:style-name="gr499" draw:text-style-name="P7" draw:layer="layout" draw:type="curve" svg:x1="-20.661cm" svg:y1="51.489cm" svg:x2="-16.503cm" svg:y2="50.84cm" draw:start-shape="id401" draw:start-glue-point="1" draw:end-shape="id396" draw:end-glue-point="3" svg:d="M-20661 51489c3120 0 1041-649 4158-649" svg:viewBox="0 0 4159 650">
          <text:p text:style-name="P5"><text:span text:style-name="T4">Robot 1</text:span><text:span text:style-name="T4"><text:line-break/></text:span><text:span text:style-name="T4">utters</text:span><text:span text:style-name="T4"><text:line-break/></text:span><text:span text:style-name="T4">and </text:span><text:span text:style-name="T4">decode</text:span><text:span text:style-name="T4">r</text:span></text:p>
        </draw:connector>
        <draw:frame draw:style-name="gr500" draw:text-style-name="P13" draw:layer="layout" svg:width="3.475cm" svg:height="0.878cm" svg:x="-30.214cm" svg:y="49.736cm">
          <draw:text-box>
            <text:p text:style-name="P3"><text:span text:style-name="T7">Ro</text:span><text:span text:style-name="T7">bot </text:span><text:span text:style-name="T7">2</text:span></text:p>
          </draw:text-box>
        </draw:frame>
        <draw:g draw:style-name="gr31">
          <draw:custom-shape draw:style-name="gr501" draw:text-style-name="P142" xml:id="id402" draw:id="id402" draw:layer="layout" svg:width="0.891cm" svg:height="0.97cm" svg:x="-59.84cm" svg:y="46.447cm">
            <text:p text:style-name="P141"><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4" draw:id="id404" draw:layer="layout" svg:width="0.891cm" svg:height="0.97cm" svg:x="-59.839cm" svg:y="47.747cm">
            <text:p text:style-name="P141"><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6" draw:id="id406" draw:layer="layout" svg:width="0.891cm" svg:height="0.97cm" svg:x="-59.838cm" svg:y="49.047cm">
            <text:p text:style-name="P141"><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8" draw:id="id408" draw:layer="layout" svg:width="0.891cm" svg:height="0.97cm" svg:x="-59.837cm" svg:y="50.347cm">
            <text:p text:style-name="P141"><text:span text:style-name="T47">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3" draw:id="id403" draw:layer="layout" svg:width="0.891cm" svg:height="0.97cm" svg:x="-56.936cm" svg:y="47.747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5" draw:id="id405" draw:layer="layout" svg:width="0.891cm" svg:height="0.97cm" svg:x="-56.935cm" svg:y="48.847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7" draw:id="id407" draw:layer="layout" svg:width="0.891cm" svg:height="0.97cm" svg:x="-56.934cm" svg:y="49.947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8.949cm" svg:y1="46.932cm" svg:x2="-56.936cm" svg:y2="48.232cm" draw:start-shape="id402" draw:start-glue-point="10" draw:end-shape="id403" draw:end-glue-point="6" svg:d="M-58949 46932l2013 1300" svg:viewBox="0 0 2014 1301">
            <text:p/>
          </draw:connector>
          <draw:connector draw:style-name="gr503" draw:text-style-name="P15" draw:layer="layout" draw:type="line" svg:x1="-58.948cm" svg:y1="48.232cm" svg:x2="-56.935cm" svg:y2="49.332cm" draw:start-shape="id404" draw:start-glue-point="10" draw:end-shape="id405" draw:end-glue-point="6" svg:d="M-58948 48232l2013 1100" svg:viewBox="0 0 2014 1101">
            <text:p/>
          </draw:connector>
          <draw:connector draw:style-name="gr503" draw:text-style-name="P15" draw:layer="layout" draw:type="line" svg:x1="-58.947cm" svg:y1="49.532cm" svg:x2="-56.934cm" svg:y2="50.432cm" draw:start-shape="id406" draw:start-glue-point="10" draw:end-shape="id407" draw:end-glue-point="6" svg:d="M-58947 49532l2013 900" svg:viewBox="0 0 2014 901">
            <text:p/>
          </draw:connector>
          <draw:connector draw:style-name="gr503" draw:text-style-name="P15" draw:layer="layout" draw:type="line" svg:x1="-58.946cm" svg:y1="50.832cm" svg:x2="-56.934cm" svg:y2="50.432cm" draw:start-shape="id408" draw:start-glue-point="10" draw:end-shape="id407" draw:end-glue-point="6" svg:d="M-58946 50832l2012-400" svg:viewBox="0 0 2013 401">
            <text:p/>
          </draw:connector>
          <draw:connector draw:style-name="gr503" draw:text-style-name="P15" draw:layer="layout" draw:type="line" svg:x1="-58.946cm" svg:y1="50.832cm" svg:x2="-56.935cm" svg:y2="49.332cm" draw:start-shape="id408" draw:start-glue-point="10" draw:end-shape="id405" draw:end-glue-point="6" svg:d="M-58946 50832l2011-1500" svg:viewBox="0 0 2012 1501">
            <text:p/>
          </draw:connector>
          <draw:connector draw:style-name="gr503" draw:text-style-name="P15" draw:layer="layout" draw:type="line" svg:x1="-58.946cm" svg:y1="50.832cm" svg:x2="-56.936cm" svg:y2="48.232cm" draw:start-shape="id408" draw:start-glue-point="10" draw:end-shape="id403" draw:end-glue-point="6" svg:d="M-58946 50832l2010-2600" svg:viewBox="0 0 2011 2601">
            <text:p/>
          </draw:connector>
          <draw:connector draw:style-name="gr503" draw:text-style-name="P15" draw:layer="layout" draw:type="line" svg:x1="-58.947cm" svg:y1="49.532cm" svg:x2="-56.935cm" svg:y2="49.332cm" draw:start-shape="id406" draw:start-glue-point="10" draw:end-shape="id405" draw:end-glue-point="6" svg:d="M-58947 49532l2012-200" svg:viewBox="0 0 2013 201">
            <text:p/>
          </draw:connector>
          <draw:connector draw:style-name="gr503" draw:text-style-name="P15" draw:layer="layout" draw:type="line" svg:x1="-58.947cm" svg:y1="49.532cm" svg:x2="-56.936cm" svg:y2="48.232cm" draw:start-shape="id406" draw:start-glue-point="10" draw:end-shape="id403" draw:end-glue-point="6" svg:d="M-58947 49532l2011-1300" svg:viewBox="0 0 2012 1301">
            <text:p/>
          </draw:connector>
          <draw:connector draw:style-name="gr503" draw:text-style-name="P15" draw:layer="layout" draw:type="line" svg:x1="-58.948cm" svg:y1="48.232cm" svg:x2="-56.936cm" svg:y2="48.232cm" draw:start-shape="id404" draw:start-glue-point="10" draw:end-shape="id403" draw:end-glue-point="6" svg:d="M-58948 48232h2012" svg:viewBox="0 0 2013 1">
            <text:p/>
          </draw:connector>
          <draw:connector draw:style-name="gr503" draw:text-style-name="P15" draw:layer="layout" draw:type="line" svg:x1="-58.948cm" svg:y1="48.232cm" svg:x2="-56.934cm" svg:y2="50.432cm" draw:start-shape="id404" draw:start-glue-point="10" draw:end-shape="id407" draw:end-glue-point="6" svg:d="M-58948 48232l2014 2200" svg:viewBox="0 0 2015 2201">
            <text:p/>
          </draw:connector>
          <draw:connector draw:style-name="gr503" draw:text-style-name="P15" draw:layer="layout" draw:type="line" svg:x1="-58.949cm" svg:y1="46.932cm" svg:x2="-56.935cm" svg:y2="49.332cm" draw:start-shape="id402" draw:start-glue-point="10" draw:end-shape="id405" draw:end-glue-point="6" svg:d="M-58949 46932l2014 2400" svg:viewBox="0 0 2015 2401">
            <text:p/>
          </draw:connector>
          <draw:connector draw:style-name="gr503" draw:text-style-name="P15" draw:layer="layout" draw:type="line" svg:x1="-58.949cm" svg:y1="46.932cm" svg:x2="-56.934cm" svg:y2="50.432cm" draw:start-shape="id402" draw:start-glue-point="10" draw:end-shape="id407" draw:end-glue-point="6" svg:d="M-58949 46932l2015 3500" svg:viewBox="0 0 2016 3501">
            <text:p/>
          </draw:connector>
          <draw:custom-shape draw:style-name="gr501" draw:text-style-name="P142" xml:id="id409" draw:id="id409" draw:layer="layout" svg:width="0.891cm" svg:height="0.97cm" svg:x="-54.04cm" svg:y="46.447cm">
            <text:p text:style-name="P144"><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0" draw:id="id410" draw:layer="layout" svg:width="0.891cm" svg:height="0.97cm" svg:x="-54.039cm" svg:y="47.747cm">
            <text:p text:style-name="P144"><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1" draw:id="id411" draw:layer="layout" svg:width="0.891cm" svg:height="0.97cm" svg:x="-54.038cm" svg:y="49.047cm">
            <text:p text:style-name="P144"><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2" draw:id="id412" draw:layer="layout" svg:width="0.891cm" svg:height="0.97cm" svg:x="-54.037cm" svg:y="50.347cm">
            <text:p text:style-name="P144"><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6.045cm" svg:y1="48.232cm" svg:x2="-54.04cm" svg:y2="46.932cm" draw:start-shape="id403" draw:start-glue-point="10" draw:end-shape="id409" draw:end-glue-point="6" svg:d="M-56045 48232l2005-1300" svg:viewBox="0 0 2006 1301">
            <text:p/>
          </draw:connector>
          <draw:connector draw:style-name="gr503" draw:text-style-name="P15" draw:layer="layout" draw:type="line" svg:x1="-56.044cm" svg:y1="48.232cm" svg:x2="-54.039cm" svg:y2="48.232cm" draw:end-shape="id410" draw:end-glue-point="6" svg:d="M-56044 48232h2005" svg:viewBox="0 0 2006 1">
            <text:p/>
          </draw:connector>
          <draw:connector draw:style-name="gr503" draw:text-style-name="P15" draw:layer="layout" draw:type="line" svg:x1="-56.043cm" svg:y1="48.232cm" svg:x2="-54.038cm" svg:y2="49.532cm" draw:end-shape="id411" draw:end-glue-point="6" svg:d="M-56043 48232l2005 1300" svg:viewBox="0 0 2006 1301">
            <text:p/>
          </draw:connector>
          <draw:connector draw:style-name="gr503" draw:text-style-name="P15" xml:id="id427" draw:id="id427" draw:layer="layout" draw:type="line" svg:x1="-56.042cm" svg:y1="48.232cm" svg:x2="-54.037cm" svg:y2="50.832cm" draw:end-shape="id412" draw:end-glue-point="6" svg:d="M-56042 48232l2005 2600" svg:viewBox="0 0 2006 2601">
            <text:p/>
          </draw:connector>
          <draw:connector draw:style-name="gr503" draw:text-style-name="P15" draw:layer="layout" draw:type="line" svg:x1="-56.044cm" svg:y1="49.332cm" svg:x2="-54.04cm" svg:y2="46.932cm" draw:start-shape="id405" draw:start-glue-point="10" draw:end-shape="id409" draw:end-glue-point="6" svg:d="M-56044 49332l2004-2400" svg:viewBox="0 0 2005 2401">
            <text:p/>
          </draw:connector>
          <draw:connector draw:style-name="gr503" draw:text-style-name="P15" draw:layer="layout" draw:type="line" svg:x1="-56.043cm" svg:y1="49.332cm" svg:x2="-54.039cm" svg:y2="48.232cm" draw:end-shape="id410" draw:end-glue-point="6" svg:d="M-56043 49332l2004-1100" svg:viewBox="0 0 2005 1101">
            <text:p/>
          </draw:connector>
          <draw:connector draw:style-name="gr503" draw:text-style-name="P15" draw:layer="layout" draw:type="line" svg:x1="-56.043cm" svg:y1="49.332cm" svg:x2="-54.038cm" svg:y2="49.532cm" draw:end-shape="id411" draw:end-glue-point="6" svg:d="M-56043 49332l2005 200" svg:viewBox="0 0 2006 201">
            <text:p/>
          </draw:connector>
          <draw:connector draw:style-name="gr503" draw:text-style-name="P15" xml:id="id426" draw:id="id426" draw:layer="layout" draw:type="line" svg:x1="-56.042cm" svg:y1="49.332cm" svg:x2="-54.037cm" svg:y2="50.832cm" draw:end-shape="id412" draw:end-glue-point="6" svg:d="M-56042 49332l2005 1500" svg:viewBox="0 0 2006 1501">
            <text:p/>
          </draw:connector>
          <draw:connector draw:style-name="gr503" draw:text-style-name="P15" draw:layer="layout" draw:type="line" svg:x1="-56.043cm" svg:y1="50.432cm" svg:x2="-54.037cm" svg:y2="50.832cm" draw:start-shape="id407" draw:start-glue-point="10" draw:end-shape="id412" draw:end-glue-point="6" svg:d="M-56043 50432l2006 400" svg:viewBox="0 0 2007 401">
            <text:p/>
          </draw:connector>
          <draw:connector draw:style-name="gr503" draw:text-style-name="P15" draw:layer="layout" draw:type="line" svg:x1="-56.042cm" svg:y1="50.432cm" svg:x2="-54.038cm" svg:y2="49.532cm" draw:end-shape="id411" draw:end-glue-point="6" svg:d="M-56042 50432l2004-900" svg:viewBox="0 0 2005 901">
            <text:p/>
          </draw:connector>
          <draw:connector draw:style-name="gr503" draw:text-style-name="P15" draw:layer="layout" draw:type="line" svg:x1="-56.042cm" svg:y1="50.432cm" svg:x2="-54.039cm" svg:y2="48.232cm" draw:end-shape="id410" draw:end-glue-point="6" svg:d="M-56042 50432l2003-2200" svg:viewBox="0 0 2004 2201">
            <text:p/>
          </draw:connector>
          <draw:connector draw:style-name="gr503" draw:text-style-name="P15" draw:layer="layout" draw:type="line" svg:x1="-56.041cm" svg:y1="50.432cm" svg:x2="-54.04cm" svg:y2="46.932cm" draw:end-shape="id409" draw:end-glue-point="6" svg:d="M-56041 50432l2001-3500" svg:viewBox="0 0 2002 3501">
            <text:p/>
          </draw:connector>
          <draw:frame draw:style-name="gr504" draw:text-style-name="P38" draw:layer="layout" svg:width="2.903cm" svg:height="0.725cm" svg:x="-58.103cm" svg:y="56.045cm">
            <draw:text-box>
              <text:p>Autoencoder</text:p>
            </draw:text-box>
          </draw:frame>
          <draw:line draw:style-name="gr505" draw:text-style-name="P15" draw:layer="layout" svg:x1="-56.789cm" svg:y1="55.649cm" svg:x2="-59.907cm" svg:y2="55.64cm">
            <text:p/>
          </draw:line>
          <draw:line draw:style-name="gr506" draw:text-style-name="P15" draw:layer="layout" svg:x1="-56.389cm" svg:y1="55.65cm" svg:x2="-53.349cm" svg:y2="55.596cm">
            <text:p/>
          </draw:line>
          <draw:frame draw:style-name="gr507" draw:text-style-name="P38" draw:layer="layout" svg:width="2.22cm" svg:height="0.725cm" svg:x="-56.043cm" svg:y="55.031cm">
            <draw:text-box>
              <text:p>decoding</text:p>
            </draw:text-box>
          </draw:frame>
          <draw:frame draw:style-name="gr507" draw:text-style-name="P38" draw:layer="layout" svg:width="2.22cm" svg:height="0.725cm" svg:x="-59.124cm" svg:y="55.014cm">
            <draw:text-box>
              <text:p>encoding</text:p>
            </draw:text-box>
          </draw:frame>
          <draw:g draw:style-name="gr23">
            <draw:polygon draw:style-name="gr508" draw:text-style-name="P145" draw:layer="layout" svg:width="1.215cm" svg:height="1.383cm" svg:x="-58.949cm" svg:y="57.122cm" svg:viewBox="0 0 1216 1384" draw:points="1216,1384 0,792 0,591 1216,0">
              <text:p/>
            </draw:polygon>
            <draw:frame draw:style-name="gr509" draw:text-style-name="P146" draw:layer="layout" svg:width="1.527cm" svg:height="0.569cm" svg:x="-59.05cm" svg:y="57.52cm">
              <draw:text-box>
                <text:p><text:span text:style-name="T49">d</text:span><text:span text:style-name="T49">e</text:span><text:span text:style-name="T49">c</text:span><text:span text:style-name="T49">o</text:span><text:span text:style-name="T49">d</text:span><text:span text:style-name="T49">e</text:span><text:span text:style-name="T49">r</text:span></text:p>
              </draw:text-box>
            </draw:frame>
          </draw:g>
          <draw:g draw:style-name="gr31">
            <draw:g draw:style-name="gr23">
              <draw:polygon draw:style-name="gr510" draw:text-style-name="P113" draw:layer="layout" svg:width="1.179cm" svg:height="1.358cm" svg:x="-55.796cm" svg:y="57.231cm" svg:viewBox="0 0 1180 1359" draw:points="0,0 1180,581 1180,777 0,1359">
                <text:p/>
              </draw:polygon>
            </draw:g>
            <draw:frame draw:style-name="gr484" draw:text-style-name="P11" draw:layer="layout" svg:width="1.527cm" svg:height="0.57cm" svg:x="-56.027cm" svg:y="57.594cm">
              <draw:text-box>
                <text:p><text:span text:style-name="T49">e</text:span><text:span text:style-name="T49">n</text:span><text:span text:style-name="T49">c</text:span><text:span text:style-name="T49">o</text:span><text:span text:style-name="T49">d</text:span><text:span text:style-name="T49">e</text:span><text:span text:style-name="T49">r</text:span></text:p>
              </draw:text-box>
            </draw:frame>
          </draw:g>
          <draw:custom-shape draw:style-name="gr511" draw:text-style-name="P148" xml:id="id413" draw:id="id413" draw:layer="layout" svg:width="1.34cm" svg:height="1.458cm" svg:x="-72.248cm" svg:y="53.908cm">
            <text:p text:style-name="P147"><text:span text:style-name="T46">r</text:span><text:span text:style-name="T5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50" xml:id="id415" draw:id="id415" draw:layer="layout" svg:width="1.34cm" svg:height="1.458cm" svg:x="-72.248cm" svg:y="55.863cm">
            <text:p text:style-name="P149"><text:span text:style-name="T46">r</text:span><text:span text:style-name="T50">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4" draw:id="id414" draw:layer="layout" svg:width="1.34cm" svg:height="1.458cm" svg:x="-67.882cm" svg:y="54.209cm">
            <text:p text:style-name="P151"><text:span text:style-name="T51">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6" draw:id="id416" draw:layer="layout" svg:width="1.34cm" svg:height="1.458cm" svg:x="-67.882cm" svg:y="55.863cm">
            <text:p text:style-name="P151"><text:span text:style-name="T51">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7" draw:id="id417" draw:layer="layout" svg:width="1.34cm" svg:height="1.458cm" svg:x="-67.882cm" svg:y="57.517cm">
            <text:p text:style-name="P151"><text:span text:style-name="T51">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70.908cm" svg:y1="54.637cm" svg:x2="-67.882cm" svg:y2="54.938cm" draw:start-shape="id413" draw:start-glue-point="10" draw:end-shape="id414" draw:end-glue-point="6" svg:d="M-70908 54637l3026 301" svg:viewBox="0 0 3027 302">
            <text:p/>
          </draw:connector>
          <draw:connector draw:style-name="gr503" draw:text-style-name="P15" draw:layer="layout" draw:type="line" svg:x1="-70.908cm" svg:y1="56.592cm" svg:x2="-67.882cm" svg:y2="56.592cm" draw:start-shape="id415" draw:start-glue-point="10" draw:end-shape="id416" draw:end-glue-point="6" svg:d="M-70908 56592h3026" svg:viewBox="0 0 3027 1">
            <text:p/>
          </draw:connector>
          <draw:connector draw:style-name="gr503" draw:text-style-name="P15" draw:layer="layout" draw:type="line" svg:x1="-70.908cm" svg:y1="56.592cm" svg:x2="-67.882cm" svg:y2="54.938cm" draw:start-shape="id415" draw:start-glue-point="10" draw:end-shape="id414" draw:end-glue-point="6" svg:d="M-70908 56592l3026-1654" svg:viewBox="0 0 3027 1655">
            <text:p/>
          </draw:connector>
          <draw:connector draw:style-name="gr503" draw:text-style-name="P15" draw:layer="layout" draw:type="line" svg:x1="-70.908cm" svg:y1="56.592cm" svg:x2="-67.882cm" svg:y2="58.246cm" draw:start-shape="id415" draw:start-glue-point="10" draw:end-shape="id417" draw:end-glue-point="6" svg:d="M-70908 56592l3026 1654" svg:viewBox="0 0 3027 1655">
            <text:p/>
          </draw:connector>
          <draw:connector draw:style-name="gr503" draw:text-style-name="P15" draw:layer="layout" draw:type="line" svg:x1="-70.908cm" svg:y1="54.637cm" svg:x2="-67.882cm" svg:y2="56.592cm" draw:start-shape="id413" draw:start-glue-point="10" draw:end-shape="id416" draw:end-glue-point="6" svg:d="M-70908 54637l3026 1955" svg:viewBox="0 0 3027 1956">
            <text:p/>
          </draw:connector>
          <draw:connector draw:style-name="gr503" draw:text-style-name="P15" draw:layer="layout" draw:type="line" svg:x1="-70.908cm" svg:y1="54.637cm" svg:x2="-67.882cm" svg:y2="58.246cm" draw:start-shape="id413" draw:start-glue-point="10" draw:end-shape="id417" draw:end-glue-point="6" svg:d="M-70908 54637l3026 3609" svg:viewBox="0 0 3027 3610">
            <text:p/>
          </draw:connector>
          <draw:custom-shape draw:style-name="gr513" draw:text-style-name="P154" xml:id="id418" draw:id="id418" draw:layer="layout" svg:width="1.34cm" svg:height="1.458cm" svg:x="-63.523cm" svg:y="53.908cm">
            <text:p text:style-name="P153"><text:span text:style-name="T52">r</text:span><text:span text:style-name="T5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4" draw:text-style-name="P154" xml:id="id419" draw:id="id419" draw:layer="layout" svg:width="1.34cm" svg:height="1.458cm" svg:x="-63.523cm" svg:y="55.863cm">
            <text:p text:style-name="P153"><text:span text:style-name="T52">r</text:span><text:span text:style-name="T5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66.542cm" svg:y1="54.938cm" svg:x2="-63.523cm" svg:y2="54.637cm" draw:start-shape="id414" draw:start-glue-point="10" draw:end-shape="id418" draw:end-glue-point="6" svg:d="M-66542 54938l3019-301" svg:viewBox="0 0 3020 302">
            <text:p/>
          </draw:connector>
          <draw:connector draw:style-name="gr503" draw:text-style-name="P15" draw:layer="layout" draw:type="line" svg:x1="-66.542cm" svg:y1="54.938cm" svg:x2="-63.523cm" svg:y2="56.592cm" draw:start-shape="id414" draw:start-glue-point="10" draw:end-shape="id419" draw:end-glue-point="6" svg:d="M-66542 54938l3019 1654" svg:viewBox="0 0 3020 1655">
            <text:p/>
          </draw:connector>
          <draw:connector draw:style-name="gr503" draw:text-style-name="P15" xml:id="id420" draw:id="id420" draw:layer="layout" draw:type="line" svg:x1="-66.542cm" svg:y1="56.592cm" svg:x2="-63.526cm" svg:y2="54.637cm" draw:start-shape="id416" draw:start-glue-point="10" svg:d="M-66542 56592l3016-1955" svg:viewBox="0 0 3017 1956">
            <text:p/>
          </draw:connector>
          <draw:connector draw:style-name="gr503" draw:text-style-name="P15" draw:layer="layout" draw:type="line" svg:x1="-66.542cm" svg:y1="56.592cm" svg:x2="-63.523cm" svg:y2="56.592cm" draw:start-shape="id416" draw:start-glue-point="10" draw:end-shape="id419" draw:end-glue-point="6" svg:d="M-66542 56592h3019" svg:viewBox="0 0 3020 1">
            <text:p/>
          </draw:connector>
          <draw:connector draw:style-name="gr503" draw:text-style-name="P15" draw:layer="layout" draw:type="line" svg:x1="-66.542cm" svg:y1="58.246cm" svg:x2="-63.523cm" svg:y2="56.592cm" draw:start-shape="id417" draw:start-glue-point="10" draw:end-shape="id419" draw:end-glue-point="6" svg:d="M-66542 58246l3019-1654" svg:viewBox="0 0 3020 1655">
            <text:p/>
          </draw:connector>
          <draw:connector draw:style-name="gr503" draw:text-style-name="P15" draw:layer="layout" draw:type="line" svg:x1="-66.542cm" svg:y1="58.246cm" svg:x2="-63.526cm" svg:y2="54.637cm" draw:start-shape="id417" draw:start-glue-point="10" draw:end-shape="id420" draw:end-glue-point="3" svg:d="M-66542 58246l3016-3609" svg:viewBox="0 0 3017 3610">
            <text:p/>
          </draw:connector>
          <draw:frame draw:style-name="gr515" draw:text-style-name="P38" draw:layer="layout" svg:width="4.668cm" svg:height="3.095cm" svg:x="-65.318cm" svg:y="48.985cm">
            <draw:text-box>
              <text:p>Continue<text:line-break/>back decoding<text:line-break/>until the parameters<text:line-break/>each parameter<text:line-break/>one node for AE <text:line-break/>for the action potential</text:p>
            </draw:text-box>
          </draw:frame>
          <draw:custom-shape draw:style-name="gr512" draw:text-style-name="P152" xml:id="id421" draw:id="id421" draw:layer="layout" svg:width="1.34cm" svg:height="1.458cm" svg:x="-67.882cm" svg:y="59.321cm">
            <text:p text:style-name="P151"><text:span text:style-name="T51">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xml:id="id423" draw:id="id423" draw:layer="layout" draw:type="line" svg:x1="-66.542cm" svg:y1="60.05cm" svg:x2="-63.526cm" svg:y2="54.637cm" draw:start-shape="id421" draw:start-glue-point="10" svg:d="M-66542 60050l3016-5413" svg:viewBox="0 0 3017 5414">
            <text:p/>
          </draw:connector>
          <draw:connector draw:style-name="gr503" draw:text-style-name="P15" draw:layer="layout" draw:type="line" svg:x1="-66.542cm" svg:y1="60.05cm" svg:x2="-63.523cm" svg:y2="56.592cm" draw:start-shape="id421" draw:start-glue-point="10" draw:end-shape="id419" draw:end-glue-point="6" svg:d="M-66542 60050l3019-3458" svg:viewBox="0 0 3020 3459">
            <text:p/>
          </draw:connector>
          <draw:connector draw:style-name="gr503" draw:text-style-name="P15" draw:layer="layout" draw:type="line" svg:x1="-70.908cm" svg:y1="56.592cm" svg:x2="-67.882cm" svg:y2="60.05cm" draw:start-shape="id415" draw:start-glue-point="10" draw:end-shape="id421" draw:end-glue-point="6" svg:d="M-70908 56592l3026 3458" svg:viewBox="0 0 3027 3459">
            <text:p/>
          </draw:connector>
          <draw:connector draw:style-name="gr503" draw:text-style-name="P15" draw:layer="layout" draw:type="line" svg:x1="-70.908cm" svg:y1="54.637cm" svg:x2="-67.882cm" svg:y2="60.05cm" draw:start-shape="id413" draw:start-glue-point="10" draw:end-shape="id421" draw:end-glue-point="6" svg:d="M-70908 54637l3026 5413" svg:viewBox="0 0 3027 5414">
            <text:p/>
          </draw:connector>
          <draw:custom-shape draw:style-name="gr516" draw:text-style-name="P152" xml:id="id422" draw:id="id422" draw:layer="layout" svg:width="1.34cm" svg:height="1.459cm" svg:x="-67.882cm" svg:y="61.125cm">
            <text:p text:style-name="P151"><text:span text:style-name="T5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66.542cm" svg:y1="61.855cm" svg:x2="-63.523cm" svg:y2="56.592cm" draw:start-shape="id422" draw:start-glue-point="10" draw:end-shape="id419" draw:end-glue-point="6" svg:d="M-66542 61855l3019-5263" svg:viewBox="0 0 3020 5264">
            <text:p/>
          </draw:connector>
          <draw:connector draw:style-name="gr503" draw:text-style-name="P15" draw:layer="layout" draw:type="line" svg:x1="-66.542cm" svg:y1="61.855cm" svg:x2="-63.526cm" svg:y2="54.637cm" draw:start-shape="id422" draw:start-glue-point="10" draw:end-shape="id423" draw:end-glue-point="3" svg:d="M-66542 61855l3016-7218" svg:viewBox="0 0 3017 7219">
            <text:p/>
          </draw:connector>
          <draw:connector draw:style-name="gr503" draw:text-style-name="P15" draw:layer="layout" draw:type="line" svg:x1="-70.908cm" svg:y1="56.592cm" svg:x2="-67.882cm" svg:y2="61.855cm" draw:start-shape="id415" draw:start-glue-point="10" draw:end-shape="id422" draw:end-glue-point="6" svg:d="M-70908 56592l3026 5263" svg:viewBox="0 0 3027 5264">
            <text:p/>
          </draw:connector>
          <draw:connector draw:style-name="gr503" draw:text-style-name="P15" draw:layer="layout" draw:type="line" svg:x1="-70.908cm" svg:y1="54.637cm" svg:x2="-67.882cm" svg:y2="61.855cm" draw:start-shape="id413" draw:start-glue-point="10" draw:end-shape="id422" draw:end-glue-point="6" svg:d="M-70908 54637l3026 7218" svg:viewBox="0 0 3027 7219">
            <text:p/>
          </draw:connector>
          <draw:custom-shape draw:style-name="gr501" draw:text-style-name="P142" xml:id="id424" draw:id="id424" draw:layer="layout" svg:width="0.891cm" svg:height="0.97cm" svg:x="-59.836cm" svg:y="51.54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25" draw:id="id425" draw:layer="layout" svg:width="0.891cm" svg:height="0.97cm" svg:x="-54.035cm" svg:y="51.54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8.945cm" svg:y1="52.032cm" svg:x2="-56.934cm" svg:y2="50.432cm" draw:start-shape="id424" draw:start-glue-point="10" svg:d="M-58945 52032l2011-1600" svg:viewBox="0 0 2012 1601">
            <text:p/>
          </draw:connector>
          <draw:connector draw:style-name="gr503" draw:text-style-name="P15" draw:layer="layout" draw:type="line" svg:x1="-58.945cm" svg:y1="52.032cm" svg:x2="-56.935cm" svg:y2="49.332cm" draw:start-shape="id424" draw:start-glue-point="10" draw:end-shape="id405" draw:end-glue-point="6" svg:d="M-58945 52032l2010-2700" svg:viewBox="0 0 2011 2701">
            <text:p/>
          </draw:connector>
          <draw:connector draw:style-name="gr503" draw:text-style-name="P15" draw:layer="layout" draw:type="line" svg:x1="-58.945cm" svg:y1="52.032cm" svg:x2="-56.936cm" svg:y2="48.232cm" draw:start-shape="id424" draw:start-glue-point="10" draw:end-shape="id403" draw:end-glue-point="6" svg:d="M-58945 52032l2009-3800" svg:viewBox="0 0 2010 3801">
            <text:p/>
          </draw:connector>
          <draw:connector draw:style-name="gr503" draw:text-style-name="P15" draw:layer="layout" draw:type="line" svg:x1="-56.042cm" svg:y1="50.432cm" svg:x2="-54.035cm" svg:y2="52.032cm" draw:end-shape="id425" draw:end-glue-point="6" svg:d="M-56042 50432l2007 1600" svg:viewBox="0 0 2008 1601">
            <text:p/>
          </draw:connector>
          <draw:connector draw:style-name="gr503" draw:text-style-name="P15" draw:layer="layout" draw:type="line" svg:x1="-56.042cm" svg:y1="49.332cm" svg:x2="-54.035cm" svg:y2="52.032cm" draw:start-shape="id426" draw:start-glue-point="2" draw:end-shape="id425" draw:end-glue-point="6" svg:d="M-56042 49332l2007 2700" svg:viewBox="0 0 2008 2701">
            <text:p/>
          </draw:connector>
          <draw:connector draw:style-name="gr503" draw:text-style-name="P15" draw:layer="layout" draw:type="line" svg:x1="-56.042cm" svg:y1="48.232cm" svg:x2="-54.035cm" svg:y2="52.032cm" draw:start-shape="id427" draw:start-glue-point="2" draw:end-shape="id425" draw:end-glue-point="6" svg:d="M-56042 48232l2007 3800" svg:viewBox="0 0 2008 3801">
            <text:p/>
          </draw:connector>
          <draw:custom-shape draw:style-name="gr511" draw:text-style-name="P150" xml:id="id429" draw:id="id429" draw:layer="layout" svg:width="1.34cm" svg:height="1.458cm" svg:x="-63.502cm" svg:y="61.632cm">
            <text:p text:style-name="P149"><text:span text:style-name="T46">r</text:span><text:span text:style-name="T50">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48" xml:id="id428" draw:id="id428" draw:layer="layout" svg:width="1.34cm" svg:height="1.458cm" svg:x="-72.221cm" svg:y="61.632cm">
            <text:p text:style-name="P147"><text:span text:style-name="T46">r</text:span><text:span text:style-name="T50">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70.881cm" svg:y1="62.361cm" svg:x2="-67.882cm" svg:y2="61.855cm" draw:start-shape="id428" draw:start-glue-point="10" draw:end-shape="id422" draw:end-glue-point="6" svg:d="M-70881 62361l2999-506" svg:viewBox="0 0 3000 507">
            <text:p/>
          </draw:connector>
          <draw:connector draw:style-name="gr503" draw:text-style-name="P15" draw:layer="layout" draw:type="line" svg:x1="-70.881cm" svg:y1="62.363cm" svg:x2="-67.882cm" svg:y2="60.05cm" draw:end-shape="id421" draw:end-glue-point="6" svg:d="M-70881 62363l2999-2313" svg:viewBox="0 0 3000 2314">
            <text:p/>
          </draw:connector>
          <draw:connector draw:style-name="gr503" draw:text-style-name="P15" draw:layer="layout" draw:type="line" svg:x1="-70.88cm" svg:y1="62.363cm" svg:x2="-67.882cm" svg:y2="58.246cm" draw:end-shape="id417" draw:end-glue-point="6" svg:d="M-70880 62363l2998-4117" svg:viewBox="0 0 2999 4118">
            <text:p/>
          </draw:connector>
          <draw:connector draw:style-name="gr503" draw:text-style-name="P15" draw:layer="layout" draw:type="line" svg:x1="-70.88cm" svg:y1="62.363cm" svg:x2="-67.882cm" svg:y2="56.592cm" draw:end-shape="id416" draw:end-glue-point="6" svg:d="M-70880 62363l2998-5771" svg:viewBox="0 0 2999 5772">
            <text:p/>
          </draw:connector>
          <draw:connector draw:style-name="gr503" draw:text-style-name="P15" draw:layer="layout" draw:type="line" svg:x1="-70.88cm" svg:y1="62.363cm" svg:x2="-67.882cm" svg:y2="54.938cm" draw:end-shape="id414" draw:end-glue-point="6" svg:d="M-70880 62363l2998-7425" svg:viewBox="0 0 2999 7426">
            <text:p/>
          </draw:connector>
          <draw:connector draw:style-name="gr503" draw:text-style-name="P15" draw:layer="layout" draw:type="line" svg:x1="-66.542cm" svg:y1="61.855cm" svg:x2="-63.502cm" svg:y2="62.361cm" draw:start-shape="id422" draw:start-glue-point="10" draw:end-shape="id429" draw:end-glue-point="6" svg:d="M-66542 61855l3040 506" svg:viewBox="0 0 3041 507">
            <text:p/>
          </draw:connector>
          <draw:connector draw:style-name="gr503" draw:text-style-name="P15" draw:layer="layout" draw:type="line" svg:x1="-66.542cm" svg:y1="60.05cm" svg:x2="-63.5cm" svg:y2="62.363cm" draw:start-shape="id421" draw:start-glue-point="10" svg:d="M-66542 60050l3042 2313" svg:viewBox="0 0 3043 2314">
            <text:p/>
          </draw:connector>
          <draw:connector draw:style-name="gr503" draw:text-style-name="P15" draw:layer="layout" draw:type="line" svg:x1="-66.542cm" svg:y1="58.246cm" svg:x2="-63.499cm" svg:y2="62.363cm" draw:start-shape="id417" draw:start-glue-point="10" svg:d="M-66542 58246l3043 4117" svg:viewBox="0 0 3044 4118">
            <text:p/>
          </draw:connector>
          <draw:connector draw:style-name="gr503" draw:text-style-name="P15" draw:layer="layout" draw:type="line" svg:x1="-66.542cm" svg:y1="56.592cm" svg:x2="-63.499cm" svg:y2="62.363cm" draw:start-shape="id416" draw:start-glue-point="10" svg:d="M-66542 56592l3043 5771" svg:viewBox="0 0 3044 5772">
            <text:p/>
          </draw:connector>
          <draw:connector draw:style-name="gr503" draw:text-style-name="P15" draw:layer="layout" draw:type="line" svg:x1="-66.542cm" svg:y1="54.938cm" svg:x2="-63.499cm" svg:y2="62.363cm" draw:start-shape="id414" draw:start-glue-point="10" svg:d="M-66542 54938l3043 7425" svg:viewBox="0 0 3044 7426">
            <text:p/>
          </draw:connector>
          <draw:custom-shape draw:style-name="gr517" draw:text-style-name="P41" draw:layer="layout" svg:width="0.643cm" svg:height="5.878cm" svg:x="-53.044cm" svg:y="46.5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18" draw:text-style-name="P38" draw:layer="layout" svg:width="1.89cm" svg:height="1.673cm" svg:x="-52.41cm" svg:y="48.679cm">
            <draw:text-box>
              <text:p>Fusion <text:line-break/>from <text:line-break/>traces</text:p>
            </draw:text-box>
          </draw:frame>
          <draw:custom-shape draw:style-name="gr519" draw:text-style-name="P41" draw:layer="layout" svg:width="1.563cm" svg:height="9.521cm" svg:x="-74.077cm" svg:y="53.544cm">
            <text:p/>
            <draw:enhanced-geometry svg:viewBox="0 0 21600 21600" draw:mirror-horizontal="false" draw:mirror-vertical="false"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20" draw:text-style-name="P38" draw:layer="layout" svg:width="4.836cm" svg:height="3.941cm" svg:x="-75.667cm" svg:y="57.84cm">
            <draw:text-box>
              <text:p>Lidar<text:line-break/>trace</text:p>
            </draw:text-box>
          </draw:frame>
          <draw:frame draw:style-name="gr135" draw:text-style-name="P41" draw:layer="layout" svg:width="4.004cm" svg:height="2.423cm" svg:x="-70.533cm" svg:y="44.08cm">
            <draw:image xlink:href="Pictures/10000000000002C5000001ADB823F0C7.png" xlink:type="simple" xlink:show="embed" xlink:actuate="onLoad" draw:mime-type="image/png">
              <text:p/>
            </draw:image>
          </draw:frame>
          <draw:frame draw:style-name="gr135" draw:text-style-name="P41" draw:layer="layout" svg:width="2.664cm" svg:height="1.582cm" svg:x="-69.357cm" svg:y="48.757cm">
            <draw:image xlink:href="Pictures/1000099600004225000027461A447516.svg" xlink:type="simple" xlink:show="embed" xlink:actuate="onLoad" draw:mime-type="image/svg+xml">
              <text:p/>
            </draw:image>
            <draw:image xlink:href="Pictures/10000001000002800000017C0782A2E4.png" xlink:type="simple" xlink:show="embed" xlink:actuate="onLoad" draw:mime-type="image/png"/>
          </draw:frame>
          <draw:frame draw:style-name="gr135" draw:text-style-name="P41" draw:layer="layout" svg:width="2.706cm" svg:height="1.606cm" svg:x="-71.281cm" svg:y="49.419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2.366cm" svg:height="1.405cm" svg:x="-71.165cm" svg:y="47.835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521" draw:text-style-name="P5" draw:layer="layout" svg:width="5.095cm" svg:height="0.907cm" svg:x="-70.141cm" svg:y="46.785cm">
            <draw:object xlink:href="./Object 7" xlink:type="simple" xlink:show="embed" xlink:actuate="onLoad">
              <loext:p/>
            </draw:object>
            <draw:image xlink:href="./ObjectReplacements/Object 7" xlink:type="simple" xlink:show="embed" xlink:actuate="onLoad"/>
          </draw:frame>
          <draw:custom-shape draw:style-name="gr501" draw:text-style-name="P142" xml:id="id430" draw:id="id430" draw:layer="layout" svg:width="0.891cm" svg:height="0.97cm" svg:x="-58.855cm" svg:y="60.441cm">
            <text:p text:style-name="P141"><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2" draw:id="id432" draw:layer="layout" svg:width="0.891cm" svg:height="0.97cm" svg:x="-58.855cm" svg:y="61.741cm">
            <text:p text:style-name="P141"><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4" draw:id="id434" draw:layer="layout" svg:width="0.891cm" svg:height="0.97cm" svg:x="-58.855cm" svg:y="63.041cm">
            <text:p text:style-name="P141"><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6" xml:id="id431" draw:id="id431" draw:layer="layout" svg:width="0.891cm" svg:height="0.97cm" svg:x="-55.951cm" svg:y="60.041cm">
            <text:p text:style-name="P155"><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6" xml:id="id433" draw:id="id433" draw:layer="layout" svg:width="0.891cm" svg:height="0.97cm" svg:x="-55.951cm" svg:y="61.141cm">
            <text:p text:style-name="P155"><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6" xml:id="id435" draw:id="id435" draw:layer="layout" svg:width="0.891cm" svg:height="0.97cm" svg:x="-55.951cm" svg:y="62.241cm">
            <text:p text:style-name="P155"><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7.964cm" svg:y1="60.926cm" svg:x2="-55.951cm" svg:y2="60.526cm" draw:start-shape="id430" draw:start-glue-point="10" draw:end-shape="id431" draw:end-glue-point="6" svg:d="M-57964 60926l2013-400" svg:viewBox="0 0 2014 401">
            <text:p/>
          </draw:connector>
          <draw:connector draw:style-name="gr503" draw:text-style-name="P15" draw:layer="layout" draw:type="line" svg:x1="-57.964cm" svg:y1="62.226cm" svg:x2="-55.951cm" svg:y2="61.626cm" draw:start-shape="id432" draw:start-glue-point="10" draw:end-shape="id433" draw:end-glue-point="6" svg:d="M-57964 62226l2013-600" svg:viewBox="0 0 2014 601">
            <text:p/>
          </draw:connector>
          <draw:connector draw:style-name="gr503" draw:text-style-name="P15" draw:layer="layout" draw:type="line" svg:x1="-57.964cm" svg:y1="63.526cm" svg:x2="-55.951cm" svg:y2="62.726cm" draw:start-shape="id434" draw:start-glue-point="10" draw:end-shape="id435" draw:end-glue-point="6" svg:d="M-57964 63526l2013-800" svg:viewBox="0 0 2014 801">
            <text:p/>
          </draw:connector>
          <draw:connector draw:style-name="gr503" draw:text-style-name="P15" draw:layer="layout" draw:type="line" svg:x1="-57.964cm" svg:y1="63.526cm" svg:x2="-55.951cm" svg:y2="61.626cm" draw:start-shape="id434" draw:start-glue-point="10" draw:end-shape="id433" draw:end-glue-point="6" svg:d="M-57964 63526l2013-1900" svg:viewBox="0 0 2014 1901">
            <text:p/>
          </draw:connector>
          <draw:connector draw:style-name="gr503" draw:text-style-name="P15" draw:layer="layout" draw:type="line" svg:x1="-57.964cm" svg:y1="63.526cm" svg:x2="-55.951cm" svg:y2="60.526cm" draw:start-shape="id434" draw:start-glue-point="10" draw:end-shape="id431" draw:end-glue-point="6" svg:d="M-57964 63526l2013-3000" svg:viewBox="0 0 2014 3001">
            <text:p/>
          </draw:connector>
          <draw:connector draw:style-name="gr503" draw:text-style-name="P15" draw:layer="layout" draw:type="line" svg:x1="-57.964cm" svg:y1="62.226cm" svg:x2="-55.951cm" svg:y2="60.526cm" draw:start-shape="id432" draw:start-glue-point="10" draw:end-shape="id431" draw:end-glue-point="6" svg:d="M-57964 62226l2013-1700" svg:viewBox="0 0 2014 1701">
            <text:p/>
          </draw:connector>
          <draw:connector draw:style-name="gr503" draw:text-style-name="P15" draw:layer="layout" draw:type="line" svg:x1="-57.964cm" svg:y1="62.226cm" svg:x2="-55.951cm" svg:y2="62.726cm" draw:start-shape="id432" draw:start-glue-point="10" draw:end-shape="id435" draw:end-glue-point="6" svg:d="M-57964 62226l2013 500" svg:viewBox="0 0 2014 501">
            <text:p/>
          </draw:connector>
          <draw:connector draw:style-name="gr503" draw:text-style-name="P15" draw:layer="layout" draw:type="line" svg:x1="-57.964cm" svg:y1="60.926cm" svg:x2="-55.951cm" svg:y2="61.626cm" draw:start-shape="id430" draw:start-glue-point="10" draw:end-shape="id433" draw:end-glue-point="6" svg:d="M-57964 60926l2013 700" svg:viewBox="0 0 2014 701">
            <text:p/>
          </draw:connector>
          <draw:connector draw:style-name="gr503" draw:text-style-name="P15" draw:layer="layout" draw:type="line" svg:x1="-57.964cm" svg:y1="60.926cm" svg:x2="-55.951cm" svg:y2="62.726cm" draw:start-shape="id430" draw:start-glue-point="10" draw:end-shape="id435" draw:end-glue-point="6" svg:d="M-57964 60926l2013 1800" svg:viewBox="0 0 2014 1801">
            <text:p/>
          </draw:connector>
          <draw:custom-shape draw:style-name="gr522" draw:text-style-name="P158" xml:id="id436" draw:id="id436" draw:layer="layout" svg:width="0.891cm" svg:height="0.97cm" svg:x="-53.052cm" svg:y="60.441cm">
            <text:p text:style-name="P157"><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58" xml:id="id437" draw:id="id437" draw:layer="layout" svg:width="0.891cm" svg:height="0.97cm" svg:x="-53.052cm" svg:y="61.741cm">
            <text:p text:style-name="P157"><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8" xml:id="id438" draw:id="id438" draw:layer="layout" svg:width="0.891cm" svg:height="0.97cm" svg:x="-53.052cm" svg:y="63.041cm">
            <text:p text:style-name="P157"><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5.06cm" svg:y1="60.526cm" svg:x2="-53.052cm" svg:y2="60.926cm" draw:start-shape="id431" draw:start-glue-point="10" draw:end-shape="id436" draw:end-glue-point="6" svg:d="M-55060 60526l2008 400" svg:viewBox="0 0 2009 401">
            <text:p/>
          </draw:connector>
          <draw:connector draw:style-name="gr503" draw:text-style-name="P15" draw:layer="layout" draw:type="line" svg:x1="-55.06cm" svg:y1="60.526cm" svg:x2="-53.052cm" svg:y2="62.226cm" draw:start-shape="id431" draw:start-glue-point="10" draw:end-shape="id437" draw:end-glue-point="6" svg:d="M-55060 60526l2008 1700" svg:viewBox="0 0 2009 1701">
            <text:p/>
          </draw:connector>
          <draw:connector draw:style-name="gr503" draw:text-style-name="P15" draw:layer="layout" draw:type="line" svg:x1="-55.06cm" svg:y1="60.526cm" svg:x2="-53.052cm" svg:y2="63.526cm" draw:start-shape="id431" draw:start-glue-point="10" draw:end-shape="id438" draw:end-glue-point="6" svg:d="M-55060 60526l2008 3000" svg:viewBox="0 0 2009 3001">
            <text:p/>
          </draw:connector>
          <draw:connector draw:style-name="gr503" draw:text-style-name="P15" draw:layer="layout" draw:type="line" svg:x1="-55.06cm" svg:y1="61.626cm" svg:x2="-53.052cm" svg:y2="60.926cm" draw:start-shape="id433" draw:start-glue-point="10" draw:end-shape="id436" draw:end-glue-point="6" svg:d="M-55060 61626l2008-700" svg:viewBox="0 0 2009 701">
            <text:p/>
          </draw:connector>
          <draw:connector draw:style-name="gr503" draw:text-style-name="P15" draw:layer="layout" draw:type="line" svg:x1="-55.06cm" svg:y1="61.626cm" svg:x2="-53.052cm" svg:y2="62.226cm" draw:start-shape="id433" draw:start-glue-point="10" draw:end-shape="id437" draw:end-glue-point="6" svg:d="M-55060 61626l2008 600" svg:viewBox="0 0 2009 601">
            <text:p/>
          </draw:connector>
          <draw:connector draw:style-name="gr503" draw:text-style-name="P15" draw:layer="layout" draw:type="line" svg:x1="-55.06cm" svg:y1="61.626cm" svg:x2="-53.052cm" svg:y2="63.526cm" draw:start-shape="id433" draw:start-glue-point="10" draw:end-shape="id438" draw:end-glue-point="6" svg:d="M-55060 61626l2008 1900" svg:viewBox="0 0 2009 1901">
            <text:p/>
          </draw:connector>
          <draw:connector draw:style-name="gr503" draw:text-style-name="P15" draw:layer="layout" draw:type="line" svg:x1="-55.06cm" svg:y1="62.726cm" svg:x2="-53.052cm" svg:y2="63.526cm" draw:start-shape="id435" draw:start-glue-point="10" draw:end-shape="id438" draw:end-glue-point="6" svg:d="M-55060 62726l2008 800" svg:viewBox="0 0 2009 801">
            <text:p/>
          </draw:connector>
          <draw:connector draw:style-name="gr503" draw:text-style-name="P15" draw:layer="layout" draw:type="line" svg:x1="-55.06cm" svg:y1="62.726cm" svg:x2="-53.052cm" svg:y2="62.226cm" draw:start-shape="id435" draw:start-glue-point="10" draw:end-shape="id437" draw:end-glue-point="6" svg:d="M-55060 62726l2008-500" svg:viewBox="0 0 2009 501">
            <text:p/>
          </draw:connector>
          <draw:connector draw:style-name="gr503" draw:text-style-name="P15" draw:layer="layout" draw:type="line" svg:x1="-55.06cm" svg:y1="62.726cm" svg:x2="-53.052cm" svg:y2="60.926cm" draw:start-shape="id435" draw:start-glue-point="10" draw:end-shape="id436" draw:end-glue-point="6" svg:d="M-55060 62726l2008-1800" svg:viewBox="0 0 2009 1801">
            <text:p/>
          </draw:connector>
          <draw:custom-shape draw:style-name="gr502" draw:text-style-name="P156" xml:id="id439" draw:id="id439" draw:layer="layout" svg:width="0.891cm" svg:height="0.97cm" svg:x="-55.951cm" svg:y="63.441cm">
            <text:p text:style-name="P155"><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xml:id="id441" draw:id="id441" draw:layer="layout" draw:type="line" svg:x1="-55.06cm" svg:y1="63.926cm" svg:x2="-53.052cm" svg:y2="60.926cm" draw:start-shape="id439" draw:start-glue-point="10" draw:end-shape="id436" draw:end-glue-point="6" svg:d="M-55060 63926l2008-3000" svg:viewBox="0 0 2009 3001">
            <text:p/>
          </draw:connector>
          <draw:connector draw:style-name="gr503" draw:text-style-name="P15" draw:layer="layout" draw:type="line" svg:x1="-55.06cm" svg:y1="63.926cm" svg:x2="-53.052cm" svg:y2="63.526cm" draw:start-shape="id439" draw:start-glue-point="10" draw:end-shape="id438" draw:end-glue-point="6" svg:d="M-55060 63926l2008-400" svg:viewBox="0 0 2009 401">
            <text:p/>
          </draw:connector>
          <draw:connector draw:style-name="gr503" draw:text-style-name="P15" draw:layer="layout" draw:type="line" svg:x1="-55.06cm" svg:y1="63.926cm" svg:x2="-53.052cm" svg:y2="62.226cm" draw:start-shape="id439" draw:start-glue-point="10" draw:end-shape="id437" draw:end-glue-point="6" svg:d="M-55060 63926l2008-1700" svg:viewBox="0 0 2009 1701">
            <text:p/>
          </draw:connector>
          <draw:connector draw:style-name="gr503" draw:text-style-name="P15" draw:layer="layout" draw:type="line" svg:x1="-57.964cm" svg:y1="63.526cm" svg:x2="-55.951cm" svg:y2="63.926cm" draw:start-shape="id434" draw:start-glue-point="10" draw:end-shape="id439" draw:end-glue-point="6" svg:d="M-57964 63526l2013 400" svg:viewBox="0 0 2014 401">
            <text:p/>
          </draw:connector>
          <draw:connector draw:style-name="gr503" draw:text-style-name="P15" draw:layer="layout" draw:type="line" svg:x1="-57.964cm" svg:y1="62.226cm" svg:x2="-55.951cm" svg:y2="63.926cm" draw:start-shape="id432" draw:start-glue-point="10" draw:end-shape="id439" draw:end-glue-point="6" svg:d="M-57964 62226l2013 1700" svg:viewBox="0 0 2014 1701">
            <text:p/>
          </draw:connector>
          <draw:connector draw:style-name="gr503" draw:text-style-name="P15" draw:layer="layout" draw:type="line" svg:x1="-57.964cm" svg:y1="60.926cm" svg:x2="-55.951cm" svg:y2="63.926cm" draw:start-shape="id430" draw:start-glue-point="10" draw:end-shape="id439" draw:end-glue-point="6" svg:d="M-57964 60926l2013 3000" svg:viewBox="0 0 2014 3001">
            <text:p/>
          </draw:connector>
          <draw:custom-shape draw:style-name="gr502" draw:text-style-name="P156" xml:id="id440" draw:id="id440" draw:layer="layout" svg:width="0.891cm" svg:height="0.97cm" svg:x="-55.951cm" svg:y="64.641cm">
            <text:p text:style-name="P155"><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5.06cm" svg:y1="65.126cm" svg:x2="-53.052cm" svg:y2="63.526cm" draw:start-shape="id440" draw:start-glue-point="10" draw:end-shape="id438" draw:end-glue-point="6" svg:d="M-55060 65126l2008-1600" svg:viewBox="0 0 2009 1601">
            <text:p/>
          </draw:connector>
          <draw:connector draw:style-name="gr503" draw:text-style-name="P15" draw:layer="layout" draw:type="line" svg:x1="-55.06cm" svg:y1="65.126cm" svg:x2="-53.052cm" svg:y2="62.226cm" draw:start-shape="id440" draw:start-glue-point="10" draw:end-shape="id437" draw:end-glue-point="6" svg:d="M-55060 65126l2008-2900" svg:viewBox="0 0 2009 2901">
            <text:p/>
          </draw:connector>
          <draw:connector draw:style-name="gr503" draw:text-style-name="P15" draw:layer="layout" draw:type="line" svg:x1="-55.06cm" svg:y1="65.126cm" svg:x2="-54.056cm" svg:y2="62.426cm" draw:start-shape="id440" draw:start-glue-point="10" draw:end-shape="id441" draw:end-glue-point="3" svg:d="M-55060 65126l1004-2700" svg:viewBox="0 0 1005 2701">
            <text:p/>
          </draw:connector>
          <draw:connector draw:style-name="gr503" draw:text-style-name="P15" draw:layer="layout" draw:type="line" svg:x1="-57.964cm" svg:y1="63.526cm" svg:x2="-55.951cm" svg:y2="65.126cm" draw:start-shape="id434" draw:start-glue-point="10" draw:end-shape="id440" draw:end-glue-point="6" svg:d="M-57964 63526l2013 1600" svg:viewBox="0 0 2014 1601">
            <text:p/>
          </draw:connector>
          <draw:connector draw:style-name="gr503" draw:text-style-name="P15" draw:layer="layout" draw:type="line" svg:x1="-57.964cm" svg:y1="62.226cm" svg:x2="-55.951cm" svg:y2="65.126cm" draw:start-shape="id432" draw:start-glue-point="10" draw:end-shape="id440" draw:end-glue-point="6" svg:d="M-57964 62226l2013 2900" svg:viewBox="0 0 2014 2901">
            <text:p/>
          </draw:connector>
          <draw:connector draw:style-name="gr503" draw:text-style-name="P15" draw:layer="layout" draw:type="line" svg:x1="-57.964cm" svg:y1="60.926cm" svg:x2="-55.951cm" svg:y2="65.126cm" draw:start-shape="id430" draw:start-glue-point="10" draw:end-shape="id440" draw:end-glue-point="6" svg:d="M-57964 60926l2013 4200" svg:viewBox="0 0 2014 4201">
            <text:p/>
          </draw:connector>
          <draw:custom-shape draw:style-name="gr501" draw:text-style-name="P142" xml:id="id443" draw:id="id443" draw:layer="layout" svg:width="0.891cm" svg:height="0.97cm" svg:x="-53.052cm" svg:y="64.38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42" draw:id="id442" draw:layer="layout" svg:width="0.891cm" svg:height="0.97cm" svg:x="-58.855cm" svg:y="64.426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7.964cm" svg:y1="64.911cm" svg:x2="-55.951cm" svg:y2="65.126cm" draw:start-shape="id442" draw:start-glue-point="10" draw:end-shape="id440" draw:end-glue-point="6" svg:d="M-57964 64911l2013 215" svg:viewBox="0 0 2014 216">
            <text:p/>
          </draw:connector>
          <draw:connector draw:style-name="gr503" draw:text-style-name="P15" draw:layer="layout" draw:type="line" svg:x1="-57.964cm" svg:y1="64.911cm" svg:x2="-55.951cm" svg:y2="63.926cm" draw:start-shape="id442" draw:start-glue-point="10" draw:end-shape="id439" draw:end-glue-point="6" svg:d="M-57964 64911l2013-985" svg:viewBox="0 0 2014 986">
            <text:p/>
          </draw:connector>
          <draw:connector draw:style-name="gr503" draw:text-style-name="P15" draw:layer="layout" draw:type="line" svg:x1="-57.964cm" svg:y1="64.911cm" svg:x2="-55.951cm" svg:y2="62.726cm" draw:start-shape="id442" draw:start-glue-point="10" draw:end-shape="id435" draw:end-glue-point="6" svg:d="M-57964 64911l2013-2185" svg:viewBox="0 0 2014 2186">
            <text:p/>
          </draw:connector>
          <draw:connector draw:style-name="gr503" draw:text-style-name="P15" draw:layer="layout" draw:type="line" svg:x1="-57.964cm" svg:y1="64.911cm" svg:x2="-55.951cm" svg:y2="61.626cm" draw:start-shape="id442" draw:start-glue-point="10" draw:end-shape="id433" draw:end-glue-point="6" svg:d="M-57964 64911l2013-3285" svg:viewBox="0 0 2014 3286">
            <text:p/>
          </draw:connector>
          <draw:connector draw:style-name="gr503" draw:text-style-name="P15" draw:layer="layout" draw:type="line" svg:x1="-57.964cm" svg:y1="64.911cm" svg:x2="-55.951cm" svg:y2="60.526cm" draw:start-shape="id442" draw:start-glue-point="10" draw:end-shape="id431" draw:end-glue-point="6" svg:d="M-57964 64911l2013-4385" svg:viewBox="0 0 2014 4386">
            <text:p/>
          </draw:connector>
          <draw:connector draw:style-name="gr503" draw:text-style-name="P15" draw:layer="layout" draw:type="line" svg:x1="-55.06cm" svg:y1="65.126cm" svg:x2="-53.052cm" svg:y2="64.872cm" draw:start-shape="id440" draw:start-glue-point="10" draw:end-shape="id443" draw:end-glue-point="6" svg:d="M-55060 65126l2008-254" svg:viewBox="0 0 2009 255">
            <text:p/>
          </draw:connector>
          <draw:connector draw:style-name="gr503" draw:text-style-name="P15" draw:layer="layout" draw:type="line" svg:x1="-55.06cm" svg:y1="63.926cm" svg:x2="-53.052cm" svg:y2="64.872cm" draw:start-shape="id439" draw:start-glue-point="10" draw:end-shape="id443" draw:end-glue-point="6" svg:d="M-55060 63926l2008 946" svg:viewBox="0 0 2009 947">
            <text:p/>
          </draw:connector>
          <draw:connector draw:style-name="gr503" draw:text-style-name="P15" draw:layer="layout" draw:type="line" svg:x1="-55.06cm" svg:y1="62.726cm" svg:x2="-53.052cm" svg:y2="64.872cm" draw:start-shape="id435" draw:start-glue-point="10" draw:end-shape="id443" draw:end-glue-point="6" svg:d="M-55060 62726l2008 2146" svg:viewBox="0 0 2009 2147">
            <text:p/>
          </draw:connector>
          <draw:connector draw:style-name="gr503" draw:text-style-name="P15" draw:layer="layout" draw:type="line" svg:x1="-55.06cm" svg:y1="61.626cm" svg:x2="-53.052cm" svg:y2="64.872cm" draw:start-shape="id433" draw:start-glue-point="10" draw:end-shape="id443" draw:end-glue-point="6" svg:d="M-55060 61626l2008 3246" svg:viewBox="0 0 2009 3247">
            <text:p/>
          </draw:connector>
          <draw:connector draw:style-name="gr503" draw:text-style-name="P15" draw:layer="layout" draw:type="line" svg:x1="-55.06cm" svg:y1="60.526cm" svg:x2="-53.052cm" svg:y2="64.872cm" draw:start-shape="id431" draw:start-glue-point="10" draw:end-shape="id443" draw:end-glue-point="6" svg:d="M-55060 60526l2008 4346" svg:viewBox="0 0 2009 4347">
            <text:p/>
          </draw:connector>
          <draw:g draw:style-name="gr31">
            <draw:custom-shape draw:style-name="gr525" draw:text-style-name="P159" draw:layer="layout" svg:width="0.178cm" svg:height="0.178cm" svg:x="-71.757cm" svg:y="59.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71.757cm" svg:y="59.1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71.757cm" svg:y="58.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1">
            <draw:custom-shape draw:style-name="gr525" draw:text-style-name="P159" draw:layer="layout" svg:width="0.178cm" svg:height="0.178cm" svg:x="-62.957cm" svg:y="59.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62.957cm" svg:y="59.1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62.957cm" svg:y="58.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rect draw:style-name="gr467" draw:text-style-name="P19" xml:id="id401" draw:id="id401" draw:layer="layout" svg:width="2.349cm" svg:height="1.195cm" svg:x="-23.01cm" svg:y="50.892cm">
          <text:p text:style-name="P5"><text:span text:style-name="T4">utt</text:span><text:span text:style-name="T4">er</text:span><text:span text:style-name="T4">s</text:span><text:span text:style-name="T4"><text:line-break/></text:span><text:span text:style-name="T4">fro</text:span><text:span text:style-name="T4">m </text:span><text:span text:style-name="T4">ro</text:span><text:span text:style-name="T4">bo</text:span><text:span text:style-name="T4">t 1</text:span><text:span text:style-name="T4"><text:line-break/></text:span><text:span text:style-name="T4">an</text:span><text:span text:style-name="T4">d </text:span><text:span text:style-name="T4">its’ </text:span><text:span text:style-name="T4">de</text:span><text:span text:style-name="T4">co</text:span><text:span text:style-name="T4">de</text:span><text:span text:style-name="T4">r</text:span></text:p>
        </draw:rect>
        <draw:rect draw:style-name="gr467" draw:text-style-name="P19" xml:id="id495" draw:id="id495" draw:layer="layout" svg:width="2.063cm" svg:height="1.396cm" svg:x="-22.913cm" svg:y="52.944cm">
          <text:p text:style-name="P5"><text:span text:style-name="T4">Ro</text:span><text:span text:style-name="T4">bot </text:span><text:span text:style-name="T4">2</text:span><text:span text:style-name="T4"><text:line-break/></text:span><text:span text:style-name="T4">int</text:span><text:span text:style-name="T4">ern</text:span><text:span text:style-name="T4">al</text:span><text:span text:style-name="T4"><text:line-break/></text:span><text:span text:style-name="T4">lan</text:span><text:span text:style-name="T4">gu</text:span><text:span text:style-name="T4">ag</text:span><text:span text:style-name="T4">e</text:span></text:p>
        </draw:rect>
        <draw:custom-shape draw:style-name="gr481" draw:text-style-name="P133" xml:id="id487" draw:id="id487" draw:layer="layout" svg:width="4.16cm" svg:height="0.97cm" svg:x="-42.394cm" svg:y="51.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2.181cm" svg:y="52.134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1.136cm" svg:y="52.134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0.157cm" svg:y="52.134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39.033cm" svg:y="52.134cm">
            <text:p text:style-name="P19"><text:span text:style-name="T4">W</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1.626cm" svg:y1="52.402cm" svg:x2="-41.176cm" svg:y2="52.392cm">
            <text:p/>
          </draw:line>
          <draw:line draw:style-name="gr488" draw:text-style-name="P15" draw:layer="layout" svg:x1="-40.554cm" svg:y1="52.416cm" svg:x2="-40.131cm" svg:y2="52.405cm">
            <text:p/>
          </draw:line>
          <draw:line draw:style-name="gr488" draw:text-style-name="P15" draw:layer="layout" svg:x1="-39.508cm" svg:y1="52.416cm" svg:x2="-38.993cm" svg:y2="52.419cm">
            <text:p/>
          </draw:line>
        </draw:g>
        <draw:connector draw:style-name="gr36" draw:text-style-name="P7" draw:layer="layout" draw:type="curve" svg:x1="-27.151cm" svg:y1="52.428cm" svg:x2="-25.491cm" svg:y2="53.738cm" draw:start-shape="id444" draw:start-glue-point="1" draw:end-shape="id445" draw:end-glue-point="3" svg:d="M-27151 52428c1246 0 417 1310 1660 1310" svg:viewBox="0 0 1661 1311">
          <text:p/>
        </draw:connector>
        <draw:connector draw:style-name="gr526" draw:text-style-name="P15" draw:layer="layout" draw:type="curve" svg:x1="30.809cm" svg:y1="107.092cm" svg:x2="30.407cm" svg:y2="105.779cm" draw:start-shape="id446" draw:start-glue-point="0" draw:end-shape="id367" draw:end-glue-point="2" svg:d="M30809 107092c0-984-402-328-402-1313" svg:viewBox="0 0 403 1314">
          <text:p/>
        </draw:connector>
        <draw:custom-shape draw:name="comment box 15" draw:style-name="gr527" draw:text-style-name="P161" xml:id="id447" draw:id="id447" draw:layer="layout" svg:width="1.885cm" svg:height="1.575cm" svg:x="-44.78cm" svg:y="74.294cm">
          <text:p text:style-name="P160"><text:span text:style-name="T4">Kmeans</text:span><text:span text:style-name="T4"><text:line-break/></text:span><text:span text:style-name="T4">on 2</text:span><text:span text:style-name="T43">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3.452cm" svg:y1="73.549cm" svg:x2="-43.837cm" svg:y2="74.294cm" draw:end-shape="id447" draw:end-glue-point="4" svg:d="M-43452 73549c0 168-385-204-385 745" svg:viewBox="0 0 386 746">
          <text:p/>
        </draw:connector>
        <draw:connector draw:style-name="gr29" draw:text-style-name="P15" draw:layer="layout" draw:type="curve" svg:x1="-45.453cm" svg:y1="73.549cm" svg:x2="-45.92cm" svg:y2="74.336cm" draw:end-shape="id448" draw:end-glue-point="4" svg:d="M-45453 73549c0 199-467-194-467 787" svg:viewBox="0 0 468 788">
          <text:p/>
        </draw:connector>
        <draw:custom-shape draw:name="comment box 14" draw:style-name="gr528" draw:text-style-name="P161" xml:id="id448" draw:id="id448" draw:layer="layout" svg:width="1.884cm" svg:height="1.523cm" svg:x="-46.862cm" svg:y="74.336cm">
          <text:p text:style-name="P160"><text:span text:style-name="T4">Kmeans</text:span><text:span text:style-name="T4"><text:line-break/></text:span><text:span text:style-name="T4">on 0</text:span><text:span text:style-name="T43">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10" draw:text-style-name="P113" draw:layer="layout" svg:width="1.179cm" svg:height="1.358cm" svg:x="-47.118cm" svg:y="78.163cm" svg:viewBox="0 0 1180 1359" draw:points="0,0 1180,581 1180,777 0,1359">
              <text:p/>
            </draw:polygon>
          </draw:g>
          <draw:frame draw:style-name="gr484" draw:text-style-name="P11" draw:layer="layout" svg:width="1.527cm" svg:height="0.57cm" svg:x="-47.349cm" svg:y="78.526cm">
            <draw:text-box>
              <text:p><text:span text:style-name="T49">encoder</text:span></text:p>
            </draw:text-box>
          </draw:frame>
        </draw:g>
        <draw:frame draw:style-name="gr529" draw:text-style-name="P41" draw:layer="layout" svg:width="4.125cm" svg:height="2.221cm" svg:x="-45.213cm" svg:y="77.993cm">
          <draw:text-box>
            <text:p text:style-name="P5"><text:span text:style-name="T12">Action potential (with autoencoder)</text:span><text:span text:style-name="T12"><text:line-break/></text:span><text:span text:style-name="T12">and</text:span><text:span text:style-name="T12"><text:line-break/></text:span><text:span text:style-name="T12">observation matrix (H)</text:span></text:p>
          </draw:text-box>
        </draw:frame>
        <draw:rect draw:style-name="gr292" draw:text-style-name="P35" xml:id="id449" draw:id="id449" draw:layer="layout" svg:width="2.3cm" svg:height="1cm" svg:x="33.204cm" svg:y="74.728cm">
          <text:p text:style-name="P5">IMU</text:p>
        </draw:rect>
        <draw:rect draw:style-name="gr292" draw:text-style-name="P35" xml:id="id450" draw:id="id450" draw:layer="layout" svg:width="2.3cm" svg:height="1cm" svg:x="36.204cm" svg:y="74.728cm">
          <text:p text:style-name="P5">Battery</text:p>
        </draw:rect>
        <draw:connector draw:style-name="gr293" draw:text-style-name="P15" draw:layer="layout" draw:type="curve" svg:x1="32.654cm" svg:y1="73.528cm" svg:x2="34.354cm" svg:y2="74.728cm" draw:start-shape="id240" draw:start-glue-point="2" draw:end-shape="id449" svg:d="M32654 73528c0 900 1700 300 1700 1200" svg:viewBox="0 0 1701 1201">
          <text:p/>
        </draw:connector>
        <draw:connector draw:style-name="gr293" draw:text-style-name="P15" draw:layer="layout" draw:type="curve" svg:x1="32.654cm" svg:y1="73.528cm" svg:x2="37.354cm" svg:y2="74.728cm" draw:start-shape="id240" draw:start-glue-point="2" draw:end-shape="id450" draw:end-glue-point="0" svg:d="M32654 73528c0 900 4700 300 4700 1200" svg:viewBox="0 0 4701 1201">
          <text:p/>
        </draw:connector>
        <draw:g draw:style-name="gr31">
          <draw:polygon draw:style-name="gr530" draw:text-style-name="P5" draw:layer="layout" svg:width="2.947cm" svg:height="4.308cm" svg:x="-69.005cm" svg:y="71.164cm" svg:viewBox="0 0 2948 4309" draw:points="0,3742 18,699 2891,0 2948,4309">
            <text:p/>
          </draw:polygon>
          <draw:g draw:style-name="gr31">
            <draw:custom-shape draw:style-name="gr531" draw:text-style-name="P162" draw:layer="layout" svg:width="0.254cm" svg:height="0.254cm" svg:x="-72.335cm" svg:y="71.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2" draw:text-style-name="P16" draw:layer="layout" svg:width="1.101cm" svg:height="0.569cm" svg:x="-72.247cm" svg:y="71.701cm">
              <draw:text-box>
                <text:p><text:span text:style-name="T4">GPS</text:span></text:p>
              </draw:text-box>
            </draw:frame>
          </draw:g>
          <draw:g draw:style-name="gr31">
            <draw:custom-shape draw:style-name="gr533" draw:text-style-name="P106" draw:layer="layout" svg:width="0.254cm" svg:height="0.254cm" svg:x="-72.342cm" svg:y="7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4" draw:text-style-name="P16" draw:layer="layout" svg:width="1.337cm" svg:height="0.569cm" svg:x="-72.221cm" svg:y="71.194cm">
              <draw:text-box>
                <text:p><text:span text:style-name="T4">LIDAR</text:span></text:p>
              </draw:text-box>
            </draw:frame>
          </draw:g>
          <draw:custom-shape draw:style-name="gr533"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337cm" svg:y="7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4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139cm" svg:y="7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2.102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763cm" svg:y="73.6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562cm" svg:y="72.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043cm" svg:y="73.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572cm" svg:y="73.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5" draw:text-style-name="P16" draw:layer="layout" svg:width="2.047cm" svg:height="0.569cm" svg:x="-70.737cm" svg:y="72.996cm">
            <draw:text-box>
              <text:p><text:span text:style-name="T4">AE </text:span><text:span text:style-name="T4">mapping</text:span></text:p>
            </draw:text-box>
          </draw:frame>
          <draw:polygon draw:style-name="gr530" draw:text-style-name="P5" draw:layer="layout" svg:width="3.884cm" svg:height="5.678cm" svg:x="-64.164cm" svg:y="70.371cm" svg:viewBox="0 0 3885 5679" draw:points="0,4931 24,921 3810,0 3885,5679">
            <text:p/>
          </draw:polygon>
          <draw:custom-shape draw:style-name="gr536" draw:text-style-name="P41" draw:layer="layout" svg:width="1.612cm" svg:height="1.163cm" svg:x="-63.343cm" svg:y="72.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7" draw:text-style-name="P41" draw:layer="layout" svg:width="1.976cm" svg:height="1.426cm" svg:x="-63.491cm" svg:y="72.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8" draw:text-style-name="P41" draw:layer="layout" svg:width="2.28cm" svg:height="1.645cm" svg:x="-63.597cm" svg:y="7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1.917cm" svg:y="73.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3.172cm" svg:y="7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1.925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3cm" svg:x="-62.687cm" svg:y="72.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2.83cm" svg:y="7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41" draw:layer="layout" svg:width="1.388cm" svg:height="1.002cm" svg:x="-63.243cm" svg:y="7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5cm" svg:height="0.165cm" svg:x="-62.633cm" svg:y="73.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0" draw:text-style-name="P15" draw:layer="layout" svg:x1="-66.058cm" svg:y1="73.543cm" svg:x2="-62.556cm" svg:y2="73.505cm">
            <text:p/>
          </draw:line>
          <draw:frame draw:style-name="gr541" draw:text-style-name="P163" draw:layer="layout" svg:width="2.473cm" svg:height="1.205cm" svg:x="-66.36cm" svg:y="73.072cm">
            <draw:text-box>
              <text:p text:style-name="P5"><text:span text:style-name="T4">knn</text:span><text:span text:style-name="T4"><text:line-break/></text:span><text:span text:style-name="T4">clustering</text:span><text:span text:style-name="T4"><text:line-break/></text:span><text:span text:style-name="T4">(using </text:span><text:span text:style-name="T4">encoder)</text:span></text:p>
            </draw:text-box>
          </draw:frame>
          <draw:g draw:style-name="gr31" xml:id="id452" draw:id="id452">
            <draw:custom-shape draw:style-name="gr533"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3cm" svg:x="-67.67cm" svg:y="7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4cm" svg:x="-67.764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542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8.163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944cm" svg:y="73.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3cm" svg:x="-67.815cm" svg:y="73.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48cm" svg:y="73.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821cm" svg:y="73.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40" draw:text-style-name="P15" draw:layer="layout" svg:x1="-70.556cm" svg:y1="73.537cm" svg:x2="-67.656cm" svg:y2="73.505cm">
            <text:p/>
          </draw:line>
          <draw:frame draw:style-name="gr542" draw:text-style-name="P16" draw:layer="layout" svg:width="3.576cm" svg:height="1.205cm" svg:x="-66.669cm" svg:y="70.062cm">
            <draw:text-box>
              <text:p><text:span text:style-name="T4">GPS </text:span><text:span text:style-name="T4">frequency </text:span><text:span text:style-name="T4">is higher</text:span><text:span text:style-name="T4"><text:line-break/></text:span><text:span text:style-name="T4">so we need </text:span><text:span text:style-name="T4">clustering</text:span><text:span text:style-name="T4"><text:line-break/></text:span><text:span text:style-name="T4">and extract </text:span><text:span text:style-name="T4">means</text:span></text:p>
            </draw:text-box>
          </draw:frame>
          <draw:frame draw:style-name="gr543" draw:text-style-name="P164" draw:layer="layout" svg:width="2.126cm" svg:height="0.569cm" svg:x="-68.667cm" svg:y="71.77cm">
            <draw:text-box>
              <text:p><text:span text:style-name="T54">Latent </text:span><text:span text:style-name="T54">space</text:span></text:p>
            </draw:text-box>
          </draw:frame>
          <draw:frame draw:style-name="gr544" draw:text-style-name="P166" draw:layer="layout" svg:width="0.87cm" svg:height="0.73cm" svg:x="-62.263cm" svg:y="74.119cm">
            <draw:text-box>
              <text:p text:style-name="P165"><text:span text:style-name="T4">μ</text:span><text:span text:style-name="T43">’</text:span><text:span text:style-name="T42">G</text:span></text:p>
            </draw:text-box>
          </draw:frame>
          <draw:frame draw:style-name="gr545" draw:text-style-name="P166" draw:layer="layout" svg:width="0.87cm" svg:height="0.73cm" svg:x="-62.689cm" svg:y="73.127cm">
            <draw:text-box>
              <text:p text:style-name="P165"><text:span text:style-name="T4">μ</text:span><text:span text:style-name="T43">’</text:span><text:span text:style-name="T42">L</text:span></text:p>
            </draw:text-box>
          </draw:frame>
          <draw:frame draw:style-name="gr546" draw:text-style-name="P164" draw:layer="layout" svg:width="2.346cm" svg:height="0.887cm" svg:x="-63.709cm" svg:y="71.199cm">
            <draw:text-box>
              <text:p><text:span text:style-name="T54">clusters </text:span><text:span text:style-name="T54">mean</text:span><text:span text:style-name="T54"><text:line-break/></text:span><text:span text:style-name="T54">in latent </text:span><text:span text:style-name="T54">space</text:span></text:p>
            </draw:text-box>
          </draw:frame>
          <draw:custom-shape draw:style-name="gr531" draw:text-style-name="P162" xml:id="id451" draw:id="id451" draw:layer="layout" svg:width="0.164cm" svg:height="0.164cm" svg:x="-62.181cm" svg:y="74.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7" draw:text-style-name="P5" draw:layer="layout" svg:x1="-62.487cm" svg:y1="73.557cm" svg:x2="-62.132cm" svg:y2="74.164cm">
            <text:p/>
          </draw:line>
          <draw:frame draw:style-name="gr548" draw:text-style-name="P16" draw:layer="layout" svg:width="0.697cm" svg:height="0.569cm" svg:x="-62.724cm" svg:y="73.709cm">
            <draw:text-box>
              <text:p><text:span text:style-name="T4">d</text:span><text:span text:style-name="T43">’</text:span></text:p>
            </draw:text-box>
          </draw:frame>
          <draw:connector draw:style-name="gr549" draw:text-style-name="P15" draw:layer="layout" draw:type="curve" draw:line-skew="0.315cm" svg:x1="-62.099cm" svg:y1="74.301cm" svg:x2="-67.739cm" svg:y2="73.922cm" draw:start-shape="id451" draw:start-glue-point="8" draw:end-shape="id452" draw:end-glue-point="2" svg:d="M-62099 74301c0 1224-5640 1413-5640-379" svg:viewBox="0 0 5641 1323">
            <text:p/>
          </draw:connector>
          <draw:frame draw:style-name="gr550" draw:text-style-name="P16" draw:layer="layout" svg:width="1.595cm" svg:height="0.887cm" svg:x="-65.852cm" svg:y="75.137cm">
            <draw:text-box>
              <text:p text:style-name="P165"><text:span text:style-name="T10">Decode</text:span><text:span text:style-name="T10"><text:line-break/></text:span><text:span text:style-name="T10">GPS+</text:span><text:span text:style-name="T4">μ</text:span><text:span text:style-name="T43">’</text:span><text:span text:style-name="T42">G</text:span></text:p>
            </draw:text-box>
          </draw:frame>
          <draw:frame draw:style-name="gr551" draw:text-style-name="P167" draw:layer="layout" svg:width="5.09cm" svg:height="1.039cm" svg:x="-67.482cm" svg:y="76.119cm">
            <draw:text-box>
              <text:p text:style-name="P5"><text:span text:style-name="T55">Mapping </text:span><text:span text:style-name="T55">GPS to </text:span><text:span text:style-name="T55">the </text:span><text:span text:style-name="T55">center </text:span><text:span text:style-name="T55"><text:line-break/></text:span><text:span text:style-name="T55">of </text:span><text:span text:style-name="T55">mapped </text:span><text:span text:style-name="T55">LIDAR-</text:span><text:span text:style-name="T55">class</text:span></text:p>
            </draw:text-box>
          </draw:frame>
        </draw:g>
        <draw:g draw:style-name="gr23">
          <draw:rect draw:style-name="gr41" draw:text-style-name="P5" xml:id="id454" draw:id="id454" draw:layer="layout" svg:width="1.283cm" svg:height="1.495cm" svg:x="-20.906cm" svg:y="108.783cm">
            <text:p text:style-name="P5">Robot</text:p>
          </draw:rect>
          <draw:line draw:style-name="gr552" draw:text-style-name="P5" xml:id="id453" draw:id="id453" draw:layer="layout" svg:x1="-19.65cm" svg:y1="109.523cm" svg:x2="-17.956cm" svg:y2="109.497cm">
            <text:p/>
          </draw:line>
          <draw:connector draw:style-name="gr553" draw:text-style-name="P15" draw:layer="layout" svg:x1="-18.803cm" svg:y1="109.523cm" svg:x2="-20.264cm" svg:y2="110.278cm" draw:start-shape="id453" draw:start-glue-point="2" draw:end-shape="id454" svg:d="M-18803 109523v1256h-1461v-501" svg:viewBox="0 0 1462 1257">
            <text:p/>
          </draw:connector>
          <draw:line draw:style-name="gr552" draw:text-style-name="P5" draw:layer="layout" svg:x1="-22.401cm" svg:y1="109.497cm" svg:x2="-20.92cm" svg:y2="109.497cm">
            <text:p/>
          </draw:line>
          <draw:frame draw:style-name="gr554" draw:text-style-name="P16" draw:layer="layout" svg:width="1.117cm" svg:height="0.569cm" svg:x="-22.168cm" svg:y="109.009cm">
            <draw:text-box>
              <text:p><text:span text:style-name="T4">input</text:span></text:p>
            </draw:text-box>
          </draw:frame>
          <draw:frame draw:style-name="gr555" draw:text-style-name="P16" draw:layer="layout" svg:width="1.291cm" svg:height="0.569cm" svg:x="-19.567cm" svg:y="109.01cm">
            <draw:text-box>
              <text:p><text:span text:style-name="T4">output</text:span></text:p>
            </draw:text-box>
          </draw:frame>
          <draw:frame draw:style-name="gr556" draw:text-style-name="P16" draw:layer="layout" svg:width="1.748cm" svg:height="0.569cm" svg:x="-20.366cm" svg:y="110.711cm">
            <draw:text-box>
              <text:p><text:span text:style-name="T4">Feedback</text:span></text:p>
            </draw:text-box>
          </draw:frame>
        </draw:g>
        <draw:line draw:style-name="gr557" draw:text-style-name="P15" draw:layer="layout" svg:x1="-47.273cm" svg:y1="80.253cm" svg:x2="-31.038cm" svg:y2="80.253cm">
          <text:p/>
        </draw:line>
        <draw:frame draw:style-name="gr558" draw:text-style-name="P168" draw:layer="layout" svg:width="4.884cm" svg:height="2.015cm" svg:x="-41.762cm" svg:y="80.29cm">
          <draw:text-box>
            <text:p text:style-name="P5"><text:span text:style-name="T56">Predictive model </text:span><text:span text:style-name="T56"><text:line-break/></text:span><text:span text:style-name="T56">building with </text:span><text:span text:style-name="T56"><text:line-break/></text:span><text:span text:style-name="T56">transformers</text:span></text:p>
          </draw:text-box>
        </draw:frame>
        <draw:line draw:style-name="gr559" draw:text-style-name="P15" draw:layer="layout" svg:x1="-30.727cm" svg:y1="64.427cm" svg:x2="-30.694cm" svg:y2="79.856cm">
          <text:p/>
        </draw:line>
        <draw:frame draw:style-name="gr560" draw:text-style-name="P169" draw:layer="layout" svg:width="5.588cm" svg:height="1.038cm" draw:transform="rotate (1.5707963267949) translate (-30.753cm 74.743cm)">
          <draw:text-box>
            <text:p><text:span text:style-name="T56">Language building</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56" draw:id="id456"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5" draw:id="id455"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55" draw:start-glue-point="6" draw:end-shape="id456" draw:end-glue-point="10" svg:d="M-47897 100065h-1110" svg:viewBox="0 0 1111 1">
            <text:p/>
          </draw:connector>
          <draw:custom-shape draw:style-name="gr34" draw:text-style-name="P26" xml:id="id458" draw:id="id458"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7" draw:id="id457"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57" draw:start-glue-point="6" draw:end-shape="id458" draw:end-glue-point="10" svg:d="M-43897 100065h-1110" svg:viewBox="0 0 1111 1">
            <text:p/>
          </draw:connector>
          <draw:connector draw:style-name="gr36" draw:text-style-name="P7" draw:layer="layout" draw:type="curve" svg:x1="-45.898cm" svg:y1="100.065cm" svg:x2="-47.006cm" svg:y2="100.065cm" draw:start-shape="id458" draw:start-glue-point="6" draw:end-shape="id455" draw:end-glue-point="10" svg:d="M-45898 100065h-1108" svg:viewBox="0 0 1109 1">
            <text:p/>
          </draw:connector>
          <draw:custom-shape draw:style-name="gr34" draw:text-style-name="P26" xml:id="id460" draw:id="id460"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9" draw:id="id459"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59" draw:start-glue-point="6" draw:end-shape="id460" draw:end-glue-point="10" svg:d="M-36897 100065h-1110" svg:viewBox="0 0 1111 1">
            <text:p/>
          </draw:connector>
          <draw:custom-shape draw:style-name="gr479" draw:text-style-name="P106" draw:layer="layout" svg:width="16.317cm" svg:height="1.952cm" svg:x="-51.302cm" svg:y="97.114cm">
            <text:p/>
            <draw:enhanced-geometry svg:viewBox="0 0 21600 21600" draw:type="rectangle" draw:enhanced-path="M 0 0 L 21600 0 21600 21600 0 21600 0 0 Z N"/>
          </draw:custom-shape>
          <draw:custom-shape draw:style-name="gr481" draw:text-style-name="P133"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2cm" svg:y="95.68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2cm" svg:y="95.68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cm" svg:y="95.68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7cm" svg:y="95.68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3cm" svg:y1="95.945cm" svg:x2="-44.058cm" svg:y2="95.963cm">
              <text:p/>
            </draw:line>
            <draw:line draw:style-name="gr488" draw:text-style-name="P15" draw:layer="layout" svg:x1="-43.51cm" svg:y1="95.962cm" svg:x2="-43.012cm" svg:y2="95.957cm">
              <text:p/>
            </draw:line>
            <draw:line draw:style-name="gr488" draw:text-style-name="P15" draw:layer="layout" svg:x1="-42.464cm" svg:y1="95.962cm" svg:x2="-41.947cm" svg:y2="95.957cm">
              <text:p/>
            </draw:line>
          </draw:g>
          <draw:connector draw:style-name="gr489" draw:text-style-name="P7" draw:layer="layout" draw:type="curve" svg:x1="-39.311cm" svg:y1="100.024cm" svg:x2="-42.624cm" svg:y2="100.027cm" svg:d="M-39311 100024c-2484 0-828 3-3313 3" svg:viewBox="0 0 3314 4">
            <text:p/>
          </draw:connector>
          <draw:connector draw:style-name="gr489" draw:text-style-name="P7" draw:layer="layout" draw:type="curve" svg:x1="-45.796cm" svg:y1="95.924cm" svg:x2="-46.877cm" svg:y2="95.928cm" svg:d="M-45796 95924c-810 0-270 4-1081 4" svg:viewBox="0 0 1082 5">
            <text:p/>
          </draw:connector>
          <draw:connector draw:style-name="gr489" draw:text-style-name="P7" draw:layer="layout" draw:type="curve" svg:x1="-39.806cm" svg:y1="95.924cm" svg:x2="-40.887cm" svg:y2="95.928cm" svg:d="M-39806 95924c-810 0-270 4-1081 4" svg:viewBox="0 0 1082 5">
            <text:p/>
          </draw:connector>
          <draw:custom-shape draw:style-name="gr481" draw:text-style-name="P133"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1cm" svg:y="101.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101.297cm)">
            <text:p text:style-name="P19"><text:span text:style-name="T4">Phenom</text:span><text:span text:style-name="T4"><text:line-break/></text:span><text:span text:style-name="T4">distrib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1" draw:text-style-name="P134" draw:layer="layout" svg:width="1.539cm" svg:height="1.287cm" draw:transform="rotate (-1.5707963267949) translate (-39.994cm 97.297cm)">
            <text:p text:style-name="P19"><text:span text:style-name="T4">Word</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93.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93.297cm)">
            <text:p text:style-name="P19"><text:span text:style-name="T4">Sentence</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481" draw:text-style-name="P133"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7cm" svg:y="91.681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2cm" svg:y="91.681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3cm" svg:y="91.681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89cm" svg:y="91.681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2cm" svg:y1="91.949cm" svg:x2="-44.132cm" svg:y2="91.939cm">
              <text:p/>
            </draw:line>
            <draw:line draw:style-name="gr488" draw:text-style-name="P15" draw:layer="layout" svg:x1="-43.51cm" svg:y1="91.963cm" svg:x2="-43.087cm" svg:y2="91.952cm">
              <text:p/>
            </draw:line>
            <draw:line draw:style-name="gr488" draw:text-style-name="P15" draw:layer="layout" svg:x1="-42.464cm" svg:y1="91.963cm" svg:x2="-41.949cm" svg:y2="91.966cm">
              <text:p/>
            </draw:line>
          </draw:g>
          <draw:connector draw:style-name="gr489" draw:text-style-name="P7" draw:layer="layout" draw:type="curve" svg:x1="-45.796cm" svg:y1="91.925cm" svg:x2="-46.877cm" svg:y2="91.929cm" svg:d="M-45796 91925c-810 0-270 4-1081 4" svg:viewBox="0 0 1082 5">
            <text:p/>
          </draw:connector>
          <draw:connector draw:style-name="gr489" draw:text-style-name="P7" draw:layer="layout" draw:type="curve" svg:x1="-39.806cm" svg:y1="91.925cm" svg:x2="-40.887cm" svg:y2="91.929cm" svg:d="M-39806 91925c-810 0-270 4-1081 4" svg:viewBox="0 0 1082 5">
            <text:p/>
          </draw:connector>
          <draw:custom-shape draw:style-name="gr481" draw:text-style-name="P133"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7" draw:text-style-name="P15" draw:layer="layout" svg:x1="-34.76cm" svg:y1="88.884cm" svg:x2="-34.671cm" svg:y2="102.989cm">
            <text:p/>
          </draw:line>
          <draw:frame draw:style-name="gr561" draw:text-style-name="P168" draw:layer="layout" svg:width="5.06cm" svg:height="2.015cm" draw:transform="rotate (1.5707963267949) translate (-34.659cm 98.445cm)">
            <draw:text-box>
              <text:p text:style-name="P5"><text:span text:style-name="T56">Live remembering</text:span><text:span text:style-name="T56"><text:line-break/></text:span><text:span text:style-name="T56">and</text:span><text:span text:style-name="T56"><text:line-break/></text:span><text:span text:style-name="T56">State estimation</text:span></text:p>
            </draw:text-box>
          </draw:frame>
          <draw:custom-shape draw:style-name="gr479" draw:text-style-name="P106" draw:layer="layout" svg:width="16.317cm" svg:height="1.952cm" svg:x="-51.299cm" svg:y="88.915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36.994cm 89.04cm)">
            <text:p text:style-name="P19"><text:span text:style-name="T4">fused</text:span><text:span text:style-name="T4"><text:line-break/></text:span><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62" draw:text-style-name="P137" draw:layer="layout" svg:width="2.198cm" svg:height="1.705cm" svg:x="-46.156cm" svg:y="89.021cm">
            <text:p text:style-name="P136"><text:span text:style-name="T45">Trac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10" draw:text-style-name="P113" draw:layer="layout" svg:width="1.179cm" svg:height="1.358cm" svg:x="-48.791cm" svg:y="89.216cm" svg:viewBox="0 0 1180 1359" draw:points="0,0 1180,581 1180,777 0,1359">
                <text:p/>
              </draw:polygon>
            </draw:g>
            <draw:frame draw:style-name="gr484" draw:text-style-name="P11" draw:layer="layout" svg:width="1.527cm" svg:height="0.57cm" svg:x="-49.022cm" svg:y="89.579cm">
              <draw:text-box>
                <text:p><text:span text:style-name="T49">encoder</text:span></text:p>
              </draw:text-box>
            </draw:frame>
          </draw:g>
          <draw:frame draw:style-name="gr563" draw:text-style-name="P41" draw:layer="layout" svg:width="2.729cm" svg:height="1.433cm" svg:x="-41.311cm" svg:y="89.195cm">
            <draw:text-box>
              <text:p text:style-name="P5"><text:span text:style-name="T12">Par</text:span><text:span text:style-name="T12">ticl</text:span><text:span text:style-name="T12">e </text:span><text:span text:style-name="T12">filte</text:span><text:span text:style-name="T12">r</text:span><text:span text:style-name="T12"><text:line-break/></text:span><text:span text:style-name="T12">+</text:span><text:span text:style-name="T12"><text:line-break/></text:span><text:span text:style-name="T12">tran</text:span><text:span text:style-name="T12">sfor</text:span><text:span text:style-name="T12">mer</text:span></text:p>
            </draw:text-box>
          </draw:frame>
          <draw:frame draw:style-name="gr563" draw:text-style-name="P41" draw:layer="layout" svg:width="2.729cm" svg:height="1.433cm" svg:x="-47.138cm" svg:y="93.396cm">
            <draw:text-box>
              <text:p text:style-name="P5"><text:span text:style-name="T12">Particle </text:span><text:span text:style-name="T12">filter</text:span><text:span text:style-name="T12"><text:line-break/></text:span><text:span text:style-name="T12">+</text:span><text:span text:style-name="T12"><text:line-break/></text:span><text:span text:style-name="T12">transfor</text:span><text:span text:style-name="T12">mer</text:span></text:p>
            </draw:text-box>
          </draw:frame>
          <draw:frame draw:style-name="gr563"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3"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64" draw:text-style-name="P27" xml:id="id461" draw:id="id461" draw:layer="layout" svg:width="0.642cm" svg:height="0.699cm" svg:x="-36.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4" draw:text-style-name="P27" xml:id="id462" draw:id="id462" draw:layer="layout" svg:width="0.642cm" svg:height="0.699cm" svg:x="-36.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65" draw:text-style-name="P15" draw:layer="layout" draw:type="curve" svg:x1="-36.402cm" svg:y1="89.666cm" svg:x2="-36.402cm" svg:y2="90.138cm" draw:start-shape="id461" draw:start-glue-point="8" draw:end-shape="id462" draw:end-glue-point="4" svg:d="M-36402 89666v472" svg:viewBox="0 0 1 473">
            <text:p/>
          </draw:connector>
          <draw:frame draw:style-name="gr521"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64" draw:id="id464"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6" draw:text-style-name="P170" draw:layer="layout" svg:width="3.958cm" svg:height="0.645cm" svg:x="-39.467cm" svg:y="89.59cm">
            <draw:text-box>
              <text:p><text:span text:style-name="T12">H</text:span></text:p>
            </draw:text-box>
          </draw:frame>
          <draw:custom-shape draw:style-name="gr34" draw:text-style-name="P26" xml:id="id463" draw:id="id463"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63" draw:start-glue-point="6" draw:end-shape="id464" draw:end-glue-point="10" svg:d="M-42586 102121c-786 0-261 1-1050 1" svg:viewBox="0 0 1051 2">
            <text:p/>
          </draw:connector>
          <draw:g draw:style-name="gr31">
            <draw:custom-shape draw:style-name="gr567" draw:text-style-name="P26" xml:id="id468" draw:id="id468" draw:layer="layout" svg:width="2.001cm" svg:height="0.89cm" svg:x="-44.106cm" svg:y="105.13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8" draw:text-style-name="P171" xml:id="id470" draw:id="id470"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27" xml:id="id465" draw:id="id465"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0" draw:text-style-name="P27" xml:id="id466" draw:id="id466"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1" draw:text-style-name="P7" draw:layer="layout" draw:type="curve" svg:x1="-47.286cm" svg:y1="104.685cm" svg:x2="-46.42cm" svg:y2="104.691cm" draw:start-shape="id465" draw:start-glue-point="10" draw:end-shape="id466" draw:end-glue-point="6" svg:d="M-47286 104685c651 0 218 6 866 6" svg:viewBox="0 0 867 7">
              <text:p/>
            </draw:connector>
            <draw:custom-shape draw:style-name="gr570" draw:text-style-name="P27" xml:id="id467" draw:id="id467"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7" draw:text-style-name="P26" xml:id="id469" draw:id="id469"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1"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484" draw:text-style-name="P11" draw:layer="layout" svg:width="0.707cm" svg:height="0.57cm" svg:x="-47.292cm" svg:y="104.207cm">
              <draw:text-box>
                <text:p><text:span text:style-name="T4">H</text:span></text:p>
              </draw:text-box>
            </draw:frame>
            <draw:connector draw:style-name="gr565" draw:text-style-name="P15" draw:layer="layout" draw:type="curve" svg:x1="-45.602cm" svg:y1="104.692cm" svg:x2="-44.106cm" svg:y2="105.584cm" draw:start-shape="id467" draw:start-glue-point="10" draw:end-shape="id468" draw:end-glue-point="6" svg:d="M-45602 104692c1123 0 376 892 1496 892" svg:viewBox="0 0 1497 893">
              <text:p/>
            </draw:connector>
            <draw:connector draw:style-name="gr565" draw:text-style-name="P15" draw:layer="layout" draw:type="curve" svg:x1="-45.602cm" svg:y1="104.692cm" svg:x2="-44.157cm" svg:y2="103.694cm" draw:start-shape="id467" draw:start-glue-point="10" draw:end-shape="id469" draw:end-glue-point="6" svg:d="M-45602 104692c1086 0 364-998 1445-998" svg:viewBox="0 0 1446 999">
              <text:p/>
            </draw:connector>
            <draw:connector draw:style-name="gr565" draw:text-style-name="P15" draw:layer="layout" draw:type="curve" svg:x1="-42.156cm" svg:y1="103.694cm" svg:x2="-40.648cm" svg:y2="104.697cm" draw:start-shape="id469" draw:start-glue-point="10" draw:end-shape="id470" draw:end-glue-point="6" svg:d="M-42156 103694c1132 0 379 1003 1508 1003" svg:viewBox="0 0 1509 1004">
              <text:p/>
            </draw:connector>
            <draw:connector draw:style-name="gr565" draw:text-style-name="P15" draw:layer="layout" draw:type="curve" svg:x1="-42.105cm" svg:y1="105.584cm" svg:x2="-40.648cm" svg:y2="104.697cm" draw:start-shape="id468" draw:end-shape="id470" draw:end-glue-point="6" svg:d="M-42105 105584c1095 0 367-887 1457-887" svg:viewBox="0 0 1458 888">
              <text:p/>
            </draw:connector>
            <draw:frame draw:style-name="gr521" draw:text-style-name="P5" draw:layer="layout" svg:width="1.44cm" svg:height="0.588cm" svg:x="-43.89cm" svg:y="105.29cm">
              <draw:object xlink:href="./Object 3" xlink:type="simple" xlink:show="embed" xlink:actuate="onLoad">
                <loext:p/>
              </draw:object>
              <draw:image xlink:href="./ObjectReplacements/Object 3" xlink:type="simple" xlink:show="embed" xlink:actuate="onLoad"/>
            </draw:frame>
            <draw:g draw:style-name="gr31" xml:id="id471" draw:id="id471">
              <draw:custom-shape draw:style-name="gr572" draw:text-style-name="P26" draw:layer="layout" svg:width="1.577cm" svg:height="0.757cm" svg:x="-38.633cm" svg:y="104.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1" draw:text-style-name="P5" draw:layer="layout" svg:width="1.207cm" svg:height="0.579cm" svg:x="-38.438cm" svg:y="104.436cm">
                <draw:object xlink:href="./Object 4" xlink:type="simple" xlink:show="embed" xlink:actuate="onLoad">
                  <loext:p/>
                </draw:object>
                <draw:image xlink:href="./ObjectReplacements/Object 4" xlink:type="simple" xlink:show="embed" xlink:actuate="onLoad"/>
              </draw:frame>
            </draw:g>
            <draw:connector draw:style-name="gr565" draw:text-style-name="P15" draw:layer="layout" draw:type="curve" svg:x1="-39.757cm" svg:y1="104.697cm" svg:x2="-38.633cm" svg:y2="104.701cm" draw:start-shape="id470" draw:start-glue-point="10" draw:end-shape="id471" draw:end-glue-point="3" svg:d="M-39757 104697c844 0 283 4 1124 4" svg:viewBox="0 0 1125 5">
              <text:p/>
            </draw:connector>
            <draw:custom-shape draw:style-name="gr569" draw:text-style-name="P27" xml:id="id472" draw:id="id472" draw:layer="layout" svg:width="0.837cm" svg:height="0.699cm" svg:x="-43.525cm" svg:y="108.0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0" draw:text-style-name="P27" draw:layer="layout" svg:width="0.817cm" svg:height="0.699cm" svg:x="-43.504cm" svg:y="106.508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1" draw:text-style-name="P7" draw:layer="layout" draw:type="curve" svg:x1="-43.106cm" svg:y1="108.048cm" svg:x2="-43.094cm" svg:y2="107.208cm" draw:start-shape="id472" draw:start-glue-point="4" draw:end-shape="id473" draw:end-glue-point="8" svg:d="M-43106 108048c0-630 12-210 12-840" svg:viewBox="0 0 13 841">
              <text:p/>
            </draw:connector>
            <draw:custom-shape draw:style-name="gr570" draw:text-style-name="P27" xml:id="id473" draw:id="id473" draw:layer="layout" svg:width="0.817cm" svg:height="0.699cm" svg:x="-43.503cm" svg:y="106.5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4" draw:text-style-name="P11" draw:layer="layout" svg:width="0.707cm" svg:height="0.57cm" svg:x="-43.61cm" svg:y="107.393cm">
              <draw:text-box>
                <text:p><text:span text:style-name="T4">H</text:span></text:p>
              </draw:text-box>
            </draw:frame>
            <draw:connector draw:style-name="gr571" draw:text-style-name="P7" draw:layer="layout" draw:type="curve" svg:x1="-43.094cm" svg:y1="106.509cm" svg:x2="-43.105cm" svg:y2="106.029cm" draw:start-shape="id473" draw:start-glue-point="4" draw:end-shape="id468" draw:end-glue-point="8" svg:d="M-43094 106509c0-360-11-120-11-480" svg:viewBox="0 0 12 481">
              <text:p/>
            </draw:connector>
            <draw:measure draw:style-name="gr573" draw:text-style-name="P173" draw:layer="measurelines" svg:x1="-42.638cm" svg:y1="106.971cm" svg:x2="-38.396cm" svg:y2="105.093cm">
              <text:p text:style-name="P172"><text:span text:style-name="T57">Suprise</text:span><text:span text:style-name="T57"><text:line-break/></text:span><text:span text:style-name="T57"><text:measure text:kind="gap"/></text:span><text:span text:style-name="T57">Wasserstein</text:span></text:p>
            </draw:measure>
          </draw:g>
          <draw:frame draw:style-name="gr574" draw:text-style-name="P41" draw:layer="layout" svg:width="2.729cm" svg:height="1.039cm" svg:x="-48.235cm" svg:y="89.315cm">
            <draw:text-box>
              <text:p text:style-name="P5"><text:span text:style-name="T12">Action</text:span><text:span text:style-name="T12"><text:line-break/></text:span><text:span text:style-name="T12">potential</text:span></text:p>
            </draw:text-box>
          </draw:frame>
          <draw:custom-shape draw:style-name="gr575" draw:text-style-name="P137" draw:layer="layout" svg:width="2.198cm" svg:height="1.705cm" svg:x="-51.239cm" svg:y="89.072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rect draw:style-name="gr41" draw:text-style-name="P5" xml:id="id474" draw:id="id474" draw:layer="layout" svg:width="2.064cm" svg:height="1.085cm" svg:x="10.737cm" svg:y="102.447cm">
          <text:p text:style-name="P5">close-loop</text:p>
        </draw:rect>
        <draw:connector draw:style-name="gr293" draw:text-style-name="P15" draw:layer="layout" draw:type="curve" svg:x1="16.457cm" svg:y1="99.461cm" svg:x2="11.769cm" svg:y2="102.447cm" draw:start-shape="id356" draw:start-glue-point="2" draw:end-shape="id474" draw:end-glue-point="0" svg:d="M16457 99461c0 2239-4688 747-4688 2986" svg:viewBox="0 0 4689 2987">
          <text:p/>
        </draw:connector>
        <draw:path draw:style-name="gr576" draw:text-style-name="P174" draw:layer="layout" svg:width="0.38cm" svg:height="0.468cm" svg:x="-29.158cm" svg:y="91.783cm" svg:viewBox="0 0 381 469" svg:d="M381 336c0 42-17 75-50 98-32 23-79 35-138 35-111 0-175-39-193-116l60-12c7 27 21 47 44 60 22 13 52 19 91 19 40 0 70-6 92-20s33-34 33-60c0-15-4-27-11-37-6-9-16-16-28-23-12-6-27-11-44-15s-36-8-57-13c-36-8-63-16-81-24-19-8-34-17-44-27-11-9-19-21-25-34s-9-28-9-45c0-39 15-69 45-90s72-32 128-32c52 0 91 8 118 24 28 16 47 43 58 81l-61 10c-6-24-19-41-38-52s-45-16-78-16c-36 0-64 6-83 18s-29 30-29 54c0 14 4 25 11 34 8 9 19 17 33 24 14 6 41 14 83 23 14 3 28 7 42 10s27 7 40 12c13 4 24 10 36 16 11 6 20 14 28 23 9 9 15 20 20 32 4 12 7 27 7 43z">
          <text:p/>
        </draw:path>
        <draw:path draw:style-name="gr576" draw:text-style-name="P174" draw:layer="layout" svg:width="0.309cm" svg:height="0.361cm" svg:x="-28.719cm" svg:y="91.89cm" svg:viewBox="0 0 310 362" svg:d="M61 193c0 40 8 71 25 93 16 22 41 32 72 32 26 0 46-5 61-15s25-23 31-38l51 14c-21 55-69 83-143 83-51 0-90-15-117-46s-41-77-41-137c0-58 14-102 41-133s65-46 115-46c103 0 154 62 154 185v8zM250 148c-3-36-12-63-28-80-15-17-38-25-67-25-28 0-50 9-67 28-16 19-25 45-26 77z">
          <text:p/>
        </draw:path>
        <draw:path draw:style-name="gr576" draw:text-style-name="P174" draw:layer="layout" svg:width="0.168cm" svg:height="0.432cm" svg:x="-28.37cm" svg:y="91.818cm" svg:viewBox="0 0 169 433" svg:d="M169 425c-19 5-39 8-59 8-46 0-70-26-70-79v-234h-40v-42h43l17-78h38v78h65v42h-65v221c0 17 3 29 9 36 5 6 15 10 28 10 8 0 19-2 34-5z">
          <text:p/>
        </draw:path>
        <draw:path draw:style-name="gr576" draw:text-style-name="P174" draw:layer="layout" svg:width="0.351cm" svg:height="0.455cm" svg:x="-27.959cm" svg:y="91.791cm" svg:viewBox="0 0 352 456" svg:d="M352 137c0 43-14 77-42 103-28 25-67 38-115 38h-133v178h-62v-456h191c51 0 91 12 119 36s42 58 42 101zM290 138c0-59-35-89-106-89h-122v180h125c68 0 103-30 103-91z">
          <text:p/>
        </draw:path>
        <draw:path draw:style-name="gr576" draw:text-style-name="P174" draw:layer="layout" svg:width="0.311cm" svg:height="0.361cm" svg:x="-27.545cm" svg:y="91.89cm" svg:viewBox="0 0 312 362" svg:d="M312 181c0 61-13 106-40 136s-66 45-117 45-90-16-116-47-39-76-39-134c0-121 52-181 157-181 53 0 92 15 117 44 26 29 38 75 38 137zM251 181c0-48-7-83-21-105-15-22-39-33-72-33-34 0-59 11-74 33-15 23-23 57-23 105 0 46 7 80 22 103s39 35 71 35c35 0 60-11 75-34 15-22 22-57 22-104z">
          <text:p/>
        </draw:path>
        <draw:path draw:style-name="gr576" draw:text-style-name="P174" draw:layer="layout" svg:width="0.057cm" svg:height="0.479cm" svg:x="-27.161cm" svg:y="91.767cm" svg:viewBox="0 0 58 480" svg:d="M0 56c0-19 0-37 0-56 19 0 39 0 58 0 0 19 0 37 0 56-19 0-39 0-58 0zM0 480c0-117 0-233 0-350 19 0 39 0 58 0 0 117 0 233 0 350-19 0-39 0-58 0z">
          <text:p/>
        </draw:path>
        <draw:path draw:style-name="gr576" draw:text-style-name="P174" draw:layer="layout" svg:width="0.28cm" svg:height="0.355cm" svg:x="-27.015cm" svg:y="91.89cm" svg:viewBox="0 0 281 356" svg:d="M222 356v-222c0-23-2-41-6-53-5-13-12-22-22-28-10-5-24-8-44-8-28 0-50 9-66 29-16 19-24 45-24 79v203h-58v-275c0-41-1-65-2-75h55c0 2 0 4 1 9 0 5 0 10 0 17 1 6 1 17 1 34h1c14-24 29-41 47-51 17-10 39-15 65-15 38 0 66 10 84 29s27 50 27 94v233z">
          <text:p/>
        </draw:path>
        <draw:path draw:style-name="gr576" draw:text-style-name="P174" draw:layer="layout" svg:width="0.168cm" svg:height="0.432cm" svg:x="-26.682cm" svg:y="91.818cm" svg:viewBox="0 0 169 433" svg:d="M169 425c-19 5-39 8-59 8-46 0-70-26-70-79v-234h-40v-42h43l17-78h38v78h65v42h-65v221c0 17 3 29 9 36 5 6 15 10 28 10 8 0 19-2 34-5z">
          <text:p/>
        </draw:path>
        <draw:g draw:style-name="gr23">
          <draw:path draw:style-name="gr577" draw:text-style-name="P175" draw:layer="layout" svg:width="0.194cm" svg:height="0.298cm" svg:x="-26.733cm" svg:y="92.957cm" svg:viewBox="0 0 195 299" svg:d="M186 45c-8-3-16-4-25-4-19 0-36 10-51 30s-26 45-31 75l-30 153h-49l44-225 7-38 5-31h46l-10 60h1c12-24 24-41 36-50 11-10 25-15 40-15 8 0 17 1 26 4z">
            <text:p/>
          </draw:path>
          <draw:path draw:style-name="gr577" draw:text-style-name="P175" draw:layer="layout" svg:width="0.205cm" svg:height="0.517cm" svg:x="-26.531cm" svg:y="92.853cm" svg:viewBox="0 0 206 518" svg:d="M206 0c-105 92-157 203-157 332 0 70 19 132 56 186h-47c-39-54-58-117-58-191 0-67 14-128 41-184 27-55 66-103 118-143z">
            <text:p/>
          </draw:path>
          <draw:path draw:style-name="gr577" draw:text-style-name="P175" draw:layer="layout" svg:width="0.148cm" svg:height="0.364cm" svg:x="-26.347cm" svg:y="92.897cm" svg:viewBox="0 0 149 365" svg:d="M49 365c-15-1-27-5-36-14-9-10-13-22-13-37 0-10 1-22 4-35l34-178h-34l7-35h35l28-66h33l-13 66h55l-8 35h-54l-34 175c-2 11-3 20-3 26 0 16 8 24 24 24 8 0 17-2 28-4l-6 36c-18 4-33 6-47 7z">
            <text:p/>
          </draw:path>
          <draw:path draw:style-name="gr577" draw:text-style-name="P175" draw:layer="layout" svg:width="0.205cm" svg:height="0.517cm" svg:x="-26.273cm" svg:y="92.853cm" svg:viewBox="0 0 206 518" svg:d="M0 518c105-92 157-203 157-332 0-70-19-132-56-186h47c39 54 58 117 58 191 0 67-14 128-41 184-27 55-66 103-118 143z">
            <text:p/>
          </draw:path>
        </draw:g>
        <draw:path draw:style-name="gr578" draw:text-style-name="P5" draw:layer="layout" svg:width="4.073cm" svg:height="0cm" svg:x="-29.294cm" svg:y="92.706cm" svg:viewBox="0 0 4074 0" svg:d="M0 0c1358 0 2716 0 4074 0">
          <text:p/>
        </draw:path>
        <draw:path draw:style-name="gr579" draw:text-style-name="P176" draw:layer="layout" svg:width="0.316cm" svg:height="0.316cm" svg:x="-25.484cm" svg:y="92.547cm" svg:viewBox="0 0 317 317" svg:d="M0 0c106 53 211 106 317 159-106 53-211 105-317 158 0-106 0-211 0-317z">
          <text:p/>
        </draw:path>
        <draw:path draw:style-name="gr580" draw:text-style-name="P177"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1" draw:text-style-name="P126"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2" draw:text-style-name="P174" draw:layer="layout" svg:width="0.32cm" svg:height="0.323cm" svg:x="-25.108cm" svg:y="91.732cm" svg:viewBox="0 0 321 324" svg:d="M184 186c0 46 0 92 0 138-16 0-31 0-47 0 0-46 0-92 0-138-46 0-91 0-137 0 0-16 0-32 0-47 46 0 91 0 137 0 0-47 0-93 0-139 16 0 31 0 47 0 0 46 0 92 0 139 46 0 92 0 137 0 0 15 0 31 0 47-45 0-91 0-137 0z">
          <text:p/>
        </draw:path>
        <draw:path draw:style-name="gr582" draw:text-style-name="P174" draw:layer="layout" svg:width="0.32cm" svg:height="0.046cm" svg:x="-25.287cm" svg:y="93.431cm" svg:viewBox="0 0 321 47" svg:d="M0 47c0-16 0-31 0-47 107 0 214 0 321 0 0 16 0 31 0 47-107 0-214 0-321 0z">
          <text:p/>
        </draw:path>
        <draw:g draw:style-name="gr23">
          <draw:path draw:style-name="gr583" draw:text-style-name="P174" draw:layer="layout" svg:width="0.331cm" svg:height="0.341cm" svg:x="-24.496cm" svg:y="89.913cm" svg:viewBox="0 0 332 342" svg:d="M291 342v-229c0-24 0-48 2-72-8 29-15 51-22 68l-88 233h-33l-89-233-14-41-7-27 1 27v45 229h-41v-342h61l91 237c3 9 6 20 9 30 3 12 5 19 6 24 1-6 4-16 8-29 5-13 7-22 8-25l90-237h59v342z">
            <text:p/>
          </draw:path>
          <draw:path draw:style-name="gr583" draw:text-style-name="P174" draw:layer="layout" svg:width="0.232cm" svg:height="0.271cm" svg:x="-24.102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3" draw:text-style-name="P174" draw:layer="layout" svg:width="0.254cm" svg:height="0.271cm" svg:x="-23.827cm" svg:y="89.987cm" svg:viewBox="0 0 255 272" svg:d="M80 272c-27 0-47-7-60-21s-20-32-20-57c0-27 9-48 27-63 17-14 47-22 86-23l59-1v-14c0-22-4-37-13-46-10-9-24-14-43-14-20 0-34 4-43 11-8 6-14 16-16 31l-45-4c7-48 42-71 105-71 32 0 57 8 75 23 16 15 24 36 24 66v112c0 13 2 23 6 30 3 6 9 9 19 9 4 0 8 0 14-1v27c-11 3-22 4-33 4-17 0-28-4-36-13-7-8-12-22-12-40h-2c-11 20-24 35-39 43-14 8-32 12-53 12zM89 240c16 0 30-4 43-12 12-7 22-17 30-30 6-12 10-25 10-39v-22l-47 2c-21 0-36 2-48 6-10 4-18 10-24 18s-8 19-8 32c0 14 4 25 11 33 8 7 19 12 33 12z">
            <text:p/>
          </draw:path>
          <draw:path draw:style-name="gr583" draw:text-style-name="P174" draw:layer="layout" svg:width="0.215cm" svg:height="0.271cm" svg:x="-23.558cm" svg:y="89.987cm" svg:viewBox="0 0 216 272" svg:d="M216 195c0 24-9 43-27 57-19 13-46 20-79 20s-57-5-75-17c-18-10-30-27-35-50l38-7c4 14 12 24 24 31 11 6 27 10 48 10 22 0 39-4 49-11 10-6 15-17 15-30 0-10-3-19-10-25-8-7-19-12-35-17l-31-8c-25-6-43-13-54-19-10-6-18-13-24-22s-9-21-9-33c0-24 8-42 25-55s42-19 74-19c30 0 52 5 70 15 17 11 27 27 32 50l-39 4c-2-11-9-20-20-27-10-6-25-9-43-9-19 0-33 3-43 9-9 6-14 15-14 27 0 8 2 14 6 19 3 4 9 9 17 12 7 4 23 8 48 14 23 6 40 11 50 17 10 4 18 9 24 15 6 7 10 14 14 22 3 7 4 16 4 27z">
            <text:p/>
          </draw:path>
          <draw:path draw:style-name="gr583" draw:text-style-name="P174" draw:layer="layout" svg:width="0.21cm" svg:height="0.266cm" svg:x="-23.291cm" svg:y="89.992cm" svg:viewBox="0 0 211 267" svg:d="M44 0v167c0 17 2 31 5 40 4 9 9 16 16 21 8 3 18 6 33 6 21 0 37-7 50-22 12-14 18-34 18-59v-153h44v207c0 30 0 49 1 56h-41c0-2 0-3-1-7 0-4 0-7-1-12 0-5 0-13 0-26h-1c-10 18-21 31-35 38-13 8-29 11-49 11-29 0-50-7-63-21-13-15-20-38-20-71v-175z">
            <text:p/>
          </draw:path>
          <draw:path draw:style-name="gr583" draw:text-style-name="P174" draw:layer="layout" svg:width="0.123cm" svg:height="0.266cm" svg:x="-23.015cm" svg:y="89.987cm" svg:viewBox="0 0 124 267" svg:d="M2 267v-201c0-19-1-39-2-61h41c2 30 2 48 2 54h1c7-23 15-39 24-47 9-7 22-12 39-12 5 0 11 1 17 2v41c-5-2-14-3-23-3-18 0-32 8-42 23-9 16-14 38-14 68v136z">
            <text:p/>
          </draw:path>
          <draw:path draw:style-name="gr583" draw:text-style-name="P174" draw:layer="layout" svg:width="0.232cm" svg:height="0.271cm" svg:x="-22.861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3" draw:text-style-name="P174" draw:layer="layout" svg:width="0.222cm" svg:height="0.364cm" svg:x="-22.586cm" svg:y="89.895cm" svg:viewBox="0 0 223 365" svg:d="M178 318c-8 17-19 29-32 36s-30 11-50 11c-33 0-57-11-73-34-15-21-23-56-23-101 0-92 32-138 96-138 20 0 37 4 50 12 13 6 24 18 32 34h1l-1-29v-109h44v306c0 28 0 46 1 54h-41c-1-2-2-8-2-17 0-10 0-18 0-25zM46 228c0 37 4 63 14 79s26 24 47 24c25 0 43-8 55-25 11-18 16-45 16-81 0-34-5-60-16-76-12-16-30-24-54-24-22 0-37 8-47 24s-15 43-15 79z">
            <text:p/>
          </draw:path>
          <draw:path draw:style-name="gr584" draw:text-style-name="P174" draw:layer="layout" svg:width="0.268cm" svg:height="0.341cm" svg:x="-24.019cm" svg:y="90.609cm" svg:viewBox="0 0 269 342" svg:d="M0 342c0-114 0-228 0-342 86 0 173 0 259 0 0 13 0 26 0 38-70 0-142 0-212 0 0 36 0 73 0 109 66 0 132 0 198 0 0 13 0 25 0 38-66 0-132 0-198 0 0 40 0 79 0 119 74 0 148 0 222 0 0 12 0 25 0 38-89 0-180 0-269 0z">
            <text:p/>
          </draw:path>
          <draw:path draw:style-name="gr584" draw:text-style-name="P174" draw:layer="layout" svg:width="0.123cm" svg:height="0.266cm" svg:x="-23.696cm" svg:y="90.683cm" svg:viewBox="0 0 124 267" svg:d="M2 267v-201c0-19-1-39-2-61h41c2 30 2 48 2 54h1c7-23 15-39 24-47 9-7 22-12 39-12 5 0 11 1 17 2v41c-5-2-14-3-23-3-18 0-32 8-42 23-9 16-14 38-14 68v136z">
            <text:p/>
          </draw:path>
          <draw:path draw:style-name="gr584" draw:text-style-name="P174" draw:layer="layout" svg:width="0.123cm" svg:height="0.266cm" svg:x="-23.531cm" svg:y="90.683cm" svg:viewBox="0 0 124 267" svg:d="M2 267v-201c0-19-1-39-2-61h41c2 30 2 48 2 54h1c7-23 15-39 24-47 9-7 22-12 39-12 5 0 11 1 17 2v41c-5-2-14-3-23-3-18 0-32 8-42 23-9 16-14 38-14 68v136z">
            <text:p/>
          </draw:path>
          <draw:path draw:style-name="gr584" draw:text-style-name="P174" draw:layer="layout" svg:width="0.233cm" svg:height="0.271cm" svg:x="-23.377cm" svg:y="90.683cm" svg:viewBox="0 0 234 272" svg:d="M234 136c0 46-9 80-30 102-20 23-49 34-88 34-38 0-67-12-87-35-19-24-29-57-29-101 0-91 39-136 118-136 40 0 69 11 88 33s28 56 28 103zM189 136c0-36-6-62-16-79-11-16-30-25-54-25-26 0-45 9-56 25-11 17-17 43-17 79 0 35 5 60 16 77 12 18 30 27 54 27 26 0 45-9 56-26 11-16 17-43 17-78z">
            <text:p/>
          </draw:path>
          <draw:path draw:style-name="gr584" draw:text-style-name="P174" draw:layer="layout" svg:width="0.123cm" svg:height="0.266cm" svg:x="-23.09cm" svg:y="90.683cm" svg:viewBox="0 0 124 267" svg:d="M2 267v-201c0-19-1-39-2-61h41c2 30 2 48 2 54h1c7-23 15-39 24-47 9-7 22-12 39-12 5 0 11 1 17 2v41c-5-2-14-3-23-3-18 0-32 8-42 23-9 16-14 38-14 68v136z">
            <text:p/>
          </draw:path>
        </draw:g>
        <draw:g draw:style-name="gr23">
          <draw:path draw:style-name="gr585" draw:text-style-name="P175" draw:layer="layout" svg:width="0.269cm" svg:height="0.303cm" svg:x="-24.036cm" svg:y="91.853cm" svg:viewBox="0 0 270 304" svg:d="M51 162c-1 6-2 17-3 31 0 24 6 42 18 55s31 19 55 19c17 0 33-4 48-13 14-8 25-20 33-35l37 17c-13 24-30 41-50 52s-45 16-74 16c-36 0-65-10-85-30s-30-49-30-85 6-69 19-98 31-51 55-67c23-16 49-24 78-24 37 0 66 9 87 28 21 18 31 45 31 79 0 19-2 37-7 55zM220 125l1-20c0-22-6-39-17-51-12-12-29-18-51-18-24 0-44 8-61 23-16 16-28 37-35 66z">
            <text:p/>
          </draw:path>
          <draw:path draw:style-name="gr585" draw:text-style-name="P175" draw:layer="layout" svg:width="0.205cm" svg:height="0.517cm" svg:x="-23.721cm" svg:y="91.749cm" svg:viewBox="0 0 206 518" svg:d="M206 0c-105 92-157 203-157 332 0 70 19 132 56 186h-47c-39-54-58-117-58-191 0-67 14-128 41-184 27-55 66-103 118-143z">
            <text:p/>
          </draw:path>
          <draw:path draw:style-name="gr585" draw:text-style-name="P175" draw:layer="layout" svg:width="0.148cm" svg:height="0.364cm" svg:x="-23.537cm" svg:y="91.793cm" svg:viewBox="0 0 149 365" svg:d="M49 365c-15-1-27-5-36-14-9-10-13-22-13-37 0-10 1-22 4-35l34-178h-34l7-35h35l28-66h33l-13 66h55l-8 35h-54l-34 175c-2 11-3 20-3 26 0 16 8 24 24 24 8 0 17-2 28-4l-6 36c-18 4-33 6-47 7z">
            <text:p/>
          </draw:path>
          <draw:path draw:style-name="gr585" draw:text-style-name="P175" draw:layer="layout" svg:width="0.205cm" svg:height="0.517cm" svg:x="-23.462cm" svg:y="91.749cm" svg:viewBox="0 0 206 518" svg:d="M0 518c105-92 157-203 157-332 0-70-19-132-56-186h47c39 54 58 117 58 191 0 67-14 128-41 184-27 55-66 103-118 143z">
            <text:p/>
          </draw:path>
        </draw:g>
        <draw:path draw:style-name="gr578" draw:text-style-name="P5" draw:layer="layout" svg:width="1.904cm" svg:height="0cm" svg:x="-24.161cm" svg:y="92.706cm" svg:viewBox="0 0 1905 0" svg:d="M0 0c635 0 1270 0 1905 0">
          <text:p/>
        </draw:path>
        <draw:path draw:style-name="gr579" draw:text-style-name="P176" draw:layer="layout" svg:width="0.317cm" svg:height="0.316cm" svg:x="-22.521cm" svg:y="92.547cm" svg:viewBox="0 0 318 317" svg:d="M0 0c106 53 212 106 318 159-106 53-212 105-318 158 0-106 0-211 0-317z">
          <text:p/>
        </draw:path>
        <draw:path draw:style-name="gr579" draw:text-style-name="P176" draw:layer="layout" svg:width="0.317cm" svg:height="0.316cm" svg:x="-22.521cm" svg:y="92.547cm" svg:viewBox="0 0 318 317" svg:d="M0 0c106 53 212 106 318 159-106 53-212 105-318 158 0-106 0-211 0-317z">
          <text:p/>
        </draw:path>
        <draw:path draw:style-name="gr586" draw:text-style-name="P178" draw:layer="layout" svg:width="4.629cm" svg:height="1.772cm" svg:x="-22.15cm" svg:y="91.595cm" svg:viewBox="0 0 4630 1773" svg:d="M0 0c1543 0 3087 0 4630 0 0 591 0 1182 0 1773-1543 0-3087 0-4630 0 0-591 0-1182 0-1773z">
          <text:p/>
        </draw:path>
        <draw:path draw:style-name="gr587" draw:text-style-name="P179" draw:layer="layout" svg:width="4.629cm" svg:height="1.772cm" svg:x="-22.15cm" svg:y="91.595cm" svg:viewBox="0 0 4630 1773" svg:d="M0 0c1543 0 3087 0 4630 0 0 591 0 1182 0 1773-1543 0-3087 0-4630 0 0-591 0-1182 0-1773z">
          <text:p/>
        </draw:path>
        <draw:g draw:style-name="gr23">
          <draw:path draw:style-name="gr588" draw:text-style-name="P180" draw:layer="layout" svg:width="0.455cm" svg:height="0.51cm" svg:x="-21.495cm" svg:y="92.265cm" svg:viewBox="0 0 456 511" svg:d="M242 54c-55 0-97 19-128 54-30 35-46 84-46 145s17 110 48 147c32 37 75 55 129 55 69 0 122-34 157-103l54 27c-20 43-49 76-86 98-36 23-79 34-128 34-50 0-93-11-130-32-36-20-64-50-84-89-18-38-28-84-28-137 0-79 21-141 64-186s102-67 177-67c53 0 97 11 132 31 36 21 62 52 79 92l-64 21c-12-29-30-51-55-66-26-16-56-24-91-24z">
            <text:p/>
          </draw:path>
          <draw:path draw:style-name="gr588" draw:text-style-name="P180" draw:layer="layout" svg:width="0.339cm" svg:height="0.394cm" svg:x="-20.982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8" draw:text-style-name="P180" draw:layer="layout" svg:width="0.305cm" svg:height="0.387cm" svg:x="-20.563cm" svg:y="92.381cm" svg:viewBox="0 0 306 388" svg:d="M242 388v-241c0-25-2-45-7-59s-12-24-24-30c-11-6-26-9-47-9-31 0-54 10-73 32-17 20-26 49-26 86v221h-63v-300c0-44-1-71-2-81h60c0 1 0 5 0 10 0 4 1 10 1 17 1 7 1 19 1 38h2c14-26 31-45 50-55 19-11 44-17 72-17 42 0 72 11 91 31 20 21 29 56 29 103v254z">
            <text:p/>
          </draw:path>
          <draw:path draw:style-name="gr588" draw:text-style-name="P180" draw:layer="layout" svg:width="0.183cm" svg:height="0.471cm" svg:x="-20.2cm" svg:y="92.303cm" svg:viewBox="0 0 184 472" svg:d="M184 463c-21 6-42 9-64 9-51 0-76-30-76-87v-254h-44v-45h47l18-86h42v86h71v45h-71v240c0 19 3 32 10 39 6 7 15 11 31 11 8 0 20-1 36-5z">
            <text:p/>
          </draw:path>
          <draw:path draw:style-name="gr588" draw:text-style-name="P180" draw:layer="layout" svg:width="0.179cm" svg:height="0.387cm" svg:x="-19.962cm" svg:y="92.381cm" svg:viewBox="0 0 180 388" svg:d="M2 388v-293c0-26-1-55-2-88h60c1 44 2 69 2 78h2c10-32 22-55 35-67s31-18 56-18c8 0 16 1 25 4v57c-8-2-20-3-33-3-26 0-47 11-60 34-15 23-22 55-22 98v198z">
            <text:p/>
          </draw:path>
          <draw:path draw:style-name="gr588" draw:text-style-name="P180" draw:layer="layout" svg:width="0.339cm" svg:height="0.394cm" svg:x="-19.74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8" draw:text-style-name="P180" draw:layer="layout" svg:width="0.062cm" svg:height="0.522cm" svg:x="-19.321cm" svg:y="92.247cm" svg:viewBox="0 0 63 523" svg:d="M0 523c0-175 0-349 0-523 21 0 42 0 63 0 0 174 0 348 0 523-21 0-42 0-63 0z">
            <text:p/>
          </draw:path>
          <draw:path draw:style-name="gr588" draw:text-style-name="P180" draw:layer="layout" svg:width="0.062cm" svg:height="0.522cm" svg:x="-19.161cm" svg:y="92.247cm" svg:viewBox="0 0 63 523" svg:d="M0 523c0-175 0-349 0-523 21 0 42 0 63 0 0 174 0 348 0 523-21 0-42 0-63 0z">
            <text:p/>
          </draw:path>
          <draw:path draw:style-name="gr588" draw:text-style-name="P180" draw:layer="layout" svg:width="0.337cm" svg:height="0.394cm" svg:x="-19.019cm" svg:y="92.381cm" svg:viewBox="0 0 338 395" svg:d="M66 211c0 44 10 77 27 101 19 23 45 35 80 35 27 0 49-5 65-16 18-11 28-25 34-42l56 16c-23 60-74 90-155 90-56 0-99-17-129-51-29-33-44-82-44-149 0-63 15-111 44-144 30-34 72-51 126-51 112 0 168 67 168 202v9zM272 162c-3-39-13-69-30-87-16-19-41-28-73-28-31 0-55 10-73 31-18 20-27 48-29 84z">
            <text:p/>
          </draw:path>
          <draw:path draw:style-name="gr588" draw:text-style-name="P180" draw:layer="layout" svg:width="0.179cm" svg:height="0.387cm" svg:x="-18.601cm" svg:y="92.381cm" svg:viewBox="0 0 180 388" svg:d="M2 388v-293c0-26-1-55-2-88h60c1 44 2 69 2 78h2c10-32 22-55 35-67s31-18 56-18c8 0 16 1 25 4v57c-8-2-20-3-33-3-26 0-47 11-60 34-15 23-22 55-22 98v198z">
            <text:p/>
          </draw:path>
        </draw:g>
        <draw:g draw:style-name="gr23">
          <draw:path draw:style-name="gr589" draw:text-style-name="P174" draw:layer="layout" svg:width="0.281cm" svg:height="0.313cm" svg:x="-17.765cm" svg:y="90.219cm" svg:viewBox="0 0 282 314" svg:d="M149 34c-33 0-60 11-78 33-19 21-29 51-29 89 0 37 10 68 29 91 20 22 47 34 80 34 42 0 75-22 96-64l35 17c-13 26-31 46-54 60-22 14-49 20-79 20-31 0-58-6-80-18-23-13-39-31-52-55-11-24-17-52-17-85 0-49 13-87 40-114 26-28 62-42 108-42 33 0 60 6 82 19s38 31 48 57l-39 13c-7-18-18-32-34-41-16-10-34-14-56-14z">
            <text:p/>
          </draw:path>
          <draw:path draw:style-name="gr589" draw:text-style-name="P174" draw:layer="layout" svg:width="0.209cm" svg:height="0.242cm" svg:x="-17.449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9" draw:text-style-name="P174" draw:layer="layout" svg:width="0.188cm" svg:height="0.238cm" svg:x="-17.191cm" svg:y="90.291cm" svg:viewBox="0 0 189 239" svg:d="M149 239v-149c0-15-1-28-4-36s-8-14-15-18c-6-4-16-6-29-6-19 0-34 6-45 20-10 12-16 30-16 53v136h-39v-185c0-27 0-43-1-50h37c0 1 0 3 1 6 0 3 0 7 0 11 0 5 0 12 0 23h1c9-16 19-27 32-34 11-7 26-10 43-10 26 0 45 7 57 19 12 13 18 34 18 64v156z">
            <text:p/>
          </draw:path>
          <draw:path draw:style-name="gr589" draw:text-style-name="P174" draw:layer="layout" svg:width="0.113cm" svg:height="0.29cm" svg:x="-16.968cm" svg:y="90.242cm" svg:viewBox="0 0 114 291" svg:d="M114 286c-13 3-27 5-40 5-31 0-47-18-47-53v-157h-27v-29h29l11-52h26v52h44v29h-44v148c0 12 2 20 6 24 3 4 10 7 19 7 5 0 12-1 23-3z">
            <text:p/>
          </draw:path>
          <draw:path draw:style-name="gr589" draw:text-style-name="P174" draw:layer="layout" svg:width="0.11cm" svg:height="0.238cm" svg:x="-16.821cm" svg:y="90.291cm" svg:viewBox="0 0 111 239" svg:d="M1 239v-180c0-17 0-35-1-55h37c1 27 1 43 1 48h2c6-20 13-34 21-41s20-11 34-11c5 0 10 1 16 2v36c-5-2-12-2-21-2-16 0-28 7-37 20-9 15-13 35-13 61v122z">
            <text:p/>
          </draw:path>
          <draw:path draw:style-name="gr589" draw:text-style-name="P174" draw:layer="layout" svg:width="0.209cm" svg:height="0.242cm" svg:x="-16.684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9" draw:text-style-name="P174" draw:layer="layout" svg:width="0.038cm" svg:height="0.321cm" svg:x="-16.426cm" svg:y="90.208cm" svg:viewBox="0 0 39 322" svg:d="M0 322c0-107 0-215 0-322 13 0 26 0 39 0 0 107 0 215 0 322-13 0-26 0-39 0z">
            <text:p/>
          </draw:path>
          <draw:path draw:style-name="gr589" draw:text-style-name="P174" draw:layer="layout" svg:width="0.038cm" svg:height="0.321cm" svg:x="-16.328cm" svg:y="90.208cm" svg:viewBox="0 0 39 322" svg:d="M0 322c0-107 0-215 0-322 13 0 26 0 39 0 0 107 0 215 0 322-13 0-26 0-39 0z">
            <text:p/>
          </draw:path>
          <draw:path draw:style-name="gr589" draw:text-style-name="P174" draw:layer="layout" svg:width="0.207cm" svg:height="0.242cm" svg:x="-16.24cm" svg:y="90.291cm" svg:viewBox="0 0 208 243" svg:d="M41 130c0 27 5 47 17 62 11 15 27 22 48 22 18 0 31-4 41-10 10-7 17-16 21-26l34 9c-14 37-46 56-96 56-34 0-60-10-78-31-19-21-28-51-28-92 0-39 9-68 28-89 18-21 43-31 77-31 69 0 103 42 103 124v6zM168 99c-2-24-8-42-19-53-10-12-25-17-45-17-19 0-33 6-45 19-11 12-17 30-17 51z">
            <text:p/>
          </draw:path>
          <draw:path draw:style-name="gr589" draw:text-style-name="P174" draw:layer="layout" svg:width="0.11cm" svg:height="0.238cm" svg:x="-15.983cm" svg:y="90.291cm" svg:viewBox="0 0 111 239" svg:d="M1 239v-180c0-17 0-35-1-55h37c1 27 1 43 1 48h2c6-20 13-34 21-41s20-11 34-11c5 0 10 1 16 2v36c-5-2-12-2-21-2-16 0-28 7-37 20-9 15-13 35-13 61v122z">
            <text:p/>
          </draw:path>
          <draw:path draw:style-name="gr590" draw:text-style-name="P174" draw:layer="layout" svg:width="0.302cm" svg:height="0.313cm" svg:x="-17.465cm" svg:y="90.842cm" svg:viewBox="0 0 303 314" svg:d="M303 156c0 32-6 60-18 84s-30 42-53 56c-22 12-49 18-81 18-31 0-58-6-81-18-22-13-40-31-52-55-12-25-18-53-18-85 0-49 13-87 40-114 27-28 64-42 112-42 31 0 58 6 80 19 23 12 41 30 53 54 12 23 18 51 18 83zM261 156c0-38-10-68-29-89-18-22-45-33-80-33s-62 10-81 32c-19 21-29 52-29 90s10 69 29 91c19 23 46 34 80 34 36 0 63-11 81-32 19-23 29-53 29-93z">
            <text:p/>
          </draw:path>
          <draw:path draw:style-name="gr590" draw:text-style-name="P174" draw:layer="layout" svg:width="0.188cm" svg:height="0.238cm" svg:x="-17.111cm" svg:y="90.917cm" svg:viewBox="0 0 189 239" svg:d="M39 0v149c0 16 2 28 5 36s8 15 14 19c7 3 17 5 29 5 19 0 34-6 45-20 11-12 16-30 16-53v-136h39v185c0 27 1 44 2 50h-37c0-1 0-3-1-6 0-3 0-7-1-11 0-4 0-12 0-23h-1c-9 16-19 27-31 34-11 7-26 10-43 10-27 0-45-7-57-19-12-13-18-34-18-63v-157z">
            <text:p/>
          </draw:path>
          <draw:path draw:style-name="gr590" draw:text-style-name="P174" draw:layer="layout" svg:width="0.113cm" svg:height="0.29cm" svg:x="-16.887cm" svg:y="90.864cm" svg:viewBox="0 0 114 291" svg:d="M114 286c-13 3-27 5-40 5-31 0-47-18-47-53v-157h-27v-29h29l11-52h26v52h44v29h-44v148c0 12 2 20 6 24 3 4 10 7 19 7 5 0 12-1 23-3z">
            <text:p/>
          </draw:path>
          <draw:path draw:style-name="gr590" draw:text-style-name="P174" draw:layer="layout" svg:width="0.199cm" svg:height="0.33cm" svg:x="-16.742cm" svg:y="90.913cm" svg:viewBox="0 0 200 331" svg:d="M200 120c0 82-29 123-86 123-37 0-61-13-74-41 0 2 0 14 0 37v92h-39v-279c0-24 0-40-1-48h38c0 1 0 3 0 6 1 4 1 9 2 17 0 7 0 12 0 15h1c7-14 16-25 28-32 11-7 26-10 45-10 28 0 50 9 64 29 15 19 22 50 22 91zM159 122c0-33-4-57-13-71-10-14-23-21-43-21-15 0-27 4-36 10s-15 16-20 31c-5 13-7 31-7 53 0 31 5 54 15 68 10 15 26 22 48 22 19 0 33-7 42-21 10-14 14-38 14-71z">
            <text:p/>
          </draw:path>
          <draw:path draw:style-name="gr590" draw:text-style-name="P174" draw:layer="layout" svg:width="0.188cm" svg:height="0.238cm" svg:x="-16.495cm" svg:y="90.917cm" svg:viewBox="0 0 189 239" svg:d="M39 0v149c0 16 2 28 5 36s8 15 14 19c7 3 17 5 29 5 19 0 34-6 45-20 11-12 16-30 16-53v-136h39v185c0 27 1 44 2 50h-37c0-1 0-3-1-6 0-3 0-7-1-11 0-4 0-12 0-23h-1c-9 16-19 27-31 34-11 7-26 10-43 10-27 0-45-7-57-19-12-13-18-34-18-63v-157z">
            <text:p/>
          </draw:path>
          <draw:path draw:style-name="gr590" draw:text-style-name="P174" draw:layer="layout" svg:width="0.113cm" svg:height="0.29cm" svg:x="-16.27cm" svg:y="90.864cm" svg:viewBox="0 0 114 291" svg:d="M114 286c-13 3-27 5-40 5-31 0-47-18-47-53v-157h-27v-29h29l11-52h26v52h44v29h-44v148c0 12 2 20 6 24 3 4 10 7 19 7 5 0 12-1 23-3z">
            <text:p/>
          </draw:path>
        </draw:g>
        <draw:path draw:style-name="gr585" draw:text-style-name="P175" draw:layer="layout" svg:width="0.274cm" svg:height="0.298cm" svg:x="-17.206cm" svg:y="91.859cm" svg:viewBox="0 0 275 299" svg:d="M89 0l-34 175c-3 16-5 29-5 41 0 30 16 45 49 45 23 0 43-9 60-26 17-18 29-41 35-71l32-164h49l-45 231c-4 17-7 38-11 62h-46c0-2 1-9 3-21s3-21 5-29h-1c-15 21-30 35-45 43-16 8-34 12-54 13-27-1-47-7-61-20-13-13-20-33-20-57 0-12 2-27 6-45l34-177z">
          <text:p/>
        </draw:path>
        <draw:path draw:style-name="gr585" draw:text-style-name="P175" draw:layer="layout" svg:width="0.205cm" svg:height="0.517cm" svg:x="-16.895cm" svg:y="91.749cm" svg:viewBox="0 0 206 518" svg:d="M206 0c-105 92-157 203-157 332 0 70 19 132 56 186h-47c-39-54-58-117-58-191 0-67 14-128 41-184 27-55 66-103 118-143z">
          <text:p/>
        </draw:path>
        <draw:path draw:style-name="gr585" draw:text-style-name="P175" draw:layer="layout" svg:width="0.148cm" svg:height="0.364cm" svg:x="-16.711cm" svg:y="91.793cm" svg:viewBox="0 0 149 365" svg:d="M49 365c-15-1-27-5-36-14-9-10-13-22-13-37 0-10 1-22 4-35l34-178h-34l7-35h35l28-66h33l-13 66h55l-8 35h-54l-34 175c-2 11-3 20-3 26 0 16 8 24 24 24 8 0 17-2 28-4l-6 36c-18 4-33 6-47 7z">
          <text:p/>
        </draw:path>
        <draw:path draw:style-name="gr585" draw:text-style-name="P175" draw:layer="layout" svg:width="0.205cm" svg:height="0.517cm" svg:x="-16.636cm" svg:y="91.749cm" svg:viewBox="0 0 206 518" svg:d="M0 518c105-92 157-203 157-332 0-70-19-132-56-186h47c39 54 58 117 58 191 0 67-14 128-41 184-27 55-66 103-118 143z">
          <text:p/>
        </draw:path>
        <draw:path draw:style-name="gr578" draw:text-style-name="P5" draw:layer="layout" svg:width="1.692cm" svg:height="0cm" svg:x="-17.52cm" svg:y="92.706cm" svg:viewBox="0 0 1693 0" svg:d="M0 0c564 0 1129 0 1693 0">
          <text:p/>
        </draw:path>
        <draw:path draw:style-name="gr579" draw:text-style-name="P176" draw:layer="layout" svg:width="0.317cm" svg:height="0.316cm" svg:x="-16.092cm" svg:y="92.547cm" svg:viewBox="0 0 318 317" svg:d="M0 0c106 53 212 106 318 159-106 53-212 105-318 158 0-106 0-211 0-317z">
          <text:p/>
        </draw:path>
        <draw:path draw:style-name="gr579" draw:text-style-name="P176" draw:layer="layout" svg:width="0.317cm" svg:height="0.316cm" svg:x="-16.092cm" svg:y="92.547cm" svg:viewBox="0 0 318 317" svg:d="M0 0c106 53 212 106 318 159-106 53-212 105-318 158 0-106 0-211 0-317z">
          <text:p/>
        </draw:path>
        <draw:path draw:style-name="gr579" draw:text-style-name="P176" draw:layer="layout" svg:width="0.317cm" svg:height="0.316cm" svg:x="-16.092cm" svg:y="92.547cm" svg:viewBox="0 0 318 317" svg:d="M0 0c106 53 212 106 318 159-106 53-212 105-318 158 0-106 0-211 0-317z">
          <text:p/>
        </draw:path>
        <draw:path draw:style-name="gr591" draw:text-style-name="P181" draw:layer="layout" svg:width="4.1cm" svg:height="1.772cm" svg:x="-15.721cm" svg:y="91.595cm" svg:viewBox="0 0 4101 1773" svg:d="M0 0c1367 0 2734 0 4101 0 0 591 0 1182 0 1773-1367 0-2734 0-4101 0 0-591 0-1182 0-1773z">
          <text:p/>
        </draw:path>
        <draw:path draw:style-name="gr592" draw:text-style-name="P182" draw:layer="layout" svg:width="4.1cm" svg:height="1.772cm" svg:x="-15.721cm" svg:y="91.595cm" svg:viewBox="0 0 4101 1773" svg:d="M0 0c1367 0 2734 0 4101 0 0 591 0 1182 0 1773-1367 0-2734 0-4101 0 0-591 0-1182 0-1773z">
          <text:p/>
        </draw:path>
        <draw:g draw:style-name="gr23">
          <draw:path draw:style-name="gr593" draw:text-style-name="P180" draw:layer="layout" svg:width="0.43cm" svg:height="0.447cm" svg:x="-14.995cm" svg:y="92.224cm" svg:viewBox="0 0 431 448" svg:d="M370 448l-51-131h-205l-51 131h-63l183-448h69l179 448zM216 46l-3 8c-5 18-13 41-23 68l-57 148h167l-58-148c-5-15-11-32-17-50z">
            <text:p/>
          </draw:path>
          <draw:path draw:style-name="gr593" draw:text-style-name="P180" draw:layer="layout" svg:width="0.279cm" svg:height="0.356cm" svg:x="-14.534cm" svg:y="92.321cm" svg:viewBox="0 0 280 357" svg:d="M60 177c0 45 7 79 22 101 14 22 36 34 65 34 20 0 37-6 51-17 13-11 22-28 25-51l57 4c-4 33-18 59-42 79s-54 30-90 30c-48 0-85-15-110-46-26-30-38-75-38-133s12-102 38-132c25-31 62-46 110-46 35 0 64 9 87 27 23 19 38 43 43 76l-58 4c-3-19-11-34-22-46-13-11-30-16-52-16-30 0-52 10-66 30-13 20-20 54-20 102z">
            <text:p/>
          </draw:path>
          <draw:path draw:style-name="gr593" draw:text-style-name="P180" draw:layer="layout" svg:width="0.165cm" svg:height="0.425cm" svg:x="-14.227cm" svg:y="92.251cm" svg:viewBox="0 0 166 426" svg:d="M166 418c-18 5-38 8-58 8-46 0-68-26-68-78v-229h-40v-42h42l17-77h38v77h64v42h-64v216c0 17 2 29 8 36 6 6 14 9 28 9 8 0 19-1 33-4z">
            <text:p/>
          </draw:path>
          <draw:path draw:style-name="gr593" draw:text-style-name="P180" draw:layer="layout" svg:width="0.276cm" svg:height="0.349cm" svg:x="-14.014cm" svg:y="92.328cm" svg:viewBox="0 0 277 350" svg:d="M57 0v218c0 23 3 40 7 52 4 14 12 22 21 28 10 6 25 8 43 8 28 0 49-9 65-29 16-18 24-44 24-78v-199h58v270c0 41 0 65 2 74h-55c0-1 0-4 0-9-1-4-1-9-1-15-1-7-1-18-1-35h-1c-14 24-28 41-46 50-17 10-39 15-64 15-38 0-65-9-83-28-17-18-26-50-26-93v-229z">
            <text:p/>
          </draw:path>
          <draw:path draw:style-name="gr593" draw:text-style-name="P180" draw:layer="layout" svg:width="0.334cm" svg:height="0.356cm" svg:x="-13.666cm" svg:y="92.321cm" svg:viewBox="0 0 335 357" svg:d="M104 357c-35 0-61-9-78-28-17-18-26-43-26-75 0-35 11-63 35-82s62-29 113-31h78v-19c0-28-6-48-18-61-12-12-31-17-56-17-26 0-44 4-56 12-12 9-19 23-21 42l-60-5c10-62 56-93 138-93 44 0 76 10 97 30 22 19 34 48 34 86v147c0 17 1 30 6 39 4 8 13 12 25 12 6 0 13-1 20-1v35c-15 3-30 5-45 5-21 0-36-5-46-17-10-11-15-28-17-51h-1c-15 26-32 44-51 55-20 11-43 17-71 17zM117 313c21 0 39-4 56-14 16-9 29-22 39-39 9-17 14-33 14-51v-28l-63 1c-27 0-47 3-61 8s-25 13-32 23c-8 11-11 25-11 43s5 32 15 43c10 9 24 14 43 14z">
            <text:p/>
          </draw:path>
          <draw:path draw:style-name="gr593" draw:text-style-name="P180" draw:layer="layout" svg:width="0.165cm" svg:height="0.425cm" svg:x="-13.322cm" svg:y="92.251cm" svg:viewBox="0 0 166 426" svg:d="M166 418c-18 5-38 8-58 8-46 0-68-26-68-78v-229h-40v-42h42l17-77h38v77h64v42h-64v216c0 17 2 29 8 36 6 6 14 9 28 9 8 0 19-1 33-4z">
            <text:p/>
          </draw:path>
          <draw:path draw:style-name="gr593" draw:text-style-name="P180" draw:layer="layout" svg:width="0.306cm" svg:height="0.356cm" svg:x="-13.125cm" svg:y="92.321cm" svg:viewBox="0 0 307 357" svg:d="M307 178c0 60-13 105-39 135-27 29-65 44-116 44-50 0-88-15-113-46-26-31-39-75-39-133 0-118 52-178 154-178 52 0 91 14 116 43s37 74 37 135zM248 178c0-47-8-82-22-103-14-22-38-33-71-33-34 0-58 12-72 34-15 21-23 56-23 102 0 45 8 79 23 102 14 23 37 34 69 34 34 0 59-11 73-33 15-22 23-56 23-103z">
            <text:p/>
          </draw:path>
          <draw:path draw:style-name="gr593" draw:text-style-name="P180" draw:layer="layout" svg:width="0.161cm" svg:height="0.349cm" svg:x="-12.747cm" svg:y="92.321cm" svg:viewBox="0 0 162 350" svg:d="M2 350v-264c0-24-1-50-2-80h54c1 40 2 62 2 70h2c9-29 19-49 32-60 11-11 28-16 50-16 8 0 15 1 22 4v51c-7-1-17-2-29-2-24 0-43 9-55 30-13 21-19 50-19 88v179z">
            <text:p/>
          </draw:path>
        </draw:g>
        <draw:g draw:style-name="gr23">
          <draw:path draw:style-name="gr594" draw:text-style-name="P174" draw:layer="layout" svg:width="0.284cm" svg:height="0.349cm" svg:x="-11.73cm" svg:y="90.272cm" svg:viewBox="0 0 285 350" svg:d="M285 251c0 31-13 56-38 73-24 17-59 26-103 26-83 0-131-29-144-86l45-9c5 20 16 35 33 45 16 9 39 14 68 14 30 0 52-5 68-15 17-11 25-26 25-45 0-11-3-20-8-28-5-6-12-12-21-17-9-4-20-8-33-11s-27-6-43-10c-26-6-47-12-60-18-14-6-25-12-33-20-8-7-14-16-19-25-4-10-6-21-6-34 0-29 11-51 33-67 23-16 54-24 96-24 39 0 68 6 88 18 21 12 35 32 43 60l-45 8c-5-18-14-31-29-39-14-8-33-12-58-12-27 0-48 5-62 14s-21 22-21 40c0 10 2 19 8 25 6 7 14 13 24 18 11 5 31 11 62 17 11 3 21 6 32 8 10 2 20 5 30 9 9 3 18 7 27 12 8 4 14 10 20 17 7 7 12 15 15 24s6 20 6 32z">
            <text:p/>
          </draw:path>
          <draw:path draw:style-name="gr594" draw:text-style-name="P174" draw:layer="layout" svg:width="0.244cm" svg:height="0.363cm" svg:x="-11.422cm" svg:y="90.356cm" svg:viewBox="0 0 245 364" svg:d="M45 364c-12 0-22-1-30-3v-32c6 0 13 1 20 1 27 0 49-20 64-60l4-10-103-260h46l56 144c0 2 1 5 2 8s5 14 11 32 10 27 10 30l17-47 57-167h46l-101 261c-10 28-21 49-30 62-9 14-19 24-30 31-12 7-25 10-39 10z">
            <text:p/>
          </draw:path>
          <draw:path draw:style-name="gr594" draw:text-style-name="P174" draw:layer="layout" svg:width="0.214cm" svg:height="0.269cm" svg:x="-11.163cm" svg:y="90.352cm" svg:viewBox="0 0 215 270" svg:d="M215 193c0 25-9 44-27 57-19 14-45 20-78 20s-58-5-76-16c-18-10-29-27-34-50l38-8c4 15 12 25 23 32 11 6 28 10 49 10s38-4 48-11 15-17 15-31c0-9-3-18-10-24-8-7-19-12-35-17l-31-8c-25-6-42-13-53-19-10-5-19-13-25-22s-9-20-9-33c0-24 9-42 26-54 17-13 42-19 74-19 29 0 51 5 69 15 17 10 27 27 32 49l-39 5c-2-11-9-20-20-27-10-6-24-9-42-9-20 0-34 3-44 9-8 6-14 15-14 27 0 7 3 13 6 18 4 5 10 9 17 12 8 4 24 9 48 15 23 6 40 11 50 16 10 4 18 10 24 16 5 6 10 13 14 21 3 7 4 16 4 26z">
            <text:p/>
          </draw:path>
          <draw:path draw:style-name="gr594" draw:text-style-name="P174" draw:layer="layout" svg:width="0.125cm" svg:height="0.322cm" svg:x="-10.922cm" svg:y="90.298cm" svg:viewBox="0 0 126 323" svg:d="M126 317c-14 4-29 6-44 6-34 0-52-19-52-59v-174h-30v-32h32l13-58h28v58h49v32h-49v165c0 12 2 21 7 27 4 4 11 7 21 7 6 0 14-1 25-4z">
            <text:p/>
          </draw:path>
          <draw:path draw:style-name="gr594" draw:text-style-name="P174" draw:layer="layout" svg:width="0.231cm" svg:height="0.269cm" svg:x="-10.772cm" svg:y="90.352cm" svg:viewBox="0 0 232 270" svg:d="M46 144c0 30 6 53 18 70 12 16 31 24 54 24 19 0 34-4 46-12 11-7 18-17 23-28l38 10c-16 42-52 62-107 62-38 0-67-11-87-34-21-23-31-57-31-102 0-44 10-76 31-100 20-23 48-34 86-34 76 0 115 46 115 138v6zM187 111c-2-27-9-48-21-60-11-13-29-19-50-19s-38 7-50 21-19 34-20 58z">
            <text:p/>
          </draw:path>
          <draw:path draw:style-name="gr594" draw:text-style-name="P174" draw:layer="layout" svg:width="0.345cm" svg:height="0.265cm" svg:x="-10.485cm" svg:y="90.352cm" svg:viewBox="0 0 346 266" svg:d="M152 266v-166c0-25-3-42-10-52s-19-14-37-14c-19 0-33 6-44 21-11 14-16 34-16 59v152h-44v-205c0-31 0-49-1-57h41c0 2 0 3 1 7 0 4 0 8 0 13 1 4 1 13 1 25 10-18 20-31 32-38s27-11 45-11c20 0 35 4 47 12 12 7 19 20 23 37h1c9-17 20-30 33-37 13-8 29-12 46-12 27 0 46 7 58 22 12 14 18 37 18 70v174h-43v-166c0-25-3-42-10-52s-20-14-38-14c-19 0-33 6-44 21-11 14-16 34-16 59v152z">
            <text:p/>
          </draw:path>
          <draw:path draw:style-name="gr584" draw:text-style-name="P174" draw:layer="layout" svg:width="0.045cm" svg:height="0.339cm" svg:x="-11.43cm" svg:y="90.97cm" svg:viewBox="0 0 46 340" svg:d="M0 340c0-114 0-226 0-340 16 0 31 0 46 0 0 114 0 226 0 340-15 0-30 0-46 0z">
            <text:p/>
          </draw:path>
          <draw:path draw:style-name="gr584" draw:text-style-name="P174" draw:layer="layout" svg:width="0.209cm" svg:height="0.265cm" svg:x="-11.306cm" svg:y="91.044cm" svg:viewBox="0 0 210 266" svg:d="M166 266v-166c0-17-2-31-5-39-3-10-9-17-16-21-8-4-18-6-33-6-21 0-37 6-49 21-12 14-18 34-18 59v152h-44v-205c0-31 0-49-1-57h41c0 2 0 3 1 7 0 4 0 8 0 13 1 4 1 13 1 25 11-18 22-30 35-38 13-7 30-11 49-11 28 0 49 7 63 22 13 14 20 37 20 70v174z">
            <text:p/>
          </draw:path>
          <draw:path draw:style-name="gr584" draw:text-style-name="P174" draw:layer="layout" svg:width="0.221cm" svg:height="0.367cm" svg:x="-11.033cm" svg:y="91.044cm" svg:viewBox="0 0 222 368" svg:d="M222 134c0 91-32 136-96 136-40 0-67-15-81-45h-1c1 1 1 15 1 41v102h-44v-310c0-27 0-45-1-54h42c0 1 1 3 1 7 0 5 0 11 1 19 0 8 0 13 0 16h2c7-15 17-27 30-35 13-7 29-11 50-11 32 0 56 10 72 32s24 55 24 102zM176 135c0-36-4-63-14-78-10-16-25-23-47-23-17 0-31 3-40 10-10 8-17 19-23 34-5 15-7 36-7 60 0 35 5 60 16 76s29 24 53 24c22 0 38-8 47-24 11-15 15-42 15-79z">
            <text:p/>
          </draw:path>
          <draw:path draw:style-name="gr584" draw:text-style-name="P174" draw:layer="layout" svg:width="0.209cm" svg:height="0.265cm" svg:x="-10.758cm" svg:y="91.048cm" svg:viewBox="0 0 210 266" svg:d="M43 0v166c0 17 3 30 6 39 3 10 9 17 16 21s18 6 32 6c21 0 37-6 50-21 12-15 18-34 18-59v-152h43v205c0 31 1 50 2 56h-41c0-1 0-3-1-6 0-4 0-8-1-12 0-5 0-14 0-26h-1c-10 18-21 30-35 38-12 7-29 11-48 11-29 0-50-8-63-22s-20-37-20-70v-174z">
            <text:p/>
          </draw:path>
          <draw:path draw:style-name="gr584" draw:text-style-name="P174" draw:layer="layout" svg:width="0.125cm" svg:height="0.322cm" svg:x="-10.509cm" svg:y="90.99cm" svg:viewBox="0 0 126 323" svg:d="M126 317c-14 4-29 6-44 6-34 0-52-19-52-59v-174h-30v-32h32l13-58h28v58h49v32h-49v165c0 12 2 21 7 27 4 4 11 7 21 7 6 0 14-1 25-4z">
            <text:p/>
          </draw:path>
        </draw:g>
        <draw:path draw:style-name="gr595" draw:text-style-name="P175" draw:layer="layout" svg:width="0.274cm" svg:height="0.298cm" svg:x="-11.281cm" svg:y="91.859cm" svg:viewBox="0 0 275 299" svg:d="M89 0l-34 175c-3 16-5 29-5 41 0 30 16 45 49 45 23 0 43-9 60-26 17-18 29-41 35-71l32-164h49l-45 231c-4 17-7 38-11 62h-46c0-2 1-9 3-21s3-21 5-29h-1c-15 21-30 35-45 43-16 8-34 12-54 13-27-1-47-7-61-20-13-13-20-33-20-57 0-12 2-27 6-45l34-177z">
          <text:p/>
        </draw:path>
        <draw:path draw:style-name="gr596" draw:text-style-name="P183" draw:layer="layout" svg:width="0.188cm" svg:height="0.216cm" svg:x="-10.985cm" svg:y="91.981cm" svg:viewBox="0 0 189 217" svg:d="M175 152c0 21-8 37-24 48-16 12-39 17-70 17-22 0-40-3-53-11s-23-19-28-36l29-11c4 12 10 20 19 25s21 8 37 8c18 0 32-3 42-9 9-7 14-16 14-28 0-8-3-15-10-20s-20-11-42-18c-16-5-29-11-37-16s-15-11-19-18-7-15-7-24c0-19 8-34 23-44s36-15 63-15c46 0 72 17 77 50l-31 4c-3-10-8-17-16-22-8-4-19-7-32-7-16 0-28 3-37 8s-13 12-13 22c0 5 1 10 4 14 3 3 7 7 12 10s17 7 35 13c17 5 29 10 37 15 9 6 15 12 20 19 5 8 7 16 7 26z">
          <text:p/>
        </draw:path>
        <draw:path draw:style-name="gr597" draw:text-style-name="P175" draw:layer="layout" svg:width="0.205cm" svg:height="0.517cm" svg:x="-10.775cm" svg:y="91.749cm" svg:viewBox="0 0 206 518" svg:d="M206 0c-105 92-157 203-157 332 0 70 19 132 56 186h-47c-39-54-58-117-58-191 0-67 14-128 41-184 27-55 66-103 118-143z">
          <text:p/>
        </draw:path>
        <draw:path draw:style-name="gr597" draw:text-style-name="P175" draw:layer="layout" svg:width="0.148cm" svg:height="0.364cm" svg:x="-10.591cm" svg:y="91.793cm" svg:viewBox="0 0 149 365" svg:d="M49 365c-15-1-27-5-36-14-9-10-13-22-13-37 0-10 1-22 4-35l34-178h-34l7-35h35l28-66h33l-13 66h55l-8 35h-54l-34 175c-2 11-3 20-3 26 0 16 8 24 24 24 8 0 17-2 28-4l-6 36c-18 4-33 6-47 7z">
          <text:p/>
        </draw:path>
        <draw:path draw:style-name="gr597" draw:text-style-name="P175" draw:layer="layout" svg:width="0.205cm" svg:height="0.517cm" svg:x="-10.516cm" svg:y="91.749cm" svg:viewBox="0 0 206 518" svg:d="M0 518c105-92 157-203 157-332 0-70-19-132-56-186h47c39 54 58 117 58 191 0 67-14 128-41 184-27 55-66 103-118 143z">
          <text:p/>
        </draw:path>
        <draw:path draw:style-name="gr578" draw:text-style-name="P5" draw:layer="layout" svg:width="2.3cm" svg:height="0cm" svg:x="-11.621cm" svg:y="92.706cm" svg:viewBox="0 0 2301 0" svg:d="M0 0c767 0 1534 0 2301 0">
          <text:p/>
        </draw:path>
        <draw:path draw:style-name="gr579" draw:text-style-name="P176" draw:layer="layout" svg:width="0.316cm" svg:height="0.316cm" svg:x="-9.584cm" svg:y="92.547cm" svg:viewBox="0 0 317 317" svg:d="M0 0c106 53 211 106 317 159-106 53-211 105-317 158 0-106 0-211 0-317z">
          <text:p/>
        </draw:path>
        <draw:path draw:style-name="gr579" draw:text-style-name="P176" draw:layer="layout" svg:width="0.316cm" svg:height="0.316cm" svg:x="-9.584cm" svg:y="92.547cm" svg:viewBox="0 0 317 317" svg:d="M0 0c106 53 211 106 317 159-106 53-211 105-317 158 0-106 0-211 0-317z">
          <text:p/>
        </draw:path>
        <draw:path draw:style-name="gr579" draw:text-style-name="P176" draw:layer="layout" svg:width="0.316cm" svg:height="0.316cm" svg:x="-9.584cm" svg:y="92.547cm" svg:viewBox="0 0 317 317" svg:d="M0 0c106 53 211 106 317 159-106 53-211 105-317 158 0-106 0-211 0-317z">
          <text:p/>
        </draw:path>
        <draw:path draw:style-name="gr579" draw:text-style-name="P176" draw:layer="layout" svg:width="0.316cm" svg:height="0.316cm" svg:x="-9.584cm" svg:y="92.547cm" svg:viewBox="0 0 317 317" svg:d="M0 0c106 53 211 106 317 159-106 53-211 105-317 158 0-106 0-211 0-317z">
          <text:p/>
        </draw:path>
        <draw:g draw:style-name="gr23">
          <draw:path draw:style-name="gr598" draw:text-style-name="P174" draw:layer="layout" svg:width="0.335cm" svg:height="0.338cm" svg:x="-9.482cm" svg:y="88.478cm" svg:viewBox="0 0 336 339" svg:d="M336 166c0 35-9 66-24 92-16 26-38 46-67 60-28 14-62 21-99 21h-146v-339h128c66 0 118 14 154 43s54 70 54 123zM283 166c0-42-14-74-41-96-26-22-64-34-114-34h-75v266h87c28 0 54-6 75-16 21-11 39-27 50-48 12-20 18-44 18-72z">
            <text:p/>
          </draw:path>
          <draw:path draw:style-name="gr598" draw:text-style-name="P174" draw:layer="layout" svg:width="0.049cm" svg:height="0.357cm" svg:x="-9.082cm" svg:y="88.46cm" svg:viewBox="0 0 50 358" svg:d="M0 42c0-14 0-28 0-42 16 0 33 0 50 0 0 14 0 28 0 42-17 0-34 0-50 0zM0 358c0-88 0-174 0-261 16 0 33 0 50 0 0 87 0 173 0 261-17 0-34 0-50 0z">
            <text:p/>
          </draw:path>
          <draw:path draw:style-name="gr598" draw:text-style-name="P174" draw:layer="layout" svg:width="0.246cm" svg:height="0.269cm" svg:x="-8.978cm" svg:y="88.552cm" svg:viewBox="0 0 247 270" svg:d="M247 193c0 24-11 43-32 57-21 13-51 20-89 20s-66-6-87-17c-20-10-33-27-39-50l44-7c4 14 13 24 26 31 13 6 32 10 56 10 25 0 44-4 55-11 12-6 18-17 18-30 0-10-5-19-12-25-9-6-22-12-40-16l-36-8c-28-6-48-13-60-19s-22-13-29-22-10-20-10-33c0-24 9-42 29-54 20-13 48-19 85-19 33 0 59 5 79 15 19 10 31 27 37 49l-45 5c-3-12-10-21-22-27s-29-9-49-9c-22 0-39 3-50 9-10 6-16 15-16 27 0 7 3 13 7 18s11 9 20 12c8 4 26 8 54 14 27 6 46 11 57 17 12 4 21 9 28 15 6 6 11 14 16 21 3 8 5 16 5 27z">
            <text:p/>
          </draw:path>
          <draw:path draw:style-name="gr598" draw:text-style-name="P174" draw:layer="layout" svg:width="0.144cm" svg:height="0.322cm" svg:x="-8.703cm" svg:y="88.498cm" svg:viewBox="0 0 145 323" svg:d="M145 317c-17 3-34 6-51 6-39 0-60-20-60-59v-175h-34v-31h37l14-58h33v58h56v31h-56v165c0 13 3 22 8 27 4 4 12 7 24 7 6 0 16-1 29-3z">
            <text:p/>
          </draw:path>
          <draw:path draw:style-name="gr598" draw:text-style-name="P174" draw:layer="layout" svg:width="0.24cm" svg:height="0.264cm" svg:x="-8.518cm" svg:y="88.556cm" svg:viewBox="0 0 241 265" svg:d="M50 0v165c0 17 2 31 6 40 4 10 10 16 19 21 8 3 20 6 36 6 24 0 43-7 58-22 13-14 20-33 20-59v-151h50v205c0 30 1 49 2 56h-47c0-2 0-3-1-7 0-4 0-7-1-12 0-5 0-13-1-26h-1c-11 18-24 31-39 38s-34 11-56 11c-33 0-57-7-72-21-15-15-23-38-23-70v-174z">
            <text:p/>
          </draw:path>
          <draw:path draw:style-name="gr598" draw:text-style-name="P174" draw:layer="layout" svg:width="0.14cm" svg:height="0.264cm" svg:x="-8.202cm" svg:y="88.552cm" svg:viewBox="0 0 141 265" svg:d="M2 265v-199c0-19-1-39-2-62h47c2 30 2 48 2 54h2c7-22 17-38 27-46s25-12 44-12c6 0 12 1 19 2v40c-6-2-15-3-26-3-21 0-36 9-47 24s-17 38-17 67v135z">
            <text:p/>
          </draw:path>
          <draw:path draw:style-name="gr598" draw:text-style-name="P174" draw:layer="layout" svg:width="0.253cm" svg:height="0.361cm" svg:x="-8.015cm" svg:y="88.46cm" svg:viewBox="0 0 254 362" svg:d="M254 226c0 91-36 136-109 136-23 0-42-4-57-10-15-8-27-19-37-35 0 5 0 12-1 23-1 9-1 15-2 18h-48c1-9 2-27 2-55v-303h49v101c0 11 0 23 0 38 10-18 22-30 37-36 16-8 34-11 57-11 37 0 65 11 83 33s26 56 26 101zM202 227c0-36-5-62-16-78s-29-24-54-24c-28 0-49 8-62 25-12 17-19 44-19 79s6 60 19 76c13 17 33 25 61 25 26 0 44-8 55-25 11-15 16-41 16-78z">
            <text:p/>
          </draw:path>
          <draw:path draw:style-name="gr598" draw:text-style-name="P174" draw:layer="layout" svg:width="0.29cm" svg:height="0.269cm" svg:x="-7.713cm" svg:y="88.552cm" svg:viewBox="0 0 291 270" svg:d="M91 270c-31 0-53-7-69-21-14-14-22-32-22-57 0-27 10-47 31-62 20-14 53-22 98-23h67v-15c0-21-5-36-15-45-11-10-27-14-49-14s-39 3-49 10c-9 6-15 17-18 31l-51-4c7-47 48-70 120-70 36 0 65 7 84 22s29 37 29 66v112c0 12 1 22 6 29 3 6 11 9 22 9 4 0 9 0 16-1v27c-13 3-26 3-38 3-19 0-32-3-41-12-8-8-13-22-14-40h-2c-13 20-27 35-44 43s-37 12-61 12zM102 238c18 0 34-4 49-12 13-7 25-17 33-29 8-13 12-26 12-39v-22l-54 2c-24 0-41 2-54 6-12 3-20 9-27 18-7 8-10 18-10 31 0 14 5 25 13 33 9 7 22 12 38 12z">
            <text:p/>
          </draw:path>
          <draw:path draw:style-name="gr598" draw:text-style-name="P174" draw:layer="layout" svg:width="0.24cm" svg:height="0.264cm" svg:x="-7.385cm" svg:y="88.552cm" svg:viewBox="0 0 241 265" svg:d="M190 265v-165c0-17-2-31-5-40-4-9-10-16-19-21-8-3-20-5-38-5-24 0-42 6-56 21-14 14-21 34-21 59v151h-49v-205c0-30-1-48-2-56h47c0 2 0 3 1 7 0 4 0 8 0 13 1 4 1 12 1 25h1c12-18 25-30 40-38 14-7 33-11 56-11 32 0 56 7 72 22 15 14 23 37 23 70v173z">
            <text:p/>
          </draw:path>
          <draw:path draw:style-name="gr598" draw:text-style-name="P174" draw:layer="layout" svg:width="0.243cm" svg:height="0.269cm" svg:x="-7.084cm" svg:y="88.551cm" svg:viewBox="0 0 244 270" svg:d="M52 134c0 34 6 60 19 77 12 16 31 25 57 25 17 0 32-4 44-13 11-8 19-21 22-38l50 3c-4 25-16 44-37 60-20 15-47 22-79 22-41 0-73-12-95-35s-33-56-33-100 11-78 33-101c23-23 54-34 95-34 30 0 56 7 77 21 19 13 32 33 37 56l-51 4c-3-14-9-26-20-34-10-9-25-13-44-13-27 0-46 8-58 23-11 15-17 41-17 77z">
            <text:p/>
          </draw:path>
          <draw:path draw:style-name="gr598" draw:text-style-name="P174" draw:layer="layout" svg:width="0.264cm" svg:height="0.269cm" svg:x="-6.8cm" svg:y="88.552cm" svg:viewBox="0 0 265 270" svg:d="M52 144c0 30 7 53 22 69 13 16 35 24 61 24 23 0 40-4 53-11 12-8 21-17 26-29l44 11c-18 41-59 62-123 62-43 0-77-12-100-35s-35-57-35-102c0-43 12-76 35-99s56-34 99-34c88 0 131 46 131 138v6zM214 110c-2-27-10-47-24-59-13-13-32-19-57-19-24 0-43 7-58 21-13 14-21 33-22 57z">
            <text:p/>
          </draw:path>
        </draw:g>
        <draw:path draw:style-name="gr585" draw:text-style-name="P175" draw:layer="layout" svg:width="0.304cm" svg:height="0.408cm" svg:x="-7.925cm" svg:y="89.765cm" svg:viewBox="0 0 305 409" svg:d="M90 409c-28 0-50-9-66-26s-24-41-24-70c0-37 6-73 17-107 11-35 26-60 47-77 20-17 46-25 77-25 22 0 40 5 54 14s24 23 30 40h1l8-44 22-114h49l-66 342c-6 26-9 46-11 61h-46c0-9 2-24 5-43h-1c-13 17-27 29-42 37-14 8-33 12-54 12zM104 371c18 0 34-4 46-11 13-7 24-18 33-33s16-33 21-56c5-22 7-42 7-59 0-23-6-41-17-53-12-13-27-19-48-19-22 0-39 7-52 20s-23 34-31 64-12 57-12 80c0 22 4 39 13 50 8 11 22 17 40 17z">
          <text:p/>
        </draw:path>
        <draw:path draw:style-name="gr585" draw:text-style-name="P175" draw:layer="layout" svg:width="0.205cm" svg:height="0.517cm" svg:x="-7.61cm" svg:y="89.765cm" svg:viewBox="0 0 206 518" svg:d="M206 0c-105 92-157 203-157 332 0 70 19 132 56 186h-47c-39-54-58-117-58-191 0-67 14-128 41-184 27-55 66-103 118-143z">
          <text:p/>
        </draw:path>
        <draw:path draw:style-name="gr585" draw:text-style-name="P175" draw:layer="layout" svg:width="0.148cm" svg:height="0.364cm" svg:x="-7.426cm" svg:y="89.809cm" svg:viewBox="0 0 149 365" svg:d="M49 365c-15-1-27-5-36-14-9-10-13-22-13-37 0-10 1-22 4-35l34-178h-34l7-35h35l28-66h33l-13 66h55l-8 35h-54l-34 175c-2 11-3 20-3 26 0 16 8 24 24 24 8 0 17-2 28-4l-6 36c-18 4-33 6-47 7z">
          <text:p/>
        </draw:path>
        <draw:path draw:style-name="gr585" draw:text-style-name="P175" draw:layer="layout" svg:width="0.205cm" svg:height="0.517cm" svg:x="-7.351cm" svg:y="89.765cm" svg:viewBox="0 0 206 518" svg:d="M0 518c105-92 157-203 157-332 0-70-19-132-56-186h47c39 54 58 117 58 191 0 67-14 128-41 184-27 55-66 103-118 143z">
          <text:p/>
        </draw:path>
        <draw:path draw:style-name="gr599" draw:text-style-name="P5" draw:layer="layout" svg:width="2.3cm" svg:height="0cm" draw:transform="rotate (-1.5707963267949) translate (-8.0757565784782cm 89.0559062241644cm)" svg:viewBox="0 0 2301 0" svg:d="M0 0c767 0 1534 0 2301 0">
          <text:p/>
        </draw:path>
        <draw:path draw:style-name="gr600" draw:text-style-name="P184" draw:layer="layout" svg:width="0.317cm" svg:height="0.316cm" svg:x="-8.235cm" svg:y="91.093cm" svg:viewBox="0 0 318 317" svg:d="M318 0c-53 106-106 211-159 317-53-106-106-211-159-317 106 0 212 0 318 0z">
          <text:p/>
        </draw:path>
        <draw:path draw:style-name="gr601" draw:text-style-name="P185" draw:layer="layout" svg:width="4.497cm" svg:height="1.772cm" svg:x="-9.214cm" svg:y="91.595cm" svg:viewBox="0 0 4498 1773" svg:d="M0 0c1499 0 2999 0 4498 0 0 591 0 1182 0 1773-1499 0-2999 0-4498 0 0-591 0-1182 0-1773z">
          <text:p/>
        </draw:path>
        <draw:path draw:style-name="gr602" draw:text-style-name="P186" draw:layer="layout" svg:width="4.497cm" svg:height="1.772cm" svg:x="-9.214cm" svg:y="91.595cm" svg:viewBox="0 0 4498 1773" svg:d="M0 0c1499 0 2999 0 4498 0 0 591 0 1182 0 1773-1499 0-2999 0-4498 0 0-591 0-1182 0-1773z">
          <text:p/>
        </draw:path>
        <draw:path draw:style-name="gr603" draw:text-style-name="P175" draw:layer="layout" svg:width="0.336cm" svg:height="0.408cm" svg:x="-4.509cm" svg:y="91.858cm" svg:viewBox="0 0 337 409" svg:d="M36 409c-13 0-25-1-36-4l8-36c9 1 16 2 21 2 18 0 33-6 46-17 13-12 26-29 38-51l8-13-59-290h50l30 162c3 15 5 30 8 47 2 16 3 27 3 31 2-4 5-8 7-14 3-6 44-81 123-226h54l-169 294c-21 35-37 59-49 73s-25 25-38 32c-14 7-28 10-45 10z">
          <text:p/>
        </draw:path>
        <draw:path draw:style-name="gr603" draw:text-style-name="P175" draw:layer="layout" svg:width="0.205cm" svg:height="0.517cm" svg:x="-4.175cm" svg:y="91.749cm" svg:viewBox="0 0 206 518" svg:d="M206 0c-105 92-157 203-157 332 0 70 19 132 56 186h-47c-39-54-58-117-58-191 0-67 14-128 41-184 27-55 66-103 118-143z">
          <text:p/>
        </draw:path>
        <draw:path draw:style-name="gr603" draw:text-style-name="P175" draw:layer="layout" svg:width="0.148cm" svg:height="0.364cm" svg:x="-3.991cm" svg:y="91.793cm" svg:viewBox="0 0 149 365" svg:d="M49 365c-15-1-27-5-36-14-9-10-13-22-13-37 0-10 1-22 4-35l34-178h-34l7-35h35l28-66h33l-13 66h55l-8 35h-54l-34 175c-2 11-3 20-3 26 0 16 8 24 24 24 8 0 17-2 28-4l-6 36c-18 4-33 6-47 7z">
          <text:p/>
        </draw:path>
        <draw:path draw:style-name="gr603" draw:text-style-name="P175" draw:layer="layout" svg:width="0.205cm" svg:height="0.517cm" svg:x="-3.916cm" svg:y="91.749cm" svg:viewBox="0 0 206 518" svg:d="M0 518c105-92 157-203 157-332 0-70-19-132-56-186h47c39 54 58 117 58 191 0 67-14 128-41 184-27 55-66 103-118 143z">
          <text:p/>
        </draw:path>
        <draw:path draw:style-name="gr578" draw:text-style-name="P5" draw:layer="layout" svg:width="3.095cm" svg:height="0cm" svg:x="-4.716cm" svg:y="92.706cm" svg:viewBox="0 0 3096 0" svg:d="M0 0c1032 0 2064 0 3096 0">
          <text:p/>
        </draw:path>
        <draw:path draw:style-name="gr579" draw:text-style-name="P176" draw:layer="layout" svg:width="0.317cm" svg:height="0.316cm" svg:x="-1.885cm" svg:y="92.547cm" svg:viewBox="0 0 318 317" svg:d="M0 0c106 53 212 106 318 159-106 53-212 105-318 158 0-106 0-211 0-317z">
          <text:p/>
        </draw:path>
        <draw:path draw:style-name="gr579" draw:text-style-name="P176" draw:layer="layout" svg:width="0.317cm" svg:height="0.316cm" svg:x="-1.885cm" svg:y="92.547cm" svg:viewBox="0 0 318 317" svg:d="M0 0c106 53 212 106 318 159-106 53-212 105-318 158 0-106 0-211 0-317z">
          <text:p/>
        </draw:path>
        <draw:path draw:style-name="gr579" draw:text-style-name="P176" draw:layer="layout" svg:width="0.317cm" svg:height="0.316cm" svg:x="-1.885cm" svg:y="92.547cm" svg:viewBox="0 0 318 317" svg:d="M0 0c106 53 212 106 318 159-106 53-212 105-318 158 0-106 0-211 0-317z">
          <text:p/>
        </draw:path>
        <draw:path draw:style-name="gr579" draw:text-style-name="P176" draw:layer="layout" svg:width="0.317cm" svg:height="0.316cm" svg:x="-1.885cm" svg:y="92.547cm" svg:viewBox="0 0 318 317" svg:d="M0 0c106 53 212 106 318 159-106 53-212 105-318 158 0-106 0-211 0-317z">
          <text:p/>
        </draw:path>
        <draw:path draw:style-name="gr579" draw:text-style-name="P176" draw:layer="layout" svg:width="0.317cm" svg:height="0.316cm" svg:x="-1.885cm" svg:y="92.547cm" svg:viewBox="0 0 318 317" svg:d="M0 0c106 53 212 106 318 159-106 53-212 105-318 158 0-106 0-211 0-317z">
          <text:p/>
        </draw:path>
        <draw:path draw:style-name="gr578" draw:text-style-name="P5" draw:layer="layout" svg:width="7.169cm" svg:height="2.406cm" svg:x="-10.272cm" svg:y="92.706cm" svg:viewBox="0 0 7170 2407" svg:d="M7170 0c0 802 0 1604 0 2407-2390 0-4780 0-7170 0">
          <text:p/>
        </draw:path>
        <draw:path draw:style-name="gr579" draw:text-style-name="P176" draw:layer="layout" svg:width="0.317cm" svg:height="0.317cm" svg:x="-10.325cm" svg:y="94.954cm" svg:viewBox="0 0 318 318" svg:d="M318 318c-106-53-212-106-318-159 106-53 212-106 318-159 0 106 0 212 0 318z">
          <text:p/>
        </draw:path>
        <draw:path draw:style-name="gr579" draw:text-style-name="P176" draw:layer="layout" svg:width="0.317cm" svg:height="0.317cm" svg:x="-10.325cm" svg:y="94.954cm" svg:viewBox="0 0 318 318" svg:d="M318 318c-106-53-212-106-318-159 106-53 212-106 318-159 0 106 0 212 0 318z">
          <text:p/>
        </draw:path>
        <draw:path draw:style-name="gr579" draw:text-style-name="P176" draw:layer="layout" svg:width="0.317cm" svg:height="0.317cm" svg:x="-10.325cm" svg:y="94.954cm" svg:viewBox="0 0 318 318" svg:d="M318 318c-106-53-212-106-318-159 106-53 212-106 318-159 0 106 0 212 0 318z">
          <text:p/>
        </draw:path>
        <draw:path draw:style-name="gr579" draw:text-style-name="P176" draw:layer="layout" svg:width="0.317cm" svg:height="0.317cm" svg:x="-10.325cm" svg:y="94.954cm" svg:viewBox="0 0 318 318" svg:d="M318 318c-106-53-212-106-318-159 106-53 212-106 318-159 0 106 0 212 0 318z">
          <text:p/>
        </draw:path>
        <draw:path draw:style-name="gr579" draw:text-style-name="P176" draw:layer="layout" svg:width="0.317cm" svg:height="0.317cm" svg:x="-10.325cm" svg:y="94.954cm" svg:viewBox="0 0 318 318" svg:d="M318 318c-106-53-212-106-318-159 106-53 212-106 318-159 0 106 0 212 0 318z">
          <text:p/>
        </draw:path>
        <draw:path draw:style-name="gr579" draw:text-style-name="P176" draw:layer="layout" svg:width="0.317cm" svg:height="0.317cm" svg:x="-10.325cm" svg:y="94.954cm" svg:viewBox="0 0 318 318" svg:d="M318 318c-106-53-212-106-318-159 106-53 212-106 318-159 0 106 0 212 0 318z">
          <text:p/>
        </draw:path>
        <draw:path draw:style-name="gr604" draw:text-style-name="P187" draw:layer="layout" svg:width="5.185cm" svg:height="1.533cm" svg:x="-15.536cm" svg:y="94.346cm" svg:viewBox="0 0 5186 1534" svg:d="M0 0c1729 0 3457 0 5186 0 0 511 0 1023 0 1534-1729 0-3457 0-5186 0 0-511 0-1023 0-1534z">
          <text:p/>
        </draw:path>
        <draw:path draw:style-name="gr605" draw:text-style-name="P188" draw:layer="layout" svg:width="5.185cm" svg:height="1.533cm" svg:x="-15.536cm" svg:y="94.346cm" svg:viewBox="0 0 5186 1534" svg:d="M0 0c1729 0 3457 0 5186 0 0 511 0 1023 0 1534-1729 0-3457 0-5186 0 0-511 0-1023 0-1534z">
          <text:p/>
        </draw:path>
        <draw:g draw:style-name="gr23">
          <draw:path draw:style-name="gr606" draw:text-style-name="P180" draw:layer="layout" svg:width="0.426cm" svg:height="0.524cm" svg:x="-14.189cm" svg:y="94.868cm" svg:viewBox="0 0 427 525" svg:d="M427 377c0 47-19 83-56 109-36 26-88 39-155 39-124 0-196-43-216-130l67-13c8 31 24 53 49 68 25 14 59 21 103 21s79-8 103-23 36-38 36-67c0-17-4-31-11-41-8-10-18-19-32-26-14-6-30-12-49-17-19-4-41-9-64-15-40-9-71-17-91-26-21-9-38-19-50-30s-21-24-28-39c-6-15-9-31-9-50 0-44 17-78 50-102 33-23 81-35 143-35 58 0 103 9 133 27 31 17 52 48 65 90l-68 12c-8-27-22-46-43-59-21-12-50-18-87-18-41 0-72 7-94 20-21 14-32 34-32 61 0 16 4 29 13 39 8 10 20 19 36 26 15 7 47 16 93 26 16 4 32 7 47 11 16 4 31 8 45 14 14 5 27 11 40 18 12 7 23 15 32 26 9 10 17 22 22 35 5 14 8 30 8 49z">
            <text:p/>
          </draw:path>
          <draw:path draw:style-name="gr606" draw:text-style-name="P180" draw:layer="layout" svg:width="0.347cm" svg:height="0.405cm" svg:x="-13.697cm" svg:y="94.987cm" svg:viewBox="0 0 348 406" svg:d="M68 217c0 45 10 79 28 104 19 24 46 36 82 36 28 0 50-5 67-17 18-11 29-25 35-43l57 17c-23 61-76 92-159 92-58 0-102-17-133-52-30-34-45-85-45-153 0-65 15-115 45-149 31-35 74-52 130-52 115 0 173 69 173 208v9zM280 167c-3-41-14-71-31-90s-42-29-75-29c-32 0-57 11-75 32-19 21-28 50-30 87z">
            <text:p/>
          </draw:path>
          <draw:path draw:style-name="gr606" draw:text-style-name="P180" draw:layer="layout" svg:width="0.314cm" svg:height="0.398cm" svg:x="-13.268cm" svg:y="94.987cm" svg:viewBox="0 0 315 399" svg:d="M249 399v-248c0-26-2-46-7-60-5-15-13-25-25-31-11-7-27-10-48-10-32 0-56 11-75 33-18 21-27 51-27 89v227h-65v-308c0-46-1-74-2-84h62c0 1 0 5 0 10s1 11 1 18c1 7 1 20 1 39h2c14-27 32-46 51-57 20-11 45-17 74-17 43 0 74 11 94 32s30 57 30 106v261z">
            <text:p/>
          </draw:path>
          <draw:path draw:style-name="gr606" draw:text-style-name="P180" draw:layer="layout" svg:width="0.322cm" svg:height="0.404cm" svg:x="-12.884cm" svg:y="94.988cm" svg:viewBox="0 0 323 405" svg:d="M323 290c0 37-14 65-42 85s-67 30-117 30c-48 0-86-8-112-24-27-16-44-41-52-75l58-11c5 21 17 36 34 46s41 15 72 15c33 0 57-5 73-16 15-10 23-25 23-45 0-16-6-28-16-38-11-10-28-17-52-24l-46-12c-38-10-64-19-80-28-16-10-28-21-37-34-9-14-13-30-13-49 0-36 12-63 38-82 25-19 62-28 111-28 43 0 77 8 103 23 25 15 41 39 48 73l-58 7c-4-17-14-30-30-40-15-9-36-14-63-14-29 0-51 5-65 14s-21 22-21 40c0 11 3 20 9 28 5 7 14 13 25 18 12 5 35 12 72 21 34 9 59 17 74 24 16 8 28 16 36 25 9 9 16 19 21 31 5 11 7 25 7 40z">
            <text:p/>
          </draw:path>
          <draw:path draw:style-name="gr606" draw:text-style-name="P180" draw:layer="layout" svg:width="0.349cm" svg:height="0.405cm" svg:x="-12.503cm" svg:y="94.987cm" svg:viewBox="0 0 350 406" svg:d="M350 203c0 68-15 119-45 153-30 33-74 50-132 50-57 0-100-17-129-52s-44-85-44-151c0-135 59-203 175-203 60 0 104 16 133 49 28 33 42 84 42 154zM282 203c0-54-9-94-25-118-16-25-43-37-80-37-39 0-66 13-83 38s-26 64-26 117c0 51 9 90 26 116 16 26 43 39 79 39 39 0 67-13 83-38 17-25 26-64 26-117z">
            <text:p/>
          </draw:path>
          <draw:path draw:style-name="gr606" draw:text-style-name="P180" draw:layer="layout" svg:width="0.184cm" svg:height="0.398cm" svg:x="-12.073cm" svg:y="94.987cm" svg:viewBox="0 0 185 399" svg:d="M2 399v-301c0-27-1-57-2-91h62c1 45 2 71 2 80h2c10-33 22-56 36-69 13-12 32-18 57-18 9 0 17 1 26 4v59c-8-2-20-3-34-3-27 0-48 11-62 35-15 23-22 56-22 100v204z">
            <text:p/>
          </draw:path>
        </draw:g>
        <draw:path draw:style-name="gr578" draw:text-style-name="P5" draw:layer="layout" svg:width="9.127cm" svg:height="1.904cm" svg:x="-24.664cm" svg:y="93.208cm" svg:viewBox="0 0 9128 1905" svg:d="M9128 1905c-3043 0-6085 0-9128 0 0-635 0-1270 0-1905">
          <text:p/>
        </draw:path>
        <draw:path draw:style-name="gr579" draw:text-style-name="P176" draw:layer="layout" svg:width="0.317cm" svg:height="0.317cm" svg:x="-24.823cm" svg:y="93.155cm" svg:viewBox="0 0 318 318" svg:d="M0 318c53-106 106-212 159-318 53 106 106 212 159 318-106 0-212 0-318 0z">
          <text:p/>
        </draw:path>
        <draw:path draw:style-name="gr579" draw:text-style-name="P176" draw:layer="layout" svg:width="0.317cm" svg:height="0.317cm" svg:x="-24.823cm" svg:y="93.155cm" svg:viewBox="0 0 318 318" svg:d="M0 318c53-106 106-212 159-318 53 106 106 212 159 318-106 0-212 0-318 0z">
          <text:p/>
        </draw:path>
        <draw:path draw:style-name="gr579" draw:text-style-name="P176" draw:layer="layout" svg:width="0.317cm" svg:height="0.317cm" svg:x="-24.823cm" svg:y="93.155cm" svg:viewBox="0 0 318 318" svg:d="M0 318c53-106 106-212 159-318 53 106 106 212 159 318-106 0-212 0-318 0z">
          <text:p/>
        </draw:path>
        <draw:path draw:style-name="gr579" draw:text-style-name="P176" draw:layer="layout" svg:width="0.317cm" svg:height="0.317cm" svg:x="-24.823cm" svg:y="93.155cm" svg:viewBox="0 0 318 318" svg:d="M0 318c53-106 106-212 159-318 53 106 106 212 159 318-106 0-212 0-318 0z">
          <text:p/>
        </draw:path>
        <draw:path draw:style-name="gr579" draw:text-style-name="P176" draw:layer="layout" svg:width="0.317cm" svg:height="0.317cm" svg:x="-24.823cm" svg:y="93.155cm" svg:viewBox="0 0 318 318" svg:d="M0 318c53-106 106-212 159-318 53 106 106 212 159 318-106 0-212 0-318 0z">
          <text:p/>
        </draw:path>
        <draw:path draw:style-name="gr579" draw:text-style-name="P176" draw:layer="layout" svg:width="0.317cm" svg:height="0.317cm" svg:x="-24.823cm" svg:y="93.155cm" svg:viewBox="0 0 318 318" svg:d="M0 318c53-106 106-212 159-318 53 106 106 212 159 318-106 0-212 0-318 0z">
          <text:p/>
        </draw:path>
        <draw:path draw:style-name="gr579" draw:text-style-name="P176" draw:layer="layout" svg:width="0.317cm" svg:height="0.317cm" svg:x="-24.823cm" svg:y="93.155cm" svg:viewBox="0 0 318 318" svg:d="M0 318c53-106 106-212 159-318 53 106 106 212 159 318-106 0-212 0-318 0z">
          <text:p/>
        </draw:path>
        <draw:g draw:style-name="gr23">
          <draw:path draw:style-name="gr607" draw:text-style-name="P174" draw:layer="layout" svg:width="0.311cm" svg:height="0.32cm" svg:x="-22.025cm" svg:y="94.596cm" svg:viewBox="0 0 312 321" svg:d="M273 321v-214c0-24 1-46 2-68-7 27-14 48-20 63l-83 219h-31l-84-219-12-38-8-25 1 25 1 43v214h-39v-321h57l86 223c3 9 5 19 8 28 3 11 5 18 6 23 1-6 4-15 8-27 4-13 6-21 7-24l84-223h56v321z">
            <text:p/>
          </draw:path>
          <draw:path draw:style-name="gr607" draw:text-style-name="P174" draw:layer="layout" svg:width="0.218cm" svg:height="0.255cm" svg:x="-21.655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7" draw:text-style-name="P174" draw:layer="layout" svg:width="0.239cm" svg:height="0.255cm" svg:x="-21.396cm" svg:y="94.666cm" svg:viewBox="0 0 240 256" svg:d="M75 256c-26 0-44-7-57-20-12-13-18-30-18-54 0-25 8-45 25-58 17-14 44-22 82-22l55-1v-13c0-21-4-35-13-43-8-10-22-14-40-14-19 0-32 4-40 10s-13 16-15 30l-43-5c7-44 40-66 99-66 31 0 54 7 70 21s23 35 23 62v106c0 12 2 22 5 28s10 9 19 9c3 0 8-1 13-1v25c-10 3-21 4-32 4-15 0-26-4-33-12s-11-21-12-38h-1c-11 19-23 33-37 40-13 8-30 12-50 12zM84 225c15 0 28-3 40-10s21-17 28-29c6-12 10-24 10-36v-21l-45 2c-20 0-34 2-44 5-10 4-17 10-23 17-5 8-8 18-8 30 0 13 4 24 11 31s18 11 31 11z">
            <text:p/>
          </draw:path>
          <draw:path draw:style-name="gr607" draw:text-style-name="P174" draw:layer="layout" svg:width="0.202cm" svg:height="0.255cm" svg:x="-21.143cm" svg:y="94.666cm" svg:viewBox="0 0 203 256" svg:d="M203 183c0 23-8 41-26 54-17 12-42 19-73 19s-55-5-72-16c-16-10-27-25-32-47l36-7c4 13 11 23 22 29s26 10 46 10 36-4 45-10c10-7 15-17 15-29 0-9-4-18-10-24-7-6-18-11-33-15l-29-8c-23-5-40-12-50-18-10-5-18-12-24-21-5-8-8-19-8-31 0-22 8-39 24-51s39-18 70-18c27 0 49 5 65 14 16 10 26 26 30 47l-37 4c-2-11-8-19-18-25s-23-9-40-9c-19 0-32 3-41 9-9 5-14 14-14 25 0 7 3 13 6 18 4 4 9 8 16 11s22 8 46 13c21 6 37 11 46 16 10 4 18 9 23 15 5 5 10 12 13 20 3 7 4 15 4 25z">
            <text:p/>
          </draw:path>
          <draw:path draw:style-name="gr607" draw:text-style-name="P174" draw:layer="layout" svg:width="0.197cm" svg:height="0.25cm" svg:x="-20.892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7" draw:text-style-name="P174" draw:layer="layout" svg:width="0.116cm" svg:height="0.25cm" svg:x="-20.632cm" svg:y="94.666cm" svg:viewBox="0 0 117 251" svg:d="M1 251v-189c0-17 0-37-1-58h39c1 28 1 45 1 51h2c6-21 14-36 22-44 9-7 21-11 36-11 5 0 11 1 17 2v38c-5-2-13-3-22-3-17 0-30 8-39 22-9 15-14 36-14 64v128z">
            <text:p/>
          </draw:path>
          <draw:path draw:style-name="gr607" draw:text-style-name="P174" draw:layer="layout" svg:width="0.218cm" svg:height="0.255cm" svg:x="-20.488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7" draw:text-style-name="P174" draw:layer="layout" svg:width="0.209cm" svg:height="0.342cm" svg:x="-20.229cm" svg:y="94.579cm" svg:viewBox="0 0 210 343" svg:d="M167 299c-7 16-17 27-30 34-12 7-28 10-47 10-31 0-53-10-68-31s-22-53-22-96c0-86 30-129 90-129 19 0 35 3 48 10 12 7 22 18 29 33h1l-1-28v-102h41v287c0 27 1 44 2 51h-39c-1-2-1-7-1-16-1-9-1-17-1-23zM43 215c0 34 4 59 14 74 9 15 24 23 44 23 23 0 40-8 51-25 10-16 15-41 15-75 0-33-5-57-15-72-11-15-28-23-50-23-21 0-36 8-45 24-9 14-14 39-14 74z">
            <text:p/>
          </draw:path>
          <draw:path draw:style-name="gr607" draw:text-style-name="P174" draw:layer="layout" svg:width="0.318cm" svg:height="0.33cm" svg:x="-19.837cm" svg:y="94.591cm" svg:viewBox="0 0 319 331" svg:d="M319 164c0 34-7 63-19 88-13 26-32 45-56 59-24 13-52 20-85 20s-62-7-86-20c-23-14-41-33-54-58-13-26-19-55-19-89 0-52 14-91 42-120 29-29 67-44 118-44 32 0 60 6 84 20 24 12 43 32 56 56 12 25 19 54 19 88zM274 164c0-40-10-71-30-94-19-23-48-35-84-35-37 0-65 12-86 34-20 23-29 55-29 95s9 73 30 96c20 24 48 35 84 35 37 0 66-11 85-34 20-23 30-55 30-97z">
            <text:p/>
          </draw:path>
          <draw:path draw:style-name="gr607" draw:text-style-name="P174" draw:layer="layout" svg:width="0.197cm" svg:height="0.25cm" svg:x="-19.466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7" draw:text-style-name="P174" draw:layer="layout" svg:width="0.118cm" svg:height="0.305cm" svg:x="-19.23cm" svg:y="94.615cm" svg:viewBox="0 0 119 306" svg:d="M119 300c-13 4-27 6-41 6-33 0-50-19-50-56v-165h-28v-30h30l12-55h27v55h46v30h-46v156c0 12 2 20 7 25 3 5 10 7 19 7 6 0 14-1 24-3z">
            <text:p/>
          </draw:path>
          <draw:path draw:style-name="gr607" draw:text-style-name="P174" draw:layer="layout" svg:width="0.209cm" svg:height="0.347cm" svg:x="-19.077cm" svg:y="94.666cm" svg:viewBox="0 0 210 348" svg:d="M210 126c0 87-31 130-91 130-38 0-63-14-77-43 0 1 0 14 0 38v97h-41v-293c0-25 0-42-1-51h40c0 1 0 3 0 7 1 4 1 9 2 17 0 8 0 13 0 16h1c7-15 17-26 29-33s28-11 47-11c31 0 53 10 68 30 16 21 23 53 23 96zM167 128c0-35-5-59-14-74-10-15-24-22-44-22-16 0-29 3-38 10-10 7-17 17-22 32-4 14-7 33-7 57 0 32 5 56 16 71 11 16 27 23 50 23 21 0 35-7 45-22 9-15 14-41 14-75z">
            <text:p/>
          </draw:path>
          <draw:path draw:style-name="gr607" draw:text-style-name="P174" draw:layer="layout" svg:width="0.197cm" svg:height="0.25cm" svg:x="-18.817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7" draw:text-style-name="P174" draw:layer="layout" svg:width="0.118cm" svg:height="0.305cm" svg:x="-18.581cm" svg:y="94.615cm" svg:viewBox="0 0 119 306" svg:d="M119 300c-13 4-27 6-41 6-33 0-50-19-50-56v-165h-28v-30h30l12-55h27v55h46v30h-46v156c0 12 2 20 7 25 3 5 10 7 19 7 6 0 14-1 24-3z">
            <text:p/>
          </draw:path>
        </draw:g>
        <draw:path draw:style-name="gr608" draw:text-style-name="P175" draw:layer="layout" svg:width="0.336cm" svg:height="0.408cm" svg:x="-20.382cm" svg:y="95.508cm" svg:viewBox="0 0 337 409" svg:d="M36 409c-13 0-25-1-36-4l8-36c9 1 16 2 21 2 18 0 33-6 46-17 13-12 26-29 38-51l8-13-59-290h50l30 162c3 15 5 30 8 47 2 16 3 27 3 31 2-4 5-8 7-14 3-6 44-81 123-226h54l-169 294c-21 35-37 59-49 73s-25 25-38 32c-14 7-28 10-45 10z">
          <text:p/>
        </draw:path>
        <draw:path draw:style-name="gr609" draw:text-style-name="P183" draw:layer="layout" svg:width="0.305cm" svg:height="0.213cm" svg:x="-20.053cm" svg:y="95.63cm" svg:viewBox="0 0 306 214" svg:d="M121 214l24-123c4-16 5-28 5-34 0-10-2-17-7-22s-13-8-24-8c-15 0-28 6-39 19-12 13-19 30-22 51l-23 117h-35l32-165c3-13 5-28 8-45h33c0 1-1 6-2 15-2 8-3 15-4 21h1c9-15 19-25 28-31 10-6 21-9 34-9 16 0 28 4 37 12 10 7 15 18 17 33 11-17 21-28 32-35 10-7 22-10 35-10 18 0 31 5 41 14 9 10 14 23 14 41 0 8-2 19-4 32l-25 127h-34l24-123c3-16 4-28 4-34 0-10-2-17-7-22s-13-8-24-8c-15 0-28 6-39 19s-19 29-22 50l-23 118z">
          <text:p/>
        </draw:path>
        <draw:path draw:style-name="gr597" draw:text-style-name="P175" draw:layer="layout" svg:width="0.205cm" svg:height="0.517cm" svg:x="-19.717cm" svg:y="95.399cm" svg:viewBox="0 0 206 518" svg:d="M206 0c-105 92-157 203-157 332 0 70 19 132 56 186h-47c-39-54-58-117-58-191 0-67 14-128 41-184 27-55 66-103 118-143z">
          <text:p/>
        </draw:path>
        <draw:path draw:style-name="gr597" draw:text-style-name="P175" draw:layer="layout" svg:width="0.148cm" svg:height="0.364cm" svg:x="-19.533cm" svg:y="95.443cm" svg:viewBox="0 0 149 365" svg:d="M49 365c-15-1-27-5-36-14-9-10-13-22-13-37 0-10 1-22 4-35l34-178h-34l7-35h35l28-66h33l-13 66h55l-8 35h-54l-34 175c-2 11-3 20-3 26 0 16 8 24 24 24 8 0 17-2 28-4l-6 36c-18 4-33 6-47 7z">
          <text:p/>
        </draw:path>
        <draw:path draw:style-name="gr597" draw:text-style-name="P175" draw:layer="layout" svg:width="0.205cm" svg:height="0.517cm" svg:x="-19.458cm" svg:y="95.399cm" svg:viewBox="0 0 206 518" svg:d="M0 518c105-92 157-203 157-332 0-70-19-132-56-186h47c39 54 58 117 58 191 0 67-14 128-41 184-27 55-66 103-118 143z">
          <text:p/>
        </draw:path>
        <draw:frame draw:style-name="gr610" draw:text-style-name="P189" draw:layer="layout" svg:width="2.196cm" svg:height="0.962cm" svg:x="-8.062cm" svg:y="91.966cm">
          <draw:text-box>
            <text:p><text:span text:style-name="T58">R</text:span><text:span text:style-name="T58">o</text:span><text:span text:style-name="T58">b</text:span><text:span text:style-name="T58">o</text:span><text:span text:style-name="T58">t</text:span></text:p>
          </draw:text-box>
        </draw:frame>
        <draw:g draw:style-name="gr31">
          <draw:custom-shape draw:style-name="gr611" draw:text-style-name="P41" xml:id="id475" draw:id="id475" draw:layer="layout" svg:width="0.613cm" svg:height="1.825cm" draw:transform="rotate (-1.5707963267949) translate (-15.463cm 100.2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12" draw:text-style-name="P126" xml:id="id476" draw:id="id476" draw:layer="layout" svg:width="4.644cm" svg:height="2.896cm" svg:x="-17.653cm" svg:y="101.617cm">
            <draw:text-box>
              <text:p text:style-name="P30"><text:span text:style-name="T59">R</text:span><text:span text:style-name="T59">e</text:span><text:span text:style-name="T59">p</text:span><text:span text:style-name="T59">l</text:span><text:span text:style-name="T59">a</text:span><text:span text:style-name="T59">c</text:span><text:span text:style-name="T59">e</text:span><text:span text:style-name="T59"> </text:span><text:span text:style-name="T59">w</text:span><text:span text:style-name="T59">i</text:span><text:span text:style-name="T59">t</text:span><text:span text:style-name="T59">h</text:span><text:span text:style-name="T59"><text:line-break/></text:span><text:span text:style-name="T59">d</text:span><text:span text:style-name="T59">i</text:span><text:span text:style-name="T59">s</text:span><text:span text:style-name="T59">c</text:span><text:span text:style-name="T59">r</text:span><text:span text:style-name="T59">e</text:span><text:span text:style-name="T59">p</text:span><text:span text:style-name="T59">a</text:span><text:span text:style-name="T59">n</text:span><text:span text:style-name="T59">c</text:span><text:span text:style-name="T59">y</text:span><text:span text:style-name="T59"> </text:span><text:span text:style-name="T59">v</text:span><text:span text:style-name="T59">a</text:span><text:span text:style-name="T59">l</text:span><text:span text:style-name="T59">u</text:span><text:span text:style-name="T59">e</text:span><text:span text:style-name="T59"><text:line-break/></text:span><text:span text:style-name="T59">(</text:span><text:span text:style-name="T59">W</text:span><text:span text:style-name="T59">a</text:span><text:span text:style-name="T59">s</text:span><text:span text:style-name="T59">s</text:span><text:span text:style-name="T59">e</text:span><text:span text:style-name="T59">r</text:span><text:span text:style-name="T59">s</text:span><text:span text:style-name="T59">t</text:span><text:span text:style-name="T59">e</text:span><text:span text:style-name="T59">i</text:span><text:span text:style-name="T59">n</text:span><text:span text:style-name="T59">)</text:span><text:span text:style-name="T59"><text:line-break/></text:span><text:span text:style-name="T59">o</text:span><text:span text:style-name="T59">r</text:span><text:span text:style-name="T59"><text:line-break/></text:span><text:span text:style-name="T59">p</text:span><text:span text:style-name="T59">o</text:span><text:span text:style-name="T59">s</text:span><text:span text:style-name="T59">e</text:span></text:p>
            </draw:text-box>
          </draw:frame>
          <draw:custom-shape draw:style-name="gr613" draw:text-style-name="P41" xml:id="id477" draw:id="id477" draw:layer="layout" svg:width="0.613cm" svg:height="1.419cm" draw:transform="rotate (-1.5707963267949) translate (-13.55cm 10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614" draw:text-style-name="P15" draw:layer="layout" draw:type="curve" svg:x1="-16.375cm" svg:y1="100.902cm" svg:x2="-15.331cm" svg:y2="101.617cm" draw:start-shape="id475" draw:start-glue-point="6" draw:end-shape="id476" draw:end-glue-point="0" svg:d="M-16375 100902c0 537 1044 180 1044 715" svg:viewBox="0 0 1045 716">
            <text:p/>
          </draw:connector>
          <draw:connector draw:style-name="gr615" draw:text-style-name="P15" draw:layer="layout" draw:type="curve" svg:x1="-14.259cm" svg:y1="100.814cm" svg:x2="-15.331cm" svg:y2="101.617cm" draw:start-shape="id477" draw:start-glue-point="6" draw:end-shape="id476" draw:end-glue-point="0" svg:d="M-14259 100814c0 603-1072 202-1072 803" svg:viewBox="0 0 1073 804">
            <text:p/>
          </draw:connector>
          <draw:frame draw:style-name="gr616" draw:text-style-name="P38" draw:layer="layout" svg:width="4.869cm" svg:height="1.199cm" svg:x="-13.047cm" svg:y="100.641cm">
            <draw:text-box>
              <text:p>U<text:span text:style-name="T60">k is </text:span><text:span text:style-name="T60">from </text:span><text:span text:style-name="T60">the </text:span><text:span text:style-name="T60">second </text:span><text:span text:style-name="T60">derivati</text:span><text:span text:style-name="T60">ve</text:span><text:span text:style-name="T60"><text:line-break/></text:span><text:span text:style-name="T60">(nu </text:span><text:span text:style-name="T60">clusteri</text:span><text:span text:style-name="T60">ng is </text:span><text:span text:style-name="T60">need </text:span><text:span text:style-name="T60">for 2</text:span><text:span text:style-name="T61">nd</text:span><text:span text:style-name="T60"> </text:span><text:span text:style-name="T60">derivati</text:span><text:span text:style-name="T60">ve)</text:span></text:p>
            </draw:text-box>
          </draw:frame>
          <draw:frame draw:style-name="gr521" draw:text-style-name="P5" draw:layer="layout" svg:width="6.644cm" svg:height="1.142cm" svg:x="-18.551cm" svg:y="99.256cm">
            <draw:object xlink:href="./Object 5" xlink:type="simple" xlink:show="embed" xlink:actuate="onLoad">
              <loext:p/>
            </draw:object>
            <draw:image xlink:href="./ObjectReplacements/Object 5" xlink:type="simple" xlink:show="embed" xlink:actuate="onLoad"/>
          </draw:frame>
        </draw:g>
        <draw:rect draw:style-name="gr280" draw:text-style-name="P72" xml:id="id479" draw:id="id479" draw:layer="layout" svg:width="2.927cm" svg:height="1cm" svg:x="89.678cm" svg:y="57.757cm">
          <text:p text:style-name="P8"><text:span text:style-name="T27">rem</text:span><text:span text:style-name="T27">emb</text:span><text:span text:style-name="T27">erin</text:span><text:span text:style-name="T27">g</text:span></text:p>
        </draw:rect>
        <draw:connector draw:style-name="gr293" draw:text-style-name="P15" draw:layer="layout" draw:type="curve" svg:x1="81.254cm" svg:y1="58.328cm" svg:x2="87.054cm" svg:y2="60.528cm" draw:start-shape="id252" draw:start-glue-point="2" draw:end-shape="id478" draw:end-glue-point="0" svg:d="M81254 58328c0 1650 5800 550 5800 2200" svg:viewBox="0 0 5801 2201">
          <text:p/>
        </draw:connector>
        <draw:connector draw:style-name="gr293" draw:text-style-name="P15" draw:layer="layout" draw:type="curve" svg:x1="86.058cm" svg:y1="54.174cm" svg:x2="91.141cm" svg:y2="57.757cm" draw:start-shape="id251" draw:start-glue-point="2" draw:end-shape="id479" draw:end-glue-point="0" svg:d="M86058 54174c0 2688 5083 897 5083 3583" svg:viewBox="0 0 5084 3584">
          <text:p/>
        </draw:connector>
        <draw:rect draw:style-name="gr41" draw:text-style-name="P5" xml:id="id480" draw:id="id480" draw:layer="layout" svg:width="2.47cm" svg:height="1.058cm" svg:x="89.113cm" svg:y="60.289cm">
          <text:p text:style-name="P5">By<text:line-break/>stimulus</text:p>
        </draw:rect>
        <draw:connector draw:style-name="gr293" draw:text-style-name="P15" draw:layer="layout" draw:type="curve" svg:x1="91.141cm" svg:y1="58.757cm" svg:x2="90.348cm" svg:y2="60.289cm" draw:start-shape="id479" draw:start-glue-point="2" draw:end-shape="id480" draw:end-glue-point="0" svg:d="M91141 58757c0 1149-793 383-793 1532" svg:viewBox="0 0 794 1533">
          <text:p/>
        </draw:connector>
        <draw:rect draw:style-name="gr41" draw:text-style-name="P5" xml:id="id481" draw:id="id481" draw:layer="layout" svg:width="2.47cm" svg:height="1.763cm" svg:x="92.113cm" svg:y="60.284cm">
          <text:p text:style-name="P5">Stimulus<text:line-break/>independent <text:line-break/>thought</text:p>
        </draw:rect>
        <draw:connector draw:style-name="gr293" draw:text-style-name="P15" draw:layer="layout" draw:type="curve" svg:x1="91.141cm" svg:y1="58.757cm" svg:x2="93.348cm" svg:y2="60.284cm" draw:start-shape="id479" draw:start-glue-point="2" draw:end-shape="id481" draw:end-glue-point="0" svg:d="M91141 58757c0 1146 2207 383 2207 1527" svg:viewBox="0 0 2208 1528">
          <text:p/>
        </draw:connector>
        <draw:rect draw:style-name="gr41" draw:text-style-name="P5" xml:id="id482" draw:id="id482" draw:layer="layout" svg:width="2.61cm" svg:height="1.235cm" svg:x="92.078cm" svg:y="63.246cm">
          <text:p text:style-name="P5">Mind<text:line-break/>wandering</text:p>
        </draw:rect>
        <draw:connector draw:style-name="gr293" draw:text-style-name="P15" draw:layer="layout" draw:type="curve" svg:x1="93.348cm" svg:y1="62.047cm" svg:x2="93.383cm" svg:y2="63.246cm" draw:start-shape="id481" draw:start-glue-point="2" draw:end-shape="id482" draw:end-glue-point="0" svg:d="M93348 62047c0 900 35 301 35 1199" svg:viewBox="0 0 36 1200">
          <text:p/>
        </draw:connector>
        <draw:connector draw:style-name="gr36" draw:text-style-name="P7" draw:layer="layout" draw:type="curve" svg:x1="-27.151cm" svg:y1="52.428cm" svg:x2="-25.649cm" svg:y2="51.138cm" draw:start-shape="id444" draw:start-glue-point="1" draw:end-shape="id483" draw:end-glue-point="3" svg:d="M-27151 52428c1128 0 377-1290 1502-1290" svg:viewBox="0 0 1503 1291">
          <text:p/>
        </draw:connector>
        <draw:custom-shape draw:name="comment box 1" draw:style-name="gr617" draw:text-style-name="P20" xml:id="id484" draw:id="id484" draw:layer="layout" svg:width="2.572cm" svg:height="1.94cm" svg:x="-45.017cm" svg:y="45.883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8" draw:text-style-name="P133" xml:id="id485" draw:id="id485" draw:layer="layout" svg:width="2.674cm" svg:height="0.97cm" svg:x="-33.526cm" svg:y="51.936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8" draw:text-style-name="P133" xml:id="id486" draw:id="id486" draw:layer="layout" svg:width="2.674cm" svg:height="0.97cm" svg:x="-37.326cm" svg:y="51.936cm">
          <text:p text:style-name="P25"><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0.74cm" svg:y1="44.855cm" svg:x2="-42.445cm" svg:y2="46.853cm" draw:start-shape="id380" draw:start-glue-point="3" draw:end-shape="id484" draw:end-glue-point="7" svg:d="M-40740 44855c-1263 0-411 1998-1705 1998" svg:viewBox="0 0 1706 1999">
          <text:p/>
        </draw:connector>
        <draw:connector draw:style-name="gr36" draw:text-style-name="P7" draw:layer="layout" draw:type="curve" svg:x1="-30.852cm" svg:y1="52.421cm" svg:x2="-29.549cm" svg:y2="52.428cm" draw:start-shape="id485" draw:start-glue-point="10" draw:end-shape="id444" draw:end-glue-point="3" svg:d="M-30852 52421c979 0 328 7 1303 7" svg:viewBox="0 0 1304 8">
          <text:p/>
        </draw:connector>
        <draw:connector draw:style-name="gr36" draw:text-style-name="P7" draw:layer="layout" draw:type="curve" svg:x1="-34.652cm" svg:y1="52.421cm" svg:x2="-33.526cm" svg:y2="52.421cm" draw:start-shape="id486" draw:start-glue-point="10" draw:end-shape="id485" draw:end-glue-point="6" svg:d="M-34652 52421h1126" svg:viewBox="0 0 1127 1">
          <text:p/>
        </draw:connector>
        <draw:connector draw:style-name="gr36" draw:text-style-name="P7" draw:layer="layout" draw:type="curve" svg:x1="-38.234cm" svg:y1="52.389cm" svg:x2="-37.326cm" svg:y2="52.421cm" draw:start-shape="id487" draw:start-glue-point="10" draw:end-shape="id486" draw:end-glue-point="6" svg:d="M-38234 52389c682 0 229 32 908 32" svg:viewBox="0 0 909 33">
          <text:p/>
        </draw:connector>
        <draw:g draw:style-name="gr31">
          <draw:rect draw:style-name="gr619" draw:text-style-name="P190" draw:layer="layout" svg:width="19.38cm" svg:height="1.608cm" svg:x="-39.952cm" svg:y="59.066cm">
            <text:p/>
          </draw:rect>
          <draw:rect draw:style-name="gr620" draw:text-style-name="P191" draw:layer="layout" svg:width="18.349cm" svg:height="1.608cm" svg:x="-34.991cm" svg:y="59.066cm">
            <text:p/>
          </draw:rect>
          <draw:g draw:style-name="gr31">
            <draw:custom-shape draw:style-name="gr34" draw:text-style-name="P26" xml:id="id489" draw:id="id489" draw:layer="layout" svg:width="0.891cm" svg:height="0.97cm" svg:x="-34.648cm" svg:y="59.423cm">
              <text:p text:style-name="P25"><text:span text:style-name="T12">L</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88" draw:id="id488" draw:layer="layout" svg:width="0.891cm" svg:height="0.97cm" svg:x="-32.647cm" svg:y="59.423cm">
              <text:p text:style-name="P25"><text:span text:style-name="T12">L</text:span><text:span text:style-name="T13">t</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88" draw:start-glue-point="6" draw:end-shape="id489" draw:end-glue-point="10" svg:d="M-32647 59908h-1110" svg:viewBox="0 0 1111 1">
              <text:p/>
            </draw:connector>
            <draw:custom-shape draw:style-name="gr34" draw:text-style-name="P26" xml:id="id491" draw:id="id491" draw:layer="layout" svg:width="0.891cm" svg:height="0.97cm" svg:x="-30.648cm" svg:y="59.423cm">
              <text:p text:style-name="P25"><text:span text:style-name="T12">L</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0" draw:id="id490" draw:layer="layout" svg:width="0.891cm" svg:height="0.97cm" svg:x="-28.647cm" svg:y="59.423cm">
              <text:p text:style-name="P25"><text:span text:style-name="T12">L</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90" draw:start-glue-point="6" draw:end-shape="id491" draw:end-glue-point="10" svg:d="M-28647 59908h-1110" svg:viewBox="0 0 1111 1">
              <text:p/>
            </draw:connector>
            <draw:connector draw:style-name="gr36" draw:text-style-name="P7" draw:layer="layout" draw:type="curve" svg:x1="-30.648cm" svg:y1="59.908cm" svg:x2="-31.756cm" svg:y2="59.908cm" draw:start-shape="id491" draw:start-glue-point="6" draw:end-shape="id488" draw:end-glue-point="10" svg:d="M-30648 59908h-1108" svg:viewBox="0 0 1109 1">
              <text:p/>
            </draw:connector>
            <draw:custom-shape draw:style-name="gr34" draw:text-style-name="P26" xml:id="id493" draw:id="id493" draw:layer="layout" svg:width="0.891cm" svg:height="0.97cm" svg:x="-23.648cm" svg:y="59.423cm">
              <text:p text:style-name="P25"><text:span text:style-name="T12">L</text:span><text:span text:style-name="T13">t+q</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2" draw:id="id492" draw:layer="layout" svg:width="0.891cm" svg:height="0.97cm" svg:x="-21.647cm" svg:y="59.423cm">
              <text:p text:style-name="P25"><text:span text:style-name="T12">L</text:span><text:span text:style-name="T13">t+q</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92" draw:start-glue-point="6" draw:end-shape="id493" draw:end-glue-point="10" svg:d="M-21647 59908h-1110" svg:viewBox="0 0 1111 1">
              <text:p/>
            </draw:connector>
            <draw:connector draw:style-name="gr489" draw:text-style-name="P7" draw:layer="layout" draw:type="curve" svg:x1="-24.061cm" svg:y1="59.867cm" svg:x2="-27.374cm" svg:y2="59.87cm" svg:d="M-24061 59867c-2484 0-828 3-3313 3" svg:viewBox="0 0 3314 4">
              <text:p/>
            </draw:connector>
            <draw:connector draw:style-name="gr489" draw:text-style-name="P7" draw:layer="layout" draw:type="curve" svg:x1="-35.776cm" svg:y1="59.882cm" svg:x2="-38.447cm" svg:y2="59.898cm" svg:d="M-35776 59882c-2002 0-667 16-2671 16" svg:viewBox="0 0 2672 17">
              <text:p/>
            </draw:connector>
            <draw:custom-shape draw:style-name="gr34" draw:text-style-name="P26" draw:layer="layout" svg:width="0.891cm" svg:height="0.97cm" svg:x="-39.747cm" svg:y="59.423cm">
              <text:p text:style-name="P25"><text:span text:style-name="T12">L</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891cm" svg:height="0.97cm" svg:x="-17.646cm" svg:y="59.423cm">
              <text:p text:style-name="P25"><text:span text:style-name="T12">L</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89" draw:text-style-name="P7" draw:layer="layout" draw:type="curve" svg:x1="-17.866cm" svg:y1="59.873cm" svg:x2="-20.446cm" svg:y2="59.898cm" svg:d="M-17866 59873c-1933 0-644 25-2580 25" svg:viewBox="0 0 2581 26">
              <text:p/>
            </draw:connector>
          </draw:g>
          <draw:line draw:style-name="gr557" draw:text-style-name="P15" draw:layer="layout" svg:x1="-39.972cm" svg:y1="60.96cm" svg:x2="-16.587cm" svg:y2="60.919cm">
            <text:p/>
          </draw:line>
          <draw:frame draw:style-name="gr621" draw:text-style-name="P192" draw:layer="layout" svg:width="8.791cm" svg:height="1.825cm" svg:x="-31.606cm" svg:y="60.852cm">
            <draw:text-box>
              <text:p text:style-name="P5"><text:span text:style-name="T62">Sl</text:span><text:span text:style-name="T62">idi</text:span><text:span text:style-name="T62">n</text:span><text:span text:style-name="T62">g </text:span><text:span text:style-name="T62">wi</text:span><text:span text:style-name="T62">n</text:span><text:span text:style-name="T62">d</text:span><text:span text:style-name="T62">o</text:span><text:span text:style-name="T62">w</text:span><text:span text:style-name="T62"><text:line-break/></text:span><text:span text:style-name="T62">fo</text:span><text:span text:style-name="T62">r </text:span><text:span text:style-name="T62">tr</text:span><text:span text:style-name="T62">ai</text:span><text:span text:style-name="T62">ni</text:span><text:span text:style-name="T62">n</text:span><text:span text:style-name="T62">g </text:span><text:span text:style-name="T62">tr</text:span><text:span text:style-name="T62">an</text:span><text:span text:style-name="T62">sf</text:span><text:span text:style-name="T62">or</text:span><text:span text:style-name="T62">m</text:span><text:span text:style-name="T62">er</text:span><text:span text:style-name="T62">s</text:span></text:p>
            </draw:text-box>
          </draw:frame>
          <draw:connector draw:style-name="gr622" draw:text-style-name="P15" draw:layer="layout" draw:type="line" svg:x1="-34.912cm" svg:y1="58.563cm" svg:x2="-20.638cm" svg:y2="58.597cm" svg:d="M-34912 58563l14274 34" svg:viewBox="0 0 14275 35">
            <text:p/>
          </draw:connector>
          <draw:connector draw:style-name="gr623" draw:text-style-name="P15" draw:layer="layout" draw:type="line" svg:x1="-39.939cm" svg:y1="58.963cm" svg:x2="-20.658cm" svg:y2="58.917cm" svg:d="M-39939 58963l19281-46" svg:viewBox="0 0 19282 47">
            <text:p/>
          </draw:connector>
          <draw:frame draw:style-name="gr624" draw:text-style-name="P193" draw:layer="layout" svg:width="4.037cm" svg:height="0.645cm" svg:x="-28.867cm" svg:y="58.006cm">
            <draw:text-box>
              <text:p><text:span text:style-name="T12">Overl</text:span><text:span text:style-name="T12">ap </text:span><text:span text:style-name="T12">(with </text:span><text:span text:style-name="T12">lengt</text:span><text:span text:style-name="T12">h q)</text:span></text:p>
            </draw:text-box>
          </draw:frame>
          <draw:connector draw:style-name="gr623" draw:text-style-name="P15" draw:layer="layout" draw:type="line" svg:x1="-34.925cm" svg:y1="58.773cm" svg:x2="-16.591cm" svg:y2="58.773cm" svg:d="M-34925 58773h18334" svg:viewBox="0 0 18335 1">
            <text:p/>
          </draw:connector>
          <draw:frame draw:style-name="gr625" draw:text-style-name="P193" draw:layer="layout" svg:width="1.264cm" svg:height="0.645cm" svg:x="-38.08cm" svg:y="58.292cm">
            <draw:text-box>
              <text:p><text:span text:style-name="T12">input</text:span></text:p>
            </draw:text-box>
          </draw:frame>
          <draw:frame draw:style-name="gr626" draw:text-style-name="P193" draw:layer="layout" svg:width="1.479cm" svg:height="0.645cm" svg:x="-19.38cm" svg:y="58.093cm">
            <draw:text-box>
              <text:p><text:span text:style-name="T12">outpu</text:span><text:span text:style-name="T12">t</text:span></text:p>
            </draw:text-box>
          </draw:frame>
          <draw:connector draw:style-name="gr622" draw:text-style-name="P15" draw:layer="layout" draw:type="line" svg:x1="-40.005cm" svg:y1="57.943cm" svg:x2="-20.638cm" svg:y2="57.998cm" svg:d="M-40005 57943l19367 55" svg:viewBox="0 0 19368 56">
            <text:p/>
          </draw:connector>
          <draw:frame draw:style-name="gr624" draw:text-style-name="P193" draw:layer="layout" svg:width="4.037cm" svg:height="0.645cm" svg:x="-32.467cm" svg:y="57.407cm">
            <draw:text-box>
              <text:p><text:span text:style-name="T12">Wind</text:span><text:span text:style-name="T12">ow </text:span><text:span text:style-name="T12">lengt</text:span><text:span text:style-name="T12">h</text:span></text:p>
            </draw:text-box>
          </draw:frame>
        </draw:g>
        <draw:custom-shape draw:name="comment box 2" draw:style-name="gr627" draw:text-style-name="P20" xml:id="id494" draw:id="id494" draw:layer="layout" svg:width="3.629cm" svg:height="2.55cm" svg:x="-18.866cm" svg:y="53.929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3.656cm" svg:y1="52.577cm" svg:x2="-15.237cm" svg:y2="55.204cm" draw:start-shape="id396" draw:end-shape="id494" draw:end-glue-point="7" svg:d="M-13656 52577c0 1752-527 2627-1581 2627" svg:viewBox="0 0 1582 2628">
          <text:p/>
        </draw:connector>
        <draw:polygon draw:style-name="gr508" draw:text-style-name="P145" xml:id="id483" draw:id="id483" draw:layer="layout" svg:width="1.215cm" svg:height="1.383cm" svg:x="-25.649cm" svg:y="50.446cm" svg:viewBox="0 0 1216 1384" draw:points="1216,1384 0,971 0,325 1216,0">
          <text:p/>
        </draw:polygon>
        <draw:frame draw:style-name="gr628" draw:text-style-name="P194" draw:layer="layout" svg:width="1.669cm" svg:height="0.887cm" svg:x="-25.877cm" svg:y="50.683cm">
          <draw:text-box>
            <text:p text:style-name="P5"><text:span text:style-name="T49">Robot </text:span><text:span text:style-name="T49">1</text:span><text:span text:style-name="T49"><text:line-break/></text:span><text:span text:style-name="T49">decod</text:span><text:span text:style-name="T49">ers</text:span></text:p>
          </draw:text-box>
        </draw:frame>
        <draw:rect draw:style-name="gr41" draw:text-style-name="P19" xml:id="id444" draw:id="id444" draw:layer="layout" svg:width="2.398cm" svg:height="1.621cm" svg:x="-29.549cm" svg:y="51.618cm">
          <text:p text:style-name="P3"><text:span text:style-name="T12">Action</text:span><text:span text:style-name="T12"><text:line-break/></text:span><text:span text:style-name="T12">potentials</text:span><text:span text:style-name="T12"><text:line-break/></text:span><text:span text:style-name="T12">from both </text:span><text:span text:style-name="T12"><text:line-break/></text:span><text:span text:style-name="T12">robots</text:span></text:p>
        </draw:rect>
        <draw:connector draw:style-name="gr36" draw:text-style-name="P7" draw:layer="layout" draw:type="curve" svg:x1="-24.433cm" svg:y1="51.138cm" svg:x2="-23.01cm" svg:y2="51.489cm" draw:start-shape="id483" draw:start-glue-point="1" draw:end-shape="id401" draw:end-glue-point="3" svg:d="M-24433 51138c1050 0 339 351 1423 351" svg:viewBox="0 0 1424 352">
          <text:p/>
        </draw:connector>
        <draw:frame draw:style-name="gr629" draw:text-style-name="P170" draw:layer="layout" svg:width="1.563cm" svg:height="1.039cm" svg:x="-43.704cm" svg:y="39.88cm">
          <draw:text-box>
            <text:p><text:span text:style-name="T55">GPS</text:span></text:p>
          </draw:text-box>
        </draw:frame>
        <draw:frame draw:style-name="gr630" draw:text-style-name="P170" draw:layer="layout" svg:width="1.587cm" svg:height="0.645cm" svg:x="-44.104cm" svg:y="41.381cm">
          <draw:text-box>
            <text:p><text:span text:style-name="T55">LIDA</text:span><text:span text:style-name="T55">R</text:span></text:p>
          </draw:text-box>
        </draw:frame>
        <draw:frame draw:style-name="gr630" draw:text-style-name="P170" draw:layer="layout" svg:width="1.587cm" svg:height="0.645cm" svg:x="-43.603cm" svg:y="42.982cm">
          <draw:text-box>
            <text:p><text:span text:style-name="T55">IMU</text:span></text:p>
          </draw:text-box>
        </draw:frame>
        <draw:frame draw:style-name="gr629" draw:text-style-name="P170" draw:layer="layout" svg:width="1.977cm" svg:height="1.039cm" svg:x="-44.002cm" svg:y="44.283cm">
          <draw:text-box>
            <text:p><text:span text:style-name="T55">Batte</text:span><text:span text:style-name="T55">ry</text:span></text:p>
          </draw:text-box>
        </draw:frame>
        <draw:frame draw:style-name="gr135" draw:text-style-name="P41" draw:layer="layout" svg:width="1.24cm" svg:height="0.736cm" svg:x="-27.256cm" svg:y="53.424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474cm" svg:y="50.597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08" draw:text-style-name="P145" xml:id="id445" draw:id="id445" draw:layer="layout" svg:width="1.215cm" svg:height="1.383cm" svg:x="-25.491cm" svg:y="53.046cm" svg:viewBox="0 0 1216 1384" draw:points="1216,1384 0,971 0,325 1216,0">
          <text:p/>
        </draw:polygon>
        <draw:frame draw:style-name="gr628" draw:text-style-name="P194" draw:layer="layout" svg:width="1.669cm" svg:height="0.887cm" svg:x="-25.718cm" svg:y="53.295cm">
          <draw:text-box>
            <text:p text:style-name="P5"><text:span text:style-name="T49">Robot </text:span><text:span text:style-name="T49">2</text:span><text:span text:style-name="T49"><text:line-break/></text:span><text:span text:style-name="T49">decod</text:span><text:span text:style-name="T49">ers</text:span></text:p>
          </draw:text-box>
        </draw:frame>
        <draw:connector draw:style-name="gr36" draw:text-style-name="P7" draw:layer="layout" draw:type="curve" svg:x1="-24.275cm" svg:y1="53.738cm" svg:x2="-22.913cm" svg:y2="53.642cm" draw:start-shape="id445" draw:start-glue-point="1" draw:end-shape="id495" draw:end-glue-point="3" svg:d="M-24275 53738c1003 0 323-96 1362-96" svg:viewBox="0 0 1363 97">
          <text:p/>
        </draw:connector>
        <draw:frame draw:style-name="gr521" draw:text-style-name="P5" xml:id="id496" draw:id="id496" draw:layer="layout" svg:width="5.375cm" svg:height="1.92cm" svg:x="-36.53cm" svg:y="48.356cm">
          <draw:object xlink:href="./Object 6" xlink:type="simple" xlink:show="embed" xlink:actuate="onLoad">
            <loext:p/>
          </draw:object>
          <draw:image xlink:href="./ObjectReplacements/Object 6" xlink:type="simple" xlink:show="embed" xlink:actuate="onLoad"/>
        </draw:frame>
        <draw:connector draw:style-name="gr29" draw:text-style-name="P15" draw:layer="layout" draw:type="curve" svg:x1="-32.189cm" svg:y1="51.936cm" svg:x2="-31.155cm" svg:y2="49.316cm" draw:start-shape="id485" draw:start-glue-point="4" draw:end-shape="id496" draw:end-glue-point="1" svg:d="M-32189 51936c0-1245 767-1037 1213-1381s571-1239-179-1239" svg:viewBox="0 0 1573 2621">
          <text:p/>
        </draw:connector>
        <draw:g draw:style-name="gr23">
          <draw:polygon draw:style-name="gr508" draw:text-style-name="P145" draw:layer="layout" svg:width="1.311cm" svg:height="1.383cm" svg:x="-32.916cm" svg:y="44.854cm" svg:viewBox="0 0 1312 1384" draw:points="1312,1384 0,792 0,591 1312,0">
            <text:p/>
          </draw:polygon>
          <draw:frame draw:style-name="gr631" draw:text-style-name="P195" draw:layer="layout" svg:width="1.732cm" svg:height="0.569cm" svg:x="-33.025cm" svg:y="45.252cm">
            <draw:text-box>
              <text:p><text:span text:style-name="T63">decoder</text:span></text:p>
            </draw:text-box>
          </draw:frame>
        </draw:g>
        <draw:g draw:style-name="gr31">
          <draw:g draw:style-name="gr23">
            <draw:polygon draw:style-name="gr510" draw:text-style-name="P113" draw:layer="layout" svg:width="1.292cm" svg:height="1.358cm" svg:x="-27.759cm" svg:y="44.804cm" svg:viewBox="0 0 1293 1359" draw:points="0,0 1293,581 1293,777 0,1359">
              <text:p/>
            </draw:polygon>
          </draw:g>
          <draw:frame draw:style-name="gr495" draw:text-style-name="P196" draw:layer="layout" svg:width="1.673cm" svg:height="0.887cm" svg:x="-27.938cm" svg:y="45.181cm">
            <draw:text-box>
              <text:p><text:span text:style-name="T63">encoder</text:span></text:p>
            </draw:text-box>
          </draw:frame>
        </draw:g>
        <draw:frame draw:style-name="gr632" draw:text-style-name="P16" xml:id="id497" draw:id="id497" draw:layer="layout" svg:width="2.796cm" svg:height="0.911cm" svg:x="-41.717cm" svg:y="48.506cm">
          <draw:text-box>
            <text:p text:style-name="P66"><text:span text:style-name="T64">derivative-free </text:span><text:span text:style-name="T64"><text:line-break/></text:span><text:span text:style-name="T64">global optimizer</text:span></text:p>
          </draw:text-box>
        </draw:frame>
        <draw:connector draw:style-name="gr633" draw:text-style-name="P7" draw:layer="layout" draw:type="curve" svg:x1="-36.53cm" svg:y1="49.316cm" svg:x2="-38.921cm" svg:y2="48.961cm" draw:start-shape="id496" draw:start-glue-point="3" draw:end-shape="id497" svg:d="M-36530 49316c-1792 0-597-355-2391-355" svg:viewBox="0 0 2392 356">
          <text:p text:style-name="P5"><text:span text:style-name="T4">usi</text:span><text:span text:style-name="T4">ng</text:span></text:p>
        </draw:connector>
        <draw:frame draw:style-name="gr521" draw:text-style-name="P5" xml:id="id498" draw:id="id498" draw:layer="layout" svg:width="4.615cm" svg:height="0.907cm" svg:x="-45.576cm" svg:y="50.542cm">
          <draw:object xlink:href="./Object 8" xlink:type="simple" xlink:show="embed" xlink:actuate="onLoad">
            <loext:p/>
          </draw:object>
          <draw:image xlink:href="./ObjectReplacements/Object 8" xlink:type="simple" xlink:show="embed" xlink:actuate="onLoad"/>
        </draw:frame>
        <draw:connector draw:style-name="gr633" draw:text-style-name="P7" draw:layer="layout" draw:type="curve" svg:x1="-41.717cm" svg:y1="48.961cm" svg:x2="-43.268cm" svg:y2="50.542cm" draw:start-shape="id497" draw:start-glue-point="3" draw:end-shape="id498" draw:end-glue-point="0" svg:d="M-41717 48961c-1034 0-1551 527-1551 1581" svg:viewBox="0 0 1552 1582">
          <text:p text:style-name="P5"><text:span text:style-name="T4">converting</text:span></text:p>
        </draw:connector>
        <draw:connector draw:style-name="gr634" draw:text-style-name="P7" draw:layer="layout" draw:type="curve" draw:line-skew="0.726cm" svg:x1="-43.268cm" svg:y1="51.449cm" svg:x2="-34.652cm" svg:y2="52.421cm" draw:start-shape="id498" draw:start-glue-point="2" draw:end-shape="id486" draw:end-glue-point="10" svg:d="M-43268 51449c0 4027 4560 3357 6902 2593s2467-1621 1714-1621" svg:viewBox="0 0 9028 3172">
          <text:p text:style-name="P5"><text:span text:style-name="T4">converting</text:span></text:p>
        </draw:connector>
        <draw:rect draw:style-name="gr41" draw:text-style-name="P5" xml:id="id499" draw:id="id499" draw:layer="layout" svg:width="2.589cm" svg:height="1.784cm" svg:x="92.039cm" svg:y="65.721cm">
          <text:p text:style-name="P5">Default<text:line-break/>brain<text:line-break/>network</text:p>
        </draw:rect>
        <draw:connector draw:style-name="gr293" draw:text-style-name="P15" draw:layer="layout" draw:type="curve" svg:x1="93.383cm" svg:y1="64.481cm" svg:x2="93.333cm" svg:y2="65.721cm" draw:start-shape="id482" draw:start-glue-point="2" draw:end-shape="id499" draw:end-glue-point="0" svg:d="M93383 64481c0 930-50 310-50 1240" svg:viewBox="0 0 51 1241">
          <text:p/>
        </draw:connector>
        <draw:rect draw:style-name="gr292" draw:text-style-name="P35" xml:id="id503" draw:id="id503" draw:layer="layout" svg:width="2.3cm" svg:height="1cm" svg:x="40.457cm" svg:y="99.219cm">
          <text:p text:style-name="P5">Suprise<text:line-break/>reduction</text:p>
        </draw:rect>
        <draw:rect draw:style-name="gr292" draw:text-style-name="P35" xml:id="id501" draw:id="id501" draw:layer="layout" svg:width="2.853cm" svg:height="1.372cm" svg:x="37.683cm" svg:y="103.071cm">
          <text:p text:style-name="P5">Updating<text:line-break/>predicting<text:line-break/>models</text:p>
        </draw:rect>
        <draw:rect draw:style-name="gr292" draw:text-style-name="P35" xml:id="id502" draw:id="id502" draw:layer="layout" svg:width="2.853cm" svg:height="1.372cm" svg:x="42.435cm" svg:y="103.071cm">
          <text:p text:style-name="P5">Manipulating<text:line-break/>the world</text:p>
        </draw:rect>
        <draw:connector draw:style-name="gr635" draw:text-style-name="P15" draw:layer="layout" draw:type="curve" svg:x1="41.607cm" svg:y1="101.993cm" svg:x2="39.109cm" svg:y2="103.071cm" draw:start-shape="id500" draw:start-glue-point="2" draw:end-shape="id501" draw:end-glue-point="0" svg:d="M41607 101993c0 808-2498 270-2498 1078" svg:viewBox="0 0 2499 1079">
          <text:p/>
        </draw:connector>
        <draw:connector draw:style-name="gr636" draw:text-style-name="P15" draw:layer="layout" draw:type="curve" svg:x1="41.607cm" svg:y1="101.993cm" svg:x2="43.861cm" svg:y2="103.071cm" draw:start-shape="id500" draw:start-glue-point="2" draw:end-shape="id502" draw:end-glue-point="0" svg:d="M41607 101993c0 808 2254 270 2254 1078" svg:viewBox="0 0 2255 1079">
          <text:p/>
        </draw:connector>
        <draw:rect draw:style-name="gr292" draw:text-style-name="P35" xml:id="id500" draw:id="id500" draw:layer="layout" svg:width="1.437cm" svg:height="0.766cm" svg:x="40.889cm" svg:y="101.227cm">
          <text:p text:style-name="P5">kinds</text:p>
        </draw:rect>
        <draw:connector draw:style-name="gr637" draw:text-style-name="P15" draw:layer="layout" draw:type="curve" svg:x1="41.607cm" svg:y1="100.219cm" svg:x2="41.607cm" svg:y2="101.227cm" draw:start-shape="id503" draw:start-glue-point="2" draw:end-shape="id500" draw:end-glue-point="0" svg:d="M41607 100219v1008" svg:viewBox="0 0 1 1009">
          <text:p/>
        </draw:connector>
        <draw:rect draw:style-name="gr292" draw:text-style-name="P35" xml:id="id504" draw:id="id504" draw:layer="layout" svg:width="2.853cm" svg:height="1.372cm" svg:x="36.184cm" svg:y="105.571cm">
          <text:p text:style-name="P5">Updating<text:line-break/>forecasting<text:line-break/>models</text:p>
        </draw:rect>
        <draw:connector draw:style-name="gr638" draw:text-style-name="P15" draw:layer="layout" draw:type="curve" svg:x1="39.109cm" svg:y1="104.443cm" svg:x2="37.61cm" svg:y2="105.571cm" draw:start-shape="id501" draw:start-glue-point="2" draw:end-shape="id504" draw:end-glue-point="0" svg:d="M39109 104443c0 846-1499 282-1499 1128" svg:viewBox="0 0 1500 1129">
          <text:p/>
        </draw:connector>
        <draw:rect draw:style-name="gr292" draw:text-style-name="P35" xml:id="id505" draw:id="id505" draw:layer="layout" svg:width="2.853cm" svg:height="1.372cm" svg:x="39.185cm" svg:y="105.571cm">
          <text:p text:style-name="P5">Updating<text:line-break/>classification<text:line-break/>models</text:p>
        </draw:rect>
        <draw:connector draw:style-name="gr639" draw:text-style-name="P15" draw:layer="layout" draw:type="curve" svg:x1="39.109cm" svg:y1="104.443cm" svg:x2="40.611cm" svg:y2="105.571cm" draw:start-shape="id501" draw:start-glue-point="2" draw:end-shape="id505" svg:d="M39109 104443c0 846 1502 282 1502 1128" svg:viewBox="0 0 1503 1129">
          <text:p/>
        </draw:connector>
        <draw:custom-shape draw:style-name="gr640" draw:text-style-name="P68" xml:id="id506" draw:id="id506" draw:layer="layout" svg:width="4.56cm" svg:height="2.669cm" svg:x="152.195cm" svg:y="36.515cm">
          <text:p text:style-name="P17"><text:span text:style-name="T4">Connects brain and</text:span><text:span text:style-name="T4"><text:line-break/></text:span><text:span text:style-name="T4">spinal cord</text:span><text:span text:style-name="T4"><text:line-break/></text:span><text:span text:style-name="T4">and brain to sensory and skeltal</text:span><text:span text:style-name="T4"><text:line-break/></text:span><text:span text:style-name="T4">muscles</text:span><text:span text:style-name="T4"><text:line-break/></text:span><text:span text:style-name="T4">under </text:span><text:span text:style-name="T65">conscious</text:span><text:span text:style-name="T65"><text:line-break/></text:span><text:span text:style-name="T66">control</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51.265cm" svg:y1="40.2cm" svg:x2="154.475cm" svg:y2="39.184cm" draw:start-shape="id225" draw:start-glue-point="0" draw:end-shape="id506" draw:end-glue-point="6" svg:d="M151265 40200c0-762 3210-254 3210-1016" svg:viewBox="0 0 3211 1017">
          <text:p/>
        </draw:connector>
        <draw:connector draw:style-name="gr641" draw:text-style-name="P7" draw:layer="layout" draw:type="curve" svg:x1="-16.897cm" svg:y1="27.437cm" svg:x2="-23.334cm" svg:y2="26.699cm" draw:start-shape="id1" draw:start-glue-point="3" draw:end-shape="id3" draw:end-glue-point="0" svg:d="M-16897 27437c-3910 0-3258-620-3890-992s-2547-497-2547 254" svg:viewBox="0 0 6438 1289">
          <text:p text:style-name="P5"><text:span text:style-name="T4">What should</text:span><text:span text:style-name="T4"><text:line-break/></text:span><text:span text:style-name="T4">be saved</text:span></text:p>
        </draw:connector>
        <draw:connector draw:style-name="gr642" draw:text-style-name="P15" draw:layer="layout" draw:type="line" svg:x1="-25.784cm" svg:y1="39.701cm" svg:x2="-25.76cm" svg:y2="41.671cm" svg:d="M-25784 39701l24 1970" svg:viewBox="0 0 25 1971">
          <text:p/>
        </draw:connector>
        <draw:frame draw:style-name="gr643" draw:text-style-name="P197" draw:layer="layout" svg:width="3.475cm" svg:height="0.878cm" svg:x="-25.81cm" svg:y="40.138cm">
          <draw:text-box>
            <text:p text:style-name="P3"><text:span text:style-name="T67">ROS</text:span></text:p>
          </draw:text-box>
        </draw:frame>
        <draw:frame draw:style-name="gr521" draw:text-style-name="P5" draw:layer="layout" svg:width="4.672cm" svg:height="1.92cm" svg:x="-27.052cm" svg:y="64.858cm">
          <draw:object xlink:href="./Object 9" xlink:type="simple" xlink:show="embed" xlink:actuate="onLoad">
            <loext:p/>
          </draw:object>
          <draw:image xlink:href="./ObjectReplacements/Object 9" xlink:type="simple" xlink:show="embed" xlink:actuate="onLoad"/>
        </draw:frame>
        <draw:g draw:style-name="gr31">
          <draw:path draw:style-name="gr644" draw:text-style-name="P5" draw:layer="layout" svg:width="2.382cm" svg:height="2.15cm" svg:x="-101.135cm" svg:y="12.975cm" svg:viewBox="0 0 2383 2151" svg:d="M2383 2151c-953-685-1525-1369-2383-2151">
            <text:p/>
          </draw:path>
          <draw:path draw:style-name="gr644" draw:text-style-name="P5" draw:layer="layout" svg:width="1.429cm" svg:height="1.134cm" svg:x="-102.565cm" svg:y="11.84cm" svg:viewBox="0 0 1430 1135" svg:d="M1430 1135c-477-352-954-685-1430-1135">
            <text:p/>
          </draw:path>
          <draw:path draw:style-name="gr644" draw:text-style-name="P5" draw:layer="layout" svg:width="1.372cm" svg:height="0.429cm" svg:x="-102.508cm" svg:y="12.975cm" svg:viewBox="0 0 1373 430" svg:d="M1373 0c-477 195-916 293-1373 430">
            <text:p/>
          </draw:path>
          <draw:path draw:style-name="gr644" draw:text-style-name="P5" draw:layer="layout" svg:width="3.107cm" svg:height="0.586cm" svg:x="-101.86cm" svg:y="14.539cm" svg:viewBox="0 0 3108 587" svg:d="M3108 587c-1048-196-2002-293-3108-587">
            <text:p/>
          </draw:path>
          <draw:path draw:style-name="gr644" draw:text-style-name="P5" draw:layer="layout" svg:width="1.181cm" svg:height="0.82cm" svg:x="-103.042cm" svg:y="13.718cm" svg:viewBox="0 0 1182 821" svg:d="M1182 821c-457-234-839-489-1182-821">
            <text:p/>
          </draw:path>
          <draw:path draw:style-name="gr644" draw:text-style-name="P5" draw:layer="layout" svg:width="1.219cm" svg:height="0.684cm" svg:x="-103.08cm" svg:y="14.539cm" svg:viewBox="0 0 1220 685" svg:d="M1220 0c-515 157-896 391-1220 685">
            <text:p/>
          </draw:path>
          <draw:path draw:style-name="gr644" draw:text-style-name="P5" draw:layer="layout" svg:width="2.478cm" svg:height="2.346cm" svg:x="-101.231cm" svg:y="15.126cm" svg:viewBox="0 0 2479 2347" svg:d="M2479 0c-953 626-1716 1369-2479 2347">
            <text:p/>
          </draw:path>
          <draw:path draw:style-name="gr644" draw:text-style-name="P5" draw:layer="layout" svg:width="1.238cm" svg:height="1.251cm" svg:x="-102.47cm" svg:y="17.472cm" svg:viewBox="0 0 1239 1252" svg:d="M1239 0c-438 430-820 782-1239 1252">
            <text:p/>
          </draw:path>
          <draw:path draw:style-name="gr644" draw:text-style-name="P5" draw:layer="layout" svg:width="1.467cm" svg:height="0.429cm" svg:x="-102.699cm" svg:y="17.042cm" svg:viewBox="0 0 1468 430" svg:d="M1468 430c-514-156-972-293-1468-430">
            <text:p/>
          </draw:path>
          <draw:path draw:style-name="gr644" draw:text-style-name="P5" draw:layer="layout" svg:width="0.365cm" svg:height="2.933cm" svg:x="-98.641cm" svg:y="11.41cm" svg:viewBox="0 0 366 2934" svg:d="M366 2934c-381-978-477-1858-229-2934">
            <text:p/>
          </draw:path>
          <draw:path draw:style-name="gr644" draw:text-style-name="P5" draw:layer="layout" svg:width="0.628cm" svg:height="1.075cm" svg:x="-99.133cm" svg:y="10.334cm" svg:viewBox="0 0 629 1076" svg:d="M629 1076c-152-430-343-782-629-1076">
            <text:p/>
          </draw:path>
          <draw:path draw:style-name="gr644" draw:text-style-name="P5" draw:layer="layout" svg:width="1.525cm" svg:height="0.879cm" svg:x="-98.504cm" svg:y="10.53cm" svg:viewBox="0 0 1526 880" svg:d="M0 880c515-352 992-626 1526-880">
            <text:p/>
          </draw:path>
          <draw:path draw:style-name="gr644" draw:text-style-name="P5" draw:layer="layout" svg:width="2.382cm" svg:height="1.563cm" svg:x="-97.798cm" svg:y="12.975cm" svg:viewBox="0 0 2383 1564" svg:d="M0 1564c667-782 1430-1212 2383-1564">
            <text:p/>
          </draw:path>
          <draw:path draw:style-name="gr644" draw:text-style-name="P5" draw:layer="layout" svg:width="1.43cm" svg:height="0.88cm" svg:x="-95.415cm" svg:y="12.094cm" svg:viewBox="0 0 1431 881" svg:d="M0 881c496-294 954-548 1431-881">
            <text:p/>
          </draw:path>
          <draw:path draw:style-name="gr644" draw:text-style-name="P5" draw:layer="layout" svg:width="1.678cm" svg:height="0.624cm" svg:x="-95.415cm" svg:y="12.975cm" svg:viewBox="0 0 1679 625" svg:d="M0 0c573 234 1106 430 1679 625">
            <text:p/>
          </draw:path>
          <draw:path draw:style-name="gr644" draw:text-style-name="P5" draw:layer="layout" svg:width="1.562cm" svg:height="2.542cm" svg:x="-97.893cm" svg:y="15.907cm" svg:viewBox="0 0 1563 2543" svg:d="M0 0c572 744 1048 1526 1563 2543">
            <text:p/>
          </draw:path>
          <draw:path draw:style-name="gr644" draw:text-style-name="P5" draw:layer="layout" svg:width="1.01cm" svg:height="1.212cm" svg:x="-96.33cm" svg:y="18.45cm" svg:viewBox="0 0 1011 1213" svg:d="M0 0c343 430 629 782 1011 1213">
            <text:p/>
          </draw:path>
          <draw:path draw:style-name="gr644" draw:text-style-name="P5" draw:layer="layout" svg:width="1.372cm" svg:height="0.625cm" svg:x="-97.703cm" svg:y="18.45cm" svg:viewBox="0 0 1373 626" svg:d="M1373 0c-515 156-953 352-1373 626">
            <text:p/>
          </draw:path>
          <draw:path draw:style-name="gr645" draw:text-style-name="P198" draw:layer="layout" svg:width="3.037cm" svg:height="3.128cm" svg:x="-99.107cm" svg:y="13.751cm" svg:viewBox="0 0 3038 3129" svg:d="M450 298c953-645 2193-195 2517 880 343 1135-610 2152-1793 1917-1144-215-1582-1917-724-2797z">
            <text:p/>
          </draw:path>
          <draw:path draw:style-name="gr646" draw:text-style-name="P199" draw:layer="layout" svg:width="3.037cm" svg:height="3.128cm" svg:x="-99.107cm" svg:y="13.751cm" svg:viewBox="0 0 3038 3129" svg:d="M450 298c953-645 2193-195 2517 880 343 1135-610 2152-1793 1917-1144-215-1582-1917-724-2797z">
            <text:p/>
          </draw:path>
          <draw:path draw:style-name="gr647" draw:text-style-name="P200"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8" draw:text-style-name="P201"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9" draw:text-style-name="P202" draw:layer="layout" svg:width="0.304cm" svg:height="0.312cm" svg:x="-97.607cm" svg:y="14.93cm" svg:viewBox="0 0 305 313" svg:d="M305 157c0 27-8 54-21 78-14 24-33 43-56 57-24 13-49 21-76 21s-53-8-76-21c-23-14-43-33-56-57s-20-51-20-78c0-28 7-55 20-78 13-24 33-45 56-58 23-14 49-21 76-21s52 7 76 21c23 13 43 34 56 58 14 23 21 50 21 78z">
            <text:p/>
          </draw:path>
          <draw:path draw:style-name="gr644" draw:text-style-name="P5" draw:layer="layout" svg:width="2.535cm" svg:height="0.016cm" svg:x="-96.139cm" svg:y="15.108cm" svg:viewBox="0 0 2536 17" svg:d="M0 17c915-39 1678 0 2536 0">
            <text:p/>
          </draw:path>
          <draw:line draw:style-name="gr644" draw:text-style-name="P5" draw:layer="layout" svg:x1="-92.841cm" svg:y1="15.126cm" svg:x2="-91.792cm" svg:y2="15.126cm">
            <text:p/>
          </draw:line>
          <draw:line draw:style-name="gr644" draw:text-style-name="P5" draw:layer="layout" svg:x1="-91.03cm" svg:y1="15.126cm" svg:x2="-89.981cm" svg:y2="15.126cm">
            <text:p/>
          </draw:line>
          <draw:line draw:style-name="gr644" draw:text-style-name="P5" draw:layer="layout" svg:x1="-89.218cm" svg:y1="15.126cm" svg:x2="-88.169cm" svg:y2="15.126cm">
            <text:p/>
          </draw:line>
          <draw:path draw:style-name="gr650" draw:text-style-name="P203" draw:layer="layout" svg:width="1.315cm" svg:height="1.337cm" svg:x="-93.743cm" svg:y="14.514cm" svg:viewBox="0 0 1316 1338" svg:d="M139 220c286-293 667-293 953 0 325 352 287 782-57 1017-381 254-839 0-991-430-77-235-58-431 95-587z">
            <text:p/>
          </draw:path>
          <draw:path draw:style-name="gr651" draw:text-style-name="P204" draw:layer="layout" svg:width="1.315cm" svg:height="1.337cm" svg:x="-93.743cm" svg:y="14.514cm" svg:viewBox="0 0 1316 1338" svg:d="M139 220c286-293 667-294 953 0 325 352 287 782-57 1017-381 254-839 0-991-430-77-235-58-430 95-587z">
            <text:p/>
          </draw:path>
          <draw:path draw:style-name="gr652" draw:text-style-name="P203" draw:layer="layout" svg:width="1.314cm" svg:height="1.337cm" svg:x="-91.931cm" svg:y="14.514cm" svg:viewBox="0 0 1315 1338" svg:d="M139 220c286-293 667-293 953 0 324 352 286 782-57 1017-382 254-839 0-992-430-76-235-57-431 96-587z">
            <text:p/>
          </draw:path>
          <draw:path draw:style-name="gr651" draw:text-style-name="P204" draw:layer="layout" svg:width="1.314cm" svg:height="1.337cm" svg:x="-91.931cm" svg:y="14.514cm" svg:viewBox="0 0 1315 1338" svg:d="M139 220c287-293 667-294 953 0 324 352 286 782-57 1017-382 254-839 0-992-430-76-235-56-430 96-587z">
            <text:p/>
          </draw:path>
          <draw:path draw:style-name="gr652" draw:text-style-name="P203" draw:layer="layout" svg:width="1.314cm" svg:height="1.337cm" svg:x="-90.119cm" svg:y="14.514cm" svg:viewBox="0 0 1315 1338" svg:d="M138 220c286-293 668-293 954 0 324 352 286 782-58 1017-381 254-839 0-991-430-76-235-57-431 95-587z">
            <text:p/>
          </draw:path>
          <draw:path draw:style-name="gr651" draw:text-style-name="P204" draw:layer="layout" svg:width="1.314cm" svg:height="1.337cm" svg:x="-90.119cm" svg:y="14.514cm" svg:viewBox="0 0 1315 1338" svg:d="M138 220c286-293 668-294 954 0 324 352 286 782-58 1017-381 254-839 0-991-430-76-235-57-430 95-587z">
            <text:p/>
          </draw:path>
          <draw:path draw:style-name="gr644" draw:text-style-name="P5" draw:layer="layout" svg:width="1.81cm" svg:height="1.27cm" svg:x="-88.169cm" svg:y="13.855cm" svg:viewBox="0 0 1811 1271" svg:d="M0 1271c667-156 1239-587 1811-1271">
            <text:p/>
          </draw:path>
          <draw:line draw:style-name="gr644" draw:text-style-name="P5" draw:layer="layout" svg:x1="-88.169cm" svg:y1="15.126cm" svg:x2="-85.786cm" svg:y2="15.126cm">
            <text:p/>
          </draw:line>
          <draw:path draw:style-name="gr644" draw:text-style-name="P5" draw:layer="layout" svg:width="1.81cm" svg:height="1.368cm" svg:x="-88.169cm" svg:y="15.126cm" svg:viewBox="0 0 1811 1369" svg:d="M0 0c667 196 1239 626 1811 1369">
            <text:p/>
          </draw:path>
          <draw:path draw:style-name="gr644" draw:text-style-name="P5" draw:layer="layout" svg:width="1.391cm" svg:height="0.977cm" svg:x="-86.358cm" svg:y="12.877cm" svg:viewBox="0 0 1392 978" svg:d="M0 978c439-450 858-724 1392-978">
            <text:p/>
          </draw:path>
          <draw:path draw:style-name="gr644" draw:text-style-name="P5" draw:layer="layout" svg:width="1.334cm" svg:height="0.344cm" svg:x="-86.358cm" svg:y="13.522cm" svg:viewBox="0 0 1335 345" svg:d="M0 333c477 58 858-98 1335-333">
            <text:p/>
          </draw:path>
          <draw:path draw:style-name="gr644" draw:text-style-name="P5" draw:layer="layout" svg:width="1.143cm" svg:height="0.86cm" svg:x="-85.786cm" svg:y="14.265cm" svg:viewBox="0 0 1144 861" svg:d="M0 861c439-254 763-489 1144-861">
            <text:p/>
          </draw:path>
          <draw:line draw:style-name="gr644" draw:text-style-name="P5" draw:layer="layout" svg:x1="-85.786cm" svg:y1="15.126cm" svg:x2="-84.508cm" svg:y2="15.126cm">
            <text:p/>
          </draw:line>
          <draw:path draw:style-name="gr644" draw:text-style-name="P5" draw:layer="layout" svg:width="1.143cm" svg:height="0.977cm" svg:x="-85.786cm" svg:y="15.126cm" svg:viewBox="0 0 1144 978" svg:d="M0 0c439 293 763 587 1144 978">
            <text:p/>
          </draw:path>
          <draw:path draw:style-name="gr644" draw:text-style-name="P5" draw:layer="layout" svg:width="1.353cm" svg:height="1.075cm" svg:x="-86.358cm" svg:y="16.494cm" svg:viewBox="0 0 1354 1076" svg:d="M0 0c382 391 820 743 1354 1076">
            <text:p/>
          </draw:path>
          <draw:path draw:style-name="gr644" draw:text-style-name="P5" draw:layer="layout" svg:width="1.429cm" svg:height="0.316cm" svg:x="-86.358cm" svg:y="16.47cm" svg:viewBox="0 0 1430 317" svg:d="M0 24c477-78 954 39 1430 293">
            <text:p/>
          </draw:path>
          <draw:path draw:style-name="gr653" draw:text-style-name="P5" draw:layer="layout" svg:width="7.626cm" svg:height="0.439cm" svg:x="-95.128cm" svg:y="13.903cm" svg:viewBox="0 0 7627 440" svg:d="M0 440c2002-587 4862-587 7627 0">
            <text:p/>
          </draw:path>
          <draw:polygon draw:style-name="gr654" draw:text-style-name="P205" draw:layer="layout" svg:width="0.431cm" svg:height="0.401cm" svg:x="-87.895cm" svg:y="14.068cm" svg:viewBox="0 0 432 402" draw:points="81,0 432,284 0,402">
            <text:p/>
          </draw:polygon>
          <draw:frame draw:style-name="gr655" draw:text-style-name="P206" draw:layer="layout" svg:width="1.85cm" svg:height="0.484cm" svg:x="-102.384cm" svg:y="11.028cm">
            <draw:text-box>
              <text:p><text:span text:style-name="T68">Dendrites</text:span></text:p>
            </draw:text-box>
          </draw:frame>
          <draw:frame draw:style-name="gr656" draw:text-style-name="P206" draw:layer="layout" svg:width="3.194cm" svg:height="0.484cm" svg:x="-98.856cm" svg:y="17.286cm">
            <draw:text-box>
              <text:p><text:span text:style-name="T68">Soma / cell body</text:span></text:p>
            </draw:text-box>
          </draw:frame>
          <draw:frame draw:style-name="gr657" draw:text-style-name="P207" draw:layer="layout" svg:width="1.287cm" svg:height="0.389cm" svg:x="-98.57cm" svg:y="15.154cm">
            <draw:text-box>
              <text:p><text:span text:style-name="T69">Nucleus</text:span></text:p>
            </draw:text-box>
          </draw:frame>
          <draw:frame draw:style-name="gr658" draw:text-style-name="P206" draw:layer="layout" svg:width="2.306cm" svg:height="0.484cm" svg:x="-96.091cm" svg:y="14.451cm">
            <draw:text-box>
              <text:p><text:span text:style-name="T68">Axon hillock</text:span></text:p>
            </draw:text-box>
          </draw:frame>
          <draw:frame draw:style-name="gr659" draw:text-style-name="P206" draw:layer="layout" svg:width="2.666cm" svg:height="0.484cm" svg:x="-92.183cm" svg:y="13.962cm">
            <draw:text-box>
              <text:p><text:span text:style-name="T68">Myelin sheath</text:span></text:p>
            </draw:text-box>
          </draw:frame>
          <draw:frame draw:style-name="gr660" draw:text-style-name="P208" draw:layer="layout" svg:width="2.477cm" svg:height="0.389cm" svg:x="-91.459cm" svg:y="16.171cm">
            <draw:text-box>
              <text:p><text:span text:style-name="T70">Node of Ranvier</text:span></text:p>
            </draw:text-box>
          </draw:frame>
          <draw:frame draw:style-name="gr661" draw:text-style-name="P206" draw:layer="layout" svg:width="2.858cm" svg:height="0.484cm" svg:x="-87.893cm" svg:y="12.397cm">
            <draw:text-box>
              <text:p><text:span text:style-name="T68">Axon terminals</text:span></text:p>
            </draw:text-box>
          </draw:frame>
          <draw:frame draw:style-name="gr662" draw:text-style-name="P208" draw:layer="layout" svg:width="4.155cm" svg:height="0.389cm" svg:x="-92.851cm" svg:y="13.141cm">
            <draw:text-box>
              <text:p><text:span text:style-name="T70">Direction of action potential</text:span></text:p>
            </draw:text-box>
          </draw:frame>
          <draw:custom-shape draw:style-name="gr663" draw:text-style-name="P209" draw:layer="layout" svg:width="3.952cm" svg:height="3.294cm" svg:x="-110.764cm" svg:y="13.456cm">
            <text:p text:style-name="P127"><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64" draw:text-style-name="P134" draw:layer="layout" svg:width="2.106cm" svg:height="1.771cm" svg:x="-106.4cm" svg:y="14.177cm">
            <text:p text:style-name="P19"><text:span text:style-name="T4">environme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35" draw:text-style-name="P41" draw:layer="layout" svg:width="5.171cm" svg:height="3.42cm" svg:x="-80.433cm" svg:y="12.392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665" draw:text-style-name="P38" draw:layer="layout" svg:width="3.655cm" svg:height="1.199cm" svg:x="-79.675cm" svg:y="15.998cm">
            <draw:text-box>
              <text:p>Action potential<text:line-break/>(A voltage pulse)</text:p>
            </draw:text-box>
          </draw:frame>
          <draw:custom-shape draw:style-name="gr664" draw:text-style-name="P134" draw:layer="layout" svg:width="2.106cm" svg:height="1.771cm" svg:x="-83.261cm" svg:y="14.1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rect draw:style-name="gr41" draw:text-style-name="P5" xml:id="id507" draw:id="id507" draw:layer="layout" svg:width="2.863cm" svg:height="1.515cm" svg:x="-88.035cm" svg:y="106.604cm">
          <text:p text:style-name="P3">Sensor<text:line-break/>reading<text:line-break/>robot1</text:p>
        </draw:rect>
        <draw:connector draw:style-name="gr293" draw:text-style-name="P15" draw:layer="layout" draw:type="curve" svg:x1="-85.172cm" svg:y1="107.361cm" svg:x2="-84.079cm" svg:y2="107.361cm" draw:start-shape="id507" draw:start-glue-point="1" draw:end-shape="id508" draw:end-glue-point="3" svg:d="M-85172 107361h1093" svg:viewBox="0 0 1094 1">
          <text:p/>
        </draw:connector>
        <draw:rect draw:style-name="gr41" draw:text-style-name="P5" xml:id="id508" draw:id="id508" draw:layer="layout" svg:width="2.863cm" svg:height="1.515cm" svg:x="-84.079cm" svg:y="106.604cm">
          <text:p text:style-name="P3">Interpolation<text:line-break/>(frequency <text:line-break/>matching)</text:p>
        </draw:rect>
        <draw:connector draw:style-name="gr293" draw:text-style-name="P15" draw:layer="layout" draw:type="curve" svg:x1="-81.216cm" svg:y1="107.361cm" svg:x2="-79.594cm" svg:y2="107.361cm" draw:start-shape="id508" draw:start-glue-point="1" draw:end-shape="id509" draw:end-glue-point="3" svg:d="M-81216 107361h1622" svg:viewBox="0 0 1623 1">
          <text:p/>
        </draw:connector>
        <draw:rect draw:style-name="gr41" draw:text-style-name="P5" xml:id="id510" draw:id="id510" draw:layer="layout" svg:width="5.081cm" svg:height="3.199cm" svg:x="-70.426cm" svg:y="105.783cm">
          <text:p text:style-name="P3">Combine <text:line-break/>with other<text:line-break/>sensors<text:line-break/>(Simple <text:line-break/>appending vector <text:line-break/>components)</text:p>
        </draw:rect>
        <draw:rect draw:style-name="gr41" draw:text-style-name="P5" xml:id="id511" draw:id="id511" draw:layer="layout" svg:width="2.863cm" svg:height="1.515cm" svg:x="-63.711cm" svg:y="106.604cm">
          <text:p text:style-name="P3">Conversion<text:line-break/>to action <text:line-break/>potential wave</text:p>
        </draw:rect>
        <draw:connector draw:style-name="gr293" draw:text-style-name="P15" draw:layer="layout" draw:type="curve" svg:x1="-65.345cm" svg:y1="107.382cm" svg:x2="-63.711cm" svg:y2="107.361cm" draw:start-shape="id510" draw:start-glue-point="1" draw:end-shape="id511" draw:end-glue-point="3" svg:d="M-65345 107382c1227 0 410-21 1634-21" svg:viewBox="0 0 1635 22">
          <text:p/>
        </draw:connector>
        <draw:rect draw:style-name="gr41" draw:text-style-name="P5" draw:layer="layout" svg:width="2.863cm" svg:height="1.515cm" svg:x="-84.078cm" svg:y="106.604cm">
          <text:p text:style-name="P3">Interpolation<text:line-break/>(frequency <text:line-break/>matching)</text:p>
        </draw:rect>
        <draw:rect draw:style-name="gr41" draw:text-style-name="P5" xml:id="id509" draw:id="id509" draw:layer="layout" svg:width="3.93cm" svg:height="3.608cm" svg:x="-79.594cm" svg:y="105.557cm">
          <text:p text:style-name="P3">Buffering until all<text:line-break/>sensors have<text:line-break/>the same length <text:line-break/>as the one used<text:line-break/>for transformer<text:line-break/>sliding window <text:line-break/>training</text:p>
        </draw:rect>
        <draw:rect draw:style-name="gr41" draw:text-style-name="P5" xml:id="id512" draw:id="id512" draw:layer="layout" svg:width="2.574cm" svg:height="1.924cm" svg:x="-74.699cm" svg:y="106.399cm">
          <text:p text:style-name="P3">Averaging<text:line-break/>the sensor <text:line-break/>values</text:p>
        </draw:rect>
        <draw:connector draw:style-name="gr293" draw:text-style-name="P15" draw:layer="layout" draw:type="curve" svg:x1="-75.664cm" svg:y1="107.361cm" svg:x2="-74.699cm" svg:y2="107.361cm" draw:start-shape="id509" draw:start-glue-point="1" draw:end-shape="id512" draw:end-glue-point="3" svg:d="M-75664 107361h965" svg:viewBox="0 0 966 1">
          <text:p/>
        </draw:connector>
        <draw:connector draw:style-name="gr293" draw:text-style-name="P15" draw:layer="layout" draw:type="curve" svg:x1="-72.125cm" svg:y1="107.361cm" svg:x2="-70.426cm" svg:y2="107.382cm" draw:start-shape="id512" draw:start-glue-point="1" draw:end-shape="id510" svg:d="M-72125 107361c1275 0 426 21 1699 21" svg:viewBox="0 0 1700 22">
          <text:p/>
        </draw:connector>
        <draw:custom-shape draw:style-name="gr666" draw:text-style-name="P210" xml:id="id513" draw:id="id513" draw:layer="layout" svg:width="3.921cm" svg:height="2.237cm" svg:x="-94.048cm" svg:y="106.211cm">
          <text:p text:style-name="P5">Online<text:line-break/>testing<text:line-break/>(language<text:line-break/>exist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07.33cm" svg:x2="-88.035cm" svg:y2="107.361cm" draw:start-shape="id513" draw:start-glue-point="10" draw:end-shape="id507" draw:end-glue-point="3" svg:d="M-90127 107330c1570 0 525 31 2092 31" svg:viewBox="0 0 2093 32">
          <text:p/>
        </draw:connector>
        <draw:rect draw:style-name="gr254" draw:text-style-name="P33" xml:id="id517" draw:id="id517" draw:layer="layout" svg:width="2.978cm" svg:height="1cm" svg:x="89.465cm" svg:y="3.976cm">
          <text:p text:style-name="P5">Mind</text:p>
        </draw:rect>
        <draw:rect draw:style-name="gr255" draw:text-style-name="P67" xml:id="id518" draw:id="id518" draw:layer="layout" svg:width="2.4cm" svg:height="1cm" svg:x="87.559cm" svg:y="11.435cm">
          <text:p text:style-name="P8"><text:span text:style-name="T29">a</text:span><text:span text:style-name="T29">w</text:span><text:span text:style-name="T29">ar</text:span><text:span text:style-name="T29">e</text:span><text:span text:style-name="T29">n</text:span><text:span text:style-name="T29">es</text:span><text:span text:style-name="T29">s</text:span></text:p>
        </draw:rect>
        <draw:rect draw:style-name="gr255" draw:text-style-name="P77" xml:id="id515" draw:id="id515" draw:layer="layout" svg:width="2.962cm" svg:height="1cm" svg:x="87.278cm" svg:y="9.015cm">
          <text:p text:style-name="P76"><text:span text:style-name="T29">Consciousness</text:span></text:p>
        </draw:rect>
        <draw:connector draw:style-name="gr313" draw:text-style-name="P15" draw:layer="layout" draw:type="curve" svg:x1="90.988cm" svg:y1="7.261cm" svg:x2="88.759cm" svg:y2="9.015cm" draw:start-shape="id514" draw:start-glue-point="2" draw:end-shape="id515" draw:end-glue-point="0" svg:d="M90988 7261c0 439-557 877-1115 877-557 0-1114 439-1114 877" svg:viewBox="0 0 2230 1755">
          <text:p/>
        </draw:connector>
        <draw:rect draw:style-name="gr255" draw:text-style-name="P77" xml:id="id516" draw:id="id516" draw:layer="layout" svg:width="3.448cm" svg:height="1cm" svg:x="91.714cm" svg:y="8.981cm">
          <text:p text:style-name="P76"><text:span text:style-name="T29">uncon</text:span><text:span text:style-name="T29">scious</text:span><text:span text:style-name="T29">ness</text:span></text:p>
        </draw:rect>
        <draw:connector draw:style-name="gr314" draw:text-style-name="P15" draw:layer="layout" draw:type="curve" svg:x1="90.988cm" svg:y1="7.261cm" svg:x2="93.438cm" svg:y2="8.981cm" draw:start-shape="id514" draw:start-glue-point="2" draw:end-shape="id516" draw:end-glue-point="0" svg:d="M90988 7261c0 1290 2450 430 2450 1720" svg:viewBox="0 0 2451 1721">
          <text:p/>
        </draw:connector>
        <draw:rect draw:style-name="gr255" draw:text-style-name="P67" xml:id="id514" draw:id="id514" draw:layer="layout" svg:width="2.4cm" svg:height="1cm" svg:x="89.788cm" svg:y="6.261cm">
          <text:p text:style-name="P8"><text:span text:style-name="T29">Psyche</text:span></text:p>
        </draw:rect>
        <draw:connector draw:style-name="gr318" draw:text-style-name="P15" draw:layer="layout" draw:type="curve" svg:x1="90.954cm" svg:y1="4.976cm" svg:x2="90.988cm" svg:y2="6.261cm" draw:start-shape="id517" draw:start-glue-point="2" draw:end-shape="id514" draw:end-glue-point="0" svg:d="M90954 4976c0 322 9 643 17 643 9 0 17 321 17 642" svg:viewBox="0 0 35 1286">
          <text:p/>
        </draw:connector>
        <draw:connector draw:style-name="gr406" draw:text-style-name="P15" draw:layer="layout" draw:type="curve" svg:x1="88.759cm" svg:y1="10.015cm" svg:x2="88.759cm" svg:y2="11.435cm" draw:start-shape="id515" draw:start-glue-point="2" draw:end-shape="id518" svg:d="M88759 10015v1420" svg:viewBox="0 0 1 1421">
          <text:p/>
        </draw:connector>
        <draw:connector draw:style-name="gr46" draw:text-style-name="P15" draw:layer="layout" draw:type="curve" svg:x1="88.759cm" svg:y1="11.435cm" svg:x2="85.044cm" svg:y2="10.093cm" draw:start-shape="id518" draw:start-glue-point="0" draw:end-shape="id519" draw:end-glue-point="6" svg:d="M88759 11435c0-1006-3715-336-3715-1342" svg:viewBox="0 0 3716 1343">
          <text:p/>
        </draw:connector>
        <draw:custom-shape draw:style-name="gr667" draw:text-style-name="P68" xml:id="id519" draw:id="id519" draw:layer="layout" svg:width="2.475cm" svg:height="1.679cm" svg:x="83.806cm" svg:y="8.414cm">
          <text:p text:style-name="P17"><text:span text:style-name="T4">self-awarenes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520" draw:id="id520" draw:layer="layout" svg:width="2.4cm" svg:height="1cm" svg:x="105.81cm" svg:y="3.693cm">
          <text:p text:style-name="P8"><text:span text:style-name="T29">cognitive</text:span><text:span text:style-name="T29"><text:line-break/></text:span><text:span text:style-name="T29">processes</text:span></text:p>
        </draw:rect>
        <draw:rect draw:style-name="gr41" draw:text-style-name="P5" xml:id="id521" draw:id="id521" draw:layer="layout" svg:width="2.79cm" svg:height="0.955cm" svg:x="104.228cm" svg:y="7.294cm">
          <text:p text:style-name="P5">thinking</text:p>
        </draw:rect>
        <draw:connector draw:style-name="gr259" draw:text-style-name="P15" draw:layer="layout" draw:type="curve" svg:x1="107.01cm" svg:y1="4.693cm" svg:x2="105.623cm" svg:y2="7.294cm" draw:start-shape="id520" draw:start-glue-point="2" draw:end-shape="id521" draw:end-glue-point="0" svg:d="M107010 4693c0 1951-1387 651-1387 2601" svg:viewBox="0 0 1388 2602">
          <text:p/>
        </draw:connector>
        <draw:rect draw:style-name="gr41" draw:text-style-name="P5" xml:id="id524" draw:id="id524" draw:layer="layout" svg:width="2.79cm" svg:height="0.955cm" svg:x="100.455cm" svg:y="7.228cm">
          <text:p text:style-name="P5">learning</text:p>
        </draw:rect>
        <draw:rect draw:style-name="gr41" draw:text-style-name="P5" xml:id="id522" draw:id="id522" draw:layer="layout" svg:width="2.79cm" svg:height="0.955cm" svg:x="108.002cm" svg:y="7.294cm">
          <text:p text:style-name="P5">perception</text:p>
        </draw:rect>
        <draw:rect draw:style-name="gr41" draw:text-style-name="P5" xml:id="id523" draw:id="id523" draw:layer="layout" svg:width="2.79cm" svg:height="0.955cm" svg:x="111.775cm" svg:y="7.294cm">
          <text:p text:style-name="P5">attention</text:p>
        </draw:rect>
        <draw:connector draw:style-name="gr260" draw:text-style-name="P15" draw:layer="layout" draw:type="curve" svg:x1="107.01cm" svg:y1="4.693cm" svg:x2="109.397cm" svg:y2="7.294cm" draw:start-shape="id520" draw:start-glue-point="2" draw:end-shape="id522" draw:end-glue-point="0" svg:d="M107010 4693c0 1951 2387 651 2387 2601" svg:viewBox="0 0 2388 2602">
          <text:p/>
        </draw:connector>
        <draw:connector draw:style-name="gr262" draw:text-style-name="P15" draw:layer="layout" draw:type="curve" svg:x1="107.01cm" svg:y1="4.693cm" svg:x2="113.17cm" svg:y2="7.294cm" draw:start-shape="id520" draw:start-glue-point="2" draw:end-shape="id523" svg:d="M107010 4693c0 1951 6160 651 6160 2601" svg:viewBox="0 0 6161 2602">
          <text:p/>
        </draw:connector>
        <draw:connector draw:style-name="gr265" draw:text-style-name="P15" draw:layer="layout" draw:type="curve" svg:x1="107.01cm" svg:y1="4.693cm" svg:x2="101.85cm" svg:y2="7.228cm" draw:start-shape="id520" draw:start-glue-point="2" draw:end-shape="id524" draw:end-glue-point="0" svg:d="M107010 4693c0 1902-5160 635-5160 2535" svg:viewBox="0 0 5161 2536">
          <text:p/>
        </draw:connector>
        <draw:rect draw:style-name="gr292" draw:text-style-name="P35" xml:id="id525" draw:id="id525" draw:layer="layout" svg:width="3.093cm" svg:height="1.601cm" svg:x="56.276cm" svg:y="56.448cm">
          <text:p text:style-name="P5">Holding<text:line-break/>sliding window<text:line-break/>sensory data</text:p>
        </draw:rect>
        <draw:connector draw:style-name="gr293" draw:text-style-name="P15" draw:layer="layout" draw:type="curve" svg:x1="60.954cm" svg:y1="54.528cm" svg:x2="57.822cm" svg:y2="56.448cm" draw:start-shape="id236" draw:start-glue-point="2" draw:end-shape="id525" svg:d="M60954 54528c0 1440-3132 480-3132 1920" svg:viewBox="0 0 3133 1921">
          <text:p/>
        </draw:connector>
        <draw:rect draw:style-name="gr41" draw:text-style-name="P5" xml:id="id526" draw:id="id526" draw:layer="layout" svg:width="2.731cm" svg:height="1.2cm" svg:x="128.149cm" svg:y="42.022cm">
          <text:p text:style-name="P5">Networks</text:p>
        </draw:rect>
        <draw:rect draw:style-name="gr41" draw:text-style-name="P5" xml:id="id527" draw:id="id527" draw:layer="layout" svg:width="2.731cm" svg:height="1.2cm" svg:x="128.157cm" svg:y="44.651cm">
          <text:p text:style-name="P5">Large scale</text:p>
        </draw:rect>
        <draw:connector draw:style-name="gr293" draw:text-style-name="P15" draw:layer="layout" draw:type="curve" svg:x1="130.698cm" svg:y1="40.4cm" svg:x2="129.514cm" svg:y2="42.022cm" draw:start-shape="id192" draw:start-glue-point="2" draw:end-shape="id526" draw:end-glue-point="0" svg:d="M130698 40400c0 1216-1184 406-1184 1622" svg:viewBox="0 0 1185 1623">
          <text:p/>
        </draw:connector>
        <draw:connector draw:style-name="gr293" draw:text-style-name="P15" draw:layer="layout" draw:type="curve" svg:x1="129.514cm" svg:y1="43.222cm" svg:x2="129.522cm" svg:y2="44.651cm" draw:start-shape="id526" draw:start-glue-point="2" draw:end-shape="id527" draw:end-glue-point="0" svg:d="M129514 43222c0 1072 8 358 8 1429" svg:viewBox="0 0 9 1430">
          <text:p/>
        </draw:connector>
        <draw:rect draw:style-name="gr41" draw:text-style-name="P5" xml:id="id528" draw:id="id528" draw:layer="layout" svg:width="2.731cm" svg:height="1.2cm" svg:x="124.066cm" svg:y="48.178cm">
          <text:p text:style-name="P5">Default mode<text:line-break/>network</text:p>
        </draw:rect>
        <draw:rect draw:style-name="gr41" draw:text-style-name="P5" xml:id="id529" draw:id="id529" draw:layer="layout" svg:width="3.399cm" svg:height="1.44cm" svg:x="127.983cm" svg:y="48.037cm">
          <text:p text:style-name="P5">Dorsal<text:line-break/>(when new<text:line-break/>observation)</text:p>
        </draw:rect>
        <draw:rect draw:style-name="gr276" draw:text-style-name="P5" xml:id="id530" draw:id="id530" draw:layer="layout" svg:width="3.223cm" svg:height="1.493cm" svg:x="132.286cm" svg:y="48.037cm">
          <text:p text:style-name="P30"><text:span text:style-name="T28">Ve</text:span><text:span text:style-name="T28">ntr</text:span><text:span text:style-name="T28">al </text:span><text:span text:style-name="T28"><text:line-break/></text:span><text:span text:style-name="T28">(w</text:span><text:span text:style-name="T28">he</text:span><text:span text:style-name="T28">n </text:span><text:span text:style-name="T28">foll</text:span><text:span text:style-name="T28">owi</text:span><text:span text:style-name="T28">ng</text:span><text:span text:style-name="T28"><text:line-break/></text:span><text:span text:style-name="T28">a </text:span><text:span text:style-name="T28">go</text:span><text:span text:style-name="T28">al)</text:span></text:p>
        </draw:rect>
        <draw:connector draw:style-name="gr293" draw:text-style-name="P15" draw:layer="layout" draw:type="curve" svg:x1="129.522cm" svg:y1="45.851cm" svg:x2="125.431cm" svg:y2="48.178cm" draw:start-shape="id527" draw:start-glue-point="2" draw:end-shape="id528" draw:end-glue-point="0" svg:d="M129522 45851c0 1746-4091 583-4091 2327" svg:viewBox="0 0 4092 2328">
          <text:p/>
        </draw:connector>
        <draw:connector draw:style-name="gr293" draw:text-style-name="P15" draw:layer="layout" draw:type="curve" svg:x1="129.522cm" svg:y1="45.851cm" svg:x2="129.682cm" svg:y2="48.037cm" draw:start-shape="id527" draw:start-glue-point="2" draw:end-shape="id529" draw:end-glue-point="0" svg:d="M129522 45851c0 1639 160 547 160 2186" svg:viewBox="0 0 161 2187">
          <text:p/>
        </draw:connector>
        <draw:connector draw:style-name="gr293" draw:text-style-name="P15" draw:layer="layout" draw:type="curve" svg:x1="129.522cm" svg:y1="45.851cm" svg:x2="133.897cm" svg:y2="48.037cm" draw:start-shape="id527" draw:start-glue-point="2" draw:end-shape="id530" draw:end-glue-point="0" svg:d="M129522 45851c0 1639 4375 547 4375 2186" svg:viewBox="0 0 4376 2187">
          <text:p/>
        </draw:connector>
        <draw:rect draw:style-name="gr41" draw:text-style-name="P5" xml:id="id531" draw:id="id531" draw:layer="layout" svg:width="2.731cm" svg:height="1.2cm" svg:x="124.103cm" svg:y="50.86cm">
          <text:p text:style-name="P5">Mind<text:line-break/>wandering</text:p>
        </draw:rect>
        <draw:connector draw:style-name="gr293" draw:text-style-name="P15" draw:layer="layout" draw:type="curve" svg:x1="125.431cm" svg:y1="49.378cm" svg:x2="125.468cm" svg:y2="50.86cm" draw:start-shape="id528" draw:start-glue-point="2" draw:end-shape="id531" draw:end-glue-point="0" svg:d="M125431 49378c0 1111 37 371 37 1482" svg:viewBox="0 0 38 1483">
          <text:p/>
        </draw:connector>
        <draw:rect draw:style-name="gr292" draw:text-style-name="P35" xml:id="id533" draw:id="id533" draw:layer="layout" svg:width="2.3cm" svg:height="1cm" svg:x="43.008cm" svg:y="61.741cm">
          <text:p text:style-name="P5">Goal<text:line-break/>types</text:p>
        </draw:rect>
        <draw:rect draw:style-name="gr292" draw:text-style-name="P35" xml:id="id532" draw:id="id532" draw:layer="layout" svg:width="2.3cm" svg:height="1cm" svg:x="40.243cm" svg:y="61.741cm">
          <text:p text:style-name="P5">Action<text:line-break/>types</text:p>
        </draw:rect>
        <draw:connector draw:style-name="gr293" draw:text-style-name="P15" draw:layer="layout" draw:type="curve" svg:x1="42.688cm" svg:y1="60.541cm" svg:x2="41.393cm" svg:y2="61.741cm" draw:start-shape="id338" draw:start-glue-point="2" draw:end-shape="id532" draw:end-glue-point="0" svg:d="M42688 60541c0 900-1295 300-1295 1200" svg:viewBox="0 0 1296 1201">
          <text:p/>
        </draw:connector>
        <draw:connector draw:style-name="gr293" draw:text-style-name="P15" draw:layer="layout" draw:type="curve" svg:x1="42.688cm" svg:y1="60.541cm" svg:x2="44.158cm" svg:y2="61.741cm" draw:start-shape="id338" draw:start-glue-point="2" draw:end-shape="id533" draw:end-glue-point="0" svg:d="M42688 60541c0 900 1470 300 1470 1200" svg:viewBox="0 0 1471 1201">
          <text:p/>
        </draw:connector>
        <draw:rect draw:style-name="gr292" draw:text-style-name="P35" xml:id="id534" draw:id="id534" draw:layer="layout" svg:width="2.3cm" svg:height="1cm" svg:x="31.239cm" svg:y="69.67cm">
          <text:p text:style-name="P5">next-to<text:line-break/>scenario</text:p>
        </draw:rect>
        <draw:connector draw:style-name="gr293" draw:text-style-name="P15" draw:layer="layout" draw:type="curve" svg:x1="30.784cm" svg:y1="67.468cm" svg:x2="32.389cm" svg:y2="69.67cm" draw:start-shape="id248" draw:start-glue-point="2" draw:end-shape="id534" draw:end-glue-point="0" svg:d="M30784 67468c0 1651 1605 551 1605 2202" svg:viewBox="0 0 1606 2203">
          <text:p/>
        </draw:connector>
        <draw:frame draw:style-name="gr135" draw:text-style-name="P41" draw:layer="layout" svg:width="17.692cm" svg:height="19.588cm" svg:x="-73.528cm" svg:y="78.655cm">
          <draw:image xlink:href="Pictures/10000000000002D80000032646F0B612.png" xlink:type="simple" xlink:show="embed" xlink:actuate="onLoad" draw:mime-type="image/png">
            <text:p/>
          </draw:image>
        </draw:frame>
        <draw:rect draw:style-name="gr41" draw:text-style-name="P5" xml:id="id535" draw:id="id535" draw:layer="layout" svg:width="2.863cm" svg:height="1.515cm" svg:x="-88.035cm" svg:y="110.604cm">
          <text:p text:style-name="P3">Switching<text:line-break/>to DMN</text:p>
        </draw:rect>
        <draw:connector draw:style-name="gr293" draw:text-style-name="P15" draw:layer="layout" draw:type="curve" svg:x1="-85.172cm" svg:y1="111.361cm" svg:x2="-84.079cm" svg:y2="111.361cm" draw:start-shape="id535" draw:start-glue-point="1" draw:end-shape="id536" draw:end-glue-point="3" svg:d="M-85172 111361h1093" svg:viewBox="0 0 1094 1">
          <text:p/>
        </draw:connector>
        <draw:rect draw:style-name="gr41" draw:text-style-name="P5" xml:id="id536" draw:id="id536" draw:layer="layout" svg:width="2.863cm" svg:height="1.515cm" svg:x="-84.079cm" svg:y="110.604cm">
          <text:p text:style-name="P3">Interpolation<text:line-break/>(frequency <text:line-break/>matching)</text:p>
        </draw:rect>
        <draw:connector draw:style-name="gr293" draw:text-style-name="P15" draw:layer="layout" draw:type="curve" svg:x1="-81.216cm" svg:y1="111.361cm" svg:x2="-79.594cm" svg:y2="111.361cm" draw:start-shape="id536" draw:start-glue-point="1" draw:end-shape="id537" draw:end-glue-point="3" svg:d="M-81216 111361h1622" svg:viewBox="0 0 1623 1">
          <text:p/>
        </draw:connector>
        <draw:rect draw:style-name="gr41" draw:text-style-name="P5" xml:id="id538" draw:id="id538" draw:layer="layout" svg:width="5.081cm" svg:height="3.199cm" svg:x="-70.426cm" svg:y="109.783cm">
          <text:p text:style-name="P3">Combine <text:line-break/>with other<text:line-break/>sensors<text:line-break/>(Simple <text:line-break/>appending vector <text:line-break/>components)</text:p>
        </draw:rect>
        <draw:rect draw:style-name="gr41" draw:text-style-name="P5" xml:id="id539" draw:id="id539" draw:layer="layout" svg:width="2.863cm" svg:height="1.515cm" svg:x="-63.711cm" svg:y="110.604cm">
          <text:p text:style-name="P3">Conversion<text:line-break/>to action <text:line-break/>potential wave</text:p>
        </draw:rect>
        <draw:connector draw:style-name="gr293" draw:text-style-name="P15" draw:layer="layout" draw:type="curve" svg:x1="-65.345cm" svg:y1="111.382cm" svg:x2="-63.711cm" svg:y2="111.361cm" draw:start-shape="id538" draw:start-glue-point="1" draw:end-shape="id539" draw:end-glue-point="3" svg:d="M-65345 111382c1227 0 410-21 1634-21" svg:viewBox="0 0 1635 22">
          <text:p/>
        </draw:connector>
        <draw:rect draw:style-name="gr41" draw:text-style-name="P5" draw:layer="layout" svg:width="2.863cm" svg:height="1.515cm" svg:x="-84.078cm" svg:y="110.604cm">
          <text:p text:style-name="P3">Interpolation<text:line-break/>(frequency <text:line-break/>matching)</text:p>
        </draw:rect>
        <draw:rect draw:style-name="gr41" draw:text-style-name="P5" xml:id="id537" draw:id="id537" draw:layer="layout" svg:width="3.93cm" svg:height="3.608cm" svg:x="-79.594cm" svg:y="109.557cm">
          <text:p text:style-name="P3">Buffering until all<text:line-break/>sensors have<text:line-break/>the same length <text:line-break/>as the one used<text:line-break/>for transformer<text:line-break/>sliding window <text:line-break/>training</text:p>
        </draw:rect>
        <draw:rect draw:style-name="gr41" draw:text-style-name="P5" xml:id="id540" draw:id="id540" draw:layer="layout" svg:width="2.574cm" svg:height="1.924cm" svg:x="-74.699cm" svg:y="110.399cm">
          <text:p text:style-name="P3">Averaging<text:line-break/>the sensor <text:line-break/>values</text:p>
        </draw:rect>
        <draw:connector draw:style-name="gr293" draw:text-style-name="P15" draw:layer="layout" draw:type="curve" svg:x1="-75.664cm" svg:y1="111.361cm" svg:x2="-74.699cm" svg:y2="111.361cm" draw:start-shape="id537" draw:start-glue-point="1" draw:end-shape="id540" draw:end-glue-point="3" svg:d="M-75664 111361h965" svg:viewBox="0 0 966 1">
          <text:p/>
        </draw:connector>
        <draw:connector draw:style-name="gr293" draw:text-style-name="P15" draw:layer="layout" draw:type="curve" svg:x1="-72.125cm" svg:y1="111.361cm" svg:x2="-70.426cm" svg:y2="111.382cm" draw:start-shape="id540" draw:start-glue-point="1" draw:end-shape="id538" svg:d="M-72125 111361c1275 0 426 21 1699 21" svg:viewBox="0 0 1700 22">
          <text:p/>
        </draw:connector>
        <draw:custom-shape draw:style-name="gr666" draw:text-style-name="P210" xml:id="id541" draw:id="id541" draw:layer="layout" svg:width="3.921cm" svg:height="2.237cm" svg:x="-94.048cm" svg:y="110.211cm">
          <text:p text:style-name="P5">Offline<text:line-break/>learning<text:line-break/>(Building <text:line-break/>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11.33cm" svg:x2="-88.035cm" svg:y2="111.361cm" draw:start-shape="id541" draw:start-glue-point="10" draw:end-shape="id535" draw:end-glue-point="3" svg:d="M-90127 111330c1570 0 525 31 2092 31" svg:viewBox="0 0 2093 32">
          <text:p/>
        </draw:connector>
        <draw:frame draw:style-name="gr494" draw:text-style-name="P138" draw:layer="layout" svg:width="3.743cm" svg:height="1.158cm" svg:x="-42.518cm" svg:y="66.54cm">
          <draw:text-box>
            <text:p text:style-name="P69"><text:span text:style-name="T12">Matrix-Profile-based </text:span><text:span text:style-name="T12"><text:line-break/></text:span><text:span text:style-name="T12">Motif Discovery</text:span></text:p>
          </draw:text-box>
        </draw:frame>
        <draw:g draw:style-name="gr31">
          <draw:path draw:style-name="gr2" draw:text-style-name="P2" draw:layer="layout" svg:width="31.019cm" svg:height="9.289cm" svg:x="-16.441cm" svg:y="-35.13cm" svg:viewBox="0 0 31020 9290"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504 210-2145-70-314-136-675-24-992-165-320-140-1042-399-1075-563-46-229-488-311-844-363-323-47-572 221-912 212-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 31-429 141-615 106-189 426-480 794-530 319-44 599-273 914-312 336-41 464-306 793-265 724 92 1188-112 1751-269 321-89 716 276 1018 165 277-102 580-136 882-173 93 0 188 0 282 0 95 36 190 72 285 110 17 16 35 31 51 47z">
            <text:p/>
          </draw:path>
          <draw:path draw:style-name="gr457" draw:text-style-name="P21" draw:layer="layout" svg:width="6.258cm" svg:height="6.499cm" svg:x="-14.783cm" svg:y="-33.876cm" svg:viewBox="0 0 6259 6500" svg:d="M2156 33c935-72 1644-49 2525 313 674 277 1104 604 1277 116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489-807 489-807 0 0 661-259 1371-313z">
            <text:p/>
          </draw:path>
          <draw:rect draw:style-name="gr41" draw:text-style-name="P19" xml:id="id548" draw:id="id548" draw:layer="layout" svg:width="2.758cm" svg:height="1.759cm" svg:x="-7.097cm" svg:y="-31.247cm">
            <text:p text:style-name="P3"><text:span text:style-name="T10">Short-term</text:span><text:span text:style-name="T10"><text:line-break/></text:span><text:span text:style-name="T10">memory buffering</text:span><text:span text:style-name="T10"><text:line-break/></text:span><text:span text:style-name="T10">(Sliding window</text:span><text:span text:style-name="T10"><text:line-break/></text:span><text:span text:style-name="T10">length matches </text:span><text:span text:style-name="T10"><text:line-break/></text:span><text:span text:style-name="T10">frequency alignment)</text:span></text:p>
          </draw:rect>
          <draw:custom-shape draw:style-name="gr668" draw:text-style-name="P123" xml:id="id543" draw:id="id543" draw:layer="layout" svg:width="0.323cm" svg:height="0.323cm" svg:x="-13.746cm" svg:y="-32.566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9" draw:text-style-name="P7" draw:layer="layout" draw:type="curve" svg:x1="-11.715cm" svg:y1="-32.394cm" svg:x2="-13.423cm" svg:y2="-32.404cm" draw:start-shape="id542" draw:start-glue-point="3" draw:end-shape="id543" draw:end-glue-point="10" svg:d="M-11715-32394c-1279 0-426-10-1708-10" svg:viewBox="0 0 1709 11">
            <text:p/>
          </draw:connector>
          <draw:custom-shape draw:style-name="gr460" draw:text-style-name="P125" xml:id="id545" draw:id="id545" draw:layer="layout" svg:width="0.323cm" svg:height="0.323cm" svg:x="-13.754cm" svg:y="-31.199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0" draw:text-style-name="P7" draw:layer="layout" draw:type="curve" svg:x1="-11.715cm" svg:y1="-31.037cm" svg:x2="-13.431cm" svg:y2="-31.037cm" draw:start-shape="id544" draw:start-glue-point="3" draw:end-shape="id545" draw:end-glue-point="10" svg:d="M-11715-31037h-1716" svg:viewBox="0 0 1717 1">
            <text:p/>
          </draw:connector>
          <draw:custom-shape draw:style-name="gr460" draw:text-style-name="P125" xml:id="id547" draw:id="id547" draw:layer="layout" svg:width="0.323cm" svg:height="0.323cm" svg:x="-13.685cm" svg:y="-28.504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14.083cm -27.962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16.799cm" svg:y="-30.964cm">
            <draw:text-box>
              <text:p text:style-name="P5">Sensors<text:line-break/>(receptors)</text:p>
            </draw:text-box>
          </draw:frame>
          <draw:connector draw:style-name="gr671" draw:text-style-name="P7" draw:layer="layout" draw:type="curve" svg:x1="-11.715cm" svg:y1="-28.322cm" svg:x2="-13.362cm" svg:y2="-28.342cm" draw:start-shape="id546" draw:start-glue-point="3" draw:end-shape="id547" draw:end-glue-point="10" svg:d="M-11715-28322c-1234 0-411-20-1647-20" svg:viewBox="0 0 1648 21">
            <text:p/>
          </draw:connector>
          <draw:custom-shape draw:style-name="gr672" draw:text-style-name="P209" draw:layer="layout" svg:width="2.381cm" svg:height="1.985cm" svg:x="-18.924cm" svg:y="-31.335cm">
            <text:p text:style-name="P127"><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553" draw:id="id553" draw:layer="layout" svg:width="2.574cm" svg:height="1.396cm" svg:x="2.907cm" svg:y="-31.148cm">
            <text:p text:style-name="P5"><text:span text:style-name="T4">trace</text:span><text:span text:style-name="T4"><text:line-break/></text:span><text:span text:style-name="T4">(the boundary of</text:span><text:span text:style-name="T4"><text:line-break/></text:span><text:span text:style-name="T4">consciousness)</text:span></text:p>
          </draw:rect>
          <draw:rect draw:style-name="gr41" draw:text-style-name="P19" xml:id="id542" draw:id="id542" draw:layer="layout" svg:width="1.265cm" svg:height="1.082cm" svg:x="-11.715cm" svg:y="-32.935cm">
            <text:p text:style-name="P5"><text:span text:style-name="T4">Action</text:span><text:span text:style-name="T4"><text:line-break/></text:span><text:span text:style-name="T4">potential</text:span><text:span text:style-name="T4"><text:line-break/></text:span><text:span text:style-name="T4">wave</text:span></text:p>
          </draw:rect>
          <draw:connector draw:style-name="gr468" draw:text-style-name="P7" draw:layer="layout" draw:type="curve" svg:x1="-7.097cm" svg:y1="-30.367cm" svg:x2="-10.45cm" svg:y2="-32.394cm" draw:start-shape="id548" draw:start-glue-point="3" draw:end-shape="id542" draw:end-glue-point="1" svg:d="M-7097-30367c-2514 0-838-2027-3353-2027" svg:viewBox="0 0 3354 2028">
            <text:p/>
          </draw:connector>
          <draw:rect draw:style-name="gr41" draw:text-style-name="P19" xml:id="id544" draw:id="id544" draw:layer="layout" svg:width="1.265cm" svg:height="1.082cm" svg:x="-11.715cm" svg:y="-31.578cm">
            <text:p text:style-name="P5"><text:span text:style-name="T4">Action</text:span><text:span text:style-name="T4"><text:line-break/></text:span><text:span text:style-name="T4">potential</text:span><text:span text:style-name="T4"><text:line-break/></text:span><text:span text:style-name="T4">wave</text:span></text:p>
          </draw:rect>
          <draw:rect draw:style-name="gr41" draw:text-style-name="P19" xml:id="id546" draw:id="id546" draw:layer="layout" svg:width="1.265cm" svg:height="1.082cm" svg:x="-11.715cm" svg:y="-28.863cm">
            <text:p text:style-name="P5"><text:span text:style-name="T4">Action</text:span><text:span text:style-name="T4"><text:line-break/></text:span><text:span text:style-name="T4">potential</text:span><text:span text:style-name="T4"><text:line-break/></text:span><text:span text:style-name="T4">wave</text:span></text:p>
          </draw:rect>
          <draw:connector draw:style-name="gr469" draw:text-style-name="P7" draw:layer="layout" draw:type="curve" svg:x1="-7.097cm" svg:y1="-30.367cm" svg:x2="-10.45cm" svg:y2="-31.037cm" draw:start-shape="id548" draw:start-glue-point="3" draw:end-shape="id544" draw:end-glue-point="1" svg:d="M-7097-30367c-2514 0-838-670-3353-670" svg:viewBox="0 0 3354 671">
            <text:p/>
          </draw:connector>
          <draw:connector draw:style-name="gr36" draw:text-style-name="P7" draw:layer="layout" draw:type="curve" svg:x1="-7.097cm" svg:y1="-30.367cm" svg:x2="-10.45cm" svg:y2="-28.322cm" draw:start-shape="id548" draw:start-glue-point="3" draw:end-shape="id546" draw:end-glue-point="1" svg:d="M-7097-30367c-2514 0-838 2045-3353 2045" svg:viewBox="0 0 3354 2046">
            <text:p/>
          </draw:connector>
          <draw:connector draw:style-name="gr473" draw:text-style-name="P15" draw:layer="layout" draw:type="line" svg:x1="2.08cm" svg:y1="-29.121cm" svg:x2="7.486cm" svg:y2="-29.167cm" svg:d="M2080-29121l5406-46" svg:viewBox="0 0 5407 47">
            <text:p/>
          </draw:connector>
          <draw:frame draw:style-name="gr474" draw:text-style-name="P129" draw:layer="layout" svg:width="3.263cm" svg:height="1.199cm" svg:x="1.999cm" svg:y="-29.128cm">
            <draw:text-box>
              <text:p><text:span text:style-name="T39">Semanti</text:span><text:span text:style-name="T39">c</text:span></text:p>
            </draw:text-box>
          </draw:frame>
          <draw:connector draw:style-name="gr36" draw:text-style-name="P7" draw:layer="layout" draw:type="curve" svg:x1="-3.296cm" svg:y1="-30.361cm" svg:x2="-4.339cm" svg:y2="-30.367cm" draw:start-shape="id549" draw:start-glue-point="3" draw:end-shape="id548" draw:end-glue-point="1" svg:d="M-3296-30361c-781 0-260-6-1043-6" svg:viewBox="0 0 1044 7">
            <text:p/>
          </draw:connector>
          <draw:g draw:style-name="gr23">
            <draw:path draw:style-name="gr475" draw:text-style-name="P130" draw:layer="layout" svg:width="2.434cm" svg:height="7.621cm" svg:x="-0.297cm" svg:y="-34.194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0.308cm -29.207cm)">
              <draw:text-box>
                <text:p text:style-name="P5"><text:span text:style-name="T40">Percepti</text:span><text:span text:style-name="T40">on</text:span><text:span text:style-name="T40"><text:line-break/></text:span><text:span text:style-name="T41">(clustering</text:span><text:span text:style-name="T41"><text:line-break/></text:span><text:span text:style-name="T41">hierarchy)</text:span></text:p>
              </draw:text-box>
            </draw:frame>
          </draw:g>
          <draw:rect draw:style-name="gr467" draw:text-style-name="P19" xml:id="id551" draw:id="id551" draw:layer="layout" svg:width="2.574cm" svg:height="1.396cm" svg:x="10.007cm" svg:y="-31.148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6.719cm" svg:y1="-29.121cm" svg:x2="-1.313cm" svg:y2="-29.167cm" svg:d="M-6719-29121l5406-46" svg:viewBox="0 0 5407 47">
            <text:p/>
          </draw:connector>
          <draw:frame draw:style-name="gr474" draw:text-style-name="P129" draw:layer="layout" svg:width="3.263cm" svg:height="1.199cm" svg:x="-5.52cm" svg:y="-29.081cm">
            <draw:text-box>
              <text:p><text:span text:style-name="T39">F</text:span><text:span text:style-name="T39">M</text:span><text:span text:style-name="T39">M </text:span><text:span text:style-name="T39">w</text:span><text:span text:style-name="T39">av</text:span><text:span text:style-name="T39">es</text:span></text:p>
            </draw:text-box>
          </draw:frame>
          <draw:rect draw:style-name="gr467" draw:text-style-name="P19" xml:id="id552" draw:id="id552" draw:layer="layout" svg:width="2.574cm" svg:height="1.396cm" svg:x="6.554cm" svg:y="-31.148cm">
            <text:p text:style-name="P5"><text:span text:style-name="T4">inte</text:span><text:span text:style-name="T4">rnal</text:span><text:span text:style-name="T4"><text:line-break/></text:span><text:span text:style-name="T4">lan</text:span><text:span text:style-name="T4">gua</text:span><text:span text:style-name="T4">ge</text:span><text:span text:style-name="T4"><text:line-break/></text:span><text:span text:style-name="T4">buil</text:span><text:span text:style-name="T4">din</text:span><text:span text:style-name="T4">g</text:span></text:p>
          </draw:rect>
          <draw:rect draw:style-name="gr496" draw:text-style-name="P139" xml:id="id550" draw:id="id550" draw:layer="layout" svg:width="5.693cm" svg:height="3.474cm" svg:x="13.422cm" svg:y="-24.074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en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6.268cm" svg:y1="-24.074cm" svg:x2="11.294cm" svg:y2="-29.752cm" draw:start-shape="id550" draw:start-glue-point="0" draw:end-shape="id551" draw:end-glue-point="2" svg:d="M16268-24074c0-4257-4974-1418-4974-5678" svg:viewBox="0 0 4975 5679">
            <text:p/>
          </draw:connector>
          <draw:connector draw:style-name="gr36" draw:text-style-name="P7" draw:layer="layout" draw:type="curve" svg:x1="6.554cm" svg:y1="-30.45cm" svg:x2="5.481cm" svg:y2="-30.45cm" draw:start-shape="id552" draw:start-glue-point="3" draw:end-shape="id553" draw:end-glue-point="1" svg:d="M6554-30450h-1073" svg:viewBox="0 0 1074 1">
            <text:p/>
          </draw:connector>
          <draw:connector draw:style-name="gr36" draw:text-style-name="P7" draw:layer="layout" draw:type="curve" svg:x1="10.007cm" svg:y1="-30.45cm" svg:x2="9.128cm" svg:y2="-30.45cm" draw:start-shape="id551" draw:start-glue-point="3" draw:end-shape="id552" draw:end-glue-point="1" svg:d="M10007-30450h-879" svg:viewBox="0 0 880 1">
            <text:p/>
          </draw:connector>
          <draw:path draw:style-name="gr673" draw:text-style-name="P140" draw:layer="layout" svg:width="23.609cm" svg:height="6.044cm" svg:x="-12.749cm" svg:y="-23.99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674" draw:text-style-name="P13" draw:layer="layout" svg:width="3.475cm" svg:height="0.878cm" svg:x="-6.147cm" svg:y="-34.116cm">
            <draw:text-box>
              <text:p text:style-name="P3"><text:span text:style-name="T7">Robot </text:span><text:span text:style-name="T7">1</text:span></text:p>
            </draw:text-box>
          </draw:frame>
          <draw:connector draw:style-name="gr499" draw:text-style-name="P7" draw:layer="layout" draw:type="curve" svg:x1="9.264cm" svg:y1="-21.687cm" svg:x2="13.422cm" svg:y2="-22.337cm" draw:start-shape="id554" draw:start-glue-point="1" draw:end-shape="id550" draw:end-glue-point="3" svg:d="M9264-21687c3118 0 1040-650 4158-650" svg:viewBox="0 0 4159 651">
            <text:p text:style-name="P5"><text:span text:style-name="T4">Robot 1</text:span><text:span text:style-name="T4"><text:line-break/></text:span><text:span text:style-name="T4">utters</text:span><text:span text:style-name="T4"><text:line-break/></text:span><text:span text:style-name="T4">and decoder</text:span></text:p>
          </draw:connector>
          <draw:frame draw:style-name="gr675" draw:text-style-name="P13" draw:layer="layout" svg:width="3.475cm" svg:height="0.878cm" svg:x="-0.289cm" svg:y="-23.441cm">
            <draw:text-box>
              <text:p text:style-name="P3"><text:span text:style-name="T7">Robot </text:span><text:span text:style-name="T7">2</text:span></text:p>
            </draw:text-box>
          </draw:frame>
          <draw:rect draw:style-name="gr467" draw:text-style-name="P19" xml:id="id554" draw:id="id554" draw:layer="layout" svg:width="2.349cm" svg:height="1.195cm" svg:x="6.915cm" svg:y="-22.285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67" draw:text-style-name="P19" xml:id="id563" draw:id="id563" draw:layer="layout" svg:width="2.063cm" svg:height="1.396cm" svg:x="7.012cm" svg:y="-20.233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560" draw:id="id560" draw:layer="layout" svg:width="4.16cm" svg:height="0.97cm" svg:x="-12.445cm" svg:y="-21.225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12.232cm" svg:y="-20.995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11.187cm" svg:y="-20.995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10.208cm" svg:y="-20.995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9.084cm" svg:y="-20.995cm">
              <text:p text:style-name="P19"><text:span text:style-name="T4">W</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11.677cm" svg:y1="-20.727cm" svg:x2="-11.227cm" svg:y2="-20.737cm">
              <text:p/>
            </draw:line>
            <draw:line draw:style-name="gr488" draw:text-style-name="P15" draw:layer="layout" svg:x1="-10.605cm" svg:y1="-20.713cm" svg:x2="-10.182cm" svg:y2="-20.724cm">
              <text:p/>
            </draw:line>
            <draw:line draw:style-name="gr488" draw:text-style-name="P15" draw:layer="layout" svg:x1="-9.559cm" svg:y1="-20.713cm" svg:x2="-9.044cm" svg:y2="-20.71cm">
              <text:p/>
            </draw:line>
          </draw:g>
          <draw:connector draw:style-name="gr36" draw:text-style-name="P7" draw:layer="layout" draw:type="curve" svg:x1="2.873cm" svg:y1="-20.756cm" svg:x2="4.434cm" svg:y2="-19.439cm" draw:start-shape="id555" draw:start-glue-point="10" draw:end-shape="id556" draw:end-glue-point="3" svg:d="M2873-20756c1173 0 393 1317 1561 1317" svg:viewBox="0 0 1562 1318">
            <text:p/>
          </draw:connector>
          <draw:connector draw:style-name="gr36" draw:text-style-name="P7" draw:layer="layout" draw:type="curve" svg:x1="2.873cm" svg:y1="-20.756cm" svg:x2="4.276cm" svg:y2="-22.039cm" draw:start-shape="id555" draw:start-glue-point="10" draw:end-shape="id557" draw:end-glue-point="3" svg:d="M2873-20756c1054 0 353-1283 1403-1283" svg:viewBox="0 0 1404 1284">
            <text:p/>
          </draw:connector>
          <draw:custom-shape draw:name="comment box 6" draw:style-name="gr676" draw:text-style-name="P20" xml:id="id558" draw:id="id558" draw:layer="layout" svg:width="2.572cm" svg:height="1.94cm" svg:x="-15.73cm" svg:y="-27.585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8" draw:text-style-name="P133" xml:id="id555" draw:id="id555" draw:layer="layout" svg:width="2.674cm" svg:height="0.97cm" svg:x="0.199cm" svg:y="-21.241cm">
            <text:p text:style-name="P25"><text:span text:style-name="T12">superposition on</text:span><text:span text:style-name="T12"><text:line-break/></text:span><text:span text:style-name="T12">AP waves su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7" draw:text-style-name="P133" xml:id="id561" draw:id="id561" draw:layer="layout" svg:width="2.674cm" svg:height="1.449cm" svg:x="-7.425cm" svg:y="-21.451cm">
            <text:p text:style-name="P25"><text:span text:style-name="T12">Social</text:span><text:span text:style-name="T12"><text:line-break/></text:span><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11.715cm" svg:y1="-28.322cm" svg:x2="-13.158cm" svg:y2="-26.615cm" draw:start-shape="id546" draw:start-glue-point="3" draw:end-shape="id558" draw:end-glue-point="7" svg:d="M-11715-28322c-1066 0-345 1707-1443 1707" svg:viewBox="0 0 1444 1708">
            <text:p/>
          </draw:connector>
          <draw:connector draw:style-name="gr36" draw:text-style-name="P7" draw:layer="layout" draw:type="curve" svg:x1="-1.648cm" svg:y1="-20.695cm" svg:x2="0.199cm" svg:y2="-20.756cm" draw:start-shape="id559" draw:start-glue-point="1" draw:end-shape="id555" draw:end-glue-point="6" svg:d="M-1648-20695c1386 0 463-61 1847-61" svg:viewBox="0 0 1848 62">
            <text:p/>
          </draw:connector>
          <draw:connector draw:style-name="gr36" draw:text-style-name="P7" draw:layer="layout" draw:type="curve" svg:x1="-8.285cm" svg:y1="-20.74cm" svg:x2="-7.425cm" svg:y2="-20.726cm" draw:start-shape="id560" draw:start-glue-point="10" draw:end-shape="id561" draw:end-glue-point="6" svg:d="M-8285-20740c646 0 217 14 860 14" svg:viewBox="0 0 861 15">
            <text:p/>
          </draw:connector>
          <draw:custom-shape draw:name="comment box 16" draw:style-name="gr678" draw:text-style-name="P20" xml:id="id562" draw:id="id562" draw:layer="layout" svg:width="3.629cm" svg:height="2.55cm" svg:x="11.059cm" svg:y="-19.248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6.268cm" svg:y1="-20.6cm" svg:x2="14.688cm" svg:y2="-17.973cm" draw:start-shape="id550" draw:end-shape="id562" draw:end-glue-point="7" svg:d="M16268-20600c0 1752-526 2627-1580 2627" svg:viewBox="0 0 1581 2628">
            <text:p/>
          </draw:connector>
          <draw:polygon draw:style-name="gr510" draw:text-style-name="P211" xml:id="id557" draw:id="id557" draw:layer="layout" svg:width="1.215cm" svg:height="1.383cm" svg:x="4.276cm" svg:y="-22.731cm" svg:viewBox="0 0 1216 1384" draw:points="1216,1384 0,971 0,325 1216,0">
            <text:p/>
          </draw:polygon>
          <draw:frame draw:style-name="gr628" draw:text-style-name="P194" draw:layer="layout" svg:width="1.669cm" svg:height="0.887cm" svg:x="4.048cm" svg:y="-22.494cm">
            <draw:text-box>
              <text:p text:style-name="P5"><text:span text:style-name="T49">Robot 1</text:span><text:span text:style-name="T49"><text:line-break/></text:span><text:span text:style-name="T49">encoder</text:span></text:p>
            </draw:text-box>
          </draw:frame>
          <draw:connector draw:style-name="gr36" draw:text-style-name="P7" draw:layer="layout" draw:type="curve" svg:x1="5.492cm" svg:y1="-22.039cm" svg:x2="6.915cm" svg:y2="-21.687cm" draw:start-shape="id557" draw:start-glue-point="1" draw:end-shape="id554" draw:end-glue-point="3" svg:d="M5492-22039c1048 0 337 352 1423 352" svg:viewBox="0 0 1424 353">
            <text:p/>
          </draw:connector>
          <draw:frame draw:style-name="gr630" draw:text-style-name="P170" draw:layer="layout" svg:width="2.065cm" svg:height="0.645cm" svg:x="-14.179cm" svg:y="-33.097cm">
            <draw:text-box>
              <text:p><text:span text:style-name="T55">Sensor 1</text:span></text:p>
            </draw:text-box>
          </draw:frame>
          <draw:frame draw:style-name="gr629" draw:text-style-name="P170" draw:layer="layout" svg:width="2.441cm" svg:height="1.039cm" svg:x="-14.179cm" svg:y="-31.796cm">
            <draw:text-box>
              <text:p><text:span text:style-name="T55">Sensor 2</text:span></text:p>
            </draw:text-box>
          </draw:frame>
          <draw:frame draw:style-name="gr679" draw:text-style-name="P170" draw:layer="layout" svg:width="1.977cm" svg:height="0.655cm" svg:x="-14.077cm" svg:y="-29.194cm">
            <draw:text-box>
              <text:p><text:span text:style-name="T55">Sensor</text:span><text:span text:style-name="T71">p</text:span></text:p>
            </draw:text-box>
          </draw:frame>
          <draw:frame draw:style-name="gr135" draw:text-style-name="P41" draw:layer="layout" svg:width="1.24cm" svg:height="0.736cm" svg:x="2.969cm" svg:y="-20.153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51cm" svg:y="-22.18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10" draw:text-style-name="P211" xml:id="id556" draw:id="id556" draw:layer="layout" svg:width="1.215cm" svg:height="1.383cm" svg:x="4.434cm" svg:y="-20.131cm" svg:viewBox="0 0 1216 1384" draw:points="1216,1384 0,971 0,325 1216,0">
            <text:p/>
          </draw:polygon>
          <draw:frame draw:style-name="gr628" draw:text-style-name="P194" draw:layer="layout" svg:width="1.669cm" svg:height="0.887cm" svg:x="4.207cm" svg:y="-19.882cm">
            <draw:text-box>
              <text:p text:style-name="P5"><text:span text:style-name="T49">Robot 2</text:span><text:span text:style-name="T49"><text:line-break/></text:span><text:span text:style-name="T49">encoder</text:span></text:p>
            </draw:text-box>
          </draw:frame>
          <draw:connector draw:style-name="gr36" draw:text-style-name="P7" draw:layer="layout" draw:type="curve" svg:x1="5.65cm" svg:y1="-19.439cm" svg:x2="7.012cm" svg:y2="-19.535cm" draw:start-shape="id556" draw:start-glue-point="1" draw:end-shape="id563" draw:end-glue-point="3" svg:d="M5650-19439c1003 0 323-96 1362-96" svg:viewBox="0 0 1363 97">
            <text:p/>
          </draw:connector>
          <draw:frame draw:style-name="gr521" draw:text-style-name="P5" xml:id="id564" draw:id="id564" draw:layer="layout" svg:width="5.375cm" svg:height="1.92cm" svg:x="-6.605cm" svg:y="-24.821cm">
            <draw:object xlink:href="./Object 10" xlink:type="simple" xlink:show="embed" xlink:actuate="onLoad">
              <loext:p/>
            </draw:object>
            <draw:image xlink:href="./ObjectReplacements/Object 10" xlink:type="simple" xlink:show="embed" xlink:actuate="onLoad"/>
          </draw:frame>
          <draw:connector draw:style-name="gr29" draw:text-style-name="P15" draw:layer="layout" draw:type="curve" svg:x1="1.536cm" svg:y1="-21.241cm" svg:x2="-1.23cm" svg:y2="-23.861cm" draw:start-shape="id555" draw:start-glue-point="4" draw:end-shape="id564" draw:end-glue-point="1" svg:d="M1536-21241c0-1747-922-2620-2766-2620" svg:viewBox="0 0 2767 2621">
            <text:p/>
          </draw:connector>
          <draw:frame draw:style-name="gr632" draw:text-style-name="P16" xml:id="id565" draw:id="id565" draw:layer="layout" svg:width="2.796cm" svg:height="0.911cm" svg:x="-11.792cm" svg:y="-24.671cm">
            <draw:text-box>
              <text:p text:style-name="P66"><text:span text:style-name="T64">derivative-free </text:span><text:span text:style-name="T64"><text:line-break/></text:span><text:span text:style-name="T64">global optimizer</text:span></text:p>
            </draw:text-box>
          </draw:frame>
          <draw:connector draw:style-name="gr633" draw:text-style-name="P7" draw:layer="layout" draw:type="curve" svg:x1="-6.605cm" svg:y1="-23.861cm" svg:x2="-8.996cm" svg:y2="-24.215cm" draw:start-shape="id564" draw:start-glue-point="3" draw:end-shape="id565" svg:d="M-6605-23861c-1792 0-597-354-2391-354" svg:viewBox="0 0 2392 355">
            <text:p text:style-name="P5"><text:span text:style-name="T4">using</text:span></text:p>
          </draw:connector>
          <draw:frame draw:style-name="gr521" draw:text-style-name="P5" xml:id="id566" draw:id="id566" draw:layer="layout" svg:width="4.615cm" svg:height="0.907cm" svg:x="-15.651cm" svg:y="-22.635cm">
            <draw:object xlink:href="./Object 11" xlink:type="simple" xlink:show="embed" xlink:actuate="onLoad">
              <loext:p/>
            </draw:object>
            <draw:image xlink:href="./ObjectReplacements/Object 11" xlink:type="simple" xlink:show="embed" xlink:actuate="onLoad"/>
          </draw:frame>
          <draw:connector draw:style-name="gr633" draw:text-style-name="P7" draw:layer="layout" draw:type="curve" svg:x1="-11.792cm" svg:y1="-24.215cm" svg:x2="-13.343cm" svg:y2="-22.635cm" draw:start-shape="id565" draw:start-glue-point="3" draw:end-shape="id566" draw:end-glue-point="0" svg:d="M-11792-24215c-1034 0-1551 526-1551 1580" svg:viewBox="0 0 1552 1581">
            <text:p text:style-name="P5"><text:span text:style-name="T4">co</text:span><text:span text:style-name="T4">nv</text:span><text:span text:style-name="T4">erti</text:span><text:span text:style-name="T4">ng</text:span></text:p>
          </draw:connector>
          <draw:connector draw:style-name="gr634" draw:text-style-name="P7" draw:layer="layout" draw:type="curve" svg:x1="-13.343cm" svg:y1="-21.728cm" svg:x2="-1.648cm" svg:y2="-20.695cm" draw:start-shape="id566" draw:start-glue-point="2" draw:end-shape="id559" draw:end-glue-point="1" svg:d="M-13343-21728c0 3133 6098 2611 9210 2086s3236-1053 2485-1053" svg:viewBox="0 0 12079 2484">
            <text:p text:style-name="P5"><text:span text:style-name="T4">co</text:span><text:span text:style-name="T4">nv</text:span><text:span text:style-name="T4">erti</text:span><text:span text:style-name="T4">ng</text:span></text:p>
          </draw:connector>
          <draw:rect draw:style-name="gr41" draw:text-style-name="P19" xml:id="id549" draw:id="id549" draw:layer="layout" svg:width="2.747cm" svg:height="1.768cm" svg:x="-3.296cm" svg:y="-31.245cm">
            <text:p text:style-name="P3"><text:span text:style-name="T4">Coupling sensor</text:span><text:span text:style-name="T4"><text:line-break/></text:span><text:span text:style-name="T4">FMM waves</text:span><text:span text:style-name="T4"><text:line-break/></text:span><text:span text:style-name="T4">(sensor fusion)</text:span></text:p>
          </draw:rect>
          <draw:g draw:style-name="gr31">
            <draw:custom-shape draw:style-name="gr525" draw:text-style-name="P159" draw:layer="layout" svg:width="0.178cm" svg:height="0.178cm" svg:x="-13.684cm" svg:y="-2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3.684cm" svg:y="-30.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3.684cm" svg:y="-3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comment box 17" draw:style-name="gr680" draw:text-style-name="P20" xml:id="id567" draw:id="id567" draw:layer="layout" svg:width="2.145cm" svg:height="1.68cm" svg:x="-8.946cm" svg:y="-23.359cm">
            <text:p text:style-name="P19"><text:span text:style-name="T4">The same as</text:span><text:span text:style-name="T4"><text:line-break/></text:span><text:span text:style-name="T4">internal </text:span></text:p>
            <text:p text:style-name="P19"><text:span text:style-name="T4">language </text:span><text:span text:style-name="T4"><text:line-break/></text:span><text:span text:style-name="T4">building</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6.088cm" svg:y1="-21.451cm" svg:x2="-6.801cm" svg:y2="-22.519cm" draw:end-shape="id567" draw:end-glue-point="7" svg:d="M-6088-21451c-142 0 214-1068-713-1068" svg:viewBox="0 0 714 1069">
            <text:p/>
          </draw:connector>
          <draw:frame draw:style-name="gr135" draw:text-style-name="P41" draw:layer="layout" svg:width="0.97cm" svg:height="0.576cm" svg:x="-1.257cm" svg:y="-21.408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connector draw:style-name="gr36" draw:text-style-name="P7" draw:layer="layout" draw:type="curve" svg:x1="-4.751cm" svg:y1="-20.726cm" svg:x2="-2.942cm" svg:y2="-20.695cm" draw:start-shape="id561" draw:start-glue-point="10" draw:end-shape="id559" draw:end-glue-point="3" svg:d="M-4751-20726c1359 0 455 31 1809 31" svg:viewBox="0 0 1810 32">
            <text:p/>
          </draw:connector>
          <draw:frame draw:style-name="gr681" draw:text-style-name="P212" draw:layer="layout" svg:width="1.342cm" svg:height="0.645cm" svg:x="-4.355cm" svg:y="-21.221cm">
            <draw:text-box>
              <text:p><text:span text:style-name="T72">tra</text:span><text:span text:style-name="T72">ce</text:span></text:p>
            </draw:text-box>
          </draw:frame>
          <draw:custom-shape draw:name="comment box 18" draw:style-name="gr680" draw:text-style-name="P20" xml:id="id568" draw:id="id568" draw:layer="layout" svg:width="2.145cm" svg:height="1.68cm" svg:x="-3.428cm" svg:y="-19.107cm">
            <text:p text:style-name="P19"><text:span text:style-name="T4">Trained</text:span><text:span text:style-name="T4"><text:line-break/></text:span><text:span text:style-name="T4">during social </text:span><text:span text:style-name="T4"><text:line-break/></text:span><text:span text:style-name="T4">language </text:span><text:span text:style-name="T4"><text:line-break/></text:span><text:span text:style-name="T4">building</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648cm" svg:y1="-20.695cm" svg:x2="-2.355cm" svg:y2="-19.107cm" draw:start-shape="id559" draw:start-glue-point="1" draw:end-shape="id568" draw:end-glue-point="4" svg:d="M-1648-20695c751 0 627 532 262 732s-969 69-969 856" svg:viewBox="0 0 1259 1589">
            <text:p/>
          </draw:connector>
          <draw:frame draw:style-name="gr135" draw:text-style-name="P41" draw:layer="layout" svg:width="1.239cm" svg:height="0.735cm" svg:x="-0.748cm" svg:y="-30.779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682" draw:text-style-name="P196" draw:layer="layout" svg:width="1.687cm" svg:height="0.595cm" svg:x="2.788cm" svg:y="-37.163cm">
            <draw:text-box>
              <text:p text:style-name="P213"><text:span text:style-name="T63">en</text:span><text:span text:style-name="T63">co</text:span><text:span text:style-name="T63">de</text:span><text:span text:style-name="T63">r</text:span></text:p>
            </draw:text-box>
          </draw:frame>
          <draw:frame draw:style-name="gr683" draw:text-style-name="P38" draw:layer="layout" svg:width="4.495cm" svg:height="0.725cm" svg:x="-11.862cm" svg:y="-36.145cm">
            <draw:text-box>
              <text:p>During offline training</text:p>
            </draw:text-box>
          </draw:frame>
          <draw:g draw:style-name="gr31" xml:id="id559" draw:id="id559">
            <draw:polygon draw:style-name="gr510" draw:text-style-name="P113" draw:layer="layout" svg:width="0.632cm" svg:height="1.107cm" draw:transform="rotate (-3.14159265358979) translate (-1.648cm -20.1396823529412cm)" svg:viewBox="0 0 633 1108" draw:points="0,0 633,316 629,807 0,1108">
              <text:p/>
            </draw:polygon>
            <draw:g draw:style-name="gr23">
              <draw:polygon draw:style-name="gr508" draw:text-style-name="P145" draw:layer="layout" svg:width="0.632cm" svg:height="1.107cm" svg:x="-2.942cm" svg:y="-21.251cm" svg:viewBox="0 0 633 1108" draw:points="0,0 633,316 629,807 0,1108">
                <text:p/>
              </draw:polygon>
            </draw:g>
          </draw:g>
          <draw:g draw:style-name="gr31">
            <draw:polygon draw:style-name="gr510" draw:text-style-name="P113" draw:layer="layout" svg:width="0.632cm" svg:height="1.107cm" draw:transform="rotate (-3.14159265358979) translate (3.011cm -29.9256823529412cm)" svg:viewBox="0 0 633 1108" draw:points="0,0 633,316 629,807 0,1108">
              <text:p/>
            </draw:polygon>
            <draw:g draw:style-name="gr23">
              <draw:polygon draw:style-name="gr508" draw:text-style-name="P145" draw:layer="layout" svg:width="0.632cm" svg:height="1.107cm" svg:x="1.717cm" svg:y="-31.037cm" svg:viewBox="0 0 633 1108" draw:points="0,0 633,316 629,807 0,1108">
                <text:p/>
              </draw:polygon>
            </draw:g>
          </draw:g>
          <draw:custom-shape draw:name="comment box 19" draw:style-name="gr684" draw:text-style-name="P20" xml:id="id569" draw:id="id569" draw:layer="layout" svg:width="1.753cm" svg:height="1.33cm" svg:x="-7.855cm" svg:y="-33.172cm">
            <text:p text:style-name="P19"><text:span text:style-name="T4">Sensor</text:span><text:span text:style-name="T4"><text:line-break/></text:span><text:span text:style-name="T4">frequency</text:span><text:span text:style-name="T4"><text:line-break/></text:span><text:span text:style-name="T4">alignme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5.718cm" svg:y1="-31.247cm" svg:x2="-6.978cm" svg:y2="-31.842cm" draw:start-shape="id548" draw:start-glue-point="0" draw:end-shape="id569" draw:end-glue-point="6" svg:d="M-5718-31247c0-430-1260-133-1260-595" svg:viewBox="0 0 1261 596">
            <text:p/>
          </draw:connector>
          <draw:custom-shape draw:name="comment box 20" draw:style-name="gr685" draw:text-style-name="P161" xml:id="id570" draw:id="id570" draw:layer="layout" svg:width="2.165cm" svg:height="1.776cm" svg:x="2.482cm" svg:y="-33.899cm">
            <text:p text:style-name="P160"><text:span text:style-name="T4">Such as GPS:</text:span><text:span text:style-name="T4"><text:line-break/></text:span><text:span text:style-name="T4">longitude: 2</text:span><text:span text:style-name="T4"><text:line-break/></text:span><text:span text:style-name="T4">latitude: 4.1</text:span><text:span text:style-name="T4"><text:line-break/></text:span><text:span text:style-name="T4">altitude:1.2</text:span><text:span text:style-name="T4"><text:line-break/></text:span><text:span text:style-name="T4"/></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194cm" svg:y1="-31.148cm" svg:x2="3.565cm" svg:y2="-32.123cm" draw:start-shape="id553" draw:start-glue-point="0" draw:end-shape="id570" draw:end-glue-point="6" svg:d="M4194-31148c0-733-629-246-629-975" svg:viewBox="0 0 630 976">
            <text:p/>
          </draw:connector>
          <draw:path draw:style-name="gr2" draw:text-style-name="P2" draw:layer="layout" svg:width="24.403cm" svg:height="9.289cm" svg:x="-16.811cm" svg:y="-49.259cm" svg:viewBox="0 0 24404 9290" svg:d="M6461 246c273 39 543-38 815-47 281-9 537-57 815-64 259-6 517-12 772-15 246-3 490-9 734 0 284 10 518-84 815-79 382 7 760 7 1140-31 291-29 585 13 875 31 273 15 541 58 796 158 214 85 476 50 692 173 213 122 455 214 733 251 357 48 666 215 1020 284 241 49 483 108 731 141 283 38 604-391 888-367 270 25 1044-13 1257 119 310 196 572 153 1045 212 402 50 606 0 992 66 245 44 635 13 913 384 318 20 25 575 343 563 258-11 502 39 755 46 273 9 533 82 792 142 297 70 562 243 693 457 109 177 314 325 308 535-9 194 25 387 18 582-10 331-175 648-204 976-19 225-322 303-551 362-240 63-366 239-479 471-111 232-105 495-206 724-77 171-663 1303-967 1420-373 146-733 142-1132 223-436 86-749 246-1194 334-428 83-783 434-1213 501-653 102-1429 358-2095 362-850 8-1912 228-2741 78-561-100-1184 210-1688-70-247-136-531-24-780-165-252-140-820-399-846-563-36-229-384-311-664-363-254-47-450 221-718 212-245-8-486 70-734 48-371-33-727 58-1099 63-578 6-1127 100-1730 16-326-46-559-180-835-285-349-130-611 55-908-131-256-163-646 320-845 123-231-228-885-242-1197-331-287-82-388-915-571-1083-194-177-365-460-582-619-294-215 1-475-272-723-153-138-94-698-145-878-57-209 242-780 364-928 136-169 246-55 307-245 67-216 168-423 265-631 85-186 199-367 244-566 41-192 24-429 110-615 84-189 336-480 625-530 251-44 471-273 719-312 265-41 365-306 624-265 570 92 935-112 1378-269 252-89 563 276 800 165 218-102 457-136 694-173 74 0 148 0 222 0 75 36 150 72 224 110 14 16 28 31 41 47z">
            <text:p/>
          </draw:path>
          <draw:path draw:style-name="gr457" draw:text-style-name="P21" draw:layer="layout" svg:width="6.258cm" svg:height="6.499cm" svg:x="-15.153cm" svg:y="-48.005cm" svg:viewBox="0 0 6259 6500" svg:d="M2156 33c935-72 1644-49 2525 313 674 277 1104 604 1277 116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489-807 489-807 0 0 661-259 1371-313z">
            <text:p/>
          </draw:path>
          <draw:rect draw:style-name="gr41" draw:text-style-name="P19" xml:id="id577" draw:id="id577" draw:layer="layout" svg:width="2.758cm" svg:height="1.759cm" svg:x="-7.467cm" svg:y="-45.376cm">
            <text:p text:style-name="P3"><text:span text:style-name="T10">Sh</text:span><text:span text:style-name="T10">ort-</text:span><text:span text:style-name="T10">ter</text:span><text:span text:style-name="T10">m</text:span><text:span text:style-name="T10"><text:line-break/></text:span><text:span text:style-name="T10">me</text:span><text:span text:style-name="T10">mo</text:span><text:span text:style-name="T10">ry </text:span><text:span text:style-name="T10">buf</text:span><text:span text:style-name="T10">feri</text:span><text:span text:style-name="T10">ng</text:span><text:span text:style-name="T10"><text:line-break/></text:span><text:span text:style-name="T10">(Sli</text:span><text:span text:style-name="T10">din</text:span><text:span text:style-name="T10">g </text:span><text:span text:style-name="T10">win</text:span><text:span text:style-name="T10">do</text:span><text:span text:style-name="T10">w</text:span><text:span text:style-name="T10"><text:line-break/></text:span><text:span text:style-name="T10">len</text:span><text:span text:style-name="T10">gth </text:span><text:span text:style-name="T10">ma</text:span><text:span text:style-name="T10">tch</text:span><text:span text:style-name="T10">es </text:span><text:span text:style-name="T10"><text:line-break/></text:span><text:span text:style-name="T10">fre</text:span><text:span text:style-name="T10">qu</text:span><text:span text:style-name="T10">en</text:span><text:span text:style-name="T10">cy </text:span><text:span text:style-name="T10">ali</text:span><text:span text:style-name="T10">gn</text:span><text:span text:style-name="T10">me</text:span><text:span text:style-name="T10">nt)</text:span></text:p>
          </draw:rect>
          <draw:custom-shape draw:style-name="gr686" draw:text-style-name="P123" xml:id="id572" draw:id="id572" draw:layer="layout" svg:width="0.323cm" svg:height="0.323cm" svg:x="-14.116cm" svg:y="-46.695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9" draw:text-style-name="P7" draw:layer="layout" draw:type="curve" svg:x1="-12.085cm" svg:y1="-46.523cm" svg:x2="-13.793cm" svg:y2="-46.533cm" draw:start-shape="id571" draw:start-glue-point="3" draw:end-shape="id572" draw:end-glue-point="10" svg:d="M-12085-46523c-1279 0-426-10-1708-10" svg:viewBox="0 0 1709 11">
            <text:p/>
          </draw:connector>
          <draw:custom-shape draw:style-name="gr460" draw:text-style-name="P125" xml:id="id574" draw:id="id574" draw:layer="layout" svg:width="0.323cm" svg:height="0.323cm" svg:x="-14.124cm" svg:y="-45.328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0" draw:text-style-name="P7" draw:layer="layout" draw:type="curve" svg:x1="-12.085cm" svg:y1="-45.166cm" svg:x2="-13.801cm" svg:y2="-45.166cm" draw:start-shape="id573" draw:start-glue-point="3" draw:end-shape="id574" draw:end-glue-point="10" svg:d="M-12085-45166h-1716" svg:viewBox="0 0 1717 1">
            <text:p/>
          </draw:connector>
          <draw:custom-shape draw:style-name="gr460" draw:text-style-name="P125" xml:id="id576" draw:id="id576" draw:layer="layout" svg:width="0.323cm" svg:height="0.323cm" svg:x="-14.055cm" svg:y="-42.633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14.453cm -42.091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17.169cm" svg:y="-45.093cm">
            <draw:text-box>
              <text:p text:style-name="P5">Sensors<text:line-break/>(receptors)</text:p>
            </draw:text-box>
          </draw:frame>
          <draw:connector draw:style-name="gr671" draw:text-style-name="P7" draw:layer="layout" draw:type="curve" svg:x1="-12.085cm" svg:y1="-42.451cm" svg:x2="-13.732cm" svg:y2="-42.471cm" draw:start-shape="id575" draw:start-glue-point="3" draw:end-shape="id576" draw:end-glue-point="10" svg:d="M-12085-42451c-1234 0-411-20-1647-20" svg:viewBox="0 0 1648 21">
            <text:p/>
          </draw:connector>
          <draw:custom-shape draw:style-name="gr687" draw:text-style-name="P209" draw:layer="layout" svg:width="2.381cm" svg:height="1.985cm" svg:x="-19.294cm" svg:y="-45.464cm">
            <text:p text:style-name="P127"><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581" draw:id="id581" draw:layer="layout" svg:width="2.574cm" svg:height="1.396cm" svg:x="2.537cm" svg:y="-45.277cm">
            <text:p text:style-name="P5"><text:span text:style-name="T4">trace</text:span><text:span text:style-name="T4"><text:line-break/></text:span><text:span text:style-name="T4">(the boundary </text:span><text:span text:style-name="T4">of</text:span><text:span text:style-name="T4"><text:line-break/></text:span><text:span text:style-name="T4">consciousnes</text:span><text:span text:style-name="T4">s)</text:span></text:p>
          </draw:rect>
          <draw:rect draw:style-name="gr41" draw:text-style-name="P19" xml:id="id571" draw:id="id571" draw:layer="layout" svg:width="1.265cm" svg:height="1.082cm" svg:x="-12.085cm" svg:y="-47.064cm">
            <text:p text:style-name="P5"><text:span text:style-name="T4">Action</text:span><text:span text:style-name="T4"><text:line-break/></text:span><text:span text:style-name="T4">potential</text:span><text:span text:style-name="T4"><text:line-break/></text:span><text:span text:style-name="T4">wave</text:span></text:p>
          </draw:rect>
          <draw:connector draw:style-name="gr468" draw:text-style-name="P7" draw:layer="layout" draw:type="curve" svg:x1="-7.467cm" svg:y1="-44.496cm" svg:x2="-10.82cm" svg:y2="-46.523cm" draw:start-shape="id577" draw:start-glue-point="3" draw:end-shape="id571" draw:end-glue-point="1" svg:d="M-7467-44496c-2514 0-838-2027-3353-2027" svg:viewBox="0 0 3354 2028">
            <text:p/>
          </draw:connector>
          <draw:rect draw:style-name="gr41" draw:text-style-name="P19" xml:id="id573" draw:id="id573" draw:layer="layout" svg:width="1.265cm" svg:height="1.082cm" svg:x="-12.085cm" svg:y="-45.707cm">
            <text:p text:style-name="P5"><text:span text:style-name="T4">Act</text:span><text:span text:style-name="T4">ion</text:span><text:span text:style-name="T4"><text:line-break/></text:span><text:span text:style-name="T4">pot</text:span><text:span text:style-name="T4">ent</text:span><text:span text:style-name="T4">ial</text:span><text:span text:style-name="T4"><text:line-break/></text:span><text:span text:style-name="T4">wa</text:span><text:span text:style-name="T4">ve</text:span></text:p>
          </draw:rect>
          <draw:rect draw:style-name="gr41" draw:text-style-name="P19" xml:id="id575" draw:id="id575" draw:layer="layout" svg:width="1.265cm" svg:height="1.082cm" svg:x="-12.085cm" svg:y="-42.992cm">
            <text:p text:style-name="P5"><text:span text:style-name="T4">Action</text:span><text:span text:style-name="T4"><text:line-break/></text:span><text:span text:style-name="T4">potential</text:span><text:span text:style-name="T4"><text:line-break/></text:span><text:span text:style-name="T4">wave</text:span></text:p>
          </draw:rect>
          <draw:connector draw:style-name="gr469" draw:text-style-name="P7" draw:layer="layout" draw:type="curve" svg:x1="-7.467cm" svg:y1="-44.496cm" svg:x2="-10.82cm" svg:y2="-45.166cm" draw:start-shape="id577" draw:start-glue-point="3" draw:end-shape="id573" draw:end-glue-point="1" svg:d="M-7467-44496c-2514 0-838-670-3353-670" svg:viewBox="0 0 3354 671">
            <text:p/>
          </draw:connector>
          <draw:connector draw:style-name="gr36" draw:text-style-name="P7" draw:layer="layout" draw:type="curve" svg:x1="-7.467cm" svg:y1="-44.496cm" svg:x2="-10.82cm" svg:y2="-42.451cm" draw:start-shape="id577" draw:start-glue-point="3" draw:end-shape="id575" draw:end-glue-point="1" svg:d="M-7467-44496c-2514 0-838 2045-3353 2045" svg:viewBox="0 0 3354 2046">
            <text:p/>
          </draw:connector>
          <draw:connector draw:style-name="gr473" draw:text-style-name="P15" draw:layer="layout" draw:type="line" svg:x1="2.333cm" svg:y1="-43.352cm" svg:x2="5.215cm" svg:y2="-43.359cm" svg:d="M2333-43352l2882-7" svg:viewBox="0 0 2883 8">
            <text:p/>
          </draw:connector>
          <draw:frame draw:style-name="gr474" draw:text-style-name="P129" draw:layer="layout" svg:width="3.263cm" svg:height="1.199cm" svg:x="2.038cm" svg:y="-43.317cm">
            <draw:text-box>
              <text:p><text:span text:style-name="T39">Semantic</text:span></text:p>
            </draw:text-box>
          </draw:frame>
          <draw:connector draw:style-name="gr36" draw:text-style-name="P7" draw:layer="layout" draw:type="curve" svg:x1="-3.666cm" svg:y1="-44.49cm" svg:x2="-4.709cm" svg:y2="-44.496cm" draw:start-shape="id578" draw:start-glue-point="3" draw:end-shape="id577" draw:end-glue-point="1" svg:d="M-3666-44490c-781 0-260-6-1043-6" svg:viewBox="0 0 1044 7">
            <text:p/>
          </draw:connector>
          <draw:g draw:style-name="gr23">
            <draw:path draw:style-name="gr475" draw:text-style-name="P130" draw:layer="layout" svg:width="2.434cm" svg:height="7.621cm" svg:x="-0.667cm" svg:y="-48.32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0.062cm -43.336cm)">
              <draw:text-box>
                <text:p text:style-name="P5"><text:span text:style-name="T40">Perceptio</text:span><text:span text:style-name="T40">n</text:span><text:span text:style-name="T40"><text:line-break/></text:span><text:span text:style-name="T41">(clustering</text:span><text:span text:style-name="T41"><text:line-break/></text:span><text:span text:style-name="T41">hierarchy)</text:span></text:p>
              </draw:text-box>
            </draw:frame>
          </draw:g>
          <draw:connector draw:style-name="gr477" draw:text-style-name="P15" draw:layer="layout" draw:type="line" svg:x1="-7.089cm" svg:y1="-43.25cm" svg:x2="-1.683cm" svg:y2="-43.296cm" svg:d="M-7089-43250l5406-46" svg:viewBox="0 0 5407 47">
            <text:p/>
          </draw:connector>
          <draw:frame draw:style-name="gr474" draw:text-style-name="P129" draw:layer="layout" svg:width="3.263cm" svg:height="1.199cm" svg:x="-5.97cm" svg:y="-43.157cm">
            <draw:text-box>
              <text:p><text:span text:style-name="T39">FMM </text:span><text:span text:style-name="T39">waves</text:span></text:p>
            </draw:text-box>
          </draw:frame>
          <draw:frame draw:style-name="gr688" draw:text-style-name="P13" draw:layer="layout" svg:width="3.475cm" svg:height="0.878cm" svg:x="-6.517cm" svg:y="-48.245cm">
            <draw:text-box>
              <text:p text:style-name="P3"><text:span text:style-name="T7">Robot 1</text:span></text:p>
            </draw:text-box>
          </draw:frame>
          <draw:custom-shape draw:name="comment box 21" draw:style-name="gr676" draw:text-style-name="P20" xml:id="id579" draw:id="id579" draw:layer="layout" svg:width="2.572cm" svg:height="1.94cm" svg:x="-16.1cm" svg:y="-41.714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2.085cm" svg:y1="-42.451cm" svg:x2="-13.528cm" svg:y2="-40.744cm" draw:start-shape="id575" draw:start-glue-point="3" draw:end-shape="id579" draw:end-glue-point="7" svg:d="M-12085-42451c-1066 0-345 1707-1443 1707" svg:viewBox="0 0 1444 1708">
            <text:p/>
          </draw:connector>
          <draw:frame draw:style-name="gr630" draw:text-style-name="P170" draw:layer="layout" svg:width="2.065cm" svg:height="0.645cm" svg:x="-14.549cm" svg:y="-47.226cm">
            <draw:text-box>
              <text:p><text:span text:style-name="T55">Sensor 1</text:span></text:p>
            </draw:text-box>
          </draw:frame>
          <draw:frame draw:style-name="gr629" draw:text-style-name="P170" draw:layer="layout" svg:width="2.441cm" svg:height="1.039cm" svg:x="-14.549cm" svg:y="-45.925cm">
            <draw:text-box>
              <text:p><text:span text:style-name="T55">Sensor 2</text:span></text:p>
            </draw:text-box>
          </draw:frame>
          <draw:frame draw:style-name="gr679" draw:text-style-name="P170" draw:layer="layout" svg:width="1.977cm" svg:height="0.655cm" svg:x="-14.447cm" svg:y="-43.323cm">
            <draw:text-box>
              <text:p><text:span text:style-name="T55">Sensor</text:span><text:span text:style-name="T71">p</text:span></text:p>
            </draw:text-box>
          </draw:frame>
          <draw:rect draw:style-name="gr41" draw:text-style-name="P19" xml:id="id578" draw:id="id578" draw:layer="layout" svg:width="2.747cm" svg:height="1.768cm" svg:x="-3.666cm" svg:y="-45.374cm">
            <text:p text:style-name="P3"><text:span text:style-name="T4">Coupling </text:span><text:span text:style-name="T4">sensor</text:span><text:span text:style-name="T4"><text:line-break/></text:span><text:span text:style-name="T4">FMM </text:span><text:span text:style-name="T4">waves</text:span><text:span text:style-name="T4"><text:line-break/></text:span><text:span text:style-name="T4">(sensor </text:span><text:span text:style-name="T4">fusion)</text:span></text:p>
          </draw:rect>
          <draw:g draw:style-name="gr31">
            <draw:custom-shape draw:style-name="gr525" draw:text-style-name="P159" draw:layer="layout" svg:width="0.178cm" svg:height="0.178cm" svg:x="-14.054cm" svg:y="-4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4.054cm" svg:y="-44.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4.054cm" svg:y="-44.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35" draw:text-style-name="P41" draw:layer="layout" svg:width="1.239cm" svg:height="0.735cm" svg:x="-1.118cm" svg:y="-44.908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683" draw:text-style-name="P38" draw:layer="layout" svg:width="4.495cm" svg:height="0.725cm" svg:x="-12.232cm" svg:y="-50.274cm">
            <draw:text-box>
              <text:p>During offline training</text:p>
            </draw:text-box>
          </draw:frame>
          <draw:g draw:style-name="gr31">
            <draw:polygon draw:style-name="gr510" draw:text-style-name="P113" draw:layer="layout" svg:width="0.632cm" svg:height="1.107cm" draw:transform="rotate (-3.14159265358979) translate (2.641cm -44.0546823529412cm)" svg:viewBox="0 0 633 1108" draw:points="0,0 633,316 629,807 0,1108">
              <text:p/>
            </draw:polygon>
            <draw:g draw:style-name="gr23">
              <draw:polygon draw:style-name="gr508" draw:text-style-name="P145" draw:layer="layout" svg:width="0.632cm" svg:height="1.107cm" svg:x="1.347cm" svg:y="-45.166cm" svg:viewBox="0 0 633 1108" draw:points="0,0 633,316 629,807 0,1108">
                <text:p/>
              </draw:polygon>
            </draw:g>
          </draw:g>
          <draw:custom-shape draw:name="comment box 22" draw:style-name="gr684" draw:text-style-name="P20" xml:id="id580" draw:id="id580" draw:layer="layout" svg:width="1.753cm" svg:height="1.33cm" svg:x="-8.225cm" svg:y="-47.301cm">
            <text:p text:style-name="P19"><text:span text:style-name="T4">Sensor</text:span><text:span text:style-name="T4"><text:line-break/></text:span><text:span text:style-name="T4">frequency</text:span><text:span text:style-name="T4"><text:line-break/></text:span><text:span text:style-name="T4">alignme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6.088cm" svg:y1="-45.376cm" svg:x2="-7.348cm" svg:y2="-45.971cm" draw:start-shape="id577" draw:start-glue-point="0" draw:end-shape="id580" draw:end-glue-point="6" svg:d="M-6088-45376c0-430-1260-133-1260-595" svg:viewBox="0 0 1261 596">
            <text:p/>
          </draw:connector>
          <draw:custom-shape draw:name="comment box 23" draw:style-name="gr689" draw:text-style-name="P161" xml:id="id582" draw:id="id582" draw:layer="layout" svg:width="2.165cm" svg:height="1.776cm" svg:x="2.139cm" svg:y="-47.896cm">
            <text:p text:style-name="P160"><text:span text:style-name="T4">Such as GPS:</text:span><text:span text:style-name="T4"><text:line-break/></text:span><text:span text:style-name="T4">longitude: 2</text:span><text:span text:style-name="T4"><text:line-break/></text:span><text:span text:style-name="T4">latitude: 4.1</text:span><text:span text:style-name="T4"><text:line-break/></text:span><text:span text:style-name="T4">altitude:1.2</text:span><text:span text:style-name="T4"><text:line-break/></text:span><text:span text:style-name="T4"/></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3.824cm" svg:y1="-45.277cm" svg:x2="3.222cm" svg:y2="-46.12cm" draw:start-shape="id581" draw:start-glue-point="0" draw:end-shape="id582" draw:end-glue-point="6" svg:d="M3824-45277c0-634-602-213-602-843" svg:viewBox="0 0 603 844">
            <text:p/>
          </draw:connector>
        </draw:g>
        <draw:g draw:style-name="gr23">
          <draw:polygon draw:style-name="gr508" draw:text-style-name="P145" draw:layer="layout" svg:width="1.311cm" svg:height="1.383cm" svg:x="-19.841cm" svg:y="-9.917cm" svg:viewBox="0 0 1312 1384" draw:points="1312,1384 0,792 0,591 1312,0">
            <text:p/>
          </draw:polygon>
          <draw:frame draw:style-name="gr631" draw:text-style-name="P195" draw:layer="layout" svg:width="1.732cm" svg:height="0.569cm" svg:x="-19.95cm" svg:y="-9.519cm">
            <draw:text-box>
              <text:p><text:span text:style-name="T63">decoder</text:span></text:p>
            </draw:text-box>
          </draw:frame>
        </draw:g>
        <draw:g draw:style-name="gr31">
          <draw:g draw:style-name="gr23">
            <draw:polygon draw:style-name="gr510" draw:text-style-name="P113" draw:layer="layout" svg:width="1.292cm" svg:height="1.358cm" svg:x="-21.216cm" svg:y="-9.905cm" svg:viewBox="0 0 1293 1359" draw:points="0,0 1293,581 1293,777 0,1359">
              <text:p/>
            </draw:polygon>
          </draw:g>
          <draw:frame draw:style-name="gr495" draw:text-style-name="P196" draw:layer="layout" svg:width="1.673cm" svg:height="0.887cm" svg:x="-21.395cm" svg:y="-9.528cm">
            <draw:text-box>
              <text:p><text:span text:style-name="T63">encoder</text:span></text:p>
            </draw:text-box>
          </draw:frame>
        </draw:g>
        <draw:connector draw:style-name="gr642" draw:text-style-name="P15" draw:layer="layout" draw:type="line" svg:x1="-24.93cm" svg:y1="-10.093cm" svg:x2="-24.906cm" svg:y2="-8.123cm" svg:d="M-24930-10093l24 1970" svg:viewBox="0 0 25 1971">
          <text:p/>
        </draw:connector>
        <draw:frame draw:style-name="gr690" draw:text-style-name="P197" draw:layer="layout" svg:width="3.475cm" svg:height="0.878cm" svg:x="-24.956cm" svg:y="-9.656cm">
          <draw:text-box>
            <text:p text:style-name="P3"><text:span text:style-name="T67">ROS</text:span></text:p>
          </draw:text-box>
        </draw:frame>
        <draw:custom-shape draw:style-name="gr511" draw:text-style-name="P148" xml:id="id583" draw:id="id583" draw:layer="layout" svg:width="1.34cm" svg:height="1.458cm" svg:x="-91.813cm" svg:y="55.245cm">
          <text:p text:style-name="P147"><text:span text:style-name="T46">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50" xml:id="id585" draw:id="id585" draw:layer="layout" svg:width="1.34cm" svg:height="1.458cm" svg:x="-91.813cm" svg:y="57.2cm">
          <text:p text:style-name="P214"><text:span text:style-name="T3">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1" draw:text-style-name="P150" xml:id="id587" draw:id="id587" draw:layer="layout" svg:width="1.34cm" svg:height="1.459cm" svg:x="-91.813cm" svg:y="59.154cm">
          <text:p text:style-name="P214"><text:span text:style-name="T3">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84" draw:id="id584" draw:layer="layout" svg:width="1.34cm" svg:height="1.458cm" svg:x="-87.447cm" svg:y="53.746cm">
          <text:p text:style-name="P151"><text:span text:style-name="T51">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86" draw:id="id586" draw:layer="layout" svg:width="1.34cm" svg:height="1.458cm" svg:x="-87.447cm" svg:y="55.4cm">
          <text:p text:style-name="P151"><text:span text:style-name="T51">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88" draw:id="id588" draw:layer="layout" svg:width="1.34cm" svg:height="1.458cm" svg:x="-87.447cm" svg:y="57.054cm">
          <text:p text:style-name="P151"><text:span text:style-name="T51">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90.473cm" svg:y1="55.974cm" svg:x2="-87.447cm" svg:y2="54.475cm" draw:start-shape="id583" draw:start-glue-point="10" draw:end-shape="id584" draw:end-glue-point="6" svg:d="M-90473 55974l3026-1499" svg:viewBox="0 0 3027 1500">
          <text:p/>
        </draw:connector>
        <draw:connector draw:style-name="gr503" draw:text-style-name="P15" draw:layer="layout" draw:type="line" svg:x1="-90.473cm" svg:y1="57.929cm" svg:x2="-87.447cm" svg:y2="56.129cm" draw:start-shape="id585" draw:start-glue-point="10" draw:end-shape="id586" draw:end-glue-point="6" svg:d="M-90473 57929l3026-1800" svg:viewBox="0 0 3027 1801">
          <text:p/>
        </draw:connector>
        <draw:connector draw:style-name="gr503" draw:text-style-name="P15" draw:layer="layout" draw:type="line" svg:x1="-90.473cm" svg:y1="59.884cm" svg:x2="-87.447cm" svg:y2="57.783cm" draw:start-shape="id587" draw:start-glue-point="10" draw:end-shape="id588" draw:end-glue-point="6" svg:d="M-90473 59884l3026-2101" svg:viewBox="0 0 3027 2102">
          <text:p/>
        </draw:connector>
        <draw:connector draw:style-name="gr503" draw:text-style-name="P15" draw:layer="layout" draw:type="line" svg:x1="-90.473cm" svg:y1="59.884cm" svg:x2="-87.447cm" svg:y2="56.129cm" draw:start-shape="id587" draw:start-glue-point="10" draw:end-shape="id586" draw:end-glue-point="6" svg:d="M-90473 59884l3026-3755" svg:viewBox="0 0 3027 3756">
          <text:p/>
        </draw:connector>
        <draw:connector draw:style-name="gr503" draw:text-style-name="P15" draw:layer="layout" draw:type="line" svg:x1="-90.473cm" svg:y1="59.884cm" svg:x2="-87.447cm" svg:y2="54.475cm" draw:start-shape="id587" draw:start-glue-point="10" draw:end-shape="id584" draw:end-glue-point="6" svg:d="M-90473 59884l3026-5409" svg:viewBox="0 0 3027 5410">
          <text:p/>
        </draw:connector>
        <draw:connector draw:style-name="gr503" draw:text-style-name="P15" draw:layer="layout" draw:type="line" svg:x1="-90.473cm" svg:y1="57.929cm" svg:x2="-87.447cm" svg:y2="54.475cm" draw:start-shape="id585" draw:start-glue-point="10" draw:end-shape="id584" draw:end-glue-point="6" svg:d="M-90473 57929l3026-3454" svg:viewBox="0 0 3027 3455">
          <text:p/>
        </draw:connector>
        <draw:connector draw:style-name="gr503" draw:text-style-name="P15" draw:layer="layout" draw:type="line" svg:x1="-90.473cm" svg:y1="57.929cm" svg:x2="-87.447cm" svg:y2="57.783cm" draw:start-shape="id585" draw:start-glue-point="10" draw:end-shape="id588" draw:end-glue-point="6" svg:d="M-90473 57929l3026-146" svg:viewBox="0 0 3027 147">
          <text:p/>
        </draw:connector>
        <draw:connector draw:style-name="gr503" draw:text-style-name="P15" draw:layer="layout" draw:type="line" svg:x1="-90.473cm" svg:y1="55.974cm" svg:x2="-87.447cm" svg:y2="56.129cm" draw:start-shape="id583" draw:start-glue-point="10" draw:end-shape="id586" draw:end-glue-point="6" svg:d="M-90473 55974l3026 155" svg:viewBox="0 0 3027 156">
          <text:p/>
        </draw:connector>
        <draw:connector draw:style-name="gr503" draw:text-style-name="P15" draw:layer="layout" draw:type="line" svg:x1="-90.473cm" svg:y1="55.974cm" svg:x2="-87.447cm" svg:y2="57.783cm" draw:start-shape="id583" draw:start-glue-point="10" draw:end-shape="id588" draw:end-glue-point="6" svg:d="M-90473 55974l3026 1809" svg:viewBox="0 0 3027 1810">
          <text:p/>
        </draw:connector>
        <draw:custom-shape draw:style-name="gr692" draw:text-style-name="P154" xml:id="id589" draw:id="id589" draw:layer="layout" svg:width="1.34cm" svg:height="1.458cm" svg:x="-83.088cm" svg:y="55.445cm">
          <text:p text:style-name="P215"><text:span text:style-name="T73">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3" draw:text-style-name="P154" xml:id="id590" draw:id="id590" draw:layer="layout" svg:width="1.34cm" svg:height="1.458cm" svg:x="-83.088cm" svg:y="57.4cm">
          <text:p text:style-name="P215"><text:span text:style-name="T73">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4" draw:text-style-name="P154" xml:id="id591" draw:id="id591" draw:layer="layout" svg:width="1.34cm" svg:height="1.459cm" svg:x="-83.088cm" svg:y="59.354cm">
          <text:p text:style-name="P215"><text:span text:style-name="T73">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54.475cm" svg:x2="-83.088cm" svg:y2="56.174cm" draw:start-shape="id584" draw:start-glue-point="10" draw:end-shape="id589" draw:end-glue-point="6" svg:d="M-86107 54475l3019 1699" svg:viewBox="0 0 3020 1700">
          <text:p/>
        </draw:connector>
        <draw:connector draw:style-name="gr503" draw:text-style-name="P15" draw:layer="layout" draw:type="line" svg:x1="-86.107cm" svg:y1="54.475cm" svg:x2="-83.088cm" svg:y2="58.129cm" draw:start-shape="id584" draw:start-glue-point="10" draw:end-shape="id590" draw:end-glue-point="6" svg:d="M-86107 54475l3019 3654" svg:viewBox="0 0 3020 3655">
          <text:p/>
        </draw:connector>
        <draw:connector draw:style-name="gr503" draw:text-style-name="P15" draw:layer="layout" draw:type="line" svg:x1="-86.107cm" svg:y1="54.475cm" svg:x2="-83.088cm" svg:y2="60.084cm" draw:start-shape="id584" draw:start-glue-point="10" draw:end-shape="id591" draw:end-glue-point="6" svg:d="M-86107 54475l3019 5609" svg:viewBox="0 0 3020 5610">
          <text:p/>
        </draw:connector>
        <draw:connector draw:style-name="gr503" draw:text-style-name="P15" draw:layer="layout" draw:type="line" svg:x1="-86.107cm" svg:y1="56.129cm" svg:x2="-83.088cm" svg:y2="56.174cm" draw:start-shape="id586" draw:start-glue-point="10" draw:end-shape="id589" draw:end-glue-point="6" svg:d="M-86107 56129l3019 45" svg:viewBox="0 0 3020 46">
          <text:p/>
        </draw:connector>
        <draw:connector draw:style-name="gr503" draw:text-style-name="P15" draw:layer="layout" draw:type="line" svg:x1="-86.107cm" svg:y1="56.129cm" svg:x2="-83.088cm" svg:y2="58.129cm" draw:start-shape="id586" draw:start-glue-point="10" draw:end-shape="id590" draw:end-glue-point="6" svg:d="M-86107 56129l3019 2000" svg:viewBox="0 0 3020 2001">
          <text:p/>
        </draw:connector>
        <draw:connector draw:style-name="gr503" draw:text-style-name="P15" draw:layer="layout" draw:type="line" svg:x1="-86.107cm" svg:y1="56.129cm" svg:x2="-83.088cm" svg:y2="60.084cm" draw:start-shape="id586" draw:start-glue-point="10" draw:end-shape="id591" draw:end-glue-point="6" svg:d="M-86107 56129l3019 3955" svg:viewBox="0 0 3020 3956">
          <text:p/>
        </draw:connector>
        <draw:connector draw:style-name="gr503" draw:text-style-name="P15" draw:layer="layout" draw:type="line" svg:x1="-86.107cm" svg:y1="57.783cm" svg:x2="-83.088cm" svg:y2="60.084cm" draw:start-shape="id588" draw:start-glue-point="10" draw:end-shape="id591" draw:end-glue-point="6" svg:d="M-86107 57783l3019 2301" svg:viewBox="0 0 3020 2302">
          <text:p/>
        </draw:connector>
        <draw:connector draw:style-name="gr503" draw:text-style-name="P15" draw:layer="layout" draw:type="line" svg:x1="-86.107cm" svg:y1="57.783cm" svg:x2="-83.088cm" svg:y2="58.129cm" draw:start-shape="id588" draw:start-glue-point="10" draw:end-shape="id590" draw:end-glue-point="6" svg:d="M-86107 57783l3019 346" svg:viewBox="0 0 3020 347">
          <text:p/>
        </draw:connector>
        <draw:connector draw:style-name="gr503" draw:text-style-name="P15" draw:layer="layout" draw:type="line" svg:x1="-86.107cm" svg:y1="57.783cm" svg:x2="-83.088cm" svg:y2="56.174cm" draw:start-shape="id588" draw:start-glue-point="10" draw:end-shape="id589" draw:end-glue-point="6" svg:d="M-86107 57783l3019-1609" svg:viewBox="0 0 3020 1610">
          <text:p/>
        </draw:connector>
        <draw:custom-shape draw:style-name="gr512" draw:text-style-name="P152" xml:id="id592" draw:id="id592" draw:layer="layout" svg:width="1.34cm" svg:height="1.458cm" svg:x="-87.447cm" svg:y="58.858cm">
          <text:p text:style-name="P151"><text:span text:style-name="T51">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59.587cm" svg:x2="-83.088cm" svg:y2="56.174cm" draw:start-shape="id592" draw:start-glue-point="10" draw:end-shape="id589" draw:end-glue-point="6" svg:d="M-86107 59587l3019-3413" svg:viewBox="0 0 3020 3414">
          <text:p/>
        </draw:connector>
        <draw:connector draw:style-name="gr503" draw:text-style-name="P15" draw:layer="layout" draw:type="line" svg:x1="-86.107cm" svg:y1="59.587cm" svg:x2="-83.088cm" svg:y2="60.084cm" draw:start-shape="id592" draw:start-glue-point="10" draw:end-shape="id591" draw:end-glue-point="6" svg:d="M-86107 59587l3019 497" svg:viewBox="0 0 3020 498">
          <text:p/>
        </draw:connector>
        <draw:connector draw:style-name="gr503" draw:text-style-name="P15" draw:layer="layout" draw:type="line" svg:x1="-86.107cm" svg:y1="59.587cm" svg:x2="-83.088cm" svg:y2="58.129cm" draw:start-shape="id592" draw:start-glue-point="10" draw:end-shape="id590" draw:end-glue-point="6" svg:d="M-86107 59587l3019-1458" svg:viewBox="0 0 3020 1459">
          <text:p/>
        </draw:connector>
        <draw:connector draw:style-name="gr503" draw:text-style-name="P15" draw:layer="layout" draw:type="line" svg:x1="-90.473cm" svg:y1="59.884cm" svg:x2="-87.447cm" svg:y2="59.587cm" draw:start-shape="id587" draw:start-glue-point="10" draw:end-shape="id592" draw:end-glue-point="6" svg:d="M-90473 59884l3026-297" svg:viewBox="0 0 3027 298">
          <text:p/>
        </draw:connector>
        <draw:connector draw:style-name="gr503" draw:text-style-name="P15" draw:layer="layout" draw:type="line" svg:x1="-90.473cm" svg:y1="57.929cm" svg:x2="-87.447cm" svg:y2="59.587cm" draw:start-shape="id585" draw:start-glue-point="10" draw:end-shape="id592" draw:end-glue-point="6" svg:d="M-90473 57929l3026 1658" svg:viewBox="0 0 3027 1659">
          <text:p/>
        </draw:connector>
        <draw:connector draw:style-name="gr503" draw:text-style-name="P15" draw:layer="layout" draw:type="line" svg:x1="-90.473cm" svg:y1="55.974cm" svg:x2="-87.447cm" svg:y2="59.587cm" draw:start-shape="id583" draw:start-glue-point="10" draw:end-shape="id592" draw:end-glue-point="6" svg:d="M-90473 55974l3026 3613" svg:viewBox="0 0 3027 3614">
          <text:p/>
        </draw:connector>
        <draw:custom-shape draw:style-name="gr516" draw:text-style-name="P152" xml:id="id593" draw:id="id593" draw:layer="layout" svg:width="1.34cm" svg:height="1.459cm" svg:x="-87.447cm" svg:y="60.662cm">
          <text:p text:style-name="P151"><text:span text:style-name="T5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61.392cm" svg:x2="-83.088cm" svg:y2="60.084cm" draw:start-shape="id593" draw:start-glue-point="10" draw:end-shape="id591" draw:end-glue-point="6" svg:d="M-86107 61392l3019-1308" svg:viewBox="0 0 3020 1309">
          <text:p/>
        </draw:connector>
        <draw:connector draw:style-name="gr503" draw:text-style-name="P15" draw:layer="layout" draw:type="line" svg:x1="-86.107cm" svg:y1="61.392cm" svg:x2="-83.088cm" svg:y2="58.129cm" draw:start-shape="id593" draw:start-glue-point="10" draw:end-shape="id590" draw:end-glue-point="6" svg:d="M-86107 61392l3019-3263" svg:viewBox="0 0 3020 3264">
          <text:p/>
        </draw:connector>
        <draw:connector draw:style-name="gr503" draw:text-style-name="P15" draw:layer="layout" draw:type="line" svg:x1="-86.107cm" svg:y1="61.392cm" svg:x2="-83.088cm" svg:y2="56.174cm" draw:start-shape="id593" draw:start-glue-point="10" draw:end-shape="id589" draw:end-glue-point="6" svg:d="M-86107 61392l3019-5218" svg:viewBox="0 0 3020 5219">
          <text:p/>
        </draw:connector>
        <draw:connector draw:style-name="gr503" draw:text-style-name="P15" draw:layer="layout" draw:type="line" svg:x1="-90.473cm" svg:y1="59.884cm" svg:x2="-87.447cm" svg:y2="61.392cm" draw:start-shape="id587" draw:start-glue-point="10" draw:end-shape="id593" draw:end-glue-point="6" svg:d="M-90473 59884l3026 1508" svg:viewBox="0 0 3027 1509">
          <text:p/>
        </draw:connector>
        <draw:connector draw:style-name="gr503" draw:text-style-name="P15" draw:layer="layout" draw:type="line" svg:x1="-90.473cm" svg:y1="57.929cm" svg:x2="-87.447cm" svg:y2="61.392cm" draw:start-shape="id585" draw:start-glue-point="10" draw:end-shape="id593" draw:end-glue-point="6" svg:d="M-90473 57929l3026 3463" svg:viewBox="0 0 3027 3464">
          <text:p/>
        </draw:connector>
        <draw:connector draw:style-name="gr503" draw:text-style-name="P15" draw:layer="layout" draw:type="line" svg:x1="-90.473cm" svg:y1="55.974cm" svg:x2="-87.447cm" svg:y2="61.392cm" draw:start-shape="id583" draw:start-glue-point="10" draw:end-shape="id593" draw:end-glue-point="6" svg:d="M-90473 55974l3026 5418" svg:viewBox="0 0 3027 5419">
          <text:p/>
        </draw:connector>
        <draw:custom-shape draw:style-name="gr695" draw:text-style-name="P41" draw:layer="layout" svg:width="0.951cm" svg:height="5.53cm" svg:x="-93.03cm" svg:y="55.245cm">
          <text:p/>
          <draw:enhanced-geometry svg:viewBox="0 0 21600 21600" draw:mirror-horizontal="false" draw:mirror-vertical="false"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696" draw:text-style-name="P38" draw:layer="layout" svg:width="1.578cm" svg:height="1.673cm" svg:x="-94.418cm" svg:y="57.507cm">
          <draw:text-box>
            <text:p>GPS<text:line-break/>Trace<text:line-break/></text:p>
          </draw:text-box>
        </draw:frame>
        <draw:g draw:style-name="gr23">
          <draw:frame draw:style-name="gr135" draw:text-style-name="P41" draw:layer="layout" svg:width="63.239cm" svg:height="26.418cm" svg:x="-92.977cm" svg:y="-66.923cm">
            <draw:image xlink:href="Pictures/10000000000008CD000003AE13A2E865.png" xlink:type="simple" xlink:show="embed" xlink:actuate="onLoad" draw:mime-type="image/png">
              <text:p/>
            </draw:image>
          </draw:frame>
          <draw:frame draw:style-name="gr697" draw:text-style-name="P216" draw:layer="layout" svg:width="2.23cm" svg:height="1.038cm" svg:x="-91.642cm" svg:y="-68.262cm">
            <draw:text-box>
              <text:p><text:span text:style-name="T74">Lidar</text:span></text:p>
            </draw:text-box>
          </draw:frame>
        </draw:g>
        <draw:g draw:style-name="gr23">
          <draw:frame draw:style-name="gr135" draw:text-style-name="P41" draw:layer="layout" svg:width="62.313cm" svg:height="26.161cm" svg:x="-92.187cm" svg:y="-33.464cm">
            <draw:image xlink:href="Pictures/10000000000008DF000003B9CB1644F7.png" xlink:type="simple" xlink:show="embed" xlink:actuate="onLoad" draw:mime-type="image/png">
              <text:p/>
            </draw:image>
          </draw:frame>
          <draw:frame draw:style-name="gr698" draw:text-style-name="P217" draw:layer="layout" svg:width="1.995cm" svg:height="1.038cm" svg:x="-87.361cm" svg:y="-34.973cm">
            <draw:text-box>
              <text:p><text:span text:style-name="T75">GPS</text:span></text:p>
            </draw:text-box>
          </draw:frame>
        </draw:g>
        <draw:g draw:style-name="gr31">
          <draw:custom-shape draw:style-name="gr525" draw:text-style-name="P159" draw:layer="layout" svg:width="0.178cm" svg:height="0.178cm" svg:x="17.3cm" svg:y="6.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7.3cm" svg:y="6.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7.3cm" svg:y="6.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31">
          <draw:custom-shape draw:style-name="gr525" draw:text-style-name="P159" draw:layer="layout" svg:width="0.178cm" svg:height="0.178cm" svg:x="-33.025cm" svg:y="13.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33.025cm" svg:y="13.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33.025cm" svg:y="13.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3">
          <draw:a xlink:href="https://www.youtube.com/watch?v=LJbpXx8fMUk" xlink:type="simple" xlink:show="embed">
            <draw:frame draw:style-name="gr135" draw:text-style-name="P41" draw:layer="layout" svg:width="20.5cm" svg:height="12.203cm" svg:x="-77.883cm" svg:y="27.714cm">
              <draw:image xlink:href="Pictures/10000000000003D00000024573F23757.png" xlink:type="simple" xlink:show="embed" xlink:actuate="onLoad" draw:mime-type="image/png">
                <text:p/>
              </draw:image>
            </draw:frame>
          </draw:a>
          <draw:frame draw:style-name="gr699" draw:text-style-name="P38" draw:layer="layout" svg:width="9.761cm" svg:height="0.725cm" svg:x="-66.939cm" svg:y="33.999cm">
            <draw:text-box>
              <text:p><text:a xlink:href="https://www.youtube.com/watch?v=LJbpXx8fMUk" xlink:type="simple">https://www.youtube.com/watch?v=LJbpXx8fMUk</text:a></text:p>
            </draw:text-box>
          </draw:frame>
        </draw:g>
        <draw:frame draw:style-name="gr700" draw:text-style-name="P38" draw:layer="layout" svg:width="12.243cm" svg:height="1.199cm" svg:x="-51.627cm" svg:y="83.233cm">
          <draw:text-box>
            <text:p text:style-name="P213"><text:span text:style-name="T76">Languag</text:span><text:span text:style-name="T76">e works </text:span><text:span text:style-name="T76">from </text:span><text:span text:style-name="T76">feature </text:span><text:span text:style-name="T76">sturcture</text:span><text:span text:style-name="T76">s (trace) </text:span>and afterwards<text:line-break/>. Thats why we don’t cluster FMM params but traces</text:p>
          </draw:text-box>
        </draw:frame>
        <draw:frame draw:style-name="gr701" draw:text-style-name="P38" draw:layer="layout" svg:width="10.855cm" svg:height="1.673cm" svg:x="-26.21cm" svg:y="-11.542cm">
          <draw:text-box>
            <text:p>ROS can be considered as someone who knows <text:line-break/>from eternity how to convert a wave to feature structure<text:line-break/>such as parents</text:p>
          </draw:text-box>
        </draw:frame>
        <draw:frame draw:style-name="gr135" draw:text-style-name="P41" draw:layer="layout" svg:width="9.05cm" svg:height="8.943cm" svg:x="-80.772cm" svg:y="42.186cm">
          <draw:image xlink:href="Pictures/1000000100000500000004F1EF192BD0.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6" draw:display-name="Arrowheads 36"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34DT38M16S</meta:editing-duration>
    <meta:editing-cycles>854</meta:editing-cycles>
    <meta:generator>LibreOffice/25.8.0.4$Linux_X86_64 LibreOffice_project/48f00303701489684e67c38c28aff00cd5929e67</meta:generator>
    <dc:title>diagram</dc:title>
    <dc:date>2026-05-26T16:02:07.511523789</dc:date>
    <meta:document-statistic meta:object-count="2176"/>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10/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11/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

<file path=Object 5/content.xml><?xml version="1.0" encoding="utf-8"?>
<math xmlns="http://www.w3.org/1998/Math/MathML" display="block">
  <semantics>
    <mrow>
      <mi>J</mi>
      <mo stretchy="false">=</mo>
      <mrow>
        <munderover>
          <mo stretchy="false">∑</mo>
          <mrow>
            <mi>k</mi>
            <mo stretchy="false">=</mo>
            <mn>0</mn>
          </mrow>
          <mrow>
            <mi>N</mi>
            <mo stretchy="false">−</mo>
            <mn>1</mn>
          </mrow>
        </munderover>
        <mrow>
          <mo fence="true" form="prefix" stretchy="true">[</mo>
          <mrow>
            <mrow>
              <msup>
                <mrow>
                  <mo fence="true" form="prefix" stretchy="false">(</mo>
                  <mrow>
                    <mrow>
                      <msub>
                        <mi>x</mi>
                        <mi>k</mi>
                      </msub>
                      <mo stretchy="false">−</mo>
                      <msubsup>
                        <mi>x</mi>
                        <mi>k</mi>
                        <mi mathvariant="italic">ref</mi>
                      </msubsup>
                    </mrow>
                  </mrow>
                  <mo fence="true" form="postfix" stretchy="false">)</mo>
                </mrow>
                <mi>T</mi>
              </msup>
              <mi>Q</mi>
              <mrow>
                <mrow>
                  <mo fence="true" form="prefix" stretchy="false">(</mo>
                  <mrow>
                    <mrow>
                      <msub>
                        <mi>x</mi>
                        <mi>k</mi>
                      </msub>
                      <mo stretchy="false">−</mo>
                      <msubsup>
                        <mi>x</mi>
                        <mi>k</mi>
                        <mi mathvariant="italic">ref</mi>
                      </msubsup>
                    </mrow>
                  </mrow>
                  <mo fence="true" form="postfix" stretchy="false">)</mo>
                </mrow>
                <mo stretchy="false">+</mo>
                <msubsup>
                  <mi>u</mi>
                  <mi>k</mi>
                  <mi>T</mi>
                </msubsup>
              </mrow>
              <mi>R</mi>
              <msub>
                <mi>u</mi>
                <mi>k</mi>
              </msub>
            </mrow>
          </mrow>
          <mo fence="true" form="postfix" stretchy="true">]</mo>
        </mrow>
      </mrow>
    </mrow>
    <annotation encoding="StarMath 5.0">J = sum from {k=0} to {N-1} left [ ( x_k - x_k^{ref} )^T Q ( x_k - x_k^{ref} ) + u_k^T R u_k right ]</annotation>
  </semantics>
</math>
</file>

<file path=Object 6/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7/content.xml><?xml version="1.0" encoding="utf-8"?>
<math xmlns="http://www.w3.org/1998/Math/MathML" display="block">
  <semantics>
    <mrow>
      <mi>W</mi>
      <mrow>
        <mrow>
          <mo fence="true" form="prefix" stretchy="false">(</mo>
          <mrow>
            <mi>t</mi>
          </mrow>
          <mo fence="true" form="postfix" stretchy="false">)</mo>
        </mrow>
        <mo stretchy="false">=</mo>
        <mrow>
          <mi>M</mi>
          <mo stretchy="false">+</mo>
          <mi>A</mi>
        </mrow>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M + A cos left[ %beta + 2 arctan left( %omega tan left( {t - %alpha} over 2 right) right) right]</annotation>
  </semantics>
</math>
</file>

<file path=Object 8/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9/content.xml><?xml version="1.0" encoding="utf-8"?>
<math xmlns="http://www.w3.org/1998/Math/MathML" display="block">
  <semantics>
    <mtable>
      <mtr>
        <mtd>
          <mrow>
            <mrow>
              <msub>
                <mi>M</mi>
                <mn>1</mn>
              </msub>
              <mo stretchy="false">+</mo>
              <msub>
                <mi>A</mi>
                <mn>1</mn>
              </msub>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sub>
                <mi>M</mi>
                <mn>2</mn>
              </msub>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M_1 + A_1 cos left[ %beta_1 + 2 arctan left( %omega_1 tan left( {t - %alpha_1} over 2 right) right) right]
newline
M_2+A_2 cos left[ %beta_2 + 2 arctan left( %omega_2 tan left( {t - %alpha_2} over 2 right) right) right]</annotation>
  </semantics>
</math>
</file>