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4" manifest:media-type="application/vnd.oasis.opendocument.formula"/>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001000002800000017C0782A2E4.png" manifest:media-type="image/png"/>
  <manifest:file-entry manifest:full-path="Pictures/1000099600004225000027461A447516.svg" manifest:media-type="image/svg+xml"/>
  <manifest:file-entry manifest:full-path="Pictures/10000000000002C5000001ADB823F0C7.png" manifest:media-type="image/png"/>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000000002D80000032646F0B612.png" manifest:media-type="image/png"/>
  <manifest:file-entry manifest:full-path="Pictures/10000000000002B2000003BD26BB6070.png" manifest:media-type="image/png"/>
  <manifest:file-entry manifest:full-path="Pictures/10000000000002C8000001F99B6A82D1.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E000001BF8724678F.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1900000018BB52D7D4C.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4" manifest:media-type="application/vnd.oasis.opendocument.formula"/>
  <manifest:file-entry manifest:full-path="Thumbnails/thumbnail.png" manifest:media-type="image/png"/>
  <manifest:file-entry manifest:full-path="settings.xml" manifest:media-type="text/xml"/>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7" manifest:media-type=""/>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2"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493"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4"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5"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97"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8"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499"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0" style:family="graphic" style:parent-style-name="objectwithoutfill">
      <style:graphic-properties draw:marker-end="" draw:marker-end-width="0.1cm" draw:fill="solid" draw:textarea-vertical-align="middle" loext:decorative="false"/>
    </style:style>
    <style:style style:name="gr501"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2" style:family="graphic" style:parent-style-name="objectwithoutfill">
      <style:graphic-properties draw:marker-start="Arrow_20_short" draw:marker-end="" draw:marker-end-width="0.2cm" draw:fill="solid" draw:textarea-vertical-align="middle" loext:decorative="false"/>
    </style:style>
    <style:style style:name="gr503" style:family="graphic" style:parent-style-name="objectwithoutfill">
      <style:graphic-properties draw:marker-start="" draw:marker-end="Arrow_20_short" draw:marker-end-width="0.2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5"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6"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07"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08"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9"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10"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11"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12"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3" style:family="graphic" style:parent-style-name="standard">
      <style:graphic-properties draw:stroke="none" svg:stroke-color="#000000" draw:fill="none" draw:fill-color="#ffffff" draw:textarea-horizontal-align="center" draw:auto-grow-height="true" draw:auto-grow-width="true" fo:min-height="1.423cm" fo:min-width="6.356cm" loext:decorative="false"/>
      <style:paragraph-properties style:writing-mode="lr-tb"/>
    </style:style>
    <style:style style:name="gr514" style:family="graphic" style:parent-style-name="standard">
      <style:graphic-properties draw:fill="none" draw:textarea-vertical-align="middle" draw:auto-grow-height="false" fo:min-height="5.322cm" fo:min-width="0cm" fo:wrap-option="wrap" loext:decorative="false"/>
    </style:style>
    <style:style style:name="gr515"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16" style:family="graphic" style:parent-style-name="standard">
      <style:graphic-properties draw:fill="none" draw:textarea-vertical-align="middle" draw:auto-grow-height="false" fo:min-height="5.752cm" fo:min-width="0cm" fo:wrap-option="wrap" loext:decorative="false"/>
    </style:style>
    <style:style style:name="gr517" style:family="graphic" style:parent-style-name="standard">
      <style:graphic-properties draw:stroke="none" svg:stroke-color="#000000" draw:fill="none" draw:fill-color="#ffffff" draw:textarea-horizontal-align="left" draw:auto-grow-height="true" draw:auto-grow-width="true" fo:min-height="2.371cm" fo:min-width="2.716cm" loext:decorative="false"/>
      <style:paragraph-properties style:writing-mode="lr-tb"/>
    </style:style>
    <style:style style:name="gr518" style:family="graphic" style:parent-style-name="Object_20_with_20_no_20_fill_20_and_20_no_20_line">
      <style:graphic-properties draw:textarea-horizontal-align="center" draw:textarea-vertical-align="middle" draw:ole-draw-aspect="1" style:protect="size" loext:decorative="false"/>
    </style:style>
    <style:style style:name="gr519" style:family="graphic" style:parent-style-name="objectwithoutfill">
      <style:graphic-properties draw:marker-end="Arrowheads_20_418" draw:marker-end-width="0.3cm" draw:fill="solid" draw:textarea-vertical-align="middle" loext:decorative="false"/>
    </style:style>
    <style:style style:name="gr520"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21"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22" style:family="graphic" style:parent-style-name="standard">
      <style:graphic-properties draw:stroke="none" draw:fill="none" draw:textarea-horizontal-align="center" fo:min-height="1.971cm" loext:decorative="false"/>
      <style:paragraph-properties style:writing-mode="lr-tb"/>
    </style:style>
    <style:style style:name="gr523" style:family="graphic" style:parent-style-name="standard">
      <style:graphic-properties draw:textarea-horizontal-align="justify" draw:textarea-vertical-align="middle" draw:auto-grow-height="false" fo:min-height="3.285cm" fo:min-width="2.618cm" loext:decorative="false"/>
    </style:style>
    <style:style style:name="gr524" style:family="graphic" style:parent-style-name="standard">
      <style:graphic-properties draw:stroke="none" draw:fill="solid" draw:fill-color="#345d95" draw:textarea-vertical-align="middle" draw:auto-grow-height="false" fo:min-height="0cm" fo:min-width="0cm" loext:decorative="false"/>
    </style:style>
    <style:style style:name="gr525"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26" style:family="graphic" style:parent-style-name="standard">
      <style:graphic-properties draw:stroke="none" draw:fill="solid" draw:fill-color="#b4d2ea" draw:textarea-vertical-align="middle" draw:auto-grow-height="false" fo:min-height="0cm" fo:min-width="0cm" loext:decorative="false"/>
    </style:style>
    <style:style style:name="gr527"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2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0"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31"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32"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33" style:family="graphic" style:parent-style-name="objectwithoutfill">
      <style:graphic-properties draw:marker-end="Arrowheads_20_419" draw:marker-end-width="0.2cm" draw:fill="solid" draw:textarea-vertical-align="middle" loext:decorative="false"/>
    </style:style>
    <style:style style:name="gr534"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35"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37" style:family="graphic" style:parent-style-name="standard" style:list-style-name="L1">
      <style:graphic-properties draw:stroke="none" draw:fill="none" fo:min-height="0.48cm" loext:decorative="false"/>
      <style:paragraph-properties style:writing-mode="lr-tb"/>
    </style:style>
    <style:style style:name="gr538" style:family="graphic" style:parent-style-name="standard" style:list-style-name="L1">
      <style:graphic-properties draw:stroke="none" draw:fill="none" fo:min-height="0.48cm" loext:decorative="false"/>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0" style:family="graphic" style:parent-style-name="standard">
      <style:graphic-properties draw:marker-start="Arrow" draw:marker-start-width="0.05cm" draw:marker-end="Arrow" draw:marker-end-width="0.05cm" draw:textarea-vertical-align="middle" loext:decorative="false"/>
    </style:style>
    <style:style style:name="gr541"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42" style:family="graphic" style:parent-style-name="objectwithoutfill">
      <style:graphic-properties draw:marker-end="Arrow" draw:marker-end-width="0.2cm" draw:fill="solid" draw:textarea-vertical-align="middle" loext:decorative="false"/>
    </style:style>
    <style:style style:name="gr543"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44"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45" style:family="graphic" style:parent-style-name="standard">
      <style:graphic-properties draw:marker-end="Arrowheads_20_420" draw:textarea-vertical-align="middle" loext:decorative="false"/>
    </style:style>
    <style:style style:name="gr546"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47"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0"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51"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52"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53"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54"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55"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556" style:family="graphic" style:parent-style-name="standard">
      <style:graphic-properties draw:stroke="none" draw:fill="none" draw:textarea-horizontal-align="center" fo:min-height="1.183cm" loext:decorative="false"/>
      <style:paragraph-properties style:writing-mode="lr-tb"/>
    </style:style>
    <style:style style:name="gr557"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58" style:family="graphic" style:parent-style-name="objectwithoutfill">
      <style:graphic-properties draw:marker-end="Arrow" draw:marker-end-width="0.1cm" draw:fill="solid" draw:textarea-vertical-align="middle" loext:decorative="false"/>
    </style:style>
    <style:style style:name="gr559"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0"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61"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62"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63"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64" style:family="graphic" style:parent-style-name="objectwithoutfill">
      <style:graphic-properties draw:marker-end="Arrow" draw:marker-end-width="0.1cm" draw:fill="solid" draw:textarea-vertical-align="bottom" loext:decorative="false"/>
    </style:style>
    <style:style style:name="gr565"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66" style:family="graphic" style:parent-style-name="Arrow_20_Line" style:list-style-name="L1">
      <style:graphic-properties draw:textarea-vertical-align="middle" draw:line-distance="0.14cm" loext:decorative="false"/>
      <style:paragraph-properties style:writing-mode="lr-tb"/>
    </style:style>
    <style:style style:name="gr567"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68"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69"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0"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71"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72"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73"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74"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75"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76"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77"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78"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79"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0"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81"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82"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83"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84"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85"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86"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87"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88"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89"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0"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591"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592"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593"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594"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595"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596"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597"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598"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599"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0"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01"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02" style:family="graphic" style:parent-style-name="standard">
      <style:graphic-properties draw:fill="none" draw:textarea-vertical-align="middle" draw:auto-grow-height="false" fo:min-height="1.481cm" fo:min-width="0cm" fo:wrap-option="wrap" loext:decorative="false"/>
    </style:style>
    <style:style style:name="gr603"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04" style:family="graphic" style:parent-style-name="standard">
      <style:graphic-properties draw:fill="none" draw:textarea-vertical-align="middle" draw:auto-grow-height="false" fo:min-height="1.095cm" fo:min-width="0cm" fo:wrap-option="wrap" loext:decorative="false"/>
    </style:style>
    <style:style style:name="gr605" style:family="graphic" style:parent-style-name="objectwithoutfill">
      <style:graphic-properties draw:marker-end="Arrowheads_20_399" draw:marker-end-width="0.1cm" draw:fill="solid" draw:textarea-vertical-align="middle" loext:decorative="false"/>
    </style:style>
    <style:style style:name="gr606" style:family="graphic" style:parent-style-name="objectwithoutfill">
      <style:graphic-properties draw:marker-end="Arrowheads_20_400" draw:marker-end-width="0.1cm" draw:fill="solid" draw:textarea-vertical-align="middle" loext:decorative="false"/>
    </style:style>
    <style:style style:name="gr607"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0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09"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0"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11"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12" style:family="graphic" style:parent-style-name="standard">
      <style:graphic-properties draw:stroke="none" svg:stroke-color="#000000" draw:fill="none" draw:fill-color="#ffffff" draw:textarea-horizontal-align="left" draw:auto-grow-height="true" draw:auto-grow-width="true" fo:min-height="0.788cm" fo:min-width="6.916cm" loext:decorative="false"/>
      <style:paragraph-properties style:writing-mode="lr-tb"/>
    </style:style>
    <style:style style:name="gr613" style:family="graphic" style:parent-style-name="objectwithoutfill">
      <style:graphic-properties draw:marker-start="Arrow" draw:marker-start-width="0.15cm" draw:marker-end="Arrow" draw:marker-end-width="0.15cm" draw:fill="solid" draw:textarea-vertical-align="middle" loext:decorative="false"/>
    </style:style>
    <style:style style:name="gr614" style:family="graphic" style:parent-style-name="objectwithoutfill">
      <style:graphic-properties draw:marker-start="" draw:marker-start-width="0.15cm" draw:marker-end="Arrow" draw:marker-end-width="0.15cm" draw:fill="solid" draw:textarea-vertical-align="middle" loext:decorative="false"/>
    </style:style>
    <style:style style:name="gr615" style:family="graphic" style:parent-style-name="standard">
      <style:graphic-properties draw:stroke="none" svg:stroke-color="#000000" draw:fill="none" draw:fill-color="#ffffff" draw:textarea-horizontal-align="left" draw:auto-grow-height="true" draw:auto-grow-width="true" fo:min-height="0.395cm" fo:min-width="3.419cm" loext:decorative="false"/>
      <style:paragraph-properties style:writing-mode="lr-tb"/>
    </style:style>
    <style:style style:name="gr616"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17"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1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19"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0"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21"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22"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23" style:family="graphic" style:parent-style-name="standard">
      <style:graphic-properties draw:stroke="none" draw:fill="none" fo:min-height="0.637cm" loext:decorative="false"/>
      <style:paragraph-properties style:writing-mode="lr-tb"/>
    </style:style>
    <style:style style:name="gr624"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25"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26"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27" style:family="graphic" style:parent-style-name="objectwithoutfill">
      <style:graphic-properties draw:marker-end="Arrowheads_20_309" draw:marker-end-width="0.3cm" draw:fill="solid" draw:textarea-vertical-align="middle" loext:decorative="false"/>
    </style:style>
    <style:style style:name="gr628" style:family="graphic" style:parent-style-name="objectwithoutfill">
      <style:graphic-properties draw:marker-end="Arrowheads_20_310" draw:marker-end-width="0.3cm" draw:fill="solid" draw:textarea-vertical-align="middle" loext:decorative="false"/>
    </style:style>
    <style:style style:name="gr629" style:family="graphic" style:parent-style-name="objectwithoutfill">
      <style:graphic-properties draw:marker-end="Arrowheads_20_311" draw:marker-end-width="0.3cm" draw:fill="solid" draw:textarea-vertical-align="middle" loext:decorative="false"/>
    </style:style>
    <style:style style:name="gr630" style:family="graphic" style:parent-style-name="objectwithoutfill">
      <style:graphic-properties draw:marker-end="Arrowheads_20_312" draw:marker-end-width="0.3cm" draw:fill="solid" draw:textarea-vertical-align="middle" loext:decorative="false"/>
    </style:style>
    <style:style style:name="gr631" style:family="graphic" style:parent-style-name="objectwithoutfill">
      <style:graphic-properties draw:marker-end="Arrowheads_20_313" draw:marker-end-width="0.3cm" draw:fill="solid" draw:textarea-vertical-align="middle" loext:decorative="false"/>
    </style:style>
    <style:style style:name="gr632"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33" style:family="graphic" style:parent-style-name="objectwithoutfill">
      <style:graphic-properties draw:marker-end="Arrowheads_20_331" draw:marker-end-width="0.3cm" draw:fill="solid" draw:textarea-vertical-align="middle"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style:paragraph-properties fo:margin-top="0.42cm" fo:margin-bottom="0.35cm" fo:text-align="center"/>
      <style:text-properties fo:font-size="10pt" style:font-size-asian="10pt" style:font-size-complex="10pt"/>
    </style:style>
    <style:style style:name="P74" style:family="paragraph">
      <loext:graphic-properties draw:fill="solid" draw:fill-color="#b4d2ea"/>
      <style:paragraph-properties fo:margin-left="0cm" fo:margin-right="0cm" fo:text-align="center" fo:text-indent="0cm"/>
      <style:text-properties fo:color="#000000" loext:opacity="100%"/>
    </style:style>
    <style:style style:name="P75" style:family="paragraph">
      <style:paragraph-properties fo:margin-left="0cm" fo:margin-right="0cm" fo:text-align="center" fo:text-indent="0cm" style:text-autospace="ideograph-alpha"/>
    </style:style>
    <style:style style:name="P76" style:family="paragraph">
      <loext:graphic-properties draw:fill="solid" draw:fill-color="#b4d2ea"/>
      <style:paragraph-properties fo:text-align="center" style:text-autospace="none"/>
      <style:text-properties fo:color="#000000" loext:opacity="100%"/>
    </style:style>
    <style:style style:name="P77" style:family="paragraph">
      <style:paragraph-properties fo:margin-left="0cm" fo:margin-right="0cm" fo:margin-top="0cm" fo:margin-bottom="0cm" fo:text-align="center" fo:text-indent="0cm"/>
    </style:style>
    <style:style style:name="P78" style:family="paragraph">
      <loext:graphic-properties draw:fill="solid" draw:fill-color="#b4d2ea"/>
      <style:paragraph-properties fo:margin-top="0.42cm" fo:margin-bottom="0.35cm" fo:text-align="center"/>
      <style:text-properties fo:color="#000000" loext:opacity="100%"/>
    </style:style>
    <style:style style:name="P79" style:family="paragraph">
      <style:paragraph-properties fo:margin-left="0cm" fo:margin-right="0cm" fo:margin-top="0.42cm" fo:margin-bottom="0.35cm" fo:text-align="center" fo:text-indent="0cm"/>
    </style:style>
    <style:style style:name="P80" style:family="paragraph">
      <loext:graphic-properties draw:fill="none"/>
      <style:paragraph-properties fo:text-align="center"/>
      <style:text-properties fo:font-size="18pt"/>
    </style:style>
    <style:style style:name="P81"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2"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3" style:family="paragraph">
      <loext:graphic-properties draw:fill="solid" draw:fill-color="#00aaad"/>
      <style:paragraph-properties fo:text-align="center"/>
      <style:text-properties fo:font-size="18pt"/>
    </style:style>
    <style:style style:name="P84" style:family="paragraph">
      <loext:graphic-properties draw:fill="solid" draw:fill-color="#dde8cb"/>
      <style:paragraph-properties fo:text-align="center"/>
      <style:text-properties fo:font-size="18pt"/>
    </style:style>
    <style:style style:name="P85" style:family="paragraph">
      <loext:graphic-properties draw:fill="none"/>
      <style:paragraph-properties fo:text-align="center"/>
      <style:text-properties fo:font-size="18pt" style:font-size-asian="18pt" style:font-size-complex="18pt"/>
    </style:style>
    <style:style style:name="P86" style:family="paragraph">
      <loext:graphic-properties draw:fill="solid" draw:fill-color="#b3cac7"/>
      <style:paragraph-properties fo:text-align="center"/>
      <style:text-properties fo:font-size="18pt"/>
    </style:style>
    <style:style style:name="P87"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8" style:family="paragraph">
      <style:paragraph-properties fo:text-align="center"/>
      <style:text-properties fo:font-size="18pt"/>
    </style:style>
    <style:style style:name="P89" style:family="paragraph">
      <loext:graphic-properties draw:fill="none"/>
      <style:text-properties fo:font-size="18pt" style:font-size-asian="18pt" style:font-size-complex="18pt"/>
    </style:style>
    <style:style style:name="P90" style:family="paragraph">
      <loext:graphic-properties draw:fill="none"/>
      <style:text-properties fo:font-size="12pt" fo:font-weight="bold" style:font-size-asian="12pt" style:font-weight-asian="bold" style:font-size-complex="12pt" style:font-weight-complex="bold"/>
    </style:style>
    <style:style style:name="P91" style:family="paragraph">
      <loext:graphic-properties draw:fill="solid" draw:fill-color="#fffcdf"/>
    </style:style>
    <style:style style:name="P92" style:family="paragraph">
      <loext:graphic-properties draw:fill="solid" draw:fill-color="#00a65d"/>
      <style:paragraph-properties fo:text-align="center"/>
    </style:style>
    <style:style style:name="P93" style:family="paragraph">
      <loext:graphic-properties draw:fill="solid" draw:fill-color="#0066b3"/>
      <style:paragraph-properties fo:text-align="center"/>
    </style:style>
    <style:style style:name="P94" style:family="paragraph">
      <loext:graphic-properties draw:fill="solid" draw:fill-color="#28a127"/>
      <style:paragraph-properties fo:text-align="center"/>
    </style:style>
    <style:style style:name="P95" style:family="paragraph">
      <loext:graphic-properties draw:fill="solid" draw:fill-color="#bcaed5" draw:opacity="50%"/>
      <style:paragraph-properties fo:text-align="center"/>
    </style:style>
    <style:style style:name="P96" style:family="paragraph">
      <loext:graphic-properties draw:fill="solid" draw:fill-color="#bce4e5" draw:opacity="50%"/>
      <style:paragraph-properties fo:text-align="center"/>
    </style:style>
    <style:style style:name="P97" style:family="paragraph">
      <loext:graphic-properties draw:fill="solid" draw:fill-color="#bee3d3"/>
      <style:paragraph-properties fo:text-align="center"/>
      <style:text-properties fo:font-weight="bold" style:font-weight-asian="bold" style:font-weight-complex="bold"/>
    </style:style>
    <style:style style:name="P98" style:family="paragraph">
      <loext:graphic-properties draw:fill="none"/>
      <style:paragraph-properties fo:text-align="center"/>
      <style:text-properties fo:font-weight="normal"/>
    </style:style>
    <style:style style:name="P99" style:family="paragraph">
      <loext:graphic-properties draw:fill="solid" draw:fill-color="#000000"/>
    </style:style>
    <style:style style:name="P100" style:family="paragraph">
      <style:paragraph-properties style:writing-mode="lr-tb"/>
    </style:style>
    <style:style style:name="P101"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2"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3" style:family="paragraph">
      <loext:graphic-properties draw:fill="hatch" draw:fill-color="#ffffff" draw:fill-hatch-name="Hatching_20_7" draw:fill-hatch-solid="true"/>
      <style:paragraph-properties fo:text-align="center"/>
    </style:style>
    <style:style style:name="P104" style:family="paragraph">
      <loext:graphic-properties draw:fill="solid" draw:fill-color="#e8995a"/>
      <style:paragraph-properties fo:text-align="center"/>
    </style:style>
    <style:style style:name="P105" style:family="paragraph">
      <loext:graphic-properties draw:fill="solid" draw:fill-color="#c7bcda"/>
      <style:paragraph-properties fo:text-align="center"/>
    </style:style>
    <style:style style:name="P106" style:family="paragraph">
      <loext:graphic-properties draw:fill="solid" draw:fill-color="#f9dc8c"/>
      <style:paragraph-properties fo:text-align="center"/>
    </style:style>
    <style:style style:name="P107" style:family="paragraph">
      <loext:graphic-properties draw:fill="solid" draw:fill-color="#b4d2ea"/>
      <style:paragraph-properties fo:text-align="center"/>
    </style:style>
    <style:style style:name="P108" style:family="paragraph">
      <loext:graphic-properties draw:fill="solid" draw:fill-color="#f6f5f8"/>
      <style:paragraph-properties fo:text-align="center"/>
    </style:style>
    <style:style style:name="P109" style:family="paragraph">
      <loext:graphic-properties draw:fill="solid" draw:fill-color="#f6f5f8"/>
      <style:paragraph-properties fo:margin-left="0cm" fo:margin-right="0cm" fo:margin-top="0cm" fo:margin-bottom="0cm" fo:line-height="100%" fo:text-align="center" fo:text-indent="0cm"/>
    </style:style>
    <style:style style:name="P110"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1" style:family="paragraph">
      <loext:graphic-properties draw:fill="solid" draw:fill-color="#9b592e"/>
      <style:paragraph-properties fo:text-align="center"/>
      <style:text-properties fo:font-weight="normal" style:font-weight-asian="normal" style:font-weight-complex="normal"/>
    </style:style>
    <style:style style:name="P112" style:family="paragraph">
      <loext:graphic-properties draw:fill="solid" draw:fill-color="#d86a50"/>
      <style:paragraph-properties fo:text-align="center"/>
      <style:text-properties fo:font-weight="bold" fo:background-color="#ffffff" style:font-weight-asian="bold" style:font-weight-complex="bold"/>
    </style:style>
    <style:style style:name="P113"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4" style:family="paragraph">
      <loext:graphic-properties draw:fill="solid" draw:fill-color="#6390c2"/>
      <style:paragraph-properties fo:text-align="center"/>
    </style:style>
    <style:style style:name="P115" style:family="paragraph">
      <loext:graphic-properties draw:fill="solid" draw:fill-color="#ffffff"/>
      <style:paragraph-properties fo:text-align="center" style:writing-mode="lr-tb"/>
      <style:text-properties fo:font-size="8pt" style:font-size-asian="8pt" style:font-size-complex="8pt"/>
    </style:style>
    <style:style style:name="P116"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7"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8"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20" style:family="paragraph">
      <style:paragraph-properties fo:text-align="start"/>
    </style:style>
    <style:style style:name="P121" style:family="paragraph">
      <loext:graphic-properties draw:fill="none" draw:fill-color="#ffffff"/>
      <style:paragraph-properties fo:text-align="start"/>
      <style:text-properties fo:font-size="10pt" style:font-size-asian="10pt" style:font-size-complex="10pt"/>
    </style:style>
    <style:style style:name="P122" style:family="paragraph">
      <loext:graphic-properties draw:fill="solid" draw:fill-color="#c7bcda" draw:opacity="100%"/>
      <style:paragraph-properties fo:text-align="center"/>
    </style:style>
    <style:style style:name="P123"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5"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7" style:family="paragraph">
      <loext:graphic-properties draw:fill="none" draw:fill-color="#ffffff"/>
      <style:paragraph-properties fo:text-align="center"/>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cm" fo:margin-bottom="0cm" fo:line-height="100%" fo:text-align="center" fo:text-indent="0cm"/>
      <style:text-properties fo:font-size="9pt" style:font-size-asian="9pt" style:font-size-complex="9pt"/>
    </style:style>
    <style:style style:name="P137" style:family="paragraph">
      <loext:graphic-properties draw:fill="solid" draw:fill-color="#70ae61"/>
      <style:paragraph-properties fo:margin-left="0cm" fo:margin-right="0cm" fo:margin-top="0cm" fo:margin-bottom="0cm" fo:line-height="100%" fo:text-align="center" fo:text-indent="0cm" style:writing-mode="lr-tb"/>
      <style:text-properties fo:font-size="9pt" style:font-size-asian="9pt" style:font-size-complex="9pt"/>
    </style:style>
    <style:style style:name="P138"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39"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0" style:family="paragraph">
      <style:paragraph-properties fo:text-align="center"/>
      <style:text-properties fo:color="#ffffff" loext:opacity="100%" fo:font-size="10pt" style:font-size-asian="10pt" style:font-size-complex="10pt"/>
    </style:style>
    <style:style style:name="P141"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2" style:family="paragraph">
      <loext:graphic-properties draw:fill="solid" draw:fill-color="#6390c2"/>
      <style:paragraph-properties fo:text-align="center" style:writing-mode="lr-tb"/>
      <style:text-properties fo:font-size="10pt" style:font-size-asian="10pt" style:font-size-complex="10pt"/>
    </style:style>
    <style:style style:name="P143" style:family="paragraph">
      <style:paragraph-properties fo:margin-left="0cm" fo:margin-right="0cm" fo:text-align="center" fo:text-indent="0cm"/>
      <style:text-properties fo:color="#ffffff" loext:opacity="100%" fo:font-size="10pt" style:font-size-asian="10pt" style:font-size-complex="10pt"/>
    </style:style>
    <style:style style:name="P144" style:family="paragraph">
      <loext:graphic-properties draw:fill="solid" draw:fill-color="#70ae61"/>
      <style:paragraph-properties fo:text-align="center"/>
      <style:text-properties fo:color="#ffffff" loext:opacity="100%" fo:font-size="8pt" style:font-size-asian="8pt" style:font-size-complex="8pt"/>
    </style:style>
    <style:style style:name="P145" style:family="paragraph">
      <loext:graphic-properties draw:fill="none" draw:fill-color="#ffffff"/>
      <style:text-properties fo:color="#ffffff" loext:opacity="100%" fo:font-size="8pt" style:font-size-asian="8pt" style:font-size-complex="8pt"/>
    </style:style>
    <style:style style:name="P146"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7"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8"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49" style:family="paragraph">
      <style:paragraph-properties fo:margin-top="0.42cm" fo:margin-bottom="0.35cm" fo:text-align="center"/>
      <style:text-properties fo:font-size="8pt" style:font-size-asian="8pt" style:font-size-complex="8pt"/>
    </style:style>
    <style:style style:name="P150"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51" style:family="paragraph">
      <loext:graphic-properties draw:fill="solid" draw:fill-color="#345d95"/>
      <style:paragraph-properties fo:text-align="center"/>
    </style:style>
    <style:style style:name="P152" style:family="paragraph">
      <loext:graphic-properties draw:fill="none" draw:fill-color="#ffffff"/>
      <style:paragraph-properties fo:text-align="center"/>
      <style:text-properties fo:font-size="8pt" style:font-size-asian="8pt" style:font-size-complex="8pt"/>
    </style:style>
    <style:style style:name="P153" style:family="paragraph">
      <loext:graphic-properties draw:fill="none" draw:fill-color="#ffffff"/>
      <style:text-properties fo:color="#f45f74" loext:opacity="100%" fo:font-size="8pt" style:font-size-asian="8pt" style:font-size-complex="8pt"/>
    </style:style>
    <style:style style:name="P154" style:family="paragraph">
      <style:paragraph-properties fo:margin-left="0cm" fo:margin-right="0cm" fo:margin-top="0.42cm" fo:margin-bottom="0.35cm" fo:line-height="100%" fo:text-indent="0cm"/>
    </style:style>
    <style:style style:name="P155"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56"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57"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58"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59" style:family="paragraph">
      <loext:graphic-properties draw:fill="none" draw:fill-color="#ffffff"/>
      <style:text-properties fo:font-size="10pt" fo:font-weight="bold" style:font-size-asian="10pt" style:font-weight-asian="bold" style:font-size-complex="10pt" style:font-weight-complex="bold"/>
    </style:style>
    <style:style style:name="P160" style:family="paragraph">
      <loext:graphic-properties draw:fill="solid" draw:fill-color="#e8995a"/>
      <style:paragraph-properties fo:text-align="center" style:writing-mode="lr-tb"/>
      <style:text-properties fo:font-size="10pt" style:font-size-asian="10pt" style:font-size-complex="10pt"/>
    </style:style>
    <style:style style:name="P16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3"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64"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65" style:family="paragraph">
      <loext:graphic-properties draw:fill="solid" draw:fill-color="#333333"/>
      <style:paragraph-properties fo:text-align="center"/>
    </style:style>
    <style:style style:name="P166" style:family="paragraph">
      <loext:graphic-properties draw:fill="solid" draw:fill-color="#ffffff"/>
      <style:paragraph-properties fo:text-align="center"/>
    </style:style>
    <style:style style:name="P167" style:family="paragraph">
      <loext:graphic-properties draw:fill="solid" draw:fill-color="#cfe8fa"/>
      <style:paragraph-properties fo:text-align="center"/>
    </style:style>
    <style:style style:name="P168" style:family="paragraph">
      <loext:graphic-properties draw:fill="none" draw:fill-color="#cfe8fa"/>
      <style:paragraph-properties fo:text-align="center"/>
    </style:style>
    <style:style style:name="P169"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70" style:family="paragraph">
      <loext:graphic-properties draw:fill="solid" draw:fill-color="#bfe3bd"/>
      <style:paragraph-properties fo:text-align="center"/>
    </style:style>
    <style:style style:name="P171" style:family="paragraph">
      <loext:graphic-properties draw:fill="none" draw:fill-color="#bfe3bd"/>
      <style:paragraph-properties fo:text-align="center"/>
    </style:style>
    <style:style style:name="P172"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73" style:family="paragraph">
      <loext:graphic-properties draw:fill="solid" draw:fill-color="#d36b42"/>
      <style:paragraph-properties fo:text-align="center"/>
    </style:style>
    <style:style style:name="P174" style:family="paragraph">
      <loext:graphic-properties draw:fill="solid" draw:fill-color="#f7d682"/>
      <style:paragraph-properties fo:text-align="center"/>
    </style:style>
    <style:style style:name="P175" style:family="paragraph">
      <loext:graphic-properties draw:fill="none" draw:fill-color="#f7d682"/>
      <style:paragraph-properties fo:text-align="center"/>
    </style:style>
    <style:style style:name="P176" style:family="paragraph">
      <loext:graphic-properties draw:fill="solid" draw:fill-color="#d6cce4"/>
      <style:paragraph-properties fo:text-align="center"/>
    </style:style>
    <style:style style:name="P177" style:family="paragraph">
      <loext:graphic-properties draw:fill="none" draw:fill-color="#d6cce4"/>
      <style:paragraph-properties fo:text-align="center"/>
    </style:style>
    <style:style style:name="P178" style:family="paragraph">
      <loext:graphic-properties draw:fill="none" draw:fill-color="#ffffff"/>
      <style:text-properties fo:font-size="18pt" style:font-size-asian="18pt" style:font-size-complex="18pt"/>
    </style:style>
    <style:style style:name="P179" style:family="paragraph">
      <loext:graphic-properties draw:fill="solid" draw:fill-color="#accda1" draw:opacity="50%"/>
      <style:paragraph-properties fo:text-align="center"/>
    </style:style>
    <style:style style:name="P180" style:family="paragraph">
      <loext:graphic-properties draw:fill="solid" draw:fill-color="#b4d2ea" draw:opacity="50%"/>
      <style:paragraph-properties fo:text-align="center"/>
    </style:style>
    <style:style style:name="P181" style:family="paragraph">
      <loext:graphic-properties draw:fill="none" draw:fill-color="#ffffff"/>
      <style:text-properties fo:color="#00b0be" loext:opacity="100%" fo:font-size="20pt" fo:font-weight="bold" fo:background-color="transparent" style:font-size-asian="20pt" style:font-weight-asian="bold" style:font-size-complex="20pt" style:font-weight-complex="bold"/>
    </style:style>
    <style:style style:name="P182" style:family="paragraph">
      <loext:graphic-properties draw:fill="none" draw:fill-color="#ffffff"/>
      <style:text-properties fo:font-size="10pt" style:font-size-asian="10pt" style:font-size-complex="10pt"/>
    </style:style>
    <style:style style:name="P183" style:family="paragraph">
      <loext:graphic-properties draw:fill="none" draw:fill-color="#ffffff"/>
      <style:paragraph-properties fo:text-align="center"/>
      <style:text-properties fo:color="#ffffff" loext:opacity="100%" fo:font-size="8pt" style:font-size-asian="8pt" style:font-size-complex="8pt"/>
    </style:style>
    <style:style style:name="P184"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85" style:family="paragraph">
      <loext:graphic-properties draw:fill="none"/>
      <style:text-properties fo:font-weight="bold" style:font-weight-asian="bold" style:font-weight-complex="bold"/>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color="#f45f74" loext:opacity="100%" fo:font-size="8pt" style:font-size-asian="8pt" style:font-size-complex="8pt"/>
    </style:style>
    <style:style style:name="T51" style:family="text">
      <style:text-properties fo:font-size="10pt" fo:font-weight="bold" style:font-size-asian="10pt" style:font-weight-asian="bold" style:font-size-complex="10pt" style:font-weight-complex="bold"/>
    </style:style>
    <style:style style:name="T52" style:family="text">
      <style:text-properties fo:color="#00b0be" loext:opacity="100%" fo:font-size="15pt" fo:font-weight="bold" fo:background-color="transparent" style:font-size-asian="15pt" style:font-weight-asian="bold" style:font-size-complex="15pt" style:font-weight-complex="bold"/>
    </style:style>
    <style:style style:name="T53" style:family="text">
      <style:text-properties fo:font-size="10pt" fo:font-weight="normal" style:font-size-asian="10pt" style:font-weight-asian="normal" style:font-size-complex="10pt" style:font-weight-complex="normal"/>
    </style:style>
    <style:style style:name="T54"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5" style:family="text">
      <style:text-properties fo:font-size="18pt" style:font-size-asian="18pt" style:font-size-complex="18pt"/>
    </style:style>
    <style:style style:name="T56"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7" style:family="text">
      <style:text-properties style:text-position="sub 58%"/>
    </style:style>
    <style:style style:name="T58" style:family="text">
      <style:text-properties style:text-position="super 58%"/>
    </style:style>
    <style:style style:name="T59" style:family="text">
      <style:text-properties fo:color="#00b0be" loext:opacity="100%" fo:font-size="20pt" fo:font-weight="bold" fo:background-color="transparent" style:font-size-asian="20pt" style:font-weight-asian="bold" style:font-size-complex="20pt" style:font-weight-complex="bold"/>
    </style:style>
    <style:style style:name="T60" style:family="text">
      <style:text-properties fo:color="#ffffff" loext:opacity="100%" fo:font-size="8pt" fo:font-weight="bold" style:font-size-asian="8pt" style:font-weight-asian="bold" style:font-size-complex="8pt" style:font-weight-complex="bold"/>
    </style:style>
    <style:style style:name="T61"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2" style:family="text">
      <style:text-properties fo:font-size="8pt" fo:font-weight="bold" style:font-size-asian="8pt" style:font-weight-asian="bold" style:font-size-complex="8pt" style:font-weight-complex="bold"/>
    </style:style>
    <style:style style:name="T63" style:family="text">
      <style:text-properties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85" draw:id="id38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48" draw:id="id348"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5cm" svg:x="236.71cm" svg:y="14.962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62cm" svg:x2="241.848cm" svg:y2="13.474cm" draw:start-shape="id36" draw:start-glue-point="4" draw:end-shape="id37" draw:end-glue-point="8" svg:d="M237714 14962c0-1116 4134-372 4134-1488" svg:viewBox="0 0 4135 1489">
            <text:p/>
          </draw:connector>
          <draw:custom-shape draw:style-name="gr64" draw:text-style-name="P45" xml:id="id38" draw:id="id38" draw:layer="layout" svg:width="2.331cm" svg:height="1.025cm" svg:x="245.051cm" svg:y="14.962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62cm" svg:x2="241.847cm" svg:y2="13.474cm" draw:start-shape="id38" draw:start-glue-point="4" draw:end-shape="id37" svg:d="M246217 14962c0-1116-4370-372-4370-1488" svg:viewBox="0 0 4371 1489">
            <text:p/>
          </draw:connector>
          <draw:custom-shape draw:style-name="gr64" draw:text-style-name="P45" xml:id="id39" draw:id="id39" draw:layer="layout" svg:width="2.773cm" svg:height="1.025cm" svg:x="234.618cm" svg:y="17.162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5cm" svg:x="237.756cm" svg:y="17.137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62cm" svg:x2="237.714cm" svg:y2="15.987cm" draw:start-shape="id39" draw:start-glue-point="4" draw:end-shape="id36" draw:end-glue-point="8" svg:d="M236005 17162c0-882 1709-295 1709-1175" svg:viewBox="0 0 1710 1176">
            <text:p/>
          </draw:connector>
          <draw:connector draw:style-name="gr68" draw:text-style-name="P15" draw:layer="layout" draw:type="curve" svg:x1="239.509cm" svg:y1="17.137cm" svg:x2="237.714cm" svg:y2="15.987cm" draw:start-shape="id40" draw:start-glue-point="4" draw:end-shape="id36" draw:end-glue-point="8" svg:d="M239509 17137c0-862-1795-288-1795-1150" svg:viewBox="0 0 1796 1151">
            <text:p/>
          </draw:connector>
          <draw:custom-shape draw:style-name="gr64" draw:text-style-name="P45" xml:id="id41" draw:id="id41" draw:layer="layout" svg:width="2.173cm" svg:height="1.025cm" svg:x="243.624cm" svg:y="17.162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5cm" svg:x="246.862cm" svg:y="17.137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62cm" svg:x2="246.217cm" svg:y2="15.987cm" draw:start-shape="id41" draw:start-glue-point="4" draw:end-shape="id38" draw:end-glue-point="8" svg:d="M244711 17162c0-882 1506-295 1506-1175" svg:viewBox="0 0 1507 1176">
            <text:p/>
          </draw:connector>
          <draw:connector draw:style-name="gr70" draw:text-style-name="P15" draw:layer="layout" draw:type="curve" svg:x1="248.215cm" svg:y1="17.137cm" svg:x2="246.217cm" svg:y2="15.987cm" draw:start-shape="id42" draw:start-glue-point="4" draw:end-shape="id38" draw:end-glue-point="8" svg:d="M248215 17137c0-862-1998-288-1998-1150" svg:viewBox="0 0 1999 1151">
            <text:p/>
          </draw:connector>
          <draw:custom-shape draw:style-name="gr64" draw:text-style-name="P45" xml:id="id43" draw:id="id43" draw:layer="layout" svg:width="3.539cm" svg:height="1.027cm" svg:x="236.021cm" svg:y="20.036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5cm" svg:x="240.231cm" svg:y="19.912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36cm" svg:x2="239.509cm" svg:y2="18.162cm" draw:start-shape="id43" draw:start-glue-point="4" draw:end-shape="id40" draw:end-glue-point="8" svg:d="M237791 20036c0-1405 1718-469 1718-1874" svg:viewBox="0 0 1719 1875">
            <text:p/>
          </draw:connector>
          <draw:connector draw:style-name="gr72" draw:text-style-name="P15" draw:layer="layout" draw:type="curve" svg:x1="241.584cm" svg:y1="19.912cm" svg:x2="239.509cm" svg:y2="18.162cm" draw:start-shape="id44" draw:start-glue-point="4" draw:end-shape="id40" draw:end-glue-point="8" svg:d="M241584 19912c0-1312-2075-438-2075-1750" svg:viewBox="0 0 2076 1751">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75cm" svg:x2="249.055cm" svg:y2="13.159cm" draw:start-shape="id38" draw:start-glue-point="10" draw:end-shape="id45" draw:end-glue-point="3" svg:d="M247382 15475c1255 0 419-2316 1673-2316" svg:viewBox="0 0 1674 2317">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5cm" svg:x="246.862cm" svg:y="17.13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7.692cm" svg:height="19.588cm" svg:x="-68.949cm" svg:y="116.875cm">
          <draw:image xlink:href="Pictures/10000000000002D80000032646F0B612.png" xlink:type="simple" xlink:show="embed" xlink:actuate="onLoad" draw:mime-type="image/png">
            <text:p/>
          </draw:image>
        </draw:frame>
        <draw:frame draw:style-name="gr135" draw:text-style-name="P41" draw:layer="layout" svg:width="16.296cm" svg:height="10.145cm" svg:x="-91.935cm" svg:y="120.303cm">
          <draw:image xlink:href="Pictures/10000000000002CE000001BF8724678F.png" xlink:type="simple" xlink:show="embed" xlink:actuate="onLoad" draw:mime-type="image/png">
            <text:p/>
          </draw:image>
        </draw:frame>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78.306cm" svg:y2="39.681cm" draw:start-shape="id207" draw:start-glue-point="0" draw:end-shape="id208" draw:end-glue-point="7" svg:d="M85267 42449c0-1846-2320-2768-6961-2768" svg:viewBox="0 0 6962 2769">
          <text:p/>
        </draw:connector>
        <draw:custom-shape draw:name="comment box 4" draw:style-name="gr266" draw:text-style-name="P70" xml:id="id208" draw:id="id208" draw:layer="layout" svg:width="3.82cm" svg:height="3.055cm" svg:x="74.486cm" svg:y="38.153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on </text:span><text:span text:style-name="T27"><text:line-break/></text:span><text:span text:style-name="T27">neuron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cognitive</text:span><text:span text:style-name="T29"><text:line-break/></text:span><text:span text:style-name="T29">proces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73">Somatic<text:line-break/>(voluntary)</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ion </text:span><text:span text:style-name="T29"><text:line-break/></text:span><text:span text:style-name="T29">primin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4.23cm" svg:y="56.001cm">
          <text:p text:style-name="P8"><text:span text:style-name="T29">episodic</text:span></text:p>
        </draw:rect>
        <draw:rect draw:style-name="gr255" draw:text-style-name="P67" xml:id="id231" draw:id="id231" draw:layer="layout" svg:width="2.3cm" svg:height="1cm" svg:x="47.104cm" svg:y="56.528cm">
          <text:p text:style-name="P8"><text:span text:style-name="T29">semantic</text:span></text:p>
        </draw:rect>
        <draw:connector draw:style-name="gr65" draw:text-style-name="P15" draw:layer="layout" draw:type="curve" svg:x1="46.254cm" svg:y1="54.528cm" svg:x2="48.254cm" svg:y2="56.528cm" draw:start-shape="id227" draw:start-glue-point="2" draw:end-shape="id231" draw:end-glue-point="0" svg:d="M46254 54528c0 1500 2000 500 2000 2000" svg:viewBox="0 0 2001 2001">
          <text:p/>
        </draw:connector>
        <draw:connector draw:style-name="gr66" draw:text-style-name="P15" draw:layer="layout" draw:type="curve" svg:x1="46.254cm" svg:y1="54.528cm" svg:x2="35.51cm" svg:y2="56.001cm" draw:start-shape="id227" draw:start-glue-point="2" draw:end-shape="id232" draw:end-glue-point="0" svg:d="M46254 54528c0 1105-10744 369-10744 1473" svg:viewBox="0 0 10745 1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8.254cm" svg:y1="57.528cm" svg:x2="53.954cm" svg:y2="59.228cm" draw:start-shape="id231" draw:start-glue-point="2" draw:end-shape="id235" draw:end-glue-point="0" svg:d="M48254 57528c0 1275 5700 425 5700 1700" svg:viewBox="0 0 5701 1701">
          <text:p/>
        </draw:connector>
        <draw:rect draw:name="memory" draw:style-name="gr40" draw:text-style-name="P63" xml:id="id203" draw:id="id203" draw:layer="layout" svg:width="2.4cm" svg:height="1cm" svg:x="68.516cm" svg:y="44.549cm">
          <text:p text:style-name="P5"><text:span text:style-name="T17">memory</text:span></text:p>
        </draw:rect>
        <draw:rect draw:style-name="gr255" draw:text-style-name="P67" xml:id="id236" draw:id="id236"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17.504cm" svg:y="71.728cm">
          <text:p text:style-name="P5">Goal</text:p>
        </draw:rect>
        <draw:connector draw:style-name="gr69" draw:text-style-name="P15" draw:layer="layout" draw:type="curve" svg:x1="16.654cm" svg:y1="69.628cm" svg:x2="18.654cm" svg:y2="71.728cm" draw:start-shape="id238" draw:end-shape="id239" draw:end-glue-point="0" svg:d="M16654 69628c0 1575 2000 525 2000 2100" svg:viewBox="0 0 2001 2101">
          <text:p/>
        </draw:connector>
        <draw:rect draw:style-name="gr292" draw:text-style-name="P35" xml:id="id238" draw:id="id238" draw:layer="layout" svg:width="2.3cm" svg:height="1cm" svg:x="15.504cm" svg:y="68.628cm">
          <text:p text:style-name="P5">Normal<text:line-break/>scenario</text:p>
        </draw:rect>
        <draw:rect draw:style-name="gr292" draw:text-style-name="P35" xml:id="id260" draw:id="id260" draw:layer="layout" svg:width="2.3cm" svg:height="1cm" svg:x="27.314cm" svg:y="68.887cm">
          <text:p text:style-name="P5">follow<text:line-break/>scenario</text:p>
        </draw:rect>
        <draw:rect draw:style-name="gr292" draw:text-style-name="P35" xml:id="id240" draw:id="id240" draw:layer="layout" svg:width="2.3cm" svg:height="1cm" svg:x="24.504cm" svg:y="71.628cm">
          <text:p text:style-name="P5">sensors</text:p>
        </draw:rect>
        <draw:connector draw:style-name="gr92" draw:text-style-name="P15" draw:layer="layout" draw:type="curve" svg:x1="16.654cm" svg:y1="69.628cm" svg:x2="25.654cm" svg:y2="71.628cm" draw:start-shape="id238" draw:start-glue-point="2" draw:end-shape="id240" draw:end-glue-point="0" svg:d="M16654 69628c0 1500 9000 500 9000 2000" svg:viewBox="0 0 9001 2001">
          <text:p/>
        </draw:connector>
        <draw:rect draw:style-name="gr292" draw:text-style-name="P35" xml:id="id241" draw:id="id241" draw:layer="layout" svg:width="2.3cm" svg:height="1cm" svg:x="19.904cm" svg:y="73.828cm">
          <text:p text:style-name="P5">Lidar <text:line-break/>ranges</text:p>
        </draw:rect>
        <draw:connector draw:style-name="gr94" draw:text-style-name="P15" draw:layer="layout" draw:type="curve" svg:x1="25.654cm" svg:y1="72.628cm" svg:x2="21.054cm" svg:y2="73.828cm" draw:start-shape="id240" draw:start-glue-point="2" draw:end-shape="id241" svg:d="M25654 72628c0 900-4600 300-4600 1200" svg:viewBox="0 0 4601 1201">
          <text:p/>
        </draw:connector>
        <draw:rect draw:style-name="gr292" draw:text-style-name="P35" xml:id="id242" draw:id="id242" draw:layer="layout" svg:width="2.3cm" svg:height="1cm" svg:x="22.604cm" svg:y="73.828cm">
          <text:p text:style-name="P5">GPS</text:p>
        </draw:rect>
        <draw:connector draw:style-name="gr95" draw:text-style-name="P15" draw:layer="layout" draw:type="curve" svg:x1="25.654cm" svg:y1="72.628cm" svg:x2="23.754cm" svg:y2="73.828cm" draw:start-shape="id240" draw:start-glue-point="2" draw:end-shape="id242" svg:d="M25654 72628c0 900-1900 300-1900 1200" svg:viewBox="0 0 1901 1201">
          <text:p/>
        </draw:connector>
        <draw:rect draw:style-name="gr255" draw:text-style-name="P74" xml:id="id244" draw:id="id244" draw:layer="layout" svg:width="3.154cm" svg:height="1.57cm" svg:x="22.41cm" svg:y="62.261cm">
          <text:p text:style-name="P8"><text:span text:style-name="T29">Event</text:span><text:span text:style-name="T29"><text:line-break/></text:span><text:span text:style-name="T29">specific</text:span><text:span text:style-name="T29"><text:line-break/></text:span><text:span text:style-name="T29">knowledge</text:span></text:p>
        </draw:rect>
        <draw:connector draw:style-name="gr293" draw:text-style-name="P15" draw:layer="layout" draw:type="curve" svg:x1="27.572cm" svg:y1="60.881cm" svg:x2="23.987cm" svg:y2="62.261cm" draw:start-shape="id243" draw:start-glue-point="2" draw:end-shape="id244" draw:end-glue-point="0" svg:d="M27572 60881c0 1035-3585 345-3585 1380" svg:viewBox="0 0 3586 1381">
          <text:p/>
        </draw:connector>
        <draw:rect draw:style-name="gr292" draw:text-style-name="P35" xml:id="id248" draw:id="id248" draw:layer="layout" svg:width="2.3cm" svg:height="1cm" svg:x="22.734cm" svg:y="65.5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23.884cm" svg:y1="66.568cm" svg:x2="16.654cm" svg:y2="68.628cm" draw:start-shape="id248" draw:start-glue-point="2" draw:end-shape="id238" draw:end-glue-point="0" svg:d="M23884 66568c0 1545-7230 515-7230 2060" svg:viewBox="0 0 7231 2061">
          <text:p/>
        </draw:connector>
        <draw:rect draw:style-name="gr292" draw:text-style-name="P35" xml:id="id249" draw:id="id249" draw:layer="layout" svg:width="2.3cm" svg:height="1cm" svg:x="14.804cm" svg:y="71.728cm">
          <text:p text:style-name="P5">Actions</text:p>
        </draw:rect>
        <draw:rect draw:style-name="gr292" draw:text-style-name="P35" xml:id="id250" draw:id="id250" draw:layer="layout" svg:width="2.3cm" svg:height="1cm" svg:x="12.104cm" svg:y="71.728cm">
          <text:p text:style-name="P5">Plans</text:p>
        </draw:rect>
        <draw:connector draw:style-name="gr294" draw:text-style-name="P15" draw:layer="layout" draw:type="curve" svg:x1="16.654cm" svg:y1="69.628cm" svg:x2="15.954cm" svg:y2="71.728cm" draw:start-shape="id238" draw:start-glue-point="2" draw:end-shape="id249" draw:end-glue-point="0" svg:d="M16654 69628c0 1575-700 525-700 2100" svg:viewBox="0 0 701 2101">
          <text:p/>
        </draw:connector>
        <draw:connector draw:style-name="gr295" draw:text-style-name="P15" draw:layer="layout" draw:type="curve" svg:x1="16.654cm" svg:y1="69.628cm" svg:x2="13.254cm" svg:y2="71.728cm" draw:start-shape="id238" draw:start-glue-point="2" draw:end-shape="id250" svg:d="M16654 69628c0 1575-3400 525-3400 2100" svg:viewBox="0 0 3401 2101">
          <text:p/>
        </draw:connector>
        <draw:rect draw:style-name="gr254" draw:text-style-name="P33" xml:id="id251" draw:id="id251" draw:layer="layout" svg:width="2.5cm" svg:height="1cm" svg:x="71.755cm" svg:y="51.445cm">
          <text:p text:style-name="P5">action</text:p>
        </draw:rect>
        <draw:connector draw:style-name="gr296" draw:text-style-name="P15" draw:layer="layout" draw:type="curve" svg:x1="69.716cm" svg:y1="45.549cm" svg:x2="73.005cm" svg:y2="51.445cm" draw:start-shape="id203" draw:start-glue-point="2" draw:end-shape="id251" draw:end-glue-point="0" svg:d="M69716 45549c0 4422 3289 1474 3289 5896" svg:viewBox="0 0 3290 5897">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ation</text:span></text:p>
        </draw:rect>
        <draw:rect draw:style-name="gr292" draw:text-style-name="P35" xml:id="id254" draw:id="id254" draw:layer="layout" svg:width="2.5cm" svg:height="1cm" svg:x="79.871cm" svg:y="60.528cm">
          <text:p text:style-name="P8"><text:span text:style-name="T27">split</text:span></text:p>
        </draw:rect>
        <draw:rect draw:style-name="gr292" draw:text-style-name="P35" xml:id="id255" draw:id="id255" draw:layer="layout" svg:width="2.5cm" svg:height="1cm" svg:x="82.837cm" svg:y="60.528cm">
          <text:p text:style-name="P8"><text:span text:style-name="T27">cluster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73.005cm" svg:y1="52.445cm" svg:x2="81.254cm" svg:y2="57.328cm" draw:start-shape="id251" draw:start-glue-point="2" draw:end-shape="id252" draw:end-glue-point="0" svg:d="M73005 52445c0 3663 8249 1222 8249 4883" svg:viewBox="0 0 8250 4884">
          <text:p/>
        </draw:connector>
        <draw:rect draw:style-name="gr292" draw:text-style-name="P35" xml:id="id469" draw:id="id469" draw:layer="layout" svg:width="2.5cm" svg:height="1cm" svg:x="85.804cm" svg:y="60.528cm">
          <text:p text:style-name="P8"><text:span text:style-name="T27">Feature</text:span><text:span text:style-name="T27"><text:line-break/></text:span><text:span text:style-name="T27">slice</text:span></text:p>
        </draw:rect>
        <draw:rect draw:style-name="gr292" draw:text-style-name="P35" xml:id="id256" draw:id="id256" draw:layer="layout" svg:width="2.3cm" svg:height="1cm" svg:x="46.472cm" svg:y="59.941cm">
          <text:p text:style-name="P5">goals</text:p>
        </draw:rect>
        <draw:connector draw:style-name="gr301" draw:text-style-name="P15" draw:layer="layout" draw:type="curve" svg:x1="48.254cm" svg:y1="57.528cm" svg:x2="47.622cm" svg:y2="59.941cm" draw:start-shape="id231" draw:start-glue-point="2" draw:end-shape="id256" draw:end-glue-point="0" svg:d="M48254 57528c0 1810-632 604-632 2413" svg:viewBox="0 0 633 2414">
          <text:p/>
        </draw:connector>
        <draw:rect draw:style-name="gr292" draw:text-style-name="P35" xml:id="id257" draw:id="id257" draw:layer="layout" svg:width="2.3cm" svg:height="1cm" svg:x="46.418cm" svg:y="61.675cm">
          <text:p text:style-name="P5">Suprise<text:line-break/>reduction</text:p>
        </draw:rect>
        <draw:connector draw:style-name="gr302" draw:text-style-name="P15" draw:layer="layout" draw:type="curve" svg:x1="47.622cm" svg:y1="60.941cm" svg:x2="47.568cm" svg:y2="61.675cm" draw:start-shape="id256" draw:start-glue-point="2" draw:end-shape="id257" draw:end-glue-point="0" svg:d="M47622 60941c0 550-54 184-54 734" svg:viewBox="0 0 55 735">
          <text:p/>
        </draw:connector>
        <draw:rect draw:style-name="gr255" draw:text-style-name="P67" xml:id="id258" draw:id="id258" draw:layer="layout" svg:width="3.154cm" svg:height="1.57cm" svg:x="29.795cm" svg:y="62.261cm">
          <text:p text:style-name="P8"><text:span text:style-name="T29">General events</text:span></text:p>
        </draw:rect>
        <draw:connector draw:style-name="gr303" draw:text-style-name="P15" draw:layer="layout" draw:type="curve" svg:x1="27.572cm" svg:y1="60.881cm" svg:x2="31.372cm" svg:y2="62.261cm" draw:start-shape="id243" draw:start-glue-point="2" draw:end-shape="id258" draw:end-glue-point="0" svg:d="M27572 60881c0 1035 3800 345 3800 1380" svg:viewBox="0 0 3801 1381">
          <text:p/>
        </draw:connector>
        <draw:rect draw:style-name="gr304" draw:text-style-name="P76" xml:id="id259" draw:id="id259" draw:layer="layout" svg:width="3.154cm" svg:height="1.57cm" svg:x="26.103cm" svg:y="62.261cm">
          <text:p text:style-name="P75"><text:span text:style-name="T29">lifetime</text:span></text:p>
        </draw:rect>
        <draw:connector draw:style-name="gr305" draw:text-style-name="P15" draw:layer="layout" draw:type="curve" svg:x1="27.572cm" svg:y1="60.881cm" svg:x2="27.68cm" svg:y2="62.261cm" draw:start-shape="id243" draw:end-shape="id259" draw:end-glue-point="0" svg:d="M27572 60881c0 1035 108 345 108 1380" svg:viewBox="0 0 109 1381">
          <text:p/>
        </draw:connector>
        <draw:connector draw:style-name="gr306" draw:text-style-name="P15" draw:layer="layout" draw:type="curve" svg:x1="23.987cm" svg:y1="63.831cm" svg:x2="23.884cm" svg:y2="65.568cm" draw:start-shape="id244" draw:start-glue-point="2" draw:end-shape="id248" draw:end-glue-point="0" svg:d="M23987 63831c0 1303-103 435-103 1737" svg:viewBox="0 0 104 1738">
          <text:p/>
        </draw:connector>
        <draw:connector draw:style-name="gr307" draw:text-style-name="P15" draw:layer="layout" draw:type="curve" svg:x1="23.884cm" svg:y1="66.568cm" svg:x2="28.464cm" svg:y2="68.887cm" draw:start-shape="id248" draw:start-glue-point="2" draw:end-shape="id260" draw:end-glue-point="0" svg:d="M23884 66568c0 1740 4580 581 4580 2319" svg:viewBox="0 0 4581 2320">
          <text:p/>
        </draw:connector>
        <draw:rect draw:style-name="gr255" draw:text-style-name="P67" xml:id="id243" draw:id="id243" draw:layer="layout" svg:width="3.804cm" svg:height="1cm" svg:x="25.67cm" svg:y="59.881cm">
          <text:p text:style-name="P8"><text:span text:style-name="T29">Autobiographic</text:span></text:p>
        </draw:rect>
        <draw:connector draw:style-name="gr308" draw:text-style-name="P15" draw:layer="layout" draw:type="curve" svg:x1="35.51cm" svg:y1="57.114cm" svg:x2="27.572cm" svg:y2="59.881cm" draw:start-shape="id232" draw:end-shape="id243" draw:end-glue-point="0" svg:d="M35510 57114c0 2076-7938 693-7938 2767" svg:viewBox="0 0 7939 27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2" draw:id="id262" draw:layer="layout" svg:width="2.138cm" svg:height="1.014cm" svg:x="118.571cm" svg:y="40.55cm">
          <text:p text:style-name="P8"><text:span text:style-name="T29">projection </text:span><text:span text:style-name="T29"><text:line-break/></text:span><text:span text:style-name="T29">neuron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949cm" svg:y="32.36cm">
          <text:p text:style-name="P8"><text:span text:style-name="T29">awareness</text:span></text:p>
        </draw:rect>
        <draw:rect draw:style-name="gr255" draw:text-style-name="P78" xml:id="id267" draw:id="id267" draw:layer="layout" svg:width="2.4cm" svg:height="1cm" svg:x="112.023cm" svg:y="30.205cm">
          <text:p text:style-name="P77"><text:span text:style-name="T29">Consciousness</text:span></text:p>
        </draw:rect>
        <draw:connector draw:style-name="gr313" draw:text-style-name="P15" draw:layer="layout" draw:type="curve" svg:x1="115.171cm" svg:y1="28.951cm" svg:x2="113.223cm" svg:y2="30.205cm" draw:start-shape="id266" draw:start-glue-point="2" draw:end-shape="id267" draw:end-glue-point="0" svg:d="M115171 28951c0 314-487 627-974 627s-974 314-974 627" svg:viewBox="0 0 1949 1255">
          <text:p/>
        </draw:connector>
        <draw:rect draw:style-name="gr255" draw:text-style-name="P78" xml:id="id268" draw:id="id268" draw:layer="layout" svg:width="3.448cm" svg:height="1cm" svg:x="115.797cm" svg:y="30.671cm">
          <text:p text:style-name="P77"><text:span text:style-name="T29">unconscious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enes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gnitio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oring</text:span></text:p>
        </draw:rect>
        <draw:rect draw:style-name="gr255" draw:text-style-name="P78" xml:id="id274" draw:id="id274" draw:layer="layout" svg:width="2.4cm" svg:height="1cm" svg:x="107.733cm" svg:y="37.27cm">
          <text:p text:style-name="P79"><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f-</text:span><text:span text:style-name="T29"><text:line-break/></text:span><text:span text:style-name="T29">regulatio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80"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80"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80" draw:layer="layout" draw:type="line" svg:x1="-101.046cm" svg:y1="68.701cm" svg:x2="-98.561cm" svg:y2="68.713cm" svg:d="M-101046 68701l2485 12" svg:viewBox="0 0 2486 13">
            <text:p/>
          </draw:connector>
          <draw:connector draw:style-name="gr329" draw:text-style-name="P80" draw:layer="layout" draw:type="line" svg:x1="-101.056cm" svg:y1="75.29cm" svg:x2="-98.571cm" svg:y2="75.3cm" svg:d="M-101056 75290l2485 10" svg:viewBox="0 0 2486 11">
            <text:p/>
          </draw:connector>
          <draw:custom-shape draw:style-name="gr330" draw:text-style-name="P81"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2"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2" draw:text-style-name="P83"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80" draw:layer="layout" draw:type="line" svg:x1="-95.15cm" svg:y1="71.967cm" svg:x2="-93.325cm" svg:y2="72.02cm" draw:start-shape="id278" draw:start-glue-point="1" draw:end-shape="id279" draw:end-glue-point="6" svg:d="M-95150 71967l1825 53" svg:viewBox="0 0 1826 54">
            <text:p/>
          </draw:connector>
          <draw:custom-shape draw:style-name="gr332" draw:text-style-name="P83"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3"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80"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4"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5" draw:layer="layout" svg:width="5.423cm" svg:height="1.697cm" svg:x="-87.435cm" svg:y="66.065cm">
            <draw:text-box>
              <text:p text:style-name="P5"><text:span text:style-name="T31">Clustering </text:span></text:p>
              <text:p text:style-name="P5"><text:span text:style-name="T31">abstraction</text:span></text:p>
            </draw:text-box>
          </draw:frame>
          <draw:frame draw:style-name="gr336" draw:text-style-name="P85"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37" draw:text-style-name="P84"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4"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6"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6"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80" draw:layer="layout" svg:x1="-92.172cm" svg:y1="69.065cm" svg:x2="-89.265cm" svg:y2="66.815cm" draw:start-shape="id280" draw:start-glue-point="4" draw:end-shape="id281" draw:end-glue-point="0" svg:d="M-92172 69065v-2250h2907" svg:viewBox="0 0 2908 2251">
            <text:p/>
          </draw:connector>
          <draw:connector draw:style-name="gr340" draw:text-style-name="P80" draw:layer="layout" svg:x1="-92.178cm" svg:y1="74.897cm" svg:x2="-89.265cm" svg:y2="77.107cm" draw:start-shape="id282" draw:start-glue-point="8" draw:end-shape="id283" draw:end-glue-point="0" svg:d="M-92178 74897v2210h2913" svg:viewBox="0 0 2914 2211">
            <text:p/>
          </draw:connector>
          <draw:frame draw:style-name="gr336" draw:text-style-name="P85" draw:layer="layout" svg:width="5.422cm" svg:height="1.696cm" svg:x="-87.433cm" svg:y="76.42cm">
            <draw:text-box>
              <text:p text:style-name="P5"><text:span text:style-name="T31">Abnormality</text:span></text:p>
              <text:p text:style-name="P5"><text:span text:style-name="T31">detection</text:span></text:p>
            </draw:text-box>
          </draw:frame>
          <draw:frame draw:style-name="gr341" draw:text-style-name="P85"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2" draw:text-style-name="P80"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7" draw:layer="layout" svg:width="6.047cm" svg:height="1.697cm" draw:transform="rotate (1.5707963267949) translate (-87.207cm 75.046cm)">
            <draw:text-box>
              <text:p text:style-name="P5"><text:span text:style-name="T31">Proprioceptive DBN</text:span></text:p>
            </draw:text-box>
          </draw:frame>
          <draw:frame draw:style-name="gr336" draw:text-style-name="P87"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3" draw:text-style-name="P80" draw:layer="layout" draw:type="line" svg:x1="-86.991cm" svg:y1="67.564cm" svg:x2="-86.96cm" svg:y2="69.289cm" svg:d="M-86991 67564l31 1725" svg:viewBox="0 0 32 1726">
            <text:p/>
          </draw:connector>
          <draw:connector draw:style-name="gr343" draw:text-style-name="P80" draw:layer="layout" draw:type="line" svg:x1="-82.745cm" svg:y1="67.553cm" svg:x2="-82.713cm" svg:y2="69.28cm" svg:d="M-82745 67553l32 1727" svg:viewBox="0 0 33 1728">
            <text:p/>
          </draw:connector>
          <draw:connector draw:style-name="gr343" draw:text-style-name="P80" draw:layer="layout" draw:type="line" svg:x1="-86.672cm" svg:y1="74.463cm" svg:x2="-86.641cm" svg:y2="76.188cm" svg:d="M-86672 74463l31 1725" svg:viewBox="0 0 32 1726">
            <text:p/>
          </draw:connector>
          <draw:connector draw:style-name="gr343" draw:text-style-name="P80" draw:layer="layout" draw:type="line" svg:x1="-82.424cm" svg:y1="74.453cm" svg:x2="-82.395cm" svg:y2="76.178cm" svg:d="M-82424 74453l29 1725" svg:viewBox="0 0 30 1726">
            <text:p/>
          </draw:connector>
          <draw:connector draw:style-name="gr344" draw:text-style-name="P88" draw:layer="layout" svg:x1="-89.265cm" svg:y1="78.209cm" svg:x2="-92.982cm" svg:y2="72.165cm" draw:start-shape="id283" draw:start-glue-point="4" draw:end-shape="id279" draw:end-glue-point="9" svg:d="M-89265 78209h-1828v-6044h-1889" svg:viewBox="0 0 3718 6045">
            <text:p/>
          </draw:connector>
          <draw:frame draw:style-name="gr345" draw:text-style-name="P89" draw:layer="layout" svg:width="4.985cm" svg:height="1.593cm" draw:transform="rotate (1.5707963267949) translate (-97.297cm 74.331cm)">
            <draw:text-box>
              <text:p><text:span text:style-name="T31">Preprocessing</text:span></text:p>
            </draw:text-box>
          </draw:frame>
          <draw:frame draw:style-name="gr346" draw:text-style-name="P90"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47" draw:text-style-name="P91"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2"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4"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4"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2"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5"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6"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7"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7"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7"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5.355cm" svg:y1="75.144cm" svg:x2="-115.355cm" svg:y2="75.931cm" draw:start-shape="id284" draw:start-glue-point="8" draw:end-shape="id285" draw:end-glue-point="0" svg:d="M-115355 75144v787" svg:viewBox="0 0 1 788">
            <text:p/>
          </draw:connector>
          <draw:connector draw:style-name="gr360" draw:text-style-name="P98" draw:layer="layout" draw:type="line" svg:x1="-115.355cm" svg:y1="76.838cm" svg:x2="-115.355cm" svg:y2="77.647cm" draw:start-shape="id285" draw:start-glue-point="8" draw:end-shape="id286" draw:end-glue-point="4" svg:d="M-115355 76838v809" svg:viewBox="0 0 1 810">
            <text:p/>
          </draw:connector>
          <draw:custom-shape draw:style-name="gr361" draw:text-style-name="P97"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7"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7"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0.363cm" svg:y1="75.147cm" svg:x2="-110.363cm" svg:y2="75.931cm" draw:start-shape="id287" draw:start-glue-point="8" draw:end-shape="id288" draw:end-glue-point="0" svg:d="M-110363 75147v784" svg:viewBox="0 0 1 785">
            <text:p/>
          </draw:connector>
          <draw:connector draw:style-name="gr360" draw:text-style-name="P98" draw:layer="layout" draw:type="line" svg:x1="-110.363cm" svg:y1="76.838cm" svg:x2="-110.363cm" svg:y2="77.649cm" draw:start-shape="id288" draw:start-glue-point="8" draw:end-shape="id289" draw:end-glue-point="4" svg:d="M-110363 76838v811" svg:viewBox="0 0 1 812">
            <text:p/>
          </draw:connector>
          <draw:connector draw:style-name="gr360" draw:text-style-name="P98" draw:layer="layout" draw:type="line" svg:x1="-114.848cm" svg:y1="74.692cm" svg:x2="-110.871cm" svg:y2="74.694cm" draw:start-shape="id284" draw:start-glue-point="10" draw:end-shape="id287" draw:end-glue-point="6" svg:d="M-114848 74692l3977 2" svg:viewBox="0 0 3978 3">
            <text:p/>
          </draw:connector>
          <draw:connector draw:style-name="gr360" draw:text-style-name="P98"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9"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9"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9" draw:layer="layout" svg:width="0.068cm" svg:height="0.11cm" svg:x="-108.942cm" svg:y="75.389cm" svg:viewBox="0 0 69 111" svg:d="M44 5c0-5-1-5-7-5-11 11-31 11-34 11h-3v7h3c4 0 14-1 24-4v83c0 5 0 8-17 8h-8v6c9 0 25 0 34 0s24 0 33 0v-6h-8c-17 0-17-3-17-8z">
              <text:p/>
            </draw:path>
            <draw:path draw:style-name="gr363" draw:text-style-name="P99"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9"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9"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9" draw:layer="layout" svg:width="0.086cm" svg:height="0.155cm" svg:x="-113.076cm" svg:y="74.24cm" svg:viewBox="0 0 87 156" svg:d="M53 7c0-7-1-7-7-7-15 15-36 15-46 15v9c5 0 21 0 34-8v121c0 7 0 10-23 10h-9v9c4 0 34-2 42-2 7 0 37 2 43 2v-9h-10c-24 0-24-3-24-10z">
              <text:p/>
            </draw:path>
            <draw:path draw:style-name="gr363" draw:text-style-name="P99"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9"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9"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9" draw:layer="layout" svg:width="0.085cm" svg:height="0.154cm" svg:x="-113.076cm" svg:y="75.967cm" svg:viewBox="0 0 86 155" svg:d="M53 7c0-7-1-7-7-7-15 15-36 15-46 15v9c5 0 21 0 34-8v120c0 8 0 11-23 11h-9v8c4 0 33-1 42-1 7 0 37 1 42 1v-8h-9c-24 0-24-3-24-11z">
              <text:p/>
            </draw:path>
            <draw:path draw:style-name="gr363" draw:text-style-name="P99"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9"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9"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9" draw:layer="layout" svg:width="0.086cm" svg:height="0.154cm" svg:x="-115.427cm" svg:y="74.481cm" svg:viewBox="0 0 87 155" svg:d="M53 7c0-7 0-7-7-7-15 15-36 15-46 15v9c5 0 21 0 34-8v120c0 8 0 11-23 11h-9v8c4 0 34-1 42-1 7 0 37 1 43 1v-8h-10c-24 0-24-3-24-11z">
              <text:p/>
            </draw:path>
            <draw:path draw:style-name="gr363" draw:text-style-name="P99"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47cm" svg:y="74.792cm" svg:viewBox="0 0 159 12" svg:d="M150 12c3 0 9 0 9-6s-6-6-9-6h-141c-4 0-9 0-9 6s5 6 9 6z">
              <text:p/>
            </draw:path>
            <draw:path draw:style-name="gr363" draw:text-style-name="P99"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9"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9" draw:layer="layout" svg:width="0.086cm" svg:height="0.154cm" svg:x="-115.379cm" svg:y="76.178cm" svg:viewBox="0 0 87 155" svg:d="M53 7c0-7 0-7-7-7-15 15-36 15-46 15v9c5 0 21 0 34-8v120c0 8 0 11-23 11h-9v8c4 0 34-1 42-1 7 0 37 1 43 1v-8h-10c-24 0-24-3-24-11z">
              <text:p/>
            </draw:path>
            <draw:path draw:style-name="gr363" draw:text-style-name="P99"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9" draw:layer="layout" svg:width="0.158cm" svg:height="0.011cm" svg:x="-115.305cm" svg:y="76.489cm" svg:viewBox="0 0 159 12" svg:d="M150 12c3 0 9 0 9-6s-6-6-9-6h-141c-4 0-9 0-9 6s5 6 9 6z">
              <text:p/>
            </draw:path>
            <draw:path draw:style-name="gr363" draw:text-style-name="P99"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9"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086cm" svg:height="0.154cm" svg:x="-115.41cm" svg:y="77.893cm" svg:viewBox="0 0 87 155" svg:d="M53 7c0-7-1-7-7-7-15 15-36 15-46 15v9c5 0 21 0 34-8v120c0 8 0 11-23 11h-9v8c4 0 34-1 42-1 7 0 37 1 43 1v-8h-10c-24 0-24-3-24-11z">
              <text:p/>
            </draw:path>
            <draw:path draw:style-name="gr363" draw:text-style-name="P99"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34cm" svg:y="78.205cm" svg:viewBox="0 0 159 12" svg:d="M150 12c3 0 9 0 9-6s-6-6-9-6h-141c-4 0-9 0-9 6s5 6 9 6z">
              <text:p/>
            </draw:path>
            <draw:path draw:style-name="gr363" draw:text-style-name="P99"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9"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9" draw:layer="layout" svg:width="0.085cm" svg:height="0.154cm" svg:x="-110.269cm" svg:y="74.483cm" svg:viewBox="0 0 86 155" svg:d="M53 7c0-7 0-7-7-7-15 15-36 15-46 15v9c5 0 21 0 34-8v120c0 8 0 11-23 11h-9v8c4 0 33-1 42-1 7 0 37 1 42 1v-8h-9c-24 0-24-3-24-11z">
              <text:p/>
            </draw:path>
            <draw:path draw:style-name="gr363" draw:text-style-name="P99"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9"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9" draw:layer="layout" svg:width="0.085cm" svg:height="0.154cm" svg:x="-110.223cm" svg:y="76.178cm" svg:viewBox="0 0 86 155" svg:d="M53 7c0-7 0-7-7-7-15 15-36 15-46 15v9c5 0 21 0 34-8v120c0 8 0 11-23 11h-9v8c4 0 33-1 42-1 7 0 37 1 42 1v-8h-9c-24 0-24-3-24-11z">
              <text:p/>
            </draw:path>
            <draw:path draw:style-name="gr363" draw:text-style-name="P99"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9"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086cm" svg:height="0.154cm" svg:x="-110.252cm" svg:y="77.893cm" svg:viewBox="0 0 87 155" svg:d="M53 7c0-7-1-7-7-7-15 15-36 15-46 15v9c5 0 21 0 34-8v120c0 8 0 11-23 11h-9v8c4 0 34-1 42-1 7 0 37 1 43 1v-8h-10c-24 0-24-3-24-11z">
              <text:p/>
            </draw:path>
            <draw:path draw:style-name="gr363" draw:text-style-name="P99"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7"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7"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7"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5.359cm" svg:y1="69.615cm" svg:x2="-115.359cm" svg:y2="68.829cm" draw:start-shape="id290" draw:start-glue-point="4" draw:end-shape="id291" draw:end-glue-point="8" svg:d="M-115359 69615v-786" svg:viewBox="0 0 1 787">
            <text:p/>
          </draw:connector>
          <draw:connector draw:style-name="gr360" draw:text-style-name="P98" draw:layer="layout" draw:type="line" svg:x1="-115.359cm" svg:y1="71.329cm" svg:x2="-115.359cm" svg:y2="70.521cm" draw:start-shape="id292" draw:start-glue-point="4" draw:end-shape="id290" draw:end-glue-point="8" svg:d="M-115359 71329v-808" svg:viewBox="0 0 1 809">
            <text:p/>
          </draw:connector>
          <draw:custom-shape draw:style-name="gr365" draw:text-style-name="P97"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7"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7"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0.366cm" svg:y1="69.615cm" svg:x2="-110.366cm" svg:y2="68.829cm" draw:start-shape="id293" draw:start-glue-point="4" draw:end-shape="id294" draw:end-glue-point="8" svg:d="M-110366 69615v-786" svg:viewBox="0 0 1 787">
            <text:p/>
          </draw:connector>
          <draw:connector draw:style-name="gr360" draw:text-style-name="P98" draw:layer="layout" draw:type="line" svg:x1="-110.366cm" svg:y1="71.332cm" svg:x2="-110.366cm" svg:y2="70.521cm" draw:start-shape="id295" draw:start-glue-point="4" draw:end-shape="id293" draw:end-glue-point="8" svg:d="M-110366 71332v-811" svg:viewBox="0 0 1 812">
            <text:p/>
          </draw:connector>
          <draw:connector draw:style-name="gr360" draw:text-style-name="P98" draw:layer="layout" draw:type="line" svg:x1="-114.851cm" svg:y1="71.784cm" svg:x2="-110.875cm" svg:y2="71.785cm" draw:start-shape="id292" draw:start-glue-point="10" draw:end-shape="id295" draw:end-glue-point="6" svg:d="M-114851 71784l3976 1" svg:viewBox="0 0 3977 2">
            <text:p/>
          </draw:connector>
          <draw:connector draw:style-name="gr360" draw:text-style-name="P98"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9"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9"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9" draw:layer="layout" svg:width="0.158cm" svg:height="0.011cm" svg:x="-115.31cm" svg:y="70.171cm" svg:viewBox="0 0 159 12" svg:d="M150 12c3 0 9 0 9-6s-6-6-9-6h-141c-4 0-9 0-9 6s5 6 9 6z">
              <text:p/>
            </draw:path>
            <draw:path draw:style-name="gr363" draw:text-style-name="P99"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9"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37cm" svg:y="68.495cm" svg:viewBox="0 0 159 12" svg:d="M150 12c3 0 9 0 9-6s-6-6-9-6h-141c-4 0-9 0-9 6s5 6 9 6z">
              <text:p/>
            </draw:path>
            <draw:path draw:style-name="gr363" draw:text-style-name="P99"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9"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9"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9"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9"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7"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7"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8" draw:layer="layout" draw:type="line" svg:x1="-114.358cm" svg:y1="73.522cm" svg:x2="-115.355cm" svg:y2="74.24cm" draw:start-shape="id296" draw:start-glue-point="7" draw:end-shape="id284" draw:end-glue-point="4" svg:d="M-114358 73522l-997 718" svg:viewBox="0 0 998 719">
            <text:p/>
          </draw:connector>
          <draw:connector draw:style-name="gr360" draw:text-style-name="P98"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8" draw:layer="layout" draw:type="line" svg:x1="-111.36cm" svg:y1="73.523cm" svg:x2="-110.723cm" svg:y2="74.372cm" draw:start-shape="id297" draw:start-glue-point="9" draw:end-shape="id287" draw:end-glue-point="5" svg:d="M-111360 73523l637 849" svg:viewBox="0 0 638 850">
            <text:p/>
          </draw:connector>
          <draw:connector draw:style-name="gr360" draw:text-style-name="P98" draw:layer="layout" draw:type="line" svg:x1="-111.36cm" svg:y1="72.88cm" svg:x2="-110.726cm" svg:y2="72.106cm" draw:start-shape="id297" draw:start-glue-point="11" draw:end-shape="id295" draw:end-glue-point="7" svg:d="M-111360 72880l634-774" svg:viewBox="0 0 635 775">
            <text:p/>
          </draw:connector>
          <draw:connector draw:style-name="gr360" draw:text-style-name="P98"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9"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9"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3.913cm" svg:y="73.258cm" svg:viewBox="0 0 159 12" svg:d="M150 12c3 0 9 0 9-6s-6-6-9-6h-141c-4 0-9 0-9 6s5 6 9 6z">
              <text:p/>
            </draw:path>
            <draw:path draw:style-name="gr363" draw:text-style-name="P99"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9"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9"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9"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9"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9"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9"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9"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9"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9"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9"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9"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9"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9"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9"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9"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9"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9" draw:layer="layout" svg:width="0.158cm" svg:height="0.011cm" svg:x="-115.345cm" svg:y="71.875cm" svg:viewBox="0 0 159 12" svg:d="M150 12c3 0 9 0 9-6s-6-6-9-6h-141c-4 0-9 0-9 6s5 6 9 6z">
              <text:p/>
            </draw:path>
            <draw:path draw:style-name="gr363" draw:text-style-name="P99"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9"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9"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9"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9"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9" draw:layer="layout" svg:width="0.086cm" svg:height="0.155cm" svg:x="-110.874cm" svg:y="75.275cm" svg:viewBox="0 0 87 156" svg:d="M53 7c0-7 0-7-7-7-15 15-36 15-46 15v9c5 0 21 0 34-8v121c0 7 0 10-23 10h-9v9c4 0 34-2 42-2 7 0 37 2 43 2v-9h-10c-24 0-24-3-24-10z">
              <text:p/>
            </draw:path>
            <draw:path draw:style-name="gr363" draw:text-style-name="P99"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9"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9"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9"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9"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9"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9"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9"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9"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9"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9" draw:layer="layout" svg:width="0.068cm" svg:height="0.11cm" svg:x="-108.634cm" svg:y="70.912cm" svg:viewBox="0 0 69 111" svg:d="M44 5c0-5-1-5-7-5-11 11-31 11-34 11h-3v7h3c4 0 14-1 24-4v83c0 5 0 8-17 8h-8v6c9 0 25 0 33 0 10 0 24 0 34 0v-6h-8c-17 0-17-3-17-8z">
              <text:p/>
            </draw:path>
          </draw:g>
          <draw:frame draw:style-name="gr367" draw:text-style-name="P101" draw:layer="layout" svg:width="2.93cm" svg:height="1.096cm" draw:transform="rotate (1.5707963267949) translate (-108.336cm 77.328cm)">
            <draw:text-box>
              <text:p text:style-name="P100"><text:span text:style-name="T33">robot 1</text:span></text:p>
            </draw:text-box>
          </draw:frame>
          <draw:frame draw:style-name="gr367" draw:text-style-name="P102" draw:layer="layout" svg:width="2.93cm" svg:height="1.096cm" draw:transform="rotate (1.5707963267949) translate (-108.291cm 70.891cm)">
            <draw:text-box>
              <text:p text:style-name="P100"><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1"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2"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4"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4"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2"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1"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2"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3"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3"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4"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4"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4"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2"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2"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3"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23.835cm" svg:y="57.3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572cm" svg:y1="59.881cm" svg:x2="25.135cm" svg:y2="58.734cm" draw:start-shape="id243" draw:start-glue-point="0" draw:end-shape="id298" draw:end-glue-point="6" svg:d="M27572 59881c0-859-2437-286-2437-1147" svg:viewBox="0 0 2438 1148">
          <text:p/>
        </draw:connector>
        <draw:g draw:style-name="gr31">
          <draw:rect draw:style-name="gr376" draw:text-style-name="P104" draw:layer="layout" svg:width="3.611cm" svg:height="7.25cm" svg:x="236.382cm" svg:y="-9.872cm">
            <text:p/>
          </draw:rect>
          <draw:rect draw:style-name="gr377" draw:text-style-name="P105" xml:id="id299" draw:id="id299" draw:layer="layout" svg:width="3.01cm" svg:height="1.489cm" svg:x="211.272cm" svg:y="-7.578cm">
            <text:p text:style-name="P5">stimulus</text:p>
          </draw:rect>
          <draw:rect draw:style-name="gr378" draw:text-style-name="P106"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5" xml:id="id301" draw:id="id301" draw:layer="layout" svg:width="3.01cm" svg:height="1.489cm" svg:x="232.57cm" svg:y="-7.578cm">
            <text:p text:style-name="P5">brain</text:p>
          </draw:rect>
          <draw:rect draw:style-name="gr377" draw:text-style-name="P105"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5"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5"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5"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5"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6" xml:id="id313" draw:id="id313" draw:layer="layout" svg:width="3.01cm" svg:height="1.489cm" svg:x="236.645cm" svg:y="-4.277cm">
            <text:p text:style-name="P5">trace</text:p>
          </draw:rect>
          <draw:rect draw:style-name="gr378" draw:text-style-name="P106"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7" draw:layer="layout" svg:width="4.727cm" svg:height="7.25cm" svg:x="245.382cm" svg:y="-9.872cm">
            <text:p/>
          </draw:rect>
          <draw:rect draw:style-name="gr391" draw:text-style-name="P108" xml:id="id310" draw:id="id310" draw:layer="layout" svg:width="4.153cm" svg:height="1.489cm" svg:x="245.645cm" svg:y="-9.278cm">
            <text:p text:style-name="P5">Modality<text:line-break/>(ie times-ranges)</text:p>
          </draw:rect>
          <draw:rect draw:style-name="gr392" draw:text-style-name="P109" xml:id="id312" draw:id="id312" draw:layer="layout" svg:width="4.153cm" svg:height="1.489cm" svg:x="245.645cm" svg:y="-4.277cm">
            <text:p text:style-name="P3">Modality</text:p>
          </draw:rect>
          <draw:rect draw:style-name="gr393" draw:text-style-name="P109"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3.223cm" svg:y1="31.205cm" svg:x2="113.149cm" svg:y2="32.36cm" draw:start-shape="id267" draw:start-glue-point="2" draw:end-shape="id323" svg:d="M113223 31205c0 867-74 290-74 1155" svg:viewBox="0 0 75 1156">
          <text:p/>
        </draw:connector>
        <draw:frame draw:style-name="gr135" draw:text-style-name="P41" draw:layer="layout" svg:width="18.252cm" svg:height="25.316cm" svg:x="95.12cm" svg:y="-7.955cm">
          <draw:image xlink:href="Pictures/10000000000002B2000003BD26BB6070.png" xlink:type="simple" xlink:show="embed" xlink:actuate="onLoad" draw:mime-type="image/png">
            <text:p/>
          </draw:image>
        </draw:frame>
        <draw:rect draw:style-name="gr407" draw:text-style-name="P106" draw:layer="layout" svg:width="3.439cm" svg:height="4.472cm" svg:x="-55.906cm" svg:y="15.663cm">
          <text:p/>
        </draw:rect>
        <draw:rect draw:style-name="gr408" draw:text-style-name="P110"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1" xml:id="id324" draw:id="id324" draw:layer="layout" svg:width="2.726cm" svg:height="1.24cm" svg:x="-55.549cm" svg:y="15.946cm">
          <text:p text:style-name="P5"><text:span text:style-name="T26">composite</text:span><text:span text:style-name="T26"><text:line-break/></text:span><text:span text:style-name="T26">goal</text:span></text:p>
        </draw:rect>
        <draw:rect draw:style-name="gr388" draw:text-style-name="P112" draw:layer="layout" svg:width="2.256cm" svg:height="1.003cm" svg:x="-51.234cm" svg:y="17.569cm">
          <text:p text:style-name="P5"><text:span text:style-name="T17">Planning</text:span></text:p>
        </draw:rect>
        <draw:rect draw:style-name="gr407" draw:text-style-name="P106" draw:layer="layout" svg:width="3.439cm" svg:height="4.472cm" svg:x="-47.912cm" svg:y="15.663cm">
          <text:p/>
        </draw:rect>
        <draw:rect draw:style-name="gr408" draw:text-style-name="P113" xml:id="id327" draw:id="id327" draw:layer="layout" svg:width="2.256cm" svg:height="1.003cm" svg:x="-47.32cm" svg:y="18.923cm">
          <text:p text:style-name="P5"><text:span text:style-name="T35">Suprise </text:span><text:span text:style-name="T35"><text:line-break/></text:span><text:span text:style-name="T35">redu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1" xml:id="id326" draw:id="id326" draw:layer="layout" svg:width="2.726cm" svg:height="1.24cm" svg:x="-47.555cm" svg:y="15.946cm">
          <text:p text:style-name="P5"><text:span text:style-name="T26">composit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4"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4"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5"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6" xml:id="id329" draw:id="id329"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6" xml:id="id330" draw:id="id330" draw:layer="layout" svg:width="2.714cm" svg:height="1.841cm" svg:x="-47.549cm" svg:y="20.93cm">
          <text:p text:style-name="P5"><text:span text:style-name="T36">Learning by </text:span><text:span text:style-name="T36"><text:line-break/></text:span><text:span text:style-name="T36">demonstratio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6" xml:id="id331" draw:id="id331"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8" draw:text-style-name="P116"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6" xml:id="id332" draw:id="id332" draw:layer="layout" svg:width="2.714cm" svg:height="1.841cm" svg:x="-45.835cm" svg:y="29.484cm">
          <text:p text:style-name="P5"><text:span text:style-name="T36">Using KF</text:span><text:span text:style-name="T36"><text:line-break/></text:span><text:span text:style-name="T36">in prediction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7" xml:id="id334" draw:id="id334" draw:layer="layout" svg:width="3.177cm" svg:height="1.897cm" svg:x="-31.801cm" svg:y="4.909cm">
          <text:p text:style-name="P8"><text:span text:style-name="T5">Surprise poise</text:span><text:span text:style-name="T5"><text:line-break/></text:span><text:span text:style-name="T5">(keeping surprise</text:span><text:span text:style-name="T5"><text:line-break/></text:span><text:span text:style-name="T5">below a tolerance)</text:span></text:p>
        </draw:rect>
        <draw:rect draw:style-name="gr38" draw:text-style-name="P4" xml:id="id335" draw:id="id335" draw:layer="layout" svg:width="3.67cm" svg:height="1.892cm" svg:x="-27.561cm" svg:y="4.925cm">
          <text:p text:style-name="P5"><text:span text:style-name="T2">Homeostasis</text:span><text:span text:style-name="T2"><text:line-break/></text:span><text:span text:style-name="T2">(keeping the physical</text:span><text:span text:style-name="T2"><text:line-break/></text:span><text:span text:style-name="T2">and chemical </text:span><text:span text:style-name="T2"><text:line-break/></text:span><text:span text:style-name="T2">conditions, balanced)</text:span></text:p>
        </draw:rect>
        <draw:rect draw:style-name="gr292" draw:text-style-name="P35" xml:id="id336" draw:id="id336" draw:layer="layout" svg:width="2.3cm" svg:height="1cm" svg:x="43.707cm" svg:y="59.941cm">
          <text:p text:style-name="P5">Actions</text:p>
        </draw:rect>
        <draw:connector draw:style-name="gr422" draw:text-style-name="P15" draw:layer="layout" draw:type="curve" svg:x1="48.254cm" svg:y1="57.528cm" svg:x2="44.857cm" svg:y2="59.941cm" draw:start-shape="id231" draw:start-glue-point="2" draw:end-shape="id336" draw:end-glue-point="0" svg:d="M48254 57528c0 1810-3397 604-3397 2413" svg:viewBox="0 0 3398 2414">
          <text:p/>
        </draw:connector>
        <draw:rect draw:style-name="gr292" draw:text-style-name="P35" xml:id="id338" draw:id="id338" draw:layer="layout" svg:width="2.3cm" svg:height="1cm" svg:x="40.738cm" svg:y="59.941cm">
          <text:p text:style-name="P5">Plan</text:p>
        </draw:rect>
        <draw:rect draw:style-name="gr292" draw:text-style-name="P35" xml:id="id337" draw:id="id337" draw:layer="layout" svg:width="2.3cm" svg:height="1cm" svg:x="43.707cm" svg:y="61.675cm">
          <text:p text:style-name="P5">Suprise<text:line-break/>poise</text:p>
        </draw:rect>
        <draw:connector draw:style-name="gr423" draw:text-style-name="P15" draw:layer="layout" draw:type="curve" svg:x1="44.857cm" svg:y1="60.941cm" svg:x2="44.857cm" svg:y2="61.675cm" draw:start-shape="id336" draw:start-glue-point="2" draw:end-shape="id337" draw:end-glue-point="0" svg:d="M44857 60941v734" svg:viewBox="0 0 1 735">
          <text:p/>
        </draw:connector>
        <draw:connector draw:style-name="gr424" draw:text-style-name="P15" draw:layer="layout" draw:type="curve" svg:x1="48.254cm" svg:y1="57.528cm" svg:x2="41.888cm" svg:y2="59.941cm" draw:start-shape="id231" draw:start-glue-point="2" draw:end-shape="id338" draw:end-glue-point="0" svg:d="M48254 57528c0 1810-6366 604-6366 2413" svg:viewBox="0 0 6367 2414">
          <text:p/>
        </draw:connector>
        <draw:rect draw:style-name="gr292" draw:text-style-name="P35" xml:id="id339" draw:id="id339" draw:layer="layout" svg:width="2.3cm" svg:height="1cm" svg:x="61.329cm" svg:y="55.972cm">
          <text:p text:style-name="P5">Running<text:line-break/>plan</text:p>
        </draw:rect>
        <draw:connector draw:style-name="gr425" draw:text-style-name="P15" draw:layer="layout" draw:type="curve" svg:x1="60.954cm" svg:y1="54.528cm" svg:x2="62.479cm" svg:y2="55.972cm" draw:start-shape="id236" draw:start-glue-point="2" draw:end-shape="id339" draw:end-glue-point="0" svg:d="M60954 54528c0 1083 1525 361 1525 1444" svg:viewBox="0 0 1526 1445">
          <text:p/>
        </draw:connector>
        <draw:rect draw:style-name="gr292" draw:text-style-name="P35" xml:id="id340" draw:id="id340" draw:layer="layout" svg:width="2.3cm" svg:height="1cm" svg:x="58.945cm" svg:y="58.704cm">
          <text:p text:style-name="P5">Goal<text:line-break/>composite</text:p>
        </draw:rect>
        <draw:rect draw:style-name="gr292" draw:text-style-name="P35" xml:id="id341" draw:id="id341" draw:layer="layout" svg:width="2.3cm" svg:height="1cm" svg:x="63.867cm" svg:y="58.704cm">
          <text:p text:style-name="P5">Action<text:line-break/>composite</text:p>
        </draw:rect>
        <draw:connector draw:style-name="gr426" draw:text-style-name="P15" draw:layer="layout" draw:type="curve" svg:x1="61.245cm" svg:y1="59.204cm" svg:x2="63.867cm" svg:y2="59.204cm" draw:start-shape="id340" draw:start-glue-point="1" draw:end-shape="id341" draw:end-glue-point="3" svg:d="M61245 59204h2622" svg:viewBox="0 0 2623 1">
          <text:p text:style-name="P5">updates</text:p>
        </draw:connector>
        <draw:connector draw:style-name="gr427" draw:text-style-name="P15" draw:layer="layout" draw:type="curve" svg:x1="62.479cm" svg:y1="56.972cm" svg:x2="60.095cm" svg:y2="58.704cm" draw:start-shape="id339" draw:start-glue-point="2" draw:end-shape="id340" draw:end-glue-point="0" svg:d="M62479 56972c0 1299-2384 433-2384 1732" svg:viewBox="0 0 2385 1733">
          <text:p/>
        </draw:connector>
        <draw:connector draw:style-name="gr428" draw:text-style-name="P15" draw:layer="layout" draw:type="curve" svg:x1="62.479cm" svg:y1="56.972cm" svg:x2="65.017cm" svg:y2="58.704cm" draw:start-shape="id339" draw:start-glue-point="2" draw:end-shape="id341" draw:end-glue-point="0" svg:d="M62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7" xml:id="id356" draw:id="id356" draw:layer="layout" svg:width="2.022cm" svg:height="1.04cm" svg:x="15.446cm" svg:y="98.421cm">
          <text:p text:style-name="P5">Control</text:p>
        </draw:rect>
        <draw:g draw:style-name="gr23">
          <draw:rect draw:style-name="gr432" draw:text-style-name="P107" draw:layer="layout" svg:width="2.022cm" svg:height="1.04cm" svg:x="-26.217cm" svg:y="99.337cm">
            <text:p text:style-name="P5">Action</text:p>
          </draw:rect>
          <draw:rect draw:style-name="gr433" draw:text-style-name="P107" xml:id="id349" draw:id="id349" draw:layer="layout" svg:width="4.3cm" svg:height="2.151cm" svg:x="-27.377cm" svg:y="98.226cm">
            <text:p text:style-name="P5">Control<text:line-break/>signal<text:line-break/>(generated by<text:line-break/>Flight controller)</text:p>
          </draw:rect>
          <draw:rect draw:style-name="gr433" draw:text-style-name="P107" xml:id="id351" draw:id="id351" draw:layer="layout" svg:width="2.022cm" svg:height="1.04cm" svg:x="-28.232cm" svg:y="103.515cm">
            <text:p text:style-name="P5">Goal gain</text:p>
          </draw:rect>
          <draw:rect draw:style-name="gr432" draw:text-style-name="P107" draw:layer="layout" svg:width="2.022cm" svg:height="1.04cm" svg:x="-26.217cm" svg:y="101.337cm">
            <text:p text:style-name="P5">Action</text:p>
          </draw:rect>
          <draw:rect draw:style-name="gr433" draw:text-style-name="P107" xml:id="id350" draw:id="id350" draw:layer="layout" svg:width="2.022cm" svg:height="1.04cm" svg:x="-26.217cm" svg:y="101.337cm">
            <text:p text:style-name="P5">Feedback</text:p>
          </draw:rect>
          <draw:rect draw:style-name="gr433" draw:text-style-name="P107"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7"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7"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7"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7" xml:id="id359" draw:id="id359" draw:layer="layout" svg:width="2.022cm" svg:height="1.04cm" svg:x="27.053cm" svg:y="101.034cm">
          <text:p text:style-name="P5">Planing</text:p>
        </draw:rect>
        <draw:rect draw:style-name="gr255" draw:text-style-name="P107" xml:id="id437" draw:id="id437"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7" xml:id="id365" draw:id="id365" draw:layer="layout" svg:width="2.022cm" svg:height="1.04cm" svg:x="21.776cm" svg:y="102.207cm">
          <text:p text:style-name="P5">Attention</text:p>
        </draw:rect>
        <draw:rect draw:style-name="gr255" draw:text-style-name="P107"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8"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7" xml:id="id366" draw:id="id366" draw:layer="layout" svg:width="2.022cm" svg:height="1.04cm" svg:x="25.567cm" svg:y="97.929cm">
          <text:p text:style-name="P5">Short term<text:line-break/>memory</text:p>
        </draw:rect>
        <draw:rect draw:style-name="gr442" draw:text-style-name="P119"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7"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1" draw:layer="layout" svg:width="9.739cm" svg:height="2.221cm" svg:x="-96.545cm" svg:y="31.437cm">
            <draw:text-box>
              <text:p text:style-name="P120"><text:span text:style-name="T12">From A Neurocognitive Perspective on the</text:span></text:p>
              <text:p text:style-name="P120"><text:span text:style-name="T12">Forms and Functions of Autobiographical Memory Retrieval</text:span><text:span text:style-name="T12"><text:line-break/></text:span><text:span text:style-name="T12">and the Construction of Autobiographical Memories</text:span></text:p>
              <text:p text:style-name="P120"><text:span text:style-name="T12">in the Self-Memory System and AI</text:span></text:p>
              <text:p text:style-name="P120"><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2"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58" draw:text-style-name="P124" xml:id="id375" draw:id="id375" draw:layer="layout" svg:width="0.323cm" svg:height="0.323cm" svg:x="-43.371cm" svg:y="40.411cm">
          <text:p text:style-name="P123"><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6" xml:id="id377" draw:id="id377" draw:layer="layout" svg:width="0.323cm" svg:height="0.323cm" svg:x="-43.357cm" svg:y="43.572cm">
          <text:p text:style-name="P125"><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6" xml:id="id379" draw:id="id379" draw:layer="layout" svg:width="0.323cm" svg:height="0.323cm" svg:x="-43.679cm" svg:y="41.978cm">
          <text:p text:style-name="P125"><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6" xml:id="id381" draw:id="id381" draw:layer="layout" svg:width="0.323cm" svg:height="0.323cm" svg:x="-43.61cm" svg:y="44.873cm">
          <text:p text:style-name="P125"><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6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7"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3"><text:span text:style-name="T3">physical</text:span><text:span text:style-name="T3"><text:line-break/></text:span><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composite</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76" draw:id="id37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0" draw:id="id380"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569cm 39.816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86" draw:start-glue-point="6" draw:end-shape="id387" draw:end-glue-point="10" svg:d="M-43898 75064h-1110" svg:viewBox="0 0 1111 1">
          <text:p/>
        </draw:connector>
        <draw:connector draw:style-name="gr36" draw:text-style-name="P7" draw:layer="layout" draw:type="curve" svg:x1="-45.899cm" svg:y1="75.064cm" svg:x2="-47.007cm" svg:y2="75.064cm" draw:start-shape="id387" draw:start-glue-point="6" draw:end-shape="id16" draw:end-glue-point="10" svg:d="M-45899 75064h-1108" svg:viewBox="0 0 1109 1">
          <text:p/>
        </draw:connector>
        <draw:custom-shape draw:style-name="gr34" draw:text-style-name="P26" xml:id="id389" draw:id="id38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88" draw:start-glue-point="6" draw:end-shape="id389" draw:end-glue-point="10" svg:d="M-36898 75064h-1110" svg:viewBox="0 0 1111 1">
          <text:p/>
        </draw:connector>
        <draw:custom-shape draw:style-name="gr479" draw:text-style-name="P107" draw:layer="layout" svg:width="16.317cm" svg:height="1.952cm" svg:x="-51.303cm" svg:y="72.113cm">
          <text:p/>
          <draw:enhanced-geometry svg:viewBox="0 0 21600 21600" draw:type="rectangle" draw:enhanced-path="M 0 0 L 21600 0 21600 21600 0 21600 0 0 Z N"/>
        </draw:custom-shape>
        <draw:frame draw:style-name="gr48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42.98cm" svg:y="72.774cm">
          <draw:text-box>
            <text:p>+</text:p>
          </draw:text-box>
        </draw:frame>
        <draw:frame draw:style-name="gr483" draw:text-style-name="P38" draw:layer="layout" svg:width="1.849cm" svg:height="1.039cm" svg:x="-46.949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72.774cm">
          <draw:text-box>
            <text:p>+</text:p>
          </draw:text-box>
        </draw:frame>
        <draw:frame draw:style-name="gr484" draw:text-style-name="P11" draw:layer="layout" svg:width="1.684cm" svg:height="0.57cm" svg:x="-42.281cm" svg:y="72.851cm">
          <draw:text-box>
            <text:p><text:span text:style-name="T4">DBSCAN</text:span></text:p>
          </draw:text-box>
        </draw:frame>
        <draw:custom-shape draw:style-name="gr485"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3cm" svg:y="70.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3cm" svg:y="70.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001cm" svg:y="70.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8cm" svg:y="70.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4cm" svg:y1="70.944cm" svg:x2="-44.059cm" svg:y2="70.962cm">
            <text:p/>
          </draw:line>
          <draw:line draw:style-name="gr488" draw:text-style-name="P15" draw:layer="layout" svg:x1="-43.511cm" svg:y1="70.961cm" svg:x2="-43.013cm" svg:y2="70.956cm">
            <text:p/>
          </draw:line>
          <draw:line draw:style-name="gr488" draw:text-style-name="P15" draw:layer="layout" svg:x1="-42.465cm" svg:y1="70.961cm" svg:x2="-41.948cm" svg:y2="70.956cm">
            <text:p/>
          </draw:line>
        </draw:g>
        <draw:connector draw:style-name="gr489" draw:text-style-name="P7" draw:layer="layout" draw:type="curve" svg:x1="-39.312cm" svg:y1="75.023cm" svg:x2="-42.625cm" svg:y2="75.026cm" svg:d="M-39312 75023c-2484 0-828 3-3313 3" svg:viewBox="0 0 3314 4">
          <text:p/>
        </draw:connector>
        <draw:connector draw:style-name="gr489" draw:text-style-name="P7" draw:layer="layout" draw:type="curve" svg:x1="-45.797cm" svg:y1="70.923cm" svg:x2="-46.878cm" svg:y2="70.927cm" svg:d="M-45797 70923c-810 0-270 4-1081 4" svg:viewBox="0 0 1082 5">
          <text:p/>
        </draw:connector>
        <draw:connector draw:style-name="gr489" draw:text-style-name="P7" draw:layer="layout" draw:type="curve" svg:x1="-39.807cm" svg:y1="70.923cm" svg:x2="-40.888cm" svg:y2="70.927cm" svg:d="M-39807 70923c-810 0-270 4-1081 4" svg:viewBox="0 0 1082 5">
          <text:p/>
        </draw:connector>
        <draw:custom-shape draw:style-name="gr48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7" draw:layer="layout" svg:width="16.317cm" svg:height="1.952cm" svg:x="-51.302cm" svg:y="76.113cm">
          <text:p/>
          <draw:enhanced-geometry svg:viewBox="0 0 21600 21600" draw:type="rectangle" draw:enhanced-path="M 0 0 L 21600 0 21600 21600 0 21600 0 0 Z N"/>
        </draw:custom-shape>
        <draw:frame draw:style-name="gr10" draw:text-style-name="P11" draw:layer="layout" svg:width="1.684cm" svg:height="1.205cm" svg:x="-44.28cm" svg:y="76.451cm">
          <draw:text-box>
            <text:p><text:span text:style-name="T4">DBSCAN on 0</text:span><text:span text:style-name="T43">th</text:span><text:span text:style-name="T44">and</text:span><text:span text:style-name="T44"><text:line-break/></text:span><text:span text:style-name="T44">2</text:span><text:span text:style-name="T43">nd</text:span></text:p>
          </draw:text-box>
        </draw:frame>
        <draw:custom-shape draw:style-name="gr490"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390" draw:start-glue-point="6" draw:end-shape="id391" draw:end-glue-point="10" svg:d="M-47898 79064h-1110" svg:viewBox="0 0 1111 1">
          <text:p/>
        </draw:connector>
        <draw:custom-shape draw:style-name="gr34" draw:text-style-name="P26" xml:id="id393" draw:id="id39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392" draw:start-glue-point="6" draw:end-shape="id393" draw:end-glue-point="10" svg:d="M-43898 79064h-1110" svg:viewBox="0 0 1111 1">
          <text:p/>
        </draw:connector>
        <draw:connector draw:style-name="gr36" draw:text-style-name="P7" draw:layer="layout" draw:type="curve" svg:x1="-45.899cm" svg:y1="79.064cm" svg:x2="-47.007cm" svg:y2="79.064cm" draw:start-shape="id393" draw:start-glue-point="6" draw:end-shape="id390" draw:end-glue-point="10" svg:d="M-45899 79064h-1108" svg:viewBox="0 0 1109 1">
          <text:p/>
        </draw:connector>
        <draw:custom-shape draw:style-name="gr34" draw:text-style-name="P26" xml:id="id395" draw:id="id39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394" draw:start-glue-point="6" draw:end-shape="id395" draw:end-glue-point="10" svg:d="M-36898 79064h-1110" svg:viewBox="0 0 1111 1">
          <text:p/>
        </draw:connector>
        <draw:connector draw:style-name="gr489" draw:text-style-name="P7" draw:layer="layout" draw:type="curve" svg:x1="-39.312cm" svg:y1="79.023cm" svg:x2="-42.625cm" svg:y2="79.026cm" svg:d="M-39312 79023c-2484 0-828 3-3313 3" svg:viewBox="0 0 3314 4">
          <text:p/>
        </draw:connector>
        <draw:custom-shape draw:style-name="gr479" draw:text-style-name="P107" draw:layer="layout" svg:width="16.317cm" svg:height="1.952cm" svg:x="-51.301cm" svg:y="79.913cm">
          <text:p/>
          <draw:enhanced-geometry svg:viewBox="0 0 21600 21600" draw:type="rectangle" draw:enhanced-path="M 0 0 L 21600 0 21600 21600 0 21600 0 0 Z N"/>
        </draw:custom-shape>
        <draw:custom-shape draw:style-name="gr491"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2" draw:text-style-name="P137" draw:layer="layout" svg:width="1.818cm" svg:height="1.705cm" svg:x="-44.457cm" svg:y="80.092cm">
          <text:p text:style-name="P136"><text:span text:style-name="T45">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7" draw:layer="layout" svg:width="16.317cm" svg:height="1.952cm" svg:x="-51.302cm" svg:y="72.113cm">
          <text:p/>
          <draw:enhanced-geometry svg:viewBox="0 0 21600 21600" draw:type="rectangle" draw:enhanced-path="M 0 0 L 21600 0 21600 21600 0 21600 0 0 Z N"/>
        </draw:custom-shape>
        <draw:frame draw:style-name="gr480" draw:text-style-name="P38" draw:layer="layout" svg:width="1.966cm" svg:height="1.433cm" svg:x="-44.748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79cm" svg:y="72.774cm">
          <draw:text-box>
            <text:p>+</text:p>
          </draw:text-box>
        </draw:frame>
        <draw:frame draw:style-name="gr483" draw:text-style-name="P38" draw:layer="layout" svg:width="1.849cm" svg:height="1.039cm" svg:x="-46.948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8cm" svg:y="72.774cm">
          <draw:text-box>
            <text:p>+</text:p>
          </draw:text-box>
        </draw:frame>
        <draw:frame draw:style-name="gr484" draw:text-style-name="P11" draw:layer="layout" svg:width="1.684cm" svg:height="0.57cm" svg:x="-42.28cm" svg:y="72.851cm">
          <draw:text-box>
            <text:p><text:span text:style-name="T4">DBSCAN</text:span></text:p>
          </draw:text-box>
        </draw:frame>
        <draw:custom-shape draw:style-name="gr490"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7" draw:layer="layout" svg:width="16.317cm" svg:height="1.952cm" svg:x="-51.303cm" svg:y="68.113cm">
          <text:p/>
          <draw:enhanced-geometry svg:viewBox="0 0 21600 21600" draw:type="rectangle" draw:enhanced-path="M 0 0 L 21600 0 21600 21600 0 21600 0 0 Z N"/>
        </draw:custom-shape>
        <draw:frame draw:style-name="gr48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8cm" svg:y="68.774cm">
          <draw:text-box>
            <text:p>+</text:p>
          </draw:text-box>
        </draw:frame>
        <draw:frame draw:style-name="gr48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68.774cm">
          <draw:text-box>
            <text:p>+</text:p>
          </draw:text-box>
        </draw:frame>
        <draw:frame draw:style-name="gr484" draw:text-style-name="P11" draw:layer="layout" svg:width="1.684cm" svg:height="0.57cm" svg:x="-42.281cm" svg:y="68.851cm">
          <draw:text-box>
            <text:p><text:span text:style-name="T4">DBSCAN</text:span></text:p>
          </draw:text-box>
        </draw:frame>
        <draw:custom-shape draw:style-name="gr485" draw:text-style-name="P134"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7" draw:layer="layout" svg:width="16.317cm" svg:height="1.952cm" svg:x="-51.302cm" svg:y="68.113cm">
          <text:p/>
          <draw:enhanced-geometry svg:viewBox="0 0 21600 21600" draw:type="rectangle" draw:enhanced-path="M 0 0 L 21600 0 21600 21600 0 21600 0 0 Z N"/>
        </draw:custom-shape>
        <draw:frame draw:style-name="gr480" draw:text-style-name="P38" draw:layer="layout" svg:width="1.966cm" svg:height="1.433cm" svg:x="-44.748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79cm" svg:y="68.774cm">
          <draw:text-box>
            <text:p>+</text:p>
          </draw:text-box>
        </draw:frame>
        <draw:frame draw:style-name="gr483" draw:text-style-name="P38" draw:layer="layout" svg:width="1.849cm" svg:height="1.039cm" svg:x="-46.948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8cm" svg:y="68.774cm">
          <draw:text-box>
            <text:p>+</text:p>
          </draw:text-box>
        </draw:frame>
        <draw:frame draw:style-name="gr484" draw:text-style-name="P11" draw:layer="layout" svg:width="1.684cm" svg:height="0.57cm" svg:x="-42.28cm" svg:y="68.851cm">
          <draw:text-box>
            <text:p><text:span text:style-name="T4">DBSCAN</text:span></text:p>
          </draw:text-box>
        </draw:frame>
        <draw:custom-shape draw:style-name="gr490"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8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8cm" svg:y="66.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3cm" svg:y="66.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4cm" svg:y="66.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9cm" svg:y="66.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3cm" svg:y1="66.948cm" svg:x2="-44.133cm" svg:y2="66.938cm">
            <text:p/>
          </draw:line>
          <draw:line draw:style-name="gr488" draw:text-style-name="P15" draw:layer="layout" svg:x1="-43.511cm" svg:y1="66.962cm" svg:x2="-43.088cm" svg:y2="66.951cm">
            <text:p/>
          </draw:line>
          <draw:line draw:style-name="gr488" draw:text-style-name="P15" draw:layer="layout" svg:x1="-42.465cm" svg:y1="66.962cm" svg:x2="-41.95cm" svg:y2="66.965cm">
            <text:p/>
          </draw:line>
        </draw:g>
        <draw:connector draw:style-name="gr489" draw:text-style-name="P7" draw:layer="layout" draw:type="curve" svg:x1="-45.797cm" svg:y1="66.924cm" svg:x2="-46.878cm" svg:y2="66.928cm" svg:d="M-45797 66924c-810 0-270 4-1081 4" svg:viewBox="0 0 1082 5">
          <text:p/>
        </draw:connector>
        <draw:connector draw:style-name="gr489" draw:text-style-name="P7" draw:layer="layout" draw:type="curve" svg:x1="-39.807cm" svg:y1="66.924cm" svg:x2="-40.888cm" svg:y2="66.928cm" svg:d="M-39807 66924c-810 0-270 4-1081 4" svg:viewBox="0 0 1082 5">
          <text:p/>
        </draw:connector>
        <draw:custom-shape draw:style-name="gr48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3" draw:text-style-name="P138" xml:id="id396" draw:id="id396" draw:layer="layout" svg:width="5.693cm" svg:height="3.474cm" svg:x="-16.503cm" svg:y="49.103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4" draw:text-style-name="P139"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5" draw:text-style-name="P13" draw:layer="layout" svg:width="3.475cm" svg:height="0.878cm" svg:x="-36.072cm" svg:y="39.061cm">
          <draw:text-box>
            <text:p text:style-name="P3"><text:span text:style-name="T7">Robot 1</text:span></text:p>
          </draw:text-box>
        </draw:frame>
        <draw:connector draw:style-name="gr496"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decoder</text:span></text:p>
        </draw:connector>
        <draw:frame draw:style-name="gr497" draw:text-style-name="P13" draw:layer="layout" svg:width="3.475cm" svg:height="0.878cm" svg:x="-30.214cm" svg:y="49.736cm">
          <draw:text-box>
            <text:p text:style-name="P3"><text:span text:style-name="T7">Robot 2</text:span></text:p>
          </draw:text-box>
        </draw:frame>
        <draw:g draw:style-name="gr31">
          <draw:custom-shape draw:style-name="gr498" draw:text-style-name="P141" xml:id="id402" draw:id="id402" draw:layer="layout" svg:width="0.891cm" svg:height="0.97cm" svg:x="-56.868cm" svg:y="46.203cm">
            <text:p text:style-name="P140"><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04" draw:id="id404" draw:layer="layout" svg:width="0.891cm" svg:height="0.97cm" svg:x="-56.867cm" svg:y="47.503cm">
            <text:p text:style-name="P140"><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06" draw:id="id406" draw:layer="layout" svg:width="0.891cm" svg:height="0.97cm" svg:x="-56.866cm" svg:y="48.803cm">
            <text:p text:style-name="P140"><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08" draw:id="id408" draw:layer="layout" svg:width="0.891cm" svg:height="0.97cm" svg:x="-56.865cm" svg:y="50.103cm">
            <text:p text:style-name="P140"><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03" draw:id="id403" draw:layer="layout" svg:width="0.891cm" svg:height="0.97cm" svg:x="-53.964cm" svg:y="47.503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05" draw:id="id405" draw:layer="layout" svg:width="0.891cm" svg:height="0.97cm" svg:x="-53.963cm" svg:y="48.603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07" draw:id="id407" draw:layer="layout" svg:width="0.891cm" svg:height="0.97cm" svg:x="-53.962cm" svg:y="49.703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5.977cm" svg:y1="46.688cm" svg:x2="-53.964cm" svg:y2="47.988cm" draw:start-shape="id402" draw:start-glue-point="10" draw:end-shape="id403" draw:end-glue-point="6" svg:d="M-55977 46688l2013 1300" svg:viewBox="0 0 2014 1301">
            <text:p/>
          </draw:connector>
          <draw:connector draw:style-name="gr500" draw:text-style-name="P15" draw:layer="layout" draw:type="line" svg:x1="-55.976cm" svg:y1="47.988cm" svg:x2="-53.963cm" svg:y2="49.088cm" draw:start-shape="id404" draw:start-glue-point="10" draw:end-shape="id405" draw:end-glue-point="6" svg:d="M-55976 47988l2013 1100" svg:viewBox="0 0 2014 1101">
            <text:p/>
          </draw:connector>
          <draw:connector draw:style-name="gr500" draw:text-style-name="P15" draw:layer="layout" draw:type="line" svg:x1="-55.975cm" svg:y1="49.288cm" svg:x2="-53.962cm" svg:y2="50.188cm" draw:start-shape="id406" draw:start-glue-point="10" draw:end-shape="id407" draw:end-glue-point="6" svg:d="M-55975 49288l2013 900" svg:viewBox="0 0 2014 901">
            <text:p/>
          </draw:connector>
          <draw:connector draw:style-name="gr500" draw:text-style-name="P15" draw:layer="layout" draw:type="line" svg:x1="-55.974cm" svg:y1="50.588cm" svg:x2="-53.962cm" svg:y2="50.188cm" draw:start-shape="id408" draw:start-glue-point="10" draw:end-shape="id407" draw:end-glue-point="6" svg:d="M-55974 50588l2012-400" svg:viewBox="0 0 2013 401">
            <text:p/>
          </draw:connector>
          <draw:connector draw:style-name="gr500" draw:text-style-name="P15" draw:layer="layout" draw:type="line" svg:x1="-55.974cm" svg:y1="50.588cm" svg:x2="-53.963cm" svg:y2="49.088cm" draw:start-shape="id408" draw:start-glue-point="10" draw:end-shape="id405" draw:end-glue-point="6" svg:d="M-55974 50588l2011-1500" svg:viewBox="0 0 2012 1501">
            <text:p/>
          </draw:connector>
          <draw:connector draw:style-name="gr500" draw:text-style-name="P15" draw:layer="layout" draw:type="line" svg:x1="-55.974cm" svg:y1="50.588cm" svg:x2="-53.964cm" svg:y2="47.988cm" draw:start-shape="id408" draw:start-glue-point="10" draw:end-shape="id403" draw:end-glue-point="6" svg:d="M-55974 50588l2010-2600" svg:viewBox="0 0 2011 2601">
            <text:p/>
          </draw:connector>
          <draw:connector draw:style-name="gr500" draw:text-style-name="P15" draw:layer="layout" draw:type="line" svg:x1="-55.975cm" svg:y1="49.288cm" svg:x2="-53.963cm" svg:y2="49.088cm" draw:start-shape="id406" draw:start-glue-point="10" draw:end-shape="id405" draw:end-glue-point="6" svg:d="M-55975 49288l2012-200" svg:viewBox="0 0 2013 201">
            <text:p/>
          </draw:connector>
          <draw:connector draw:style-name="gr500" draw:text-style-name="P15" draw:layer="layout" draw:type="line" svg:x1="-55.975cm" svg:y1="49.288cm" svg:x2="-53.964cm" svg:y2="47.988cm" draw:start-shape="id406" draw:start-glue-point="10" draw:end-shape="id403" draw:end-glue-point="6" svg:d="M-55975 49288l2011-1300" svg:viewBox="0 0 2012 1301">
            <text:p/>
          </draw:connector>
          <draw:connector draw:style-name="gr500" draw:text-style-name="P15" draw:layer="layout" draw:type="line" svg:x1="-55.976cm" svg:y1="47.988cm" svg:x2="-53.964cm" svg:y2="47.988cm" draw:start-shape="id404" draw:start-glue-point="10" draw:end-shape="id403" draw:end-glue-point="6" svg:d="M-55976 47988h2012" svg:viewBox="0 0 2013 1">
            <text:p/>
          </draw:connector>
          <draw:connector draw:style-name="gr500" draw:text-style-name="P15" draw:layer="layout" draw:type="line" svg:x1="-55.976cm" svg:y1="47.988cm" svg:x2="-53.962cm" svg:y2="50.188cm" draw:start-shape="id404" draw:start-glue-point="10" draw:end-shape="id407" draw:end-glue-point="6" svg:d="M-55976 47988l2014 2200" svg:viewBox="0 0 2015 2201">
            <text:p/>
          </draw:connector>
          <draw:connector draw:style-name="gr500" draw:text-style-name="P15" draw:layer="layout" draw:type="line" svg:x1="-55.977cm" svg:y1="46.688cm" svg:x2="-53.963cm" svg:y2="49.088cm" draw:start-shape="id402" draw:start-glue-point="10" draw:end-shape="id405" draw:end-glue-point="6" svg:d="M-55977 46688l2014 2400" svg:viewBox="0 0 2015 2401">
            <text:p/>
          </draw:connector>
          <draw:connector draw:style-name="gr500" draw:text-style-name="P15" draw:layer="layout" draw:type="line" svg:x1="-55.977cm" svg:y1="46.688cm" svg:x2="-53.962cm" svg:y2="50.188cm" draw:start-shape="id402" draw:start-glue-point="10" draw:end-shape="id407" draw:end-glue-point="6" svg:d="M-55977 46688l2015 3500" svg:viewBox="0 0 2016 3501">
            <text:p/>
          </draw:connector>
          <draw:custom-shape draw:style-name="gr498" draw:text-style-name="P141" xml:id="id409" draw:id="id409" draw:layer="layout" svg:width="0.891cm" svg:height="0.97cm" svg:x="-51.068cm" svg:y="46.203cm">
            <text:p text:style-name="P143"><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0" draw:id="id410" draw:layer="layout" svg:width="0.891cm" svg:height="0.97cm" svg:x="-51.067cm" svg:y="47.503cm">
            <text:p text:style-name="P143"><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1" draw:id="id411" draw:layer="layout" svg:width="0.891cm" svg:height="0.97cm" svg:x="-51.066cm" svg:y="48.803cm">
            <text:p text:style-name="P143"><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2" draw:id="id412" draw:layer="layout" svg:width="0.891cm" svg:height="0.97cm" svg:x="-51.065cm" svg:y="50.103cm">
            <text:p text:style-name="P143"><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3.073cm" svg:y1="47.988cm" svg:x2="-51.068cm" svg:y2="46.688cm" draw:start-shape="id403" draw:start-glue-point="10" draw:end-shape="id409" draw:end-glue-point="6" svg:d="M-53073 47988l2005-1300" svg:viewBox="0 0 2006 1301">
            <text:p/>
          </draw:connector>
          <draw:connector draw:style-name="gr500" draw:text-style-name="P15" draw:layer="layout" draw:type="line" svg:x1="-53.072cm" svg:y1="47.988cm" svg:x2="-51.067cm" svg:y2="47.988cm" draw:end-shape="id410" draw:end-glue-point="6" svg:d="M-53072 47988h2005" svg:viewBox="0 0 2006 1">
            <text:p/>
          </draw:connector>
          <draw:connector draw:style-name="gr500" draw:text-style-name="P15" draw:layer="layout" draw:type="line" svg:x1="-53.071cm" svg:y1="47.988cm" svg:x2="-51.066cm" svg:y2="49.288cm" draw:end-shape="id411" draw:end-glue-point="6" svg:d="M-53071 47988l2005 1300" svg:viewBox="0 0 2006 1301">
            <text:p/>
          </draw:connector>
          <draw:connector draw:style-name="gr500" draw:text-style-name="P15" xml:id="id432" draw:id="id432" draw:layer="layout" draw:type="line" svg:x1="-53.07cm" svg:y1="47.988cm" svg:x2="-51.065cm" svg:y2="50.588cm" draw:end-shape="id412" draw:end-glue-point="6" svg:d="M-53070 47988l2005 2600" svg:viewBox="0 0 2006 2601">
            <text:p/>
          </draw:connector>
          <draw:connector draw:style-name="gr500" draw:text-style-name="P15" draw:layer="layout" draw:type="line" svg:x1="-53.072cm" svg:y1="49.088cm" svg:x2="-51.068cm" svg:y2="46.688cm" draw:start-shape="id405" draw:start-glue-point="10" draw:end-shape="id409" draw:end-glue-point="6" svg:d="M-53072 49088l2004-2400" svg:viewBox="0 0 2005 2401">
            <text:p/>
          </draw:connector>
          <draw:connector draw:style-name="gr500" draw:text-style-name="P15" draw:layer="layout" draw:type="line" svg:x1="-53.071cm" svg:y1="49.088cm" svg:x2="-51.067cm" svg:y2="47.988cm" draw:end-shape="id410" draw:end-glue-point="6" svg:d="M-53071 49088l2004-1100" svg:viewBox="0 0 2005 1101">
            <text:p/>
          </draw:connector>
          <draw:connector draw:style-name="gr500" draw:text-style-name="P15" draw:layer="layout" draw:type="line" svg:x1="-53.071cm" svg:y1="49.088cm" svg:x2="-51.066cm" svg:y2="49.288cm" draw:end-shape="id411" draw:end-glue-point="6" svg:d="M-53071 49088l2005 200" svg:viewBox="0 0 2006 201">
            <text:p/>
          </draw:connector>
          <draw:connector draw:style-name="gr500" draw:text-style-name="P15" xml:id="id431" draw:id="id431" draw:layer="layout" draw:type="line" svg:x1="-53.07cm" svg:y1="49.088cm" svg:x2="-51.065cm" svg:y2="50.588cm" draw:end-shape="id412" draw:end-glue-point="6" svg:d="M-53070 49088l2005 1500" svg:viewBox="0 0 2006 1501">
            <text:p/>
          </draw:connector>
          <draw:connector draw:style-name="gr500" draw:text-style-name="P15" draw:layer="layout" draw:type="line" svg:x1="-53.071cm" svg:y1="50.188cm" svg:x2="-51.065cm" svg:y2="50.588cm" draw:start-shape="id407" draw:start-glue-point="10" draw:end-shape="id412" draw:end-glue-point="6" svg:d="M-53071 50188l2006 400" svg:viewBox="0 0 2007 401">
            <text:p/>
          </draw:connector>
          <draw:connector draw:style-name="gr500" draw:text-style-name="P15" draw:layer="layout" draw:type="line" svg:x1="-53.07cm" svg:y1="50.188cm" svg:x2="-51.066cm" svg:y2="49.288cm" draw:end-shape="id411" draw:end-glue-point="6" svg:d="M-53070 50188l2004-900" svg:viewBox="0 0 2005 901">
            <text:p/>
          </draw:connector>
          <draw:connector draw:style-name="gr500" draw:text-style-name="P15" draw:layer="layout" draw:type="line" svg:x1="-53.07cm" svg:y1="50.188cm" svg:x2="-51.067cm" svg:y2="47.988cm" draw:end-shape="id410" draw:end-glue-point="6" svg:d="M-53070 50188l2003-2200" svg:viewBox="0 0 2004 2201">
            <text:p/>
          </draw:connector>
          <draw:connector draw:style-name="gr500" draw:text-style-name="P15" draw:layer="layout" draw:type="line" svg:x1="-53.069cm" svg:y1="50.188cm" svg:x2="-51.068cm" svg:y2="46.688cm" draw:end-shape="id409" draw:end-glue-point="6" svg:d="M-53069 50188l2001-3500" svg:viewBox="0 0 2002 3501">
            <text:p/>
          </draw:connector>
          <draw:frame draw:style-name="gr501" draw:text-style-name="P38" draw:layer="layout" svg:width="2.903cm" svg:height="0.725cm" svg:x="-55.131cm" svg:y="55.801cm">
            <draw:text-box>
              <text:p>Autoencoder</text:p>
            </draw:text-box>
          </draw:frame>
          <draw:line draw:style-name="gr502" draw:text-style-name="P15" draw:layer="layout" svg:x1="-53.817cm" svg:y1="55.405cm" svg:x2="-56.935cm" svg:y2="55.396cm">
            <text:p/>
          </draw:line>
          <draw:line draw:style-name="gr503" draw:text-style-name="P15" draw:layer="layout" svg:x1="-53.417cm" svg:y1="55.406cm" svg:x2="-50.377cm" svg:y2="55.352cm">
            <text:p/>
          </draw:line>
          <draw:frame draw:style-name="gr504" draw:text-style-name="P38" draw:layer="layout" svg:width="2.22cm" svg:height="0.725cm" svg:x="-53.071cm" svg:y="54.787cm">
            <draw:text-box>
              <text:p>decoding</text:p>
            </draw:text-box>
          </draw:frame>
          <draw:frame draw:style-name="gr504" draw:text-style-name="P38" draw:layer="layout" svg:width="2.22cm" svg:height="0.725cm" svg:x="-56.152cm" svg:y="54.77cm">
            <draw:text-box>
              <text:p>encoding</text:p>
            </draw:text-box>
          </draw:frame>
          <draw:g draw:style-name="gr23">
            <draw:polygon draw:style-name="gr505" draw:text-style-name="P144" draw:layer="layout" svg:width="1.215cm" svg:height="1.383cm" svg:x="-55.977cm" svg:y="56.878cm" svg:viewBox="0 0 1216 1384" draw:points="1216,1384 0,792 0,591 1216,0">
              <text:p/>
            </draw:polygon>
            <draw:frame draw:style-name="gr506" draw:text-style-name="P145" draw:layer="layout" svg:width="1.527cm" svg:height="0.569cm" svg:x="-56.078cm" svg:y="57.276cm">
              <draw:text-box>
                <text:p><text:span text:style-name="T49">decoder</text:span></text:p>
              </draw:text-box>
            </draw:frame>
          </draw:g>
          <draw:g draw:style-name="gr31">
            <draw:g draw:style-name="gr23">
              <draw:polygon draw:style-name="gr507" draw:text-style-name="P114" draw:layer="layout" svg:width="1.179cm" svg:height="1.358cm" svg:x="-52.824cm" svg:y="56.987cm" svg:viewBox="0 0 1180 1359" draw:points="0,0 1180,581 1180,777 0,1359">
                <text:p/>
              </draw:polygon>
            </draw:g>
            <draw:frame draw:style-name="gr484" draw:text-style-name="P11" draw:layer="layout" svg:width="1.527cm" svg:height="0.57cm" svg:x="-53.055cm" svg:y="57.35cm">
              <draw:text-box>
                <text:p><text:span text:style-name="T49">encoder</text:span></text:p>
              </draw:text-box>
            </draw:frame>
          </draw:g>
          <draw:custom-shape draw:style-name="gr498" draw:text-style-name="P141" xml:id="id413" draw:id="id413" draw:layer="layout" svg:width="0.891cm" svg:height="0.97cm" svg:x="-66.045cm" svg:y="53.631cm">
            <text:p text:style-name="P140"><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5" draw:id="id415" draw:layer="layout" svg:width="0.891cm" svg:height="0.97cm" svg:x="-66.045cm" svg:y="54.931cm">
            <text:p text:style-name="P140"><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7" draw:id="id417" draw:layer="layout" svg:width="0.891cm" svg:height="0.97cm" svg:x="-66.045cm" svg:y="56.231cm">
            <text:p text:style-name="P140"><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19" draw:id="id419" draw:layer="layout" svg:width="0.891cm" svg:height="0.97cm" svg:x="-66.045cm" svg:y="57.531cm">
            <text:p text:style-name="P140"><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14" draw:id="id414" draw:layer="layout" svg:width="0.891cm" svg:height="0.97cm" svg:x="-63.141cm" svg:y="53.831cm">
            <text:p text:style-name="P73"><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16" draw:id="id416" draw:layer="layout" svg:width="0.891cm" svg:height="0.97cm" svg:x="-63.141cm" svg:y="54.931cm">
            <text:p text:style-name="P73"><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9" draw:text-style-name="P142" xml:id="id418" draw:id="id418" draw:layer="layout" svg:width="0.891cm" svg:height="0.97cm" svg:x="-63.141cm" svg:y="56.031cm">
            <text:p text:style-name="P73"><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65.154cm" svg:y1="54.116cm" svg:x2="-63.141cm" svg:y2="54.316cm" draw:start-shape="id413" draw:start-glue-point="10" draw:end-shape="id414" draw:end-glue-point="6" svg:d="M-65154 54116l2013 200" svg:viewBox="0 0 2014 201">
            <text:p/>
          </draw:connector>
          <draw:connector draw:style-name="gr500" draw:text-style-name="P15" draw:layer="layout" draw:type="line" svg:x1="-65.154cm" svg:y1="55.416cm" svg:x2="-63.141cm" svg:y2="55.416cm" draw:start-shape="id415" draw:start-glue-point="10" draw:end-shape="id416" draw:end-glue-point="6" svg:d="M-65154 55416h2013" svg:viewBox="0 0 2014 1">
            <text:p/>
          </draw:connector>
          <draw:connector draw:style-name="gr500" draw:text-style-name="P15" draw:layer="layout" draw:type="line" svg:x1="-65.154cm" svg:y1="56.716cm" svg:x2="-63.141cm" svg:y2="56.516cm" draw:start-shape="id417" draw:start-glue-point="10" draw:end-shape="id418" draw:end-glue-point="6" svg:d="M-65154 56716l2013-200" svg:viewBox="0 0 2014 201">
            <text:p/>
          </draw:connector>
          <draw:connector draw:style-name="gr500" draw:text-style-name="P15" draw:layer="layout" draw:type="line" svg:x1="-65.154cm" svg:y1="58.016cm" svg:x2="-63.141cm" svg:y2="56.516cm" draw:start-shape="id419" draw:start-glue-point="10" draw:end-shape="id418" draw:end-glue-point="6" svg:d="M-65154 58016l2013-1500" svg:viewBox="0 0 2014 1501">
            <text:p/>
          </draw:connector>
          <draw:connector draw:style-name="gr500" draw:text-style-name="P15" draw:layer="layout" draw:type="line" svg:x1="-65.154cm" svg:y1="58.016cm" svg:x2="-63.141cm" svg:y2="55.416cm" draw:start-shape="id419" draw:start-glue-point="10" draw:end-shape="id416" draw:end-glue-point="6" svg:d="M-65154 58016l2013-2600" svg:viewBox="0 0 2014 2601">
            <text:p/>
          </draw:connector>
          <draw:connector draw:style-name="gr500" draw:text-style-name="P15" draw:layer="layout" draw:type="line" svg:x1="-65.154cm" svg:y1="58.016cm" svg:x2="-63.141cm" svg:y2="54.316cm" draw:start-shape="id419" draw:start-glue-point="10" draw:end-shape="id414" draw:end-glue-point="6" svg:d="M-65154 58016l2013-3700" svg:viewBox="0 0 2014 3701">
            <text:p/>
          </draw:connector>
          <draw:connector draw:style-name="gr500" draw:text-style-name="P15" draw:layer="layout" draw:type="line" svg:x1="-65.154cm" svg:y1="56.716cm" svg:x2="-63.141cm" svg:y2="55.416cm" draw:start-shape="id417" draw:start-glue-point="10" draw:end-shape="id416" draw:end-glue-point="6" svg:d="M-65154 56716l2013-1300" svg:viewBox="0 0 2014 1301">
            <text:p/>
          </draw:connector>
          <draw:connector draw:style-name="gr500" draw:text-style-name="P15" draw:layer="layout" draw:type="line" svg:x1="-65.154cm" svg:y1="56.716cm" svg:x2="-63.141cm" svg:y2="54.316cm" draw:start-shape="id417" draw:start-glue-point="10" draw:end-shape="id414" draw:end-glue-point="6" svg:d="M-65154 56716l2013-2400" svg:viewBox="0 0 2014 2401">
            <text:p/>
          </draw:connector>
          <draw:connector draw:style-name="gr500" draw:text-style-name="P15" draw:layer="layout" draw:type="line" svg:x1="-65.154cm" svg:y1="55.416cm" svg:x2="-63.141cm" svg:y2="54.316cm" draw:start-shape="id415" draw:start-glue-point="10" draw:end-shape="id414" draw:end-glue-point="6" svg:d="M-65154 55416l2013-1100" svg:viewBox="0 0 2014 1101">
            <text:p/>
          </draw:connector>
          <draw:connector draw:style-name="gr500" draw:text-style-name="P15" draw:layer="layout" draw:type="line" svg:x1="-65.154cm" svg:y1="55.416cm" svg:x2="-63.141cm" svg:y2="56.516cm" draw:start-shape="id415" draw:start-glue-point="10" draw:end-shape="id418" draw:end-glue-point="6" svg:d="M-65154 55416l2013 1100" svg:viewBox="0 0 2014 1101">
            <text:p/>
          </draw:connector>
          <draw:connector draw:style-name="gr500" draw:text-style-name="P15" draw:layer="layout" draw:type="line" svg:x1="-65.154cm" svg:y1="54.116cm" svg:x2="-63.141cm" svg:y2="55.416cm" draw:start-shape="id413" draw:start-glue-point="10" draw:end-shape="id416" draw:end-glue-point="6" svg:d="M-65154 54116l2013 1300" svg:viewBox="0 0 2014 1301">
            <text:p/>
          </draw:connector>
          <draw:connector draw:style-name="gr500" draw:text-style-name="P15" draw:layer="layout" draw:type="line" svg:x1="-65.154cm" svg:y1="54.116cm" svg:x2="-63.141cm" svg:y2="56.516cm" draw:start-shape="id413" draw:start-glue-point="10" draw:end-shape="id418" draw:end-glue-point="6" svg:d="M-65154 54116l2013 2400" svg:viewBox="0 0 2014 2401">
            <text:p/>
          </draw:connector>
          <draw:custom-shape draw:style-name="gr508" draw:text-style-name="P147" xml:id="id420" draw:id="id420" draw:layer="layout" svg:width="0.891cm" svg:height="0.97cm" svg:x="-60.242cm" svg:y="53.631cm">
            <text:p text:style-name="P146"><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9" draw:text-style-name="P147" xml:id="id421" draw:id="id421" draw:layer="layout" svg:width="0.891cm" svg:height="0.97cm" svg:x="-60.242cm" svg:y="54.931cm">
            <text:p text:style-name="P146"><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0" draw:text-style-name="P147" xml:id="id422" draw:id="id422" draw:layer="layout" svg:width="0.891cm" svg:height="0.97cm" svg:x="-60.242cm" svg:y="56.231cm">
            <text:p text:style-name="P146"><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7" xml:id="id423" draw:id="id423" draw:layer="layout" svg:width="0.891cm" svg:height="0.97cm" svg:x="-60.242cm" svg:y="57.531cm">
            <text:p text:style-name="P146"><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62.25cm" svg:y1="54.316cm" svg:x2="-60.242cm" svg:y2="54.116cm" draw:start-shape="id414" draw:start-glue-point="10" draw:end-shape="id420" draw:end-glue-point="6" svg:d="M-62250 54316l2008-200" svg:viewBox="0 0 2009 201">
            <text:p/>
          </draw:connector>
          <draw:connector draw:style-name="gr500" draw:text-style-name="P15" draw:layer="layout" draw:type="line" svg:x1="-62.25cm" svg:y1="54.316cm" svg:x2="-60.242cm" svg:y2="55.416cm" draw:start-shape="id414" draw:start-glue-point="10" draw:end-shape="id421" draw:end-glue-point="6" svg:d="M-62250 54316l2008 1100" svg:viewBox="0 0 2009 1101">
            <text:p/>
          </draw:connector>
          <draw:connector draw:style-name="gr500" draw:text-style-name="P15" draw:layer="layout" draw:type="line" svg:x1="-62.25cm" svg:y1="54.316cm" svg:x2="-60.242cm" svg:y2="56.716cm" draw:start-shape="id414" draw:start-glue-point="10" draw:end-shape="id422" draw:end-glue-point="6" svg:d="M-62250 54316l2008 2400" svg:viewBox="0 0 2009 2401">
            <text:p/>
          </draw:connector>
          <draw:connector draw:style-name="gr500" draw:text-style-name="P15" draw:layer="layout" draw:type="line" svg:x1="-62.25cm" svg:y1="54.316cm" svg:x2="-60.242cm" svg:y2="58.016cm" draw:start-shape="id414" draw:start-glue-point="10" draw:end-shape="id423" draw:end-glue-point="6" svg:d="M-62250 54316l2008 3700" svg:viewBox="0 0 2009 3701">
            <text:p/>
          </draw:connector>
          <draw:connector draw:style-name="gr500" draw:text-style-name="P15" xml:id="id424" draw:id="id424" draw:layer="layout" draw:type="line" svg:x1="-62.25cm" svg:y1="55.416cm" svg:x2="-60.244cm" svg:y2="54.116cm" draw:start-shape="id416" draw:start-glue-point="10" svg:d="M-62250 55416l2006-1300" svg:viewBox="0 0 2007 1301">
            <text:p/>
          </draw:connector>
          <draw:connector draw:style-name="gr500" draw:text-style-name="P15" draw:layer="layout" draw:type="line" svg:x1="-62.25cm" svg:y1="55.416cm" svg:x2="-60.242cm" svg:y2="55.416cm" draw:start-shape="id416" draw:start-glue-point="10" draw:end-shape="id421" draw:end-glue-point="6" svg:d="M-62250 55416h2008" svg:viewBox="0 0 2009 1">
            <text:p/>
          </draw:connector>
          <draw:connector draw:style-name="gr500" draw:text-style-name="P15" draw:layer="layout" draw:type="line" svg:x1="-62.25cm" svg:y1="55.416cm" svg:x2="-60.242cm" svg:y2="56.716cm" draw:start-shape="id416" draw:start-glue-point="10" draw:end-shape="id422" draw:end-glue-point="6" svg:d="M-62250 55416l2008 1300" svg:viewBox="0 0 2009 1301">
            <text:p/>
          </draw:connector>
          <draw:connector draw:style-name="gr500" draw:text-style-name="P15" draw:layer="layout" draw:type="line" svg:x1="-62.25cm" svg:y1="55.416cm" svg:x2="-60.242cm" svg:y2="58.016cm" draw:start-shape="id416" draw:start-glue-point="10" draw:end-shape="id423" draw:end-glue-point="6" svg:d="M-62250 55416l2008 2600" svg:viewBox="0 0 2009 2601">
            <text:p/>
          </draw:connector>
          <draw:connector draw:style-name="gr500" draw:text-style-name="P15" xml:id="id426" draw:id="id426" draw:layer="layout" draw:type="line" svg:x1="-62.25cm" svg:y1="56.516cm" svg:x2="-60.241cm" svg:y2="58.016cm" draw:start-shape="id418" draw:start-glue-point="10" svg:d="M-62250 56516l2009 1500" svg:viewBox="0 0 2010 1501">
            <text:p/>
          </draw:connector>
          <draw:connector draw:style-name="gr500" draw:text-style-name="P15" draw:layer="layout" draw:type="line" svg:x1="-62.25cm" svg:y1="56.516cm" svg:x2="-60.242cm" svg:y2="56.716cm" draw:start-shape="id418" draw:start-glue-point="10" draw:end-shape="id422" draw:end-glue-point="6" svg:d="M-62250 56516l2008 200" svg:viewBox="0 0 2009 201">
            <text:p/>
          </draw:connector>
          <draw:connector draw:style-name="gr500" draw:text-style-name="P15" draw:layer="layout" draw:type="line" svg:x1="-62.25cm" svg:y1="56.516cm" svg:x2="-60.242cm" svg:y2="55.416cm" draw:start-shape="id418" draw:start-glue-point="10" draw:end-shape="id421" draw:end-glue-point="6" svg:d="M-62250 56516l2008-1100" svg:viewBox="0 0 2009 1101">
            <text:p/>
          </draw:connector>
          <draw:connector draw:style-name="gr500" draw:text-style-name="P15" draw:layer="layout" draw:type="line" svg:x1="-62.25cm" svg:y1="56.516cm" svg:x2="-60.244cm" svg:y2="54.116cm" draw:start-shape="id418" draw:start-glue-point="10" draw:end-shape="id424" draw:end-glue-point="3" svg:d="M-62250 56516l2006-2400" svg:viewBox="0 0 2007 2401">
            <text:p/>
          </draw:connector>
          <draw:frame draw:style-name="gr135" draw:text-style-name="P41" draw:layer="layout" svg:width="4.577cm" svg:height="4.52cm" svg:x="-67.32cm" svg:y="47.602cm">
            <draw:image xlink:href="Pictures/10000000000001900000018BB52D7D4C.png" xlink:type="simple" xlink:show="embed" xlink:actuate="onLoad" draw:mime-type="image/png">
              <text:p/>
            </draw:image>
          </draw:frame>
          <draw:frame draw:style-name="gr512" draw:text-style-name="P38" draw:layer="layout" svg:width="4.668cm" svg:height="3.095cm" svg:x="-62.346cm" svg:y="48.741cm">
            <draw:text-box>
              <text:p>Continue<text:line-break/>back decoding<text:line-break/>until the parameters<text:line-break/>each parameter<text:line-break/>one node for AE <text:line-break/>for the action potential</text:p>
            </draw:text-box>
          </draw:frame>
          <draw:custom-shape draw:style-name="gr499" draw:text-style-name="P148" xml:id="id425" draw:id="id425" draw:layer="layout" svg:width="0.891cm" svg:height="0.97cm" svg:x="-63.141cm" svg:y="57.231cm">
            <text:p text:style-name="P73"><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xml:id="id428" draw:id="id428" draw:layer="layout" draw:type="line" svg:x1="-62.25cm" svg:y1="57.716cm" svg:x2="-60.244cm" svg:y2="54.116cm" draw:start-shape="id425" draw:start-glue-point="10" svg:d="M-62250 57716l2006-3600" svg:viewBox="0 0 2007 3601">
            <text:p/>
          </draw:connector>
          <draw:connector draw:style-name="gr500" draw:text-style-name="P15" draw:layer="layout" draw:type="line" svg:x1="-62.25cm" svg:y1="57.716cm" svg:x2="-60.241cm" svg:y2="58.016cm" draw:start-shape="id425" draw:start-glue-point="10" draw:end-shape="id426" draw:end-glue-point="3" svg:d="M-62250 57716l2009 300" svg:viewBox="0 0 2010 301">
            <text:p/>
          </draw:connector>
          <draw:connector draw:style-name="gr500" draw:text-style-name="P15" draw:layer="layout" draw:type="line" svg:x1="-62.25cm" svg:y1="57.716cm" svg:x2="-60.242cm" svg:y2="56.716cm" draw:start-shape="id425" draw:start-glue-point="10" draw:end-shape="id422" draw:end-glue-point="6" svg:d="M-62250 57716l2008-1000" svg:viewBox="0 0 2009 1001">
            <text:p/>
          </draw:connector>
          <draw:connector draw:style-name="gr500" draw:text-style-name="P15" draw:layer="layout" draw:type="line" svg:x1="-62.25cm" svg:y1="57.716cm" svg:x2="-60.242cm" svg:y2="55.416cm" draw:start-shape="id425" draw:start-glue-point="10" draw:end-shape="id421" draw:end-glue-point="6" svg:d="M-62250 57716l2008-2300" svg:viewBox="0 0 2009 2301">
            <text:p/>
          </draw:connector>
          <draw:connector draw:style-name="gr500" draw:text-style-name="P15" draw:layer="layout" draw:type="line" svg:x1="-65.151cm" svg:y1="58.016cm" svg:x2="-63.141cm" svg:y2="57.716cm" draw:end-shape="id425" draw:end-glue-point="6" svg:d="M-65151 58016l2010-300" svg:viewBox="0 0 2011 301">
            <text:p/>
          </draw:connector>
          <draw:connector draw:style-name="gr500" draw:text-style-name="P15" draw:layer="layout" draw:type="line" svg:x1="-65.154cm" svg:y1="56.716cm" svg:x2="-63.141cm" svg:y2="57.716cm" draw:start-shape="id417" draw:start-glue-point="10" draw:end-shape="id425" draw:end-glue-point="6" svg:d="M-65154 56716l2013 1000" svg:viewBox="0 0 2014 1001">
            <text:p/>
          </draw:connector>
          <draw:connector draw:style-name="gr500" draw:text-style-name="P15" draw:layer="layout" draw:type="line" svg:x1="-65.154cm" svg:y1="55.416cm" svg:x2="-63.141cm" svg:y2="57.716cm" draw:start-shape="id415" draw:start-glue-point="10" draw:end-shape="id425" draw:end-glue-point="6" svg:d="M-65154 55416l2013 2300" svg:viewBox="0 0 2014 2301">
            <text:p/>
          </draw:connector>
          <draw:connector draw:style-name="gr500" draw:text-style-name="P15" draw:layer="layout" draw:type="line" svg:x1="-65.154cm" svg:y1="54.116cm" svg:x2="-63.141cm" svg:y2="57.716cm" draw:start-shape="id413" draw:start-glue-point="10" draw:end-shape="id425" draw:end-glue-point="6" svg:d="M-65154 54116l2013 3600" svg:viewBox="0 0 2014 3601">
            <text:p/>
          </draw:connector>
          <draw:custom-shape draw:style-name="gr499" draw:text-style-name="P148" xml:id="id427" draw:id="id427" draw:layer="layout" svg:width="0.891cm" svg:height="0.97cm" svg:x="-63.141cm" svg:y="58.431cm">
            <text:p text:style-name="P73"><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62.25cm" svg:y1="58.916cm" svg:x2="-60.241cm" svg:y2="58.016cm" draw:start-shape="id427" draw:start-glue-point="10" svg:d="M-62250 58916l2009-900" svg:viewBox="0 0 2010 901">
            <text:p/>
          </draw:connector>
          <draw:connector draw:style-name="gr500" draw:text-style-name="P15" draw:layer="layout" draw:type="line" svg:x1="-62.25cm" svg:y1="58.916cm" svg:x2="-60.242cm" svg:y2="56.716cm" draw:start-shape="id427" draw:start-glue-point="10" draw:end-shape="id422" draw:end-glue-point="6" svg:d="M-62250 58916l2008-2200" svg:viewBox="0 0 2009 2201">
            <text:p/>
          </draw:connector>
          <draw:connector draw:style-name="gr500" draw:text-style-name="P15" draw:layer="layout" draw:type="line" svg:x1="-62.25cm" svg:y1="58.916cm" svg:x2="-60.242cm" svg:y2="55.416cm" draw:start-shape="id427" draw:start-glue-point="10" draw:end-shape="id421" draw:end-glue-point="6" svg:d="M-62250 58916l2008-3500" svg:viewBox="0 0 2009 3501">
            <text:p/>
          </draw:connector>
          <draw:connector draw:style-name="gr500" draw:text-style-name="P15" draw:layer="layout" draw:type="line" svg:x1="-62.25cm" svg:y1="58.916cm" svg:x2="-60.244cm" svg:y2="54.116cm" draw:start-shape="id427" draw:start-glue-point="10" draw:end-shape="id428" draw:end-glue-point="3" svg:d="M-62250 58916l2006-4800" svg:viewBox="0 0 2007 4801">
            <text:p/>
          </draw:connector>
          <draw:connector draw:style-name="gr500" draw:text-style-name="P15" draw:layer="layout" draw:type="line" svg:x1="-65.15cm" svg:y1="58.016cm" svg:x2="-63.141cm" svg:y2="58.916cm" draw:end-shape="id427" draw:end-glue-point="6" svg:d="M-65150 58016l2009 900" svg:viewBox="0 0 2010 901">
            <text:p/>
          </draw:connector>
          <draw:connector draw:style-name="gr500" draw:text-style-name="P15" draw:layer="layout" draw:type="line" svg:x1="-65.154cm" svg:y1="56.716cm" svg:x2="-63.141cm" svg:y2="58.916cm" draw:start-shape="id417" draw:start-glue-point="10" draw:end-shape="id427" draw:end-glue-point="6" svg:d="M-65154 56716l2013 2200" svg:viewBox="0 0 2014 2201">
            <text:p/>
          </draw:connector>
          <draw:connector draw:style-name="gr500" draw:text-style-name="P15" draw:layer="layout" draw:type="line" svg:x1="-65.154cm" svg:y1="55.416cm" svg:x2="-63.141cm" svg:y2="58.916cm" draw:start-shape="id415" draw:start-glue-point="10" draw:end-shape="id427" draw:end-glue-point="6" svg:d="M-65154 55416l2013 3500" svg:viewBox="0 0 2014 3501">
            <text:p/>
          </draw:connector>
          <draw:connector draw:style-name="gr500" draw:text-style-name="P15" draw:layer="layout" draw:type="line" svg:x1="-65.154cm" svg:y1="54.116cm" svg:x2="-63.141cm" svg:y2="58.916cm" draw:start-shape="id413" draw:start-glue-point="10" draw:end-shape="id427" draw:end-glue-point="6" svg:d="M-65154 54116l2013 4800" svg:viewBox="0 0 2014 4801">
            <text:p/>
          </draw:connector>
          <draw:frame draw:style-name="gr513" draw:text-style-name="P127" draw:layer="layout" svg:width="6.856cm" svg:height="1.673cm" svg:x="-66.089cm" svg:y="59.426cm">
            <draw:text-box>
              <text:p text:style-name="P5">To produce<text:line-break/> five clusters<text:line-break/>(Encoding is called neural coding)</text:p>
            </draw:text-box>
          </draw:frame>
          <draw:custom-shape draw:style-name="gr498" draw:text-style-name="P141" xml:id="id429" draw:id="id429" draw:layer="layout" svg:width="0.891cm" svg:height="0.97cm" svg:x="-56.864cm" svg:y="51.303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30" draw:id="id430" draw:layer="layout" svg:width="0.891cm" svg:height="0.97cm" svg:x="-51.063cm" svg:y="51.303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55.973cm" svg:y1="51.788cm" svg:x2="-53.962cm" svg:y2="50.188cm" draw:start-shape="id429" draw:start-glue-point="10" svg:d="M-55973 51788l2011-1600" svg:viewBox="0 0 2012 1601">
            <text:p/>
          </draw:connector>
          <draw:connector draw:style-name="gr500" draw:text-style-name="P15" draw:layer="layout" draw:type="line" svg:x1="-55.973cm" svg:y1="51.788cm" svg:x2="-53.963cm" svg:y2="49.088cm" draw:start-shape="id429" draw:start-glue-point="10" draw:end-shape="id405" draw:end-glue-point="6" svg:d="M-55973 51788l2010-2700" svg:viewBox="0 0 2011 2701">
            <text:p/>
          </draw:connector>
          <draw:connector draw:style-name="gr500" draw:text-style-name="P15" draw:layer="layout" draw:type="line" svg:x1="-55.973cm" svg:y1="51.788cm" svg:x2="-53.964cm" svg:y2="47.988cm" draw:start-shape="id429" draw:start-glue-point="10" draw:end-shape="id403" draw:end-glue-point="6" svg:d="M-55973 51788l2009-3800" svg:viewBox="0 0 2010 3801">
            <text:p/>
          </draw:connector>
          <draw:connector draw:style-name="gr500" draw:text-style-name="P15" draw:layer="layout" draw:type="line" svg:x1="-53.07cm" svg:y1="50.188cm" svg:x2="-51.063cm" svg:y2="51.788cm" draw:end-shape="id430" draw:end-glue-point="6" svg:d="M-53070 50188l2007 1600" svg:viewBox="0 0 2008 1601">
            <text:p/>
          </draw:connector>
          <draw:connector draw:style-name="gr500" draw:text-style-name="P15" draw:layer="layout" draw:type="line" svg:x1="-53.07cm" svg:y1="49.088cm" svg:x2="-51.063cm" svg:y2="51.788cm" draw:start-shape="id431" draw:start-glue-point="2" draw:end-shape="id430" draw:end-glue-point="6" svg:d="M-53070 49088l2007 2700" svg:viewBox="0 0 2008 2701">
            <text:p/>
          </draw:connector>
          <draw:connector draw:style-name="gr500" draw:text-style-name="P15" draw:layer="layout" draw:type="line" svg:x1="-53.07cm" svg:y1="47.988cm" svg:x2="-51.063cm" svg:y2="51.788cm" draw:start-shape="id432" draw:start-glue-point="2" draw:end-shape="id430" draw:end-glue-point="6" svg:d="M-53070 47988l2007 3800" svg:viewBox="0 0 2008 3801">
            <text:p/>
          </draw:connector>
          <draw:custom-shape draw:style-name="gr498" draw:text-style-name="P141" xml:id="id434" draw:id="id434" draw:layer="layout" svg:width="0.891cm" svg:height="0.97cm" svg:x="-60.228cm" svg:y="58.768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41" xml:id="id433" draw:id="id433" draw:layer="layout" svg:width="0.891cm" svg:height="0.97cm" svg:x="-66.027cm" svg:y="58.768cm">
            <text:p text:style-name="P140"><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0" draw:text-style-name="P15" draw:layer="layout" draw:type="line" svg:x1="-65.136cm" svg:y1="59.253cm" svg:x2="-63.141cm" svg:y2="58.916cm" draw:start-shape="id433" draw:start-glue-point="10" draw:end-shape="id427" draw:end-glue-point="6" svg:d="M-65136 59253l1995-337" svg:viewBox="0 0 1996 338">
            <text:p/>
          </draw:connector>
          <draw:connector draw:style-name="gr500" draw:text-style-name="P15" draw:layer="layout" draw:type="line" svg:x1="-65.136cm" svg:y1="59.254cm" svg:x2="-63.141cm" svg:y2="57.716cm" draw:end-shape="id425" draw:end-glue-point="6" svg:d="M-65136 59254l1995-1538" svg:viewBox="0 0 1996 1539">
            <text:p/>
          </draw:connector>
          <draw:connector draw:style-name="gr500" draw:text-style-name="P15" draw:layer="layout" draw:type="line" svg:x1="-65.135cm" svg:y1="59.254cm" svg:x2="-63.141cm" svg:y2="56.516cm" draw:end-shape="id418" draw:end-glue-point="6" svg:d="M-65135 59254l1994-2738" svg:viewBox="0 0 1995 2739">
            <text:p/>
          </draw:connector>
          <draw:connector draw:style-name="gr500" draw:text-style-name="P15" draw:layer="layout" draw:type="line" svg:x1="-65.135cm" svg:y1="59.254cm" svg:x2="-63.141cm" svg:y2="55.416cm" draw:end-shape="id416" draw:end-glue-point="6" svg:d="M-65135 59254l1994-3838" svg:viewBox="0 0 1995 3839">
            <text:p/>
          </draw:connector>
          <draw:connector draw:style-name="gr500" draw:text-style-name="P15" draw:layer="layout" draw:type="line" svg:x1="-65.135cm" svg:y1="59.254cm" svg:x2="-63.141cm" svg:y2="54.316cm" draw:end-shape="id414" draw:end-glue-point="6" svg:d="M-65135 59254l1994-4938" svg:viewBox="0 0 1995 4939">
            <text:p/>
          </draw:connector>
          <draw:connector draw:style-name="gr500" draw:text-style-name="P15" draw:layer="layout" draw:type="line" svg:x1="-62.25cm" svg:y1="58.916cm" svg:x2="-60.228cm" svg:y2="59.253cm" draw:start-shape="id427" draw:start-glue-point="10" draw:end-shape="id434" draw:end-glue-point="6" svg:d="M-62250 58916l2022 337" svg:viewBox="0 0 2023 338">
            <text:p/>
          </draw:connector>
          <draw:connector draw:style-name="gr500" draw:text-style-name="P15" draw:layer="layout" draw:type="line" svg:x1="-62.25cm" svg:y1="57.716cm" svg:x2="-60.227cm" svg:y2="59.254cm" draw:start-shape="id425" draw:start-glue-point="10" svg:d="M-62250 57716l2023 1538" svg:viewBox="0 0 2024 1539">
            <text:p/>
          </draw:connector>
          <draw:connector draw:style-name="gr500" draw:text-style-name="P15" draw:layer="layout" draw:type="line" svg:x1="-62.25cm" svg:y1="56.516cm" svg:x2="-60.226cm" svg:y2="59.254cm" draw:start-shape="id418" draw:start-glue-point="10" svg:d="M-62250 56516l2024 2738" svg:viewBox="0 0 2025 2739">
            <text:p/>
          </draw:connector>
          <draw:connector draw:style-name="gr500" draw:text-style-name="P15" draw:layer="layout" draw:type="line" svg:x1="-62.25cm" svg:y1="55.416cm" svg:x2="-60.226cm" svg:y2="59.254cm" draw:start-shape="id416" draw:start-glue-point="10" svg:d="M-62250 55416l2024 3838" svg:viewBox="0 0 2025 3839">
            <text:p/>
          </draw:connector>
          <draw:connector draw:style-name="gr500" draw:text-style-name="P15" draw:layer="layout" draw:type="line" svg:x1="-62.25cm" svg:y1="54.316cm" svg:x2="-60.226cm" svg:y2="59.254cm" draw:start-shape="id414" draw:start-glue-point="10" svg:d="M-62250 54316l2024 4938" svg:viewBox="0 0 2025 4939">
            <text:p/>
          </draw:connector>
          <draw:custom-shape draw:style-name="gr514" draw:text-style-name="P41" draw:layer="layout" svg:width="0.643cm" svg:height="5.878cm" svg:x="-50.072cm" svg:y="46.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15" draw:text-style-name="P38" draw:layer="layout" svg:width="1.89cm" svg:height="1.673cm" svg:x="-49.438cm" svg:y="48.435cm">
            <draw:text-box>
              <text:p>Fusion <text:line-break/>from <text:line-break/>traces</text:p>
            </draw:text-box>
          </draw:frame>
          <draw:custom-shape draw:style-name="gr516" draw:text-style-name="P41" draw:layer="layout" svg:width="1.039cm" svg:height="6.332cm" svg:x="-67.261cm" svg:y="53.389cm">
            <text:p/>
            <draw:enhanced-geometry svg:viewBox="0 0 21600 21600"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17" draw:text-style-name="P38" draw:layer="layout" svg:width="3.216cm" svg:height="2.621cm" svg:x="-70.171cm" svg:y="55.412cm">
            <draw:text-box>
              <text:p>Conversion<text:line-break/>to action <text:line-break/>potentials<text:line-break/>(We just need|<text:line-break/>five clusters)</text:p>
            </draw:text-box>
          </draw:frame>
          <draw:frame draw:style-name="gr135" draw:text-style-name="P41" draw:layer="layout" svg:width="4.004cm" svg:height="2.423cm" svg:x="-67.561cm" svg:y="43.836cm">
            <draw:image xlink:href="Pictures/10000000000002C5000001ADB823F0C7.png" xlink:type="simple" xlink:show="embed" xlink:actuate="onLoad" draw:mime-type="image/png">
              <text:p/>
            </draw:image>
          </draw:frame>
          <draw:frame draw:style-name="gr135" draw:text-style-name="P41" draw:layer="layout" svg:width="2.664cm" svg:height="1.582cm" svg:x="-65.671cm" svg:y="41.29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67.595cm" svg:y="41.952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67.479cm" svg:y="40.36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18" draw:text-style-name="P5" draw:layer="layout" svg:width="4.615cm" svg:height="0.907cm" svg:x="-67.169cm" svg:y="46.541cm">
            <draw:object xlink:href="./Object 7" xlink:type="simple" xlink:show="embed" xlink:actuate="onLoad">
              <loext:p/>
            </draw:object>
            <draw:image xlink:href="./ObjectReplacements/Object 7" xlink:type="simple" xlink:show="embed" xlink:actuate="onLoad"/>
          </draw:frame>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486" draw:id="id486"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478" draw:id="id478"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D</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D</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D</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D</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35" draw:start-glue-point="1" draw:end-shape="id436" draw:end-glue-point="3" svg:d="M-27151 52428c1246 0 417 1310 1660 1310" svg:viewBox="0 0 1661 1311">
          <text:p/>
        </draw:connector>
        <draw:connector draw:style-name="gr519" draw:text-style-name="P15" draw:layer="layout" draw:type="curve" svg:x1="30.809cm" svg:y1="107.092cm" svg:x2="30.407cm" svg:y2="105.779cm" draw:start-shape="id437" draw:start-glue-point="0" draw:end-shape="id367" draw:end-glue-point="2" svg:d="M30809 107092c0-984-402-328-402-1313" svg:viewBox="0 0 403 1314">
          <text:p/>
        </draw:connector>
        <draw:custom-shape draw:name="comment box 15" draw:style-name="gr520" draw:text-style-name="P150" xml:id="id438" draw:id="id438" draw:layer="layout" svg:width="1.885cm" svg:height="1.575cm" svg:x="-48.78cm" svg:y="76.294cm">
          <text:p text:style-name="P149"><text:span text:style-name="T4">DBSCAN</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38" draw:end-glue-point="4" svg:d="M-47452 75549c0 168-385-204-385 745" svg:viewBox="0 0 386 746">
          <text:p/>
        </draw:connector>
        <draw:connector draw:style-name="gr29" draw:text-style-name="P15" draw:layer="layout" draw:type="curve" svg:x1="-49.453cm" svg:y1="75.549cm" svg:x2="-49.92cm" svg:y2="76.336cm" draw:end-shape="id439" draw:end-glue-point="4" svg:d="M-49453 75549c0 199-467-194-467 787" svg:viewBox="0 0 468 788">
          <text:p/>
        </draw:connector>
        <draw:custom-shape draw:name="comment box 14" draw:style-name="gr521" draw:text-style-name="P150" xml:id="id439" draw:id="id439" draw:layer="layout" svg:width="1.884cm" svg:height="1.523cm" svg:x="-50.862cm" svg:y="76.336cm">
          <text:p text:style-name="P149"><text:span text:style-name="T4">DBSCAN</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07" draw:text-style-name="P114" draw:layer="layout" svg:width="1.179cm" svg:height="1.358cm" svg:x="-51.118cm" svg:y="80.163cm" svg:viewBox="0 0 1180 1359" draw:points="0,0 1180,581 1180,777 0,1359">
              <text:p/>
            </draw:polygon>
          </draw:g>
          <draw:frame draw:style-name="gr484" draw:text-style-name="P11" draw:layer="layout" svg:width="1.527cm" svg:height="0.57cm" svg:x="-51.349cm" svg:y="80.526cm">
            <draw:text-box>
              <text:p><text:span text:style-name="T49">encoder</text:span></text:p>
            </draw:text-box>
          </draw:frame>
        </draw:g>
        <draw:frame draw:style-name="gr522" draw:text-style-name="P41" draw:layer="layout" svg:width="4.125cm" svg:height="2.221cm" svg:x="-49.213cm" svg:y="79.993cm">
          <draw:text-box>
            <text:p text:style-name="P5"><text:span text:style-name="T12">Action potential (with autoencoder)</text:span><text:span text:style-name="T12"><text:line-break/></text:span><text:span text:style-name="T12">and</text:span><text:span text:style-name="T12"><text:line-break/></text:span><text:span text:style-name="T12">observation matrix (H)</text:span></text:p>
          </draw:text-box>
        </draw:frame>
        <draw:rect draw:style-name="gr292" draw:text-style-name="P35" xml:id="id440" draw:id="id440" draw:layer="layout" svg:width="2.3cm" svg:height="1cm" svg:x="25.604cm" svg:y="73.828cm">
          <text:p text:style-name="P5">IMU</text:p>
        </draw:rect>
        <draw:rect draw:style-name="gr292" draw:text-style-name="P35" xml:id="id441" draw:id="id441" draw:layer="layout" svg:width="2.3cm" svg:height="1cm" svg:x="28.604cm" svg:y="73.828cm">
          <text:p text:style-name="P5">Battery</text:p>
        </draw:rect>
        <draw:connector draw:style-name="gr293" draw:text-style-name="P15" draw:layer="layout" draw:type="curve" svg:x1="25.654cm" svg:y1="72.628cm" svg:x2="26.754cm" svg:y2="73.828cm" draw:start-shape="id240" draw:start-glue-point="2" draw:end-shape="id440" svg:d="M25654 72628c0 900 1100 300 1100 1200" svg:viewBox="0 0 1101 1201">
          <text:p/>
        </draw:connector>
        <draw:connector draw:style-name="gr293" draw:text-style-name="P15" draw:layer="layout" draw:type="curve" svg:x1="25.654cm" svg:y1="72.628cm" svg:x2="29.754cm" svg:y2="73.828cm" draw:start-shape="id240" draw:start-glue-point="2" draw:end-shape="id441" draw:end-glue-point="0" svg:d="M25654 72628c0 900 4100 300 4100 1200" svg:viewBox="0 0 4101 1201">
          <text:p/>
        </draw:connector>
        <draw:g draw:style-name="gr31">
          <draw:polygon draw:style-name="gr523" draw:text-style-name="P5" draw:layer="layout" svg:width="2.947cm" svg:height="4.308cm" svg:x="-67.336cm" svg:y="63.837cm" svg:viewBox="0 0 2948 4309" draw:points="0,3742 18,699 2891,0 2948,4309">
            <text:p/>
          </draw:polygon>
          <draw:g draw:style-name="gr31">
            <draw:custom-shape draw:style-name="gr524" draw:text-style-name="P151" draw:layer="layout" svg:width="0.254cm" svg:height="0.254cm" svg:x="-70.666cm" svg:y="64.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5" draw:text-style-name="P16" draw:layer="layout" svg:width="1.101cm" svg:height="0.569cm" svg:x="-70.578cm" svg:y="64.374cm">
              <draw:text-box>
                <text:p><text:span text:style-name="T4">GPS</text:span></text:p>
              </draw:text-box>
            </draw:frame>
          </draw:g>
          <draw:g draw:style-name="gr31">
            <draw:custom-shape draw:style-name="gr526" draw:text-style-name="P107" draw:layer="layout" svg:width="0.254cm" svg:height="0.254cm" svg:x="-70.673cm" svg:y="6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7" draw:text-style-name="P16" draw:layer="layout" svg:width="1.337cm" svg:height="0.569cm" svg:x="-70.552cm" svg:y="63.867cm">
              <draw:text-box>
                <text:p><text:span text:style-name="T4">LIDAR</text:span></text:p>
              </draw:text-box>
            </draw:frame>
          </draw:g>
          <draw:custom-shape draw:style-name="gr526" draw:text-style-name="P107"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07"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07"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07" draw:layer="layout" svg:width="0.254cm" svg:height="0.254cm" svg:x="-69.668cm" svg:y="6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07" draw:layer="layout" svg:width="0.254cm" svg:height="0.254cm" svg:x="-69.8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254cm" svg:height="0.254cm" svg:x="-69.47cm" svg:y="65.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254cm" svg:height="0.254cm" svg:x="-70.433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254cm" svg:height="0.254cm" svg:x="-70.094cm" svg:y="6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254cm" svg:height="0.254cm" svg:x="-69.893cm" svg:y="6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254cm" svg:height="0.254cm" svg:x="-69.374cm" svg:y="66.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254cm" svg:height="0.254cm" svg:x="-69.903cm" svg:y="66.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8" draw:text-style-name="P16" draw:layer="layout" svg:width="2.047cm" svg:height="0.569cm" svg:x="-69.068cm" svg:y="65.669cm">
            <draw:text-box>
              <text:p><text:span text:style-name="T4">AE mapping</text:span></text:p>
            </draw:text-box>
          </draw:frame>
          <draw:polygon draw:style-name="gr523" draw:text-style-name="P5" draw:layer="layout" svg:width="3.884cm" svg:height="5.678cm" svg:x="-62.495cm" svg:y="63.044cm" svg:viewBox="0 0 3885 5679" draw:points="0,4931 24,921 3810,0 3885,5679">
            <text:p/>
          </draw:polygon>
          <draw:custom-shape draw:style-name="gr529" draw:text-style-name="P41" draw:layer="layout" svg:width="1.612cm" svg:height="1.163cm" svg:x="-61.674cm" svg:y="6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0" draw:text-style-name="P41" draw:layer="layout" svg:width="1.976cm" svg:height="1.426cm" svg:x="-61.822cm" svg:y="6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41" draw:layer="layout" svg:width="2.28cm" svg:height="1.645cm" svg:x="-61.928cm" svg:y="6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4cm" svg:x="-60.248cm" svg:y="6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4cm" svg:x="-61.503cm" svg:y="65.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4cm" svg:x="-60.256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3cm" svg:x="-61.018cm" svg:y="6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4cm" svg:x="-61.161cm" svg:y="6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2" draw:text-style-name="P41" draw:layer="layout" svg:width="1.388cm" svg:height="1.002cm" svg:x="-61.574cm" svg:y="65.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6" draw:text-style-name="P107" draw:layer="layout" svg:width="0.165cm" svg:height="0.165cm" svg:x="-60.964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33" draw:text-style-name="P15" draw:layer="layout" svg:x1="-64.389cm" svg:y1="66.216cm" svg:x2="-60.887cm" svg:y2="66.178cm">
            <text:p/>
          </draw:line>
          <draw:frame draw:style-name="gr534" draw:text-style-name="P152" draw:layer="layout" svg:width="2.473cm" svg:height="1.205cm" svg:x="-64.691cm" svg:y="65.745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43" draw:id="id443">
            <draw:custom-shape draw:style-name="gr526" draw:text-style-name="P107"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07"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07"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07" draw:layer="layout" svg:width="0.164cm" svg:height="0.163cm" svg:x="-66.001cm" svg:y="6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6" draw:text-style-name="P107" draw:layer="layout" svg:width="0.164cm" svg:height="0.164cm" svg:x="-66.095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4cm" svg:x="-65.873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4cm" svg:x="-66.494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4cm" svg:x="-66.275cm" svg:y="6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3cm" svg:x="-66.146cm" svg:y="65.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4cm" svg:x="-65.811cm" svg:y="6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1" draw:layer="layout" svg:width="0.164cm" svg:height="0.164cm" svg:x="-66.152cm" svg:y="66.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33" draw:text-style-name="P15" draw:layer="layout" svg:x1="-68.887cm" svg:y1="66.21cm" svg:x2="-65.987cm" svg:y2="66.178cm">
            <text:p/>
          </draw:line>
          <draw:frame draw:style-name="gr535" draw:text-style-name="P16" draw:layer="layout" svg:width="3.576cm" svg:height="1.205cm" svg:x="-65cm" svg:y="62.735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36" draw:text-style-name="P153" draw:layer="layout" svg:width="2.126cm" svg:height="0.569cm" svg:x="-66.998cm" svg:y="64.443cm">
            <draw:text-box>
              <text:p><text:span text:style-name="T50">Latent space</text:span></text:p>
            </draw:text-box>
          </draw:frame>
          <draw:frame draw:style-name="gr537" draw:text-style-name="P155" draw:layer="layout" svg:width="0.87cm" svg:height="0.73cm" svg:x="-60.594cm" svg:y="66.792cm">
            <draw:text-box>
              <text:p text:style-name="P154"><text:span text:style-name="T4">μ</text:span><text:span text:style-name="T43">’</text:span><text:span text:style-name="T42">G</text:span></text:p>
            </draw:text-box>
          </draw:frame>
          <draw:frame draw:style-name="gr538" draw:text-style-name="P155" draw:layer="layout" svg:width="0.87cm" svg:height="0.73cm" svg:x="-61.02cm" svg:y="65.8cm">
            <draw:text-box>
              <text:p text:style-name="P154"><text:span text:style-name="T4">μ</text:span><text:span text:style-name="T43">’</text:span><text:span text:style-name="T42">L</text:span></text:p>
            </draw:text-box>
          </draw:frame>
          <draw:frame draw:style-name="gr539" draw:text-style-name="P153" draw:layer="layout" svg:width="2.346cm" svg:height="0.887cm" svg:x="-62.04cm" svg:y="63.872cm">
            <draw:text-box>
              <text:p><text:span text:style-name="T50">clusters mean</text:span><text:span text:style-name="T50"><text:line-break/></text:span><text:span text:style-name="T50">in latent space</text:span></text:p>
            </draw:text-box>
          </draw:frame>
          <draw:custom-shape draw:style-name="gr524" draw:text-style-name="P151" xml:id="id442" draw:id="id442" draw:layer="layout" svg:width="0.164cm" svg:height="0.164cm" svg:x="-60.512cm" svg:y="6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0" draw:text-style-name="P5" draw:layer="layout" svg:x1="-60.818cm" svg:y1="66.23cm" svg:x2="-60.463cm" svg:y2="66.837cm">
            <text:p/>
          </draw:line>
          <draw:frame draw:style-name="gr541" draw:text-style-name="P16" draw:layer="layout" svg:width="0.697cm" svg:height="0.569cm" svg:x="-61.055cm" svg:y="66.382cm">
            <draw:text-box>
              <text:p><text:span text:style-name="T4">d</text:span><text:span text:style-name="T43">’</text:span></text:p>
            </draw:text-box>
          </draw:frame>
          <draw:connector draw:style-name="gr542" draw:text-style-name="P15" draw:layer="layout" draw:type="curve" draw:line-skew="0.315cm" svg:x1="-60.43cm" svg:y1="66.974cm" svg:x2="-66.07cm" svg:y2="66.595cm" draw:start-shape="id442" draw:start-glue-point="8" draw:end-shape="id443" draw:end-glue-point="2" svg:d="M-60430 66974c0 1224-5640 1413-5640-379" svg:viewBox="0 0 5641 1323">
            <text:p/>
          </draw:connector>
          <draw:frame draw:style-name="gr543" draw:text-style-name="P16" draw:layer="layout" svg:width="1.595cm" svg:height="0.887cm" svg:x="-64.183cm" svg:y="67.81cm">
            <draw:text-box>
              <text:p text:style-name="P154"><text:span text:style-name="T10">Decode</text:span><text:span text:style-name="T10"><text:line-break/></text:span><text:span text:style-name="T10">GPS+</text:span><text:span text:style-name="T4">μ</text:span><text:span text:style-name="T43">’</text:span><text:span text:style-name="T42">G</text:span></text:p>
            </draw:text-box>
          </draw:frame>
          <draw:frame draw:style-name="gr544" draw:text-style-name="P156" draw:layer="layout" svg:width="5.09cm" svg:height="1.039cm" svg:x="-65.813cm" svg:y="68.792cm">
            <draw:text-box>
              <text:p text:style-name="P5"><text:span text:style-name="T51">Mapping GPS to the center </text:span><text:span text:style-name="T51"><text:line-break/></text:span><text:span text:style-name="T51">of mapped LIDAR-class</text:span></text:p>
            </draw:text-box>
          </draw:frame>
        </draw:g>
        <draw:g draw:style-name="gr23">
          <draw:rect draw:style-name="gr41" draw:text-style-name="P5" xml:id="id445" draw:id="id445" draw:layer="layout" svg:width="1.283cm" svg:height="1.495cm" svg:x="-20.906cm" svg:y="108.783cm">
            <text:p text:style-name="P5">Robot</text:p>
          </draw:rect>
          <draw:line draw:style-name="gr545" draw:text-style-name="P5" xml:id="id444" draw:id="id444" draw:layer="layout" svg:x1="-19.65cm" svg:y1="109.523cm" svg:x2="-17.956cm" svg:y2="109.497cm">
            <text:p/>
          </draw:line>
          <draw:connector draw:style-name="gr546" draw:text-style-name="P15" draw:layer="layout" svg:x1="-18.803cm" svg:y1="109.523cm" svg:x2="-20.264cm" svg:y2="110.278cm" draw:start-shape="id444" draw:start-glue-point="2" draw:end-shape="id445" svg:d="M-18803 109523v1256h-1461v-501" svg:viewBox="0 0 1462 1257">
            <text:p/>
          </draw:connector>
          <draw:line draw:style-name="gr545" draw:text-style-name="P5" draw:layer="layout" svg:x1="-22.401cm" svg:y1="109.497cm" svg:x2="-20.92cm" svg:y2="109.497cm">
            <text:p/>
          </draw:line>
          <draw:frame draw:style-name="gr547" draw:text-style-name="P16" draw:layer="layout" svg:width="1.117cm" svg:height="0.569cm" svg:x="-22.168cm" svg:y="109.009cm">
            <draw:text-box>
              <text:p><text:span text:style-name="T4">input</text:span></text:p>
            </draw:text-box>
          </draw:frame>
          <draw:frame draw:style-name="gr548" draw:text-style-name="P16" draw:layer="layout" svg:width="1.291cm" svg:height="0.569cm" svg:x="-19.567cm" svg:y="109.01cm">
            <draw:text-box>
              <text:p><text:span text:style-name="T4">output</text:span></text:p>
            </draw:text-box>
          </draw:frame>
          <draw:frame draw:style-name="gr549" draw:text-style-name="P16" draw:layer="layout" svg:width="1.748cm" svg:height="0.569cm" svg:x="-20.366cm" svg:y="110.711cm">
            <draw:text-box>
              <text:p><text:span text:style-name="T4">Feedback</text:span></text:p>
            </draw:text-box>
          </draw:frame>
        </draw:g>
        <draw:line draw:style-name="gr550" draw:text-style-name="P15" draw:layer="layout" svg:x1="-51.273cm" svg:y1="82.253cm" svg:x2="-35.038cm" svg:y2="82.253cm">
          <text:p/>
        </draw:line>
        <draw:frame draw:style-name="gr551" draw:text-style-name="P157" draw:layer="layout" svg:width="4.884cm" svg:height="2.015cm" svg:x="-45.762cm" svg:y="82.29cm">
          <draw:text-box>
            <text:p text:style-name="P5"><text:span text:style-name="T52">Predictive model </text:span><text:span text:style-name="T52"><text:line-break/></text:span><text:span text:style-name="T52">building with </text:span><text:span text:style-name="T52"><text:line-break/></text:span><text:span text:style-name="T52">transformers</text:span></text:p>
          </draw:text-box>
        </draw:frame>
        <draw:line draw:style-name="gr552" draw:text-style-name="P15" draw:layer="layout" svg:x1="-34.727cm" svg:y1="66.427cm" svg:x2="-34.694cm" svg:y2="81.856cm">
          <text:p/>
        </draw:line>
        <draw:frame draw:style-name="gr553" draw:text-style-name="P158" draw:layer="layout" svg:width="5.588cm" svg:height="1.038cm" draw:transform="rotate (1.5707963267949) translate (-34.753cm 76.743cm)">
          <draw:text-box>
            <text:p><text:span text:style-name="T52">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47" draw:id="id447"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46" draw:id="id446"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46" draw:start-glue-point="6" draw:end-shape="id447" draw:end-glue-point="10" svg:d="M-47897 100065h-1110" svg:viewBox="0 0 1111 1">
            <text:p/>
          </draw:connector>
          <draw:custom-shape draw:style-name="gr34" draw:text-style-name="P26" xml:id="id449" draw:id="id449"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48" draw:id="id448"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48" draw:start-glue-point="6" draw:end-shape="id449" draw:end-glue-point="10" svg:d="M-43897 100065h-1110" svg:viewBox="0 0 1111 1">
            <text:p/>
          </draw:connector>
          <draw:connector draw:style-name="gr36" draw:text-style-name="P7" draw:layer="layout" draw:type="curve" svg:x1="-45.898cm" svg:y1="100.065cm" svg:x2="-47.006cm" svg:y2="100.065cm" draw:start-shape="id449" draw:start-glue-point="6" draw:end-shape="id446" draw:end-glue-point="10" svg:d="M-45898 100065h-1108" svg:viewBox="0 0 1109 1">
            <text:p/>
          </draw:connector>
          <draw:custom-shape draw:style-name="gr34" draw:text-style-name="P26" xml:id="id451" draw:id="id451"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0" draw:id="id450"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50" draw:start-glue-point="6" draw:end-shape="id451" draw:end-glue-point="10" svg:d="M-36897 100065h-1110" svg:viewBox="0 0 1111 1">
            <text:p/>
          </draw:connector>
          <draw:custom-shape draw:style-name="gr479" draw:text-style-name="P107"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7" draw:layer="layout" svg:width="16.317cm" svg:height="1.952cm" svg:x="-51.301cm" svg:y="101.114cm">
            <text:p/>
            <draw:enhanced-geometry svg:viewBox="0 0 21600 21600" draw:type="rectangle" draw:enhanced-path="M 0 0 L 21600 0 21600 21600 0 21600 0 0 Z N"/>
          </draw:custom-shape>
          <draw:custom-shape draw:style-name="gr490"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0"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7" draw:layer="layout" svg:width="16.317cm" svg:height="1.952cm" svg:x="-51.302cm" svg:y="93.114cm">
            <text:p/>
            <draw:enhanced-geometry svg:viewBox="0 0 21600 21600" draw:type="rectangle" draw:enhanced-path="M 0 0 L 21600 0 21600 21600 0 21600 0 0 Z N"/>
          </draw:custom-shape>
          <draw:custom-shape draw:style-name="gr490"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0" draw:text-style-name="P15" draw:layer="layout" svg:x1="-34.76cm" svg:y1="88.884cm" svg:x2="-34.671cm" svg:y2="102.989cm">
            <text:p/>
          </draw:line>
          <draw:frame draw:style-name="gr554" draw:text-style-name="P157" draw:layer="layout" svg:width="5.06cm" svg:height="2.015cm" draw:transform="rotate (1.5707963267949) translate (-34.659cm 98.445cm)">
            <draw:text-box>
              <text:p text:style-name="P5"><text:span text:style-name="T52">Live remembering</text:span><text:span text:style-name="T52"><text:line-break/></text:span><text:span text:style-name="T52">and</text:span><text:span text:style-name="T52"><text:line-break/></text:span><text:span text:style-name="T52">State estimation</text:span></text:p>
            </draw:text-box>
          </draw:frame>
          <draw:custom-shape draw:style-name="gr479" draw:text-style-name="P107" draw:layer="layout" svg:width="16.317cm" svg:height="1.952cm" svg:x="-51.299cm" svg:y="88.915cm">
            <text:p/>
            <draw:enhanced-geometry svg:viewBox="0 0 21600 21600" draw:type="rectangle" draw:enhanced-path="M 0 0 L 21600 0 21600 21600 0 21600 0 0 Z N"/>
          </draw:custom-shape>
          <draw:custom-shape draw:style-name="gr491"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55" draw:text-style-name="P137" draw:layer="layout" svg:width="1.818cm" svg:height="1.705cm" svg:x="-44.455cm" svg:y="89.094cm">
            <text:p text:style-name="P136"><text:span text:style-name="T45">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07" draw:text-style-name="P114" draw:layer="layout" svg:width="1.179cm" svg:height="1.358cm" svg:x="-51.116cm" svg:y="89.165cm" svg:viewBox="0 0 1180 1359" draw:points="0,0 1180,581 1180,777 0,1359">
                <text:p/>
              </draw:polygon>
            </draw:g>
            <draw:frame draw:style-name="gr484" draw:text-style-name="P11" draw:layer="layout" svg:width="1.527cm" svg:height="0.57cm" svg:x="-51.347cm" svg:y="89.528cm">
              <draw:text-box>
                <text:p><text:span text:style-name="T49">encoder</text:span></text:p>
              </draw:text-box>
            </draw:frame>
          </draw:g>
          <draw:frame draw:style-name="gr556"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56"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56"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56"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57" draw:text-style-name="P27" xml:id="id452" draw:id="id452"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7" draw:text-style-name="P27" xml:id="id453" draw:id="id453"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8" draw:text-style-name="P15" draw:layer="layout" draw:type="curve" svg:x1="-39.402cm" svg:y1="89.666cm" svg:x2="-39.402cm" svg:y2="90.138cm" draw:start-shape="id452" draw:start-glue-point="8" draw:end-shape="id453" draw:end-glue-point="4" svg:d="M-39402 89666v472" svg:viewBox="0 0 1 473">
            <text:p/>
          </draw:connector>
          <draw:frame draw:style-name="gr518"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55" draw:id="id455"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9" draw:text-style-name="P159" draw:layer="layout" svg:width="3.958cm" svg:height="0.645cm" svg:x="-39.467cm" svg:y="89.59cm">
            <draw:text-box>
              <text:p><text:span text:style-name="T12">H </text:span><text:span text:style-name="T53">(observation matrix)</text:span></text:p>
            </draw:text-box>
          </draw:frame>
          <draw:custom-shape draw:style-name="gr34" draw:text-style-name="P26" xml:id="id454" draw:id="id454"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54" draw:start-glue-point="6" draw:end-shape="id455" draw:end-glue-point="10" svg:d="M-42586 102121c-786 0-261 1-1050 1" svg:viewBox="0 0 1051 2">
            <text:p/>
          </draw:connector>
          <draw:g draw:style-name="gr31">
            <draw:custom-shape draw:style-name="gr560" draw:text-style-name="P26" xml:id="id459" draw:id="id459"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1" draw:text-style-name="P160" xml:id="id461" draw:id="id461"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2" draw:text-style-name="P27" xml:id="id456" draw:id="id456"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3" draw:text-style-name="P27" xml:id="id457" draw:id="id457"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4" draw:text-style-name="P7" draw:layer="layout" draw:type="curve" svg:x1="-47.286cm" svg:y1="104.685cm" svg:x2="-46.42cm" svg:y2="104.691cm" draw:start-shape="id456" draw:start-glue-point="10" draw:end-shape="id457" draw:end-glue-point="6" svg:d="M-47286 104685c651 0 218 6 866 6" svg:viewBox="0 0 867 7">
              <text:p/>
            </draw:connector>
            <draw:custom-shape draw:style-name="gr563" draw:text-style-name="P27" xml:id="id458" draw:id="id458"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0" draw:text-style-name="P26" xml:id="id460" draw:id="id460"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18"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58" draw:text-style-name="P15" draw:layer="layout" draw:type="curve" svg:x1="-45.602cm" svg:y1="104.692cm" svg:x2="-44.106cm" svg:y2="105.584cm" draw:start-shape="id458" draw:start-glue-point="10" draw:end-shape="id459" draw:end-glue-point="6" svg:d="M-45602 104692c1123 0 376 892 1496 892" svg:viewBox="0 0 1497 893">
              <text:p/>
            </draw:connector>
            <draw:connector draw:style-name="gr558" draw:text-style-name="P15" draw:layer="layout" draw:type="curve" svg:x1="-45.602cm" svg:y1="104.692cm" svg:x2="-44.157cm" svg:y2="103.694cm" draw:start-shape="id458" draw:start-glue-point="10" draw:end-shape="id460" draw:end-glue-point="6" svg:d="M-45602 104692c1086 0 364-998 1445-998" svg:viewBox="0 0 1446 999">
              <text:p/>
            </draw:connector>
            <draw:connector draw:style-name="gr558" draw:text-style-name="P15" draw:layer="layout" draw:type="curve" svg:x1="-42.156cm" svg:y1="103.694cm" svg:x2="-40.648cm" svg:y2="104.697cm" draw:start-shape="id460" draw:start-glue-point="10" draw:end-shape="id461" draw:end-glue-point="6" svg:d="M-42156 103694c1132 0 379 1003 1508 1003" svg:viewBox="0 0 1509 1004">
              <text:p/>
            </draw:connector>
            <draw:connector draw:style-name="gr558" draw:text-style-name="P15" draw:layer="layout" draw:type="curve" svg:x1="-42.105cm" svg:y1="105.584cm" svg:x2="-40.648cm" svg:y2="104.697cm" draw:start-shape="id459" draw:end-shape="id461" draw:end-glue-point="6" svg:d="M-42105 105584c1095 0 367-887 1457-887" svg:viewBox="0 0 1458 888">
              <text:p/>
            </draw:connector>
            <draw:frame draw:style-name="gr518"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62" draw:id="id462">
              <draw:custom-shape draw:style-name="gr565"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18"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58" draw:text-style-name="P15" draw:layer="layout" draw:type="curve" svg:x1="-39.757cm" svg:y1="104.697cm" svg:x2="-38.671cm" svg:y2="104.679cm" draw:start-shape="id461" draw:start-glue-point="10" draw:end-shape="id462" draw:end-glue-point="3" svg:d="M-39757 104697c816 0 273-18 1086-18" svg:viewBox="0 0 1087 19">
              <text:p/>
            </draw:connector>
            <draw:custom-shape draw:style-name="gr562" draw:text-style-name="P27" xml:id="id463" draw:id="id463"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3" draw:text-style-name="P27" draw:layer="layout" svg:width="0.817cm" svg:height="0.699cm" svg:x="-43.504cm" svg:y="106.5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4" draw:text-style-name="P7" draw:layer="layout" draw:type="curve" svg:x1="-43.106cm" svg:y1="108.048cm" svg:x2="-43.094cm" svg:y2="107.208cm" draw:start-shape="id463" draw:start-glue-point="4" draw:end-shape="id464" draw:end-glue-point="8" svg:d="M-43106 108048c0-630 12-210 12-840" svg:viewBox="0 0 13 841">
              <text:p/>
            </draw:connector>
            <draw:custom-shape draw:style-name="gr563" draw:text-style-name="P27" xml:id="id464" draw:id="id464"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64" draw:text-style-name="P7" draw:layer="layout" draw:type="curve" svg:x1="-43.094cm" svg:y1="106.509cm" svg:x2="-43.105cm" svg:y2="106.029cm" draw:start-shape="id464" draw:start-glue-point="4" draw:end-shape="id459" draw:end-glue-point="8" svg:d="M-43094 106509c0-360-11-120-11-480" svg:viewBox="0 0 12 481">
              <text:p/>
            </draw:connector>
            <draw:measure draw:style-name="gr566" draw:text-style-name="P162" draw:layer="measurelines" svg:x1="-42.622cm" svg:y1="108.335cm" svg:x2="-38.396cm" svg:y2="105.093cm">
              <text:p text:style-name="P161"><text:span text:style-name="T54">Suprise</text:span><text:span text:style-name="T54"><text:line-break/></text:span><text:span text:style-name="T54"><text:measure text:kind="gap"/></text:span><text:span text:style-name="T54">Wasserstein</text:span></text:p>
            </draw:measure>
          </draw:g>
        </draw:g>
        <draw:rect draw:style-name="gr41" draw:text-style-name="P5" xml:id="id465" draw:id="id465"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65" draw:end-glue-point="0" svg:d="M16457 99461c0 2239-4688 747-4688 2986" svg:viewBox="0 0 4689 2987">
          <text:p/>
        </draw:connector>
        <draw:path draw:style-name="gr567" draw:text-style-name="P163"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67" draw:text-style-name="P163"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67" draw:text-style-name="P163" draw:layer="layout" svg:width="0.168cm" svg:height="0.432cm" svg:x="-28.37cm" svg:y="91.818cm" svg:viewBox="0 0 169 433" svg:d="M169 425c-19 5-39 8-59 8-46 0-70-26-70-79v-234h-40v-42h43l17-78h38v78h65v42h-65v221c0 17 3 29 9 36 5 6 15 10 28 10 8 0 19-2 34-5z">
          <text:p/>
        </draw:path>
        <draw:path draw:style-name="gr567" draw:text-style-name="P163"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67" draw:text-style-name="P163"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67" draw:text-style-name="P163" draw:layer="layout" svg:width="0.057cm" svg:height="0.479cm" svg:x="-27.161cm" svg:y="91.767cm" svg:viewBox="0 0 58 480" svg:d="M0 56c0-19 0-37 0-56 19 0 39 0 58 0 0 19 0 37 0 56-19 0-39 0-58 0zM0 480c0-117 0-233 0-350 19 0 39 0 58 0 0 117 0 233 0 350-19 0-39 0-58 0z">
          <text:p/>
        </draw:path>
        <draw:path draw:style-name="gr567" draw:text-style-name="P163"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67" draw:text-style-name="P163" draw:layer="layout" svg:width="0.168cm" svg:height="0.432cm" svg:x="-26.682cm" svg:y="91.818cm" svg:viewBox="0 0 169 433" svg:d="M169 425c-19 5-39 8-59 8-46 0-70-26-70-79v-234h-40v-42h43l17-78h38v78h65v42h-65v221c0 17 3 29 9 36 5 6 15 10 28 10 8 0 19-2 34-5z">
          <text:p/>
        </draw:path>
        <draw:g draw:style-name="gr23">
          <draw:path draw:style-name="gr568" draw:text-style-name="P164" draw:layer="layout" svg:width="0.194cm" svg:height="0.298cm" svg:x="-26.733cm" svg:y="92.957cm" svg:viewBox="0 0 195 299" svg:d="M186 45c-8-3-16-4-25-4-19 0-36 10-51 30s-26 45-31 75l-30 153h-49l44-225 7-38 5-31h46l-10 60h1c12-24 24-41 36-50 11-10 25-15 40-15 8 0 17 1 26 4z">
            <text:p/>
          </draw:path>
          <draw:path draw:style-name="gr568" draw:text-style-name="P164" draw:layer="layout" svg:width="0.205cm" svg:height="0.517cm" svg:x="-26.531cm" svg:y="92.853cm" svg:viewBox="0 0 206 518" svg:d="M206 0c-105 92-157 203-157 332 0 70 19 132 56 186h-47c-39-54-58-117-58-191 0-67 14-128 41-184 27-55 66-103 118-143z">
            <text:p/>
          </draw:path>
          <draw:path draw:style-name="gr568" draw:text-style-name="P164"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68" draw:text-style-name="P164" draw:layer="layout" svg:width="0.205cm" svg:height="0.517cm" svg:x="-26.273cm" svg:y="92.853cm" svg:viewBox="0 0 206 518" svg:d="M0 518c105-92 157-203 157-332 0-70-19-132-56-186h47c39 54 58 117 58 191 0 67-14 128-41 184-27 55-66 103-118 143z">
            <text:p/>
          </draw:path>
        </draw:g>
        <draw:path draw:style-name="gr569" draw:text-style-name="P5" draw:layer="layout" svg:width="4.073cm" svg:height="0cm" svg:x="-29.294cm" svg:y="92.706cm" svg:viewBox="0 0 4074 0" svg:d="M0 0c1358 0 2716 0 4074 0">
          <text:p/>
        </draw:path>
        <draw:path draw:style-name="gr570" draw:text-style-name="P165" draw:layer="layout" svg:width="0.316cm" svg:height="0.316cm" svg:x="-25.484cm" svg:y="92.547cm" svg:viewBox="0 0 317 317" svg:d="M0 0c106 53 211 106 317 159-106 53-211 105-317 158 0-106 0-211 0-317z">
          <text:p/>
        </draw:path>
        <draw:path draw:style-name="gr571" draw:text-style-name="P16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72" draw:text-style-name="P12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73" draw:text-style-name="P163"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73" draw:text-style-name="P163" draw:layer="layout" svg:width="0.32cm" svg:height="0.046cm" svg:x="-25.287cm" svg:y="93.431cm" svg:viewBox="0 0 321 47" svg:d="M0 47c0-16 0-31 0-47 107 0 214 0 321 0 0 16 0 31 0 47-107 0-214 0-321 0z">
          <text:p/>
        </draw:path>
        <draw:g draw:style-name="gr23">
          <draw:path draw:style-name="gr574" draw:text-style-name="P163"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74" draw:text-style-name="P163"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74" draw:text-style-name="P163"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74" draw:text-style-name="P163"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74" draw:text-style-name="P163"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74" draw:text-style-name="P163" draw:layer="layout" svg:width="0.123cm" svg:height="0.266cm" svg:x="-23.015cm" svg:y="89.987cm" svg:viewBox="0 0 124 267" svg:d="M2 267v-201c0-19-1-39-2-61h41c2 30 2 48 2 54h1c7-23 15-39 24-47 9-7 22-12 39-12 5 0 11 1 17 2v41c-5-2-14-3-23-3-18 0-32 8-42 23-9 16-14 38-14 68v136z">
            <text:p/>
          </draw:path>
          <draw:path draw:style-name="gr574" draw:text-style-name="P163"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74" draw:text-style-name="P163"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75" draw:text-style-name="P163"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75" draw:text-style-name="P163" draw:layer="layout" svg:width="0.123cm" svg:height="0.266cm" svg:x="-23.696cm" svg:y="90.683cm" svg:viewBox="0 0 124 267" svg:d="M2 267v-201c0-19-1-39-2-61h41c2 30 2 48 2 54h1c7-23 15-39 24-47 9-7 22-12 39-12 5 0 11 1 17 2v41c-5-2-14-3-23-3-18 0-32 8-42 23-9 16-14 38-14 68v136z">
            <text:p/>
          </draw:path>
          <draw:path draw:style-name="gr575" draw:text-style-name="P163" draw:layer="layout" svg:width="0.123cm" svg:height="0.266cm" svg:x="-23.531cm" svg:y="90.683cm" svg:viewBox="0 0 124 267" svg:d="M2 267v-201c0-19-1-39-2-61h41c2 30 2 48 2 54h1c7-23 15-39 24-47 9-7 22-12 39-12 5 0 11 1 17 2v41c-5-2-14-3-23-3-18 0-32 8-42 23-9 16-14 38-14 68v136z">
            <text:p/>
          </draw:path>
          <draw:path draw:style-name="gr575" draw:text-style-name="P163"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75" draw:text-style-name="P163"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76" draw:text-style-name="P164"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76" draw:text-style-name="P164" draw:layer="layout" svg:width="0.205cm" svg:height="0.517cm" svg:x="-23.721cm" svg:y="91.749cm" svg:viewBox="0 0 206 518" svg:d="M206 0c-105 92-157 203-157 332 0 70 19 132 56 186h-47c-39-54-58-117-58-191 0-67 14-128 41-184 27-55 66-103 118-143z">
            <text:p/>
          </draw:path>
          <draw:path draw:style-name="gr576" draw:text-style-name="P164"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76" draw:text-style-name="P164" draw:layer="layout" svg:width="0.205cm" svg:height="0.517cm" svg:x="-23.462cm" svg:y="91.749cm" svg:viewBox="0 0 206 518" svg:d="M0 518c105-92 157-203 157-332 0-70-19-132-56-186h47c39 54 58 117 58 191 0 67-14 128-41 184-27 55-66 103-118 143z">
            <text:p/>
          </draw:path>
        </draw:g>
        <draw:path draw:style-name="gr569" draw:text-style-name="P5" draw:layer="layout" svg:width="1.904cm" svg:height="0cm" svg:x="-24.161cm" svg:y="92.706cm" svg:viewBox="0 0 1905 0" svg:d="M0 0c635 0 1270 0 1905 0">
          <text:p/>
        </draw:path>
        <draw:path draw:style-name="gr570" draw:text-style-name="P165" draw:layer="layout" svg:width="0.317cm" svg:height="0.316cm" svg:x="-22.521cm" svg:y="92.547cm" svg:viewBox="0 0 318 317" svg:d="M0 0c106 53 212 106 318 159-106 53-212 105-318 158 0-106 0-211 0-317z">
          <text:p/>
        </draw:path>
        <draw:path draw:style-name="gr570" draw:text-style-name="P165" draw:layer="layout" svg:width="0.317cm" svg:height="0.316cm" svg:x="-22.521cm" svg:y="92.547cm" svg:viewBox="0 0 318 317" svg:d="M0 0c106 53 212 106 318 159-106 53-212 105-318 158 0-106 0-211 0-317z">
          <text:p/>
        </draw:path>
        <draw:path draw:style-name="gr577" draw:text-style-name="P167" draw:layer="layout" svg:width="4.629cm" svg:height="1.772cm" svg:x="-22.15cm" svg:y="91.595cm" svg:viewBox="0 0 4630 1773" svg:d="M0 0c1543 0 3087 0 4630 0 0 591 0 1182 0 1773-1543 0-3087 0-4630 0 0-591 0-1182 0-1773z">
          <text:p/>
        </draw:path>
        <draw:path draw:style-name="gr578" draw:text-style-name="P168" draw:layer="layout" svg:width="4.629cm" svg:height="1.772cm" svg:x="-22.15cm" svg:y="91.595cm" svg:viewBox="0 0 4630 1773" svg:d="M0 0c1543 0 3087 0 4630 0 0 591 0 1182 0 1773-1543 0-3087 0-4630 0 0-591 0-1182 0-1773z">
          <text:p/>
        </draw:path>
        <draw:g draw:style-name="gr23">
          <draw:path draw:style-name="gr579" draw:text-style-name="P169"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79" draw:text-style-name="P169"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79" draw:text-style-name="P169"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79" draw:text-style-name="P169" draw:layer="layout" svg:width="0.183cm" svg:height="0.471cm" svg:x="-20.2cm" svg:y="92.303cm" svg:viewBox="0 0 184 472" svg:d="M184 463c-21 6-42 9-64 9-51 0-76-30-76-87v-254h-44v-45h47l18-86h42v86h71v45h-71v240c0 19 3 32 10 39 6 7 15 11 31 11 8 0 20-1 36-5z">
            <text:p/>
          </draw:path>
          <draw:path draw:style-name="gr579" draw:text-style-name="P169" draw:layer="layout" svg:width="0.179cm" svg:height="0.387cm" svg:x="-19.962cm" svg:y="92.381cm" svg:viewBox="0 0 180 388" svg:d="M2 388v-293c0-26-1-55-2-88h60c1 44 2 69 2 78h2c10-32 22-55 35-67s31-18 56-18c8 0 16 1 25 4v57c-8-2-20-3-33-3-26 0-47 11-60 34-15 23-22 55-22 98v198z">
            <text:p/>
          </draw:path>
          <draw:path draw:style-name="gr579" draw:text-style-name="P169"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79" draw:text-style-name="P169" draw:layer="layout" svg:width="0.062cm" svg:height="0.522cm" svg:x="-19.321cm" svg:y="92.247cm" svg:viewBox="0 0 63 523" svg:d="M0 523c0-175 0-349 0-523 21 0 42 0 63 0 0 174 0 348 0 523-21 0-42 0-63 0z">
            <text:p/>
          </draw:path>
          <draw:path draw:style-name="gr579" draw:text-style-name="P169" draw:layer="layout" svg:width="0.062cm" svg:height="0.522cm" svg:x="-19.161cm" svg:y="92.247cm" svg:viewBox="0 0 63 523" svg:d="M0 523c0-175 0-349 0-523 21 0 42 0 63 0 0 174 0 348 0 523-21 0-42 0-63 0z">
            <text:p/>
          </draw:path>
          <draw:path draw:style-name="gr579" draw:text-style-name="P169"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79" draw:text-style-name="P169"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0" draw:text-style-name="P163"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0" draw:text-style-name="P163"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0" draw:text-style-name="P163"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0" draw:text-style-name="P163" draw:layer="layout" svg:width="0.113cm" svg:height="0.29cm" svg:x="-16.968cm" svg:y="90.242cm" svg:viewBox="0 0 114 291" svg:d="M114 286c-13 3-27 5-40 5-31 0-47-18-47-53v-157h-27v-29h29l11-52h26v52h44v29h-44v148c0 12 2 20 6 24 3 4 10 7 19 7 5 0 12-1 23-3z">
            <text:p/>
          </draw:path>
          <draw:path draw:style-name="gr580" draw:text-style-name="P163" draw:layer="layout" svg:width="0.11cm" svg:height="0.238cm" svg:x="-16.821cm" svg:y="90.291cm" svg:viewBox="0 0 111 239" svg:d="M1 239v-180c0-17 0-35-1-55h37c1 27 1 43 1 48h2c6-20 13-34 21-41s20-11 34-11c5 0 10 1 16 2v36c-5-2-12-2-21-2-16 0-28 7-37 20-9 15-13 35-13 61v122z">
            <text:p/>
          </draw:path>
          <draw:path draw:style-name="gr580" draw:text-style-name="P163"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0" draw:text-style-name="P163" draw:layer="layout" svg:width="0.038cm" svg:height="0.321cm" svg:x="-16.426cm" svg:y="90.208cm" svg:viewBox="0 0 39 322" svg:d="M0 322c0-107 0-215 0-322 13 0 26 0 39 0 0 107 0 215 0 322-13 0-26 0-39 0z">
            <text:p/>
          </draw:path>
          <draw:path draw:style-name="gr580" draw:text-style-name="P163" draw:layer="layout" svg:width="0.038cm" svg:height="0.321cm" svg:x="-16.328cm" svg:y="90.208cm" svg:viewBox="0 0 39 322" svg:d="M0 322c0-107 0-215 0-322 13 0 26 0 39 0 0 107 0 215 0 322-13 0-26 0-39 0z">
            <text:p/>
          </draw:path>
          <draw:path draw:style-name="gr580" draw:text-style-name="P163"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0" draw:text-style-name="P163" draw:layer="layout" svg:width="0.11cm" svg:height="0.238cm" svg:x="-15.983cm" svg:y="90.291cm" svg:viewBox="0 0 111 239" svg:d="M1 239v-180c0-17 0-35-1-55h37c1 27 1 43 1 48h2c6-20 13-34 21-41s20-11 34-11c5 0 10 1 16 2v36c-5-2-12-2-21-2-16 0-28 7-37 20-9 15-13 35-13 61v122z">
            <text:p/>
          </draw:path>
          <draw:path draw:style-name="gr581" draw:text-style-name="P163"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81" draw:text-style-name="P163"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81" draw:text-style-name="P163" draw:layer="layout" svg:width="0.113cm" svg:height="0.29cm" svg:x="-16.887cm" svg:y="90.864cm" svg:viewBox="0 0 114 291" svg:d="M114 286c-13 3-27 5-40 5-31 0-47-18-47-53v-157h-27v-29h29l11-52h26v52h44v29h-44v148c0 12 2 20 6 24 3 4 10 7 19 7 5 0 12-1 23-3z">
            <text:p/>
          </draw:path>
          <draw:path draw:style-name="gr581" draw:text-style-name="P163"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81" draw:text-style-name="P163"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81" draw:text-style-name="P163" draw:layer="layout" svg:width="0.113cm" svg:height="0.29cm" svg:x="-16.27cm" svg:y="90.864cm" svg:viewBox="0 0 114 291" svg:d="M114 286c-13 3-27 5-40 5-31 0-47-18-47-53v-157h-27v-29h29l11-52h26v52h44v29h-44v148c0 12 2 20 6 24 3 4 10 7 19 7 5 0 12-1 23-3z">
            <text:p/>
          </draw:path>
        </draw:g>
        <draw:path draw:style-name="gr576" draw:text-style-name="P164"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76" draw:text-style-name="P164" draw:layer="layout" svg:width="0.205cm" svg:height="0.517cm" svg:x="-16.895cm" svg:y="91.749cm" svg:viewBox="0 0 206 518" svg:d="M206 0c-105 92-157 203-157 332 0 70 19 132 56 186h-47c-39-54-58-117-58-191 0-67 14-128 41-184 27-55 66-103 118-143z">
          <text:p/>
        </draw:path>
        <draw:path draw:style-name="gr576" draw:text-style-name="P164"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76" draw:text-style-name="P164" draw:layer="layout" svg:width="0.205cm" svg:height="0.517cm" svg:x="-16.636cm" svg:y="91.749cm" svg:viewBox="0 0 206 518" svg:d="M0 518c105-92 157-203 157-332 0-70-19-132-56-186h47c39 54 58 117 58 191 0 67-14 128-41 184-27 55-66 103-118 143z">
          <text:p/>
        </draw:path>
        <draw:path draw:style-name="gr569" draw:text-style-name="P5" draw:layer="layout" svg:width="1.692cm" svg:height="0cm" svg:x="-17.52cm" svg:y="92.706cm" svg:viewBox="0 0 1693 0" svg:d="M0 0c564 0 1129 0 1693 0">
          <text:p/>
        </draw:path>
        <draw:path draw:style-name="gr570" draw:text-style-name="P165" draw:layer="layout" svg:width="0.317cm" svg:height="0.316cm" svg:x="-16.092cm" svg:y="92.547cm" svg:viewBox="0 0 318 317" svg:d="M0 0c106 53 212 106 318 159-106 53-212 105-318 158 0-106 0-211 0-317z">
          <text:p/>
        </draw:path>
        <draw:path draw:style-name="gr570" draw:text-style-name="P165" draw:layer="layout" svg:width="0.317cm" svg:height="0.316cm" svg:x="-16.092cm" svg:y="92.547cm" svg:viewBox="0 0 318 317" svg:d="M0 0c106 53 212 106 318 159-106 53-212 105-318 158 0-106 0-211 0-317z">
          <text:p/>
        </draw:path>
        <draw:path draw:style-name="gr570" draw:text-style-name="P165" draw:layer="layout" svg:width="0.317cm" svg:height="0.316cm" svg:x="-16.092cm" svg:y="92.547cm" svg:viewBox="0 0 318 317" svg:d="M0 0c106 53 212 106 318 159-106 53-212 105-318 158 0-106 0-211 0-317z">
          <text:p/>
        </draw:path>
        <draw:path draw:style-name="gr582" draw:text-style-name="P170" draw:layer="layout" svg:width="4.1cm" svg:height="1.772cm" svg:x="-15.721cm" svg:y="91.595cm" svg:viewBox="0 0 4101 1773" svg:d="M0 0c1367 0 2734 0 4101 0 0 591 0 1182 0 1773-1367 0-2734 0-4101 0 0-591 0-1182 0-1773z">
          <text:p/>
        </draw:path>
        <draw:path draw:style-name="gr583" draw:text-style-name="P171" draw:layer="layout" svg:width="4.1cm" svg:height="1.772cm" svg:x="-15.721cm" svg:y="91.595cm" svg:viewBox="0 0 4101 1773" svg:d="M0 0c1367 0 2734 0 4101 0 0 591 0 1182 0 1773-1367 0-2734 0-4101 0 0-591 0-1182 0-1773z">
          <text:p/>
        </draw:path>
        <draw:g draw:style-name="gr23">
          <draw:path draw:style-name="gr584" draw:text-style-name="P169" draw:layer="layout" svg:width="0.43cm" svg:height="0.447cm" svg:x="-14.995cm" svg:y="92.224cm" svg:viewBox="0 0 431 448" svg:d="M370 448l-51-131h-205l-51 131h-63l183-448h69l179 448zM216 46l-3 8c-5 18-13 41-23 68l-57 148h167l-58-148c-5-15-11-32-17-50z">
            <text:p/>
          </draw:path>
          <draw:path draw:style-name="gr584" draw:text-style-name="P169"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84" draw:text-style-name="P169" draw:layer="layout" svg:width="0.165cm" svg:height="0.425cm" svg:x="-14.227cm" svg:y="92.251cm" svg:viewBox="0 0 166 426" svg:d="M166 418c-18 5-38 8-58 8-46 0-68-26-68-78v-229h-40v-42h42l17-77h38v77h64v42h-64v216c0 17 2 29 8 36 6 6 14 9 28 9 8 0 19-1 33-4z">
            <text:p/>
          </draw:path>
          <draw:path draw:style-name="gr584" draw:text-style-name="P169"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84" draw:text-style-name="P169"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84" draw:text-style-name="P169" draw:layer="layout" svg:width="0.165cm" svg:height="0.425cm" svg:x="-13.322cm" svg:y="92.251cm" svg:viewBox="0 0 166 426" svg:d="M166 418c-18 5-38 8-58 8-46 0-68-26-68-78v-229h-40v-42h42l17-77h38v77h64v42h-64v216c0 17 2 29 8 36 6 6 14 9 28 9 8 0 19-1 33-4z">
            <text:p/>
          </draw:path>
          <draw:path draw:style-name="gr584" draw:text-style-name="P169"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84" draw:text-style-name="P169"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85" draw:text-style-name="P163"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85" draw:text-style-name="P163"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85" draw:text-style-name="P163"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85" draw:text-style-name="P163" draw:layer="layout" svg:width="0.125cm" svg:height="0.322cm" svg:x="-10.922cm" svg:y="90.298cm" svg:viewBox="0 0 126 323" svg:d="M126 317c-14 4-29 6-44 6-34 0-52-19-52-59v-174h-30v-32h32l13-58h28v58h49v32h-49v165c0 12 2 21 7 27 4 4 11 7 21 7 6 0 14-1 25-4z">
            <text:p/>
          </draw:path>
          <draw:path draw:style-name="gr585" draw:text-style-name="P163"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85" draw:text-style-name="P163"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75" draw:text-style-name="P163" draw:layer="layout" svg:width="0.045cm" svg:height="0.339cm" svg:x="-11.43cm" svg:y="90.97cm" svg:viewBox="0 0 46 340" svg:d="M0 340c0-114 0-226 0-340 16 0 31 0 46 0 0 114 0 226 0 340-15 0-30 0-46 0z">
            <text:p/>
          </draw:path>
          <draw:path draw:style-name="gr575" draw:text-style-name="P163"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75" draw:text-style-name="P163"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75" draw:text-style-name="P163"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75" draw:text-style-name="P163" draw:layer="layout" svg:width="0.125cm" svg:height="0.322cm" svg:x="-10.509cm" svg:y="90.99cm" svg:viewBox="0 0 126 323" svg:d="M126 317c-14 4-29 6-44 6-34 0-52-19-52-59v-174h-30v-32h32l13-58h28v58h49v32h-49v165c0 12 2 21 7 27 4 4 11 7 21 7 6 0 14-1 25-4z">
            <text:p/>
          </draw:path>
        </draw:g>
        <draw:path draw:style-name="gr586" draw:text-style-name="P164"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87" draw:text-style-name="P172"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88" draw:text-style-name="P164" draw:layer="layout" svg:width="0.205cm" svg:height="0.517cm" svg:x="-10.775cm" svg:y="91.749cm" svg:viewBox="0 0 206 518" svg:d="M206 0c-105 92-157 203-157 332 0 70 19 132 56 186h-47c-39-54-58-117-58-191 0-67 14-128 41-184 27-55 66-103 118-143z">
          <text:p/>
        </draw:path>
        <draw:path draw:style-name="gr588" draw:text-style-name="P164"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88" draw:text-style-name="P164" draw:layer="layout" svg:width="0.205cm" svg:height="0.517cm" svg:x="-10.516cm" svg:y="91.749cm" svg:viewBox="0 0 206 518" svg:d="M0 518c105-92 157-203 157-332 0-70-19-132-56-186h47c39 54 58 117 58 191 0 67-14 128-41 184-27 55-66 103-118 143z">
          <text:p/>
        </draw:path>
        <draw:path draw:style-name="gr569" draw:text-style-name="P5" draw:layer="layout" svg:width="2.3cm" svg:height="0cm" svg:x="-11.621cm" svg:y="92.706cm" svg:viewBox="0 0 2301 0" svg:d="M0 0c767 0 1534 0 2301 0">
          <text:p/>
        </draw:path>
        <draw:path draw:style-name="gr570" draw:text-style-name="P165" draw:layer="layout" svg:width="0.316cm" svg:height="0.316cm" svg:x="-9.584cm" svg:y="92.547cm" svg:viewBox="0 0 317 317" svg:d="M0 0c106 53 211 106 317 159-106 53-211 105-317 158 0-106 0-211 0-317z">
          <text:p/>
        </draw:path>
        <draw:path draw:style-name="gr570" draw:text-style-name="P165" draw:layer="layout" svg:width="0.316cm" svg:height="0.316cm" svg:x="-9.584cm" svg:y="92.547cm" svg:viewBox="0 0 317 317" svg:d="M0 0c106 53 211 106 317 159-106 53-211 105-317 158 0-106 0-211 0-317z">
          <text:p/>
        </draw:path>
        <draw:path draw:style-name="gr570" draw:text-style-name="P165" draw:layer="layout" svg:width="0.316cm" svg:height="0.316cm" svg:x="-9.584cm" svg:y="92.547cm" svg:viewBox="0 0 317 317" svg:d="M0 0c106 53 211 106 317 159-106 53-211 105-317 158 0-106 0-211 0-317z">
          <text:p/>
        </draw:path>
        <draw:path draw:style-name="gr570" draw:text-style-name="P165" draw:layer="layout" svg:width="0.316cm" svg:height="0.316cm" svg:x="-9.584cm" svg:y="92.547cm" svg:viewBox="0 0 317 317" svg:d="M0 0c106 53 211 106 317 159-106 53-211 105-317 158 0-106 0-211 0-317z">
          <text:p/>
        </draw:path>
        <draw:g draw:style-name="gr23">
          <draw:path draw:style-name="gr589" draw:text-style-name="P163"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89" draw:text-style-name="P163" draw:layer="layout" svg:width="0.049cm" svg:height="0.357cm" svg:x="-9.082cm" svg:y="88.46cm" svg:viewBox="0 0 50 358" svg:d="M0 42c0-14 0-28 0-42 16 0 33 0 50 0 0 14 0 28 0 42-17 0-34 0-50 0zM0 358c0-88 0-174 0-261 16 0 33 0 50 0 0 87 0 173 0 261-17 0-34 0-50 0z">
            <text:p/>
          </draw:path>
          <draw:path draw:style-name="gr589" draw:text-style-name="P163"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89" draw:text-style-name="P163" draw:layer="layout" svg:width="0.144cm" svg:height="0.322cm" svg:x="-8.703cm" svg:y="88.498cm" svg:viewBox="0 0 145 323" svg:d="M145 317c-17 3-34 6-51 6-39 0-60-20-60-59v-175h-34v-31h37l14-58h33v58h56v31h-56v165c0 13 3 22 8 27 4 4 12 7 24 7 6 0 16-1 29-3z">
            <text:p/>
          </draw:path>
          <draw:path draw:style-name="gr589" draw:text-style-name="P163"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89" draw:text-style-name="P163" draw:layer="layout" svg:width="0.14cm" svg:height="0.264cm" svg:x="-8.202cm" svg:y="88.552cm" svg:viewBox="0 0 141 265" svg:d="M2 265v-199c0-19-1-39-2-62h47c2 30 2 48 2 54h2c7-22 17-38 27-46s25-12 44-12c6 0 12 1 19 2v40c-6-2-15-3-26-3-21 0-36 9-47 24s-17 38-17 67v135z">
            <text:p/>
          </draw:path>
          <draw:path draw:style-name="gr589" draw:text-style-name="P163"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89" draw:text-style-name="P163"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89" draw:text-style-name="P163"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89" draw:text-style-name="P163"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89" draw:text-style-name="P163"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76" draw:text-style-name="P164"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76" draw:text-style-name="P164" draw:layer="layout" svg:width="0.205cm" svg:height="0.517cm" svg:x="-7.61cm" svg:y="89.765cm" svg:viewBox="0 0 206 518" svg:d="M206 0c-105 92-157 203-157 332 0 70 19 132 56 186h-47c-39-54-58-117-58-191 0-67 14-128 41-184 27-55 66-103 118-143z">
          <text:p/>
        </draw:path>
        <draw:path draw:style-name="gr576" draw:text-style-name="P164"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76" draw:text-style-name="P164" draw:layer="layout" svg:width="0.205cm" svg:height="0.517cm" svg:x="-7.351cm" svg:y="89.765cm" svg:viewBox="0 0 206 518" svg:d="M0 518c105-92 157-203 157-332 0-70-19-132-56-186h47c39 54 58 117 58 191 0 67-14 128-41 184-27 55-66 103-118 143z">
          <text:p/>
        </draw:path>
        <draw:path draw:style-name="gr590" draw:text-style-name="P5" draw:layer="layout" svg:width="2.3cm" svg:height="0cm" draw:transform="rotate (-1.5707963267949) translate (-8.0757565784782cm 89.0559062241644cm)" svg:viewBox="0 0 2301 0" svg:d="M0 0c767 0 1534 0 2301 0">
          <text:p/>
        </draw:path>
        <draw:path draw:style-name="gr591" draw:text-style-name="P173" draw:layer="layout" svg:width="0.317cm" svg:height="0.316cm" svg:x="-8.235cm" svg:y="91.093cm" svg:viewBox="0 0 318 317" svg:d="M318 0c-53 106-106 211-159 317-53-106-106-211-159-317 106 0 212 0 318 0z">
          <text:p/>
        </draw:path>
        <draw:path draw:style-name="gr592" draw:text-style-name="P174" draw:layer="layout" svg:width="4.497cm" svg:height="1.772cm" svg:x="-9.214cm" svg:y="91.595cm" svg:viewBox="0 0 4498 1773" svg:d="M0 0c1499 0 2999 0 4498 0 0 591 0 1182 0 1773-1499 0-2999 0-4498 0 0-591 0-1182 0-1773z">
          <text:p/>
        </draw:path>
        <draw:path draw:style-name="gr593" draw:text-style-name="P175" draw:layer="layout" svg:width="4.497cm" svg:height="1.772cm" svg:x="-9.214cm" svg:y="91.595cm" svg:viewBox="0 0 4498 1773" svg:d="M0 0c1499 0 2999 0 4498 0 0 591 0 1182 0 1773-1499 0-2999 0-4498 0 0-591 0-1182 0-1773z">
          <text:p/>
        </draw:path>
        <draw:path draw:style-name="gr594" draw:text-style-name="P164"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594" draw:text-style-name="P164" draw:layer="layout" svg:width="0.205cm" svg:height="0.517cm" svg:x="-4.175cm" svg:y="91.749cm" svg:viewBox="0 0 206 518" svg:d="M206 0c-105 92-157 203-157 332 0 70 19 132 56 186h-47c-39-54-58-117-58-191 0-67 14-128 41-184 27-55 66-103 118-143z">
          <text:p/>
        </draw:path>
        <draw:path draw:style-name="gr594" draw:text-style-name="P164"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594" draw:text-style-name="P164" draw:layer="layout" svg:width="0.205cm" svg:height="0.517cm" svg:x="-3.916cm" svg:y="91.749cm" svg:viewBox="0 0 206 518" svg:d="M0 518c105-92 157-203 157-332 0-70-19-132-56-186h47c39 54 58 117 58 191 0 67-14 128-41 184-27 55-66 103-118 143z">
          <text:p/>
        </draw:path>
        <draw:path draw:style-name="gr569" draw:text-style-name="P5" draw:layer="layout" svg:width="3.095cm" svg:height="0cm" svg:x="-4.716cm" svg:y="92.706cm" svg:viewBox="0 0 3096 0" svg:d="M0 0c1032 0 2064 0 3096 0">
          <text:p/>
        </draw:path>
        <draw:path draw:style-name="gr570" draw:text-style-name="P165" draw:layer="layout" svg:width="0.317cm" svg:height="0.316cm" svg:x="-1.885cm" svg:y="92.547cm" svg:viewBox="0 0 318 317" svg:d="M0 0c106 53 212 106 318 159-106 53-212 105-318 158 0-106 0-211 0-317z">
          <text:p/>
        </draw:path>
        <draw:path draw:style-name="gr570" draw:text-style-name="P165" draw:layer="layout" svg:width="0.317cm" svg:height="0.316cm" svg:x="-1.885cm" svg:y="92.547cm" svg:viewBox="0 0 318 317" svg:d="M0 0c106 53 212 106 318 159-106 53-212 105-318 158 0-106 0-211 0-317z">
          <text:p/>
        </draw:path>
        <draw:path draw:style-name="gr570" draw:text-style-name="P165" draw:layer="layout" svg:width="0.317cm" svg:height="0.316cm" svg:x="-1.885cm" svg:y="92.547cm" svg:viewBox="0 0 318 317" svg:d="M0 0c106 53 212 106 318 159-106 53-212 105-318 158 0-106 0-211 0-317z">
          <text:p/>
        </draw:path>
        <draw:path draw:style-name="gr570" draw:text-style-name="P165" draw:layer="layout" svg:width="0.317cm" svg:height="0.316cm" svg:x="-1.885cm" svg:y="92.547cm" svg:viewBox="0 0 318 317" svg:d="M0 0c106 53 212 106 318 159-106 53-212 105-318 158 0-106 0-211 0-317z">
          <text:p/>
        </draw:path>
        <draw:path draw:style-name="gr570" draw:text-style-name="P165" draw:layer="layout" svg:width="0.317cm" svg:height="0.316cm" svg:x="-1.885cm" svg:y="92.547cm" svg:viewBox="0 0 318 317" svg:d="M0 0c106 53 212 106 318 159-106 53-212 105-318 158 0-106 0-211 0-317z">
          <text:p/>
        </draw:path>
        <draw:path draw:style-name="gr569" draw:text-style-name="P5" draw:layer="layout" svg:width="7.169cm" svg:height="2.406cm" svg:x="-10.272cm" svg:y="92.706cm" svg:viewBox="0 0 7170 2407" svg:d="M7170 0c0 802 0 1604 0 2407-2390 0-4780 0-7170 0">
          <text:p/>
        </draw:path>
        <draw:path draw:style-name="gr570" draw:text-style-name="P165" draw:layer="layout" svg:width="0.317cm" svg:height="0.317cm" svg:x="-10.325cm" svg:y="94.954cm" svg:viewBox="0 0 318 318" svg:d="M318 318c-106-53-212-106-318-159 106-53 212-106 318-159 0 106 0 212 0 318z">
          <text:p/>
        </draw:path>
        <draw:path draw:style-name="gr570" draw:text-style-name="P165" draw:layer="layout" svg:width="0.317cm" svg:height="0.317cm" svg:x="-10.325cm" svg:y="94.954cm" svg:viewBox="0 0 318 318" svg:d="M318 318c-106-53-212-106-318-159 106-53 212-106 318-159 0 106 0 212 0 318z">
          <text:p/>
        </draw:path>
        <draw:path draw:style-name="gr570" draw:text-style-name="P165" draw:layer="layout" svg:width="0.317cm" svg:height="0.317cm" svg:x="-10.325cm" svg:y="94.954cm" svg:viewBox="0 0 318 318" svg:d="M318 318c-106-53-212-106-318-159 106-53 212-106 318-159 0 106 0 212 0 318z">
          <text:p/>
        </draw:path>
        <draw:path draw:style-name="gr570" draw:text-style-name="P165" draw:layer="layout" svg:width="0.317cm" svg:height="0.317cm" svg:x="-10.325cm" svg:y="94.954cm" svg:viewBox="0 0 318 318" svg:d="M318 318c-106-53-212-106-318-159 106-53 212-106 318-159 0 106 0 212 0 318z">
          <text:p/>
        </draw:path>
        <draw:path draw:style-name="gr570" draw:text-style-name="P165" draw:layer="layout" svg:width="0.317cm" svg:height="0.317cm" svg:x="-10.325cm" svg:y="94.954cm" svg:viewBox="0 0 318 318" svg:d="M318 318c-106-53-212-106-318-159 106-53 212-106 318-159 0 106 0 212 0 318z">
          <text:p/>
        </draw:path>
        <draw:path draw:style-name="gr570" draw:text-style-name="P165" draw:layer="layout" svg:width="0.317cm" svg:height="0.317cm" svg:x="-10.325cm" svg:y="94.954cm" svg:viewBox="0 0 318 318" svg:d="M318 318c-106-53-212-106-318-159 106-53 212-106 318-159 0 106 0 212 0 318z">
          <text:p/>
        </draw:path>
        <draw:path draw:style-name="gr595" draw:text-style-name="P176" draw:layer="layout" svg:width="5.185cm" svg:height="1.533cm" svg:x="-15.536cm" svg:y="94.346cm" svg:viewBox="0 0 5186 1534" svg:d="M0 0c1729 0 3457 0 5186 0 0 511 0 1023 0 1534-1729 0-3457 0-5186 0 0-511 0-1023 0-1534z">
          <text:p/>
        </draw:path>
        <draw:path draw:style-name="gr596" draw:text-style-name="P177" draw:layer="layout" svg:width="5.185cm" svg:height="1.533cm" svg:x="-15.536cm" svg:y="94.346cm" svg:viewBox="0 0 5186 1534" svg:d="M0 0c1729 0 3457 0 5186 0 0 511 0 1023 0 1534-1729 0-3457 0-5186 0 0-511 0-1023 0-1534z">
          <text:p/>
        </draw:path>
        <draw:g draw:style-name="gr23">
          <draw:path draw:style-name="gr597" draw:text-style-name="P169"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597" draw:text-style-name="P169"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597" draw:text-style-name="P169"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597" draw:text-style-name="P169"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597" draw:text-style-name="P169"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597" draw:text-style-name="P169" draw:layer="layout" svg:width="0.184cm" svg:height="0.398cm" svg:x="-12.073cm" svg:y="94.987cm" svg:viewBox="0 0 185 399" svg:d="M2 399v-301c0-27-1-57-2-91h62c1 45 2 71 2 80h2c10-33 22-56 36-69 13-12 32-18 57-18 9 0 17 1 26 4v59c-8-2-20-3-34-3-27 0-48 11-62 35-15 23-22 56-22 100v204z">
            <text:p/>
          </draw:path>
        </draw:g>
        <draw:path draw:style-name="gr569" draw:text-style-name="P5" draw:layer="layout" svg:width="9.127cm" svg:height="1.904cm" svg:x="-24.664cm" svg:y="93.208cm" svg:viewBox="0 0 9128 1905" svg:d="M9128 1905c-3043 0-6085 0-9128 0 0-635 0-1270 0-1905">
          <text:p/>
        </draw:path>
        <draw:path draw:style-name="gr570" draw:text-style-name="P165" draw:layer="layout" svg:width="0.317cm" svg:height="0.317cm" svg:x="-24.823cm" svg:y="93.155cm" svg:viewBox="0 0 318 318" svg:d="M0 318c53-106 106-212 159-318 53 106 106 212 159 318-106 0-212 0-318 0z">
          <text:p/>
        </draw:path>
        <draw:path draw:style-name="gr570" draw:text-style-name="P165" draw:layer="layout" svg:width="0.317cm" svg:height="0.317cm" svg:x="-24.823cm" svg:y="93.155cm" svg:viewBox="0 0 318 318" svg:d="M0 318c53-106 106-212 159-318 53 106 106 212 159 318-106 0-212 0-318 0z">
          <text:p/>
        </draw:path>
        <draw:path draw:style-name="gr570" draw:text-style-name="P165" draw:layer="layout" svg:width="0.317cm" svg:height="0.317cm" svg:x="-24.823cm" svg:y="93.155cm" svg:viewBox="0 0 318 318" svg:d="M0 318c53-106 106-212 159-318 53 106 106 212 159 318-106 0-212 0-318 0z">
          <text:p/>
        </draw:path>
        <draw:path draw:style-name="gr570" draw:text-style-name="P165" draw:layer="layout" svg:width="0.317cm" svg:height="0.317cm" svg:x="-24.823cm" svg:y="93.155cm" svg:viewBox="0 0 318 318" svg:d="M0 318c53-106 106-212 159-318 53 106 106 212 159 318-106 0-212 0-318 0z">
          <text:p/>
        </draw:path>
        <draw:path draw:style-name="gr570" draw:text-style-name="P165" draw:layer="layout" svg:width="0.317cm" svg:height="0.317cm" svg:x="-24.823cm" svg:y="93.155cm" svg:viewBox="0 0 318 318" svg:d="M0 318c53-106 106-212 159-318 53 106 106 212 159 318-106 0-212 0-318 0z">
          <text:p/>
        </draw:path>
        <draw:path draw:style-name="gr570" draw:text-style-name="P165" draw:layer="layout" svg:width="0.317cm" svg:height="0.317cm" svg:x="-24.823cm" svg:y="93.155cm" svg:viewBox="0 0 318 318" svg:d="M0 318c53-106 106-212 159-318 53 106 106 212 159 318-106 0-212 0-318 0z">
          <text:p/>
        </draw:path>
        <draw:path draw:style-name="gr570" draw:text-style-name="P165" draw:layer="layout" svg:width="0.317cm" svg:height="0.317cm" svg:x="-24.823cm" svg:y="93.155cm" svg:viewBox="0 0 318 318" svg:d="M0 318c53-106 106-212 159-318 53 106 106 212 159 318-106 0-212 0-318 0z">
          <text:p/>
        </draw:path>
        <draw:g draw:style-name="gr23">
          <draw:path draw:style-name="gr598" draw:text-style-name="P163"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598" draw:text-style-name="P163"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598" draw:text-style-name="P163"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598" draw:text-style-name="P163"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598" draw:text-style-name="P163"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598" draw:text-style-name="P163" draw:layer="layout" svg:width="0.116cm" svg:height="0.25cm" svg:x="-20.632cm" svg:y="94.666cm" svg:viewBox="0 0 117 251" svg:d="M1 251v-189c0-17 0-37-1-58h39c1 28 1 45 1 51h2c6-21 14-36 22-44 9-7 21-11 36-11 5 0 11 1 17 2v38c-5-2-13-3-22-3-17 0-30 8-39 22-9 15-14 36-14 64v128z">
            <text:p/>
          </draw:path>
          <draw:path draw:style-name="gr598" draw:text-style-name="P163"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598" draw:text-style-name="P163"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598" draw:text-style-name="P163"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598" draw:text-style-name="P163"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598" draw:text-style-name="P163" draw:layer="layout" svg:width="0.118cm" svg:height="0.305cm" svg:x="-19.23cm" svg:y="94.615cm" svg:viewBox="0 0 119 306" svg:d="M119 300c-13 4-27 6-41 6-33 0-50-19-50-56v-165h-28v-30h30l12-55h27v55h46v30h-46v156c0 12 2 20 7 25 3 5 10 7 19 7 6 0 14-1 24-3z">
            <text:p/>
          </draw:path>
          <draw:path draw:style-name="gr598" draw:text-style-name="P163"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598" draw:text-style-name="P163"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598" draw:text-style-name="P163" draw:layer="layout" svg:width="0.118cm" svg:height="0.305cm" svg:x="-18.581cm" svg:y="94.615cm" svg:viewBox="0 0 119 306" svg:d="M119 300c-13 4-27 6-41 6-33 0-50-19-50-56v-165h-28v-30h30l12-55h27v55h46v30h-46v156c0 12 2 20 7 25 3 5 10 7 19 7 6 0 14-1 24-3z">
            <text:p/>
          </draw:path>
        </draw:g>
        <draw:path draw:style-name="gr599" draw:text-style-name="P164"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0" draw:text-style-name="P172"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88" draw:text-style-name="P164" draw:layer="layout" svg:width="0.205cm" svg:height="0.517cm" svg:x="-19.717cm" svg:y="95.399cm" svg:viewBox="0 0 206 518" svg:d="M206 0c-105 92-157 203-157 332 0 70 19 132 56 186h-47c-39-54-58-117-58-191 0-67 14-128 41-184 27-55 66-103 118-143z">
          <text:p/>
        </draw:path>
        <draw:path draw:style-name="gr588" draw:text-style-name="P164"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88" draw:text-style-name="P164" draw:layer="layout" svg:width="0.205cm" svg:height="0.517cm" svg:x="-19.458cm" svg:y="95.399cm" svg:viewBox="0 0 206 518" svg:d="M0 518c105-92 157-203 157-332 0-70-19-132-56-186h47c39 54 58 117 58 191 0 67-14 128-41 184-27 55-66 103-118 143z">
          <text:p/>
        </draw:path>
        <draw:frame draw:style-name="gr601" draw:text-style-name="P178" draw:layer="layout" svg:width="2.196cm" svg:height="0.962cm" svg:x="-8.062cm" svg:y="91.966cm">
          <draw:text-box>
            <text:p><text:span text:style-name="T55">Robot</text:span></text:p>
          </draw:text-box>
        </draw:frame>
        <draw:g draw:style-name="gr31">
          <draw:custom-shape draw:style-name="gr602" draw:text-style-name="P41" xml:id="id466" draw:id="id466"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3" draw:text-style-name="P127" xml:id="id467" draw:id="id467" draw:layer="layout" svg:width="4.644cm" svg:height="2.896cm" svg:x="-17.653cm" svg:y="101.617cm">
            <draw:text-box>
              <text:p text:style-name="P30"><text:span text:style-name="T56">Replace with</text:span><text:span text:style-name="T56"><text:line-break/></text:span><text:span text:style-name="T56">discrepancy value</text:span><text:span text:style-name="T56"><text:line-break/></text:span><text:span text:style-name="T56">(Wasserstein)</text:span><text:span text:style-name="T56"><text:line-break/></text:span><text:span text:style-name="T56">or</text:span><text:span text:style-name="T56"><text:line-break/></text:span><text:span text:style-name="T56">pose</text:span></text:p>
            </draw:text-box>
          </draw:frame>
          <draw:custom-shape draw:style-name="gr604" draw:text-style-name="P41" xml:id="id468" draw:id="id468"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05" draw:text-style-name="P15" draw:layer="layout" draw:type="curve" svg:x1="-16.375cm" svg:y1="100.902cm" svg:x2="-15.331cm" svg:y2="101.617cm" draw:start-shape="id466" draw:start-glue-point="6" draw:end-shape="id467" draw:end-glue-point="0" svg:d="M-16375 100902c0 537 1044 180 1044 715" svg:viewBox="0 0 1045 716">
            <text:p/>
          </draw:connector>
          <draw:connector draw:style-name="gr606" draw:text-style-name="P15" draw:layer="layout" draw:type="curve" svg:x1="-14.259cm" svg:y1="100.814cm" svg:x2="-15.331cm" svg:y2="101.617cm" draw:start-shape="id468" draw:start-glue-point="6" draw:end-shape="id467" draw:end-glue-point="0" svg:d="M-14259 100814c0 603-1072 202-1072 803" svg:viewBox="0 0 1073 804">
            <text:p/>
          </draw:connector>
          <draw:frame draw:style-name="gr607" draw:text-style-name="P38" draw:layer="layout" svg:width="4.869cm" svg:height="1.199cm" svg:x="-13.047cm" svg:y="100.641cm">
            <draw:text-box>
              <text:p>U<text:span text:style-name="T57">k is from the second derivative</text:span><text:span text:style-name="T57"><text:line-break/></text:span><text:span text:style-name="T57">(nu clustering is need for 2</text:span><text:span text:style-name="T58">nd</text:span><text:span text:style-name="T57"> derivative)</text:span></text:p>
            </draw:text-box>
          </draw:frame>
          <draw:frame draw:style-name="gr518"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70" draw:id="id470"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69" draw:end-glue-point="0" svg:d="M81254 58328c0 1650 5800 550 5800 2200" svg:viewBox="0 0 5801 2201">
          <text:p/>
        </draw:connector>
        <draw:connector draw:style-name="gr293" draw:text-style-name="P15" draw:layer="layout" draw:type="curve" svg:x1="73.005cm" svg:y1="52.445cm" svg:x2="91.141cm" svg:y2="57.757cm" draw:start-shape="id251" draw:start-glue-point="2" draw:end-shape="id470" draw:end-glue-point="0" svg:d="M73005 52445c0 3984 18136 1328 18136 5312" svg:viewBox="0 0 18137 5313">
          <text:p/>
        </draw:connector>
        <draw:rect draw:style-name="gr41" draw:text-style-name="P5" xml:id="id471" draw:id="id471"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70" draw:start-glue-point="2" draw:end-shape="id471" draw:end-glue-point="0" svg:d="M91141 58757c0 1149-793 383-793 1532" svg:viewBox="0 0 794 1533">
          <text:p/>
        </draw:connector>
        <draw:rect draw:style-name="gr41" draw:text-style-name="P5" xml:id="id472" draw:id="id472"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70" draw:start-glue-point="2" draw:end-shape="id472" draw:end-glue-point="0" svg:d="M91141 58757c0 1146 2207 383 2207 1527" svg:viewBox="0 0 2208 1528">
          <text:p/>
        </draw:connector>
        <draw:rect draw:style-name="gr41" draw:text-style-name="P5" xml:id="id473" draw:id="id473"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72" draw:start-glue-point="2" draw:end-shape="id473" draw:end-glue-point="0" svg:d="M93348 62047c0 900 35 301 35 1199" svg:viewBox="0 0 36 1200">
          <text:p/>
        </draw:connector>
        <draw:connector draw:style-name="gr36" draw:text-style-name="P7" draw:layer="layout" draw:type="curve" svg:x1="-27.151cm" svg:y1="52.428cm" svg:x2="-25.649cm" svg:y2="51.138cm" draw:start-shape="id435" draw:start-glue-point="1" draw:end-shape="id474" draw:end-glue-point="3" svg:d="M-27151 52428c1128 0 377-1290 1502-1290" svg:viewBox="0 0 1503 1291">
          <text:p/>
        </draw:connector>
        <draw:custom-shape draw:name="comment box 1" draw:style-name="gr608" draw:text-style-name="P20" xml:id="id475" draw:id="id475"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09" draw:text-style-name="P133" xml:id="id476" draw:id="id476"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9" draw:text-style-name="P133" xml:id="id477" draw:id="id477"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75" draw:end-glue-point="7" svg:d="M-40740 44855c-1263 0-411 1998-1705 1998" svg:viewBox="0 0 1706 1999">
          <text:p/>
        </draw:connector>
        <draw:connector draw:style-name="gr36" draw:text-style-name="P7" draw:layer="layout" draw:type="curve" svg:x1="-30.852cm" svg:y1="52.421cm" svg:x2="-29.549cm" svg:y2="52.428cm" draw:start-shape="id476" draw:start-glue-point="10" draw:end-shape="id435" draw:end-glue-point="3" svg:d="M-30852 52421c979 0 328 7 1303 7" svg:viewBox="0 0 1304 8">
          <text:p/>
        </draw:connector>
        <draw:connector draw:style-name="gr36" draw:text-style-name="P7" draw:layer="layout" draw:type="curve" svg:x1="-34.652cm" svg:y1="52.421cm" svg:x2="-33.526cm" svg:y2="52.421cm" draw:start-shape="id477" draw:start-glue-point="10" draw:end-shape="id476" draw:end-glue-point="6" svg:d="M-34652 52421h1126" svg:viewBox="0 0 1127 1">
          <text:p/>
        </draw:connector>
        <draw:connector draw:style-name="gr36" draw:text-style-name="P7" draw:layer="layout" draw:type="curve" svg:x1="-38.234cm" svg:y1="52.389cm" svg:x2="-37.326cm" svg:y2="52.421cm" draw:start-shape="id478" draw:start-glue-point="10" draw:end-shape="id477" draw:end-glue-point="6" svg:d="M-38234 52389c682 0 229 32 908 32" svg:viewBox="0 0 909 33">
          <text:p/>
        </draw:connector>
        <draw:g draw:style-name="gr31">
          <draw:rect draw:style-name="gr610" draw:text-style-name="P179" draw:layer="layout" svg:width="19.38cm" svg:height="1.608cm" svg:x="-39.952cm" svg:y="59.066cm">
            <text:p/>
          </draw:rect>
          <draw:rect draw:style-name="gr611" draw:text-style-name="P180" draw:layer="layout" svg:width="18.349cm" svg:height="1.608cm" svg:x="-34.991cm" svg:y="59.066cm">
            <text:p/>
          </draw:rect>
          <draw:g draw:style-name="gr31">
            <draw:custom-shape draw:style-name="gr34" draw:text-style-name="P26" xml:id="id480" draw:id="id480" draw:layer="layout" svg:width="0.891cm" svg:height="0.97cm" svg:x="-34.648cm" svg:y="59.423cm">
              <text:p text:style-name="P25"><text:span text:style-name="T12">P</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79" draw:id="id479" draw:layer="layout" svg:width="0.891cm" svg:height="0.97cm" svg:x="-32.647cm" svg:y="59.423cm">
              <text:p text:style-name="P25"><text:span text:style-name="T12">P</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79" draw:start-glue-point="6" draw:end-shape="id480" draw:end-glue-point="10" svg:d="M-32647 59908h-1110" svg:viewBox="0 0 1111 1">
              <text:p/>
            </draw:connector>
            <draw:custom-shape draw:style-name="gr34" draw:text-style-name="P26" xml:id="id482" draw:id="id482" draw:layer="layout" svg:width="0.891cm" svg:height="0.97cm" svg:x="-30.648cm" svg:y="59.423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81" draw:id="id481" draw:layer="layout" svg:width="0.891cm" svg:height="0.97cm" svg:x="-28.647cm" svg:y="59.423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81" draw:start-glue-point="6" draw:end-shape="id482" draw:end-glue-point="10" svg:d="M-28647 59908h-1110" svg:viewBox="0 0 1111 1">
              <text:p/>
            </draw:connector>
            <draw:connector draw:style-name="gr36" draw:text-style-name="P7" draw:layer="layout" draw:type="curve" svg:x1="-30.648cm" svg:y1="59.908cm" svg:x2="-31.756cm" svg:y2="59.908cm" draw:start-shape="id482" draw:start-glue-point="6" draw:end-shape="id479" draw:end-glue-point="10" svg:d="M-30648 59908h-1108" svg:viewBox="0 0 1109 1">
              <text:p/>
            </draw:connector>
            <draw:custom-shape draw:style-name="gr34" draw:text-style-name="P26" xml:id="id484" draw:id="id484" draw:layer="layout" svg:width="0.891cm" svg:height="0.97cm" svg:x="-23.648cm" svg:y="59.423cm">
              <text:p text:style-name="P25"><text:span text:style-name="T12">P</text:span><text:span text:style-name="T13">t+l</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83" draw:id="id483" draw:layer="layout" svg:width="0.891cm" svg:height="0.97cm" svg:x="-21.647cm" svg:y="59.423cm">
              <text:p text:style-name="P25"><text:span text:style-name="T12">P</text:span><text:span text:style-name="T13">t+l</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83" draw:start-glue-point="6" draw:end-shape="id484"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0" draw:text-style-name="P15" draw:layer="layout" svg:x1="-39.972cm" svg:y1="60.96cm" svg:x2="-16.587cm" svg:y2="60.919cm">
            <text:p/>
          </draw:line>
          <draw:frame draw:style-name="gr612" draw:text-style-name="P181" draw:layer="layout" svg:width="7.416cm" svg:height="1.038cm" svg:x="-30.706cm" svg:y="60.852cm">
            <draw:text-box>
              <text:p><text:span text:style-name="T59">Transformer training</text:span></text:p>
            </draw:text-box>
          </draw:frame>
          <draw:connector draw:style-name="gr613" draw:text-style-name="P15" draw:layer="layout" draw:type="line" svg:x1="-34.912cm" svg:y1="58.563cm" svg:x2="-20.638cm" svg:y2="58.597cm" svg:d="M-34912 58563l14274 34" svg:viewBox="0 0 14275 35">
            <text:p/>
          </draw:connector>
          <draw:connector draw:style-name="gr614" draw:text-style-name="P15" draw:layer="layout" draw:type="line" svg:x1="-39.939cm" svg:y1="58.963cm" svg:x2="-20.658cm" svg:y2="58.917cm" svg:d="M-39939 58963l19281-46" svg:viewBox="0 0 19282 47">
            <text:p/>
          </draw:connector>
          <draw:frame draw:style-name="gr615" draw:text-style-name="P182" draw:layer="layout" svg:width="3.919cm" svg:height="0.645cm" svg:x="-28.867cm" svg:y="58.006cm">
            <draw:text-box>
              <text:p><text:span text:style-name="T12">Overlap (with length l)</text:span></text:p>
            </draw:text-box>
          </draw:frame>
          <draw:connector draw:style-name="gr614" draw:text-style-name="P15" draw:layer="layout" draw:type="line" svg:x1="-34.925cm" svg:y1="58.773cm" svg:x2="-16.591cm" svg:y2="58.773cm" svg:d="M-34925 58773h18334" svg:viewBox="0 0 18335 1">
            <text:p/>
          </draw:connector>
          <draw:frame draw:style-name="gr616" draw:text-style-name="P182" draw:layer="layout" svg:width="1.264cm" svg:height="0.645cm" svg:x="-38.08cm" svg:y="58.292cm">
            <draw:text-box>
              <text:p><text:span text:style-name="T12">input</text:span></text:p>
            </draw:text-box>
          </draw:frame>
          <draw:frame draw:style-name="gr617" draw:text-style-name="P182" draw:layer="layout" svg:width="1.479cm" svg:height="0.645cm" svg:x="-19.38cm" svg:y="58.093cm">
            <draw:text-box>
              <text:p><text:span text:style-name="T12">output</text:span></text:p>
            </draw:text-box>
          </draw:frame>
        </draw:g>
        <draw:custom-shape draw:name="comment box 2" draw:style-name="gr618" draw:text-style-name="P20" xml:id="id485" draw:id="id485"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85" draw:end-glue-point="7" svg:d="M-13656 52577c0 1752-527 2627-1581 2627" svg:viewBox="0 0 1582 2628">
          <text:p/>
        </draw:connector>
        <draw:polygon draw:style-name="gr505" draw:text-style-name="P144" xml:id="id474" draw:id="id474" draw:layer="layout" svg:width="1.215cm" svg:height="1.383cm" svg:x="-25.649cm" svg:y="50.446cm" svg:viewBox="0 0 1216 1384" draw:points="1216,1384 0,971 0,325 1216,0">
          <text:p/>
        </draw:polygon>
        <draw:frame draw:style-name="gr619" draw:text-style-name="P183"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35" draw:id="id435"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74" draw:start-glue-point="1" draw:end-shape="id401" draw:end-glue-point="3" svg:d="M-24433 51138c1050 0 339 351 1423 351" svg:viewBox="0 0 1424 352">
          <text:p/>
        </draw:connector>
        <draw:frame draw:style-name="gr620" draw:text-style-name="P159" draw:layer="layout" svg:width="1.563cm" svg:height="1.039cm" svg:x="-43.704cm" svg:y="39.88cm">
          <draw:text-box>
            <text:p><text:span text:style-name="T51">Pose</text:span></text:p>
          </draw:text-box>
        </draw:frame>
        <draw:frame draw:style-name="gr621" draw:text-style-name="P159" draw:layer="layout" svg:width="1.587cm" svg:height="0.645cm" svg:x="-44.104cm" svg:y="41.381cm">
          <draw:text-box>
            <text:p><text:span text:style-name="T51">LIDAR</text:span></text:p>
          </draw:text-box>
        </draw:frame>
        <draw:frame draw:style-name="gr621" draw:text-style-name="P159" draw:layer="layout" svg:width="1.587cm" svg:height="0.645cm" svg:x="-43.603cm" svg:y="42.982cm">
          <draw:text-box>
            <text:p><text:span text:style-name="T51">IMU</text:span></text:p>
          </draw:text-box>
        </draw:frame>
        <draw:frame draw:style-name="gr620" draw:text-style-name="P159" draw:layer="layout" svg:width="1.977cm" svg:height="1.039cm" svg:x="-44.002cm" svg:y="44.283cm">
          <draw:text-box>
            <text:p><text:span text:style-name="T51">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5" draw:text-style-name="P144" xml:id="id436" draw:id="id436" draw:layer="layout" svg:width="1.215cm" svg:height="1.383cm" svg:x="-25.491cm" svg:y="53.046cm" svg:viewBox="0 0 1216 1384" draw:points="1216,1384 0,971 0,325 1216,0">
          <text:p/>
        </draw:polygon>
        <draw:frame draw:style-name="gr619" draw:text-style-name="P183"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36" draw:start-glue-point="1" draw:end-shape="id486" draw:end-glue-point="3" svg:d="M-24275 53738c1003 0 323-96 1362-96" svg:viewBox="0 0 1363 97">
          <text:p/>
        </draw:connector>
        <draw:frame draw:style-name="gr518" draw:text-style-name="P5" xml:id="id487" draw:id="id487"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76" draw:start-glue-point="4" draw:end-shape="id487" draw:end-glue-point="1" svg:d="M-32189 51936c0-1245 767-1037 1213-1381s571-1239-179-1239" svg:viewBox="0 0 1573 2621">
          <text:p/>
        </draw:connector>
        <draw:g draw:style-name="gr23">
          <draw:polygon draw:style-name="gr505" draw:text-style-name="P144" draw:layer="layout" svg:width="1.311cm" svg:height="1.383cm" svg:x="-32.916cm" svg:y="44.854cm" svg:viewBox="0 0 1312 1384" draw:points="1312,1384 0,792 0,591 1312,0">
            <text:p/>
          </draw:polygon>
          <draw:frame draw:style-name="gr622" draw:text-style-name="P184" draw:layer="layout" svg:width="1.732cm" svg:height="0.569cm" svg:x="-33.025cm" svg:y="45.252cm">
            <draw:text-box>
              <text:p><text:span text:style-name="T60">decoder</text:span></text:p>
            </draw:text-box>
          </draw:frame>
        </draw:g>
        <draw:g draw:style-name="gr31">
          <draw:g draw:style-name="gr23">
            <draw:polygon draw:style-name="gr507" draw:text-style-name="P114" draw:layer="layout" svg:width="1.292cm" svg:height="1.358cm" svg:x="-27.759cm" svg:y="44.804cm" svg:viewBox="0 0 1293 1359" draw:points="0,0 1293,581 1293,777 0,1359">
              <text:p/>
            </draw:polygon>
          </draw:g>
          <draw:frame draw:style-name="gr623" draw:text-style-name="P185" draw:layer="layout" svg:width="1.673cm" svg:height="0.887cm" svg:x="-27.938cm" svg:y="45.181cm">
            <draw:text-box>
              <text:p><text:span text:style-name="T60">encoder</text:span></text:p>
            </draw:text-box>
          </draw:frame>
        </draw:g>
        <draw:frame draw:style-name="gr624" draw:text-style-name="P16" xml:id="id488" draw:id="id488" draw:layer="layout" svg:width="2.796cm" svg:height="0.911cm" svg:x="-41.717cm" svg:y="48.506cm">
          <draw:text-box>
            <text:p text:style-name="P66"><text:span text:style-name="T61">derivative-free </text:span><text:span text:style-name="T61"><text:line-break/></text:span><text:span text:style-name="T61">global optimizer</text:span></text:p>
          </draw:text-box>
        </draw:frame>
        <draw:connector draw:style-name="gr625" draw:text-style-name="P7" draw:layer="layout" draw:type="curve" svg:x1="-36.53cm" svg:y1="49.316cm" svg:x2="-38.921cm" svg:y2="48.961cm" draw:start-shape="id487" draw:start-glue-point="3" draw:end-shape="id488" svg:d="M-36530 49316c-1792 0-597-355-2391-355" svg:viewBox="0 0 2392 356">
          <text:p text:style-name="P5"><text:span text:style-name="T4">using</text:span></text:p>
        </draw:connector>
        <draw:frame draw:style-name="gr518" draw:text-style-name="P5" xml:id="id489" draw:id="id489"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25" draw:text-style-name="P7" draw:layer="layout" draw:type="curve" svg:x1="-41.717cm" svg:y1="48.961cm" svg:x2="-43.268cm" svg:y2="50.542cm" draw:start-shape="id488" draw:start-glue-point="3" draw:end-shape="id489" draw:end-glue-point="0" svg:d="M-41717 48961c-1034 0-1551 527-1551 1581" svg:viewBox="0 0 1552 1582">
          <text:p text:style-name="P5"><text:span text:style-name="T4">converting</text:span></text:p>
        </draw:connector>
        <draw:connector draw:style-name="gr626" draw:text-style-name="P7" draw:layer="layout" draw:type="curve" draw:line-skew="0.726cm" svg:x1="-43.268cm" svg:y1="51.449cm" svg:x2="-34.652cm" svg:y2="52.421cm" draw:start-shape="id489" draw:start-glue-point="2" draw:end-shape="id477" draw:end-glue-point="10" svg:d="M-43268 51449c0 4027 4560 3357 6902 2593s2467-1621 1714-1621" svg:viewBox="0 0 9028 3172">
          <text:p text:style-name="P5"><text:span text:style-name="T4">converting</text:span></text:p>
        </draw:connector>
        <draw:rect draw:style-name="gr41" draw:text-style-name="P5" xml:id="id490" draw:id="id490"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73" draw:start-glue-point="2" draw:end-shape="id490" draw:end-glue-point="0" svg:d="M93383 64481c0 930-50 310-50 1240" svg:viewBox="0 0 51 1241">
          <text:p/>
        </draw:connector>
        <draw:rect draw:style-name="gr292" draw:text-style-name="P35" xml:id="id494" draw:id="id494" draw:layer="layout" svg:width="2.3cm" svg:height="1cm" svg:x="40.457cm" svg:y="99.219cm">
          <text:p text:style-name="P5">Suprise<text:line-break/>reduction</text:p>
        </draw:rect>
        <draw:rect draw:style-name="gr292" draw:text-style-name="P35" xml:id="id492" draw:id="id492" draw:layer="layout" svg:width="2.853cm" svg:height="1.372cm" svg:x="37.683cm" svg:y="103.071cm">
          <text:p text:style-name="P5">Updating<text:line-break/>predicting<text:line-break/>models</text:p>
        </draw:rect>
        <draw:rect draw:style-name="gr292" draw:text-style-name="P35" xml:id="id493" draw:id="id493" draw:layer="layout" svg:width="2.853cm" svg:height="1.372cm" svg:x="42.435cm" svg:y="103.071cm">
          <text:p text:style-name="P5">Manipulating<text:line-break/>the world</text:p>
        </draw:rect>
        <draw:connector draw:style-name="gr627" draw:text-style-name="P15" draw:layer="layout" draw:type="curve" svg:x1="41.607cm" svg:y1="101.993cm" svg:x2="39.109cm" svg:y2="103.071cm" draw:start-shape="id491" draw:start-glue-point="2" draw:end-shape="id492" draw:end-glue-point="0" svg:d="M41607 101993c0 808-2498 270-2498 1078" svg:viewBox="0 0 2499 1079">
          <text:p/>
        </draw:connector>
        <draw:connector draw:style-name="gr628" draw:text-style-name="P15" draw:layer="layout" draw:type="curve" svg:x1="41.607cm" svg:y1="101.993cm" svg:x2="43.861cm" svg:y2="103.071cm" draw:start-shape="id491" draw:start-glue-point="2" draw:end-shape="id493" draw:end-glue-point="0" svg:d="M41607 101993c0 808 2254 270 2254 1078" svg:viewBox="0 0 2255 1079">
          <text:p/>
        </draw:connector>
        <draw:rect draw:style-name="gr292" draw:text-style-name="P35" xml:id="id491" draw:id="id491" draw:layer="layout" svg:width="1.437cm" svg:height="0.766cm" svg:x="40.889cm" svg:y="101.227cm">
          <text:p text:style-name="P5">kinds</text:p>
        </draw:rect>
        <draw:connector draw:style-name="gr629" draw:text-style-name="P15" draw:layer="layout" draw:type="curve" svg:x1="41.607cm" svg:y1="100.219cm" svg:x2="41.607cm" svg:y2="101.227cm" draw:start-shape="id494" draw:start-glue-point="2" draw:end-shape="id491" draw:end-glue-point="0" svg:d="M41607 100219v1008" svg:viewBox="0 0 1 1009">
          <text:p/>
        </draw:connector>
        <draw:rect draw:style-name="gr292" draw:text-style-name="P35" xml:id="id495" draw:id="id495" draw:layer="layout" svg:width="2.853cm" svg:height="1.372cm" svg:x="36.184cm" svg:y="105.571cm">
          <text:p text:style-name="P5">Updating<text:line-break/>forecasting<text:line-break/>models</text:p>
        </draw:rect>
        <draw:connector draw:style-name="gr630" draw:text-style-name="P15" draw:layer="layout" draw:type="curve" svg:x1="39.109cm" svg:y1="104.443cm" svg:x2="37.61cm" svg:y2="105.571cm" draw:start-shape="id492" draw:start-glue-point="2" draw:end-shape="id495" draw:end-glue-point="0" svg:d="M39109 104443c0 846-1499 282-1499 1128" svg:viewBox="0 0 1500 1129">
          <text:p/>
        </draw:connector>
        <draw:rect draw:style-name="gr292" draw:text-style-name="P35" xml:id="id496" draw:id="id496" draw:layer="layout" svg:width="2.853cm" svg:height="1.372cm" svg:x="39.185cm" svg:y="105.571cm">
          <text:p text:style-name="P5">Updating<text:line-break/>classification<text:line-break/>models</text:p>
        </draw:rect>
        <draw:connector draw:style-name="gr631" draw:text-style-name="P15" draw:layer="layout" draw:type="curve" svg:x1="39.109cm" svg:y1="104.443cm" svg:x2="40.611cm" svg:y2="105.571cm" draw:start-shape="id492" draw:start-glue-point="2" draw:end-shape="id496" svg:d="M39109 104443c0 846 1502 282 1502 1128" svg:viewBox="0 0 1503 1129">
          <text:p/>
        </draw:connector>
        <draw:custom-shape draw:style-name="gr632" draw:text-style-name="P68" xml:id="id497" draw:id="id497"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2">conscious</text:span><text:span text:style-name="T62"><text:line-break/></text:span><text:span text:style-name="T63">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497" draw:end-glue-point="6" svg:d="M151265 40200c0-762 3210-254 3210-1016" svg:viewBox="0 0 3211 1017">
          <text:p/>
        </draw:connector>
        <draw:connector draw:style-name="gr85" draw:text-style-name="P15" draw:layer="layout" draw:type="curve" svg:x1="109.735cm" svg:y1="51.682cm" svg:x2="106.962cm" svg:y2="54.79cm" draw:start-shape="id498" draw:start-glue-point="2" draw:end-shape="id499" draw:end-glue-point="0" svg:d="M109735 51682c0 2331-2773 777-2773 3108" svg:viewBox="0 0 2774 3109">
          <text:p/>
        </draw:connector>
        <draw:rect draw:style-name="gr41" draw:text-style-name="P5" xml:id="id499" draw:id="id499" draw:layer="layout" svg:width="2.79cm" svg:height="0.955cm" svg:x="105.567cm" svg:y="54.79cm">
          <text:p text:style-name="P5">Decision<text:line-break/>making</text:p>
        </draw:rect>
        <draw:rect draw:style-name="gr41" draw:text-style-name="P5" xml:id="id500" draw:id="id500" draw:layer="layout" svg:width="2.79cm" svg:height="0.955cm" svg:x="102.367cm" svg:y="54.782cm">
          <text:p text:style-name="P5">Planning</text:p>
        </draw:rect>
        <draw:connector draw:style-name="gr257" draw:text-style-name="P15" draw:layer="layout" draw:type="curve" svg:x1="109.735cm" svg:y1="51.682cm" svg:x2="103.762cm" svg:y2="54.782cm" draw:start-shape="id498" draw:start-glue-point="2" draw:end-shape="id500" draw:end-glue-point="0" svg:d="M109735 51682c0 2325-5973 775-5973 3100" svg:viewBox="0 0 5974 3101">
          <text:p/>
        </draw:connector>
        <draw:rect draw:style-name="gr41" draw:text-style-name="P5" xml:id="id501" draw:id="id501" draw:layer="layout" svg:width="2.79cm" svg:height="0.955cm" svg:x="108.669cm" svg:y="54.79cm">
          <text:p text:style-name="P5">Concept<text:line-break/>formation</text:p>
        </draw:rect>
        <draw:connector draw:style-name="gr258" draw:text-style-name="P15" draw:layer="layout" draw:type="curve" svg:x1="109.735cm" svg:y1="51.682cm" svg:x2="110.064cm" svg:y2="54.79cm" draw:start-shape="id498" draw:start-glue-point="2" draw:end-shape="id501" svg:d="M109735 51682c0 2331 329 777 329 3108" svg:viewBox="0 0 330 3109">
          <text:p/>
        </draw:connector>
        <draw:rect draw:style-name="gr41" draw:text-style-name="P5" xml:id="id498" draw:id="id498" draw:layer="layout" svg:width="2.79cm" svg:height="0.955cm" svg:x="108.34cm" svg:y="50.727cm">
          <text:p text:style-name="P5">thinking</text:p>
        </draw:rect>
        <draw:rect draw:style-name="gr41" draw:text-style-name="P5" xml:id="id502" draw:id="id502" draw:layer="layout" svg:width="2.79cm" svg:height="0.955cm" svg:x="111.922cm" svg:y="54.79cm">
          <text:p text:style-name="P5">Problem<text:line-break/>solving</text:p>
        </draw:rect>
        <draw:rect draw:style-name="gr41" draw:text-style-name="P5" xml:id="id503" draw:id="id503" draw:layer="layout" svg:width="2.79cm" svg:height="0.955cm" svg:x="115.044cm" svg:y="54.79cm">
          <text:p text:style-name="P5">Reasoning</text:p>
        </draw:rect>
        <draw:connector draw:style-name="gr263" draw:text-style-name="P15" draw:layer="layout" draw:type="curve" svg:x1="109.735cm" svg:y1="51.682cm" svg:x2="113.317cm" svg:y2="54.79cm" draw:start-shape="id498" draw:start-glue-point="2" draw:end-shape="id502" svg:d="M109735 51682c0 2331 3582 777 3582 3108" svg:viewBox="0 0 3583 3109">
          <text:p/>
        </draw:connector>
        <draw:connector draw:style-name="gr264" draw:text-style-name="P15" draw:layer="layout" draw:type="curve" svg:x1="109.735cm" svg:y1="51.682cm" svg:x2="116.439cm" svg:y2="54.79cm" draw:start-shape="id498" draw:start-glue-point="2" draw:end-shape="id503" draw:end-glue-point="0" svg:d="M109735 51682c0 2331 6704 777 6704 3108" svg:viewBox="0 0 6705 3109">
          <text:p/>
        </draw:connector>
        <draw:connector draw:style-name="gr633" draw:text-style-name="P7" draw:layer="layout" draw:type="curve" svg:x1="-16.897cm" svg:y1="27.437cm" svg:x2="-23.334cm" svg:y2="26.699cm" draw:start-shape="id1" draw:start-glue-point="3" draw:end-shape="id3" draw:end-glue-point="0" svg:d="M-16897 27437c-3910 0-3258-620-3890-992s-2547-497-2547 254" svg:viewBox="0 0 6438 1289">
          <text:p text:style-name="P19">What should<text:line-break/>be saved</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1DT15H17M4S</meta:editing-duration>
    <meta:editing-cycles>736</meta:editing-cycles>
    <meta:generator>LibreOffice/25.8.0.4$Linux_X86_64 LibreOffice_project/48f00303701489684e67c38c28aff00cd5929e67</meta:generator>
    <dc:title>diagram</dc:title>
    <dc:date>2026-05-04T23:42:21.932027461</dc:date>
    <meta:document-statistic meta:object-count="1795"/>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