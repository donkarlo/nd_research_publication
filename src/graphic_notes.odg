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4"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4" manifest:media-type="application/vnd.oasis.opendocument.formula"/>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7" manifest:media-type=""/>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draw:stroke="none" draw:fill="none" draw:textarea-horizontal-align="center" fo:min-height="1.273cm"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3"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4" style:family="graphic" style:parent-style-name="standard">
      <style:graphic-properties draw:stroke="none" svg:stroke-color="#000000" draw:fill="none" draw:fill-color="#ffffff" draw:textarea-horizontal-align="center" draw:auto-grow-height="true" draw:auto-grow-width="true" fo:min-height="0.908cm" fo:min-width="3.243cm" loext:decorative="false"/>
      <style:paragraph-properties style:writing-mode="lr-tb"/>
    </style:style>
    <style:style style:name="gr495" style:family="graphic" style:parent-style-name="standard">
      <style:graphic-properties draw:stroke="none" draw:fill="none" fo:min-height="0.637cm" loext:decorative="false"/>
      <style:paragraph-properties style:writing-mode="lr-tb"/>
    </style:style>
    <style:style style:name="gr496"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7"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9"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1"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2"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3" style:family="graphic" style:parent-style-name="objectwithoutfill">
      <style:graphic-properties draw:marker-end="" draw:marker-end-width="0.1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5" style:family="graphic" style:parent-style-name="objectwithoutfill">
      <style:graphic-properties draw:marker-start="Arrow_20_short" draw:marker-end="" draw:marker-end-width="0.2cm" draw:fill="solid" draw:textarea-vertical-align="middle" loext:decorative="false"/>
    </style:style>
    <style:style style:name="gr506" style:family="graphic" style:parent-style-name="objectwithoutfill">
      <style:graphic-properties draw:marker-start="" draw:marker-end="Arrow_20_short" draw:marker-end-width="0.2cm" draw:fill="solid" draw:textarea-vertical-align="middle" loext:decorative="false"/>
    </style:style>
    <style:style style:name="gr507"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8"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1"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3"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6"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7"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8"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9"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20" style:family="graphic" style:parent-style-name="standard">
      <style:graphic-properties draw:fill="none" draw:textarea-vertical-align="middle" draw:auto-grow-height="false" fo:min-height="5.322cm" fo:min-width="0cm" fo:wrap-option="wrap" loext:decorative="false"/>
    </style:style>
    <style:style style:name="gr521"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22" style:family="graphic" style:parent-style-name="standard">
      <style:graphic-properties draw:fill="none" draw:textarea-vertical-align="middle" draw:auto-grow-height="false" fo:min-height="8.775cm" fo:min-width="0.065cm" fo:wrap-option="wrap" loext:decorative="false"/>
    </style:style>
    <style:style style:name="gr523"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4" style:family="graphic" style:parent-style-name="Object_20_with_20_no_20_fill_20_and_20_no_20_line">
      <style:graphic-properties draw:textarea-horizontal-align="center" draw:textarea-vertical-align="middle" draw:ole-draw-aspect="1" style:protect="size" loext:decorative="false"/>
    </style:style>
    <style:style style:name="gr525"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6"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7"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8" style:family="graphic" style:parent-style-name="objectwithoutfill">
      <style:graphic-properties draw:marker-end="Arrowheads_20_418" draw:marker-end-width="0.3cm" draw:fill="solid" draw:textarea-vertical-align="middle" loext:decorative="false"/>
    </style:style>
    <style:style style:name="gr529"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30"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31" style:family="graphic" style:parent-style-name="standard">
      <style:graphic-properties draw:stroke="none" draw:fill="none" draw:textarea-horizontal-align="center" fo:min-height="1.971cm" loext:decorative="false"/>
      <style:paragraph-properties style:writing-mode="lr-tb"/>
    </style:style>
    <style:style style:name="gr532" style:family="graphic" style:parent-style-name="standard">
      <style:graphic-properties draw:textarea-horizontal-align="justify" draw:textarea-vertical-align="middle" draw:auto-grow-height="false" fo:min-height="3.285cm" fo:min-width="2.618cm" loext:decorative="false"/>
    </style:style>
    <style:style style:name="gr533" style:family="graphic" style:parent-style-name="standard">
      <style:graphic-properties draw:stroke="none" draw:fill="solid" draw:fill-color="#345d95" draw:textarea-vertical-align="middle" draw:auto-grow-height="false" fo:min-height="0cm" fo:min-width="0cm" loext:decorative="false"/>
    </style:style>
    <style:style style:name="gr534"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5" style:family="graphic" style:parent-style-name="standard">
      <style:graphic-properties draw:stroke="none" draw:fill="solid" draw:fill-color="#b4d2ea" draw:textarea-vertical-align="middle" draw:auto-grow-height="false" fo:min-height="0cm" fo:min-width="0cm" loext:decorative="false"/>
    </style:style>
    <style:style style:name="gr536"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40"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41"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2" style:family="graphic" style:parent-style-name="objectwithoutfill">
      <style:graphic-properties draw:marker-end="Arrowheads_20_419" draw:marker-end-width="0.2cm" draw:fill="solid" draw:textarea-vertical-align="middle" loext:decorative="false"/>
    </style:style>
    <style:style style:name="gr543"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6" style:family="graphic" style:parent-style-name="standard" style:list-style-name="L1">
      <style:graphic-properties draw:stroke="none" draw:fill="none" fo:min-height="0.48cm" loext:decorative="false"/>
      <style:paragraph-properties style:writing-mode="lr-tb"/>
    </style:style>
    <style:style style:name="gr547" style:family="graphic" style:parent-style-name="standard" style:list-style-name="L1">
      <style:graphic-properties draw:stroke="none" draw:fill="none" fo:min-height="0.48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9" style:family="graphic" style:parent-style-name="standard">
      <style:graphic-properties draw:marker-start="Arrow" draw:marker-start-width="0.05cm" draw:marker-end="Arrow" draw:marker-end-width="0.05cm" draw:textarea-vertical-align="middle" loext:decorative="false"/>
    </style:style>
    <style:style style:name="gr550"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51" style:family="graphic" style:parent-style-name="objectwithoutfill">
      <style:graphic-properties draw:marker-end="Arrow" draw:marker-end-width="0.2cm" draw:fill="solid" draw:textarea-vertical-align="middle" loext:decorative="false"/>
    </style:style>
    <style:style style:name="gr552"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3"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4" style:family="graphic" style:parent-style-name="standard">
      <style:graphic-properties draw:marker-end="Arrowheads_20_420" draw:textarea-vertical-align="middle" loext:decorative="false"/>
    </style:style>
    <style:style style:name="gr555"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9"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60"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61"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2"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3"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4"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5" style:family="graphic" style:parent-style-name="standard">
      <style:graphic-properties draw:stroke="none" draw:fill="none" draw:textarea-horizontal-align="center" fo:min-height="1.183cm" loext:decorative="false"/>
      <style:paragraph-properties style:writing-mode="lr-tb"/>
    </style:style>
    <style:style style:name="gr566"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7" style:family="graphic" style:parent-style-name="objectwithoutfill">
      <style:graphic-properties draw:marker-end="Arrow" draw:marker-end-width="0.1cm" draw:fill="solid" draw:textarea-vertical-align="middle" loext:decorative="false"/>
    </style:style>
    <style:style style:name="gr568"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9"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70"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71"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2"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3" style:family="graphic" style:parent-style-name="objectwithoutfill">
      <style:graphic-properties draw:marker-end="Arrow" draw:marker-end-width="0.1cm" draw:fill="solid" draw:textarea-vertical-align="bottom" loext:decorative="false"/>
    </style:style>
    <style:style style:name="gr574"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5" style:family="graphic" style:parent-style-name="Arrow_20_Line" style:list-style-name="L1">
      <style:graphic-properties draw:textarea-vertical-align="middle" draw:line-distance="0.14cm" loext:decorative="false"/>
      <style:paragraph-properties style:writing-mode="lr-tb"/>
    </style:style>
    <style:style style:name="gr576"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7"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8"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9"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80"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1"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2"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3"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4"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5"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6"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7"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8"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9"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90"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1"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2"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3"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7"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8"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9"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600"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1"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2"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3"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4"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5"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6"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7"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8"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9"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10"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1" style:family="graphic" style:parent-style-name="standard">
      <style:graphic-properties draw:fill="none" draw:textarea-vertical-align="middle" draw:auto-grow-height="false" fo:min-height="1.481cm" fo:min-width="0cm" fo:wrap-option="wrap" loext:decorative="false"/>
    </style:style>
    <style:style style:name="gr612"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3" style:family="graphic" style:parent-style-name="standard">
      <style:graphic-properties draw:fill="none" draw:textarea-vertical-align="middle" draw:auto-grow-height="false" fo:min-height="1.095cm" fo:min-width="0cm" fo:wrap-option="wrap" loext:decorative="false"/>
    </style:style>
    <style:style style:name="gr614" style:family="graphic" style:parent-style-name="objectwithoutfill">
      <style:graphic-properties draw:marker-end="Arrowheads_20_399" draw:marker-end-width="0.1cm" draw:fill="solid" draw:textarea-vertical-align="middle" loext:decorative="false"/>
    </style:style>
    <style:style style:name="gr615" style:family="graphic" style:parent-style-name="objectwithoutfill">
      <style:graphic-properties draw:marker-end="Arrowheads_20_400" draw:marker-end-width="0.1cm" draw:fill="solid" draw:textarea-vertical-align="middle" loext:decorative="false"/>
    </style:style>
    <style:style style:name="gr616"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8"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9"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20"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1" style:family="graphic" style:parent-style-name="standard">
      <style:graphic-properties draw:stroke="none" svg:stroke-color="#000000" draw:fill="none" draw:fill-color="#ffffff" draw:textarea-horizontal-align="center" draw:auto-grow-height="true" draw:auto-grow-width="true" fo:min-height="1.575cm" fo:min-width="8.291cm" loext:decorative="false"/>
      <style:paragraph-properties style:writing-mode="lr-tb"/>
    </style:style>
    <style:style style:name="gr622" style:family="graphic" style:parent-style-name="objectwithoutfill">
      <style:graphic-properties draw:marker-start="Arrow" draw:marker-start-width="0.15cm" draw:marker-end="Arrow" draw:marker-end-width="0.15cm" draw:fill="solid" draw:textarea-vertical-align="middle" loext:decorative="false"/>
    </style:style>
    <style:style style:name="gr623" style:family="graphic" style:parent-style-name="objectwithoutfill">
      <style:graphic-properties draw:marker-start="" draw:marker-start-width="0.15cm" draw:marker-end="Arrow" draw:marker-end-width="0.15cm" draw:fill="solid" draw:textarea-vertical-align="middle" loext:decorative="false"/>
    </style:style>
    <style:style style:name="gr624" style:family="graphic" style:parent-style-name="standard">
      <style:graphic-properties draw:stroke="none" svg:stroke-color="#000000" draw:fill="none" draw:fill-color="#ffffff" draw:textarea-horizontal-align="left" draw:auto-grow-height="true" draw:auto-grow-width="true" fo:min-height="0.395cm" fo:min-width="3.537cm" loext:decorative="false"/>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8"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3"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4"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5" style:family="graphic" style:parent-style-name="objectwithoutfill">
      <style:graphic-properties draw:marker-end="Arrowheads_20_309" draw:marker-end-width="0.3cm" draw:fill="solid" draw:textarea-vertical-align="middle" loext:decorative="false"/>
    </style:style>
    <style:style style:name="gr636" style:family="graphic" style:parent-style-name="objectwithoutfill">
      <style:graphic-properties draw:marker-end="Arrowheads_20_310" draw:marker-end-width="0.3cm" draw:fill="solid" draw:textarea-vertical-align="middle" loext:decorative="false"/>
    </style:style>
    <style:style style:name="gr637" style:family="graphic" style:parent-style-name="objectwithoutfill">
      <style:graphic-properties draw:marker-end="Arrowheads_20_311" draw:marker-end-width="0.3cm" draw:fill="solid" draw:textarea-vertical-align="middle" loext:decorative="false"/>
    </style:style>
    <style:style style:name="gr638" style:family="graphic" style:parent-style-name="objectwithoutfill">
      <style:graphic-properties draw:marker-end="Arrowheads_20_312" draw:marker-end-width="0.3cm" draw:fill="solid" draw:textarea-vertical-align="middle" loext:decorative="false"/>
    </style:style>
    <style:style style:name="gr639" style:family="graphic" style:parent-style-name="objectwithoutfill">
      <style:graphic-properties draw:marker-end="Arrowheads_20_313" draw:marker-end-width="0.3cm" draw:fill="solid" draw:textarea-vertical-align="middle" loext:decorative="false"/>
    </style:style>
    <style:style style:name="gr640"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41"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2"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4"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6"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8"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9"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50"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2"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3"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4"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5"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61"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2"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3"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4"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6"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7"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gr66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66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style>
    <style:style style:name="gr670"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1"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2"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673"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777cm" fo:min-width="2.033cm" fo:padding-top="0.55cm" fo:padding-bottom="0.25cm" fo:padding-left="0.27cm" fo:padding-right="0.27cm" style:writing-mode="lr-tb" loext:decorative="false"/>
      <style:paragraph-properties style:writing-mode="lr-tb"/>
    </style:style>
    <style:style style:name="gr677" style:family="graphic" style:parent-style-name="standard">
      <style:graphic-properties draw:textarea-horizontal-align="justify" draw:textarea-vertical-align="middle" draw:auto-grow-height="false" fo:min-height="0.775cm" fo:min-width="1.392cm" style:writing-mode="lr-tb" loext:decorative="false"/>
      <style:paragraph-properties style:writing-mode="lr-tb"/>
    </style:style>
    <style:style style:name="gr67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317cm" fo:min-width="3.09cm" fo:padding-top="0.65cm" fo:padding-bottom="0.25cm" fo:padding-left="0.27cm" fo:padding-right="0.27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false" fo:min-height="0.405cm" fo:min-width="0cm" loext:decorative="false"/>
      <style:paragraph-properties style:writing-mode="lr-tb"/>
    </style:style>
    <style:style style:name="gr680" style:family="graphic" style:parent-style-name="standard">
      <style:graphic-properties draw:stroke="none" draw:fill="solid" draw:fill-color="#808080" draw:opacity="75%" draw:textarea-horizontal-align="justify" draw:textarea-vertical-align="middle" draw:auto-grow-height="true" fo:min-height="0cm" fo:min-width="0cm" draw:shadow-opacity="75%" style:writing-mode="lr-tb" loext:decorative="false"/>
      <style:paragraph-properties style:writing-mode="lr-tb"/>
    </style:style>
    <style:style style:name="gr681"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none" draw:fill-color="#ffffff"/>
      <style:paragraph-properties fo:margin-top="0.42cm" fo:margin-bottom="0.35cm" fo:text-align="center"/>
      <style:text-properties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0"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1" style:family="paragraph">
      <style:paragraph-properties fo:text-align="center"/>
      <style:text-properties fo:color="#ffffff" loext:opacity="100%" fo:font-size="10pt" style:font-size-asian="10pt" style:font-size-complex="10pt"/>
    </style:style>
    <style:style style:name="P142"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3" style:family="paragraph">
      <loext:graphic-properties draw:fill="solid" draw:fill-color="#6390c2"/>
      <style:paragraph-properties fo:text-align="center" style:writing-mode="lr-tb"/>
      <style:text-properties fo:font-size="10pt" style:font-size-asian="10pt" style:font-size-complex="10pt"/>
    </style:style>
    <style:style style:name="P144" style:family="paragraph">
      <style:paragraph-properties fo:margin-left="0cm" fo:margin-right="0cm" fo:text-align="center" fo:text-indent="0cm"/>
      <style:text-properties fo:color="#ffffff" loext:opacity="100%" fo:font-size="10pt" style:font-size-asian="10pt" style:font-size-complex="10pt"/>
    </style:style>
    <style:style style:name="P145" style:family="paragraph">
      <loext:graphic-properties draw:fill="solid" draw:fill-color="#70ae61"/>
      <style:paragraph-properties fo:text-align="center"/>
      <style:text-properties fo:color="#ffffff" loext:opacity="100%" fo:font-size="8pt" style:font-size-asian="8pt" style:font-size-complex="8pt"/>
    </style:style>
    <style:style style:name="P146" style:family="paragraph">
      <loext:graphic-properties draw:fill="none" draw:fill-color="#ffffff"/>
      <style:text-properties fo:color="#ffffff" loext:opacity="100%" fo:font-size="8pt" style:font-size-asian="8pt" style:font-size-complex="8pt"/>
    </style:style>
    <style:style style:name="P147" style:family="paragraph">
      <style:paragraph-properties fo:text-align="center"/>
      <style:text-properties fo:color="#ffffff" loext:opacity="100%" fo:font-size="10pt" fo:font-weight="bold" style:font-size-asian="10pt" style:font-weight-asian="bold" style:font-size-complex="10pt" style:font-weight-complex="bold"/>
    </style:style>
    <style:style style:name="P148"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49"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50"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1"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2"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3" style:family="paragraph">
      <style:paragraph-properties fo:margin-top="0.42cm" fo:margin-bottom="0.35cm" fo:text-align="center"/>
      <style:text-properties fo:font-size="10pt" style:font-size-asian="10pt" style:font-size-complex="10pt"/>
    </style:style>
    <style:style style:name="P154"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5"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6"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7" style:family="paragraph">
      <style:paragraph-properties fo:margin-top="0.42cm" fo:margin-bottom="0.35cm" fo:text-align="center"/>
      <style:text-properties fo:font-size="8pt" style:font-size-asian="8pt" style:font-size-complex="8pt"/>
    </style:style>
    <style:style style:name="P158"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9" style:family="paragraph">
      <loext:graphic-properties draw:fill="solid" draw:fill-color="#345d95"/>
      <style:paragraph-properties fo:text-align="center"/>
    </style:style>
    <style:style style:name="P160" style:family="paragraph">
      <loext:graphic-properties draw:fill="none" draw:fill-color="#ffffff"/>
      <style:paragraph-properties fo:text-align="center"/>
      <style:text-properties fo:font-size="8pt" style:font-size-asian="8pt" style:font-size-complex="8pt"/>
    </style:style>
    <style:style style:name="P161" style:family="paragraph">
      <loext:graphic-properties draw:fill="none" draw:fill-color="#ffffff"/>
      <style:text-properties fo:color="#f45f74" loext:opacity="100%" fo:font-size="8pt" style:font-size-asian="8pt" style:font-size-complex="8pt"/>
    </style:style>
    <style:style style:name="P162" style:family="paragraph">
      <style:paragraph-properties fo:margin-left="0cm" fo:margin-right="0cm" fo:margin-top="0.42cm" fo:margin-bottom="0.35cm" fo:line-height="100%" fo:text-indent="0cm"/>
    </style:style>
    <style:style style:name="P163"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4"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5"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6"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67" style:family="paragraph">
      <loext:graphic-properties draw:fill="none" draw:fill-color="#ffffff"/>
      <style:text-properties fo:font-size="10pt" fo:font-weight="bold" style:font-size-asian="10pt" style:font-weight-asian="bold" style:font-size-complex="10pt" style:font-weight-complex="bold"/>
    </style:style>
    <style:style style:name="P168" style:family="paragraph">
      <loext:graphic-properties draw:fill="solid" draw:fill-color="#e8995a"/>
      <style:paragraph-properties fo:text-align="center" style:writing-mode="lr-tb"/>
      <style:text-properties fo:font-size="10pt" style:font-size-asian="10pt" style:font-size-complex="10pt"/>
    </style:style>
    <style:style style:name="P16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1"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2"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3" style:family="paragraph">
      <loext:graphic-properties draw:fill="solid" draw:fill-color="#333333"/>
      <style:paragraph-properties fo:text-align="center"/>
    </style:style>
    <style:style style:name="P174" style:family="paragraph">
      <loext:graphic-properties draw:fill="solid" draw:fill-color="#ffffff"/>
      <style:paragraph-properties fo:text-align="center"/>
    </style:style>
    <style:style style:name="P175" style:family="paragraph">
      <loext:graphic-properties draw:fill="solid" draw:fill-color="#cfe8fa"/>
      <style:paragraph-properties fo:text-align="center"/>
    </style:style>
    <style:style style:name="P176" style:family="paragraph">
      <loext:graphic-properties draw:fill="none" draw:fill-color="#cfe8fa"/>
      <style:paragraph-properties fo:text-align="center"/>
    </style:style>
    <style:style style:name="P177"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8" style:family="paragraph">
      <loext:graphic-properties draw:fill="solid" draw:fill-color="#bfe3bd"/>
      <style:paragraph-properties fo:text-align="center"/>
    </style:style>
    <style:style style:name="P179" style:family="paragraph">
      <loext:graphic-properties draw:fill="none" draw:fill-color="#bfe3bd"/>
      <style:paragraph-properties fo:text-align="center"/>
    </style:style>
    <style:style style:name="P18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1" style:family="paragraph">
      <loext:graphic-properties draw:fill="solid" draw:fill-color="#d36b42"/>
      <style:paragraph-properties fo:text-align="center"/>
    </style:style>
    <style:style style:name="P182" style:family="paragraph">
      <loext:graphic-properties draw:fill="solid" draw:fill-color="#f7d682"/>
      <style:paragraph-properties fo:text-align="center"/>
    </style:style>
    <style:style style:name="P183" style:family="paragraph">
      <loext:graphic-properties draw:fill="none" draw:fill-color="#f7d682"/>
      <style:paragraph-properties fo:text-align="center"/>
    </style:style>
    <style:style style:name="P184" style:family="paragraph">
      <loext:graphic-properties draw:fill="solid" draw:fill-color="#d6cce4"/>
      <style:paragraph-properties fo:text-align="center"/>
    </style:style>
    <style:style style:name="P185" style:family="paragraph">
      <loext:graphic-properties draw:fill="none" draw:fill-color="#d6cce4"/>
      <style:paragraph-properties fo:text-align="center"/>
    </style:style>
    <style:style style:name="P186" style:family="paragraph">
      <loext:graphic-properties draw:fill="none" draw:fill-color="#ffffff"/>
      <style:text-properties fo:font-size="18pt" style:font-size-asian="18pt" style:font-size-complex="18pt"/>
    </style:style>
    <style:style style:name="P187" style:family="paragraph">
      <loext:graphic-properties draw:fill="solid" draw:fill-color="#accda1" draw:opacity="50%"/>
      <style:paragraph-properties fo:text-align="center"/>
    </style:style>
    <style:style style:name="P188" style:family="paragraph">
      <loext:graphic-properties draw:fill="solid" draw:fill-color="#b4d2ea" draw:opacity="50%"/>
      <style:paragraph-properties fo:text-align="center"/>
    </style:style>
    <style:style style:name="P189" style:family="paragraph">
      <loext:graphic-properties draw:fill="none" draw:fill-color="#ffffff"/>
      <style:paragraph-properties fo:text-align="center"/>
      <style:text-properties fo:color="#00b0be" loext:opacity="100%" fo:font-size="20pt" fo:font-weight="bold" fo:background-color="transparent" style:font-size-asian="20pt" style:font-weight-asian="bold" style:font-size-complex="20pt" style:font-weight-complex="bold"/>
    </style:style>
    <style:style style:name="P190" style:family="paragraph">
      <loext:graphic-properties draw:fill="none" draw:fill-color="#ffffff"/>
      <style:text-properties fo:font-size="10pt" style:font-size-asian="10pt" style:font-size-complex="10pt"/>
    </style:style>
    <style:style style:name="P191" style:family="paragraph">
      <loext:graphic-properties draw:fill="none" draw:fill-color="#ffffff"/>
      <style:paragraph-properties fo:text-align="center"/>
      <style:text-properties fo:color="#ffffff" loext:opacity="100%" fo:font-size="8pt" style:font-size-asian="8pt" style:font-size-complex="8pt"/>
    </style:style>
    <style:style style:name="P192"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3" style:family="paragraph">
      <loext:graphic-properties draw:fill="none"/>
      <style:text-properties fo:font-weight="bold" style:font-weight-asian="bold" style:font-weight-complex="bold"/>
    </style:style>
    <style:style style:name="P194"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5" style:family="paragraph">
      <loext:graphic-properties draw:fill="solid" draw:fill-color="#f4b183"/>
      <style:paragraph-properties fo:text-align="center"/>
    </style:style>
    <style:style style:name="P196" style:family="paragraph">
      <loext:graphic-properties draw:fill="none" draw:fill-color="#f4b183"/>
      <style:paragraph-properties fo:text-align="center"/>
    </style:style>
    <style:style style:name="P197" style:family="paragraph">
      <loext:graphic-properties draw:fill="solid" draw:fill-color="#c96b5f"/>
      <style:paragraph-properties fo:text-align="center"/>
    </style:style>
    <style:style style:name="P198" style:family="paragraph">
      <loext:graphic-properties draw:fill="none" draw:fill-color="#c96b5f"/>
      <style:paragraph-properties fo:text-align="center"/>
    </style:style>
    <style:style style:name="P199" style:family="paragraph">
      <loext:graphic-properties draw:fill="solid" draw:fill-color="#7f3f3f"/>
      <style:paragraph-properties fo:text-align="center"/>
    </style:style>
    <style:style style:name="P200" style:family="paragraph">
      <loext:graphic-properties draw:fill="solid" draw:fill-color="#a8dadc"/>
      <style:paragraph-properties fo:text-align="center"/>
    </style:style>
    <style:style style:name="P201" style:family="paragraph">
      <loext:graphic-properties draw:fill="none" draw:fill-color="#a8dadc"/>
      <style:paragraph-properties fo:text-align="center"/>
    </style:style>
    <style:style style:name="P202" style:family="paragraph">
      <loext:graphic-properties draw:fill="solid" draw:fill-color="#263238"/>
      <style:paragraph-properties fo:text-align="center"/>
    </style:style>
    <style:style style:name="P203"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4"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5"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6" style:family="paragraph">
      <loext:graphic-properties draw:fill="solid" draw:fill-color="#ff5128"/>
      <style:paragraph-properties fo:margin-left="0cm" fo:margin-right="0cm" fo:margin-top="0.42cm" fo:margin-bottom="0.35cm" fo:line-height="100%" fo:text-align="center" fo:text-indent="0cm" style:writing-mode="lr-tb"/>
    </style:style>
    <style:style style:name="P207" style:family="paragraph">
      <loext:graphic-properties draw:fill="solid" draw:fill-color="#f45f74"/>
      <style:paragraph-properties fo:text-align="center" style:writing-mode="lr-tb"/>
    </style:style>
    <style:style style:name="P208" style:family="paragraph">
      <loext:graphic-properties draw:fill="solid" draw:fill-color="#808080"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font-size="14pt" fo:font-weight="bold" style:font-size-asian="14pt" style:font-weight-asian="bold" style:font-size-complex="14pt" style:font-weight-complex="bold"/>
    </style:style>
    <style:style style:name="T51"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52" style:family="text">
      <style:text-properties fo:color="#f45f74" loext:opacity="100%" fo:font-size="8pt" style:font-size-asian="8pt" style:font-size-complex="8pt"/>
    </style:style>
    <style:style style:name="T53" style:family="text">
      <style:text-properties fo:font-size="10pt" fo:font-weight="bold" style:font-size-asian="10pt" style:font-weight-asian="bold" style:font-size-complex="10pt" style:font-weight-complex="bold"/>
    </style:style>
    <style:style style:name="T54" style:family="text">
      <style:text-properties fo:color="#00b0be" loext:opacity="100%" fo:font-size="15pt" fo:font-weight="bold" fo:background-color="transparent" style:font-size-asian="15pt" style:font-weight-asian="bold" style:font-size-complex="15pt" style:font-weight-complex="bold"/>
    </style:style>
    <style:style style:name="T55" style:family="text">
      <style:text-properties fo:font-size="10pt" fo:font-weight="normal" style:font-size-asian="10pt" style:font-weight-asian="normal" style:font-size-complex="10pt" style:font-weight-complex="normal"/>
    </style:style>
    <style:style style:name="T56"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7" style:family="text">
      <style:text-properties fo:font-size="18pt" style:font-size-asian="18pt" style:font-size-complex="18pt"/>
    </style:style>
    <style:style style:name="T58"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9" style:family="text">
      <style:text-properties style:text-position="sub 58%"/>
    </style:style>
    <style:style style:name="T60" style:family="text">
      <style:text-properties style:text-position="super 58%"/>
    </style:style>
    <style:style style:name="T61" style:family="text">
      <style:text-properties fo:color="#00b0be" loext:opacity="100%" fo:font-size="20pt" fo:font-weight="bold" fo:background-color="transparent" style:font-size-asian="20pt" style:font-weight-asian="bold" style:font-size-complex="20pt" style:font-weight-complex="bold"/>
    </style:style>
    <style:style style:name="T62" style:family="text">
      <style:text-properties fo:color="#ffffff" loext:opacity="100%" fo:font-size="8pt" fo:font-weight="bold" style:font-size-asian="8pt" style:font-weight-asian="bold" style:font-size-complex="8pt" style:font-weight-complex="bold"/>
    </style:style>
    <style:style style:name="T63"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4" style:family="text">
      <style:text-properties fo:font-size="8pt" fo:font-weight="bold" style:font-size-asian="8pt" style:font-weight-asian="bold" style:font-size-complex="8pt" style:font-weight-complex="bold"/>
    </style:style>
    <style:style style:name="T65" style:family="text">
      <style:text-properties fo:font-size="8pt" fo:font-weight="normal" style:font-size-asian="8pt" style:font-weight-asian="normal" style:font-size-complex="8pt" style:font-weight-complex="normal"/>
    </style:style>
    <style:style style:name="T66" style:family="text">
      <style:text-properties fo:color="#bb63c2" loext:opacity="100%" fo:font-size="16pt" fo:font-weight="bold" style:font-size-asian="16pt" style:font-weight-asian="bold" style:font-size-complex="16pt" style:font-weight-complex="bold"/>
    </style:style>
    <style:style style:name="T67"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68"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69"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T70" style:family="text">
      <style:text-properties style:text-position="sub 58%"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text:span><text:span text:style-name="T1">s</text:span><text:span text:style-name="T1"><text:line-break/></text:span><text:span text:style-name="T1">(recept</text:span><text:span text:style-name="T1">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text:span><text:span text:style-name="T2">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ext:span><text:span text:style-name="T8">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85" draw:id="id385" draw:layer="layout" svg:width="2.714cm" svg:height="1.756cm" svg:x="-24.51cm" svg:y="14.393cm">
          <text:p text:style-name="P5"><text:span text:style-name="T2">Homeostati</text:span><text:span text:style-name="T2">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text:span><text:span text:style-name="T2">mic </text:span><text:span text:style-name="T2"><text:line-break/></text:span><text:span text:style-name="T2">foragin</text:span><text:span text:style-name="T2">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ext:span><text:span text:style-name="T16">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5cm" svg:x="236.71cm" svg:y="14.974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74cm" svg:x2="241.848cm" svg:y2="13.474cm" draw:start-shape="id36" draw:start-glue-point="4" draw:end-shape="id37" draw:end-glue-point="8" svg:d="M237714 14974c0-1125 4134-375 4134-1500" svg:viewBox="0 0 4135 1501">
            <text:p/>
          </draw:connector>
          <draw:custom-shape draw:style-name="gr64" draw:text-style-name="P45" xml:id="id38" draw:id="id38" draw:layer="layout" svg:width="2.331cm" svg:height="1.025cm" svg:x="245.051cm" svg:y="14.974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74cm" svg:x2="241.847cm" svg:y2="13.474cm" draw:start-shape="id38" draw:start-glue-point="4" draw:end-shape="id37" svg:d="M246217 14974c0-1125-4370-375-4370-1500" svg:viewBox="0 0 4371 1501">
            <text:p/>
          </draw:connector>
          <draw:custom-shape draw:style-name="gr64" draw:text-style-name="P45" xml:id="id39" draw:id="id39" draw:layer="layout" svg:width="2.773cm" svg:height="1.025cm" svg:x="234.618cm" svg:y="17.174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5cm" svg:x="237.756cm" svg:y="17.149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74cm" svg:x2="237.714cm" svg:y2="15.999cm" draw:start-shape="id39" draw:start-glue-point="4" draw:end-shape="id36" draw:end-glue-point="8" svg:d="M236005 17174c0-882 1709-295 1709-1175" svg:viewBox="0 0 1710 1176">
            <text:p/>
          </draw:connector>
          <draw:connector draw:style-name="gr68" draw:text-style-name="P15" draw:layer="layout" draw:type="curve" svg:x1="239.509cm" svg:y1="17.149cm" svg:x2="237.714cm" svg:y2="15.999cm" draw:start-shape="id40" draw:start-glue-point="4" draw:end-shape="id36" draw:end-glue-point="8" svg:d="M239509 17149c0-862-1795-288-1795-1150" svg:viewBox="0 0 1796 1151">
            <text:p/>
          </draw:connector>
          <draw:custom-shape draw:style-name="gr64" draw:text-style-name="P45" xml:id="id41" draw:id="id41" draw:layer="layout" svg:width="2.173cm" svg:height="1.025cm" svg:x="243.624cm" svg:y="17.174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5cm" svg:x="246.862cm" svg:y="17.149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74cm" svg:x2="246.217cm" svg:y2="15.999cm" draw:start-shape="id41" draw:start-glue-point="4" draw:end-shape="id38" draw:end-glue-point="8" svg:d="M244711 17174c0-882 1506-295 1506-1175" svg:viewBox="0 0 1507 1176">
            <text:p/>
          </draw:connector>
          <draw:connector draw:style-name="gr70" draw:text-style-name="P15" draw:layer="layout" draw:type="curve" svg:x1="248.215cm" svg:y1="17.149cm" svg:x2="246.217cm" svg:y2="15.999cm" draw:start-shape="id42" draw:start-glue-point="4" draw:end-shape="id38" draw:end-glue-point="8" svg:d="M248215 17149c0-862-1998-288-1998-1150" svg:viewBox="0 0 1999 1151">
            <text:p/>
          </draw:connector>
          <draw:custom-shape draw:style-name="gr64" draw:text-style-name="P45" xml:id="id43" draw:id="id43" draw:layer="layout" svg:width="3.539cm" svg:height="1.027cm" svg:x="236.021cm" svg:y="20.048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5cm" svg:x="240.231cm" svg:y="19.924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48cm" svg:x2="239.509cm" svg:y2="18.174cm" draw:start-shape="id43" draw:start-glue-point="4" draw:end-shape="id40" draw:end-glue-point="8" svg:d="M237791 20048c0-1405 1718-469 1718-1874" svg:viewBox="0 0 1719 1875">
            <text:p/>
          </draw:connector>
          <draw:connector draw:style-name="gr72" draw:text-style-name="P15" draw:layer="layout" draw:type="curve" svg:x1="241.584cm" svg:y1="19.924cm" svg:x2="239.509cm" svg:y2="18.174cm" draw:start-shape="id44" draw:start-glue-point="4" draw:end-shape="id40" draw:end-glue-point="8" svg:d="M241584 19924c0-1312-2075-438-2075-1750" svg:viewBox="0 0 2076 1751">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87cm" svg:x2="249.055cm" svg:y2="13.159cm" draw:start-shape="id38" draw:start-glue-point="10" draw:end-shape="id45" draw:end-glue-point="3" svg:d="M247382 15487c1255 0 419-2328 1673-2328" svg:viewBox="0 0 1674 2329">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5cm" svg:x="246.862cm" svg:y="17.15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text:span><text:span text:style-name="T23">ments</text:span></text:p>
        </draw:rect>
        <draw:rect draw:style-name="gr79" draw:text-style-name="P51" xml:id="id60" draw:id="id60" draw:layer="layout" svg:width="4.8cm" svg:height="1.3cm" svg:x="244.234cm" svg:y="64.91cm">
          <text:p text:style-name="P8"><text:span text:style-name="T23">Human in </text:span><text:span text:style-name="T23">loop</text:span><text:span text:style-name="T23"><text:line-break/></text:span><text:span text:style-name="T23">sensory-</text:span><text:span text:style-name="T23">motor </text:span><text:span text:style-name="T23">learning</text:span></text:p>
        </draw:rect>
        <draw:rect draw:style-name="gr79" draw:text-style-name="P51" xml:id="id59" draw:id="id59" draw:layer="layout" svg:width="4.3cm" svg:height="1.425cm" svg:x="245.934cm" svg:y="54.81cm">
          <text:p text:style-name="P30"><text:span text:style-name="T24">Homeo</text:span><text:span text:style-name="T24">stasis </text:span><text:span text:style-name="T24">in MRS</text:span></text:p>
        </draw:rect>
        <draw:rect draw:style-name="gr79" draw:text-style-name="P51" xml:id="id58" draw:id="id58" draw:layer="layout" svg:width="4cm" svg:height="1.119cm" svg:x="246.634cm" svg:y="61.435cm">
          <text:p text:style-name="P30"><text:span text:style-name="T24">H</text:span><text:span text:style-name="T24">o</text:span><text:span text:style-name="T24">m</text:span><text:span text:style-name="T24">e</text:span><text:span text:style-name="T24">o</text:span><text:span text:style-name="T24">s</text:span><text:span text:style-name="T24">t</text:span><text:span text:style-name="T24">a</text:span><text:span text:style-name="T24">s</text:span><text:span text:style-name="T24">i</text:span><text:span text:style-name="T24">s </text:span><text:span text:style-name="T24">i</text:span><text:span text:style-name="T24">n </text:span><text:span text:style-name="T24">o</text:span><text:span text:style-name="T24">n</text:span><text:span text:style-name="T24">e</text:span><text:span text:style-name="T24"><text:line-break/></text:span><text:span text:style-name="T24">r</text:span><text:span text:style-name="T24">o</text:span><text:span text:style-name="T24">b</text:span><text:span text:style-name="T24">o</text:span><text:span text:style-name="T24">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ext:span><text:span text:style-name="T29">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on </text:span><text:span text:style-name="T27"><text:line-break/></text:span><text:span text:style-name="T27">neuron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text:span><text:span text:style-name="T29">cogni</text:span><text:span text:style-name="T29">tive</text:span><text:span text:style-name="T29"><text:line-break/></text:span><text:span text:style-name="T29">proce</text:span><text:span text:style-name="T29">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or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plit</text:span></text:p>
        </draw:rect>
        <draw:rect draw:style-name="gr292" draw:text-style-name="P35" xml:id="id255" draw:id="id255" draw:layer="layout" svg:width="2.5cm" svg:height="1cm" svg:x="82.837cm" svg:y="60.528cm">
          <text:p text:style-name="P8"><text:span text:style-name="T27">cluste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83" draw:id="id483"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eneral event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obiographi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enes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ring </text:span></text:p>
              <text:p text:style-name="P5"><text:span text:style-name="T31">abstraction</text:span></text:p>
            </draw:text-box>
          </draw:frame>
          <draw:frame draw:style-name="gr336" draw:text-style-name="P84"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ormality</text:span></text:p>
              <text:p text:style-name="P5"><text:span text:style-name="T31">detection</text:span></text:p>
            </draw:text-box>
          </draw:frame>
          <draw:frame draw:style-name="gr341" draw:text-style-name="P84"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rioceptive DBN</text:span></text:p>
            </draw:text-box>
          </draw:frame>
          <draw:frame draw:style-name="gr336" draw:text-style-name="P86"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rocessing</text:span></text:p>
            </draw:text-box>
          </draw:frame>
          <draw:frame draw:style-name="gr346" draw:text-style-name="P89"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1</text:span></text:p>
            </draw:text-box>
          </draw:frame>
          <draw:frame draw:style-name="gr367" draw:text-style-name="P101" draw:layer="layout" svg:width="2.93cm" svg:height="1.096cm" draw:transform="rotate (1.5707963267949) translate (-108.291cm 70.891cm)">
            <draw:text-box>
              <text:p text:style-name="P99"><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posit</text:span><text:span text:style-name="T26">e</text:span><text:span text:style-name="T26"><text:line-break/></text:span><text:span text:style-name="T26">goal</text:span></text:p>
        </draw:rect>
        <draw:rect draw:style-name="gr388" draw:text-style-name="P111" draw:layer="layout" svg:width="2.256cm" svg:height="1.003cm" svg:x="-51.234cm" svg:y="17.569cm">
          <text:p text:style-name="P5"><text:span text:style-name="T17">Plan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mposi</text:span><text:span text:style-name="T26">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text:span><text:span text:style-name="T36">u</text:span><text:span text:style-name="T36">il</text:span><text:span text:style-name="T36">d</text:span><text:span text:style-name="T36">i</text:span><text:span text:style-name="T36">n</text:span><text:span text:style-name="T36">g</text:span><text:span text:style-name="T36"><text:line-break/></text:span><text:span text:style-name="T36">f</text:span><text:span text:style-name="T36">o</text:span><text:span text:style-name="T36">r</text:span><text:span text:style-name="T36">e</text:span><text:span text:style-name="T36">c</text:span><text:span text:style-name="T36">a</text:span><text:span text:style-name="T36">s</text:span><text:span text:style-name="T36">ti</text:span><text:span text:style-name="T36">n</text:span><text:span text:style-name="T36">g </text:span><text:span text:style-name="T36"><text:line-break/></text:span><text:span text:style-name="T36">tr</text:span><text:span text:style-name="T36">a</text:span><text:span text:style-name="T36">n</text:span><text:span text:style-name="T36">s</text:span><text:span text:style-name="T36">f</text:span><text:span text:style-name="T36">o</text:span><text:span text:style-name="T36">r</text:span><text:span text:style-name="T36">m</text:span><text:span text:style-name="T36">e</text:span><text:span text:style-name="T36">r</text:span><text:span text:style-name="T36"><text:line-break/></text:span><text:span text:style-name="T36">m</text:span><text:span text:style-name="T36">o</text:span><text:span text:style-name="T36">d</text:span><text:span text:style-name="T36">e</text:span><text:span text:style-name="T36">l</text:span><text:span text:style-name="T36">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ng by </text:span><text:span text:style-name="T36"><text:line-break/></text:span><text:span text:style-name="T36">demonst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prise poise</text:span><text:span text:style-name="T5"><text:line-break/></text:span><text:span text:style-name="T5">(keeping surprise</text:span><text:span text:style-name="T5"><text:line-break/></text:span><text:span text:style-name="T5">below a tolerance)</text:span></text:p>
        </draw:rect>
        <draw:rect draw:style-name="gr38" draw:text-style-name="P4" xml:id="id335" draw:id="id335" draw:layer="layout" svg:width="3.67cm" svg:height="1.892cm" svg:x="-27.561cm" svg:y="4.925cm">
          <text:p text:style-name="P5"><text:span text:style-name="T2">Homeostasis</text:span><text:span text:style-name="T2"><text:line-break/></text:span><text:span text:style-name="T2">(keeping the </text:span><text:span text:style-name="T2">physical</text:span><text:span text:style-name="T2"><text:line-break/></text:span><text:span text:style-name="T2">and </text:span><text:span text:style-name="T2">chemical </text:span><text:span text:style-name="T2"><text:line-break/></text:span><text:span text:style-name="T2">conditions, </text:span><text:span text:style-name="T2">balanced)</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text:span><text:span text:style-name="T16">asis</text:span><text:span text:style-name="T16"><text:line-break/></text:span><text:span text:style-name="T16">(ener</text:span><text:span text:style-name="T16">gy</text:span><text:span text:style-name="T16"><text:line-break/></text:span><text:span text:style-name="T16">adjust</text:span><text:span text:style-name="T16">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51" draw:id="id451"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text:span><text:span text:style-name="T36">ng</text:span><text:span text:style-name="T36"><text:line-break/></text:span><text:span text:style-name="T36">memo</text:span><text:span text:style-name="T36">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text:span><text:span text:style-name="T12">Neurocogni</text:span><text:span text:style-name="T12">tive </text:span><text:span text:style-name="T12">Perspective </text:span><text:span text:style-name="T12">on the</text:span></text:p>
              <text:p text:style-name="P119"><text:span text:style-name="T12">Forms and </text:span><text:span text:style-name="T12">Functions </text:span><text:span text:style-name="T12">of </text:span><text:span text:style-name="T12">Autobiogra</text:span><text:span text:style-name="T12">phical </text:span><text:span text:style-name="T12">Memory </text:span><text:span text:style-name="T12">Retrieval</text:span><text:span text:style-name="T12"><text:line-break/></text:span><text:span text:style-name="T12">and the </text:span><text:span text:style-name="T12">Constructio</text:span><text:span text:style-name="T12">n of </text:span><text:span text:style-name="T12">Autobiogra</text:span><text:span text:style-name="T12">phical </text:span><text:span text:style-name="T12">Memories</text:span></text:p>
              <text:p text:style-name="P119"><text:span text:style-name="T12">in the Self-</text:span><text:span text:style-name="T12">Memory </text:span><text:span text:style-name="T12">System and </text:span><text:span text:style-name="T12">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text:span><text:span text:style-name="T2">e to </text:span><text:span text:style-name="T2"><text:line-break/></text:span><text:span text:style-name="T2">mind </text:span><text:span text:style-name="T2">wande</text:span><text:span text:style-name="T2">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41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76" draw:id="id37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0" draw:id="id38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593cm 39.792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text:span><text:span text:style-name="T39">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6"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8.949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span text:style-name="T4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2cm" svg:y="76.113cm">
          <text:p/>
          <draw:enhanced-geometry svg:viewBox="0 0 21600 21600" draw:type="rectangle" draw:enhanced-path="M 0 0 L 21600 0 21600 21600 0 21600 0 0 Z N"/>
        </draw:custom-shape>
        <draw:frame draw:style-name="gr490" draw:text-style-name="P41" draw:layer="layout" svg:width="2.259cm" svg:height="1.523cm" svg:x="-44.28cm" svg:y="76.451cm">
          <draw:text-box>
            <text:p text:style-name="P5"><text:span text:style-name="T4">Clustering on </text:span><text:span text:style-name="T4">0</text:span><text:span text:style-name="T43">th</text:span><text:span text:style-name="T44">and</text:span><text:span text:style-name="T44"><text:line-break/></text:span><text:span text:style-name="T44">2</text:span><text:span text:style-name="T43">nd</text:span></text:p>
          </draw:text-box>
        </draw:frame>
        <draw:custom-shape draw:style-name="gr491"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6" draw:layer="layout" svg:width="16.317cm" svg:height="1.952cm" svg:x="-51.301cm" svg:y="79.913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37" draw:layer="layout" svg:width="2.011cm" svg:height="1.705cm" svg:x="-44.457cm" svg:y="80.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51.302cm" svg:y="72.113cm">
          <text:p/>
          <draw:enhanced-geometry svg:viewBox="0 0 21600 21600" draw:type="rectangle" draw:enhanced-path="M 0 0 L 21600 0 21600 21600 0 21600 0 0 Z N"/>
        </draw:custom-shape>
        <draw:frame draw:style-name="gr494" draw:text-style-name="P138" draw:layer="layout" svg:width="3.743cm" svg:height="1.158cm" svg:x="-46.519cm" svg:y="72.64cm">
          <draw:text-box>
            <text:p text:style-name="P69"><text:span text:style-name="T12">Matrix-</text:span><text:span text:style-name="T12">Profile-</text:span><text:span text:style-name="T12">based </text:span><text:span text:style-name="T12"><text:line-break/></text:span><text:span text:style-name="T12">Motif </text:span><text:span text:style-name="T12">Discovery</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8.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72.774cm">
          <draw:text-box>
            <text:p>+</text:p>
          </draw:text-box>
        </draw:frame>
        <draw:frame draw:style-name="gr495" draw:text-style-name="P11" draw:layer="layout" svg:width="1.895cm" svg:height="0.887cm" svg:x="-42.28cm" svg:y="72.851cm">
          <draw:text-box>
            <text:p><text:span text:style-name="T4">Clustering</text:span></text:p>
          </draw:text-box>
        </draw:frame>
        <draw:custom-shape draw:style-name="gr491"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68.113cm">
          <text:p/>
          <draw:enhanced-geometry svg:viewBox="0 0 21600 21600" draw:type="rectangle" draw:enhanced-path="M 0 0 L 21600 0 21600 21600 0 21600 0 0 Z N"/>
        </draw:custom-shape>
        <draw:frame draw:style-name="gr482" draw:text-style-name="P38" draw:layer="layout" svg:width="0.749cm" svg:height="0.725cm" svg:x="-42.979cm" svg:y="68.774cm">
          <draw:text-box>
            <text:p>+</text:p>
          </draw:text-box>
        </draw:frame>
        <draw:frame draw:style-name="gr483" draw:text-style-name="P38" draw:layer="layout" svg:width="1.849cm" svg:height="1.039cm" svg:x="-48.948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68.774cm">
          <draw:text-box>
            <text:p>+</text:p>
          </draw:text-box>
        </draw:frame>
        <draw:frame draw:style-name="gr495" draw:text-style-name="P11" draw:layer="layout" svg:width="1.919cm" svg:height="0.887cm" svg:x="-42.28cm" svg:y="68.851cm">
          <draw:text-box>
            <text:p><text:span text:style-name="T4">Clustreing</text:span></text:p>
          </draw:text-box>
        </draw:frame>
        <draw:custom-shape draw:style-name="gr491"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6" draw:text-style-name="P139" xml:id="id396" draw:id="id396" draw:layer="layout" svg:width="5.693cm" svg:height="3.474cm" svg:x="-16.503cm" svg:y="49.103cm">
          <text:p text:style-name="P5"><text:span text:style-name="T46">Blackbo</text:span><text:span text:style-name="T46">ard</text:span><text:span text:style-name="T46"><text:line-break/></text:span><text:span text:style-name="T46">for </text:span><text:span text:style-name="T46">sharing </text:span><text:span text:style-name="T46"><text:line-break/></text:span><text:span text:style-name="T46">each </text:span><text:span text:style-name="T46">robots</text:span><text:span text:style-name="T46"><text:line-break/></text:span><text:span text:style-name="T46">recent </text:span><text:span text:style-name="T46">utteranc</text:span><text:span text:style-name="T46">es</text:span><text:span text:style-name="T46"><text:line-break/></text:span><text:span text:style-name="T46">and </text:span><text:span text:style-name="T46">decoder</text:span><text:span text:style-name="T46">s</text:span><text:span text:style-name="T46"><text:line-break/></text:span><text:span text:style-name="T46">(Stimuli </text:span><text:span text:style-name="T46">with </text:span><text:span text:style-name="T46">languag</text:span><text:span text:style-name="T46">e</text:span><text:span text:style-name="T46"><text:line-break/></text:span><text:span text:style-name="T46">medium</text:span><text:span text:style-name="T46">)</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7" draw:text-style-name="P140"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8" draw:text-style-name="P13" draw:layer="layout" svg:width="3.475cm" svg:height="0.878cm" svg:x="-36.072cm" svg:y="39.061cm">
          <draw:text-box>
            <text:p text:style-name="P3"><text:span text:style-name="T7">Robot 1</text:span></text:p>
          </draw:text-box>
        </draw:frame>
        <draw:connector draw:style-name="gr499"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500" draw:text-style-name="P13" draw:layer="layout" svg:width="3.475cm" svg:height="0.878cm" svg:x="-30.214cm" svg:y="49.736cm">
          <draw:text-box>
            <text:p text:style-name="P3"><text:span text:style-name="T7">Robot 2</text:span></text:p>
          </draw:text-box>
        </draw:frame>
        <draw:g draw:style-name="gr31">
          <draw:custom-shape draw:style-name="gr501" draw:text-style-name="P142" xml:id="id402" draw:id="id402" draw:layer="layout" svg:width="0.891cm" svg:height="0.97cm" svg:x="-59.84cm" svg:y="46.447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4" draw:id="id404" draw:layer="layout" svg:width="0.891cm" svg:height="0.97cm" svg:x="-59.839cm" svg:y="47.747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6" draw:id="id406" draw:layer="layout" svg:width="0.891cm" svg:height="0.97cm" svg:x="-59.838cm" svg:y="49.047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8" draw:id="id408" draw:layer="layout" svg:width="0.891cm" svg:height="0.97cm" svg:x="-59.837cm" svg:y="50.347cm">
            <text:p text:style-name="P141"><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3"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3"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3" draw:text-style-name="P15" draw:layer="layout" draw:type="line" svg:x1="-58.946cm" svg:y1="50.832cm" svg:x2="-56.934cm" svg:y2="50.432cm" draw:start-shape="id408" draw:start-glue-point="10" draw:end-shape="id407" draw:end-glue-point="6" svg:d="M-58946 50832l2012-400" svg:viewBox="0 0 2013 401">
            <text:p/>
          </draw:connector>
          <draw:connector draw:style-name="gr503"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3"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3" draw:text-style-name="P15" draw:layer="layout" draw:type="line" svg:x1="-58.947cm" svg:y1="49.532cm" svg:x2="-56.935cm" svg:y2="49.332cm" draw:start-shape="id406" draw:start-glue-point="10" draw:end-shape="id405" draw:end-glue-point="6" svg:d="M-58947 49532l2012-200" svg:viewBox="0 0 2013 201">
            <text:p/>
          </draw:connector>
          <draw:connector draw:style-name="gr503"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3" draw:text-style-name="P15" draw:layer="layout" draw:type="line" svg:x1="-58.948cm" svg:y1="48.232cm" svg:x2="-56.936cm" svg:y2="48.232cm" draw:start-shape="id404" draw:start-glue-point="10" draw:end-shape="id403" draw:end-glue-point="6" svg:d="M-58948 48232h2012" svg:viewBox="0 0 2013 1">
            <text:p/>
          </draw:connector>
          <draw:connector draw:style-name="gr503"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3"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3"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501" draw:text-style-name="P142" xml:id="id409" draw:id="id409" draw:layer="layout" svg:width="0.891cm" svg:height="0.97cm" svg:x="-54.04cm" svg:y="46.447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0" draw:id="id410" draw:layer="layout" svg:width="0.891cm" svg:height="0.97cm" svg:x="-54.039cm" svg:y="47.747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1" draw:id="id411" draw:layer="layout" svg:width="0.891cm" svg:height="0.97cm" svg:x="-54.038cm" svg:y="49.047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2" draw:id="id412" draw:layer="layout" svg:width="0.891cm" svg:height="0.97cm" svg:x="-54.037cm" svg:y="50.347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3" draw:text-style-name="P15" draw:layer="layout" draw:type="line" svg:x1="-56.044cm" svg:y1="48.232cm" svg:x2="-54.039cm" svg:y2="48.232cm" draw:end-shape="id410" draw:end-glue-point="6" svg:d="M-56044 48232h2005" svg:viewBox="0 0 2006 1">
            <text:p/>
          </draw:connector>
          <draw:connector draw:style-name="gr503" draw:text-style-name="P15" draw:layer="layout" draw:type="line" svg:x1="-56.043cm" svg:y1="48.232cm" svg:x2="-54.038cm" svg:y2="49.532cm" draw:end-shape="id411" draw:end-glue-point="6" svg:d="M-56043 48232l2005 1300" svg:viewBox="0 0 2006 1301">
            <text:p/>
          </draw:connector>
          <draw:connector draw:style-name="gr503" draw:text-style-name="P15" xml:id="id432" draw:id="id432" draw:layer="layout" draw:type="line" svg:x1="-56.042cm" svg:y1="48.232cm" svg:x2="-54.037cm" svg:y2="50.832cm" draw:end-shape="id412" draw:end-glue-point="6" svg:d="M-56042 48232l2005 2600" svg:viewBox="0 0 2006 2601">
            <text:p/>
          </draw:connector>
          <draw:connector draw:style-name="gr503"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3" draw:text-style-name="P15" draw:layer="layout" draw:type="line" svg:x1="-56.043cm" svg:y1="49.332cm" svg:x2="-54.039cm" svg:y2="48.232cm" draw:end-shape="id410" draw:end-glue-point="6" svg:d="M-56043 49332l2004-1100" svg:viewBox="0 0 2005 1101">
            <text:p/>
          </draw:connector>
          <draw:connector draw:style-name="gr503" draw:text-style-name="P15" draw:layer="layout" draw:type="line" svg:x1="-56.043cm" svg:y1="49.332cm" svg:x2="-54.038cm" svg:y2="49.532cm" draw:end-shape="id411" draw:end-glue-point="6" svg:d="M-56043 49332l2005 200" svg:viewBox="0 0 2006 201">
            <text:p/>
          </draw:connector>
          <draw:connector draw:style-name="gr503" draw:text-style-name="P15" xml:id="id431" draw:id="id431" draw:layer="layout" draw:type="line" svg:x1="-56.042cm" svg:y1="49.332cm" svg:x2="-54.037cm" svg:y2="50.832cm" draw:end-shape="id412" draw:end-glue-point="6" svg:d="M-56042 49332l2005 1500" svg:viewBox="0 0 2006 1501">
            <text:p/>
          </draw:connector>
          <draw:connector draw:style-name="gr503"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3" draw:text-style-name="P15" draw:layer="layout" draw:type="line" svg:x1="-56.042cm" svg:y1="50.432cm" svg:x2="-54.038cm" svg:y2="49.532cm" draw:end-shape="id411" draw:end-glue-point="6" svg:d="M-56042 50432l2004-900" svg:viewBox="0 0 2005 901">
            <text:p/>
          </draw:connector>
          <draw:connector draw:style-name="gr503" draw:text-style-name="P15" draw:layer="layout" draw:type="line" svg:x1="-56.042cm" svg:y1="50.432cm" svg:x2="-54.039cm" svg:y2="48.232cm" draw:end-shape="id410" draw:end-glue-point="6" svg:d="M-56042 50432l2003-2200" svg:viewBox="0 0 2004 2201">
            <text:p/>
          </draw:connector>
          <draw:connector draw:style-name="gr503" draw:text-style-name="P15" draw:layer="layout" draw:type="line" svg:x1="-56.041cm" svg:y1="50.432cm" svg:x2="-54.04cm" svg:y2="46.932cm" draw:end-shape="id409" draw:end-glue-point="6" svg:d="M-56041 50432l2001-3500" svg:viewBox="0 0 2002 3501">
            <text:p/>
          </draw:connector>
          <draw:frame draw:style-name="gr504" draw:text-style-name="P38" draw:layer="layout" svg:width="2.903cm" svg:height="0.725cm" svg:x="-58.103cm" svg:y="56.045cm">
            <draw:text-box>
              <text:p>Autoencoder</text:p>
            </draw:text-box>
          </draw:frame>
          <draw:line draw:style-name="gr505" draw:text-style-name="P15" draw:layer="layout" svg:x1="-56.789cm" svg:y1="55.649cm" svg:x2="-59.907cm" svg:y2="55.64cm">
            <text:p/>
          </draw:line>
          <draw:line draw:style-name="gr506" draw:text-style-name="P15" draw:layer="layout" svg:x1="-56.389cm" svg:y1="55.65cm" svg:x2="-53.349cm" svg:y2="55.596cm">
            <text:p/>
          </draw:line>
          <draw:frame draw:style-name="gr507" draw:text-style-name="P38" draw:layer="layout" svg:width="2.22cm" svg:height="0.725cm" svg:x="-56.043cm" svg:y="55.031cm">
            <draw:text-box>
              <text:p>decoding</text:p>
            </draw:text-box>
          </draw:frame>
          <draw:frame draw:style-name="gr507" draw:text-style-name="P38" draw:layer="layout" svg:width="2.22cm" svg:height="0.725cm" svg:x="-59.124cm" svg:y="55.014cm">
            <draw:text-box>
              <text:p>encoding</text:p>
            </draw:text-box>
          </draw:frame>
          <draw:g draw:style-name="gr23">
            <draw:polygon draw:style-name="gr508" draw:text-style-name="P145" draw:layer="layout" svg:width="1.215cm" svg:height="1.383cm" svg:x="-58.949cm" svg:y="57.122cm" svg:viewBox="0 0 1216 1384" draw:points="1216,1384 0,792 0,591 1216,0">
              <text:p/>
            </draw:polygon>
            <draw:frame draw:style-name="gr509" draw:text-style-name="P146" draw:layer="layout" svg:width="1.527cm" svg:height="0.569cm" svg:x="-59.05cm" svg:y="57.52cm">
              <draw:text-box>
                <text:p><text:span text:style-name="T49">decoder</text:span></text:p>
              </draw:text-box>
            </draw:frame>
          </draw:g>
          <draw:g draw:style-name="gr31">
            <draw:g draw:style-name="gr23">
              <draw:polygon draw:style-name="gr510"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ncoder</text:span></text:p>
              </draw:text-box>
            </draw:frame>
          </draw:g>
          <draw:custom-shape draw:style-name="gr511" draw:text-style-name="P148" xml:id="id413" draw:id="id413" draw:layer="layout" svg:width="1.34cm" svg:height="1.458cm" svg:x="-72.248cm" svg:y="53.908cm">
            <text:p text:style-name="P147"><text:span text:style-name="T3">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15" draw:id="id415" draw:layer="layout" svg:width="1.34cm" svg:height="1.458cm" svg:x="-72.248cm" svg:y="55.863cm">
            <text:p text:style-name="P147"><text:span text:style-name="T3">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8" xml:id="id417" draw:id="id417" draw:layer="layout" svg:width="1.34cm" svg:height="1.459cm" svg:x="-72.248cm" svg:y="57.817cm">
            <text:p text:style-name="P147"><text:span text:style-name="T3">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19" draw:id="id419" draw:layer="layout" svg:width="1.34cm" svg:height="1.458cm" svg:x="-72.248cm" svg:y="59.772cm">
            <text:p text:style-name="P147"><text:span text:style-name="T3">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50" xml:id="id414" draw:id="id414" draw:layer="layout" svg:width="1.34cm" svg:height="1.458cm" svg:x="-67.882cm" svg:y="54.209cm">
            <text:p text:style-name="P149"><text:span text:style-name="T50">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50" xml:id="id416" draw:id="id416" draw:layer="layout" svg:width="1.34cm" svg:height="1.458cm" svg:x="-67.882cm" svg:y="55.863cm">
            <text:p text:style-name="P149"><text:span text:style-name="T50">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50" xml:id="id418" draw:id="id418" draw:layer="layout" svg:width="1.34cm" svg:height="1.458cm" svg:x="-67.882cm" svg:y="57.517cm">
            <text:p text:style-name="P149"><text:span text:style-name="T50">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3" draw:text-style-name="P15" draw:layer="layout" draw:type="line" svg:x1="-70.908cm" svg:y1="56.592cm" svg:x2="-67.882cm" svg:y2="56.592cm" draw:start-shape="id415" draw:start-glue-point="10" draw:end-shape="id416" draw:end-glue-point="6" svg:d="M-70908 56592h3026" svg:viewBox="0 0 3027 1">
            <text:p/>
          </draw:connector>
          <draw:connector draw:style-name="gr503" draw:text-style-name="P15" draw:layer="layout" draw:type="line" svg:x1="-70.908cm" svg:y1="58.547cm" svg:x2="-67.882cm" svg:y2="58.246cm" draw:start-shape="id417" draw:start-glue-point="10" draw:end-shape="id418" draw:end-glue-point="6" svg:d="M-70908 58547l3026-301" svg:viewBox="0 0 3027 302">
            <text:p/>
          </draw:connector>
          <draw:connector draw:style-name="gr503" draw:text-style-name="P15" draw:layer="layout" draw:type="line" svg:x1="-70.908cm" svg:y1="60.501cm" svg:x2="-67.882cm" svg:y2="58.246cm" draw:start-shape="id419" draw:start-glue-point="10" draw:end-shape="id418" draw:end-glue-point="6" svg:d="M-70908 60501l3026-2255" svg:viewBox="0 0 3027 2256">
            <text:p/>
          </draw:connector>
          <draw:connector draw:style-name="gr503" draw:text-style-name="P15" draw:layer="layout" draw:type="line" svg:x1="-70.908cm" svg:y1="60.501cm" svg:x2="-67.882cm" svg:y2="56.592cm" draw:start-shape="id419" draw:start-glue-point="10" draw:end-shape="id416" draw:end-glue-point="6" svg:d="M-70908 60501l3026-3909" svg:viewBox="0 0 3027 3910">
            <text:p/>
          </draw:connector>
          <draw:connector draw:style-name="gr503" draw:text-style-name="P15" draw:layer="layout" draw:type="line" svg:x1="-70.908cm" svg:y1="60.501cm" svg:x2="-67.882cm" svg:y2="54.938cm" draw:start-shape="id419" draw:start-glue-point="10" draw:end-shape="id414" draw:end-glue-point="6" svg:d="M-70908 60501l3026-5563" svg:viewBox="0 0 3027 5564">
            <text:p/>
          </draw:connector>
          <draw:connector draw:style-name="gr503" draw:text-style-name="P15" draw:layer="layout" draw:type="line" svg:x1="-70.908cm" svg:y1="58.547cm" svg:x2="-67.882cm" svg:y2="56.592cm" draw:start-shape="id417" draw:start-glue-point="10" draw:end-shape="id416" draw:end-glue-point="6" svg:d="M-70908 58547l3026-1955" svg:viewBox="0 0 3027 1956">
            <text:p/>
          </draw:connector>
          <draw:connector draw:style-name="gr503" draw:text-style-name="P15" draw:layer="layout" draw:type="line" svg:x1="-70.908cm" svg:y1="58.547cm" svg:x2="-67.882cm" svg:y2="54.938cm" draw:start-shape="id417" draw:start-glue-point="10" draw:end-shape="id414" draw:end-glue-point="6" svg:d="M-70908 58547l3026-3609" svg:viewBox="0 0 3027 3610">
            <text:p/>
          </draw:connector>
          <draw:connector draw:style-name="gr503"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3" draw:text-style-name="P15" draw:layer="layout" draw:type="line" svg:x1="-70.908cm" svg:y1="56.592cm" svg:x2="-67.882cm" svg:y2="58.246cm" draw:start-shape="id415" draw:start-glue-point="10" draw:end-shape="id418" draw:end-glue-point="6" svg:d="M-70908 56592l3026 1654" svg:viewBox="0 0 3027 1655">
            <text:p/>
          </draw:connector>
          <draw:connector draw:style-name="gr503"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3" draw:text-style-name="P15" draw:layer="layout" draw:type="line" svg:x1="-70.908cm" svg:y1="54.637cm" svg:x2="-67.882cm" svg:y2="58.246cm" draw:start-shape="id413" draw:start-glue-point="10" draw:end-shape="id418" draw:end-glue-point="6" svg:d="M-70908 54637l3026 3609" svg:viewBox="0 0 3027 3610">
            <text:p/>
          </draw:connector>
          <draw:custom-shape draw:style-name="gr514" draw:text-style-name="P152" xml:id="id420" draw:id="id420" draw:layer="layout" svg:width="1.34cm" svg:height="1.458cm" svg:x="-63.523cm" svg:y="53.908cm">
            <text:p text:style-name="P151"><text:span text:style-name="T51">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5" draw:text-style-name="P152" xml:id="id421" draw:id="id421" draw:layer="layout" svg:width="1.34cm" svg:height="1.458cm" svg:x="-63.523cm" svg:y="55.863cm">
            <text:p text:style-name="P151"><text:span text:style-name="T51">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6" draw:text-style-name="P152" xml:id="id422" draw:id="id422" draw:layer="layout" svg:width="1.34cm" svg:height="1.459cm" svg:x="-63.523cm" svg:y="57.817cm">
            <text:p text:style-name="P151"><text:span text:style-name="T51">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52" xml:id="id423" draw:id="id423" draw:layer="layout" svg:width="1.34cm" svg:height="1.458cm" svg:x="-63.523cm" svg:y="59.772cm">
            <text:p text:style-name="P151"><text:span text:style-name="T51">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54.938cm" svg:x2="-63.523cm" svg:y2="54.637cm" draw:start-shape="id414" draw:start-glue-point="10" draw:end-shape="id420" draw:end-glue-point="6" svg:d="M-66542 54938l3019-301" svg:viewBox="0 0 3020 302">
            <text:p/>
          </draw:connector>
          <draw:connector draw:style-name="gr503" draw:text-style-name="P15" draw:layer="layout" draw:type="line" svg:x1="-66.542cm" svg:y1="54.938cm" svg:x2="-63.523cm" svg:y2="56.592cm" draw:start-shape="id414" draw:start-glue-point="10" draw:end-shape="id421" draw:end-glue-point="6" svg:d="M-66542 54938l3019 1654" svg:viewBox="0 0 3020 1655">
            <text:p/>
          </draw:connector>
          <draw:connector draw:style-name="gr503" draw:text-style-name="P15" draw:layer="layout" draw:type="line" svg:x1="-66.542cm" svg:y1="54.938cm" svg:x2="-63.523cm" svg:y2="58.547cm" draw:start-shape="id414" draw:start-glue-point="10" draw:end-shape="id422" draw:end-glue-point="6" svg:d="M-66542 54938l3019 3609" svg:viewBox="0 0 3020 3610">
            <text:p/>
          </draw:connector>
          <draw:connector draw:style-name="gr503" draw:text-style-name="P15" draw:layer="layout" draw:type="line" svg:x1="-66.542cm" svg:y1="54.938cm" svg:x2="-63.523cm" svg:y2="60.501cm" draw:start-shape="id414" draw:start-glue-point="10" draw:end-shape="id423" draw:end-glue-point="6" svg:d="M-66542 54938l3019 5563" svg:viewBox="0 0 3020 5564">
            <text:p/>
          </draw:connector>
          <draw:connector draw:style-name="gr503" draw:text-style-name="P15" xml:id="id424" draw:id="id424" draw:layer="layout" draw:type="line" svg:x1="-66.542cm" svg:y1="56.592cm" svg:x2="-63.526cm" svg:y2="54.637cm" draw:start-shape="id416" draw:start-glue-point="10" svg:d="M-66542 56592l3016-1955" svg:viewBox="0 0 3017 1956">
            <text:p/>
          </draw:connector>
          <draw:connector draw:style-name="gr503" draw:text-style-name="P15" draw:layer="layout" draw:type="line" svg:x1="-66.542cm" svg:y1="56.592cm" svg:x2="-63.523cm" svg:y2="56.592cm" draw:start-shape="id416" draw:start-glue-point="10" draw:end-shape="id421" draw:end-glue-point="6" svg:d="M-66542 56592h3019" svg:viewBox="0 0 3020 1">
            <text:p/>
          </draw:connector>
          <draw:connector draw:style-name="gr503" draw:text-style-name="P15" draw:layer="layout" draw:type="line" svg:x1="-66.542cm" svg:y1="56.592cm" svg:x2="-63.523cm" svg:y2="58.547cm" draw:start-shape="id416" draw:start-glue-point="10" draw:end-shape="id422" draw:end-glue-point="6" svg:d="M-66542 56592l3019 1955" svg:viewBox="0 0 3020 1956">
            <text:p/>
          </draw:connector>
          <draw:connector draw:style-name="gr503" draw:text-style-name="P15" draw:layer="layout" draw:type="line" svg:x1="-66.542cm" svg:y1="56.592cm" svg:x2="-63.523cm" svg:y2="60.501cm" draw:start-shape="id416" draw:start-glue-point="10" draw:end-shape="id423" draw:end-glue-point="6" svg:d="M-66542 56592l3019 3909" svg:viewBox="0 0 3020 3910">
            <text:p/>
          </draw:connector>
          <draw:connector draw:style-name="gr503" draw:text-style-name="P15" xml:id="id426" draw:id="id426" draw:layer="layout" draw:type="line" svg:x1="-66.542cm" svg:y1="58.246cm" svg:x2="-63.521cm" svg:y2="60.501cm" draw:start-shape="id418" draw:start-glue-point="10" svg:d="M-66542 58246l3021 2255" svg:viewBox="0 0 3022 2256">
            <text:p/>
          </draw:connector>
          <draw:connector draw:style-name="gr503" draw:text-style-name="P15" draw:layer="layout" draw:type="line" svg:x1="-66.542cm" svg:y1="58.246cm" svg:x2="-63.523cm" svg:y2="58.547cm" draw:start-shape="id418" draw:start-glue-point="10" draw:end-shape="id422" draw:end-glue-point="6" svg:d="M-66542 58246l3019 301" svg:viewBox="0 0 3020 302">
            <text:p/>
          </draw:connector>
          <draw:connector draw:style-name="gr503" draw:text-style-name="P15" draw:layer="layout" draw:type="line" svg:x1="-66.542cm" svg:y1="58.246cm" svg:x2="-63.523cm" svg:y2="56.592cm" draw:start-shape="id418" draw:start-glue-point="10" draw:end-shape="id421" draw:end-glue-point="6" svg:d="M-66542 58246l3019-1654" svg:viewBox="0 0 3020 1655">
            <text:p/>
          </draw:connector>
          <draw:connector draw:style-name="gr503" draw:text-style-name="P15" draw:layer="layout" draw:type="line" svg:x1="-66.542cm" svg:y1="58.246cm" svg:x2="-63.526cm" svg:y2="54.637cm" draw:start-shape="id418" draw:start-glue-point="10" draw:end-shape="id424" draw:end-glue-point="3" svg:d="M-66542 58246l3016-3609" svg:viewBox="0 0 3017 3610">
            <text:p/>
          </draw:connector>
          <draw:frame draw:style-name="gr518"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3" draw:text-style-name="P150" xml:id="id425" draw:id="id425" draw:layer="layout" svg:width="1.34cm" svg:height="1.458cm" svg:x="-67.882cm" svg:y="59.321cm">
            <text:p text:style-name="P149"><text:span text:style-name="T50">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28" draw:id="id428" draw:layer="layout" draw:type="line" svg:x1="-66.542cm" svg:y1="60.05cm" svg:x2="-63.526cm" svg:y2="54.637cm" draw:start-shape="id425" draw:start-glue-point="10" svg:d="M-66542 60050l3016-5413" svg:viewBox="0 0 3017 5414">
            <text:p/>
          </draw:connector>
          <draw:connector draw:style-name="gr503" draw:text-style-name="P15" draw:layer="layout" draw:type="line" svg:x1="-66.542cm" svg:y1="60.05cm" svg:x2="-63.521cm" svg:y2="60.501cm" draw:start-shape="id425" draw:start-glue-point="10" draw:end-shape="id426" draw:end-glue-point="3" svg:d="M-66542 60050l3021 451" svg:viewBox="0 0 3022 452">
            <text:p/>
          </draw:connector>
          <draw:connector draw:style-name="gr503" draw:text-style-name="P15" draw:layer="layout" draw:type="line" svg:x1="-66.542cm" svg:y1="60.05cm" svg:x2="-63.523cm" svg:y2="58.547cm" draw:start-shape="id425" draw:start-glue-point="10" draw:end-shape="id422" draw:end-glue-point="6" svg:d="M-66542 60050l3019-1503" svg:viewBox="0 0 3020 1504">
            <text:p/>
          </draw:connector>
          <draw:connector draw:style-name="gr503" draw:text-style-name="P15" draw:layer="layout" draw:type="line" svg:x1="-66.542cm" svg:y1="60.05cm" svg:x2="-63.523cm" svg:y2="56.592cm" draw:start-shape="id425" draw:start-glue-point="10" draw:end-shape="id421" draw:end-glue-point="6" svg:d="M-66542 60050l3019-3458" svg:viewBox="0 0 3020 3459">
            <text:p/>
          </draw:connector>
          <draw:connector draw:style-name="gr503" draw:text-style-name="P15" draw:layer="layout" draw:type="line" svg:x1="-70.904cm" svg:y1="60.501cm" svg:x2="-67.882cm" svg:y2="60.05cm" draw:end-shape="id425" draw:end-glue-point="6" svg:d="M-70904 60501l3022-451" svg:viewBox="0 0 3023 452">
            <text:p/>
          </draw:connector>
          <draw:connector draw:style-name="gr503" draw:text-style-name="P15" draw:layer="layout" draw:type="line" svg:x1="-70.908cm" svg:y1="58.547cm" svg:x2="-67.882cm" svg:y2="60.05cm" draw:start-shape="id417" draw:start-glue-point="10" draw:end-shape="id425" draw:end-glue-point="6" svg:d="M-70908 58547l3026 1503" svg:viewBox="0 0 3027 1504">
            <text:p/>
          </draw:connector>
          <draw:connector draw:style-name="gr503" draw:text-style-name="P15" draw:layer="layout" draw:type="line" svg:x1="-70.908cm" svg:y1="56.592cm" svg:x2="-67.882cm" svg:y2="60.05cm" draw:start-shape="id415" draw:start-glue-point="10" draw:end-shape="id425" draw:end-glue-point="6" svg:d="M-70908 56592l3026 3458" svg:viewBox="0 0 3027 3459">
            <text:p/>
          </draw:connector>
          <draw:connector draw:style-name="gr503" draw:text-style-name="P15" draw:layer="layout" draw:type="line" svg:x1="-70.908cm" svg:y1="54.637cm" svg:x2="-67.882cm" svg:y2="60.05cm" draw:start-shape="id413" draw:start-glue-point="10" draw:end-shape="id425" draw:end-glue-point="6" svg:d="M-70908 54637l3026 5413" svg:viewBox="0 0 3027 5414">
            <text:p/>
          </draw:connector>
          <draw:custom-shape draw:style-name="gr519" draw:text-style-name="P150" xml:id="id427" draw:id="id427" draw:layer="layout" svg:width="1.34cm" svg:height="1.459cm" svg:x="-67.882cm" svg:y="61.125cm">
            <text:p text:style-name="P149"><text:span text:style-name="T5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61.855cm" svg:x2="-63.521cm" svg:y2="60.501cm" draw:start-shape="id427" draw:start-glue-point="10" svg:d="M-66542 61855l3021-1354" svg:viewBox="0 0 3022 1355">
            <text:p/>
          </draw:connector>
          <draw:connector draw:style-name="gr503" draw:text-style-name="P15" draw:layer="layout" draw:type="line" svg:x1="-66.542cm" svg:y1="61.855cm" svg:x2="-63.523cm" svg:y2="58.547cm" draw:start-shape="id427" draw:start-glue-point="10" draw:end-shape="id422" draw:end-glue-point="6" svg:d="M-66542 61855l3019-3308" svg:viewBox="0 0 3020 3309">
            <text:p/>
          </draw:connector>
          <draw:connector draw:style-name="gr503" draw:text-style-name="P15" draw:layer="layout" draw:type="line" svg:x1="-66.542cm" svg:y1="61.855cm" svg:x2="-63.523cm" svg:y2="56.592cm" draw:start-shape="id427" draw:start-glue-point="10" draw:end-shape="id421" draw:end-glue-point="6" svg:d="M-66542 61855l3019-5263" svg:viewBox="0 0 3020 5264">
            <text:p/>
          </draw:connector>
          <draw:connector draw:style-name="gr503" draw:text-style-name="P15" draw:layer="layout" draw:type="line" svg:x1="-66.542cm" svg:y1="61.855cm" svg:x2="-63.526cm" svg:y2="54.637cm" draw:start-shape="id427" draw:start-glue-point="10" draw:end-shape="id428" draw:end-glue-point="3" svg:d="M-66542 61855l3016-7218" svg:viewBox="0 0 3017 7219">
            <text:p/>
          </draw:connector>
          <draw:connector draw:style-name="gr503" draw:text-style-name="P15" draw:layer="layout" draw:type="line" svg:x1="-70.902cm" svg:y1="60.501cm" svg:x2="-67.882cm" svg:y2="61.855cm" draw:end-shape="id427" draw:end-glue-point="6" svg:d="M-70902 60501l3020 1354" svg:viewBox="0 0 3021 1355">
            <text:p/>
          </draw:connector>
          <draw:connector draw:style-name="gr503" draw:text-style-name="P15" draw:layer="layout" draw:type="line" svg:x1="-70.908cm" svg:y1="58.547cm" svg:x2="-67.882cm" svg:y2="61.855cm" draw:start-shape="id417" draw:start-glue-point="10" draw:end-shape="id427" draw:end-glue-point="6" svg:d="M-70908 58547l3026 3308" svg:viewBox="0 0 3027 3309">
            <text:p/>
          </draw:connector>
          <draw:connector draw:style-name="gr503" draw:text-style-name="P15" draw:layer="layout" draw:type="line" svg:x1="-70.908cm" svg:y1="56.592cm" svg:x2="-67.882cm" svg:y2="61.855cm" draw:start-shape="id415" draw:start-glue-point="10" draw:end-shape="id427" draw:end-glue-point="6" svg:d="M-70908 56592l3026 5263" svg:viewBox="0 0 3027 5264">
            <text:p/>
          </draw:connector>
          <draw:connector draw:style-name="gr503" draw:text-style-name="P15" draw:layer="layout" draw:type="line" svg:x1="-70.908cm" svg:y1="54.637cm" svg:x2="-67.882cm" svg:y2="61.855cm" draw:start-shape="id413" draw:start-glue-point="10" draw:end-shape="id427" draw:end-glue-point="6" svg:d="M-70908 54637l3026 7218" svg:viewBox="0 0 3027 7219">
            <text:p/>
          </draw:connector>
          <draw:custom-shape draw:style-name="gr501" draw:text-style-name="P142" xml:id="id429" draw:id="id429" draw:layer="layout" svg:width="0.891cm" svg:height="0.97cm" svg:x="-59.836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0" draw:id="id430" draw:layer="layout" svg:width="0.891cm" svg:height="0.97cm" svg:x="-54.035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5cm" svg:y1="52.032cm" svg:x2="-56.934cm" svg:y2="50.432cm" draw:start-shape="id429" draw:start-glue-point="10" svg:d="M-58945 52032l2011-1600" svg:viewBox="0 0 2012 1601">
            <text:p/>
          </draw:connector>
          <draw:connector draw:style-name="gr503" draw:text-style-name="P15" draw:layer="layout" draw:type="line" svg:x1="-58.945cm" svg:y1="52.032cm" svg:x2="-56.935cm" svg:y2="49.332cm" draw:start-shape="id429" draw:start-glue-point="10" draw:end-shape="id405" draw:end-glue-point="6" svg:d="M-58945 52032l2010-2700" svg:viewBox="0 0 2011 2701">
            <text:p/>
          </draw:connector>
          <draw:connector draw:style-name="gr503" draw:text-style-name="P15" draw:layer="layout" draw:type="line" svg:x1="-58.945cm" svg:y1="52.032cm" svg:x2="-56.936cm" svg:y2="48.232cm" draw:start-shape="id429" draw:start-glue-point="10" draw:end-shape="id403" draw:end-glue-point="6" svg:d="M-58945 52032l2009-3800" svg:viewBox="0 0 2010 3801">
            <text:p/>
          </draw:connector>
          <draw:connector draw:style-name="gr503" draw:text-style-name="P15" draw:layer="layout" draw:type="line" svg:x1="-56.042cm" svg:y1="50.432cm" svg:x2="-54.035cm" svg:y2="52.032cm" draw:end-shape="id430" draw:end-glue-point="6" svg:d="M-56042 50432l2007 1600" svg:viewBox="0 0 2008 1601">
            <text:p/>
          </draw:connector>
          <draw:connector draw:style-name="gr503" draw:text-style-name="P15" draw:layer="layout" draw:type="line" svg:x1="-56.042cm" svg:y1="49.332cm" svg:x2="-54.035cm" svg:y2="52.032cm" draw:start-shape="id431" draw:start-glue-point="2" draw:end-shape="id430" draw:end-glue-point="6" svg:d="M-56042 49332l2007 2700" svg:viewBox="0 0 2008 2701">
            <text:p/>
          </draw:connector>
          <draw:connector draw:style-name="gr503" draw:text-style-name="P15" draw:layer="layout" draw:type="line" svg:x1="-56.042cm" svg:y1="48.232cm" svg:x2="-54.035cm" svg:y2="52.032cm" draw:start-shape="id432" draw:start-glue-point="2" draw:end-shape="id430" draw:end-glue-point="6" svg:d="M-56042 48232l2007 3800" svg:viewBox="0 0 2008 3801">
            <text:p/>
          </draw:connector>
          <draw:custom-shape draw:style-name="gr511" draw:text-style-name="P148" xml:id="id434" draw:id="id434" draw:layer="layout" svg:width="1.34cm" svg:height="1.458cm" svg:x="-63.502cm" svg:y="61.632cm">
            <text:p text:style-name="P147"><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33" draw:id="id433" draw:layer="layout" svg:width="1.34cm" svg:height="1.458cm" svg:x="-72.221cm" svg:y="61.632cm">
            <text:p text:style-name="P147"><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881cm" svg:y1="62.361cm" svg:x2="-67.882cm" svg:y2="61.855cm" draw:start-shape="id433" draw:start-glue-point="10" draw:end-shape="id427" draw:end-glue-point="6" svg:d="M-70881 62361l2999-506" svg:viewBox="0 0 3000 507">
            <text:p/>
          </draw:connector>
          <draw:connector draw:style-name="gr503" draw:text-style-name="P15" draw:layer="layout" draw:type="line" svg:x1="-70.881cm" svg:y1="62.363cm" svg:x2="-67.882cm" svg:y2="60.05cm" draw:end-shape="id425" draw:end-glue-point="6" svg:d="M-70881 62363l2999-2313" svg:viewBox="0 0 3000 2314">
            <text:p/>
          </draw:connector>
          <draw:connector draw:style-name="gr503" draw:text-style-name="P15" draw:layer="layout" draw:type="line" svg:x1="-70.88cm" svg:y1="62.363cm" svg:x2="-67.882cm" svg:y2="58.246cm" draw:end-shape="id418" draw:end-glue-point="6" svg:d="M-70880 62363l2998-4117" svg:viewBox="0 0 2999 4118">
            <text:p/>
          </draw:connector>
          <draw:connector draw:style-name="gr503" draw:text-style-name="P15" draw:layer="layout" draw:type="line" svg:x1="-70.88cm" svg:y1="62.363cm" svg:x2="-67.882cm" svg:y2="56.592cm" draw:end-shape="id416" draw:end-glue-point="6" svg:d="M-70880 62363l2998-5771" svg:viewBox="0 0 2999 5772">
            <text:p/>
          </draw:connector>
          <draw:connector draw:style-name="gr503" draw:text-style-name="P15" draw:layer="layout" draw:type="line" svg:x1="-70.88cm" svg:y1="62.363cm" svg:x2="-67.882cm" svg:y2="54.938cm" draw:end-shape="id414" draw:end-glue-point="6" svg:d="M-70880 62363l2998-7425" svg:viewBox="0 0 2999 7426">
            <text:p/>
          </draw:connector>
          <draw:connector draw:style-name="gr503" draw:text-style-name="P15" draw:layer="layout" draw:type="line" svg:x1="-66.542cm" svg:y1="61.855cm" svg:x2="-63.502cm" svg:y2="62.361cm" draw:start-shape="id427" draw:start-glue-point="10" draw:end-shape="id434" draw:end-glue-point="6" svg:d="M-66542 61855l3040 506" svg:viewBox="0 0 3041 507">
            <text:p/>
          </draw:connector>
          <draw:connector draw:style-name="gr503" draw:text-style-name="P15" draw:layer="layout" draw:type="line" svg:x1="-66.542cm" svg:y1="60.05cm" svg:x2="-63.5cm" svg:y2="62.363cm" draw:start-shape="id425" draw:start-glue-point="10" svg:d="M-66542 60050l3042 2313" svg:viewBox="0 0 3043 2314">
            <text:p/>
          </draw:connector>
          <draw:connector draw:style-name="gr503" draw:text-style-name="P15" draw:layer="layout" draw:type="line" svg:x1="-66.542cm" svg:y1="58.246cm" svg:x2="-63.499cm" svg:y2="62.363cm" draw:start-shape="id418" draw:start-glue-point="10" svg:d="M-66542 58246l3043 4117" svg:viewBox="0 0 3044 4118">
            <text:p/>
          </draw:connector>
          <draw:connector draw:style-name="gr503" draw:text-style-name="P15" draw:layer="layout" draw:type="line" svg:x1="-66.542cm" svg:y1="56.592cm" svg:x2="-63.499cm" svg:y2="62.363cm" draw:start-shape="id416" draw:start-glue-point="10" svg:d="M-66542 56592l3043 5771" svg:viewBox="0 0 3044 5772">
            <text:p/>
          </draw:connector>
          <draw:connector draw:style-name="gr503" draw:text-style-name="P15" draw:layer="layout" draw:type="line" svg:x1="-66.542cm" svg:y1="54.938cm" svg:x2="-63.499cm" svg:y2="62.363cm" draw:start-shape="id414" draw:start-glue-point="10" svg:d="M-66542 54938l3043 7425" svg:viewBox="0 0 3044 7426">
            <text:p/>
          </draw:connector>
          <draw:custom-shape draw:style-name="gr520"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21" draw:text-style-name="P38" draw:layer="layout" svg:width="1.89cm" svg:height="1.673cm" svg:x="-52.41cm" svg:y="48.679cm">
            <draw:text-box>
              <text:p>Fusion <text:line-break/>from <text:line-break/>traces</text:p>
            </draw:text-box>
          </draw:frame>
          <draw:custom-shape draw:style-name="gr522"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3" draw:text-style-name="P38" draw:layer="layout" svg:width="4.836cm" svg:height="3.941cm" svg:x="-78.452cm" svg:y="56.586cm">
            <draw:text-box>
              <text:p>Conversion<text:line-break/>to action <text:line-break/>potentials<text:line-break/>(Just the<text:line-break/>four clusters)</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4" draw:text-style-name="P5" draw:layer="layout" svg:width="4.615cm" svg:height="0.907cm" svg:x="-70.141cm" svg:y="46.785cm">
            <draw:object xlink:href="./Object 7" xlink:type="simple" xlink:show="embed" xlink:actuate="onLoad">
              <loext:p/>
            </draw:object>
            <draw:image xlink:href="./ObjectReplacements/Object 7" xlink:type="simple" xlink:show="embed" xlink:actuate="onLoad"/>
          </draw:frame>
          <draw:connector draw:style-name="gr503" draw:text-style-name="P15" draw:layer="layout" draw:type="line" svg:x1="-66.54cm" svg:y1="60.05cm" svg:x2="-63.52cm" svg:y2="60.501cm" svg:d="M-66540 60050l3020 451" svg:viewBox="0 0 3021 452">
            <text:p/>
          </draw:connector>
          <draw:custom-shape draw:style-name="gr501" draw:text-style-name="P142" xml:id="id435" draw:id="id435" draw:layer="layout" svg:width="0.891cm" svg:height="0.97cm" svg:x="-58.855cm" svg:y="60.441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7" draw:id="id437" draw:layer="layout" svg:width="0.891cm" svg:height="0.97cm" svg:x="-58.855cm" svg:y="61.741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9" draw:id="id439" draw:layer="layout" svg:width="0.891cm" svg:height="0.97cm" svg:x="-58.855cm" svg:y="63.041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4" xml:id="id436" draw:id="id436" draw:layer="layout" svg:width="0.891cm" svg:height="0.97cm" svg:x="-55.951cm" svg:y="60.041cm">
            <text:p text:style-name="P153"><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4" xml:id="id438" draw:id="id438" draw:layer="layout" svg:width="0.891cm" svg:height="0.97cm" svg:x="-55.951cm" svg:y="61.141cm">
            <text:p text:style-name="P153"><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4" xml:id="id440" draw:id="id440" draw:layer="layout" svg:width="0.891cm" svg:height="0.97cm" svg:x="-55.951cm" svg:y="62.241cm">
            <text:p text:style-name="P153"><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0.926cm" svg:x2="-55.951cm" svg:y2="60.526cm" draw:start-shape="id435" draw:start-glue-point="10" draw:end-shape="id436" draw:end-glue-point="6" svg:d="M-57964 60926l2013-400" svg:viewBox="0 0 2014 401">
            <text:p/>
          </draw:connector>
          <draw:connector draw:style-name="gr503" draw:text-style-name="P15" draw:layer="layout" draw:type="line" svg:x1="-57.964cm" svg:y1="62.226cm" svg:x2="-55.951cm" svg:y2="61.626cm" draw:start-shape="id437" draw:start-glue-point="10" draw:end-shape="id438" draw:end-glue-point="6" svg:d="M-57964 62226l2013-600" svg:viewBox="0 0 2014 601">
            <text:p/>
          </draw:connector>
          <draw:connector draw:style-name="gr503" draw:text-style-name="P15" draw:layer="layout" draw:type="line" svg:x1="-57.964cm" svg:y1="63.526cm" svg:x2="-55.951cm" svg:y2="62.726cm" draw:start-shape="id439" draw:start-glue-point="10" draw:end-shape="id440" draw:end-glue-point="6" svg:d="M-57964 63526l2013-800" svg:viewBox="0 0 2014 801">
            <text:p/>
          </draw:connector>
          <draw:connector draw:style-name="gr503" draw:text-style-name="P15" draw:layer="layout" draw:type="line" svg:x1="-57.964cm" svg:y1="63.526cm" svg:x2="-55.951cm" svg:y2="61.626cm" draw:start-shape="id439" draw:start-glue-point="10" draw:end-shape="id438" draw:end-glue-point="6" svg:d="M-57964 63526l2013-1900" svg:viewBox="0 0 2014 1901">
            <text:p/>
          </draw:connector>
          <draw:connector draw:style-name="gr503" draw:text-style-name="P15" draw:layer="layout" draw:type="line" svg:x1="-57.964cm" svg:y1="63.526cm" svg:x2="-55.951cm" svg:y2="60.526cm" draw:start-shape="id439" draw:start-glue-point="10" draw:end-shape="id436" draw:end-glue-point="6" svg:d="M-57964 63526l2013-3000" svg:viewBox="0 0 2014 3001">
            <text:p/>
          </draw:connector>
          <draw:connector draw:style-name="gr503" draw:text-style-name="P15" draw:layer="layout" draw:type="line" svg:x1="-57.964cm" svg:y1="62.226cm" svg:x2="-55.951cm" svg:y2="60.526cm" draw:start-shape="id437" draw:start-glue-point="10" draw:end-shape="id436" draw:end-glue-point="6" svg:d="M-57964 62226l2013-1700" svg:viewBox="0 0 2014 1701">
            <text:p/>
          </draw:connector>
          <draw:connector draw:style-name="gr503" draw:text-style-name="P15" draw:layer="layout" draw:type="line" svg:x1="-57.964cm" svg:y1="62.226cm" svg:x2="-55.951cm" svg:y2="62.726cm" draw:start-shape="id437" draw:start-glue-point="10" draw:end-shape="id440" draw:end-glue-point="6" svg:d="M-57964 62226l2013 500" svg:viewBox="0 0 2014 501">
            <text:p/>
          </draw:connector>
          <draw:connector draw:style-name="gr503" draw:text-style-name="P15" draw:layer="layout" draw:type="line" svg:x1="-57.964cm" svg:y1="60.926cm" svg:x2="-55.951cm" svg:y2="61.626cm" draw:start-shape="id435" draw:start-glue-point="10" draw:end-shape="id438" draw:end-glue-point="6" svg:d="M-57964 60926l2013 700" svg:viewBox="0 0 2014 701">
            <text:p/>
          </draw:connector>
          <draw:connector draw:style-name="gr503" draw:text-style-name="P15" draw:layer="layout" draw:type="line" svg:x1="-57.964cm" svg:y1="60.926cm" svg:x2="-55.951cm" svg:y2="62.726cm" draw:start-shape="id435" draw:start-glue-point="10" draw:end-shape="id440" draw:end-glue-point="6" svg:d="M-57964 60926l2013 1800" svg:viewBox="0 0 2014 1801">
            <text:p/>
          </draw:connector>
          <draw:custom-shape draw:style-name="gr525" draw:text-style-name="P156" xml:id="id441" draw:id="id441" draw:layer="layout" svg:width="0.891cm" svg:height="0.97cm" svg:x="-53.052cm" svg:y="60.441cm">
            <text:p text:style-name="P155"><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56" xml:id="id442" draw:id="id442" draw:layer="layout" svg:width="0.891cm" svg:height="0.97cm" svg:x="-53.052cm" svg:y="61.741cm">
            <text:p text:style-name="P155"><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7" draw:text-style-name="P156" xml:id="id443" draw:id="id443" draw:layer="layout" svg:width="0.891cm" svg:height="0.97cm" svg:x="-53.052cm" svg:y="63.041cm">
            <text:p text:style-name="P155"><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0.526cm" svg:x2="-53.052cm" svg:y2="60.926cm" draw:start-shape="id436" draw:start-glue-point="10" draw:end-shape="id441" draw:end-glue-point="6" svg:d="M-55060 60526l2008 400" svg:viewBox="0 0 2009 401">
            <text:p/>
          </draw:connector>
          <draw:connector draw:style-name="gr503" draw:text-style-name="P15" draw:layer="layout" draw:type="line" svg:x1="-55.06cm" svg:y1="60.526cm" svg:x2="-53.052cm" svg:y2="62.226cm" draw:start-shape="id436" draw:start-glue-point="10" draw:end-shape="id442" draw:end-glue-point="6" svg:d="M-55060 60526l2008 1700" svg:viewBox="0 0 2009 1701">
            <text:p/>
          </draw:connector>
          <draw:connector draw:style-name="gr503" draw:text-style-name="P15" draw:layer="layout" draw:type="line" svg:x1="-55.06cm" svg:y1="60.526cm" svg:x2="-53.052cm" svg:y2="63.526cm" draw:start-shape="id436" draw:start-glue-point="10" draw:end-shape="id443" draw:end-glue-point="6" svg:d="M-55060 60526l2008 3000" svg:viewBox="0 0 2009 3001">
            <text:p/>
          </draw:connector>
          <draw:connector draw:style-name="gr503" draw:text-style-name="P15" draw:layer="layout" draw:type="line" svg:x1="-55.06cm" svg:y1="61.626cm" svg:x2="-53.052cm" svg:y2="60.926cm" draw:start-shape="id438" draw:start-glue-point="10" draw:end-shape="id441" draw:end-glue-point="6" svg:d="M-55060 61626l2008-700" svg:viewBox="0 0 2009 701">
            <text:p/>
          </draw:connector>
          <draw:connector draw:style-name="gr503" draw:text-style-name="P15" draw:layer="layout" draw:type="line" svg:x1="-55.06cm" svg:y1="61.626cm" svg:x2="-53.052cm" svg:y2="62.226cm" draw:start-shape="id438" draw:start-glue-point="10" draw:end-shape="id442" draw:end-glue-point="6" svg:d="M-55060 61626l2008 600" svg:viewBox="0 0 2009 601">
            <text:p/>
          </draw:connector>
          <draw:connector draw:style-name="gr503" draw:text-style-name="P15" draw:layer="layout" draw:type="line" svg:x1="-55.06cm" svg:y1="61.626cm" svg:x2="-53.052cm" svg:y2="63.526cm" draw:start-shape="id438" draw:start-glue-point="10" draw:end-shape="id443" draw:end-glue-point="6" svg:d="M-55060 61626l2008 1900" svg:viewBox="0 0 2009 1901">
            <text:p/>
          </draw:connector>
          <draw:connector draw:style-name="gr503" draw:text-style-name="P15" draw:layer="layout" draw:type="line" svg:x1="-55.06cm" svg:y1="62.726cm" svg:x2="-53.052cm" svg:y2="63.526cm" draw:start-shape="id440" draw:start-glue-point="10" draw:end-shape="id443" draw:end-glue-point="6" svg:d="M-55060 62726l2008 800" svg:viewBox="0 0 2009 801">
            <text:p/>
          </draw:connector>
          <draw:connector draw:style-name="gr503" draw:text-style-name="P15" draw:layer="layout" draw:type="line" svg:x1="-55.06cm" svg:y1="62.726cm" svg:x2="-53.052cm" svg:y2="62.226cm" draw:start-shape="id440" draw:start-glue-point="10" draw:end-shape="id442" draw:end-glue-point="6" svg:d="M-55060 62726l2008-500" svg:viewBox="0 0 2009 501">
            <text:p/>
          </draw:connector>
          <draw:connector draw:style-name="gr503" draw:text-style-name="P15" draw:layer="layout" draw:type="line" svg:x1="-55.06cm" svg:y1="62.726cm" svg:x2="-53.052cm" svg:y2="60.926cm" draw:start-shape="id440" draw:start-glue-point="10" draw:end-shape="id441" draw:end-glue-point="6" svg:d="M-55060 62726l2008-1800" svg:viewBox="0 0 2009 1801">
            <text:p/>
          </draw:connector>
          <draw:custom-shape draw:style-name="gr502" draw:text-style-name="P154" xml:id="id444" draw:id="id444" draw:layer="layout" svg:width="0.891cm" svg:height="0.97cm" svg:x="-55.951cm" svg:y="63.441cm">
            <text:p text:style-name="P153"><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46" draw:id="id446" draw:layer="layout" draw:type="line" svg:x1="-55.06cm" svg:y1="63.926cm" svg:x2="-53.052cm" svg:y2="60.926cm" draw:start-shape="id444" draw:start-glue-point="10" draw:end-shape="id441" draw:end-glue-point="6" svg:d="M-55060 63926l2008-3000" svg:viewBox="0 0 2009 3001">
            <text:p/>
          </draw:connector>
          <draw:connector draw:style-name="gr503" draw:text-style-name="P15" draw:layer="layout" draw:type="line" svg:x1="-55.06cm" svg:y1="63.926cm" svg:x2="-53.052cm" svg:y2="63.526cm" draw:start-shape="id444" draw:start-glue-point="10" draw:end-shape="id443" draw:end-glue-point="6" svg:d="M-55060 63926l2008-400" svg:viewBox="0 0 2009 401">
            <text:p/>
          </draw:connector>
          <draw:connector draw:style-name="gr503" draw:text-style-name="P15" draw:layer="layout" draw:type="line" svg:x1="-55.06cm" svg:y1="63.926cm" svg:x2="-53.052cm" svg:y2="62.226cm" draw:start-shape="id444" draw:start-glue-point="10" draw:end-shape="id442" draw:end-glue-point="6" svg:d="M-55060 63926l2008-1700" svg:viewBox="0 0 2009 1701">
            <text:p/>
          </draw:connector>
          <draw:connector draw:style-name="gr503" draw:text-style-name="P15" draw:layer="layout" draw:type="line" svg:x1="-57.964cm" svg:y1="63.526cm" svg:x2="-55.951cm" svg:y2="63.926cm" draw:start-shape="id439" draw:start-glue-point="10" draw:end-shape="id444" draw:end-glue-point="6" svg:d="M-57964 63526l2013 400" svg:viewBox="0 0 2014 401">
            <text:p/>
          </draw:connector>
          <draw:connector draw:style-name="gr503" draw:text-style-name="P15" draw:layer="layout" draw:type="line" svg:x1="-57.964cm" svg:y1="62.226cm" svg:x2="-55.951cm" svg:y2="63.926cm" draw:start-shape="id437" draw:start-glue-point="10" draw:end-shape="id444" draw:end-glue-point="6" svg:d="M-57964 62226l2013 1700" svg:viewBox="0 0 2014 1701">
            <text:p/>
          </draw:connector>
          <draw:connector draw:style-name="gr503" draw:text-style-name="P15" draw:layer="layout" draw:type="line" svg:x1="-57.964cm" svg:y1="60.926cm" svg:x2="-55.951cm" svg:y2="63.926cm" draw:start-shape="id435" draw:start-glue-point="10" draw:end-shape="id444" draw:end-glue-point="6" svg:d="M-57964 60926l2013 3000" svg:viewBox="0 0 2014 3001">
            <text:p/>
          </draw:connector>
          <draw:custom-shape draw:style-name="gr502" draw:text-style-name="P154" xml:id="id445" draw:id="id445" draw:layer="layout" svg:width="0.891cm" svg:height="0.97cm" svg:x="-55.951cm" svg:y="64.641cm">
            <text:p text:style-name="P153"><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5.126cm" svg:x2="-53.052cm" svg:y2="63.526cm" draw:start-shape="id445" draw:start-glue-point="10" draw:end-shape="id443" draw:end-glue-point="6" svg:d="M-55060 65126l2008-1600" svg:viewBox="0 0 2009 1601">
            <text:p/>
          </draw:connector>
          <draw:connector draw:style-name="gr503" draw:text-style-name="P15" draw:layer="layout" draw:type="line" svg:x1="-55.06cm" svg:y1="65.126cm" svg:x2="-53.052cm" svg:y2="62.226cm" draw:start-shape="id445" draw:start-glue-point="10" draw:end-shape="id442" draw:end-glue-point="6" svg:d="M-55060 65126l2008-2900" svg:viewBox="0 0 2009 2901">
            <text:p/>
          </draw:connector>
          <draw:connector draw:style-name="gr503" draw:text-style-name="P15" draw:layer="layout" draw:type="line" svg:x1="-55.06cm" svg:y1="65.126cm" svg:x2="-54.056cm" svg:y2="62.426cm" draw:start-shape="id445" draw:start-glue-point="10" draw:end-shape="id446" draw:end-glue-point="3" svg:d="M-55060 65126l1004-2700" svg:viewBox="0 0 1005 2701">
            <text:p/>
          </draw:connector>
          <draw:connector draw:style-name="gr503" draw:text-style-name="P15" draw:layer="layout" draw:type="line" svg:x1="-57.964cm" svg:y1="63.526cm" svg:x2="-55.951cm" svg:y2="65.126cm" draw:start-shape="id439" draw:start-glue-point="10" draw:end-shape="id445" draw:end-glue-point="6" svg:d="M-57964 63526l2013 1600" svg:viewBox="0 0 2014 1601">
            <text:p/>
          </draw:connector>
          <draw:connector draw:style-name="gr503" draw:text-style-name="P15" draw:layer="layout" draw:type="line" svg:x1="-57.964cm" svg:y1="62.226cm" svg:x2="-55.951cm" svg:y2="65.126cm" draw:start-shape="id437" draw:start-glue-point="10" draw:end-shape="id445" draw:end-glue-point="6" svg:d="M-57964 62226l2013 2900" svg:viewBox="0 0 2014 2901">
            <text:p/>
          </draw:connector>
          <draw:connector draw:style-name="gr503" draw:text-style-name="P15" draw:layer="layout" draw:type="line" svg:x1="-57.964cm" svg:y1="60.926cm" svg:x2="-55.951cm" svg:y2="65.126cm" draw:start-shape="id435" draw:start-glue-point="10" draw:end-shape="id445" draw:end-glue-point="6" svg:d="M-57964 60926l2013 4200" svg:viewBox="0 0 2014 4201">
            <text:p/>
          </draw:connector>
          <draw:custom-shape draw:style-name="gr501" draw:text-style-name="P142" xml:id="id448" draw:id="id448" draw:layer="layout" svg:width="0.891cm" svg:height="0.97cm" svg:x="-53.052cm" svg:y="64.38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47" draw:id="id447" draw:layer="layout" svg:width="0.891cm" svg:height="0.97cm" svg:x="-58.855cm" svg:y="64.426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4.911cm" svg:x2="-55.951cm" svg:y2="65.126cm" draw:start-shape="id447" draw:start-glue-point="10" draw:end-shape="id445" draw:end-glue-point="6" svg:d="M-57964 64911l2013 215" svg:viewBox="0 0 2014 216">
            <text:p/>
          </draw:connector>
          <draw:connector draw:style-name="gr503" draw:text-style-name="P15" draw:layer="layout" draw:type="line" svg:x1="-57.964cm" svg:y1="64.911cm" svg:x2="-55.951cm" svg:y2="63.926cm" draw:start-shape="id447" draw:start-glue-point="10" draw:end-shape="id444" draw:end-glue-point="6" svg:d="M-57964 64911l2013-985" svg:viewBox="0 0 2014 986">
            <text:p/>
          </draw:connector>
          <draw:connector draw:style-name="gr503" draw:text-style-name="P15" draw:layer="layout" draw:type="line" svg:x1="-57.964cm" svg:y1="64.911cm" svg:x2="-55.951cm" svg:y2="62.726cm" draw:start-shape="id447" draw:start-glue-point="10" draw:end-shape="id440" draw:end-glue-point="6" svg:d="M-57964 64911l2013-2185" svg:viewBox="0 0 2014 2186">
            <text:p/>
          </draw:connector>
          <draw:connector draw:style-name="gr503" draw:text-style-name="P15" draw:layer="layout" draw:type="line" svg:x1="-57.964cm" svg:y1="64.911cm" svg:x2="-55.951cm" svg:y2="61.626cm" draw:start-shape="id447" draw:start-glue-point="10" draw:end-shape="id438" draw:end-glue-point="6" svg:d="M-57964 64911l2013-3285" svg:viewBox="0 0 2014 3286">
            <text:p/>
          </draw:connector>
          <draw:connector draw:style-name="gr503" draw:text-style-name="P15" draw:layer="layout" draw:type="line" svg:x1="-57.964cm" svg:y1="64.911cm" svg:x2="-55.951cm" svg:y2="60.526cm" draw:start-shape="id447" draw:start-glue-point="10" draw:end-shape="id436" draw:end-glue-point="6" svg:d="M-57964 64911l2013-4385" svg:viewBox="0 0 2014 4386">
            <text:p/>
          </draw:connector>
          <draw:connector draw:style-name="gr503" draw:text-style-name="P15" draw:layer="layout" draw:type="line" svg:x1="-55.06cm" svg:y1="65.126cm" svg:x2="-53.052cm" svg:y2="64.872cm" draw:start-shape="id445" draw:start-glue-point="10" draw:end-shape="id448" draw:end-glue-point="6" svg:d="M-55060 65126l2008-254" svg:viewBox="0 0 2009 255">
            <text:p/>
          </draw:connector>
          <draw:connector draw:style-name="gr503" draw:text-style-name="P15" draw:layer="layout" draw:type="line" svg:x1="-55.06cm" svg:y1="63.926cm" svg:x2="-53.052cm" svg:y2="64.872cm" draw:start-shape="id444" draw:start-glue-point="10" draw:end-shape="id448" draw:end-glue-point="6" svg:d="M-55060 63926l2008 946" svg:viewBox="0 0 2009 947">
            <text:p/>
          </draw:connector>
          <draw:connector draw:style-name="gr503" draw:text-style-name="P15" draw:layer="layout" draw:type="line" svg:x1="-55.06cm" svg:y1="62.726cm" svg:x2="-53.052cm" svg:y2="64.872cm" draw:start-shape="id440" draw:start-glue-point="10" draw:end-shape="id448" draw:end-glue-point="6" svg:d="M-55060 62726l2008 2146" svg:viewBox="0 0 2009 2147">
            <text:p/>
          </draw:connector>
          <draw:connector draw:style-name="gr503" draw:text-style-name="P15" draw:layer="layout" draw:type="line" svg:x1="-55.06cm" svg:y1="61.626cm" svg:x2="-53.052cm" svg:y2="64.872cm" draw:start-shape="id438" draw:start-glue-point="10" draw:end-shape="id448" draw:end-glue-point="6" svg:d="M-55060 61626l2008 3246" svg:viewBox="0 0 2009 3247">
            <text:p/>
          </draw:connector>
          <draw:connector draw:style-name="gr503" draw:text-style-name="P15" draw:layer="layout" draw:type="line" svg:x1="-55.06cm" svg:y1="60.526cm" svg:x2="-53.052cm" svg:y2="64.872cm" draw:start-shape="id436" draw:start-glue-point="10" draw:end-shape="id448" draw:end-glue-point="6" svg:d="M-55060 60526l2008 4346" svg:viewBox="0 0 2009 4347">
            <text:p/>
          </draw:connector>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500" draw:id="id500"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92" draw:id="id492"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9" draw:start-glue-point="1" draw:end-shape="id450" draw:end-glue-point="3" svg:d="M-27151 52428c1246 0 417 1310 1660 1310" svg:viewBox="0 0 1661 1311">
          <text:p/>
        </draw:connector>
        <draw:connector draw:style-name="gr528" draw:text-style-name="P15" draw:layer="layout" draw:type="curve" svg:x1="30.809cm" svg:y1="107.092cm" svg:x2="30.407cm" svg:y2="105.779cm" draw:start-shape="id451" draw:start-glue-point="0" draw:end-shape="id367" draw:end-glue-point="2" svg:d="M30809 107092c0-984-402-328-402-1313" svg:viewBox="0 0 403 1314">
          <text:p/>
        </draw:connector>
        <draw:custom-shape draw:name="comment box 15" draw:style-name="gr529" draw:text-style-name="P158" xml:id="id452" draw:id="id452" draw:layer="layout" svg:width="1.885cm" svg:height="1.575cm" svg:x="-48.78cm" svg:y="76.294cm">
          <text:p text:style-name="P157"><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52" draw:end-glue-point="4" svg:d="M-47452 75549c0 168-385-204-385 745" svg:viewBox="0 0 386 746">
          <text:p/>
        </draw:connector>
        <draw:connector draw:style-name="gr29" draw:text-style-name="P15" draw:layer="layout" draw:type="curve" svg:x1="-49.453cm" svg:y1="75.549cm" svg:x2="-49.92cm" svg:y2="76.336cm" draw:end-shape="id453" draw:end-glue-point="4" svg:d="M-49453 75549c0 199-467-194-467 787" svg:viewBox="0 0 468 788">
          <text:p/>
        </draw:connector>
        <draw:custom-shape draw:name="comment box 14" draw:style-name="gr530" draw:text-style-name="P158" xml:id="id453" draw:id="id453" draw:layer="layout" svg:width="1.884cm" svg:height="1.523cm" svg:x="-50.862cm" svg:y="76.336cm">
          <text:p text:style-name="P157"><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0" draw:text-style-name="P113"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er</text:span></text:p>
            </draw:text-box>
          </draw:frame>
        </draw:g>
        <draw:frame draw:style-name="gr531" draw:text-style-name="P41" draw:layer="layout" svg:width="4.125cm" svg:height="2.221cm" svg:x="-49.213cm" svg:y="79.993cm">
          <draw:text-box>
            <text:p text:style-name="P5"><text:span text:style-name="T12">Action potential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54" draw:id="id454" draw:layer="layout" svg:width="2.3cm" svg:height="1cm" svg:x="33.204cm" svg:y="74.728cm">
          <text:p text:style-name="P5">IMU</text:p>
        </draw:rect>
        <draw:rect draw:style-name="gr292" draw:text-style-name="P35" xml:id="id455" draw:id="id455"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54" svg:d="M32654 73528c0 900 1700 300 1700 1200" svg:viewBox="0 0 1701 1201">
          <text:p/>
        </draw:connector>
        <draw:connector draw:style-name="gr293" draw:text-style-name="P15" draw:layer="layout" draw:type="curve" svg:x1="32.654cm" svg:y1="73.528cm" svg:x2="37.354cm" svg:y2="74.728cm" draw:start-shape="id240" draw:start-glue-point="2" draw:end-shape="id455" draw:end-glue-point="0" svg:d="M32654 73528c0 900 4700 300 4700 1200" svg:viewBox="0 0 4701 1201">
          <text:p/>
        </draw:connector>
        <draw:g draw:style-name="gr31">
          <draw:polygon draw:style-name="gr532" draw:text-style-name="P5" draw:layer="layout" svg:width="2.947cm" svg:height="4.308cm" svg:x="-69.005cm" svg:y="71.164cm" svg:viewBox="0 0 2948 4309" draw:points="0,3742 18,699 2891,0 2948,4309">
            <text:p/>
          </draw:polygon>
          <draw:g draw:style-name="gr31">
            <draw:custom-shape draw:style-name="gr533" draw:text-style-name="P159"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4" draw:text-style-name="P16" draw:layer="layout" svg:width="1.101cm" svg:height="0.569cm" svg:x="-72.247cm" svg:y="71.701cm">
              <draw:text-box>
                <text:p><text:span text:style-name="T4">GPS</text:span></text:p>
              </draw:text-box>
            </draw:frame>
          </draw:g>
          <draw:g draw:style-name="gr31">
            <draw:custom-shape draw:style-name="gr535"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6" draw:text-style-name="P16" draw:layer="layout" svg:width="1.337cm" svg:height="0.569cm" svg:x="-72.221cm" svg:y="71.194cm">
              <draw:text-box>
                <text:p><text:span text:style-name="T4">LIDAR</text:span></text:p>
              </draw:text-box>
            </draw:frame>
          </draw:g>
          <draw:custom-shape draw:style-name="gr535"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7" draw:text-style-name="P16" draw:layer="layout" svg:width="2.047cm" svg:height="0.569cm" svg:x="-70.737cm" svg:y="72.996cm">
            <draw:text-box>
              <text:p><text:span text:style-name="T4">AE mapping</text:span></text:p>
            </draw:text-box>
          </draw:frame>
          <draw:polygon draw:style-name="gr532" draw:text-style-name="P5" draw:layer="layout" svg:width="3.884cm" svg:height="5.678cm" svg:x="-64.164cm" svg:y="70.371cm" svg:viewBox="0 0 3885 5679" draw:points="0,4931 24,921 3810,0 3885,5679">
            <text:p/>
          </draw:polygon>
          <draw:custom-shape draw:style-name="gr538"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0"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2" draw:text-style-name="P15" draw:layer="layout" svg:x1="-66.058cm" svg:y1="73.543cm" svg:x2="-62.556cm" svg:y2="73.505cm">
            <text:p/>
          </draw:line>
          <draw:frame draw:style-name="gr543" draw:text-style-name="P160" draw:layer="layout" svg:width="2.473cm" svg:height="1.205cm" svg:x="-66.36cm" svg:y="73.072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7" draw:id="id457">
            <draw:custom-shape draw:style-name="gr535"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2" draw:text-style-name="P15" draw:layer="layout" svg:x1="-70.556cm" svg:y1="73.537cm" svg:x2="-67.656cm" svg:y2="73.505cm">
            <text:p/>
          </draw:line>
          <draw:frame draw:style-name="gr544" draw:text-style-name="P16" draw:layer="layout" svg:width="3.576cm" svg:height="1.205cm" svg:x="-66.669cm" svg:y="70.062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5" draw:text-style-name="P161" draw:layer="layout" svg:width="2.126cm" svg:height="0.569cm" svg:x="-68.667cm" svg:y="71.77cm">
            <draw:text-box>
              <text:p><text:span text:style-name="T52">Latent space</text:span></text:p>
            </draw:text-box>
          </draw:frame>
          <draw:frame draw:style-name="gr546" draw:text-style-name="P163" draw:layer="layout" svg:width="0.87cm" svg:height="0.73cm" svg:x="-62.263cm" svg:y="74.119cm">
            <draw:text-box>
              <text:p text:style-name="P162"><text:span text:style-name="T4">μ</text:span><text:span text:style-name="T43">’</text:span><text:span text:style-name="T42">G</text:span></text:p>
            </draw:text-box>
          </draw:frame>
          <draw:frame draw:style-name="gr547" draw:text-style-name="P163" draw:layer="layout" svg:width="0.87cm" svg:height="0.73cm" svg:x="-62.689cm" svg:y="73.127cm">
            <draw:text-box>
              <text:p text:style-name="P162"><text:span text:style-name="T4">μ</text:span><text:span text:style-name="T43">’</text:span><text:span text:style-name="T42">L</text:span></text:p>
            </draw:text-box>
          </draw:frame>
          <draw:frame draw:style-name="gr548" draw:text-style-name="P161" draw:layer="layout" svg:width="2.346cm" svg:height="0.887cm" svg:x="-63.709cm" svg:y="71.199cm">
            <draw:text-box>
              <text:p><text:span text:style-name="T52">clusters mean</text:span><text:span text:style-name="T52"><text:line-break/></text:span><text:span text:style-name="T52">in latent space</text:span></text:p>
            </draw:text-box>
          </draw:frame>
          <draw:custom-shape draw:style-name="gr533" draw:text-style-name="P159" xml:id="id456" draw:id="id456"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9" draw:text-style-name="P5" draw:layer="layout" svg:x1="-62.487cm" svg:y1="73.557cm" svg:x2="-62.132cm" svg:y2="74.164cm">
            <text:p/>
          </draw:line>
          <draw:frame draw:style-name="gr550" draw:text-style-name="P16" draw:layer="layout" svg:width="0.697cm" svg:height="0.569cm" svg:x="-62.724cm" svg:y="73.709cm">
            <draw:text-box>
              <text:p><text:span text:style-name="T4">d</text:span><text:span text:style-name="T43">’</text:span></text:p>
            </draw:text-box>
          </draw:frame>
          <draw:connector draw:style-name="gr551" draw:text-style-name="P15" draw:layer="layout" draw:type="curve" draw:line-skew="0.315cm" svg:x1="-62.099cm" svg:y1="74.301cm" svg:x2="-67.739cm" svg:y2="73.922cm" draw:start-shape="id456" draw:start-glue-point="8" draw:end-shape="id457" draw:end-glue-point="2" svg:d="M-62099 74301c0 1224-5640 1413-5640-379" svg:viewBox="0 0 5641 1323">
            <text:p/>
          </draw:connector>
          <draw:frame draw:style-name="gr552" draw:text-style-name="P16" draw:layer="layout" svg:width="1.595cm" svg:height="0.887cm" svg:x="-65.852cm" svg:y="75.137cm">
            <draw:text-box>
              <text:p text:style-name="P162"><text:span text:style-name="T10">Decode</text:span><text:span text:style-name="T10"><text:line-break/></text:span><text:span text:style-name="T10">GPS+</text:span><text:span text:style-name="T4">μ</text:span><text:span text:style-name="T43">’</text:span><text:span text:style-name="T42">G</text:span></text:p>
            </draw:text-box>
          </draw:frame>
          <draw:frame draw:style-name="gr553" draw:text-style-name="P164" draw:layer="layout" svg:width="5.09cm" svg:height="1.039cm" svg:x="-67.482cm" svg:y="76.119cm">
            <draw:text-box>
              <text:p text:style-name="P5"><text:span text:style-name="T53">Mapping GPS to the center </text:span><text:span text:style-name="T53"><text:line-break/></text:span><text:span text:style-name="T53">of mapped LIDAR-class</text:span></text:p>
            </draw:text-box>
          </draw:frame>
        </draw:g>
        <draw:g draw:style-name="gr23">
          <draw:rect draw:style-name="gr41" draw:text-style-name="P5" xml:id="id459" draw:id="id459" draw:layer="layout" svg:width="1.283cm" svg:height="1.495cm" svg:x="-20.906cm" svg:y="108.783cm">
            <text:p text:style-name="P5">Robot</text:p>
          </draw:rect>
          <draw:line draw:style-name="gr554" draw:text-style-name="P5" xml:id="id458" draw:id="id458" draw:layer="layout" svg:x1="-19.65cm" svg:y1="109.523cm" svg:x2="-17.956cm" svg:y2="109.497cm">
            <text:p/>
          </draw:line>
          <draw:connector draw:style-name="gr555" draw:text-style-name="P15" draw:layer="layout" svg:x1="-18.803cm" svg:y1="109.523cm" svg:x2="-20.264cm" svg:y2="110.278cm" draw:start-shape="id458" draw:start-glue-point="2" draw:end-shape="id459" svg:d="M-18803 109523v1256h-1461v-501" svg:viewBox="0 0 1462 1257">
            <text:p/>
          </draw:connector>
          <draw:line draw:style-name="gr554" draw:text-style-name="P5" draw:layer="layout" svg:x1="-22.401cm" svg:y1="109.497cm" svg:x2="-20.92cm" svg:y2="109.497cm">
            <text:p/>
          </draw:line>
          <draw:frame draw:style-name="gr556" draw:text-style-name="P16" draw:layer="layout" svg:width="1.117cm" svg:height="0.569cm" svg:x="-22.168cm" svg:y="109.009cm">
            <draw:text-box>
              <text:p><text:span text:style-name="T4">input</text:span></text:p>
            </draw:text-box>
          </draw:frame>
          <draw:frame draw:style-name="gr557" draw:text-style-name="P16" draw:layer="layout" svg:width="1.291cm" svg:height="0.569cm" svg:x="-19.567cm" svg:y="109.01cm">
            <draw:text-box>
              <text:p><text:span text:style-name="T4">output</text:span></text:p>
            </draw:text-box>
          </draw:frame>
          <draw:frame draw:style-name="gr558" draw:text-style-name="P16" draw:layer="layout" svg:width="1.748cm" svg:height="0.569cm" svg:x="-20.366cm" svg:y="110.711cm">
            <draw:text-box>
              <text:p><text:span text:style-name="T4">Feedback</text:span></text:p>
            </draw:text-box>
          </draw:frame>
        </draw:g>
        <draw:line draw:style-name="gr559" draw:text-style-name="P15" draw:layer="layout" svg:x1="-51.273cm" svg:y1="82.253cm" svg:x2="-35.038cm" svg:y2="82.253cm">
          <text:p/>
        </draw:line>
        <draw:frame draw:style-name="gr560" draw:text-style-name="P165" draw:layer="layout" svg:width="4.884cm" svg:height="2.015cm" svg:x="-45.762cm" svg:y="82.29cm">
          <draw:text-box>
            <text:p text:style-name="P5"><text:span text:style-name="T54">Predictive model </text:span><text:span text:style-name="T54"><text:line-break/></text:span><text:span text:style-name="T54">building with </text:span><text:span text:style-name="T54"><text:line-break/></text:span><text:span text:style-name="T54">transformers</text:span></text:p>
          </draw:text-box>
        </draw:frame>
        <draw:line draw:style-name="gr561" draw:text-style-name="P15" draw:layer="layout" svg:x1="-34.727cm" svg:y1="66.427cm" svg:x2="-34.694cm" svg:y2="81.856cm">
          <text:p/>
        </draw:line>
        <draw:frame draw:style-name="gr562" draw:text-style-name="P166" draw:layer="layout" svg:width="5.588cm" svg:height="1.038cm" draw:transform="rotate (1.5707963267949) translate (-34.753cm 76.743cm)">
          <draw:text-box>
            <text:p><text:span text:style-name="T54">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61" draw:id="id461"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0" draw:id="id460"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60" draw:start-glue-point="6" draw:end-shape="id461" draw:end-glue-point="10" svg:d="M-47897 100065h-1110" svg:viewBox="0 0 1111 1">
            <text:p/>
          </draw:connector>
          <draw:custom-shape draw:style-name="gr34" draw:text-style-name="P26" xml:id="id463" draw:id="id463"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2" draw:id="id462"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62" draw:start-glue-point="6" draw:end-shape="id463" draw:end-glue-point="10" svg:d="M-43897 100065h-1110" svg:viewBox="0 0 1111 1">
            <text:p/>
          </draw:connector>
          <draw:connector draw:style-name="gr36" draw:text-style-name="P7" draw:layer="layout" draw:type="curve" svg:x1="-45.898cm" svg:y1="100.065cm" svg:x2="-47.006cm" svg:y2="100.065cm" draw:start-shape="id463" draw:start-glue-point="6" draw:end-shape="id460" draw:end-glue-point="10" svg:d="M-45898 100065h-1108" svg:viewBox="0 0 1109 1">
            <text:p/>
          </draw:connector>
          <draw:custom-shape draw:style-name="gr34" draw:text-style-name="P26" xml:id="id465" draw:id="id465"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4" draw:id="id464"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4" draw:start-glue-point="6" draw:end-shape="id465"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101.297cm)">
            <text:p text:style-name="P19"><text:span text:style-name="T4">Phenom</text:span><text:span text:style-name="T4"><text:line-break/></text:span><text:span text:style-name="T4">distributi</text:span><text:span text:style-name="T4">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9" draw:text-style-name="P15" draw:layer="layout" svg:x1="-34.76cm" svg:y1="88.884cm" svg:x2="-34.671cm" svg:y2="102.989cm">
            <text:p/>
          </draw:line>
          <draw:frame draw:style-name="gr563" draw:text-style-name="P165" draw:layer="layout" svg:width="5.06cm" svg:height="2.015cm" draw:transform="rotate (1.5707963267949) translate (-34.659cm 98.445cm)">
            <draw:text-box>
              <text:p text:style-name="P5"><text:span text:style-name="T54">Live remembering</text:span><text:span text:style-name="T54"><text:line-break/></text:span><text:span text:style-name="T54">and</text:span><text:span text:style-name="T54"><text:line-break/></text:span><text:span text:style-name="T54">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4" draw:text-style-name="P137" draw:layer="layout" svg:width="2.198cm" svg:height="1.705cm" svg:x="-44.455cm" svg:y="89.094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0" draw:text-style-name="P113"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65"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5"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5"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5"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6" draw:text-style-name="P27" xml:id="id466" draw:id="id466"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6" draw:text-style-name="P27" xml:id="id467" draw:id="id467"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7" draw:text-style-name="P15" draw:layer="layout" draw:type="curve" svg:x1="-39.402cm" svg:y1="89.666cm" svg:x2="-39.402cm" svg:y2="90.138cm" draw:start-shape="id466" draw:start-glue-point="8" draw:end-shape="id467" draw:end-glue-point="4" svg:d="M-39402 89666v472" svg:viewBox="0 0 1 473">
            <text:p/>
          </draw:connector>
          <draw:frame draw:style-name="gr524"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9" draw:id="id469"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8" draw:text-style-name="P167" draw:layer="layout" svg:width="3.958cm" svg:height="0.645cm" svg:x="-39.467cm" svg:y="89.59cm">
            <draw:text-box>
              <text:p><text:span text:style-name="T12">H </text:span><text:span text:style-name="T55">(observation matrix)</text:span></text:p>
            </draw:text-box>
          </draw:frame>
          <draw:custom-shape draw:style-name="gr34" draw:text-style-name="P26" xml:id="id468" draw:id="id468"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8" draw:start-glue-point="6" draw:end-shape="id469" draw:end-glue-point="10" svg:d="M-42586 102121c-786 0-261 1-1050 1" svg:viewBox="0 0 1051 2">
            <text:p/>
          </draw:connector>
          <draw:g draw:style-name="gr31">
            <draw:custom-shape draw:style-name="gr569" draw:text-style-name="P26" xml:id="id473" draw:id="id473"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168" xml:id="id475" draw:id="id475"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1" draw:text-style-name="P27" xml:id="id470" draw:id="id470"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2" draw:text-style-name="P27" xml:id="id471" draw:id="id471"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3" draw:text-style-name="P7" draw:layer="layout" draw:type="curve" svg:x1="-47.286cm" svg:y1="104.685cm" svg:x2="-46.42cm" svg:y2="104.691cm" draw:start-shape="id470" draw:start-glue-point="10" draw:end-shape="id471" draw:end-glue-point="6" svg:d="M-47286 104685c651 0 218 6 866 6" svg:viewBox="0 0 867 7">
              <text:p/>
            </draw:connector>
            <draw:custom-shape draw:style-name="gr572" draw:text-style-name="P27" xml:id="id472" draw:id="id472"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6" xml:id="id474" draw:id="id474"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4"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7" draw:text-style-name="P15" draw:layer="layout" draw:type="curve" svg:x1="-45.602cm" svg:y1="104.692cm" svg:x2="-44.106cm" svg:y2="105.584cm" draw:start-shape="id472" draw:start-glue-point="10" draw:end-shape="id473" draw:end-glue-point="6" svg:d="M-45602 104692c1123 0 376 892 1496 892" svg:viewBox="0 0 1497 893">
              <text:p/>
            </draw:connector>
            <draw:connector draw:style-name="gr567" draw:text-style-name="P15" draw:layer="layout" draw:type="curve" svg:x1="-45.602cm" svg:y1="104.692cm" svg:x2="-44.157cm" svg:y2="103.694cm" draw:start-shape="id472" draw:start-glue-point="10" draw:end-shape="id474" draw:end-glue-point="6" svg:d="M-45602 104692c1086 0 364-998 1445-998" svg:viewBox="0 0 1446 999">
              <text:p/>
            </draw:connector>
            <draw:connector draw:style-name="gr567" draw:text-style-name="P15" draw:layer="layout" draw:type="curve" svg:x1="-42.156cm" svg:y1="103.694cm" svg:x2="-40.648cm" svg:y2="104.697cm" draw:start-shape="id474" draw:start-glue-point="10" draw:end-shape="id475" draw:end-glue-point="6" svg:d="M-42156 103694c1132 0 379 1003 1508 1003" svg:viewBox="0 0 1509 1004">
              <text:p/>
            </draw:connector>
            <draw:connector draw:style-name="gr567" draw:text-style-name="P15" draw:layer="layout" draw:type="curve" svg:x1="-42.105cm" svg:y1="105.584cm" svg:x2="-40.648cm" svg:y2="104.697cm" draw:start-shape="id473" draw:end-shape="id475" draw:end-glue-point="6" svg:d="M-42105 105584c1095 0 367-887 1457-887" svg:viewBox="0 0 1458 888">
              <text:p/>
            </draw:connector>
            <draw:frame draw:style-name="gr524"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6" draw:id="id476">
              <draw:custom-shape draw:style-name="gr574"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4"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7" draw:text-style-name="P15" draw:layer="layout" draw:type="curve" svg:x1="-39.757cm" svg:y1="104.697cm" svg:x2="-38.671cm" svg:y2="104.679cm" draw:start-shape="id475" draw:start-glue-point="10" draw:end-shape="id476" draw:end-glue-point="3" svg:d="M-39757 104697c816 0 273-18 1086-18" svg:viewBox="0 0 1087 19">
              <text:p/>
            </draw:connector>
            <draw:custom-shape draw:style-name="gr571" draw:text-style-name="P27" xml:id="id477" draw:id="id477"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2"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3" draw:text-style-name="P7" draw:layer="layout" draw:type="curve" svg:x1="-43.106cm" svg:y1="108.048cm" svg:x2="-43.094cm" svg:y2="107.208cm" draw:start-shape="id477" draw:start-glue-point="4" draw:end-shape="id478" draw:end-glue-point="8" svg:d="M-43106 108048c0-630 12-210 12-840" svg:viewBox="0 0 13 841">
              <text:p/>
            </draw:connector>
            <draw:custom-shape draw:style-name="gr572" draw:text-style-name="P27" xml:id="id478" draw:id="id478"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3" draw:text-style-name="P7" draw:layer="layout" draw:type="curve" svg:x1="-43.094cm" svg:y1="106.509cm" svg:x2="-43.105cm" svg:y2="106.029cm" draw:start-shape="id478" draw:start-glue-point="4" draw:end-shape="id473" draw:end-glue-point="8" svg:d="M-43094 106509c0-360-11-120-11-480" svg:viewBox="0 0 12 481">
              <text:p/>
            </draw:connector>
            <draw:measure draw:style-name="gr575" draw:text-style-name="P170" draw:layer="measurelines" svg:x1="-42.622cm" svg:y1="108.335cm" svg:x2="-38.396cm" svg:y2="105.093cm">
              <text:p text:style-name="P169"><text:span text:style-name="T56">Suprise</text:span><text:span text:style-name="T56"><text:line-break/></text:span><text:span text:style-name="T56"><text:measure text:kind="gap"/></text:span><text:span text:style-name="T56">Wasserstein</text:span></text:p>
            </draw:measure>
          </draw:g>
        </draw:g>
        <draw:rect draw:style-name="gr41" draw:text-style-name="P5" xml:id="id479" draw:id="id479"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9" draw:end-glue-point="0" svg:d="M16457 99461c0 2239-4688 747-4688 2986" svg:viewBox="0 0 4689 2987">
          <text:p/>
        </draw:connector>
        <draw:path draw:style-name="gr576" draw:text-style-name="P171"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6" draw:text-style-name="P171"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6" draw:text-style-name="P171" draw:layer="layout" svg:width="0.168cm" svg:height="0.432cm" svg:x="-28.37cm" svg:y="91.818cm" svg:viewBox="0 0 169 433" svg:d="M169 425c-19 5-39 8-59 8-46 0-70-26-70-79v-234h-40v-42h43l17-78h38v78h65v42h-65v221c0 17 3 29 9 36 5 6 15 10 28 10 8 0 19-2 34-5z">
          <text:p/>
        </draw:path>
        <draw:path draw:style-name="gr576" draw:text-style-name="P171"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6" draw:text-style-name="P171"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6" draw:text-style-name="P171" draw:layer="layout" svg:width="0.057cm" svg:height="0.479cm" svg:x="-27.161cm" svg:y="91.767cm" svg:viewBox="0 0 58 480" svg:d="M0 56c0-19 0-37 0-56 19 0 39 0 58 0 0 19 0 37 0 56-19 0-39 0-58 0zM0 480c0-117 0-233 0-350 19 0 39 0 58 0 0 117 0 233 0 350-19 0-39 0-58 0z">
          <text:p/>
        </draw:path>
        <draw:path draw:style-name="gr576" draw:text-style-name="P171"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6" draw:text-style-name="P171" draw:layer="layout" svg:width="0.168cm" svg:height="0.432cm" svg:x="-26.682cm" svg:y="91.818cm" svg:viewBox="0 0 169 433" svg:d="M169 425c-19 5-39 8-59 8-46 0-70-26-70-79v-234h-40v-42h43l17-78h38v78h65v42h-65v221c0 17 3 29 9 36 5 6 15 10 28 10 8 0 19-2 34-5z">
          <text:p/>
        </draw:path>
        <draw:g draw:style-name="gr23">
          <draw:path draw:style-name="gr577" draw:text-style-name="P172" draw:layer="layout" svg:width="0.194cm" svg:height="0.298cm" svg:x="-26.733cm" svg:y="92.957cm" svg:viewBox="0 0 195 299" svg:d="M186 45c-8-3-16-4-25-4-19 0-36 10-51 30s-26 45-31 75l-30 153h-49l44-225 7-38 5-31h46l-10 60h1c12-24 24-41 36-50 11-10 25-15 40-15 8 0 17 1 26 4z">
            <text:p/>
          </draw:path>
          <draw:path draw:style-name="gr577" draw:text-style-name="P172" draw:layer="layout" svg:width="0.205cm" svg:height="0.517cm" svg:x="-26.531cm" svg:y="92.853cm" svg:viewBox="0 0 206 518" svg:d="M206 0c-105 92-157 203-157 332 0 70 19 132 56 186h-47c-39-54-58-117-58-191 0-67 14-128 41-184 27-55 66-103 118-143z">
            <text:p/>
          </draw:path>
          <draw:path draw:style-name="gr577" draw:text-style-name="P172"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7" draw:text-style-name="P172" draw:layer="layout" svg:width="0.205cm" svg:height="0.517cm" svg:x="-26.273cm" svg:y="92.853cm" svg:viewBox="0 0 206 518" svg:d="M0 518c105-92 157-203 157-332 0-70-19-132-56-186h47c39 54 58 117 58 191 0 67-14 128-41 184-27 55-66 103-118 143z">
            <text:p/>
          </draw:path>
        </draw:g>
        <draw:path draw:style-name="gr578" draw:text-style-name="P5" draw:layer="layout" svg:width="4.073cm" svg:height="0cm" svg:x="-29.294cm" svg:y="92.706cm" svg:viewBox="0 0 4074 0" svg:d="M0 0c1358 0 2716 0 4074 0">
          <text:p/>
        </draw:path>
        <draw:path draw:style-name="gr579" draw:text-style-name="P173" draw:layer="layout" svg:width="0.316cm" svg:height="0.316cm" svg:x="-25.484cm" svg:y="92.547cm" svg:viewBox="0 0 317 317" svg:d="M0 0c106 53 211 106 317 159-106 53-211 105-317 158 0-106 0-211 0-317z">
          <text:p/>
        </draw:path>
        <draw:path draw:style-name="gr580" draw:text-style-name="P174"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1"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2" draw:text-style-name="P171"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2" draw:text-style-name="P171" draw:layer="layout" svg:width="0.32cm" svg:height="0.046cm" svg:x="-25.287cm" svg:y="93.431cm" svg:viewBox="0 0 321 47" svg:d="M0 47c0-16 0-31 0-47 107 0 214 0 321 0 0 16 0 31 0 47-107 0-214 0-321 0z">
          <text:p/>
        </draw:path>
        <draw:g draw:style-name="gr23">
          <draw:path draw:style-name="gr583" draw:text-style-name="P171"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3" draw:text-style-name="P171"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3" draw:text-style-name="P171"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3" draw:text-style-name="P171"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3" draw:text-style-name="P171"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3" draw:text-style-name="P171" draw:layer="layout" svg:width="0.123cm" svg:height="0.266cm" svg:x="-23.015cm" svg:y="89.987cm" svg:viewBox="0 0 124 267" svg:d="M2 267v-201c0-19-1-39-2-61h41c2 30 2 48 2 54h1c7-23 15-39 24-47 9-7 22-12 39-12 5 0 11 1 17 2v41c-5-2-14-3-23-3-18 0-32 8-42 23-9 16-14 38-14 68v136z">
            <text:p/>
          </draw:path>
          <draw:path draw:style-name="gr583" draw:text-style-name="P171"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3" draw:text-style-name="P171"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4" draw:text-style-name="P171"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4" draw:text-style-name="P171" draw:layer="layout" svg:width="0.123cm" svg:height="0.266cm" svg:x="-23.696cm" svg:y="90.683cm" svg:viewBox="0 0 124 267" svg:d="M2 267v-201c0-19-1-39-2-61h41c2 30 2 48 2 54h1c7-23 15-39 24-47 9-7 22-12 39-12 5 0 11 1 17 2v41c-5-2-14-3-23-3-18 0-32 8-42 23-9 16-14 38-14 68v136z">
            <text:p/>
          </draw:path>
          <draw:path draw:style-name="gr584" draw:text-style-name="P171" draw:layer="layout" svg:width="0.123cm" svg:height="0.266cm" svg:x="-23.531cm" svg:y="90.683cm" svg:viewBox="0 0 124 267" svg:d="M2 267v-201c0-19-1-39-2-61h41c2 30 2 48 2 54h1c7-23 15-39 24-47 9-7 22-12 39-12 5 0 11 1 17 2v41c-5-2-14-3-23-3-18 0-32 8-42 23-9 16-14 38-14 68v136z">
            <text:p/>
          </draw:path>
          <draw:path draw:style-name="gr584" draw:text-style-name="P171"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4" draw:text-style-name="P171"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5" draw:text-style-name="P172"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5" draw:text-style-name="P172" draw:layer="layout" svg:width="0.205cm" svg:height="0.517cm" svg:x="-23.721cm" svg:y="91.749cm" svg:viewBox="0 0 206 518" svg:d="M206 0c-105 92-157 203-157 332 0 70 19 132 56 186h-47c-39-54-58-117-58-191 0-67 14-128 41-184 27-55 66-103 118-143z">
            <text:p/>
          </draw:path>
          <draw:path draw:style-name="gr585" draw:text-style-name="P172"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5" draw:text-style-name="P172" draw:layer="layout" svg:width="0.205cm" svg:height="0.517cm" svg:x="-23.462cm" svg:y="91.749cm" svg:viewBox="0 0 206 518" svg:d="M0 518c105-92 157-203 157-332 0-70-19-132-56-186h47c39 54 58 117 58 191 0 67-14 128-41 184-27 55-66 103-118 143z">
            <text:p/>
          </draw:path>
        </draw:g>
        <draw:path draw:style-name="gr578" draw:text-style-name="P5" draw:layer="layout" svg:width="1.904cm" svg:height="0cm" svg:x="-24.161cm" svg:y="92.706cm" svg:viewBox="0 0 1905 0" svg:d="M0 0c635 0 1270 0 1905 0">
          <text:p/>
        </draw:path>
        <draw:path draw:style-name="gr579" draw:text-style-name="P173" draw:layer="layout" svg:width="0.317cm" svg:height="0.316cm" svg:x="-22.521cm" svg:y="92.547cm" svg:viewBox="0 0 318 317" svg:d="M0 0c106 53 212 106 318 159-106 53-212 105-318 158 0-106 0-211 0-317z">
          <text:p/>
        </draw:path>
        <draw:path draw:style-name="gr579" draw:text-style-name="P173" draw:layer="layout" svg:width="0.317cm" svg:height="0.316cm" svg:x="-22.521cm" svg:y="92.547cm" svg:viewBox="0 0 318 317" svg:d="M0 0c106 53 212 106 318 159-106 53-212 105-318 158 0-106 0-211 0-317z">
          <text:p/>
        </draw:path>
        <draw:path draw:style-name="gr586" draw:text-style-name="P175" draw:layer="layout" svg:width="4.629cm" svg:height="1.772cm" svg:x="-22.15cm" svg:y="91.595cm" svg:viewBox="0 0 4630 1773" svg:d="M0 0c1543 0 3087 0 4630 0 0 591 0 1182 0 1773-1543 0-3087 0-4630 0 0-591 0-1182 0-1773z">
          <text:p/>
        </draw:path>
        <draw:path draw:style-name="gr587" draw:text-style-name="P176" draw:layer="layout" svg:width="4.629cm" svg:height="1.772cm" svg:x="-22.15cm" svg:y="91.595cm" svg:viewBox="0 0 4630 1773" svg:d="M0 0c1543 0 3087 0 4630 0 0 591 0 1182 0 1773-1543 0-3087 0-4630 0 0-591 0-1182 0-1773z">
          <text:p/>
        </draw:path>
        <draw:g draw:style-name="gr23">
          <draw:path draw:style-name="gr588" draw:text-style-name="P177"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8" draw:text-style-name="P177"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8" draw:text-style-name="P177"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8" draw:text-style-name="P177" draw:layer="layout" svg:width="0.183cm" svg:height="0.471cm" svg:x="-20.2cm" svg:y="92.303cm" svg:viewBox="0 0 184 472" svg:d="M184 463c-21 6-42 9-64 9-51 0-76-30-76-87v-254h-44v-45h47l18-86h42v86h71v45h-71v240c0 19 3 32 10 39 6 7 15 11 31 11 8 0 20-1 36-5z">
            <text:p/>
          </draw:path>
          <draw:path draw:style-name="gr588" draw:text-style-name="P177" draw:layer="layout" svg:width="0.179cm" svg:height="0.387cm" svg:x="-19.962cm" svg:y="92.381cm" svg:viewBox="0 0 180 388" svg:d="M2 388v-293c0-26-1-55-2-88h60c1 44 2 69 2 78h2c10-32 22-55 35-67s31-18 56-18c8 0 16 1 25 4v57c-8-2-20-3-33-3-26 0-47 11-60 34-15 23-22 55-22 98v198z">
            <text:p/>
          </draw:path>
          <draw:path draw:style-name="gr588" draw:text-style-name="P177"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8" draw:text-style-name="P177" draw:layer="layout" svg:width="0.062cm" svg:height="0.522cm" svg:x="-19.321cm" svg:y="92.247cm" svg:viewBox="0 0 63 523" svg:d="M0 523c0-175 0-349 0-523 21 0 42 0 63 0 0 174 0 348 0 523-21 0-42 0-63 0z">
            <text:p/>
          </draw:path>
          <draw:path draw:style-name="gr588" draw:text-style-name="P177" draw:layer="layout" svg:width="0.062cm" svg:height="0.522cm" svg:x="-19.161cm" svg:y="92.247cm" svg:viewBox="0 0 63 523" svg:d="M0 523c0-175 0-349 0-523 21 0 42 0 63 0 0 174 0 348 0 523-21 0-42 0-63 0z">
            <text:p/>
          </draw:path>
          <draw:path draw:style-name="gr588" draw:text-style-name="P177"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8" draw:text-style-name="P177"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9" draw:text-style-name="P171"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9" draw:text-style-name="P171"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9" draw:text-style-name="P171"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9" draw:text-style-name="P171" draw:layer="layout" svg:width="0.113cm" svg:height="0.29cm" svg:x="-16.968cm" svg:y="90.242cm" svg:viewBox="0 0 114 291" svg:d="M114 286c-13 3-27 5-40 5-31 0-47-18-47-53v-157h-27v-29h29l11-52h26v52h44v29h-44v148c0 12 2 20 6 24 3 4 10 7 19 7 5 0 12-1 23-3z">
            <text:p/>
          </draw:path>
          <draw:path draw:style-name="gr589" draw:text-style-name="P171" draw:layer="layout" svg:width="0.11cm" svg:height="0.238cm" svg:x="-16.821cm" svg:y="90.291cm" svg:viewBox="0 0 111 239" svg:d="M1 239v-180c0-17 0-35-1-55h37c1 27 1 43 1 48h2c6-20 13-34 21-41s20-11 34-11c5 0 10 1 16 2v36c-5-2-12-2-21-2-16 0-28 7-37 20-9 15-13 35-13 61v122z">
            <text:p/>
          </draw:path>
          <draw:path draw:style-name="gr589" draw:text-style-name="P171"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9" draw:text-style-name="P171" draw:layer="layout" svg:width="0.038cm" svg:height="0.321cm" svg:x="-16.426cm" svg:y="90.208cm" svg:viewBox="0 0 39 322" svg:d="M0 322c0-107 0-215 0-322 13 0 26 0 39 0 0 107 0 215 0 322-13 0-26 0-39 0z">
            <text:p/>
          </draw:path>
          <draw:path draw:style-name="gr589" draw:text-style-name="P171" draw:layer="layout" svg:width="0.038cm" svg:height="0.321cm" svg:x="-16.328cm" svg:y="90.208cm" svg:viewBox="0 0 39 322" svg:d="M0 322c0-107 0-215 0-322 13 0 26 0 39 0 0 107 0 215 0 322-13 0-26 0-39 0z">
            <text:p/>
          </draw:path>
          <draw:path draw:style-name="gr589" draw:text-style-name="P171"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9" draw:text-style-name="P171" draw:layer="layout" svg:width="0.11cm" svg:height="0.238cm" svg:x="-15.983cm" svg:y="90.291cm" svg:viewBox="0 0 111 239" svg:d="M1 239v-180c0-17 0-35-1-55h37c1 27 1 43 1 48h2c6-20 13-34 21-41s20-11 34-11c5 0 10 1 16 2v36c-5-2-12-2-21-2-16 0-28 7-37 20-9 15-13 35-13 61v122z">
            <text:p/>
          </draw:path>
          <draw:path draw:style-name="gr590" draw:text-style-name="P171"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90" draw:text-style-name="P171"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90" draw:text-style-name="P171" draw:layer="layout" svg:width="0.113cm" svg:height="0.29cm" svg:x="-16.887cm" svg:y="90.864cm" svg:viewBox="0 0 114 291" svg:d="M114 286c-13 3-27 5-40 5-31 0-47-18-47-53v-157h-27v-29h29l11-52h26v52h44v29h-44v148c0 12 2 20 6 24 3 4 10 7 19 7 5 0 12-1 23-3z">
            <text:p/>
          </draw:path>
          <draw:path draw:style-name="gr590" draw:text-style-name="P171"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90" draw:text-style-name="P171"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90" draw:text-style-name="P171" draw:layer="layout" svg:width="0.113cm" svg:height="0.29cm" svg:x="-16.27cm" svg:y="90.864cm" svg:viewBox="0 0 114 291" svg:d="M114 286c-13 3-27 5-40 5-31 0-47-18-47-53v-157h-27v-29h29l11-52h26v52h44v29h-44v148c0 12 2 20 6 24 3 4 10 7 19 7 5 0 12-1 23-3z">
            <text:p/>
          </draw:path>
        </draw:g>
        <draw:path draw:style-name="gr585" draw:text-style-name="P172"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5" draw:text-style-name="P172" draw:layer="layout" svg:width="0.205cm" svg:height="0.517cm" svg:x="-16.895cm" svg:y="91.749cm" svg:viewBox="0 0 206 518" svg:d="M206 0c-105 92-157 203-157 332 0 70 19 132 56 186h-47c-39-54-58-117-58-191 0-67 14-128 41-184 27-55 66-103 118-143z">
          <text:p/>
        </draw:path>
        <draw:path draw:style-name="gr585" draw:text-style-name="P172"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5" draw:text-style-name="P172" draw:layer="layout" svg:width="0.205cm" svg:height="0.517cm" svg:x="-16.636cm" svg:y="91.749cm" svg:viewBox="0 0 206 518" svg:d="M0 518c105-92 157-203 157-332 0-70-19-132-56-186h47c39 54 58 117 58 191 0 67-14 128-41 184-27 55-66 103-118 143z">
          <text:p/>
        </draw:path>
        <draw:path draw:style-name="gr578" draw:text-style-name="P5" draw:layer="layout" svg:width="1.692cm" svg:height="0cm" svg:x="-17.52cm" svg:y="92.706cm" svg:viewBox="0 0 1693 0" svg:d="M0 0c564 0 1129 0 1693 0">
          <text:p/>
        </draw:path>
        <draw:path draw:style-name="gr579" draw:text-style-name="P173" draw:layer="layout" svg:width="0.317cm" svg:height="0.316cm" svg:x="-16.092cm" svg:y="92.547cm" svg:viewBox="0 0 318 317" svg:d="M0 0c106 53 212 106 318 159-106 53-212 105-318 158 0-106 0-211 0-317z">
          <text:p/>
        </draw:path>
        <draw:path draw:style-name="gr579" draw:text-style-name="P173" draw:layer="layout" svg:width="0.317cm" svg:height="0.316cm" svg:x="-16.092cm" svg:y="92.547cm" svg:viewBox="0 0 318 317" svg:d="M0 0c106 53 212 106 318 159-106 53-212 105-318 158 0-106 0-211 0-317z">
          <text:p/>
        </draw:path>
        <draw:path draw:style-name="gr579" draw:text-style-name="P173" draw:layer="layout" svg:width="0.317cm" svg:height="0.316cm" svg:x="-16.092cm" svg:y="92.547cm" svg:viewBox="0 0 318 317" svg:d="M0 0c106 53 212 106 318 159-106 53-212 105-318 158 0-106 0-211 0-317z">
          <text:p/>
        </draw:path>
        <draw:path draw:style-name="gr591" draw:text-style-name="P178" draw:layer="layout" svg:width="4.1cm" svg:height="1.772cm" svg:x="-15.721cm" svg:y="91.595cm" svg:viewBox="0 0 4101 1773" svg:d="M0 0c1367 0 2734 0 4101 0 0 591 0 1182 0 1773-1367 0-2734 0-4101 0 0-591 0-1182 0-1773z">
          <text:p/>
        </draw:path>
        <draw:path draw:style-name="gr592" draw:text-style-name="P179" draw:layer="layout" svg:width="4.1cm" svg:height="1.772cm" svg:x="-15.721cm" svg:y="91.595cm" svg:viewBox="0 0 4101 1773" svg:d="M0 0c1367 0 2734 0 4101 0 0 591 0 1182 0 1773-1367 0-2734 0-4101 0 0-591 0-1182 0-1773z">
          <text:p/>
        </draw:path>
        <draw:g draw:style-name="gr23">
          <draw:path draw:style-name="gr593" draw:text-style-name="P177" draw:layer="layout" svg:width="0.43cm" svg:height="0.447cm" svg:x="-14.995cm" svg:y="92.224cm" svg:viewBox="0 0 431 448" svg:d="M370 448l-51-131h-205l-51 131h-63l183-448h69l179 448zM216 46l-3 8c-5 18-13 41-23 68l-57 148h167l-58-148c-5-15-11-32-17-50z">
            <text:p/>
          </draw:path>
          <draw:path draw:style-name="gr593" draw:text-style-name="P177"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3" draw:text-style-name="P177" draw:layer="layout" svg:width="0.165cm" svg:height="0.425cm" svg:x="-14.227cm" svg:y="92.251cm" svg:viewBox="0 0 166 426" svg:d="M166 418c-18 5-38 8-58 8-46 0-68-26-68-78v-229h-40v-42h42l17-77h38v77h64v42h-64v216c0 17 2 29 8 36 6 6 14 9 28 9 8 0 19-1 33-4z">
            <text:p/>
          </draw:path>
          <draw:path draw:style-name="gr593" draw:text-style-name="P177"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3" draw:text-style-name="P177"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3" draw:text-style-name="P177" draw:layer="layout" svg:width="0.165cm" svg:height="0.425cm" svg:x="-13.322cm" svg:y="92.251cm" svg:viewBox="0 0 166 426" svg:d="M166 418c-18 5-38 8-58 8-46 0-68-26-68-78v-229h-40v-42h42l17-77h38v77h64v42h-64v216c0 17 2 29 8 36 6 6 14 9 28 9 8 0 19-1 33-4z">
            <text:p/>
          </draw:path>
          <draw:path draw:style-name="gr593" draw:text-style-name="P177"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3" draw:text-style-name="P177"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4" draw:text-style-name="P171"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4" draw:text-style-name="P171"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4" draw:text-style-name="P171"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4" draw:text-style-name="P171" draw:layer="layout" svg:width="0.125cm" svg:height="0.322cm" svg:x="-10.922cm" svg:y="90.298cm" svg:viewBox="0 0 126 323" svg:d="M126 317c-14 4-29 6-44 6-34 0-52-19-52-59v-174h-30v-32h32l13-58h28v58h49v32h-49v165c0 12 2 21 7 27 4 4 11 7 21 7 6 0 14-1 25-4z">
            <text:p/>
          </draw:path>
          <draw:path draw:style-name="gr594" draw:text-style-name="P171"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4" draw:text-style-name="P171"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4" draw:text-style-name="P171" draw:layer="layout" svg:width="0.045cm" svg:height="0.339cm" svg:x="-11.43cm" svg:y="90.97cm" svg:viewBox="0 0 46 340" svg:d="M0 340c0-114 0-226 0-340 16 0 31 0 46 0 0 114 0 226 0 340-15 0-30 0-46 0z">
            <text:p/>
          </draw:path>
          <draw:path draw:style-name="gr584" draw:text-style-name="P171"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4" draw:text-style-name="P171"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4" draw:text-style-name="P171"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4" draw:text-style-name="P171" draw:layer="layout" svg:width="0.125cm" svg:height="0.322cm" svg:x="-10.509cm" svg:y="90.99cm" svg:viewBox="0 0 126 323" svg:d="M126 317c-14 4-29 6-44 6-34 0-52-19-52-59v-174h-30v-32h32l13-58h28v58h49v32h-49v165c0 12 2 21 7 27 4 4 11 7 21 7 6 0 14-1 25-4z">
            <text:p/>
          </draw:path>
        </draw:g>
        <draw:path draw:style-name="gr595" draw:text-style-name="P172"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6" draw:text-style-name="P180"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7" draw:text-style-name="P172" draw:layer="layout" svg:width="0.205cm" svg:height="0.517cm" svg:x="-10.775cm" svg:y="91.749cm" svg:viewBox="0 0 206 518" svg:d="M206 0c-105 92-157 203-157 332 0 70 19 132 56 186h-47c-39-54-58-117-58-191 0-67 14-128 41-184 27-55 66-103 118-143z">
          <text:p/>
        </draw:path>
        <draw:path draw:style-name="gr597" draw:text-style-name="P172"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7" draw:text-style-name="P172" draw:layer="layout" svg:width="0.205cm" svg:height="0.517cm" svg:x="-10.516cm" svg:y="91.749cm" svg:viewBox="0 0 206 518" svg:d="M0 518c105-92 157-203 157-332 0-70-19-132-56-186h47c39 54 58 117 58 191 0 67-14 128-41 184-27 55-66 103-118 143z">
          <text:p/>
        </draw:path>
        <draw:path draw:style-name="gr578" draw:text-style-name="P5" draw:layer="layout" svg:width="2.3cm" svg:height="0cm" svg:x="-11.621cm" svg:y="92.706cm" svg:viewBox="0 0 2301 0" svg:d="M0 0c767 0 1534 0 2301 0">
          <text:p/>
        </draw:path>
        <draw:path draw:style-name="gr579" draw:text-style-name="P173" draw:layer="layout" svg:width="0.316cm" svg:height="0.316cm" svg:x="-9.584cm" svg:y="92.547cm" svg:viewBox="0 0 317 317" svg:d="M0 0c106 53 211 106 317 159-106 53-211 105-317 158 0-106 0-211 0-317z">
          <text:p/>
        </draw:path>
        <draw:path draw:style-name="gr579" draw:text-style-name="P173" draw:layer="layout" svg:width="0.316cm" svg:height="0.316cm" svg:x="-9.584cm" svg:y="92.547cm" svg:viewBox="0 0 317 317" svg:d="M0 0c106 53 211 106 317 159-106 53-211 105-317 158 0-106 0-211 0-317z">
          <text:p/>
        </draw:path>
        <draw:path draw:style-name="gr579" draw:text-style-name="P173" draw:layer="layout" svg:width="0.316cm" svg:height="0.316cm" svg:x="-9.584cm" svg:y="92.547cm" svg:viewBox="0 0 317 317" svg:d="M0 0c106 53 211 106 317 159-106 53-211 105-317 158 0-106 0-211 0-317z">
          <text:p/>
        </draw:path>
        <draw:path draw:style-name="gr579" draw:text-style-name="P173" draw:layer="layout" svg:width="0.316cm" svg:height="0.316cm" svg:x="-9.584cm" svg:y="92.547cm" svg:viewBox="0 0 317 317" svg:d="M0 0c106 53 211 106 317 159-106 53-211 105-317 158 0-106 0-211 0-317z">
          <text:p/>
        </draw:path>
        <draw:g draw:style-name="gr23">
          <draw:path draw:style-name="gr598" draw:text-style-name="P171"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8" draw:text-style-name="P171" draw:layer="layout" svg:width="0.049cm" svg:height="0.357cm" svg:x="-9.082cm" svg:y="88.46cm" svg:viewBox="0 0 50 358" svg:d="M0 42c0-14 0-28 0-42 16 0 33 0 50 0 0 14 0 28 0 42-17 0-34 0-50 0zM0 358c0-88 0-174 0-261 16 0 33 0 50 0 0 87 0 173 0 261-17 0-34 0-50 0z">
            <text:p/>
          </draw:path>
          <draw:path draw:style-name="gr598" draw:text-style-name="P171"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8" draw:text-style-name="P171" draw:layer="layout" svg:width="0.144cm" svg:height="0.322cm" svg:x="-8.703cm" svg:y="88.498cm" svg:viewBox="0 0 145 323" svg:d="M145 317c-17 3-34 6-51 6-39 0-60-20-60-59v-175h-34v-31h37l14-58h33v58h56v31h-56v165c0 13 3 22 8 27 4 4 12 7 24 7 6 0 16-1 29-3z">
            <text:p/>
          </draw:path>
          <draw:path draw:style-name="gr598" draw:text-style-name="P171"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8" draw:text-style-name="P171" draw:layer="layout" svg:width="0.14cm" svg:height="0.264cm" svg:x="-8.202cm" svg:y="88.552cm" svg:viewBox="0 0 141 265" svg:d="M2 265v-199c0-19-1-39-2-62h47c2 30 2 48 2 54h2c7-22 17-38 27-46s25-12 44-12c6 0 12 1 19 2v40c-6-2-15-3-26-3-21 0-36 9-47 24s-17 38-17 67v135z">
            <text:p/>
          </draw:path>
          <draw:path draw:style-name="gr598" draw:text-style-name="P171"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8" draw:text-style-name="P171"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8" draw:text-style-name="P171"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8" draw:text-style-name="P171"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8" draw:text-style-name="P171"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5" draw:text-style-name="P172"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5" draw:text-style-name="P172" draw:layer="layout" svg:width="0.205cm" svg:height="0.517cm" svg:x="-7.61cm" svg:y="89.765cm" svg:viewBox="0 0 206 518" svg:d="M206 0c-105 92-157 203-157 332 0 70 19 132 56 186h-47c-39-54-58-117-58-191 0-67 14-128 41-184 27-55 66-103 118-143z">
          <text:p/>
        </draw:path>
        <draw:path draw:style-name="gr585" draw:text-style-name="P172"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5" draw:text-style-name="P172" draw:layer="layout" svg:width="0.205cm" svg:height="0.517cm" svg:x="-7.351cm" svg:y="89.765cm" svg:viewBox="0 0 206 518" svg:d="M0 518c105-92 157-203 157-332 0-70-19-132-56-186h47c39 54 58 117 58 191 0 67-14 128-41 184-27 55-66 103-118 143z">
          <text:p/>
        </draw:path>
        <draw:path draw:style-name="gr599" draw:text-style-name="P5" draw:layer="layout" svg:width="2.3cm" svg:height="0cm" draw:transform="rotate (-1.5707963267949) translate (-8.0757565784782cm 89.0559062241644cm)" svg:viewBox="0 0 2301 0" svg:d="M0 0c767 0 1534 0 2301 0">
          <text:p/>
        </draw:path>
        <draw:path draw:style-name="gr600" draw:text-style-name="P181" draw:layer="layout" svg:width="0.317cm" svg:height="0.316cm" svg:x="-8.235cm" svg:y="91.093cm" svg:viewBox="0 0 318 317" svg:d="M318 0c-53 106-106 211-159 317-53-106-106-211-159-317 106 0 212 0 318 0z">
          <text:p/>
        </draw:path>
        <draw:path draw:style-name="gr601" draw:text-style-name="P182" draw:layer="layout" svg:width="4.497cm" svg:height="1.772cm" svg:x="-9.214cm" svg:y="91.595cm" svg:viewBox="0 0 4498 1773" svg:d="M0 0c1499 0 2999 0 4498 0 0 591 0 1182 0 1773-1499 0-2999 0-4498 0 0-591 0-1182 0-1773z">
          <text:p/>
        </draw:path>
        <draw:path draw:style-name="gr602" draw:text-style-name="P183" draw:layer="layout" svg:width="4.497cm" svg:height="1.772cm" svg:x="-9.214cm" svg:y="91.595cm" svg:viewBox="0 0 4498 1773" svg:d="M0 0c1499 0 2999 0 4498 0 0 591 0 1182 0 1773-1499 0-2999 0-4498 0 0-591 0-1182 0-1773z">
          <text:p/>
        </draw:path>
        <draw:path draw:style-name="gr603" draw:text-style-name="P172"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3" draw:text-style-name="P172" draw:layer="layout" svg:width="0.205cm" svg:height="0.517cm" svg:x="-4.175cm" svg:y="91.749cm" svg:viewBox="0 0 206 518" svg:d="M206 0c-105 92-157 203-157 332 0 70 19 132 56 186h-47c-39-54-58-117-58-191 0-67 14-128 41-184 27-55 66-103 118-143z">
          <text:p/>
        </draw:path>
        <draw:path draw:style-name="gr603" draw:text-style-name="P172"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3" draw:text-style-name="P172" draw:layer="layout" svg:width="0.205cm" svg:height="0.517cm" svg:x="-3.916cm" svg:y="91.749cm" svg:viewBox="0 0 206 518" svg:d="M0 518c105-92 157-203 157-332 0-70-19-132-56-186h47c39 54 58 117 58 191 0 67-14 128-41 184-27 55-66 103-118 143z">
          <text:p/>
        </draw:path>
        <draw:path draw:style-name="gr578" draw:text-style-name="P5" draw:layer="layout" svg:width="3.095cm" svg:height="0cm" svg:x="-4.716cm" svg:y="92.706cm" svg:viewBox="0 0 3096 0" svg:d="M0 0c1032 0 2064 0 3096 0">
          <text:p/>
        </draw:path>
        <draw:path draw:style-name="gr579" draw:text-style-name="P173" draw:layer="layout" svg:width="0.317cm" svg:height="0.316cm" svg:x="-1.885cm" svg:y="92.547cm" svg:viewBox="0 0 318 317" svg:d="M0 0c106 53 212 106 318 159-106 53-212 105-318 158 0-106 0-211 0-317z">
          <text:p/>
        </draw:path>
        <draw:path draw:style-name="gr579" draw:text-style-name="P173" draw:layer="layout" svg:width="0.317cm" svg:height="0.316cm" svg:x="-1.885cm" svg:y="92.547cm" svg:viewBox="0 0 318 317" svg:d="M0 0c106 53 212 106 318 159-106 53-212 105-318 158 0-106 0-211 0-317z">
          <text:p/>
        </draw:path>
        <draw:path draw:style-name="gr579" draw:text-style-name="P173" draw:layer="layout" svg:width="0.317cm" svg:height="0.316cm" svg:x="-1.885cm" svg:y="92.547cm" svg:viewBox="0 0 318 317" svg:d="M0 0c106 53 212 106 318 159-106 53-212 105-318 158 0-106 0-211 0-317z">
          <text:p/>
        </draw:path>
        <draw:path draw:style-name="gr579" draw:text-style-name="P173" draw:layer="layout" svg:width="0.317cm" svg:height="0.316cm" svg:x="-1.885cm" svg:y="92.547cm" svg:viewBox="0 0 318 317" svg:d="M0 0c106 53 212 106 318 159-106 53-212 105-318 158 0-106 0-211 0-317z">
          <text:p/>
        </draw:path>
        <draw:path draw:style-name="gr579" draw:text-style-name="P173" draw:layer="layout" svg:width="0.317cm" svg:height="0.316cm" svg:x="-1.885cm" svg:y="92.547cm" svg:viewBox="0 0 318 317" svg:d="M0 0c106 53 212 106 318 159-106 53-212 105-318 158 0-106 0-211 0-317z">
          <text:p/>
        </draw:path>
        <draw:path draw:style-name="gr578" draw:text-style-name="P5" draw:layer="layout" svg:width="7.169cm" svg:height="2.406cm" svg:x="-10.272cm" svg:y="92.706cm" svg:viewBox="0 0 7170 2407" svg:d="M7170 0c0 802 0 1604 0 2407-2390 0-4780 0-7170 0">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604" draw:text-style-name="P184" draw:layer="layout" svg:width="5.185cm" svg:height="1.533cm" svg:x="-15.536cm" svg:y="94.346cm" svg:viewBox="0 0 5186 1534" svg:d="M0 0c1729 0 3457 0 5186 0 0 511 0 1023 0 1534-1729 0-3457 0-5186 0 0-511 0-1023 0-1534z">
          <text:p/>
        </draw:path>
        <draw:path draw:style-name="gr605" draw:text-style-name="P185" draw:layer="layout" svg:width="5.185cm" svg:height="1.533cm" svg:x="-15.536cm" svg:y="94.346cm" svg:viewBox="0 0 5186 1534" svg:d="M0 0c1729 0 3457 0 5186 0 0 511 0 1023 0 1534-1729 0-3457 0-5186 0 0-511 0-1023 0-1534z">
          <text:p/>
        </draw:path>
        <draw:g draw:style-name="gr23">
          <draw:path draw:style-name="gr606" draw:text-style-name="P177"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6" draw:text-style-name="P177"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6" draw:text-style-name="P177"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6" draw:text-style-name="P177"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6" draw:text-style-name="P177"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6" draw:text-style-name="P177" draw:layer="layout" svg:width="0.184cm" svg:height="0.398cm" svg:x="-12.073cm" svg:y="94.987cm" svg:viewBox="0 0 185 399" svg:d="M2 399v-301c0-27-1-57-2-91h62c1 45 2 71 2 80h2c10-33 22-56 36-69 13-12 32-18 57-18 9 0 17 1 26 4v59c-8-2-20-3-34-3-27 0-48 11-62 35-15 23-22 56-22 100v204z">
            <text:p/>
          </draw:path>
        </draw:g>
        <draw:path draw:style-name="gr578" draw:text-style-name="P5" draw:layer="layout" svg:width="9.127cm" svg:height="1.904cm" svg:x="-24.664cm" svg:y="93.208cm" svg:viewBox="0 0 9128 1905" svg:d="M9128 1905c-3043 0-6085 0-9128 0 0-635 0-1270 0-1905">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g draw:style-name="gr23">
          <draw:path draw:style-name="gr607" draw:text-style-name="P171"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7" draw:text-style-name="P171"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7" draw:text-style-name="P171"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7" draw:text-style-name="P171"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7" draw:text-style-name="P171"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1" draw:layer="layout" svg:width="0.116cm" svg:height="0.25cm" svg:x="-20.632cm" svg:y="94.666cm" svg:viewBox="0 0 117 251" svg:d="M1 251v-189c0-17 0-37-1-58h39c1 28 1 45 1 51h2c6-21 14-36 22-44 9-7 21-11 36-11 5 0 11 1 17 2v38c-5-2-13-3-22-3-17 0-30 8-39 22-9 15-14 36-14 64v128z">
            <text:p/>
          </draw:path>
          <draw:path draw:style-name="gr607" draw:text-style-name="P171"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7" draw:text-style-name="P171"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7" draw:text-style-name="P171"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7" draw:text-style-name="P171"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1" draw:layer="layout" svg:width="0.118cm" svg:height="0.305cm" svg:x="-19.23cm" svg:y="94.615cm" svg:viewBox="0 0 119 306" svg:d="M119 300c-13 4-27 6-41 6-33 0-50-19-50-56v-165h-28v-30h30l12-55h27v55h46v30h-46v156c0 12 2 20 7 25 3 5 10 7 19 7 6 0 14-1 24-3z">
            <text:p/>
          </draw:path>
          <draw:path draw:style-name="gr607" draw:text-style-name="P171"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7" draw:text-style-name="P171"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1" draw:layer="layout" svg:width="0.118cm" svg:height="0.305cm" svg:x="-18.581cm" svg:y="94.615cm" svg:viewBox="0 0 119 306" svg:d="M119 300c-13 4-27 6-41 6-33 0-50-19-50-56v-165h-28v-30h30l12-55h27v55h46v30h-46v156c0 12 2 20 7 25 3 5 10 7 19 7 6 0 14-1 24-3z">
            <text:p/>
          </draw:path>
        </draw:g>
        <draw:path draw:style-name="gr608" draw:text-style-name="P172"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9" draw:text-style-name="P180"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7" draw:text-style-name="P172" draw:layer="layout" svg:width="0.205cm" svg:height="0.517cm" svg:x="-19.717cm" svg:y="95.399cm" svg:viewBox="0 0 206 518" svg:d="M206 0c-105 92-157 203-157 332 0 70 19 132 56 186h-47c-39-54-58-117-58-191 0-67 14-128 41-184 27-55 66-103 118-143z">
          <text:p/>
        </draw:path>
        <draw:path draw:style-name="gr597" draw:text-style-name="P172"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7" draw:text-style-name="P172" draw:layer="layout" svg:width="0.205cm" svg:height="0.517cm" svg:x="-19.458cm" svg:y="95.399cm" svg:viewBox="0 0 206 518" svg:d="M0 518c105-92 157-203 157-332 0-70-19-132-56-186h47c39 54 58 117 58 191 0 67-14 128-41 184-27 55-66 103-118 143z">
          <text:p/>
        </draw:path>
        <draw:frame draw:style-name="gr610" draw:text-style-name="P186" draw:layer="layout" svg:width="2.196cm" svg:height="0.962cm" svg:x="-8.062cm" svg:y="91.966cm">
          <draw:text-box>
            <text:p><text:span text:style-name="T57">Robot</text:span></text:p>
          </draw:text-box>
        </draw:frame>
        <draw:g draw:style-name="gr31">
          <draw:custom-shape draw:style-name="gr611" draw:text-style-name="P41" xml:id="id480" draw:id="id480"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2" draw:text-style-name="P126" xml:id="id481" draw:id="id481" draw:layer="layout" svg:width="4.644cm" svg:height="2.896cm" svg:x="-17.653cm" svg:y="101.617cm">
            <draw:text-box>
              <text:p text:style-name="P30"><text:span text:style-name="T58">Replace with</text:span><text:span text:style-name="T58"><text:line-break/></text:span><text:span text:style-name="T58">discrepancy value</text:span><text:span text:style-name="T58"><text:line-break/></text:span><text:span text:style-name="T58">(Wasserstein)</text:span><text:span text:style-name="T58"><text:line-break/></text:span><text:span text:style-name="T58">or</text:span><text:span text:style-name="T58"><text:line-break/></text:span><text:span text:style-name="T58">pose</text:span></text:p>
            </draw:text-box>
          </draw:frame>
          <draw:custom-shape draw:style-name="gr613" draw:text-style-name="P41" xml:id="id482" draw:id="id482"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4" draw:text-style-name="P15" draw:layer="layout" draw:type="curve" svg:x1="-16.375cm" svg:y1="100.902cm" svg:x2="-15.331cm" svg:y2="101.617cm" draw:start-shape="id480" draw:start-glue-point="6" draw:end-shape="id481" draw:end-glue-point="0" svg:d="M-16375 100902c0 537 1044 180 1044 715" svg:viewBox="0 0 1045 716">
            <text:p/>
          </draw:connector>
          <draw:connector draw:style-name="gr615" draw:text-style-name="P15" draw:layer="layout" draw:type="curve" svg:x1="-14.259cm" svg:y1="100.814cm" svg:x2="-15.331cm" svg:y2="101.617cm" draw:start-shape="id482" draw:start-glue-point="6" draw:end-shape="id481" draw:end-glue-point="0" svg:d="M-14259 100814c0 603-1072 202-1072 803" svg:viewBox="0 0 1073 804">
            <text:p/>
          </draw:connector>
          <draw:frame draw:style-name="gr616" draw:text-style-name="P38" draw:layer="layout" svg:width="4.869cm" svg:height="1.199cm" svg:x="-13.047cm" svg:y="100.641cm">
            <draw:text-box>
              <text:p>U<text:span text:style-name="T59">k is from the second derivative</text:span><text:span text:style-name="T59"><text:line-break/></text:span><text:span text:style-name="T59">(nu clustering is need for 2</text:span><text:span text:style-name="T60">nd</text:span><text:span text:style-name="T59"> derivative)</text:span></text:p>
            </draw:text-box>
          </draw:frame>
          <draw:frame draw:style-name="gr524"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84" draw:id="id484"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83"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84" draw:end-glue-point="0" svg:d="M86058 54174c0 2688 5083 897 5083 3583" svg:viewBox="0 0 5084 3584">
          <text:p/>
        </draw:connector>
        <draw:rect draw:style-name="gr41" draw:text-style-name="P5" xml:id="id485" draw:id="id485"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84" draw:start-glue-point="2" draw:end-shape="id485" draw:end-glue-point="0" svg:d="M91141 58757c0 1149-793 383-793 1532" svg:viewBox="0 0 794 1533">
          <text:p/>
        </draw:connector>
        <draw:rect draw:style-name="gr41" draw:text-style-name="P5" xml:id="id486" draw:id="id486"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84" draw:start-glue-point="2" draw:end-shape="id486" draw:end-glue-point="0" svg:d="M91141 58757c0 1146 2207 383 2207 1527" svg:viewBox="0 0 2208 1528">
          <text:p/>
        </draw:connector>
        <draw:rect draw:style-name="gr41" draw:text-style-name="P5" xml:id="id487" draw:id="id487"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6" draw:start-glue-point="2" draw:end-shape="id487" draw:end-glue-point="0" svg:d="M93348 62047c0 900 35 301 35 1199" svg:viewBox="0 0 36 1200">
          <text:p/>
        </draw:connector>
        <draw:connector draw:style-name="gr36" draw:text-style-name="P7" draw:layer="layout" draw:type="curve" svg:x1="-27.151cm" svg:y1="52.428cm" svg:x2="-25.649cm" svg:y2="51.138cm" draw:start-shape="id449" draw:start-glue-point="1" draw:end-shape="id488" draw:end-glue-point="3" svg:d="M-27151 52428c1128 0 377-1290 1502-1290" svg:viewBox="0 0 1503 1291">
          <text:p/>
        </draw:connector>
        <draw:custom-shape draw:name="comment box 1" draw:style-name="gr617" draw:text-style-name="P20" xml:id="id489" draw:id="id489"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8" draw:text-style-name="P133" xml:id="id490" draw:id="id490"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8" draw:text-style-name="P133" xml:id="id491" draw:id="id491"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9" draw:end-glue-point="7" svg:d="M-40740 44855c-1263 0-411 1998-1705 1998" svg:viewBox="0 0 1706 1999">
          <text:p/>
        </draw:connector>
        <draw:connector draw:style-name="gr36" draw:text-style-name="P7" draw:layer="layout" draw:type="curve" svg:x1="-30.852cm" svg:y1="52.421cm" svg:x2="-29.549cm" svg:y2="52.428cm" draw:start-shape="id490" draw:start-glue-point="10" draw:end-shape="id449" draw:end-glue-point="3" svg:d="M-30852 52421c979 0 328 7 1303 7" svg:viewBox="0 0 1304 8">
          <text:p/>
        </draw:connector>
        <draw:connector draw:style-name="gr36" draw:text-style-name="P7" draw:layer="layout" draw:type="curve" svg:x1="-34.652cm" svg:y1="52.421cm" svg:x2="-33.526cm" svg:y2="52.421cm" draw:start-shape="id491" draw:start-glue-point="10" draw:end-shape="id490" draw:end-glue-point="6" svg:d="M-34652 52421h1126" svg:viewBox="0 0 1127 1">
          <text:p/>
        </draw:connector>
        <draw:connector draw:style-name="gr36" draw:text-style-name="P7" draw:layer="layout" draw:type="curve" svg:x1="-38.234cm" svg:y1="52.389cm" svg:x2="-37.326cm" svg:y2="52.421cm" draw:start-shape="id492" draw:start-glue-point="10" draw:end-shape="id491" draw:end-glue-point="6" svg:d="M-38234 52389c682 0 229 32 908 32" svg:viewBox="0 0 909 33">
          <text:p/>
        </draw:connector>
        <draw:g draw:style-name="gr31">
          <draw:rect draw:style-name="gr619" draw:text-style-name="P187" draw:layer="layout" svg:width="19.38cm" svg:height="1.608cm" svg:x="-39.952cm" svg:y="59.066cm">
            <text:p/>
          </draw:rect>
          <draw:rect draw:style-name="gr620" draw:text-style-name="P188" draw:layer="layout" svg:width="18.349cm" svg:height="1.608cm" svg:x="-34.991cm" svg:y="59.066cm">
            <text:p/>
          </draw:rect>
          <draw:g draw:style-name="gr31">
            <draw:custom-shape draw:style-name="gr34" draw:text-style-name="P26" xml:id="id494" draw:id="id494" draw:layer="layout" svg:width="0.891cm" svg:height="0.97cm" svg:x="-34.648cm" svg:y="59.423cm">
              <text:p text:style-name="P25"><text:span text:style-name="T12">L</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3" draw:id="id493" draw:layer="layout" svg:width="0.891cm" svg:height="0.97cm" svg:x="-32.647cm" svg:y="59.423cm">
              <text:p text:style-name="P25"><text:span text:style-name="T12">L</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93" draw:start-glue-point="6" draw:end-shape="id494" draw:end-glue-point="10" svg:d="M-32647 59908h-1110" svg:viewBox="0 0 1111 1">
              <text:p/>
            </draw:connector>
            <draw:custom-shape draw:style-name="gr34" draw:text-style-name="P26" xml:id="id496" draw:id="id496" draw:layer="layout" svg:width="0.891cm" svg:height="0.97cm" svg:x="-30.648cm" svg:y="59.423cm">
              <text:p text:style-name="P25"><text:span text:style-name="T12">L</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5" draw:id="id495" draw:layer="layout" svg:width="0.891cm" svg:height="0.97cm" svg:x="-28.647cm" svg:y="59.423cm">
              <text:p text:style-name="P25"><text:span text:style-name="T12">L</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5" draw:start-glue-point="6" draw:end-shape="id496" draw:end-glue-point="10" svg:d="M-28647 59908h-1110" svg:viewBox="0 0 1111 1">
              <text:p/>
            </draw:connector>
            <draw:connector draw:style-name="gr36" draw:text-style-name="P7" draw:layer="layout" draw:type="curve" svg:x1="-30.648cm" svg:y1="59.908cm" svg:x2="-31.756cm" svg:y2="59.908cm" draw:start-shape="id496" draw:start-glue-point="6" draw:end-shape="id493" draw:end-glue-point="10" svg:d="M-30648 59908h-1108" svg:viewBox="0 0 1109 1">
              <text:p/>
            </draw:connector>
            <draw:custom-shape draw:style-name="gr34" draw:text-style-name="P26" xml:id="id498" draw:id="id498" draw:layer="layout" svg:width="0.891cm" svg:height="0.97cm" svg:x="-23.648cm" svg:y="59.423cm">
              <text:p text:style-name="P25"><text:span text:style-name="T12">L</text:span><text:span text:style-name="T13">t+q</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7" draw:id="id497" draw:layer="layout" svg:width="0.891cm" svg:height="0.97cm" svg:x="-21.647cm" svg:y="59.423cm">
              <text:p text:style-name="P25"><text:span text:style-name="T12">L</text:span><text:span text:style-name="T13">t+q</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7" draw:start-glue-point="6" draw:end-shape="id498"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L</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L</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9" draw:text-style-name="P15" draw:layer="layout" svg:x1="-39.972cm" svg:y1="60.96cm" svg:x2="-16.587cm" svg:y2="60.919cm">
            <text:p/>
          </draw:line>
          <draw:frame draw:style-name="gr621" draw:text-style-name="P189" draw:layer="layout" svg:width="8.791cm" svg:height="1.825cm" svg:x="-31.606cm" svg:y="60.852cm">
            <draw:text-box>
              <text:p text:style-name="P5"><text:span text:style-name="T61">Sliding window</text:span><text:span text:style-name="T61"><text:line-break/></text:span><text:span text:style-name="T61">for training transformers</text:span></text:p>
            </draw:text-box>
          </draw:frame>
          <draw:connector draw:style-name="gr622" draw:text-style-name="P15" draw:layer="layout" draw:type="line" svg:x1="-34.912cm" svg:y1="58.563cm" svg:x2="-20.638cm" svg:y2="58.597cm" svg:d="M-34912 58563l14274 34" svg:viewBox="0 0 14275 35">
            <text:p/>
          </draw:connector>
          <draw:connector draw:style-name="gr623" draw:text-style-name="P15" draw:layer="layout" draw:type="line" svg:x1="-39.939cm" svg:y1="58.963cm" svg:x2="-20.658cm" svg:y2="58.917cm" svg:d="M-39939 58963l19281-46" svg:viewBox="0 0 19282 47">
            <text:p/>
          </draw:connector>
          <draw:frame draw:style-name="gr624" draw:text-style-name="P190" draw:layer="layout" svg:width="4.037cm" svg:height="0.645cm" svg:x="-28.867cm" svg:y="58.006cm">
            <draw:text-box>
              <text:p><text:span text:style-name="T12">Overlap (with length q)</text:span></text:p>
            </draw:text-box>
          </draw:frame>
          <draw:connector draw:style-name="gr623" draw:text-style-name="P15" draw:layer="layout" draw:type="line" svg:x1="-34.925cm" svg:y1="58.773cm" svg:x2="-16.591cm" svg:y2="58.773cm" svg:d="M-34925 58773h18334" svg:viewBox="0 0 18335 1">
            <text:p/>
          </draw:connector>
          <draw:frame draw:style-name="gr625" draw:text-style-name="P190" draw:layer="layout" svg:width="1.264cm" svg:height="0.645cm" svg:x="-38.08cm" svg:y="58.292cm">
            <draw:text-box>
              <text:p><text:span text:style-name="T12">input</text:span></text:p>
            </draw:text-box>
          </draw:frame>
          <draw:frame draw:style-name="gr626" draw:text-style-name="P190" draw:layer="layout" svg:width="1.479cm" svg:height="0.645cm" svg:x="-19.38cm" svg:y="58.093cm">
            <draw:text-box>
              <text:p><text:span text:style-name="T12">output</text:span></text:p>
            </draw:text-box>
          </draw:frame>
          <draw:connector draw:style-name="gr622" draw:text-style-name="P15" draw:layer="layout" draw:type="line" svg:x1="-40.005cm" svg:y1="57.943cm" svg:x2="-20.638cm" svg:y2="57.998cm" svg:d="M-40005 57943l19367 55" svg:viewBox="0 0 19368 56">
            <text:p/>
          </draw:connector>
          <draw:frame draw:style-name="gr624" draw:text-style-name="P190" draw:layer="layout" svg:width="4.037cm" svg:height="0.645cm" svg:x="-32.467cm" svg:y="57.407cm">
            <draw:text-box>
              <text:p><text:span text:style-name="T12">Window length</text:span></text:p>
            </draw:text-box>
          </draw:frame>
        </draw:g>
        <draw:custom-shape draw:name="comment box 2" draw:style-name="gr627" draw:text-style-name="P20" xml:id="id499" draw:id="id499"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9" draw:end-glue-point="7" svg:d="M-13656 52577c0 1752-527 2627-1581 2627" svg:viewBox="0 0 1582 2628">
          <text:p/>
        </draw:connector>
        <draw:polygon draw:style-name="gr508" draw:text-style-name="P145" xml:id="id488" draw:id="id488" draw:layer="layout" svg:width="1.215cm" svg:height="1.383cm" svg:x="-25.649cm" svg:y="50.446cm" svg:viewBox="0 0 1216 1384" draw:points="1216,1384 0,971 0,325 1216,0">
          <text:p/>
        </draw:polygon>
        <draw:frame draw:style-name="gr628" draw:text-style-name="P191"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9" draw:id="id449"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8" draw:start-glue-point="1" draw:end-shape="id401" draw:end-glue-point="3" svg:d="M-24433 51138c1050 0 339 351 1423 351" svg:viewBox="0 0 1424 352">
          <text:p/>
        </draw:connector>
        <draw:frame draw:style-name="gr629" draw:text-style-name="P167" draw:layer="layout" svg:width="1.563cm" svg:height="1.039cm" svg:x="-43.704cm" svg:y="39.88cm">
          <draw:text-box>
            <text:p><text:span text:style-name="T53">GPS</text:span></text:p>
          </draw:text-box>
        </draw:frame>
        <draw:frame draw:style-name="gr630" draw:text-style-name="P167" draw:layer="layout" svg:width="1.587cm" svg:height="0.645cm" svg:x="-44.104cm" svg:y="41.381cm">
          <draw:text-box>
            <text:p><text:span text:style-name="T53">LIDAR</text:span></text:p>
          </draw:text-box>
        </draw:frame>
        <draw:frame draw:style-name="gr630" draw:text-style-name="P167" draw:layer="layout" svg:width="1.587cm" svg:height="0.645cm" svg:x="-43.603cm" svg:y="42.982cm">
          <draw:text-box>
            <text:p><text:span text:style-name="T53">IMU</text:span></text:p>
          </draw:text-box>
        </draw:frame>
        <draw:frame draw:style-name="gr629" draw:text-style-name="P167" draw:layer="layout" svg:width="1.977cm" svg:height="1.039cm" svg:x="-44.002cm" svg:y="44.283cm">
          <draw:text-box>
            <text:p><text:span text:style-name="T53">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450" draw:id="id450" draw:layer="layout" svg:width="1.215cm" svg:height="1.383cm" svg:x="-25.491cm" svg:y="53.046cm" svg:viewBox="0 0 1216 1384" draw:points="1216,1384 0,971 0,325 1216,0">
          <text:p/>
        </draw:polygon>
        <draw:frame draw:style-name="gr628" draw:text-style-name="P191"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50" draw:start-glue-point="1" draw:end-shape="id500" draw:end-glue-point="3" svg:d="M-24275 53738c1003 0 323-96 1362-96" svg:viewBox="0 0 1363 97">
          <text:p/>
        </draw:connector>
        <draw:frame draw:style-name="gr524" draw:text-style-name="P5" xml:id="id501" draw:id="id501"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90" draw:start-glue-point="4" draw:end-shape="id501" draw:end-glue-point="1" svg:d="M-32189 51936c0-1245 767-1037 1213-1381s571-1239-179-1239" svg:viewBox="0 0 1573 2621">
          <text:p/>
        </draw:connector>
        <draw:g draw:style-name="gr23">
          <draw:polygon draw:style-name="gr508" draw:text-style-name="P145" draw:layer="layout" svg:width="1.311cm" svg:height="1.383cm" svg:x="-32.916cm" svg:y="44.854cm" svg:viewBox="0 0 1312 1384" draw:points="1312,1384 0,792 0,591 1312,0">
            <text:p/>
          </draw:polygon>
          <draw:frame draw:style-name="gr631" draw:text-style-name="P192" draw:layer="layout" svg:width="1.732cm" svg:height="0.569cm" svg:x="-33.025cm" svg:y="45.252cm">
            <draw:text-box>
              <text:p><text:span text:style-name="T62">decoder</text:span></text:p>
            </draw:text-box>
          </draw:frame>
        </draw:g>
        <draw:g draw:style-name="gr31">
          <draw:g draw:style-name="gr23">
            <draw:polygon draw:style-name="gr510" draw:text-style-name="P113" draw:layer="layout" svg:width="1.292cm" svg:height="1.358cm" svg:x="-27.759cm" svg:y="44.804cm" svg:viewBox="0 0 1293 1359" draw:points="0,0 1293,581 1293,777 0,1359">
              <text:p/>
            </draw:polygon>
          </draw:g>
          <draw:frame draw:style-name="gr495" draw:text-style-name="P193" draw:layer="layout" svg:width="1.673cm" svg:height="0.887cm" svg:x="-27.938cm" svg:y="45.181cm">
            <draw:text-box>
              <text:p><text:span text:style-name="T62">encoder</text:span></text:p>
            </draw:text-box>
          </draw:frame>
        </draw:g>
        <draw:frame draw:style-name="gr632" draw:text-style-name="P16" xml:id="id502" draw:id="id502" draw:layer="layout" svg:width="2.796cm" svg:height="0.911cm" svg:x="-41.717cm" svg:y="48.506cm">
          <draw:text-box>
            <text:p text:style-name="P66"><text:span text:style-name="T63">derivative-free </text:span><text:span text:style-name="T63"><text:line-break/></text:span><text:span text:style-name="T63">global optimizer</text:span></text:p>
          </draw:text-box>
        </draw:frame>
        <draw:connector draw:style-name="gr633" draw:text-style-name="P7" draw:layer="layout" draw:type="curve" svg:x1="-36.53cm" svg:y1="49.316cm" svg:x2="-38.921cm" svg:y2="48.961cm" draw:start-shape="id501" draw:start-glue-point="3" draw:end-shape="id502" svg:d="M-36530 49316c-1792 0-597-355-2391-355" svg:viewBox="0 0 2392 356">
          <text:p text:style-name="P5"><text:span text:style-name="T4">using</text:span></text:p>
        </draw:connector>
        <draw:frame draw:style-name="gr524" draw:text-style-name="P5" xml:id="id503" draw:id="id503"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3" draw:text-style-name="P7" draw:layer="layout" draw:type="curve" svg:x1="-41.717cm" svg:y1="48.961cm" svg:x2="-43.268cm" svg:y2="50.542cm" draw:start-shape="id502" draw:start-glue-point="3" draw:end-shape="id503" draw:end-glue-point="0" svg:d="M-41717 48961c-1034 0-1551 527-1551 1581" svg:viewBox="0 0 1552 1582">
          <text:p text:style-name="P5"><text:span text:style-name="T4">converting</text:span></text:p>
        </draw:connector>
        <draw:connector draw:style-name="gr634" draw:text-style-name="P7" draw:layer="layout" draw:type="curve" draw:line-skew="0.726cm" svg:x1="-43.268cm" svg:y1="51.449cm" svg:x2="-34.652cm" svg:y2="52.421cm" draw:start-shape="id503" draw:start-glue-point="2" draw:end-shape="id491" draw:end-glue-point="10" svg:d="M-43268 51449c0 4027 4560 3357 6902 2593s2467-1621 1714-1621" svg:viewBox="0 0 9028 3172">
          <text:p text:style-name="P5"><text:span text:style-name="T4">converting</text:span></text:p>
        </draw:connector>
        <draw:rect draw:style-name="gr41" draw:text-style-name="P5" xml:id="id504" draw:id="id504"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7" draw:start-glue-point="2" draw:end-shape="id504" draw:end-glue-point="0" svg:d="M93383 64481c0 930-50 310-50 1240" svg:viewBox="0 0 51 1241">
          <text:p/>
        </draw:connector>
        <draw:rect draw:style-name="gr292" draw:text-style-name="P35" xml:id="id508" draw:id="id508" draw:layer="layout" svg:width="2.3cm" svg:height="1cm" svg:x="40.457cm" svg:y="99.219cm">
          <text:p text:style-name="P5">Suprise<text:line-break/>reduction</text:p>
        </draw:rect>
        <draw:rect draw:style-name="gr292" draw:text-style-name="P35" xml:id="id506" draw:id="id506" draw:layer="layout" svg:width="2.853cm" svg:height="1.372cm" svg:x="37.683cm" svg:y="103.071cm">
          <text:p text:style-name="P5">Updating<text:line-break/>predicting<text:line-break/>models</text:p>
        </draw:rect>
        <draw:rect draw:style-name="gr292" draw:text-style-name="P35" xml:id="id507" draw:id="id507" draw:layer="layout" svg:width="2.853cm" svg:height="1.372cm" svg:x="42.435cm" svg:y="103.071cm">
          <text:p text:style-name="P5">Manipulating<text:line-break/>the world</text:p>
        </draw:rect>
        <draw:connector draw:style-name="gr635" draw:text-style-name="P15" draw:layer="layout" draw:type="curve" svg:x1="41.607cm" svg:y1="101.993cm" svg:x2="39.109cm" svg:y2="103.071cm" draw:start-shape="id505" draw:start-glue-point="2" draw:end-shape="id506" draw:end-glue-point="0" svg:d="M41607 101993c0 808-2498 270-2498 1078" svg:viewBox="0 0 2499 1079">
          <text:p/>
        </draw:connector>
        <draw:connector draw:style-name="gr636" draw:text-style-name="P15" draw:layer="layout" draw:type="curve" svg:x1="41.607cm" svg:y1="101.993cm" svg:x2="43.861cm" svg:y2="103.071cm" draw:start-shape="id505" draw:start-glue-point="2" draw:end-shape="id507" draw:end-glue-point="0" svg:d="M41607 101993c0 808 2254 270 2254 1078" svg:viewBox="0 0 2255 1079">
          <text:p/>
        </draw:connector>
        <draw:rect draw:style-name="gr292" draw:text-style-name="P35" xml:id="id505" draw:id="id505" draw:layer="layout" svg:width="1.437cm" svg:height="0.766cm" svg:x="40.889cm" svg:y="101.227cm">
          <text:p text:style-name="P5">kinds</text:p>
        </draw:rect>
        <draw:connector draw:style-name="gr637" draw:text-style-name="P15" draw:layer="layout" draw:type="curve" svg:x1="41.607cm" svg:y1="100.219cm" svg:x2="41.607cm" svg:y2="101.227cm" draw:start-shape="id508" draw:start-glue-point="2" draw:end-shape="id505" draw:end-glue-point="0" svg:d="M41607 100219v1008" svg:viewBox="0 0 1 1009">
          <text:p/>
        </draw:connector>
        <draw:rect draw:style-name="gr292" draw:text-style-name="P35" xml:id="id509" draw:id="id509" draw:layer="layout" svg:width="2.853cm" svg:height="1.372cm" svg:x="36.184cm" svg:y="105.571cm">
          <text:p text:style-name="P5">Updating<text:line-break/>forecasting<text:line-break/>models</text:p>
        </draw:rect>
        <draw:connector draw:style-name="gr638" draw:text-style-name="P15" draw:layer="layout" draw:type="curve" svg:x1="39.109cm" svg:y1="104.443cm" svg:x2="37.61cm" svg:y2="105.571cm" draw:start-shape="id506" draw:start-glue-point="2" draw:end-shape="id509" draw:end-glue-point="0" svg:d="M39109 104443c0 846-1499 282-1499 1128" svg:viewBox="0 0 1500 1129">
          <text:p/>
        </draw:connector>
        <draw:rect draw:style-name="gr292" draw:text-style-name="P35" xml:id="id510" draw:id="id510" draw:layer="layout" svg:width="2.853cm" svg:height="1.372cm" svg:x="39.185cm" svg:y="105.571cm">
          <text:p text:style-name="P5">Updating<text:line-break/>classification<text:line-break/>models</text:p>
        </draw:rect>
        <draw:connector draw:style-name="gr639" draw:text-style-name="P15" draw:layer="layout" draw:type="curve" svg:x1="39.109cm" svg:y1="104.443cm" svg:x2="40.611cm" svg:y2="105.571cm" draw:start-shape="id506" draw:start-glue-point="2" draw:end-shape="id510" svg:d="M39109 104443c0 846 1502 282 1502 1128" svg:viewBox="0 0 1503 1129">
          <text:p/>
        </draw:connector>
        <draw:custom-shape draw:style-name="gr640" draw:text-style-name="P68" xml:id="id511" draw:id="id511"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4">conscious</text:span><text:span text:style-name="T64"><text:line-break/></text:span><text:span text:style-name="T65">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11" draw:end-glue-point="6" svg:d="M151265 40200c0-762 3210-254 3210-1016" svg:viewBox="0 0 3211 1017">
          <text:p/>
        </draw:connector>
        <draw:connector draw:style-name="gr641"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2" draw:text-style-name="P15" draw:layer="layout" draw:type="line" svg:x1="-25.784cm" svg:y1="39.701cm" svg:x2="-25.76cm" svg:y2="41.671cm" svg:d="M-25784 39701l24 1970" svg:viewBox="0 0 25 1971">
          <text:p/>
        </draw:connector>
        <draw:frame draw:style-name="gr643" draw:text-style-name="P194" draw:layer="layout" svg:width="3.475cm" svg:height="0.878cm" svg:x="-25.81cm" svg:y="40.138cm">
          <draw:text-box>
            <text:p text:style-name="P3"><text:span text:style-name="T66">ROS</text:span></text:p>
          </draw:text-box>
        </draw:frame>
        <draw:frame draw:style-name="gr524" draw:text-style-name="P5" draw:layer="layout" svg:width="4.672cm" svg:height="1.92cm" svg:x="-27.052cm" svg:y="64.858cm">
          <draw:object xlink:href="./Object 9" xlink:type="simple" xlink:show="embed" xlink:actuate="onLoad">
            <loext:p/>
          </draw:object>
          <draw:image xlink:href="./ObjectReplacements/Object 9" xlink:type="simple" xlink:show="embed" xlink:actuate="onLoad"/>
        </draw:frame>
        <draw:g draw:style-name="gr31">
          <draw:path draw:style-name="gr644" draw:text-style-name="P5" draw:layer="layout" svg:width="2.382cm" svg:height="2.15cm" svg:x="-101.135cm" svg:y="12.975cm" svg:viewBox="0 0 2383 2151" svg:d="M2383 2151c-953-685-1525-1369-2383-2151">
            <text:p/>
          </draw:path>
          <draw:path draw:style-name="gr644" draw:text-style-name="P5" draw:layer="layout" svg:width="1.429cm" svg:height="1.134cm" svg:x="-102.565cm" svg:y="11.84cm" svg:viewBox="0 0 1430 1135" svg:d="M1430 1135c-477-352-954-685-1430-1135">
            <text:p/>
          </draw:path>
          <draw:path draw:style-name="gr644" draw:text-style-name="P5" draw:layer="layout" svg:width="1.372cm" svg:height="0.429cm" svg:x="-102.508cm" svg:y="12.975cm" svg:viewBox="0 0 1373 430" svg:d="M1373 0c-477 195-916 293-1373 430">
            <text:p/>
          </draw:path>
          <draw:path draw:style-name="gr644" draw:text-style-name="P5" draw:layer="layout" svg:width="3.107cm" svg:height="0.586cm" svg:x="-101.86cm" svg:y="14.539cm" svg:viewBox="0 0 3108 587" svg:d="M3108 587c-1048-196-2002-293-3108-587">
            <text:p/>
          </draw:path>
          <draw:path draw:style-name="gr644" draw:text-style-name="P5" draw:layer="layout" svg:width="1.181cm" svg:height="0.82cm" svg:x="-103.042cm" svg:y="13.718cm" svg:viewBox="0 0 1182 821" svg:d="M1182 821c-457-234-839-489-1182-821">
            <text:p/>
          </draw:path>
          <draw:path draw:style-name="gr644" draw:text-style-name="P5" draw:layer="layout" svg:width="1.219cm" svg:height="0.684cm" svg:x="-103.08cm" svg:y="14.539cm" svg:viewBox="0 0 1220 685" svg:d="M1220 0c-515 157-896 391-1220 685">
            <text:p/>
          </draw:path>
          <draw:path draw:style-name="gr644" draw:text-style-name="P5" draw:layer="layout" svg:width="2.478cm" svg:height="2.346cm" svg:x="-101.231cm" svg:y="15.126cm" svg:viewBox="0 0 2479 2347" svg:d="M2479 0c-953 626-1716 1369-2479 2347">
            <text:p/>
          </draw:path>
          <draw:path draw:style-name="gr644" draw:text-style-name="P5" draw:layer="layout" svg:width="1.238cm" svg:height="1.251cm" svg:x="-102.47cm" svg:y="17.472cm" svg:viewBox="0 0 1239 1252" svg:d="M1239 0c-438 430-820 782-1239 1252">
            <text:p/>
          </draw:path>
          <draw:path draw:style-name="gr644" draw:text-style-name="P5" draw:layer="layout" svg:width="1.467cm" svg:height="0.429cm" svg:x="-102.699cm" svg:y="17.042cm" svg:viewBox="0 0 1468 430" svg:d="M1468 430c-514-156-972-293-1468-430">
            <text:p/>
          </draw:path>
          <draw:path draw:style-name="gr644" draw:text-style-name="P5" draw:layer="layout" svg:width="0.365cm" svg:height="2.933cm" svg:x="-98.641cm" svg:y="11.41cm" svg:viewBox="0 0 366 2934" svg:d="M366 2934c-381-978-477-1858-229-2934">
            <text:p/>
          </draw:path>
          <draw:path draw:style-name="gr644" draw:text-style-name="P5" draw:layer="layout" svg:width="0.628cm" svg:height="1.075cm" svg:x="-99.133cm" svg:y="10.334cm" svg:viewBox="0 0 629 1076" svg:d="M629 1076c-152-430-343-782-629-1076">
            <text:p/>
          </draw:path>
          <draw:path draw:style-name="gr644" draw:text-style-name="P5" draw:layer="layout" svg:width="1.525cm" svg:height="0.879cm" svg:x="-98.504cm" svg:y="10.53cm" svg:viewBox="0 0 1526 880" svg:d="M0 880c515-352 992-626 1526-880">
            <text:p/>
          </draw:path>
          <draw:path draw:style-name="gr644" draw:text-style-name="P5" draw:layer="layout" svg:width="2.382cm" svg:height="1.563cm" svg:x="-97.798cm" svg:y="12.975cm" svg:viewBox="0 0 2383 1564" svg:d="M0 1564c667-782 1430-1212 2383-1564">
            <text:p/>
          </draw:path>
          <draw:path draw:style-name="gr644" draw:text-style-name="P5" draw:layer="layout" svg:width="1.43cm" svg:height="0.88cm" svg:x="-95.415cm" svg:y="12.094cm" svg:viewBox="0 0 1431 881" svg:d="M0 881c496-294 954-548 1431-881">
            <text:p/>
          </draw:path>
          <draw:path draw:style-name="gr644" draw:text-style-name="P5" draw:layer="layout" svg:width="1.678cm" svg:height="0.624cm" svg:x="-95.415cm" svg:y="12.975cm" svg:viewBox="0 0 1679 625" svg:d="M0 0c573 234 1106 430 1679 625">
            <text:p/>
          </draw:path>
          <draw:path draw:style-name="gr644" draw:text-style-name="P5" draw:layer="layout" svg:width="1.562cm" svg:height="2.542cm" svg:x="-97.893cm" svg:y="15.907cm" svg:viewBox="0 0 1563 2543" svg:d="M0 0c572 744 1048 1526 1563 2543">
            <text:p/>
          </draw:path>
          <draw:path draw:style-name="gr644" draw:text-style-name="P5" draw:layer="layout" svg:width="1.01cm" svg:height="1.212cm" svg:x="-96.33cm" svg:y="18.45cm" svg:viewBox="0 0 1011 1213" svg:d="M0 0c343 430 629 782 1011 1213">
            <text:p/>
          </draw:path>
          <draw:path draw:style-name="gr644" draw:text-style-name="P5" draw:layer="layout" svg:width="1.372cm" svg:height="0.625cm" svg:x="-97.703cm" svg:y="18.45cm" svg:viewBox="0 0 1373 626" svg:d="M1373 0c-515 156-953 352-1373 626">
            <text:p/>
          </draw:path>
          <draw:path draw:style-name="gr645" draw:text-style-name="P195" draw:layer="layout" svg:width="3.037cm" svg:height="3.128cm" svg:x="-99.107cm" svg:y="13.751cm" svg:viewBox="0 0 3038 3129" svg:d="M450 298c953-645 2193-195 2517 880 343 1135-610 2152-1793 1917-1144-215-1582-1917-724-2797z">
            <text:p/>
          </draw:path>
          <draw:path draw:style-name="gr646" draw:text-style-name="P196" draw:layer="layout" svg:width="3.037cm" svg:height="3.128cm" svg:x="-99.107cm" svg:y="13.751cm" svg:viewBox="0 0 3038 3129" svg:d="M450 298c953-645 2193-195 2517 880 343 1135-610 2152-1793 1917-1144-215-1582-1917-724-2797z">
            <text:p/>
          </draw:path>
          <draw:path draw:style-name="gr647" draw:text-style-name="P197"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8" draw:text-style-name="P198"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9" draw:text-style-name="P199"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4" draw:text-style-name="P5" draw:layer="layout" svg:width="2.535cm" svg:height="0.016cm" svg:x="-96.139cm" svg:y="15.108cm" svg:viewBox="0 0 2536 17" svg:d="M0 17c915-39 1678 0 2536 0">
            <text:p/>
          </draw:path>
          <draw:line draw:style-name="gr644" draw:text-style-name="P5" draw:layer="layout" svg:x1="-92.841cm" svg:y1="15.126cm" svg:x2="-91.792cm" svg:y2="15.126cm">
            <text:p/>
          </draw:line>
          <draw:line draw:style-name="gr644" draw:text-style-name="P5" draw:layer="layout" svg:x1="-91.03cm" svg:y1="15.126cm" svg:x2="-89.981cm" svg:y2="15.126cm">
            <text:p/>
          </draw:line>
          <draw:line draw:style-name="gr644" draw:text-style-name="P5" draw:layer="layout" svg:x1="-89.218cm" svg:y1="15.126cm" svg:x2="-88.169cm" svg:y2="15.126cm">
            <text:p/>
          </draw:line>
          <draw:path draw:style-name="gr650" draw:text-style-name="P200" draw:layer="layout" svg:width="1.315cm" svg:height="1.337cm" svg:x="-93.743cm" svg:y="14.514cm" svg:viewBox="0 0 1316 1338" svg:d="M139 220c286-293 667-293 953 0 325 352 287 782-57 1017-381 254-839 0-991-430-77-235-58-431 95-587z">
            <text:p/>
          </draw:path>
          <draw:path draw:style-name="gr651" draw:text-style-name="P201" draw:layer="layout" svg:width="1.315cm" svg:height="1.337cm" svg:x="-93.743cm" svg:y="14.514cm" svg:viewBox="0 0 1316 1338" svg:d="M139 220c286-293 667-294 953 0 325 352 287 782-57 1017-381 254-839 0-991-430-77-235-58-430 95-587z">
            <text:p/>
          </draw:path>
          <draw:path draw:style-name="gr652" draw:text-style-name="P200" draw:layer="layout" svg:width="1.314cm" svg:height="1.337cm" svg:x="-91.931cm" svg:y="14.514cm" svg:viewBox="0 0 1315 1338" svg:d="M139 220c286-293 667-293 953 0 324 352 286 782-57 1017-382 254-839 0-992-430-76-235-57-431 96-587z">
            <text:p/>
          </draw:path>
          <draw:path draw:style-name="gr651" draw:text-style-name="P201" draw:layer="layout" svg:width="1.314cm" svg:height="1.337cm" svg:x="-91.931cm" svg:y="14.514cm" svg:viewBox="0 0 1315 1338" svg:d="M139 220c287-293 667-294 953 0 324 352 286 782-57 1017-382 254-839 0-992-430-76-235-56-430 96-587z">
            <text:p/>
          </draw:path>
          <draw:path draw:style-name="gr652" draw:text-style-name="P200" draw:layer="layout" svg:width="1.314cm" svg:height="1.337cm" svg:x="-90.119cm" svg:y="14.514cm" svg:viewBox="0 0 1315 1338" svg:d="M138 220c286-293 668-293 954 0 324 352 286 782-58 1017-381 254-839 0-991-430-76-235-57-431 95-587z">
            <text:p/>
          </draw:path>
          <draw:path draw:style-name="gr651" draw:text-style-name="P201" draw:layer="layout" svg:width="1.314cm" svg:height="1.337cm" svg:x="-90.119cm" svg:y="14.514cm" svg:viewBox="0 0 1315 1338" svg:d="M138 220c286-293 668-294 954 0 324 352 286 782-58 1017-381 254-839 0-991-430-76-235-57-430 95-587z">
            <text:p/>
          </draw:path>
          <draw:path draw:style-name="gr644" draw:text-style-name="P5" draw:layer="layout" svg:width="1.81cm" svg:height="1.27cm" svg:x="-88.169cm" svg:y="13.855cm" svg:viewBox="0 0 1811 1271" svg:d="M0 1271c667-156 1239-587 1811-1271">
            <text:p/>
          </draw:path>
          <draw:line draw:style-name="gr644" draw:text-style-name="P5" draw:layer="layout" svg:x1="-88.169cm" svg:y1="15.126cm" svg:x2="-85.786cm" svg:y2="15.126cm">
            <text:p/>
          </draw:line>
          <draw:path draw:style-name="gr644" draw:text-style-name="P5" draw:layer="layout" svg:width="1.81cm" svg:height="1.368cm" svg:x="-88.169cm" svg:y="15.126cm" svg:viewBox="0 0 1811 1369" svg:d="M0 0c667 196 1239 626 1811 1369">
            <text:p/>
          </draw:path>
          <draw:path draw:style-name="gr644" draw:text-style-name="P5" draw:layer="layout" svg:width="1.391cm" svg:height="0.977cm" svg:x="-86.358cm" svg:y="12.877cm" svg:viewBox="0 0 1392 978" svg:d="M0 978c439-450 858-724 1392-978">
            <text:p/>
          </draw:path>
          <draw:path draw:style-name="gr644" draw:text-style-name="P5" draw:layer="layout" svg:width="1.334cm" svg:height="0.344cm" svg:x="-86.358cm" svg:y="13.522cm" svg:viewBox="0 0 1335 345" svg:d="M0 333c477 58 858-98 1335-333">
            <text:p/>
          </draw:path>
          <draw:path draw:style-name="gr644" draw:text-style-name="P5" draw:layer="layout" svg:width="1.143cm" svg:height="0.86cm" svg:x="-85.786cm" svg:y="14.265cm" svg:viewBox="0 0 1144 861" svg:d="M0 861c439-254 763-489 1144-861">
            <text:p/>
          </draw:path>
          <draw:line draw:style-name="gr644" draw:text-style-name="P5" draw:layer="layout" svg:x1="-85.786cm" svg:y1="15.126cm" svg:x2="-84.508cm" svg:y2="15.126cm">
            <text:p/>
          </draw:line>
          <draw:path draw:style-name="gr644" draw:text-style-name="P5" draw:layer="layout" svg:width="1.143cm" svg:height="0.977cm" svg:x="-85.786cm" svg:y="15.126cm" svg:viewBox="0 0 1144 978" svg:d="M0 0c439 293 763 587 1144 978">
            <text:p/>
          </draw:path>
          <draw:path draw:style-name="gr644" draw:text-style-name="P5" draw:layer="layout" svg:width="1.353cm" svg:height="1.075cm" svg:x="-86.358cm" svg:y="16.494cm" svg:viewBox="0 0 1354 1076" svg:d="M0 0c382 391 820 743 1354 1076">
            <text:p/>
          </draw:path>
          <draw:path draw:style-name="gr644" draw:text-style-name="P5" draw:layer="layout" svg:width="1.429cm" svg:height="0.316cm" svg:x="-86.358cm" svg:y="16.47cm" svg:viewBox="0 0 1430 317" svg:d="M0 24c477-78 954 39 1430 293">
            <text:p/>
          </draw:path>
          <draw:path draw:style-name="gr653" draw:text-style-name="P5" draw:layer="layout" svg:width="7.626cm" svg:height="0.439cm" svg:x="-95.128cm" svg:y="13.903cm" svg:viewBox="0 0 7627 440" svg:d="M0 440c2002-587 4862-587 7627 0">
            <text:p/>
          </draw:path>
          <draw:polygon draw:style-name="gr654" draw:text-style-name="P202" draw:layer="layout" svg:width="0.431cm" svg:height="0.401cm" svg:x="-87.895cm" svg:y="14.068cm" svg:viewBox="0 0 432 402" draw:points="81,0 432,284 0,402">
            <text:p/>
          </draw:polygon>
          <draw:frame draw:style-name="gr655" draw:text-style-name="P203" draw:layer="layout" svg:width="1.85cm" svg:height="0.484cm" svg:x="-102.384cm" svg:y="11.028cm">
            <draw:text-box>
              <text:p><text:span text:style-name="T67">Dendrites</text:span></text:p>
            </draw:text-box>
          </draw:frame>
          <draw:frame draw:style-name="gr656" draw:text-style-name="P203" draw:layer="layout" svg:width="3.194cm" svg:height="0.484cm" svg:x="-98.856cm" svg:y="17.286cm">
            <draw:text-box>
              <text:p><text:span text:style-name="T67">Soma / cell body</text:span></text:p>
            </draw:text-box>
          </draw:frame>
          <draw:frame draw:style-name="gr657" draw:text-style-name="P204" draw:layer="layout" svg:width="1.287cm" svg:height="0.389cm" svg:x="-98.57cm" svg:y="15.154cm">
            <draw:text-box>
              <text:p><text:span text:style-name="T68">Nucleus</text:span></text:p>
            </draw:text-box>
          </draw:frame>
          <draw:frame draw:style-name="gr658" draw:text-style-name="P203" draw:layer="layout" svg:width="2.306cm" svg:height="0.484cm" svg:x="-96.091cm" svg:y="14.451cm">
            <draw:text-box>
              <text:p><text:span text:style-name="T67">Axon hillock</text:span></text:p>
            </draw:text-box>
          </draw:frame>
          <draw:frame draw:style-name="gr659" draw:text-style-name="P203" draw:layer="layout" svg:width="2.666cm" svg:height="0.484cm" svg:x="-92.183cm" svg:y="13.962cm">
            <draw:text-box>
              <text:p><text:span text:style-name="T67">Myelin sheath</text:span></text:p>
            </draw:text-box>
          </draw:frame>
          <draw:frame draw:style-name="gr660" draw:text-style-name="P205" draw:layer="layout" svg:width="2.477cm" svg:height="0.389cm" svg:x="-91.459cm" svg:y="16.171cm">
            <draw:text-box>
              <text:p><text:span text:style-name="T69">Node of Ranvier</text:span></text:p>
            </draw:text-box>
          </draw:frame>
          <draw:frame draw:style-name="gr661" draw:text-style-name="P203" draw:layer="layout" svg:width="2.858cm" svg:height="0.484cm" svg:x="-87.893cm" svg:y="12.397cm">
            <draw:text-box>
              <text:p><text:span text:style-name="T67">Axon terminals</text:span></text:p>
            </draw:text-box>
          </draw:frame>
          <draw:frame draw:style-name="gr662" draw:text-style-name="P205" draw:layer="layout" svg:width="4.155cm" svg:height="0.389cm" svg:x="-92.851cm" svg:y="13.141cm">
            <draw:text-box>
              <text:p><text:span text:style-name="T69">Direction of action potential</text:span></text:p>
            </draw:text-box>
          </draw:frame>
          <draw:custom-shape draw:style-name="gr663" draw:text-style-name="P206" draw:layer="layout" svg:width="3.952cm" svg:height="3.294cm" svg:x="-110.764cm" svg:y="13.4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4" draw:text-style-name="P134" draw:layer="layout" svg:width="2.106cm" svg:height="1.771cm" svg:x="-106.4cm" svg:y="14.177cm">
            <text:p text:style-name="P19"><text:span text:style-name="T4">e</text:span><text:span text:style-name="T4">n</text:span><text:span text:style-name="T4">vi</text:span><text:span text:style-name="T4">r</text:span><text:span text:style-name="T4">o</text:span><text:span text:style-name="T4">n</text:span><text:span text:style-name="T4">m</text:span><text:span text:style-name="T4">e</text:span><text:span text:style-name="T4">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5" draw:text-style-name="P38" draw:layer="layout" svg:width="3.655cm" svg:height="1.199cm" svg:x="-79.675cm" svg:y="15.998cm">
            <draw:text-box>
              <text:p>Action potential<text:line-break/>(A voltage pulse)</text:p>
            </draw:text-box>
          </draw:frame>
          <draw:custom-shape draw:style-name="gr664"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12" draw:id="id512"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12" draw:start-glue-point="1" draw:end-shape="id513" draw:end-glue-point="3" svg:d="M-85172 107361h1093" svg:viewBox="0 0 1094 1">
          <text:p/>
        </draw:connector>
        <draw:rect draw:style-name="gr41" draw:text-style-name="P5" xml:id="id513" draw:id="id513"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13" draw:start-glue-point="1" draw:end-shape="id514" draw:end-glue-point="3" svg:d="M-81216 107361h1622" svg:viewBox="0 0 1623 1">
          <text:p/>
        </draw:connector>
        <draw:rect draw:style-name="gr41" draw:text-style-name="P5" xml:id="id515" draw:id="id515"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6" draw:id="id516"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5" draw:start-glue-point="1" draw:end-shape="id516"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14" draw:id="id514"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7" draw:id="id517"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14" draw:start-glue-point="1" draw:end-shape="id517" draw:end-glue-point="3" svg:d="M-75664 107361h965" svg:viewBox="0 0 966 1">
          <text:p/>
        </draw:connector>
        <draw:connector draw:style-name="gr293" draw:text-style-name="P15" draw:layer="layout" draw:type="curve" svg:x1="-72.125cm" svg:y1="107.361cm" svg:x2="-70.426cm" svg:y2="107.382cm" draw:start-shape="id517" draw:start-glue-point="1" draw:end-shape="id515" svg:d="M-72125 107361c1275 0 426 21 1699 21" svg:viewBox="0 0 1700 22">
          <text:p/>
        </draw:connector>
        <draw:custom-shape draw:style-name="gr666" draw:text-style-name="P207" xml:id="id518" draw:id="id518"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8" draw:start-glue-point="10" draw:end-shape="id512" draw:end-glue-point="3" svg:d="M-90127 107330c1570 0 525 31 2092 31" svg:viewBox="0 0 2093 32">
          <text:p/>
        </draw:connector>
        <draw:rect draw:style-name="gr254" draw:text-style-name="P33" xml:id="id522" draw:id="id522" draw:layer="layout" svg:width="2.978cm" svg:height="1cm" svg:x="89.465cm" svg:y="3.976cm">
          <text:p text:style-name="P5">Mind</text:p>
        </draw:rect>
        <draw:rect draw:style-name="gr255" draw:text-style-name="P67" xml:id="id523" draw:id="id523" draw:layer="layout" svg:width="2.4cm" svg:height="1cm" svg:x="87.559cm" svg:y="11.435cm">
          <text:p text:style-name="P8"><text:span text:style-name="T29">awareness</text:span></text:p>
        </draw:rect>
        <draw:rect draw:style-name="gr255" draw:text-style-name="P77" xml:id="id520" draw:id="id520" draw:layer="layout" svg:width="2.962cm" svg:height="1cm" svg:x="87.278cm" svg:y="9.015cm">
          <text:p text:style-name="P76"><text:span text:style-name="T29">Consciousness</text:span></text:p>
        </draw:rect>
        <draw:connector draw:style-name="gr313" draw:text-style-name="P15" draw:layer="layout" draw:type="curve" svg:x1="90.988cm" svg:y1="7.261cm" svg:x2="88.759cm" svg:y2="9.015cm" draw:start-shape="id519" draw:start-glue-point="2" draw:end-shape="id520" draw:end-glue-point="0" svg:d="M90988 7261c0 439-557 877-1115 877-557 0-1114 439-1114 877" svg:viewBox="0 0 2230 1755">
          <text:p/>
        </draw:connector>
        <draw:rect draw:style-name="gr255" draw:text-style-name="P77" xml:id="id521" draw:id="id521" draw:layer="layout" svg:width="3.448cm" svg:height="1cm" svg:x="91.714cm" svg:y="8.981cm">
          <text:p text:style-name="P76"><text:span text:style-name="T29">unconsciousness</text:span></text:p>
        </draw:rect>
        <draw:connector draw:style-name="gr314" draw:text-style-name="P15" draw:layer="layout" draw:type="curve" svg:x1="90.988cm" svg:y1="7.261cm" svg:x2="93.438cm" svg:y2="8.981cm" draw:start-shape="id519" draw:start-glue-point="2" draw:end-shape="id521" draw:end-glue-point="0" svg:d="M90988 7261c0 1290 2450 430 2450 1720" svg:viewBox="0 0 2451 1721">
          <text:p/>
        </draw:connector>
        <draw:rect draw:style-name="gr255" draw:text-style-name="P67" xml:id="id519" draw:id="id519" draw:layer="layout" svg:width="2.4cm" svg:height="1cm" svg:x="89.788cm" svg:y="6.261cm">
          <text:p text:style-name="P8"><text:span text:style-name="T29">Psyche</text:span></text:p>
        </draw:rect>
        <draw:connector draw:style-name="gr318" draw:text-style-name="P15" draw:layer="layout" draw:type="curve" svg:x1="90.954cm" svg:y1="4.976cm" svg:x2="90.988cm" svg:y2="6.261cm" draw:start-shape="id522" draw:start-glue-point="2" draw:end-shape="id519" draw:end-glue-point="0" svg:d="M90954 4976c0 322 9 643 17 643 9 0 17 321 17 642" svg:viewBox="0 0 35 1286">
          <text:p/>
        </draw:connector>
        <draw:connector draw:style-name="gr406" draw:text-style-name="P15" draw:layer="layout" draw:type="curve" svg:x1="88.759cm" svg:y1="10.015cm" svg:x2="88.759cm" svg:y2="11.435cm" draw:start-shape="id520" draw:start-glue-point="2" draw:end-shape="id523" svg:d="M88759 10015v1420" svg:viewBox="0 0 1 1421">
          <text:p/>
        </draw:connector>
        <draw:connector draw:style-name="gr46" draw:text-style-name="P15" draw:layer="layout" draw:type="curve" svg:x1="88.759cm" svg:y1="11.435cm" svg:x2="85.044cm" svg:y2="10.093cm" draw:start-shape="id523" draw:start-glue-point="0" draw:end-shape="id524" draw:end-glue-point="6" svg:d="M88759 11435c0-1006-3715-336-3715-1342" svg:viewBox="0 0 3716 1343">
          <text:p/>
        </draw:connector>
        <draw:custom-shape draw:style-name="gr667" draw:text-style-name="P68" xml:id="id524" draw:id="id524"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5" draw:id="id525"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6" draw:id="id526" draw:layer="layout" svg:width="2.79cm" svg:height="0.955cm" svg:x="104.228cm" svg:y="7.294cm">
          <text:p text:style-name="P5">thinking</text:p>
        </draw:rect>
        <draw:connector draw:style-name="gr259" draw:text-style-name="P15" draw:layer="layout" draw:type="curve" svg:x1="107.01cm" svg:y1="4.693cm" svg:x2="105.623cm" svg:y2="7.294cm" draw:start-shape="id525" draw:start-glue-point="2" draw:end-shape="id526" draw:end-glue-point="0" svg:d="M107010 4693c0 1951-1387 651-1387 2601" svg:viewBox="0 0 1388 2602">
          <text:p/>
        </draw:connector>
        <draw:rect draw:style-name="gr41" draw:text-style-name="P5" xml:id="id529" draw:id="id529" draw:layer="layout" svg:width="2.79cm" svg:height="0.955cm" svg:x="100.455cm" svg:y="7.228cm">
          <text:p text:style-name="P5">learning</text:p>
        </draw:rect>
        <draw:rect draw:style-name="gr41" draw:text-style-name="P5" xml:id="id527" draw:id="id527" draw:layer="layout" svg:width="2.79cm" svg:height="0.955cm" svg:x="108.002cm" svg:y="7.294cm">
          <text:p text:style-name="P5">perception</text:p>
        </draw:rect>
        <draw:rect draw:style-name="gr41" draw:text-style-name="P5" xml:id="id528" draw:id="id528" draw:layer="layout" svg:width="2.79cm" svg:height="0.955cm" svg:x="111.775cm" svg:y="7.294cm">
          <text:p text:style-name="P5">attention</text:p>
        </draw:rect>
        <draw:connector draw:style-name="gr260" draw:text-style-name="P15" draw:layer="layout" draw:type="curve" svg:x1="107.01cm" svg:y1="4.693cm" svg:x2="109.397cm" svg:y2="7.294cm" draw:start-shape="id525" draw:start-glue-point="2" draw:end-shape="id527" draw:end-glue-point="0" svg:d="M107010 4693c0 1951 2387 651 2387 2601" svg:viewBox="0 0 2388 2602">
          <text:p/>
        </draw:connector>
        <draw:connector draw:style-name="gr262" draw:text-style-name="P15" draw:layer="layout" draw:type="curve" svg:x1="107.01cm" svg:y1="4.693cm" svg:x2="113.17cm" svg:y2="7.294cm" draw:start-shape="id525" draw:start-glue-point="2" draw:end-shape="id528" svg:d="M107010 4693c0 1951 6160 651 6160 2601" svg:viewBox="0 0 6161 2602">
          <text:p/>
        </draw:connector>
        <draw:connector draw:style-name="gr265" draw:text-style-name="P15" draw:layer="layout" draw:type="curve" svg:x1="107.01cm" svg:y1="4.693cm" svg:x2="101.85cm" svg:y2="7.228cm" draw:start-shape="id525" draw:start-glue-point="2" draw:end-shape="id529" draw:end-glue-point="0" svg:d="M107010 4693c0 1902-5160 635-5160 2535" svg:viewBox="0 0 5161 2536">
          <text:p/>
        </draw:connector>
        <draw:rect draw:style-name="gr292" draw:text-style-name="P35" xml:id="id530" draw:id="id530"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30" svg:d="M60954 54528c0 1440-3132 480-3132 1920" svg:viewBox="0 0 3133 1921">
          <text:p/>
        </draw:connector>
        <draw:rect draw:style-name="gr41" draw:text-style-name="P5" xml:id="id531" draw:id="id531" draw:layer="layout" svg:width="2.731cm" svg:height="1.2cm" svg:x="128.149cm" svg:y="42.022cm">
          <text:p text:style-name="P5">Networks</text:p>
        </draw:rect>
        <draw:rect draw:style-name="gr41" draw:text-style-name="P5" xml:id="id532" draw:id="id532"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31" draw:end-glue-point="0" svg:d="M130698 40400c0 1216-1184 406-1184 1622" svg:viewBox="0 0 1185 1623">
          <text:p/>
        </draw:connector>
        <draw:connector draw:style-name="gr293" draw:text-style-name="P15" draw:layer="layout" draw:type="curve" svg:x1="129.514cm" svg:y1="43.222cm" svg:x2="129.522cm" svg:y2="44.651cm" draw:start-shape="id531" draw:start-glue-point="2" draw:end-shape="id532" draw:end-glue-point="0" svg:d="M129514 43222c0 1072 8 358 8 1429" svg:viewBox="0 0 9 1430">
          <text:p/>
        </draw:connector>
        <draw:rect draw:style-name="gr41" draw:text-style-name="P5" xml:id="id533" draw:id="id533" draw:layer="layout" svg:width="2.731cm" svg:height="1.2cm" svg:x="124.066cm" svg:y="48.178cm">
          <text:p text:style-name="P5">Default mode<text:line-break/>network</text:p>
        </draw:rect>
        <draw:rect draw:style-name="gr41" draw:text-style-name="P5" xml:id="id534" draw:id="id534" draw:layer="layout" svg:width="3.399cm" svg:height="1.44cm" svg:x="127.983cm" svg:y="48.037cm">
          <text:p text:style-name="P5">Dorsal<text:line-break/>(when new<text:line-break/>observation)</text:p>
        </draw:rect>
        <draw:rect draw:style-name="gr276" draw:text-style-name="P5" xml:id="id535" draw:id="id535" draw:layer="layout" svg:width="3.223cm" svg:height="1.493cm" svg:x="132.286cm" svg:y="48.037cm">
          <text:p text:style-name="P30"><text:span text:style-name="T28">Ventral </text:span><text:span text:style-name="T28"><text:line-break/></text:span><text:span text:style-name="T28">(when </text:span><text:span text:style-name="T28">following</text:span><text:span text:style-name="T28"><text:line-break/></text:span><text:span text:style-name="T28">a goal)</text:span></text:p>
        </draw:rect>
        <draw:connector draw:style-name="gr293" draw:text-style-name="P15" draw:layer="layout" draw:type="curve" svg:x1="129.522cm" svg:y1="45.851cm" svg:x2="125.431cm" svg:y2="48.178cm" draw:start-shape="id532" draw:start-glue-point="2" draw:end-shape="id533" draw:end-glue-point="0" svg:d="M129522 45851c0 1746-4091 583-4091 2327" svg:viewBox="0 0 4092 2328">
          <text:p/>
        </draw:connector>
        <draw:connector draw:style-name="gr293" draw:text-style-name="P15" draw:layer="layout" draw:type="curve" svg:x1="129.522cm" svg:y1="45.851cm" svg:x2="129.682cm" svg:y2="48.037cm" draw:start-shape="id532" draw:start-glue-point="2" draw:end-shape="id534" draw:end-glue-point="0" svg:d="M129522 45851c0 1639 160 547 160 2186" svg:viewBox="0 0 161 2187">
          <text:p/>
        </draw:connector>
        <draw:connector draw:style-name="gr293" draw:text-style-name="P15" draw:layer="layout" draw:type="curve" svg:x1="129.522cm" svg:y1="45.851cm" svg:x2="133.897cm" svg:y2="48.037cm" draw:start-shape="id532" draw:start-glue-point="2" draw:end-shape="id535" draw:end-glue-point="0" svg:d="M129522 45851c0 1639 4375 547 4375 2186" svg:viewBox="0 0 4376 2187">
          <text:p/>
        </draw:connector>
        <draw:rect draw:style-name="gr41" draw:text-style-name="P5" xml:id="id536" draw:id="id536"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33" draw:start-glue-point="2" draw:end-shape="id536" draw:end-glue-point="0" svg:d="M125431 49378c0 1111 37 371 37 1482" svg:viewBox="0 0 38 1483">
          <text:p/>
        </draw:connector>
        <draw:rect draw:style-name="gr292" draw:text-style-name="P35" xml:id="id538" draw:id="id538" draw:layer="layout" svg:width="2.3cm" svg:height="1cm" svg:x="43.008cm" svg:y="61.741cm">
          <text:p text:style-name="P5">Goal<text:line-break/>types</text:p>
        </draw:rect>
        <draw:rect draw:style-name="gr292" draw:text-style-name="P35" xml:id="id537" draw:id="id537"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7"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8" draw:end-glue-point="0" svg:d="M42688 60541c0 900 1470 300 1470 1200" svg:viewBox="0 0 1471 1201">
          <text:p/>
        </draw:connector>
        <draw:rect draw:style-name="gr292" draw:text-style-name="P35" xml:id="id539" draw:id="id539"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9"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40" draw:id="id540"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40" draw:start-glue-point="1" draw:end-shape="id541" draw:end-glue-point="3" svg:d="M-85172 111361h1093" svg:viewBox="0 0 1094 1">
          <text:p/>
        </draw:connector>
        <draw:rect draw:style-name="gr41" draw:text-style-name="P5" xml:id="id541" draw:id="id541"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41" draw:start-glue-point="1" draw:end-shape="id542" draw:end-glue-point="3" svg:d="M-81216 111361h1622" svg:viewBox="0 0 1623 1">
          <text:p/>
        </draw:connector>
        <draw:rect draw:style-name="gr41" draw:text-style-name="P5" xml:id="id543" draw:id="id543"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44" draw:id="id544"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43" draw:start-glue-point="1" draw:end-shape="id544"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42" draw:id="id542"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5" draw:id="id545"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42" draw:start-glue-point="1" draw:end-shape="id545" draw:end-glue-point="3" svg:d="M-75664 111361h965" svg:viewBox="0 0 966 1">
          <text:p/>
        </draw:connector>
        <draw:connector draw:style-name="gr293" draw:text-style-name="P15" draw:layer="layout" draw:type="curve" svg:x1="-72.125cm" svg:y1="111.361cm" svg:x2="-70.426cm" svg:y2="111.382cm" draw:start-shape="id545" draw:start-glue-point="1" draw:end-shape="id543" svg:d="M-72125 111361c1275 0 426 21 1699 21" svg:viewBox="0 0 1700 22">
          <text:p/>
        </draw:connector>
        <draw:custom-shape draw:style-name="gr666" draw:text-style-name="P207" xml:id="id546" draw:id="id546"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6" draw:start-glue-point="10" draw:end-shape="id540" draw:end-glue-point="3" svg:d="M-90127 111330c1570 0 525 31 2092 31" svg:viewBox="0 0 2093 32">
          <text:p/>
        </draw:connector>
        <draw:frame draw:style-name="gr494" draw:text-style-name="P138" draw:layer="layout" svg:width="3.743cm" svg:height="1.158cm" svg:x="-46.518cm" svg:y="68.54cm">
          <draw:text-box>
            <text:p text:style-name="P69"><text:span text:style-name="T12">Matrix-Profile-based </text:span><text:span text:style-name="T12"><text:line-break/></text:span><text:span text:style-name="T12">Motif Discovery</text:span></text:p>
          </draw:text-box>
        </draw:frame>
        <draw:g draw:style-name="gr31">
          <draw:path draw:style-name="gr2" draw:text-style-name="P2" draw:layer="layout" svg:width="31.019cm" svg:height="9.289cm" svg:x="-16.441cm" svg:y="-35.13cm" svg:viewBox="0 0 31020 9290"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504 210-2145-70-314-136-675-24-992-165-320-140-1042-399-1075-563-46-229-488-311-844-363-323-47-572 221-912 212-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 31-429 141-615 106-189 426-480 794-530 319-44 599-273 914-312 336-41 464-306 793-265 724 92 1188-112 1751-269 321-89 716 276 1018 165 277-102 580-136 882-173 93 0 188 0 282 0 95 36 190 72 285 110 17 16 35 31 51 47z">
            <text:p/>
          </draw:path>
          <draw:path draw:style-name="gr457" draw:text-style-name="P21" draw:layer="layout" svg:width="6.258cm" svg:height="6.499cm" svg:x="-14.783cm" svg:y="-33.876cm" svg:viewBox="0 0 6259 6500" svg:d="M2156 33c935-72 1644-49 2525 313 674 277 1104 604 1277 116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489-807 489-807 0 0 661-259 1371-313z">
            <text:p/>
          </draw:path>
          <draw:rect draw:style-name="gr41" draw:text-style-name="P19" xml:id="id553" draw:id="id553" draw:layer="layout" svg:width="2.501cm" svg:height="1.419cm" svg:x="-7.097cm" svg:y="-31.071cm">
            <text:p text:style-name="P5"><text:span text:style-name="T4">Action</text:span><text:span text:style-name="T4"><text:line-break/></text:span><text:span text:style-name="T4">potential wave</text:span><text:span text:style-name="T4"><text:line-break/></text:span><text:span text:style-name="T4">superposition</text:span><text:span text:style-name="T4"><text:line-break/></text:span><text:span text:style-name="T4">(sensor fusion)</text:span></text:p>
          </draw:rect>
          <draw:custom-shape draw:style-name="gr668" draw:text-style-name="P123" xml:id="id548" draw:id="id548" draw:layer="layout" svg:width="0.323cm" svg:height="0.323cm" svg:x="-13.746cm" svg:y="-32.566cm">
            <text:p text:style-name="P122"/>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9" draw:text-style-name="P7" draw:layer="layout" draw:type="curve" svg:x1="-11.715cm" svg:y1="-32.394cm" svg:x2="-13.423cm" svg:y2="-32.404cm" draw:start-shape="id547" draw:start-glue-point="3" draw:end-shape="id548" draw:end-glue-point="10" svg:d="M-11715-32394c-1279 0-426-10-1708-10" svg:viewBox="0 0 1709 11">
            <text:p/>
          </draw:connector>
          <draw:custom-shape draw:style-name="gr460" draw:text-style-name="P125" xml:id="id550" draw:id="id550" draw:layer="layout" svg:width="0.323cm" svg:height="0.323cm" svg:x="-13.754cm" svg:y="-31.199cm">
            <text:p text:style-name="P124"/>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0" draw:text-style-name="P7" draw:layer="layout" draw:type="curve" svg:x1="-11.715cm" svg:y1="-31.037cm" svg:x2="-13.431cm" svg:y2="-31.037cm" draw:start-shape="id549" draw:start-glue-point="3" draw:end-shape="id550" draw:end-glue-point="10" svg:d="M-11715-31037h-1716" svg:viewBox="0 0 1717 1">
            <text:p/>
          </draw:connector>
          <draw:custom-shape draw:style-name="gr460" draw:text-style-name="P125" xml:id="id552" draw:id="id552" draw:layer="layout" svg:width="0.323cm" svg:height="0.323cm" svg:x="-13.685cm" svg:y="-28.504cm">
            <text:p text:style-name="P124"/>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14.083cm -27.936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16.799cm" svg:y="-30.964cm">
            <draw:text-box>
              <text:p text:style-name="P5">Sensors<text:line-break/>(receptors)</text:p>
            </draw:text-box>
          </draw:frame>
          <draw:connector draw:style-name="gr671" draw:text-style-name="P7" draw:layer="layout" draw:type="curve" svg:x1="-11.715cm" svg:y1="-28.322cm" svg:x2="-13.362cm" svg:y2="-28.342cm" draw:start-shape="id551" draw:start-glue-point="3" draw:end-shape="id552" draw:end-glue-point="10" svg:d="M-11715-28322c-1234 0-411-20-1647-20" svg:viewBox="0 0 1648 21">
            <text:p/>
          </draw:connector>
          <draw:custom-shape draw:style-name="gr672" draw:text-style-name="P206" draw:layer="layout" svg:width="2.381cm" svg:height="1.985cm" svg:x="-18.924cm" svg:y="-31.335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558" draw:id="id558" draw:layer="layout" svg:width="2.574cm" svg:height="1.396cm" svg:x="2.907cm" svg:y="-31.148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547" draw:id="id547" draw:layer="layout" svg:width="1.265cm" svg:height="1.082cm" svg:x="-11.715cm" svg:y="-32.935cm">
            <text:p text:style-name="P5"><text:span text:style-name="T4">Action</text:span><text:span text:style-name="T4"><text:line-break/></text:span><text:span text:style-name="T4">potential</text:span><text:span text:style-name="T4"><text:line-break/></text:span><text:span text:style-name="T4">wave</text:span></text:p>
          </draw:rect>
          <draw:connector draw:style-name="gr468" draw:text-style-name="P7" draw:layer="layout" draw:type="curve" svg:x1="-7.097cm" svg:y1="-30.361cm" svg:x2="-10.45cm" svg:y2="-32.394cm" draw:start-shape="id553" draw:start-glue-point="3" draw:end-shape="id547" draw:end-glue-point="1" svg:d="M-7097-30361c-2514 0-838-2033-3353-2033" svg:viewBox="0 0 3354 2034">
            <text:p/>
          </draw:connector>
          <draw:rect draw:style-name="gr41" draw:text-style-name="P19" xml:id="id549" draw:id="id549" draw:layer="layout" svg:width="1.265cm" svg:height="1.082cm" svg:x="-11.715cm" svg:y="-31.578cm">
            <text:p text:style-name="P5"><text:span text:style-name="T4">Action</text:span><text:span text:style-name="T4"><text:line-break/></text:span><text:span text:style-name="T4">potential</text:span><text:span text:style-name="T4"><text:line-break/></text:span><text:span text:style-name="T4">wave</text:span></text:p>
          </draw:rect>
          <draw:rect draw:style-name="gr41" draw:text-style-name="P19" xml:id="id551" draw:id="id551" draw:layer="layout" svg:width="1.265cm" svg:height="1.082cm" svg:x="-11.715cm" svg:y="-28.863cm">
            <text:p text:style-name="P5"><text:span text:style-name="T4">Action</text:span><text:span text:style-name="T4"><text:line-break/></text:span><text:span text:style-name="T4">potential</text:span><text:span text:style-name="T4"><text:line-break/></text:span><text:span text:style-name="T4">wave</text:span></text:p>
          </draw:rect>
          <draw:connector draw:style-name="gr469" draw:text-style-name="P7" draw:layer="layout" draw:type="curve" svg:x1="-7.097cm" svg:y1="-30.361cm" svg:x2="-10.45cm" svg:y2="-31.037cm" draw:start-shape="id553" draw:start-glue-point="3" draw:end-shape="id549" draw:end-glue-point="1" svg:d="M-7097-30361c-2514 0-838-676-3353-676" svg:viewBox="0 0 3354 677">
            <text:p/>
          </draw:connector>
          <draw:connector draw:style-name="gr36" draw:text-style-name="P7" draw:layer="layout" draw:type="curve" svg:x1="-7.097cm" svg:y1="-30.361cm" svg:x2="-10.45cm" svg:y2="-28.322cm" draw:start-shape="id553" draw:start-glue-point="3" draw:end-shape="id551" draw:end-glue-point="1" svg:d="M-7097-30361c-2514 0-838 2039-3353 2039" svg:viewBox="0 0 3354 2040">
            <text:p/>
          </draw:connector>
          <draw:connector draw:style-name="gr473" draw:text-style-name="P15" draw:layer="layout" draw:type="line" svg:x1="2.08cm" svg:y1="-29.121cm" svg:x2="7.486cm" svg:y2="-29.167cm" svg:d="M2080-29121l5406-46" svg:viewBox="0 0 5407 47">
            <text:p/>
          </draw:connector>
          <draw:frame draw:style-name="gr474" draw:text-style-name="P129" draw:layer="layout" svg:width="3.263cm" svg:height="1.199cm" svg:x="1.999cm" svg:y="-29.128cm">
            <draw:text-box>
              <text:p><text:span text:style-name="T39">Semantic</text:span></text:p>
            </draw:text-box>
          </draw:frame>
          <draw:connector draw:style-name="gr36" draw:text-style-name="P7" draw:layer="layout" draw:type="curve" svg:x1="-3.296cm" svg:y1="-30.361cm" svg:x2="-4.596cm" svg:y2="-30.361cm" draw:start-shape="id554" draw:start-glue-point="3" draw:end-shape="id553" draw:end-glue-point="1" svg:d="M-3296-30361h-1300" svg:viewBox="0 0 1301 1">
            <text:p/>
          </draw:connector>
          <draw:g draw:style-name="gr23">
            <draw:path draw:style-name="gr475" draw:text-style-name="P130" draw:layer="layout" svg:width="2.434cm" svg:height="7.621cm" svg:x="-0.297cm" svg:y="-34.194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0.308cm -29.20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556" draw:id="id556" draw:layer="layout" svg:width="2.574cm" svg:height="1.396cm" svg:x="10.007cm" svg:y="-31.148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6.719cm" svg:y1="-29.121cm" svg:x2="-1.313cm" svg:y2="-29.167cm" svg:d="M-6719-29121l5406-46" svg:viewBox="0 0 5407 47">
            <text:p/>
          </draw:connector>
          <draw:frame draw:style-name="gr474" draw:text-style-name="P129" draw:layer="layout" svg:width="3.263cm" svg:height="1.199cm" svg:x="-3.8cm" svg:y="-29.028cm">
            <draw:text-box>
              <text:p><text:span text:style-name="T39">signal-level</text:span></text:p>
            </draw:text-box>
          </draw:frame>
          <draw:rect draw:style-name="gr467" draw:text-style-name="P19" xml:id="id557" draw:id="id557" draw:layer="layout" svg:width="2.574cm" svg:height="1.396cm" svg:x="6.554cm" svg:y="-31.148cm">
            <text:p text:style-name="P5"><text:span text:style-name="T4">internal</text:span><text:span text:style-name="T4"><text:line-break/></text:span><text:span text:style-name="T4">language</text:span><text:span text:style-name="T4"><text:line-break/></text:span><text:span text:style-name="T4">(inner speech)</text:span></text:p>
          </draw:rect>
          <draw:rect draw:style-name="gr496" draw:text-style-name="P139" xml:id="id555" draw:id="id555" draw:layer="layout" svg:width="5.693cm" svg:height="3.474cm" svg:x="13.422cm" svg:y="-24.074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6.268cm" svg:y1="-24.074cm" svg:x2="11.294cm" svg:y2="-29.752cm" draw:start-shape="id555" draw:start-glue-point="0" draw:end-shape="id556" draw:end-glue-point="2" svg:d="M16268-24074c0-4257-4974-1418-4974-5678" svg:viewBox="0 0 4975 5679">
            <text:p/>
          </draw:connector>
          <draw:connector draw:style-name="gr36" draw:text-style-name="P7" draw:layer="layout" draw:type="curve" svg:x1="6.554cm" svg:y1="-30.45cm" svg:x2="5.481cm" svg:y2="-30.45cm" draw:start-shape="id557" draw:start-glue-point="3" draw:end-shape="id558" draw:end-glue-point="1" svg:d="M6554-30450h-1073" svg:viewBox="0 0 1074 1">
            <text:p/>
          </draw:connector>
          <draw:connector draw:style-name="gr36" draw:text-style-name="P7" draw:layer="layout" draw:type="curve" svg:x1="10.007cm" svg:y1="-30.45cm" svg:x2="9.128cm" svg:y2="-30.45cm" draw:start-shape="id556" draw:start-glue-point="3" draw:end-shape="id557" draw:end-glue-point="1" svg:d="M10007-30450h-879" svg:viewBox="0 0 880 1">
            <text:p/>
          </draw:connector>
          <draw:path draw:style-name="gr673" draw:text-style-name="P140" draw:layer="layout" svg:width="23.609cm" svg:height="6.044cm" svg:x="-12.749cm" svg:y="-23.99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674" draw:text-style-name="P13" draw:layer="layout" svg:width="3.475cm" svg:height="0.878cm" svg:x="-6.147cm" svg:y="-34.116cm">
            <draw:text-box>
              <text:p text:style-name="P3"><text:span text:style-name="T7">Robot 1</text:span></text:p>
            </draw:text-box>
          </draw:frame>
          <draw:connector draw:style-name="gr499" draw:text-style-name="P7" draw:layer="layout" draw:type="curve" svg:x1="9.264cm" svg:y1="-21.687cm" svg:x2="13.422cm" svg:y2="-22.337cm" draw:start-shape="id559" draw:start-glue-point="1" draw:end-shape="id555" draw:end-glue-point="3" svg:d="M9264-21687c3118 0 1040-650 4158-650" svg:viewBox="0 0 4159 651">
            <text:p text:style-name="P5"><text:span text:style-name="T4">Robot 1</text:span><text:span text:style-name="T4"><text:line-break/></text:span><text:span text:style-name="T4">utters</text:span><text:span text:style-name="T4"><text:line-break/></text:span><text:span text:style-name="T4">and decoder</text:span></text:p>
          </draw:connector>
          <draw:frame draw:style-name="gr675" draw:text-style-name="P13" draw:layer="layout" svg:width="3.475cm" svg:height="0.878cm" svg:x="-0.289cm" svg:y="-23.441cm">
            <draw:text-box>
              <text:p text:style-name="P3"><text:span text:style-name="T7">Robot 2</text:span></text:p>
            </draw:text-box>
          </draw:frame>
          <draw:rect draw:style-name="gr467" draw:text-style-name="P19" xml:id="id559" draw:id="id559" draw:layer="layout" svg:width="2.349cm" svg:height="1.195cm" svg:x="6.915cm" svg:y="-22.285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568" draw:id="id568" draw:layer="layout" svg:width="2.063cm" svg:height="1.396cm" svg:x="7.012cm" svg:y="-20.233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566" draw:id="id566" draw:layer="layout" svg:width="4.16cm" svg:height="0.97cm" svg:x="-12.445cm" svg:y="-21.225cm">
            <text:p text:style-name="P25"/>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12.232cm" svg:y="-20.995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11.187cm" svg:y="-20.995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10.208cm" svg:y="-20.995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9.084cm" svg:y="-20.995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11.677cm" svg:y1="-20.727cm" svg:x2="-11.227cm" svg:y2="-20.737cm">
              <text:p/>
            </draw:line>
            <draw:line draw:style-name="gr488" draw:text-style-name="P15" draw:layer="layout" svg:x1="-10.605cm" svg:y1="-20.713cm" svg:x2="-10.182cm" svg:y2="-20.724cm">
              <text:p/>
            </draw:line>
            <draw:line draw:style-name="gr488" draw:text-style-name="P15" draw:layer="layout" svg:x1="-9.559cm" svg:y1="-20.713cm" svg:x2="-9.044cm" svg:y2="-20.71cm">
              <text:p/>
            </draw:line>
          </draw:g>
          <draw:connector draw:style-name="gr36" draw:text-style-name="P7" draw:layer="layout" draw:type="curve" svg:x1="2.774cm" svg:y1="-20.748cm" svg:x2="4.434cm" svg:y2="-19.439cm" draw:start-shape="id560" draw:start-glue-point="1" draw:end-shape="id561" draw:end-glue-point="3" svg:d="M2774-20748c1246 0 417 1309 1660 1309" svg:viewBox="0 0 1661 1310">
            <text:p/>
          </draw:connector>
          <draw:connector draw:style-name="gr36" draw:text-style-name="P7" draw:layer="layout" draw:type="curve" svg:x1="2.774cm" svg:y1="-20.748cm" svg:x2="4.276cm" svg:y2="-22.039cm" draw:start-shape="id560" draw:start-glue-point="1" draw:end-shape="id562" draw:end-glue-point="3" svg:d="M2774-20748c1128 0 377-1291 1502-1291" svg:viewBox="0 0 1503 1292">
            <text:p/>
          </draw:connector>
          <draw:custom-shape draw:name="comment box 6" draw:style-name="gr676" draw:text-style-name="P20" xml:id="id563" draw:id="id563" draw:layer="layout" svg:width="2.572cm" svg:height="1.94cm" svg:x="-15.492cm" svg:y="-27.294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8" draw:text-style-name="P133" xml:id="id564" draw:id="id564" draw:layer="layout" svg:width="2.674cm" svg:height="0.97cm" svg:x="-3.601cm" svg:y="-21.241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7" draw:text-style-name="P133" xml:id="id565" draw:id="id565" draw:layer="layout" svg:width="2.674cm" svg:height="1.449cm" svg:x="-7.425cm" svg:y="-21.451cm">
            <text:p text:style-name="P25"><text:span text:style-name="T12">Social</text:span><text:span text:style-name="T12"><text:line-break/></text:span><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11.715cm" svg:y1="-28.322cm" svg:x2="-12.92cm" svg:y2="-26.324cm" draw:start-shape="id551" draw:start-glue-point="3" draw:end-shape="id563" draw:end-glue-point="7" svg:d="M-11715-28322c-888 0-286 1998-1205 1998" svg:viewBox="0 0 1206 1999">
            <text:p/>
          </draw:connector>
          <draw:connector draw:style-name="gr36" draw:text-style-name="P7" draw:layer="layout" draw:type="curve" svg:x1="-0.927cm" svg:y1="-20.756cm" svg:x2="0.376cm" svg:y2="-20.748cm" draw:start-shape="id564" draw:start-glue-point="10" draw:end-shape="id560" draw:end-glue-point="3" svg:d="M-927-20756c979 0 328 8 1303 8" svg:viewBox="0 0 1304 9">
            <text:p/>
          </draw:connector>
          <draw:connector draw:style-name="gr36" draw:text-style-name="P7" draw:layer="layout" draw:type="curve" svg:x1="-4.751cm" svg:y1="-20.726cm" svg:x2="-3.601cm" svg:y2="-20.756cm" draw:start-shape="id565" draw:start-glue-point="10" draw:end-shape="id564" draw:end-glue-point="6" svg:d="M-4751-20726c864 0 289-30 1150-30" svg:viewBox="0 0 1151 31">
            <text:p/>
          </draw:connector>
          <draw:connector draw:style-name="gr36" draw:text-style-name="P7" draw:layer="layout" draw:type="curve" svg:x1="-8.285cm" svg:y1="-20.74cm" svg:x2="-7.425cm" svg:y2="-20.726cm" draw:start-shape="id566" draw:start-glue-point="10" draw:end-shape="id565" draw:end-glue-point="6" svg:d="M-8285-20740c646 0 217 14 860 14" svg:viewBox="0 0 861 15">
            <text:p/>
          </draw:connector>
          <draw:custom-shape draw:name="comment box 16" draw:style-name="gr678" draw:text-style-name="P20" xml:id="id567" draw:id="id567" draw:layer="layout" svg:width="3.629cm" svg:height="2.55cm" svg:x="11.059cm" svg:y="-19.248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268cm" svg:y1="-20.6cm" svg:x2="14.688cm" svg:y2="-17.973cm" draw:start-shape="id555" draw:end-shape="id567" draw:end-glue-point="7" svg:d="M16268-20600c0 1752-526 2627-1580 2627" svg:viewBox="0 0 1581 2628">
            <text:p/>
          </draw:connector>
          <draw:polygon draw:style-name="gr508" draw:text-style-name="P145" xml:id="id562" draw:id="id562" draw:layer="layout" svg:width="1.215cm" svg:height="1.383cm" svg:x="4.276cm" svg:y="-22.731cm" svg:viewBox="0 0 1216 1384" draw:points="1216,1384 0,971 0,325 1216,0">
            <text:p/>
          </draw:polygon>
          <draw:frame draw:style-name="gr628" draw:text-style-name="P191" draw:layer="layout" svg:width="1.669cm" svg:height="0.887cm" svg:x="4.048cm" svg:y="-22.494cm">
            <draw:text-box>
              <text:p text:style-name="P5"><text:span text:style-name="T49">Robot 1</text:span><text:span text:style-name="T49"><text:line-break/></text:span><text:span text:style-name="T49">decoders</text:span></text:p>
            </draw:text-box>
          </draw:frame>
          <draw:rect draw:style-name="gr41" draw:text-style-name="P19" xml:id="id560" draw:id="id560" draw:layer="layout" svg:width="2.398cm" svg:height="1.621cm" svg:x="0.376cm" svg:y="-21.559cm">
            <text:p text:style-name="P3"><text:span text:style-name="T12">Action</text:span><text:span text:style-name="T12"><text:line-break/></text:span><text:span text:style-name="T12">potenti</text:span><text:span text:style-name="T12">als</text:span><text:span text:style-name="T12"><text:line-break/></text:span><text:span text:style-name="T12">from </text:span><text:span text:style-name="T12">both </text:span><text:span text:style-name="T12"><text:line-break/></text:span><text:span text:style-name="T12">robots</text:span></text:p>
          </draw:rect>
          <draw:connector draw:style-name="gr36" draw:text-style-name="P7" draw:layer="layout" draw:type="curve" svg:x1="5.492cm" svg:y1="-22.039cm" svg:x2="6.915cm" svg:y2="-21.687cm" draw:start-shape="id562" draw:start-glue-point="1" draw:end-shape="id559" draw:end-glue-point="3" svg:d="M5492-22039c1048 0 337 352 1423 352" svg:viewBox="0 0 1424 353">
            <text:p/>
          </draw:connector>
          <draw:frame draw:style-name="gr630" draw:text-style-name="P167" draw:layer="layout" svg:width="2.065cm" svg:height="0.645cm" svg:x="-14.179cm" svg:y="-33.097cm">
            <draw:text-box>
              <text:p><text:span text:style-name="T53">Sensor 1</text:span></text:p>
            </draw:text-box>
          </draw:frame>
          <draw:frame draw:style-name="gr629" draw:text-style-name="P167" draw:layer="layout" svg:width="2.441cm" svg:height="1.039cm" svg:x="-14.179cm" svg:y="-31.796cm">
            <draw:text-box>
              <text:p><text:span text:style-name="T53">Sensor 2</text:span></text:p>
            </draw:text-box>
          </draw:frame>
          <draw:frame draw:style-name="gr679" draw:text-style-name="P167" draw:layer="layout" svg:width="1.977cm" svg:height="0.655cm" svg:x="-14.077cm" svg:y="-29.194cm">
            <draw:text-box>
              <text:p><text:span text:style-name="T53">Sensor</text:span><text:span text:style-name="T70">p</text:span></text:p>
            </draw:text-box>
          </draw:frame>
          <draw:frame draw:style-name="gr135" draw:text-style-name="P41" draw:layer="layout" svg:width="1.24cm" svg:height="0.736cm" svg:x="2.669cm" svg:y="-19.753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451cm" svg:y="-22.5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561" draw:id="id561" draw:layer="layout" svg:width="1.215cm" svg:height="1.383cm" svg:x="4.434cm" svg:y="-20.131cm" svg:viewBox="0 0 1216 1384" draw:points="1216,1384 0,971 0,325 1216,0">
            <text:p/>
          </draw:polygon>
          <draw:frame draw:style-name="gr628" draw:text-style-name="P191" draw:layer="layout" svg:width="1.669cm" svg:height="0.887cm" svg:x="4.207cm" svg:y="-19.882cm">
            <draw:text-box>
              <text:p text:style-name="P5"><text:span text:style-name="T49">Robot 2</text:span><text:span text:style-name="T49"><text:line-break/></text:span><text:span text:style-name="T49">decoders</text:span></text:p>
            </draw:text-box>
          </draw:frame>
          <draw:connector draw:style-name="gr36" draw:text-style-name="P7" draw:layer="layout" draw:type="curve" svg:x1="5.65cm" svg:y1="-19.439cm" svg:x2="7.012cm" svg:y2="-19.535cm" draw:start-shape="id561" draw:start-glue-point="1" draw:end-shape="id568" draw:end-glue-point="3" svg:d="M5650-19439c1003 0 323-96 1362-96" svg:viewBox="0 0 1363 97">
            <text:p/>
          </draw:connector>
          <draw:frame draw:style-name="gr524" draw:text-style-name="P5" xml:id="id569" draw:id="id569" draw:layer="layout" svg:width="5.375cm" svg:height="1.92cm" svg:x="-6.605cm" svg:y="-24.821cm">
            <draw:object xlink:href="./Object 10" xlink:type="simple" xlink:show="embed" xlink:actuate="onLoad">
              <loext:p/>
            </draw:object>
            <draw:image xlink:href="./ObjectReplacements/Object 10" xlink:type="simple" xlink:show="embed" xlink:actuate="onLoad"/>
          </draw:frame>
          <draw:connector draw:style-name="gr29" draw:text-style-name="P15" draw:layer="layout" draw:type="curve" svg:x1="-2.264cm" svg:y1="-21.241cm" svg:x2="-1.23cm" svg:y2="-23.861cm" draw:start-shape="id564" draw:start-glue-point="4" draw:end-shape="id569" draw:end-glue-point="1" svg:d="M-2264-21241c0-1245 767-1037 1213-1381s571-1239-179-1239" svg:viewBox="0 0 1573 2621">
            <text:p/>
          </draw:connector>
          <draw:frame draw:style-name="gr632" draw:text-style-name="P16" xml:id="id570" draw:id="id570" draw:layer="layout" svg:width="2.796cm" svg:height="0.911cm" svg:x="-11.792cm" svg:y="-24.671cm">
            <draw:text-box>
              <text:p text:style-name="P66"><text:span text:style-name="T63">derivative-free </text:span><text:span text:style-name="T63"><text:line-break/></text:span><text:span text:style-name="T63">global optimizer</text:span></text:p>
            </draw:text-box>
          </draw:frame>
          <draw:connector draw:style-name="gr633" draw:text-style-name="P7" draw:layer="layout" draw:type="curve" svg:x1="-6.605cm" svg:y1="-23.861cm" svg:x2="-8.996cm" svg:y2="-24.215cm" draw:start-shape="id569" draw:start-glue-point="3" draw:end-shape="id570" svg:d="M-6605-23861c-1792 0-597-354-2391-354" svg:viewBox="0 0 2392 355">
            <text:p text:style-name="P5"><text:span text:style-name="T4">using</text:span></text:p>
          </draw:connector>
          <draw:frame draw:style-name="gr524" draw:text-style-name="P5" xml:id="id571" draw:id="id571" draw:layer="layout" svg:width="4.615cm" svg:height="0.907cm" svg:x="-15.651cm" svg:y="-22.635cm">
            <draw:object xlink:href="./Object 11" xlink:type="simple" xlink:show="embed" xlink:actuate="onLoad">
              <loext:p/>
            </draw:object>
            <draw:image xlink:href="./ObjectReplacements/Object 11" xlink:type="simple" xlink:show="embed" xlink:actuate="onLoad"/>
          </draw:frame>
          <draw:connector draw:style-name="gr633" draw:text-style-name="P7" draw:layer="layout" draw:type="curve" svg:x1="-11.792cm" svg:y1="-24.215cm" svg:x2="-13.343cm" svg:y2="-22.635cm" draw:start-shape="id570" draw:start-glue-point="3" draw:end-shape="id571" draw:end-glue-point="0" svg:d="M-11792-24215c-1034 0-1551 526-1551 1580" svg:viewBox="0 0 1552 1581">
            <text:p text:style-name="P5"><text:span text:style-name="T4">converting</text:span></text:p>
          </draw:connector>
          <draw:connector draw:style-name="gr634" draw:text-style-name="P7" draw:layer="layout" draw:type="curve" draw:line-skew="0.726cm" svg:x1="-13.343cm" svg:y1="-21.728cm" svg:x2="-4.751cm" svg:y2="-20.726cm" draw:start-shape="id571" draw:start-glue-point="2" draw:end-shape="id565" draw:end-glue-point="10" svg:d="M-13343-21728c0 4431 4548 3693 6884 2836s2461-1834 1708-1834" svg:viewBox="0 0 9004 3486">
            <text:p text:style-name="P5"><text:span text:style-name="T4">converting</text:span></text:p>
          </draw:connector>
          <draw:rect draw:style-name="gr41" draw:text-style-name="P19" xml:id="id554" draw:id="id554" draw:layer="layout" svg:width="2.747cm" svg:height="1.768cm" svg:x="-3.296cm" svg:y="-31.245cm">
            <text:p text:style-name="P5"><text:span text:style-name="T4">Short-term</text:span><text:span text:style-name="T4"><text:line-break/></text:span><text:span text:style-name="T4">memory </text:span><text:span text:style-name="T4">buffering</text:span><text:span text:style-name="T4"><text:line-break/></text:span><text:span text:style-name="T4">(Sliding </text:span><text:span text:style-name="T4">window</text:span><text:span text:style-name="T4"><text:line-break/></text:span><text:span text:style-name="T4">length </text:span><text:span text:style-name="T4">matches </text:span><text:span text:style-name="T4"><text:line-break/></text:span><text:span text:style-name="T4">frequency </text:span><text:span text:style-name="T4">alignment)</text:span></text:p>
          </draw:rect>
          <draw:custom-shape draw:style-name="gr680" draw:text-style-name="P208" draw:layer="layout" svg:width="0.178cm" svg:height="0.178cm" svg:x="-13.684cm" svg:y="-2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0" draw:text-style-name="P208" draw:layer="layout" svg:width="0.178cm" svg:height="0.178cm" svg:x="-13.684cm" svg:y="-30.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0" draw:text-style-name="P208" draw:layer="layout" svg:width="0.178cm" svg:height="0.178cm" svg:x="-13.684cm" svg:y="-3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3">
          <draw:polygon draw:style-name="gr508" draw:text-style-name="P145" draw:layer="layout" svg:width="1.311cm" svg:height="1.383cm" svg:x="-11.837cm" svg:y="-39.584cm" svg:viewBox="0 0 1312 1384" draw:points="1312,1384 0,792 0,591 1312,0">
            <text:p/>
          </draw:polygon>
          <draw:frame draw:style-name="gr631" draw:text-style-name="P192" draw:layer="layout" svg:width="1.732cm" svg:height="0.569cm" svg:x="-11.946cm" svg:y="-39.186cm">
            <draw:text-box>
              <text:p><text:span text:style-name="T62">decoder</text:span></text:p>
            </draw:text-box>
          </draw:frame>
        </draw:g>
        <draw:g draw:style-name="gr31">
          <draw:g draw:style-name="gr23">
            <draw:polygon draw:style-name="gr510" draw:text-style-name="P113" draw:layer="layout" svg:width="1.292cm" svg:height="1.358cm" svg:x="-13.212cm" svg:y="-39.572cm" svg:viewBox="0 0 1293 1359" draw:points="0,0 1293,581 1293,777 0,1359">
              <text:p/>
            </draw:polygon>
          </draw:g>
          <draw:frame draw:style-name="gr495" draw:text-style-name="P193" draw:layer="layout" svg:width="1.673cm" svg:height="0.887cm" svg:x="-13.391cm" svg:y="-39.195cm">
            <draw:text-box>
              <text:p><text:span text:style-name="T62">encoder</text:span></text:p>
            </draw:text-box>
          </draw:frame>
        </draw:g>
        <draw:connector draw:style-name="gr642" draw:text-style-name="P15" draw:layer="layout" draw:type="line" svg:x1="-16.926cm" svg:y1="-39.76cm" svg:x2="-16.902cm" svg:y2="-37.79cm" svg:d="M-16926-39760l24 1970" svg:viewBox="0 0 25 1971">
          <text:p/>
        </draw:connector>
        <draw:frame draw:style-name="gr681" draw:text-style-name="P194" draw:layer="layout" svg:width="3.475cm" svg:height="0.878cm" svg:x="-16.952cm" svg:y="-39.323cm">
          <draw:text-box>
            <text:p text:style-name="P3"><text:span text:style-name="T66">RO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3DT1H35M42S</meta:editing-duration>
    <meta:editing-cycles>805</meta:editing-cycles>
    <meta:generator>LibreOffice/25.8.0.4$Linux_X86_64 LibreOffice_project/48f00303701489684e67c38c28aff00cd5929e67</meta:generator>
    <dc:title>diagram</dc:title>
    <dc:date>2026-05-12T22:04:51.266599670</dc:date>
    <meta:document-statistic meta:object-count="2059"/>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10/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11/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