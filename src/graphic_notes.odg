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tent.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4"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7" manifest:media-type=""/>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Thumbnails/thumbnail.png" manifest:media-type="image/png"/>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4" manifest:media-type="application/vnd.oasis.opendocument.formula"/>
  <manifest:file-entry manifest:full-path="Pictures/10000000000002D80000032646F0B612.png" manifest:media-type="image/png"/>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99600004225000027461A447516.svg" manifest:media-type="image/svg+xml"/>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8000001F99B6A82D1.png" manifest:media-type="image/png"/>
  <manifest:file-entry manifest:full-path="Pictures/10000000000002B2000003BD26BB6070.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2C5000001ADB823F0C7.png" manifest:media-type="image/png"/>
  <manifest:file-entry manifest:full-path="Pictures/10000001000002800000017C0782A2E4.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meta.xml" manifest:media-type="text/xml"/>
  <manifest:file-entry manifest:full-path="Configurations2/" manifest:media-type="application/vnd.sun.xml.ui.configuration"/>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8" style:family="graphic" style:parent-style-name="objectwithoutfill">
      <style:graphic-properties draw:marker-end="Arrowheads_20_225" draw:marker-end-width="0.3cm" draw:fill="solid" draw:textarea-vertical-align="middle" loext:decorative="false"/>
    </style:style>
    <style:style style:name="gr269" style:family="graphic" style:parent-style-name="objectwithoutfill">
      <style:graphic-properties draw:marker-end="Arrowheads_20_228" draw:marker-end-width="0.3cm" draw:fill="solid" draw:textarea-vertical-align="middle" loext:decorative="false"/>
    </style:style>
    <style:style style:name="gr270" style:family="graphic" style:parent-style-name="objectwithoutfill">
      <style:graphic-properties draw:marker-end="Arrowheads_20_229" draw:marker-end-width="0.3cm" draw:fill="solid" draw:textarea-vertical-align="middle" loext:decorative="false"/>
    </style:style>
    <style:style style:name="gr271" style:family="graphic" style:parent-style-name="objectwithoutfill">
      <style:graphic-properties draw:marker-end="Arrowheads_20_230" draw:marker-end-width="0.3cm" draw:fill="solid" draw:textarea-vertical-align="middle" loext:decorative="false"/>
    </style:style>
    <style:style style:name="gr272" style:family="graphic" style:parent-style-name="objectwithoutfill">
      <style:graphic-properties draw:marker-end="Arrowheads_20_231" draw:marker-end-width="0.3cm" draw:fill="solid" draw:textarea-vertical-align="middle" loext:decorative="false"/>
    </style:style>
    <style:style style:name="gr273"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4" style:family="graphic" style:parent-style-name="objectwithoutfill">
      <style:graphic-properties draw:marker-end="Arrowheads_20_233"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6" style:family="graphic" style:parent-style-name="standard">
      <style:graphic-properties draw:textarea-horizontal-align="center" draw:textarea-vertical-align="middle" loext:decorative="false"/>
      <style:paragraph-properties style:writing-mode="lr-tb"/>
    </style:style>
    <style:style style:name="gr277" style:family="graphic" style:parent-style-name="objectwithoutfill">
      <style:graphic-properties draw:marker-end="Arrowheads_20_234" draw:marker-end-width="0.3cm" draw:fill="solid" draw:textarea-vertical-align="middle" loext:decorative="false"/>
    </style:style>
    <style:style style:name="gr278" style:family="graphic" style:parent-style-name="objectwithoutfill">
      <style:graphic-properties draw:marker-end="Arrowheads_20_235" draw:marker-end-width="0.3cm" draw:fill="solid" draw:textarea-vertical-align="middle" loext:decorative="false"/>
    </style:style>
    <style:style style:name="gr279" style:family="graphic" style:parent-style-name="standard">
      <style:graphic-properties draw:stroke="solid" svg:stroke-color="#b2b2b2" draw:fill="solid" draw:fill-color="#ffffff" draw:textarea-horizontal-align="justify" draw:textarea-vertical-align="middle" draw:auto-grow-height="false" fo:min-height="1.214cm" fo:min-width="3.66cm" style:writing-mode="lr-tb" loext:decorative="false"/>
      <style:paragraph-properties style:writing-mode="lr-tb"/>
    </style:style>
    <style:style style:name="gr280" style:family="graphic" style:parent-style-name="standard">
      <style:graphic-properties svg:stroke-color="#70ae61" draw:fill="solid" draw:fill-color="#accda1" draw:textarea-vertical-align="middle"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objectwithoutfill">
      <style:graphic-properties draw:marker-end="Arrowheads_20_68" draw:marker-end-width="0.3cm" draw:fill="solid" draw:textarea-vertical-align="middle" loext:decorative="false"/>
    </style:style>
    <style:style style:name="gr298" style:family="graphic" style:parent-style-name="objectwithoutfill">
      <style:graphic-properties draw:marker-end="Arrowheads_20_69" draw:marker-end-width="0.3cm" draw:fill="solid" draw:textarea-vertical-align="middle" loext:decorative="false"/>
    </style:style>
    <style:style style:name="gr299" style:family="graphic" style:parent-style-name="objectwithoutfill">
      <style:graphic-properties draw:marker-end="Arrowheads_20_70" draw:marker-end-width="0.3cm" draw:fill="solid" draw:textarea-vertical-align="middle" loext:decorative="false"/>
    </style:style>
    <style:style style:name="gr300" style:family="graphic" style:parent-style-name="objectwithoutfill">
      <style:graphic-properties draw:marker-end="Arrowheads_20_71" draw:marker-end-width="0.3cm" draw:fill="solid" draw:textarea-vertical-align="middle" loext:decorative="false"/>
    </style:style>
    <style:style style:name="gr301" style:family="graphic" style:parent-style-name="objectwithoutfill">
      <style:graphic-properties draw:marker-end="Arrowheads_20_100" draw:marker-end-width="0.3cm" draw:fill="solid" draw:textarea-vertical-align="middle" loext:decorative="false"/>
    </style:style>
    <style:style style:name="gr302" style:family="graphic" style:parent-style-name="objectwithoutfill">
      <style:graphic-properties draw:marker-end="Arrowheads_20_101" draw:marker-end-width="0.3cm" draw:fill="solid" draw:textarea-vertical-align="middle" loext:decorative="false"/>
    </style:style>
    <style:style style:name="gr303" style:family="graphic" style:parent-style-name="objectwithoutfill">
      <style:graphic-properties draw:marker-end="Arrowheads_20_215" draw:marker-end-width="0.3cm" draw:fill="solid" draw:textarea-vertical-align="middle" loext:decorative="false"/>
    </style:style>
    <style:style style:name="gr304"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5" style:family="graphic" style:parent-style-name="objectwithoutfill">
      <style:graphic-properties draw:marker-end="Arrowheads_20_216" draw:marker-end-width="0.3cm" draw:fill="solid" draw:textarea-vertical-align="middle" loext:decorative="false"/>
    </style:style>
    <style:style style:name="gr306" style:family="graphic" style:parent-style-name="objectwithoutfill">
      <style:graphic-properties draw:marker-end="Arrowheads_20_217" draw:marker-end-width="0.3cm" draw:fill="solid" draw:textarea-vertical-align="middle" loext:decorative="false"/>
    </style:style>
    <style:style style:name="gr307" style:family="graphic" style:parent-style-name="objectwithoutfill">
      <style:graphic-properties draw:marker-end="Arrowheads_20_218" draw:marker-end-width="0.3cm" draw:fill="solid" draw:textarea-vertical-align="middle" loext:decorative="false"/>
    </style:style>
    <style:style style:name="gr308" style:family="graphic" style:parent-style-name="objectwithoutfill">
      <style:graphic-properties draw:marker-end="Arrowheads_20_219" draw:marker-end-width="0.3cm" draw:fill="solid" draw:textarea-vertical-align="middle" loext:decorative="false"/>
    </style:style>
    <style:style style:name="gr309" style:family="graphic" style:parent-style-name="objectwithoutfill">
      <style:graphic-properties draw:marker-end="Arrowheads_20_239" draw:marker-end-width="0.3cm" draw:fill="solid" draw:fill-color="#8fd7d7" draw:textarea-vertical-align="middle" loext:decorative="false"/>
    </style:style>
    <style:style style:name="gr310" style:family="graphic" style:parent-style-name="objectwithoutfill">
      <style:graphic-properties draw:marker-end="Arrowheads_20_240" draw:marker-end-width="0.3cm" draw:fill="solid" draw:fill-color="#8fd7d7" draw:textarea-vertical-align="middle" loext:decorative="false"/>
    </style:style>
    <style:style style:name="gr311" style:family="graphic" style:parent-style-name="objectwithoutfill">
      <style:graphic-properties draw:marker-end="Arrowheads_20_241" draw:marker-end-width="0.3cm" draw:fill="solid" draw:fill-color="#8fd7d7" draw:textarea-vertical-align="middle" loext:decorative="false"/>
    </style:style>
    <style:style style:name="gr312" style:family="graphic" style:parent-style-name="objectwithoutfill">
      <style:graphic-properties draw:marker-end="Arrowheads_20_242" draw:marker-end-width="0.3cm" draw:fill="solid" draw:fill-color="#8fd7d7" draw:textarea-vertical-align="middle" loext:decorative="false"/>
    </style:style>
    <style:style style:name="gr313" style:family="graphic" style:parent-style-name="objectwithoutfill">
      <style:graphic-properties draw:marker-end="Arrowheads_20_247" draw:marker-end-width="0.3cm" draw:fill="solid" draw:textarea-vertical-align="middle" loext:decorative="false"/>
    </style:style>
    <style:style style:name="gr314" style:family="graphic" style:parent-style-name="objectwithoutfill">
      <style:graphic-properties draw:marker-end="Arrowheads_20_248" draw:marker-end-width="0.3cm" draw:fill="solid" draw:textarea-vertical-align="middle" loext:decorative="false"/>
    </style:style>
    <style:style style:name="gr315" style:family="graphic" style:parent-style-name="objectwithoutfill">
      <style:graphic-properties draw:marker-end="Arrowheads_20_249" draw:marker-end-width="0.3cm" draw:fill="solid" draw:textarea-vertical-align="middle" loext:decorative="false"/>
    </style:style>
    <style:style style:name="gr316" style:family="graphic" style:parent-style-name="objectwithoutfill">
      <style:graphic-properties draw:marker-end="Arrowheads_20_251" draw:marker-end-width="0.3cm" draw:fill="solid" draw:textarea-vertical-align="middle" loext:decorative="false"/>
    </style:style>
    <style:style style:name="gr317"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5" draw:marker-end-width="0.3cm" draw:fill="solid" draw:textarea-vertical-align="middle" loext:decorative="false"/>
    </style:style>
    <style:style style:name="gr426"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7" style:family="graphic" style:parent-style-name="objectwithoutfill">
      <style:graphic-properties draw:marker-end="Arrowheads_20_307" draw:marker-end-width="0.3cm" draw:fill="solid" draw:textarea-vertical-align="middle" loext:decorative="false"/>
    </style:style>
    <style:style style:name="gr428" style:family="graphic" style:parent-style-name="objectwithoutfill">
      <style:graphic-properties draw:marker-end="Arrowheads_20_308" draw:marker-end-width="0.3cm" draw:fill="solid" draw:textarea-vertical-align="middle" loext:decorative="false"/>
    </style:style>
    <style:style style:name="gr429" style:family="graphic" style:parent-style-name="objectwithoutfill">
      <style:graphic-properties draw:marker-end="Arrowheads_20_314" draw:marker-end-width="0.3cm" draw:fill="solid" draw:textarea-vertical-align="middle" loext:decorative="false"/>
    </style:style>
    <style:style style:name="gr430" style:family="graphic" style:parent-style-name="objectwithoutfill">
      <style:graphic-properties draw:marker-end="Arrowheads_20_315" draw:marker-end-width="0.3cm" draw:fill="solid" draw:textarea-vertical-align="middle" loext:decorative="false"/>
    </style:style>
    <style:style style:name="gr431" style:family="graphic" style:parent-style-name="objectwithoutfill">
      <style:graphic-properties draw:marker-end="Arrowheads_20_295" draw:marker-end-width="0.3cm" draw:fill="solid" draw:textarea-vertical-align="middle" loext:decorative="false"/>
    </style:style>
    <style:style style:name="gr432" style:family="graphic" style:parent-style-name="standard">
      <style:graphic-properties draw:fill="solid" draw:fill-color="#b4d2ea" draw:textarea-vertical-align="middle" loext:decorative="false"/>
      <style:paragraph-properties style:writing-mode="lr-tb"/>
    </style:style>
    <style:style style:name="gr433" style:family="graphic" style:parent-style-name="standard">
      <style:graphic-properties svg:stroke-color="#00b0be" draw:fill="solid" draw:fill-color="#b4d2ea" draw:textarea-vertical-align="middle" loext:decorative="false"/>
      <style:paragraph-properties style:writing-mode="lr-tb"/>
    </style:style>
    <style:style style:name="gr434" style:family="graphic" style:parent-style-name="objectwithoutfill">
      <style:graphic-properties svg:stroke-color="#d86a50" draw:marker-end="Arrowheads_20_339" draw:marker-end-width="0.3cm" draw:fill="solid" draw:textarea-vertical-align="middle" loext:decorative="false"/>
    </style:style>
    <style:style style:name="gr435" style:family="graphic" style:parent-style-name="objectwithoutfill">
      <style:graphic-properties svg:stroke-color="#d86a50" draw:marker-end="Arrowheads_20_340" draw:marker-end-width="0.3cm" draw:fill="solid" draw:textarea-vertical-align="middle" loext:decorative="false"/>
    </style:style>
    <style:style style:name="gr436" style:family="graphic" style:parent-style-name="objectwithoutfill">
      <style:graphic-properties svg:stroke-color="#d86a50" draw:marker-end="Arrowheads_20_341" draw:marker-end-width="0.3cm" draw:fill="solid" draw:textarea-vertical-align="middle" loext:decorative="false"/>
    </style:style>
    <style:style style:name="gr437" style:family="graphic" style:parent-style-name="objectwithoutfill">
      <style:graphic-properties draw:marker-end="Arrowheads_20_342" draw:marker-end-width="0.3cm" draw:fill="solid" draw:textarea-vertical-align="middle" loext:decorative="false"/>
    </style:style>
    <style:style style:name="gr438" style:family="graphic" style:parent-style-name="objectwithoutfill">
      <style:graphic-properties draw:marker-end="Arrowheads_20_348" draw:marker-end-width="0.3cm" draw:fill="solid" draw:textarea-vertical-align="middle" loext:decorative="false"/>
    </style:style>
    <style:style style:name="gr439" style:family="graphic" style:parent-style-name="objectwithoutfill">
      <style:graphic-properties draw:marker-end="Arrowheads_20_349" draw:marker-end-width="0.3cm" draw:fill="solid" draw:textarea-vertical-align="middle" loext:decorative="false"/>
    </style:style>
    <style:style style:name="gr440" style:family="graphic" style:parent-style-name="objectwithoutfill">
      <style:graphic-properties draw:marker-end="Arrowheads_20_350" draw:marker-end-width="0.3cm" draw:fill="solid" draw:textarea-vertical-align="middle" loext:decorative="false"/>
    </style:style>
    <style:style style:name="gr441" style:family="graphic" style:parent-style-name="standard">
      <style:graphic-properties draw:stroke="solid" svg:stroke-color="#345d95" draw:fill="solid" draw:fill-color="#6390c2" draw:textarea-vertical-align="middle" loext:decorative="false"/>
      <style:paragraph-properties style:writing-mode="lr-tb"/>
    </style:style>
    <style:style style:name="gr442" style:family="graphic" style:parent-style-name="standard">
      <style:graphic-properties draw:stroke="solid" svg:stroke-color="#d86a50" draw:fill="solid" draw:fill-color="#9b592e" draw:textarea-vertical-align="middle" loext:decorative="false"/>
      <style:paragraph-properties style:writing-mode="lr-tb"/>
    </style:style>
    <style:style style:name="gr443" style:family="graphic" style:parent-style-name="objectwithoutfill">
      <style:graphic-properties draw:marker-end="Arrowheads_20_351" draw:marker-end-width="0.3cm" draw:fill="solid" draw:textarea-vertical-align="middle" loext:decorative="false"/>
    </style:style>
    <style:style style:name="gr444" style:family="graphic" style:parent-style-name="objectwithoutfill">
      <style:graphic-properties draw:marker-end="Arrowheads_20_352" draw:marker-end-width="0.3cm" draw:fill="solid" draw:textarea-vertical-align="middle" loext:decorative="false"/>
    </style:style>
    <style:style style:name="gr445" style:family="graphic" style:parent-style-name="objectwithoutfill">
      <style:graphic-properties draw:marker-end="Arrowheads_20_353" draw:marker-end-width="0.3cm" draw:fill="solid" draw:textarea-vertical-align="middle" loext:decorative="false"/>
    </style:style>
    <style:style style:name="gr446" style:family="graphic" style:parent-style-name="objectwithoutfill">
      <style:graphic-properties draw:marker-end="Arrowheads_20_354" draw:marker-end-width="0.3cm" draw:fill="solid" draw:textarea-vertical-align="middle" loext:decorative="false"/>
    </style:style>
    <style:style style:name="gr447" style:family="graphic" style:parent-style-name="objectwithoutfill">
      <style:graphic-properties draw:marker-end="Arrowheads_20_355" draw:marker-end-width="0.3cm" draw:fill="solid" draw:textarea-vertical-align="middle" loext:decorative="false"/>
    </style:style>
    <style:style style:name="gr448" style:family="graphic" style:parent-style-name="objectwithoutfill">
      <style:graphic-properties draw:marker-end="Arrowheads_20_356" draw:marker-end-width="0.3cm" draw:fill="solid" draw:textarea-vertical-align="middle" loext:decorative="false"/>
    </style:style>
    <style:style style:name="gr449" style:family="graphic" style:parent-style-name="objectwithoutfill">
      <style:graphic-properties draw:marker-end="Arrowheads_20_357" draw:marker-end-width="0.3cm" draw:fill="solid" draw:textarea-vertical-align="middle"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51" style:family="graphic" style:parent-style-name="objectwithoutfill">
      <style:graphic-properties draw:marker-end="Arrowheads_20_377" draw:marker-end-width="0.3cm" draw:fill="solid" draw:textarea-vertical-align="middle" loext:decorative="false"/>
    </style:style>
    <style:style style:name="gr452" style:family="graphic" style:parent-style-name="objectwithoutfill">
      <style:graphic-properties draw:marker-end="Arrowheads_20_378" draw:marker-end-width="0.3cm" draw:fill="solid" draw:textarea-vertical-align="middle" loext:decorative="false"/>
    </style:style>
    <style:style style:name="gr453" style:family="graphic" style:parent-style-name="objectwithoutfill">
      <style:graphic-properties draw:marker-end="Arrowheads_20_379" draw:marker-end-width="0.3cm" draw:fill="solid" draw:textarea-vertical-align="middle" loext:decorative="false"/>
    </style:style>
    <style:style style:name="gr454" style:family="graphic" style:parent-style-name="objectwithoutfill">
      <style:graphic-properties draw:marker-end="Arrowheads_20_380" draw:marker-end-width="0.3cm" draw:fill="solid" draw:textarea-vertical-align="middle" loext:decorative="false"/>
    </style:style>
    <style:style style:name="gr455" style:family="graphic" style:parent-style-name="objectwithoutfill">
      <style:graphic-properties draw:marker-end="Arrowheads_20_381" draw:marker-end-width="0.3cm" draw:fill="solid" draw:textarea-vertical-align="middle" loext:decorative="false"/>
    </style:style>
    <style:style style:name="gr45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5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5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5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6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6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6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6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7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7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7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7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7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78" style:family="graphic" style:parent-style-name="objectwithoutfill">
      <style:graphic-properties draw:marker-end="Arrowheads_20_398" draw:marker-end-width="0.3cm" draw:fill="solid" draw:textarea-vertical-align="middle" loext:decorative="false"/>
    </style:style>
    <style:style style:name="gr47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8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8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84" style:family="graphic" style:parent-style-name="standard">
      <style:graphic-properties draw:stroke="none" draw:fill="none" fo:min-height="0.32cm" loext:decorative="false"/>
      <style:paragraph-properties style:writing-mode="lr-tb"/>
    </style:style>
    <style:style style:name="gr48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8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8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8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8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490" style:family="graphic" style:parent-style-name="standard">
      <style:graphic-properties draw:stroke="none" draw:fill="none" draw:textarea-horizontal-align="center" fo:min-height="0.955cm" loext:decorative="false"/>
      <style:paragraph-properties style:writing-mode="lr-tb"/>
    </style:style>
    <style:style style:name="gr491"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2"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493" style:family="graphic" style:parent-style-name="standard" style:list-style-name="L1">
      <style:graphic-properties draw:stroke="none" draw:fill="solid" draw:fill-color="#70ae61" draw:textarea-vertical-align="middle" draw:auto-grow-height="false" fo:min-height="1.455cm" fo:min-width="1.511cm" fo:wrap-option="wrap" style:writing-mode="lr-tb" loext:decorative="false"/>
      <style:paragraph-properties style:writing-mode="lr-tb"/>
    </style:style>
    <style:style style:name="gr494" style:family="graphic" style:parent-style-name="standard">
      <style:graphic-properties draw:stroke="none" svg:stroke-color="#000000" draw:fill="none" draw:fill-color="#ffffff" draw:textarea-horizontal-align="center" draw:auto-grow-height="true" draw:auto-grow-width="true" fo:min-height="0.908cm" fo:min-width="3.06cm" loext:decorative="false"/>
      <style:paragraph-properties style:writing-mode="lr-tb"/>
    </style:style>
    <style:style style:name="gr495"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496"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497"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8"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99"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0"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01"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02" style:family="graphic" style:parent-style-name="objectwithoutfill">
      <style:graphic-properties draw:marker-end="" draw:marker-end-width="0.1cm" draw:fill="solid" draw:textarea-vertical-align="middle" loext:decorative="false"/>
    </style:style>
    <style:style style:name="gr503"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04" style:family="graphic" style:parent-style-name="objectwithoutfill">
      <style:graphic-properties draw:marker-start="Arrow_20_short" draw:marker-end="" draw:marker-end-width="0.2cm" draw:fill="solid" draw:textarea-vertical-align="middle" loext:decorative="false"/>
    </style:style>
    <style:style style:name="gr505" style:family="graphic" style:parent-style-name="objectwithoutfill">
      <style:graphic-properties draw:marker-start="" draw:marker-end="Arrow_20_short" draw:marker-end-width="0.2cm" draw:fill="solid" draw:textarea-vertical-align="middle" loext:decorative="false"/>
    </style:style>
    <style:style style:name="gr506"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07"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08"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09"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10" style:family="graphic" style:parent-style-name="standard">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1" style:family="graphic" style:parent-style-name="standard">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512" style:family="graphic" style:parent-style-name="standard">
      <style:graphic-properties draw:stroke="none" draw:fill="solid" draw:fill-color="#6390c2" draw:textarea-horizontal-align="justify" draw:textarea-vertical-align="middle" draw:auto-grow-height="false" fo:min-height="0.782cm" fo:min-width="0.448cm" style:writing-mode="lr-tb" loext:decorative="false"/>
      <style:paragraph-properties style:writing-mode="lr-tb"/>
    </style:style>
    <style:style style:name="gr513"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4"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5" style:family="graphic" style:parent-style-name="standard" style:list-style-name="L1">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516"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7"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18" style:family="graphic" style:parent-style-name="standard">
      <style:graphic-properties draw:stroke="none" draw:fill="solid" draw:fill-color="#6390c2" draw:textarea-horizontal-align="justify" draw:textarea-vertical-align="middle" draw:auto-grow-height="false" fo:min-height="0.783cm" fo:min-width="0.448cm" style:writing-mode="lr-tb" loext:decorative="false"/>
      <style:paragraph-properties style:writing-mode="lr-tb"/>
    </style:style>
    <style:style style:name="gr519" style:family="graphic" style:parent-style-name="standard">
      <style:graphic-properties draw:fill="none" draw:textarea-vertical-align="middle" draw:auto-grow-height="false" fo:min-height="5.322cm" fo:min-width="0cm" fo:wrap-option="wrap" loext:decorative="false"/>
    </style:style>
    <style:style style:name="gr520"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21" style:family="graphic" style:parent-style-name="standard">
      <style:graphic-properties draw:fill="none" draw:textarea-vertical-align="middle" draw:auto-grow-height="false" fo:min-height="8.775cm" fo:min-width="0.065cm" fo:wrap-option="wrap" loext:decorative="false"/>
    </style:style>
    <style:style style:name="gr522" style:family="graphic" style:parent-style-name="standard">
      <style:graphic-properties draw:stroke="none" svg:stroke-color="#000000" draw:fill="none" draw:fill-color="#ffffff" draw:textarea-horizontal-align="left" draw:auto-grow-height="true" draw:auto-grow-width="true" fo:min-height="3.691cm" fo:min-width="4.336cm" loext:decorative="false"/>
      <style:paragraph-properties style:writing-mode="lr-tb"/>
    </style:style>
    <style:style style:name="gr523" style:family="graphic" style:parent-style-name="Object_20_with_20_no_20_fill_20_and_20_no_20_line">
      <style:graphic-properties draw:textarea-horizontal-align="center" draw:textarea-vertical-align="middle" draw:ole-draw-aspect="1" style:protect="size" loext:decorative="false"/>
    </style:style>
    <style:style style:name="gr524"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5"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6"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7" style:family="graphic" style:parent-style-name="objectwithoutfill">
      <style:graphic-properties draw:marker-end="Arrowheads_20_418" draw:marker-end-width="0.3cm" draw:fill="solid" draw:textarea-vertical-align="middle" loext:decorative="false"/>
    </style:style>
    <style:style style:name="gr5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29"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30" style:family="graphic" style:parent-style-name="standard">
      <style:graphic-properties draw:stroke="none" draw:fill="none" draw:textarea-horizontal-align="center" fo:min-height="1.971cm" loext:decorative="false"/>
      <style:paragraph-properties style:writing-mode="lr-tb"/>
    </style:style>
    <style:style style:name="gr531" style:family="graphic" style:parent-style-name="standard">
      <style:graphic-properties draw:textarea-horizontal-align="justify" draw:textarea-vertical-align="middle" draw:auto-grow-height="false" fo:min-height="3.285cm" fo:min-width="2.618cm" loext:decorative="false"/>
    </style:style>
    <style:style style:name="gr532" style:family="graphic" style:parent-style-name="standard">
      <style:graphic-properties draw:stroke="none" draw:fill="solid" draw:fill-color="#345d95" draw:textarea-vertical-align="middle" draw:auto-grow-height="false" fo:min-height="0cm" fo:min-width="0cm" loext:decorative="false"/>
    </style:style>
    <style:style style:name="gr533"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4" style:family="graphic" style:parent-style-name="standard">
      <style:graphic-properties draw:stroke="none" draw:fill="solid" draw:fill-color="#b4d2ea" draw:textarea-vertical-align="middle" draw:auto-grow-height="false" fo:min-height="0cm" fo:min-width="0cm" loext:decorative="false"/>
    </style:style>
    <style:style style:name="gr535"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36"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37"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38"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39"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40"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41" style:family="graphic" style:parent-style-name="objectwithoutfill">
      <style:graphic-properties draw:marker-end="Arrowheads_20_419" draw:marker-end-width="0.2cm" draw:fill="solid" draw:textarea-vertical-align="middle" loext:decorative="false"/>
    </style:style>
    <style:style style:name="gr542"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4"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45" style:family="graphic" style:parent-style-name="standard" style:list-style-name="L1">
      <style:graphic-properties draw:stroke="none" draw:fill="none" fo:min-height="0.48cm" loext:decorative="false"/>
      <style:paragraph-properties style:writing-mode="lr-tb"/>
    </style:style>
    <style:style style:name="gr546" style:family="graphic" style:parent-style-name="standard" style:list-style-name="L1">
      <style:graphic-properties draw:stroke="none" draw:fill="none" fo:min-height="0.48cm" loext:decorative="false"/>
      <style:paragraph-properties style:writing-mode="lr-tb"/>
    </style:style>
    <style:style style:name="gr547"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48" style:family="graphic" style:parent-style-name="standard">
      <style:graphic-properties draw:marker-start="Arrow" draw:marker-start-width="0.05cm" draw:marker-end="Arrow" draw:marker-end-width="0.05cm" draw:textarea-vertical-align="middle" loext:decorative="false"/>
    </style:style>
    <style:style style:name="gr549"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50" style:family="graphic" style:parent-style-name="objectwithoutfill">
      <style:graphic-properties draw:marker-end="Arrow" draw:marker-end-width="0.2cm" draw:fill="solid" draw:textarea-vertical-align="middle" loext:decorative="false"/>
    </style:style>
    <style:style style:name="gr551"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2"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3" style:family="graphic" style:parent-style-name="standard">
      <style:graphic-properties draw:marker-end="Arrowheads_20_420" draw:textarea-vertical-align="middle" loext:decorative="false"/>
    </style:style>
    <style:style style:name="gr554"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55"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58"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59"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60"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61"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2"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3"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64" style:family="graphic" style:parent-style-name="standard">
      <style:graphic-properties draw:stroke="none" draw:fill="none" draw:textarea-horizontal-align="center" fo:min-height="1.183cm" loext:decorative="false"/>
      <style:paragraph-properties style:writing-mode="lr-tb"/>
    </style:style>
    <style:style style:name="gr565"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66" style:family="graphic" style:parent-style-name="objectwithoutfill">
      <style:graphic-properties draw:marker-end="Arrow" draw:marker-end-width="0.1cm" draw:fill="solid" draw:textarea-vertical-align="middle" loext:decorative="false"/>
    </style:style>
    <style:style style:name="gr567"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68"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69"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70"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71"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2" style:family="graphic" style:parent-style-name="objectwithoutfill">
      <style:graphic-properties draw:marker-end="Arrow" draw:marker-end-width="0.1cm" draw:fill="solid" draw:textarea-vertical-align="bottom" loext:decorative="false"/>
    </style:style>
    <style:style style:name="gr573"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4" style:family="graphic" style:parent-style-name="Arrow_20_Line" style:list-style-name="L1">
      <style:graphic-properties draw:textarea-vertical-align="middle" draw:line-distance="0.14cm" loext:decorative="false"/>
      <style:paragraph-properties style:writing-mode="lr-tb"/>
    </style:style>
    <style:style style:name="gr575"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76"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77"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78"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79"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80"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81"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2"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3"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4"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85"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86"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87"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88"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89"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90"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91"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2"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3"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4"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95"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96"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97"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598"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599"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600"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601"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2"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3"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4"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05"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06"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07"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08"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09"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10" style:family="graphic" style:parent-style-name="standard">
      <style:graphic-properties draw:fill="none" draw:textarea-vertical-align="middle" draw:auto-grow-height="false" fo:min-height="1.481cm" fo:min-width="0cm" fo:wrap-option="wrap" loext:decorative="false"/>
    </style:style>
    <style:style style:name="gr611" style:family="graphic" style:parent-style-name="standard">
      <style:graphic-properties draw:stroke="none" svg:stroke-color="#000000" draw:fill="none" draw:fill-color="#ffffff" draw:textarea-horizontal-align="center" draw:auto-grow-height="true" draw:auto-grow-width="true" fo:min-height="2.646cm" fo:min-width="4.144cm" loext:decorative="false"/>
      <style:paragraph-properties style:writing-mode="lr-tb"/>
    </style:style>
    <style:style style:name="gr612" style:family="graphic" style:parent-style-name="standard">
      <style:graphic-properties draw:fill="none" draw:textarea-vertical-align="middle" draw:auto-grow-height="false" fo:min-height="1.095cm" fo:min-width="0cm" fo:wrap-option="wrap" loext:decorative="false"/>
    </style:style>
    <style:style style:name="gr613" style:family="graphic" style:parent-style-name="objectwithoutfill">
      <style:graphic-properties draw:marker-end="Arrowheads_20_399" draw:marker-end-width="0.1cm" draw:fill="solid" draw:textarea-vertical-align="middle" loext:decorative="false"/>
    </style:style>
    <style:style style:name="gr614" style:family="graphic" style:parent-style-name="objectwithoutfill">
      <style:graphic-properties draw:marker-end="Arrowheads_20_400" draw:marker-end-width="0.1cm" draw:fill="solid" draw:textarea-vertical-align="middle" loext:decorative="false"/>
    </style:style>
    <style:style style:name="gr615"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1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17"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18"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19"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20" style:family="graphic" style:parent-style-name="standard">
      <style:graphic-properties draw:stroke="none" svg:stroke-color="#000000" draw:fill="none" draw:fill-color="#ffffff" draw:textarea-horizontal-align="left" draw:auto-grow-height="true" draw:auto-grow-width="true" fo:min-height="0.788cm" fo:min-width="6.916cm" loext:decorative="false"/>
      <style:paragraph-properties style:writing-mode="lr-tb"/>
    </style:style>
    <style:style style:name="gr621" style:family="graphic" style:parent-style-name="objectwithoutfill">
      <style:graphic-properties draw:marker-start="Arrow" draw:marker-start-width="0.15cm" draw:marker-end="Arrow" draw:marker-end-width="0.15cm" draw:fill="solid" draw:textarea-vertical-align="middle" loext:decorative="false"/>
    </style:style>
    <style:style style:name="gr622" style:family="graphic" style:parent-style-name="objectwithoutfill">
      <style:graphic-properties draw:marker-start="" draw:marker-start-width="0.15cm" draw:marker-end="Arrow" draw:marker-end-width="0.15cm" draw:fill="solid" draw:textarea-vertical-align="middle" loext:decorative="false"/>
    </style:style>
    <style:style style:name="gr623" style:family="graphic" style:parent-style-name="standard">
      <style:graphic-properties draw:stroke="none" svg:stroke-color="#000000" draw:fill="none" draw:fill-color="#ffffff" draw:textarea-horizontal-align="left" draw:auto-grow-height="true" draw:auto-grow-width="true" fo:min-height="0.395cm" fo:min-width="3.537cm" loext:decorative="false"/>
      <style:paragraph-properties style:writing-mode="lr-tb"/>
    </style:style>
    <style:style style:name="gr624"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25"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2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27"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28"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31" style:family="graphic" style:parent-style-name="standard">
      <style:graphic-properties draw:stroke="none" draw:fill="none" fo:min-height="0.637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33"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34"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gr635" style:family="graphic" style:parent-style-name="objectwithoutfill">
      <style:graphic-properties draw:marker-end="Arrowheads_20_309" draw:marker-end-width="0.3cm" draw:fill="solid" draw:textarea-vertical-align="middle" loext:decorative="false"/>
    </style:style>
    <style:style style:name="gr636" style:family="graphic" style:parent-style-name="objectwithoutfill">
      <style:graphic-properties draw:marker-end="Arrowheads_20_310" draw:marker-end-width="0.3cm" draw:fill="solid" draw:textarea-vertical-align="middle" loext:decorative="false"/>
    </style:style>
    <style:style style:name="gr637" style:family="graphic" style:parent-style-name="objectwithoutfill">
      <style:graphic-properties draw:marker-end="Arrowheads_20_311" draw:marker-end-width="0.3cm" draw:fill="solid" draw:textarea-vertical-align="middle" loext:decorative="false"/>
    </style:style>
    <style:style style:name="gr638" style:family="graphic" style:parent-style-name="objectwithoutfill">
      <style:graphic-properties draw:marker-end="Arrowheads_20_312" draw:marker-end-width="0.3cm" draw:fill="solid" draw:textarea-vertical-align="middle" loext:decorative="false"/>
    </style:style>
    <style:style style:name="gr639" style:family="graphic" style:parent-style-name="objectwithoutfill">
      <style:graphic-properties draw:marker-end="Arrowheads_20_313" draw:marker-end-width="0.3cm" draw:fill="solid" draw:textarea-vertical-align="middle" loext:decorative="false"/>
    </style:style>
    <style:style style:name="gr640" style:family="graphic" style:parent-style-name="standard">
      <style:graphic-properties draw:stroke="solid" svg:stroke-color="#b2b2b2" draw:fill="solid" draw:fill-color="#ffffff" draw:textarea-horizontal-align="justify" draw:textarea-vertical-align="middle" draw:auto-grow-height="false" fo:min-height="2.218cm" fo:min-width="4.061cm" style:writing-mode="lr-tb" loext:decorative="false"/>
      <style:paragraph-properties style:writing-mode="lr-tb"/>
    </style:style>
    <style:style style:name="gr641" style:family="graphic" style:parent-style-name="objectwithoutfill">
      <style:graphic-properties draw:marker-end="Arrowheads_20_331" draw:marker-end-width="0.3cm" draw:fill="solid" draw:textarea-vertical-align="middle" loext:decorative="false"/>
      <style:paragraph-properties style:writing-mode="lr-tb"/>
    </style:style>
    <style:style style:name="gr642"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643"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44" style:family="graphic" style:parent-style-name="standard">
      <style:graphic-properties draw:stroke="solid" draw:stroke-dash="Dash_20_Dot_20_4" svg:stroke-width="0.095cm" svg:stroke-color="#263238" draw:stroke-linejoin="round" svg:stroke-linecap="round" draw:textarea-horizontal-align="center" draw:textarea-vertical-align="middle" fo:padding-top="0.172cm" fo:padding-bottom="0.172cm" fo:padding-left="0.297cm" fo:padding-right="0.297cm" loext:decorative="false"/>
    </style:style>
    <style:style style:name="gr645" style:family="graphic" style:parent-style-name="standard">
      <style:graphic-properties draw:stroke="dash" draw:stroke-dash="Dash_20_Dot_20_4" svg:stroke-width="0cm" svg:stroke-color="#263238" draw:stroke-linejoin="none" svg:stroke-linecap="round" draw:fill="solid" draw:fill-color="#f4b183" draw:textarea-horizontal-align="center" draw:textarea-vertical-align="middle" loext:decorative="false"/>
    </style:style>
    <style:style style:name="gr646" style:family="graphic" style:parent-style-name="standard">
      <style:graphic-properties draw:stroke="solid" draw:stroke-dash="Dash_20_Dot_20_4" svg:stroke-width="0.095cm" svg:stroke-color="#263238" draw:stroke-linejoin="miter" svg:stroke-linecap="butt" draw:fill="none" draw:fill-color="#f4b183" draw:textarea-horizontal-align="center" draw:textarea-vertical-align="middle" fo:padding-top="0.172cm" fo:padding-bottom="0.172cm" fo:padding-left="0.297cm" fo:padding-right="0.297cm" loext:decorative="false"/>
    </style:style>
    <style:style style:name="gr647" style:family="graphic" style:parent-style-name="standard">
      <style:graphic-properties draw:stroke="dash" draw:stroke-dash="Dash_20_Dot_20_4" svg:stroke-width="0cm" svg:stroke-color="#263238" draw:stroke-linejoin="none" svg:stroke-linecap="butt" draw:fill="solid" draw:fill-color="#c96b5f" draw:textarea-horizontal-align="center" draw:textarea-vertical-align="middle" loext:decorative="false"/>
    </style:style>
    <style:style style:name="gr648" style:family="graphic" style:parent-style-name="standard">
      <style:graphic-properties draw:stroke="solid" draw:stroke-dash="Dash_20_Dot_20_4" svg:stroke-width="0.076cm" svg:stroke-color="#263238" draw:stroke-linejoin="miter" svg:stroke-linecap="butt" draw:fill="none" draw:fill-color="#c96b5f" draw:textarea-horizontal-align="center" draw:textarea-vertical-align="middle" fo:padding-top="0.163cm" fo:padding-bottom="0.163cm" fo:padding-left="0.288cm" fo:padding-right="0.288cm" loext:decorative="false"/>
    </style:style>
    <style:style style:name="gr649" style:family="graphic" style:parent-style-name="standard">
      <style:graphic-properties draw:stroke="dash" draw:stroke-dash="Dash_20_Dot_20_4" svg:stroke-width="0cm" svg:stroke-color="#263238" draw:stroke-linejoin="none" svg:stroke-linecap="butt" draw:fill="solid" draw:fill-color="#7f3f3f" draw:textarea-horizontal-align="center" draw:textarea-vertical-align="middle" loext:decorative="false"/>
    </style:style>
    <style:style style:name="gr650" style:family="graphic" style:parent-style-name="standard">
      <style:graphic-properties draw:stroke="dash" draw:stroke-dash="Dash_20_Dot_20_4" svg:stroke-width="0cm" svg:stroke-color="#263238" draw:stroke-linejoin="none" svg:stroke-linecap="round" draw:fill="solid" draw:fill-color="#a8dadc" draw:textarea-horizontal-align="center" draw:textarea-vertical-align="middle" loext:decorative="false"/>
    </style:style>
    <style:style style:name="gr651" style:family="graphic" style:parent-style-name="standard">
      <style:graphic-properties draw:stroke="solid" draw:stroke-dash="Dash_20_Dot_20_4" svg:stroke-width="0.076cm" svg:stroke-color="#263238" draw:stroke-linejoin="miter" svg:stroke-linecap="butt" draw:fill="none" draw:fill-color="#a8dadc" draw:textarea-horizontal-align="center" draw:textarea-vertical-align="middle" fo:padding-top="0.163cm" fo:padding-bottom="0.163cm" fo:padding-left="0.288cm" fo:padding-right="0.288cm" loext:decorative="false"/>
    </style:style>
    <style:style style:name="gr652" style:family="graphic" style:parent-style-name="standard">
      <style:graphic-properties draw:stroke="dash" draw:stroke-dash="Dash_20_Dot_20_4" svg:stroke-width="0cm" svg:stroke-color="#263238" draw:stroke-linejoin="none" svg:stroke-linecap="butt" draw:fill="solid" draw:fill-color="#a8dadc" draw:textarea-horizontal-align="center" draw:textarea-vertical-align="middle" loext:decorative="false"/>
    </style:style>
    <style:style style:name="gr653" style:family="graphic" style:parent-style-name="standard">
      <style:graphic-properties draw:stroke="solid" draw:stroke-dash="Dash_20_Dot_20_4" svg:stroke-width="0.057cm" svg:stroke-color="#263238" draw:stroke-linejoin="round" svg:stroke-linecap="round" draw:textarea-horizontal-align="center" draw:textarea-vertical-align="middle" fo:padding-top="0.153cm" fo:padding-bottom="0.153cm" fo:padding-left="0.278cm" fo:padding-right="0.278cm" loext:decorative="false"/>
    </style:style>
    <style:style style:name="gr654" style:family="graphic" style:parent-style-name="standard">
      <style:graphic-properties draw:stroke="dash" draw:stroke-dash="Dash_20_Dot_20_4" svg:stroke-width="0cm" svg:stroke-color="#263238" draw:stroke-linejoin="none" svg:stroke-linecap="round" draw:fill="solid" draw:fill-color="#263238" draw:textarea-horizontal-align="center" draw:textarea-vertical-align="middle" loext:decorative="false"/>
    </style:style>
    <style:style style:name="gr655" style:family="graphic" style:parent-style-name="standard">
      <style:graphic-properties draw:stroke="none" draw:fill="none" draw:fill-color="#ffffff" draw:textarea-horizontal-align="left" draw:auto-grow-width="true" fo:min-height="0.484cm" fo:min-width="1.85cm" fo:padding-top="0cm" fo:padding-bottom="0cm" fo:padding-left="0cm" fo:padding-right="0cm" loext:decorative="false"/>
      <style:paragraph-properties style:writing-mode="lr-tb"/>
    </style:style>
    <style:style style:name="gr656" style:family="graphic" style:parent-style-name="standard">
      <style:graphic-properties draw:stroke="none" draw:fill="none" draw:fill-color="#ffffff" draw:textarea-horizontal-align="left" draw:auto-grow-width="true" fo:min-height="0.484cm" fo:min-width="3.194cm" fo:padding-top="0cm" fo:padding-bottom="0cm" fo:padding-left="0cm" fo:padding-right="0cm" loext:decorative="false"/>
      <style:paragraph-properties style:writing-mode="lr-tb"/>
    </style:style>
    <style:style style:name="gr657" style:family="graphic" style:parent-style-name="standard">
      <style:graphic-properties draw:stroke="none" draw:fill="none" draw:fill-color="#ffffff" draw:textarea-horizontal-align="left" draw:auto-grow-width="true" fo:min-height="0.389cm" fo:min-width="1.287cm" fo:padding-top="0cm" fo:padding-bottom="0cm" fo:padding-left="0cm" fo:padding-right="0cm" loext:decorative="false"/>
      <style:paragraph-properties style:writing-mode="lr-tb"/>
    </style:style>
    <style:style style:name="gr658" style:family="graphic" style:parent-style-name="standard">
      <style:graphic-properties draw:stroke="none" draw:fill="none" draw:fill-color="#ffffff" draw:textarea-horizontal-align="left" draw:auto-grow-width="true" fo:min-height="0.484cm" fo:min-width="2.306cm" fo:padding-top="0cm" fo:padding-bottom="0cm" fo:padding-left="0cm" fo:padding-right="0cm" loext:decorative="false"/>
      <style:paragraph-properties style:writing-mode="lr-tb"/>
    </style:style>
    <style:style style:name="gr659" style:family="graphic" style:parent-style-name="standard">
      <style:graphic-properties draw:stroke="none" draw:fill="none" draw:fill-color="#ffffff" draw:textarea-horizontal-align="left" draw:auto-grow-width="true" fo:min-height="0.484cm" fo:min-width="2.666cm" fo:padding-top="0cm" fo:padding-bottom="0cm" fo:padding-left="0cm" fo:padding-right="0cm" loext:decorative="false"/>
      <style:paragraph-properties style:writing-mode="lr-tb"/>
    </style:style>
    <style:style style:name="gr660" style:family="graphic" style:parent-style-name="standard">
      <style:graphic-properties draw:stroke="none" draw:fill="none" draw:fill-color="#ffffff" draw:textarea-horizontal-align="left" draw:auto-grow-width="true" fo:min-height="0.389cm" fo:min-width="2.477cm" fo:padding-top="0cm" fo:padding-bottom="0cm" fo:padding-left="0cm" fo:padding-right="0cm" loext:decorative="false"/>
      <style:paragraph-properties style:writing-mode="lr-tb"/>
    </style:style>
    <style:style style:name="gr661" style:family="graphic" style:parent-style-name="standard">
      <style:graphic-properties draw:stroke="none" draw:fill="none" draw:fill-color="#ffffff" draw:textarea-horizontal-align="left" draw:auto-grow-width="true" fo:min-height="0.484cm" fo:min-width="2.858cm" fo:padding-top="0cm" fo:padding-bottom="0cm" fo:padding-left="0cm" fo:padding-right="0cm" loext:decorative="false"/>
      <style:paragraph-properties style:writing-mode="lr-tb"/>
    </style:style>
    <style:style style:name="gr662" style:family="graphic" style:parent-style-name="standard">
      <style:graphic-properties draw:stroke="none" draw:fill="none" draw:fill-color="#ffffff" draw:textarea-horizontal-align="left" draw:auto-grow-width="true" fo:min-height="0.389cm" fo:min-width="4.155cm" fo:padding-top="0cm" fo:padding-bottom="0cm" fo:padding-left="0cm" fo:padding-right="0cm" loext:decorative="false"/>
      <style:paragraph-properties style:writing-mode="lr-tb"/>
    </style:style>
    <style:style style:name="gr663" style:family="graphic" style:parent-style-name="standard" style:list-style-name="L1">
      <style:graphic-properties draw:stroke="none" draw:fill="solid" draw:fill-color="#ff5128" draw:textarea-vertical-align="middle" draw:auto-grow-height="false" fo:min-height="3.044cm" fo:min-width="3.452cm" fo:wrap-option="wrap" style:writing-mode="lr-tb" loext:decorative="false"/>
      <style:paragraph-properties style:writing-mode="lr-tb"/>
    </style:style>
    <style:style style:name="gr664" style:family="graphic" style:parent-style-name="standard">
      <style:graphic-properties svg:stroke-color="#e8995a" draw:fill="solid" draw:fill-color="#ffe0d9" draw:textarea-horizontal-align="justify" draw:textarea-vertical-align="middle" draw:auto-grow-height="false" fo:min-height="0.636cm" fo:min-width="1.343cm" style:writing-mode="lr-tb"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fo:min-height="0.949cm" fo:min-width="3.155cm" loext:decorative="false"/>
      <style:paragraph-properties style:writing-mode="lr-tb"/>
    </style:style>
    <style:style style:name="gr666" style:family="graphic" style:parent-style-name="standard">
      <style:graphic-properties draw:fill="solid" draw:fill-color="#f45f74" draw:textarea-horizontal-align="justify" draw:textarea-vertical-align="middle" draw:auto-grow-height="false" fo:min-height="1.333cm" fo:min-width="2.273cm" style:writing-mode="lr-tb" loext:decorative="false"/>
      <style:paragraph-properties style:writing-mode="lr-tb"/>
    </style:style>
    <style:style style:name="gr667" style:family="graphic" style:parent-style-name="standard">
      <style:graphic-properties draw:stroke="solid" svg:stroke-color="#b2b2b2" draw:fill="solid" draw:fill-color="#ffffff" draw:textarea-horizontal-align="justify" draw:textarea-vertical-align="middle" draw:auto-grow-height="false" fo:min-height="1.258cm" fo:min-width="1.976cm" style:writing-mode="lr-tb"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2" style:family="paragraph">
      <loext:graphic-properties draw:fill="solid" draw:fill-color="#accda1"/>
      <style:paragraph-properties fo:text-align="center"/>
    </style:style>
    <style:style style:name="P73" style:family="paragraph">
      <loext:graphic-properties draw:fill="solid" draw:fill-color="#b4d2ea"/>
      <style:paragraph-properties fo:margin-left="0cm" fo:margin-right="0cm" fo:text-align="center" fo:text-indent="0cm"/>
      <style:text-properties fo:color="#000000" loext:opacity="100%"/>
    </style:style>
    <style:style style:name="P74" style:family="paragraph">
      <style:paragraph-properties fo:margin-left="0cm" fo:margin-right="0cm" fo:text-align="center" fo:text-indent="0cm" style:text-autospace="ideograph-alpha"/>
    </style:style>
    <style:style style:name="P75" style:family="paragraph">
      <loext:graphic-properties draw:fill="solid" draw:fill-color="#b4d2ea"/>
      <style:paragraph-properties fo:text-align="center" style:text-autospace="none"/>
      <style:text-properties fo:color="#000000" loext:opacity="100%"/>
    </style:style>
    <style:style style:name="P76" style:family="paragraph">
      <style:paragraph-properties fo:margin-left="0cm" fo:margin-right="0cm" fo:margin-top="0cm" fo:margin-bottom="0cm" fo:text-align="center" fo:text-indent="0cm"/>
    </style:style>
    <style:style style:name="P77" style:family="paragraph">
      <loext:graphic-properties draw:fill="solid" draw:fill-color="#b4d2ea"/>
      <style:paragraph-properties fo:margin-top="0.42cm" fo:margin-bottom="0.35cm" fo:text-align="center"/>
      <style:text-properties fo:color="#000000" loext:opacity="100%"/>
    </style:style>
    <style:style style:name="P78" style:family="paragraph">
      <style:paragraph-properties fo:margin-left="0cm" fo:margin-right="0cm" fo:margin-top="0.42cm" fo:margin-bottom="0.35cm" fo:text-align="center" fo:text-indent="0cm"/>
    </style:style>
    <style:style style:name="P79" style:family="paragraph">
      <loext:graphic-properties draw:fill="none"/>
      <style:paragraph-properties fo:text-align="center"/>
      <style:text-properties fo:font-size="18pt"/>
    </style:style>
    <style:style style:name="P80"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2" style:family="paragraph">
      <loext:graphic-properties draw:fill="solid" draw:fill-color="#00aaad"/>
      <style:paragraph-properties fo:text-align="center"/>
      <style:text-properties fo:font-size="18pt"/>
    </style:style>
    <style:style style:name="P83" style:family="paragraph">
      <loext:graphic-properties draw:fill="solid" draw:fill-color="#dde8cb"/>
      <style:paragraph-properties fo:text-align="center"/>
      <style:text-properties fo:font-size="18pt"/>
    </style:style>
    <style:style style:name="P84" style:family="paragraph">
      <loext:graphic-properties draw:fill="none"/>
      <style:paragraph-properties fo:text-align="center"/>
      <style:text-properties fo:font-size="18pt" style:font-size-asian="18pt" style:font-size-complex="18pt"/>
    </style:style>
    <style:style style:name="P85" style:family="paragraph">
      <loext:graphic-properties draw:fill="solid" draw:fill-color="#b3cac7"/>
      <style:paragraph-properties fo:text-align="center"/>
      <style:text-properties fo:font-size="18pt"/>
    </style:style>
    <style:style style:name="P86"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7" style:family="paragraph">
      <style:paragraph-properties fo:text-align="center"/>
      <style:text-properties fo:font-size="18pt"/>
    </style:style>
    <style:style style:name="P88" style:family="paragraph">
      <loext:graphic-properties draw:fill="none"/>
      <style:text-properties fo:font-size="18pt" style:font-size-asian="18pt" style:font-size-complex="18pt"/>
    </style:style>
    <style:style style:name="P89" style:family="paragraph">
      <loext:graphic-properties draw:fill="none"/>
      <style:text-properties fo:font-size="12pt" fo:font-weight="bold" style:font-size-asian="12pt" style:font-weight-asian="bold" style:font-size-complex="12pt" style:font-weight-complex="bold"/>
    </style:style>
    <style:style style:name="P90" style:family="paragraph">
      <loext:graphic-properties draw:fill="solid" draw:fill-color="#fffcdf"/>
    </style:style>
    <style:style style:name="P91" style:family="paragraph">
      <loext:graphic-properties draw:fill="solid" draw:fill-color="#00a65d"/>
      <style:paragraph-properties fo:text-align="center"/>
    </style:style>
    <style:style style:name="P92" style:family="paragraph">
      <loext:graphic-properties draw:fill="solid" draw:fill-color="#0066b3"/>
      <style:paragraph-properties fo:text-align="center"/>
    </style:style>
    <style:style style:name="P93" style:family="paragraph">
      <loext:graphic-properties draw:fill="solid" draw:fill-color="#28a127"/>
      <style:paragraph-properties fo:text-align="center"/>
    </style:style>
    <style:style style:name="P94" style:family="paragraph">
      <loext:graphic-properties draw:fill="solid" draw:fill-color="#bcaed5" draw:opacity="50%"/>
      <style:paragraph-properties fo:text-align="center"/>
    </style:style>
    <style:style style:name="P95" style:family="paragraph">
      <loext:graphic-properties draw:fill="solid" draw:fill-color="#bce4e5" draw:opacity="50%"/>
      <style:paragraph-properties fo:text-align="center"/>
    </style:style>
    <style:style style:name="P96" style:family="paragraph">
      <loext:graphic-properties draw:fill="solid" draw:fill-color="#bee3d3"/>
      <style:paragraph-properties fo:text-align="center"/>
      <style:text-properties fo:font-weight="bold" style:font-weight-asian="bold" style:font-weight-complex="bold"/>
    </style:style>
    <style:style style:name="P97" style:family="paragraph">
      <loext:graphic-properties draw:fill="none"/>
      <style:paragraph-properties fo:text-align="center"/>
      <style:text-properties fo:font-weight="normal"/>
    </style:style>
    <style:style style:name="P98" style:family="paragraph">
      <loext:graphic-properties draw:fill="solid" draw:fill-color="#000000"/>
    </style:style>
    <style:style style:name="P99" style:family="paragraph">
      <style:paragraph-properties style:writing-mode="lr-tb"/>
    </style:style>
    <style:style style:name="P100"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1"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2" style:family="paragraph">
      <loext:graphic-properties draw:fill="hatch" draw:fill-color="#ffffff" draw:fill-hatch-name="Hatching_20_7" draw:fill-hatch-solid="true"/>
      <style:paragraph-properties fo:text-align="center"/>
    </style:style>
    <style:style style:name="P103" style:family="paragraph">
      <loext:graphic-properties draw:fill="solid" draw:fill-color="#e8995a"/>
      <style:paragraph-properties fo:text-align="center"/>
    </style:style>
    <style:style style:name="P104" style:family="paragraph">
      <loext:graphic-properties draw:fill="solid" draw:fill-color="#c7bcda"/>
      <style:paragraph-properties fo:text-align="center"/>
    </style:style>
    <style:style style:name="P105" style:family="paragraph">
      <loext:graphic-properties draw:fill="solid" draw:fill-color="#f9dc8c"/>
      <style:paragraph-properties fo:text-align="center"/>
    </style:style>
    <style:style style:name="P106" style:family="paragraph">
      <loext:graphic-properties draw:fill="solid" draw:fill-color="#b4d2ea"/>
      <style:paragraph-properties fo:text-align="center"/>
    </style:style>
    <style:style style:name="P107" style:family="paragraph">
      <loext:graphic-properties draw:fill="solid" draw:fill-color="#f6f5f8"/>
      <style:paragraph-properties fo:text-align="center"/>
    </style:style>
    <style:style style:name="P108" style:family="paragraph">
      <loext:graphic-properties draw:fill="solid" draw:fill-color="#f6f5f8"/>
      <style:paragraph-properties fo:margin-left="0cm" fo:margin-right="0cm" fo:margin-top="0cm" fo:margin-bottom="0cm" fo:line-height="100%" fo:text-align="center" fo:text-indent="0cm"/>
    </style:style>
    <style:style style:name="P109"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0" style:family="paragraph">
      <loext:graphic-properties draw:fill="solid" draw:fill-color="#9b592e"/>
      <style:paragraph-properties fo:text-align="center"/>
      <style:text-properties fo:font-weight="normal" style:font-weight-asian="normal" style:font-weight-complex="normal"/>
    </style:style>
    <style:style style:name="P111" style:family="paragraph">
      <loext:graphic-properties draw:fill="solid" draw:fill-color="#d86a50"/>
      <style:paragraph-properties fo:text-align="center"/>
      <style:text-properties fo:font-weight="bold" fo:background-color="#ffffff" style:font-weight-asian="bold" style:font-weight-complex="bold"/>
    </style:style>
    <style:style style:name="P112"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3" style:family="paragraph">
      <loext:graphic-properties draw:fill="solid" draw:fill-color="#6390c2"/>
      <style:paragraph-properties fo:text-align="center"/>
    </style:style>
    <style:style style:name="P114" style:family="paragraph">
      <loext:graphic-properties draw:fill="solid" draw:fill-color="#ffffff"/>
      <style:paragraph-properties fo:text-align="center" style:writing-mode="lr-tb"/>
      <style:text-properties fo:font-size="8pt" style:font-size-asian="8pt" style:font-size-complex="8pt"/>
    </style:style>
    <style:style style:name="P115"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6"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7"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8"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style:paragraph-properties fo:text-align="start"/>
    </style:style>
    <style:style style:name="P120" style:family="paragraph">
      <loext:graphic-properties draw:fill="none" draw:fill-color="#ffffff"/>
      <style:paragraph-properties fo:text-align="start"/>
      <style:text-properties fo:font-size="10pt" style:font-size-asian="10pt" style:font-size-complex="10pt"/>
    </style:style>
    <style:style style:name="P121" style:family="paragraph">
      <loext:graphic-properties draw:fill="solid" draw:fill-color="#c7bcda" draw:opacity="100%"/>
      <style:paragraph-properties fo:text-align="center"/>
    </style:style>
    <style:style style:name="P122"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3"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5"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none" draw:fill-color="#ffffff"/>
      <style:paragraph-properties fo:text-align="center"/>
    </style:style>
    <style:style style:name="P127" style:family="paragraph">
      <style:paragraph-properties fo:margin-left="0cm" fo:margin-right="0cm" fo:margin-top="0.42cm" fo:margin-bottom="0.35cm" fo:line-height="100%" fo:text-align="center" fo:text-indent="0cm"/>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42cm" fo:margin-bottom="0.35cm" fo:line-height="100%" fo:text-align="center" fo:text-indent="0cm"/>
      <style:text-properties fo:font-size="10pt" style:font-size-asian="10pt" style:font-size-complex="10pt"/>
    </style:style>
    <style:style style:name="P137" style:family="paragraph">
      <loext:graphic-properties draw:fill="solid" draw:fill-color="#70ae61"/>
      <style:paragraph-properties fo:margin-left="0cm" fo:margin-right="0cm" fo:margin-top="0.42cm" fo:margin-bottom="0.35cm" fo:line-height="100%" fo:text-align="center" fo:text-indent="0cm" style:writing-mode="lr-tb"/>
      <style:text-properties fo:font-size="10pt" style:font-size-asian="10pt" style:font-size-complex="10pt"/>
    </style:style>
    <style:style style:name="P138" style:family="paragraph">
      <style:paragraph-properties fo:margin-top="0.42cm" fo:margin-bottom="0.35cm" fo:text-align="center"/>
      <style:text-properties fo:font-size="10pt" style:font-size-asian="10pt" style:font-size-complex="10pt"/>
    </style:style>
    <style:style style:name="P139" style:family="paragraph">
      <loext:graphic-properties draw:fill="none" draw:fill-color="#ffffff"/>
      <style:paragraph-properties fo:margin-top="0.42cm" fo:margin-bottom="0.35cm" fo:text-align="center"/>
      <style:text-properties fo:font-size="10pt" style:font-size-asian="10pt" style:font-size-complex="10pt"/>
    </style:style>
    <style:style style:name="P140"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41"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2" style:family="paragraph">
      <style:paragraph-properties fo:text-align="center"/>
      <style:text-properties fo:color="#ffffff" loext:opacity="100%" fo:font-size="10pt" style:font-size-asian="10pt" style:font-size-complex="10pt"/>
    </style:style>
    <style:style style:name="P143"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4" style:family="paragraph">
      <loext:graphic-properties draw:fill="solid" draw:fill-color="#6390c2"/>
      <style:paragraph-properties fo:text-align="center" style:writing-mode="lr-tb"/>
      <style:text-properties fo:font-size="10pt" style:font-size-asian="10pt" style:font-size-complex="10pt"/>
    </style:style>
    <style:style style:name="P145" style:family="paragraph">
      <style:paragraph-properties fo:margin-left="0cm" fo:margin-right="0cm" fo:text-align="center" fo:text-indent="0cm"/>
      <style:text-properties fo:color="#ffffff" loext:opacity="100%" fo:font-size="10pt" style:font-size-asian="10pt" style:font-size-complex="10pt"/>
    </style:style>
    <style:style style:name="P146" style:family="paragraph">
      <loext:graphic-properties draw:fill="solid" draw:fill-color="#70ae61"/>
      <style:paragraph-properties fo:text-align="center"/>
      <style:text-properties fo:color="#ffffff" loext:opacity="100%" fo:font-size="8pt" style:font-size-asian="8pt" style:font-size-complex="8pt"/>
    </style:style>
    <style:style style:name="P147" style:family="paragraph">
      <loext:graphic-properties draw:fill="none" draw:fill-color="#ffffff"/>
      <style:text-properties fo:color="#ffffff" loext:opacity="100%" fo:font-size="8pt" style:font-size-asian="8pt" style:font-size-complex="8pt"/>
    </style:style>
    <style:style style:name="P148" style:family="paragraph">
      <style:paragraph-properties fo:text-align="center"/>
      <style:text-properties fo:color="#ffffff" loext:opacity="100%" fo:font-size="10pt" fo:font-weight="bold" style:font-size-asian="10pt" style:font-weight-asian="bold" style:font-size-complex="10pt" style:font-weight-complex="bold"/>
    </style:style>
    <style:style style:name="P149" style:family="paragraph">
      <loext:graphic-properties draw:fill="solid" draw:fill-color="#70ae61"/>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50" style:family="paragraph">
      <style:paragraph-properties fo:margin-top="0.42cm" fo:margin-bottom="0.35cm" fo:text-align="center"/>
      <style:text-properties fo:font-size="14pt" fo:font-weight="bold" style:font-size-asian="14pt" style:font-weight-asian="bold" style:font-size-complex="14pt" style:font-weight-complex="bold"/>
    </style:style>
    <style:style style:name="P151" style:family="paragraph">
      <loext:graphic-properties draw:fill="solid" draw:fill-color="#6390c2"/>
      <style:paragraph-properties fo:margin-top="0.42cm" fo:margin-bottom="0.35cm" fo:text-align="center" style:writing-mode="lr-tb"/>
      <style:text-properties fo:font-size="14pt" fo:font-weight="bold" style:font-size-asian="14pt" style:font-weight-asian="bold" style:font-size-complex="14pt" style:font-weight-complex="bold"/>
    </style:style>
    <style:style style:name="P152" style:family="paragraph">
      <style:paragraph-properties fo:margin-left="0cm" fo:margin-right="0cm"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3"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4"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5"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6"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7" style:family="paragraph">
      <style:paragraph-properties fo:margin-top="0.42cm" fo:margin-bottom="0.35cm" fo:text-align="center"/>
      <style:text-properties fo:font-size="8pt" style:font-size-asian="8pt" style:font-size-complex="8pt"/>
    </style:style>
    <style:style style:name="P158"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59" style:family="paragraph">
      <loext:graphic-properties draw:fill="solid" draw:fill-color="#345d95"/>
      <style:paragraph-properties fo:text-align="center"/>
    </style:style>
    <style:style style:name="P160" style:family="paragraph">
      <loext:graphic-properties draw:fill="none" draw:fill-color="#ffffff"/>
      <style:paragraph-properties fo:text-align="center"/>
      <style:text-properties fo:font-size="8pt" style:font-size-asian="8pt" style:font-size-complex="8pt"/>
    </style:style>
    <style:style style:name="P161" style:family="paragraph">
      <loext:graphic-properties draw:fill="none" draw:fill-color="#ffffff"/>
      <style:text-properties fo:color="#f45f74" loext:opacity="100%" fo:font-size="8pt" style:font-size-asian="8pt" style:font-size-complex="8pt"/>
    </style:style>
    <style:style style:name="P162" style:family="paragraph">
      <style:paragraph-properties fo:margin-left="0cm" fo:margin-right="0cm" fo:margin-top="0.42cm" fo:margin-bottom="0.35cm" fo:line-height="100%" fo:text-indent="0cm"/>
    </style:style>
    <style:style style:name="P163"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64"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65"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66"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67" style:family="paragraph">
      <loext:graphic-properties draw:fill="none" draw:fill-color="#ffffff"/>
      <style:text-properties fo:font-size="10pt" fo:font-weight="bold" style:font-size-asian="10pt" style:font-weight-asian="bold" style:font-size-complex="10pt" style:font-weight-complex="bold"/>
    </style:style>
    <style:style style:name="P168" style:family="paragraph">
      <loext:graphic-properties draw:fill="solid" draw:fill-color="#e8995a"/>
      <style:paragraph-properties fo:text-align="center" style:writing-mode="lr-tb"/>
      <style:text-properties fo:font-size="10pt" style:font-size-asian="10pt" style:font-size-complex="10pt"/>
    </style:style>
    <style:style style:name="P16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1"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72"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73" style:family="paragraph">
      <loext:graphic-properties draw:fill="solid" draw:fill-color="#333333"/>
      <style:paragraph-properties fo:text-align="center"/>
    </style:style>
    <style:style style:name="P174" style:family="paragraph">
      <loext:graphic-properties draw:fill="solid" draw:fill-color="#ffffff"/>
      <style:paragraph-properties fo:text-align="center"/>
    </style:style>
    <style:style style:name="P175" style:family="paragraph">
      <loext:graphic-properties draw:fill="solid" draw:fill-color="#cfe8fa"/>
      <style:paragraph-properties fo:text-align="center"/>
    </style:style>
    <style:style style:name="P176" style:family="paragraph">
      <loext:graphic-properties draw:fill="none" draw:fill-color="#cfe8fa"/>
      <style:paragraph-properties fo:text-align="center"/>
    </style:style>
    <style:style style:name="P177"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78" style:family="paragraph">
      <loext:graphic-properties draw:fill="solid" draw:fill-color="#bfe3bd"/>
      <style:paragraph-properties fo:text-align="center"/>
    </style:style>
    <style:style style:name="P179" style:family="paragraph">
      <loext:graphic-properties draw:fill="none" draw:fill-color="#bfe3bd"/>
      <style:paragraph-properties fo:text-align="center"/>
    </style:style>
    <style:style style:name="P18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81" style:family="paragraph">
      <loext:graphic-properties draw:fill="solid" draw:fill-color="#d36b42"/>
      <style:paragraph-properties fo:text-align="center"/>
    </style:style>
    <style:style style:name="P182" style:family="paragraph">
      <loext:graphic-properties draw:fill="solid" draw:fill-color="#f7d682"/>
      <style:paragraph-properties fo:text-align="center"/>
    </style:style>
    <style:style style:name="P183" style:family="paragraph">
      <loext:graphic-properties draw:fill="none" draw:fill-color="#f7d682"/>
      <style:paragraph-properties fo:text-align="center"/>
    </style:style>
    <style:style style:name="P184" style:family="paragraph">
      <loext:graphic-properties draw:fill="solid" draw:fill-color="#d6cce4"/>
      <style:paragraph-properties fo:text-align="center"/>
    </style:style>
    <style:style style:name="P185" style:family="paragraph">
      <loext:graphic-properties draw:fill="none" draw:fill-color="#d6cce4"/>
      <style:paragraph-properties fo:text-align="center"/>
    </style:style>
    <style:style style:name="P186" style:family="paragraph">
      <loext:graphic-properties draw:fill="none" draw:fill-color="#ffffff"/>
      <style:text-properties fo:font-size="18pt" style:font-size-asian="18pt" style:font-size-complex="18pt"/>
    </style:style>
    <style:style style:name="P187" style:family="paragraph">
      <loext:graphic-properties draw:fill="solid" draw:fill-color="#accda1" draw:opacity="50%"/>
      <style:paragraph-properties fo:text-align="center"/>
    </style:style>
    <style:style style:name="P188" style:family="paragraph">
      <loext:graphic-properties draw:fill="solid" draw:fill-color="#b4d2ea" draw:opacity="50%"/>
      <style:paragraph-properties fo:text-align="center"/>
    </style:style>
    <style:style style:name="P189" style:family="paragraph">
      <loext:graphic-properties draw:fill="none" draw:fill-color="#ffffff"/>
      <style:text-properties fo:color="#00b0be" loext:opacity="100%" fo:font-size="20pt" fo:font-weight="bold" fo:background-color="transparent" style:font-size-asian="20pt" style:font-weight-asian="bold" style:font-size-complex="20pt" style:font-weight-complex="bold"/>
    </style:style>
    <style:style style:name="P190" style:family="paragraph">
      <loext:graphic-properties draw:fill="none" draw:fill-color="#ffffff"/>
      <style:text-properties fo:font-size="10pt" style:font-size-asian="10pt" style:font-size-complex="10pt"/>
    </style:style>
    <style:style style:name="P191" style:family="paragraph">
      <loext:graphic-properties draw:fill="none" draw:fill-color="#ffffff"/>
      <style:paragraph-properties fo:text-align="center"/>
      <style:text-properties fo:color="#ffffff" loext:opacity="100%" fo:font-size="8pt" style:font-size-asian="8pt" style:font-size-complex="8pt"/>
    </style:style>
    <style:style style:name="P192"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93" style:family="paragraph">
      <loext:graphic-properties draw:fill="none"/>
      <style:text-properties fo:font-weight="bold" style:font-weight-asian="bold" style:font-weight-complex="bold"/>
    </style:style>
    <style:style style:name="P194" style:family="paragraph">
      <loext:graphic-properties draw:fill="none" draw:fill-color="#ffffff"/>
      <style:paragraph-properties fo:margin-left="0cm" fo:margin-right="0cm" fo:margin-top="0cm" fo:margin-bottom="0cm" fo:line-height="100%" fo:text-align="center" fo:text-indent="0cm"/>
      <style:text-properties fo:color="#bb63c2" loext:opacity="100%" fo:font-size="16pt" fo:background-color="#6390c2" style:font-size-asian="16pt" style:font-size-complex="16pt"/>
    </style:style>
    <style:style style:name="P195" style:family="paragraph">
      <loext:graphic-properties draw:fill="solid" draw:fill-color="#f4b183"/>
      <style:paragraph-properties fo:text-align="center"/>
    </style:style>
    <style:style style:name="P196" style:family="paragraph">
      <loext:graphic-properties draw:fill="none" draw:fill-color="#f4b183"/>
      <style:paragraph-properties fo:text-align="center"/>
    </style:style>
    <style:style style:name="P197" style:family="paragraph">
      <loext:graphic-properties draw:fill="solid" draw:fill-color="#c96b5f"/>
      <style:paragraph-properties fo:text-align="center"/>
    </style:style>
    <style:style style:name="P198" style:family="paragraph">
      <loext:graphic-properties draw:fill="none" draw:fill-color="#c96b5f"/>
      <style:paragraph-properties fo:text-align="center"/>
    </style:style>
    <style:style style:name="P199" style:family="paragraph">
      <loext:graphic-properties draw:fill="solid" draw:fill-color="#7f3f3f"/>
      <style:paragraph-properties fo:text-align="center"/>
    </style:style>
    <style:style style:name="P200" style:family="paragraph">
      <loext:graphic-properties draw:fill="solid" draw:fill-color="#a8dadc"/>
      <style:paragraph-properties fo:text-align="center"/>
    </style:style>
    <style:style style:name="P201" style:family="paragraph">
      <loext:graphic-properties draw:fill="none" draw:fill-color="#a8dadc"/>
      <style:paragraph-properties fo:text-align="center"/>
    </style:style>
    <style:style style:name="P202" style:family="paragraph">
      <loext:graphic-properties draw:fill="solid" draw:fill-color="#263238"/>
      <style:paragraph-properties fo:text-align="center"/>
    </style:style>
    <style:style style:name="P203" style:family="paragraph">
      <loext:graphic-properties draw:fill="none" draw:fill-color="#ffffff"/>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P204" style:family="paragraph">
      <loext:graphic-properties draw:fill="none" draw:fill-color="#ffffff"/>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P205" style:family="paragraph">
      <loext:graphic-properties draw:fill="none" draw:fill-color="#ffffff"/>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P206" style:family="paragraph">
      <loext:graphic-properties draw:fill="solid" draw:fill-color="#ff5128"/>
      <style:paragraph-properties fo:margin-left="0cm" fo:margin-right="0cm" fo:margin-top="0.42cm" fo:margin-bottom="0.35cm" fo:line-height="100%" fo:text-align="center" fo:text-indent="0cm" style:writing-mode="lr-tb"/>
    </style:style>
    <style:style style:name="P207" style:family="paragraph">
      <loext:graphic-properties draw:fill="solid" draw:fill-color="#f45f74"/>
      <style:paragraph-properties fo:text-align="center" style:writing-mode="lr-tb"/>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6390c2" loext:opacity="100%" fo:font-weight="bold" style:font-weight-asian="bold" style:font-weight-complex="bold"/>
    </style:style>
    <style:style style:name="T41" style:family="text">
      <style:text-properties fo:color="#6390c2" loext:opacity="100%" fo:font-size="8pt" fo:font-weight="bold" style:font-size-asian="8pt" style:font-weight-asian="bold" style:font-size-complex="8pt" style:font-weight-complex="bold"/>
    </style:style>
    <style:style style:name="T42" style:family="text">
      <style:text-properties style:text-position="sub 58%" fo:font-size="8pt" style:font-size-asian="8pt" style:font-size-complex="8pt"/>
    </style:style>
    <style:style style:name="T43" style:family="text">
      <style:text-properties style:text-position="super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color="#ffffff" loext:opacity="100%" fo:font-size="9pt" fo:font-weight="bold" style:font-size-asian="9pt" style:font-weight-asian="bold" style:font-size-complex="9pt" style:font-weight-complex="bold"/>
    </style:style>
    <style:style style:name="T46" style:family="text">
      <style:text-properties fo:color="#ffffff" loext:opacity="100%" fo:font-size="12pt" fo:font-weight="bold" style:font-size-asian="12pt" style:font-weight-asian="bold" style:font-size-complex="12pt" style:font-weight-complex="bold"/>
    </style:style>
    <style:style style:name="T47" style:family="text">
      <style:text-properties fo:color="#ffffff" loext:opacity="100%" fo:font-size="10pt" style:font-size-asian="10pt" style:font-size-complex="10pt"/>
    </style:style>
    <style:style style:name="T48"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49" style:family="text">
      <style:text-properties fo:color="#ffffff" loext:opacity="100%" fo:font-size="8pt" style:font-size-asian="8pt" style:font-size-complex="8pt"/>
    </style:style>
    <style:style style:name="T50" style:family="text">
      <style:text-properties fo:font-size="14pt" fo:font-weight="bold" style:font-size-asian="14pt" style:font-weight-asian="bold" style:font-size-complex="14pt" style:font-weight-complex="bold"/>
    </style:style>
    <style:style style:name="T51" style:family="text">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T52" style:family="text">
      <style:text-properties fo:color="#f45f74" loext:opacity="100%" fo:font-size="8pt" style:font-size-asian="8pt" style:font-size-complex="8pt"/>
    </style:style>
    <style:style style:name="T53" style:family="text">
      <style:text-properties fo:font-size="10pt" fo:font-weight="bold" style:font-size-asian="10pt" style:font-weight-asian="bold" style:font-size-complex="10pt" style:font-weight-complex="bold"/>
    </style:style>
    <style:style style:name="T54" style:family="text">
      <style:text-properties fo:color="#00b0be" loext:opacity="100%" fo:font-size="15pt" fo:font-weight="bold" fo:background-color="transparent" style:font-size-asian="15pt" style:font-weight-asian="bold" style:font-size-complex="15pt" style:font-weight-complex="bold"/>
    </style:style>
    <style:style style:name="T55" style:family="text">
      <style:text-properties fo:font-size="10pt" fo:font-weight="normal" style:font-size-asian="10pt" style:font-weight-asian="normal" style:font-size-complex="10pt" style:font-weight-complex="normal"/>
    </style:style>
    <style:style style:name="T56"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7" style:family="text">
      <style:text-properties fo:font-size="18pt" style:font-size-asian="18pt" style:font-size-complex="18pt"/>
    </style:style>
    <style:style style:name="T58"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9" style:family="text">
      <style:text-properties style:text-position="sub 58%"/>
    </style:style>
    <style:style style:name="T60" style:family="text">
      <style:text-properties style:text-position="super 58%"/>
    </style:style>
    <style:style style:name="T61" style:family="text">
      <style:text-properties fo:color="#00b0be" loext:opacity="100%" fo:font-size="20pt" fo:font-weight="bold" fo:background-color="transparent" style:font-size-asian="20pt" style:font-weight-asian="bold" style:font-size-complex="20pt" style:font-weight-complex="bold"/>
    </style:style>
    <style:style style:name="T62" style:family="text">
      <style:text-properties fo:color="#ffffff" loext:opacity="100%" fo:font-size="8pt" fo:font-weight="bold" style:font-size-asian="8pt" style:font-weight-asian="bold" style:font-size-complex="8pt" style:font-weight-complex="bold"/>
    </style:style>
    <style:style style:name="T63"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64" style:family="text">
      <style:text-properties fo:font-size="8pt" fo:font-weight="bold" style:font-size-asian="8pt" style:font-weight-asian="bold" style:font-size-complex="8pt" style:font-weight-complex="bold"/>
    </style:style>
    <style:style style:name="T65" style:family="text">
      <style:text-properties fo:font-size="8pt" fo:font-weight="normal" style:font-size-asian="8pt" style:font-weight-asian="normal" style:font-size-complex="8pt" style:font-weight-complex="normal"/>
    </style:style>
    <style:style style:name="T66" style:family="text">
      <style:text-properties fo:color="#bb63c2" loext:opacity="100%" fo:font-size="16pt" fo:font-weight="bold" style:font-size-asian="16pt" style:font-weight-asian="bold" style:font-size-complex="16pt" style:font-weight-complex="bold"/>
    </style:style>
    <style:style style:name="T67" style:family="text">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T68" style:family="text">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T69" style:family="text">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text:span><text:span text:style-name="T2">rolle</text:span><text:span text:style-name="T2">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span text:style-name="T4"><text:line-break/></text:span><text:span text:style-name="T4">(language </text:span><text:span text:style-name="T4"><text:line-break/></text:span><text:span text:style-name="T4">component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45" draw:id="id345"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46" draw:id="id346"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85" draw:id="id385"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47" draw:id="id347"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48" draw:id="id348"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comp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7cm" svg:x="236.71cm" svg:y="14.968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68cm" svg:x2="241.848cm" svg:y2="13.474cm" draw:start-shape="id36" draw:start-glue-point="4" draw:end-shape="id37" draw:end-glue-point="8" svg:d="M237714 14968c0-1120 4134-374 4134-1494" svg:viewBox="0 0 4135 1495">
            <text:p/>
          </draw:connector>
          <draw:custom-shape draw:style-name="gr64" draw:text-style-name="P45" xml:id="id38" draw:id="id38" draw:layer="layout" svg:width="2.331cm" svg:height="1.027cm" svg:x="245.051cm" svg:y="14.968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68cm" svg:x2="241.847cm" svg:y2="13.474cm" draw:start-shape="id38" draw:start-glue-point="4" draw:end-shape="id37" svg:d="M246217 14968c0-1120-4370-374-4370-1494" svg:viewBox="0 0 4371 1495">
            <text:p/>
          </draw:connector>
          <draw:custom-shape draw:style-name="gr64" draw:text-style-name="P45" xml:id="id39" draw:id="id39" draw:layer="layout" svg:width="2.773cm" svg:height="1.027cm" svg:x="234.618cm" svg:y="17.168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7cm" svg:x="237.756cm" svg:y="17.143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68cm" svg:x2="237.714cm" svg:y2="15.995cm" draw:start-shape="id39" draw:start-glue-point="4" draw:end-shape="id36" draw:end-glue-point="8" svg:d="M236005 17168c0-880 1709-294 1709-1173" svg:viewBox="0 0 1710 1174">
            <text:p/>
          </draw:connector>
          <draw:connector draw:style-name="gr68" draw:text-style-name="P15" draw:layer="layout" draw:type="curve" svg:x1="239.509cm" svg:y1="17.143cm" svg:x2="237.714cm" svg:y2="15.995cm" draw:start-shape="id40" draw:start-glue-point="4" draw:end-shape="id36" draw:end-glue-point="8" svg:d="M239509 17143c0-861-1795-287-1795-1148" svg:viewBox="0 0 1796 1149">
            <text:p/>
          </draw:connector>
          <draw:custom-shape draw:style-name="gr64" draw:text-style-name="P45" xml:id="id41" draw:id="id41" draw:layer="layout" svg:width="2.173cm" svg:height="1.027cm" svg:x="243.624cm" svg:y="17.168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7cm" svg:x="246.862cm" svg:y="17.143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68cm" svg:x2="246.217cm" svg:y2="15.995cm" draw:start-shape="id41" draw:start-glue-point="4" draw:end-shape="id38" draw:end-glue-point="8" svg:d="M244711 17168c0-880 1506-294 1506-1173" svg:viewBox="0 0 1507 1174">
            <text:p/>
          </draw:connector>
          <draw:connector draw:style-name="gr70" draw:text-style-name="P15" draw:layer="layout" draw:type="curve" svg:x1="248.215cm" svg:y1="17.143cm" svg:x2="246.217cm" svg:y2="15.995cm" draw:start-shape="id42" draw:start-glue-point="4" draw:end-shape="id38" draw:end-glue-point="8" svg:d="M248215 17143c0-861-1998-287-1998-1148" svg:viewBox="0 0 1999 1149">
            <text:p/>
          </draw:connector>
          <draw:custom-shape draw:style-name="gr64" draw:text-style-name="P45" xml:id="id43" draw:id="id43" draw:layer="layout" svg:width="3.539cm" svg:height="1.025cm" svg:x="236.021cm" svg:y="20.044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7cm" svg:x="240.231cm" svg:y="19.918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44cm" svg:x2="239.509cm" svg:y2="18.17cm" draw:start-shape="id43" draw:start-glue-point="4" draw:end-shape="id40" draw:end-glue-point="8" svg:d="M237791 20044c0-1405 1718-469 1718-1874" svg:viewBox="0 0 1719 1875">
            <text:p/>
          </draw:connector>
          <draw:connector draw:style-name="gr72" draw:text-style-name="P15" draw:layer="layout" draw:type="curve" svg:x1="241.584cm" svg:y1="19.918cm" svg:x2="239.509cm" svg:y2="18.17cm" draw:start-shape="id44" draw:start-glue-point="4" draw:end-shape="id40" draw:end-glue-point="8" svg:d="M241584 19918c0-1311-2075-437-2075-1748" svg:viewBox="0 0 2076 1749">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82cm" svg:x2="249.055cm" svg:y2="13.159cm" draw:start-shape="id38" draw:start-glue-point="10" draw:end-shape="id45" draw:end-glue-point="3" svg:d="M247382 15482c1255 0 419-2323 1673-2323" svg:viewBox="0 0 1674 2324">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7cm" svg:x="246.862cm" svg:y="17.144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uman in loop</text:span><text:span text:style-name="T23"><text:line-break/></text:span><text:span text:style-name="T23">sensory-motor 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49cm" svg:y1="43.47cm" svg:x2="87.961cm" svg:y2="46.79cm" draw:start-shape="id196" draw:start-glue-point="2" draw:end-shape="id197" draw:end-glue-point="0" svg:d="M88549 43470c0 2490-588 830-588 3320" svg:viewBox="0 0 589 3321">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6.566cm" svg:y="46.79cm">
          <text:p text:style-name="P5">Decision<text:line-break/>making</text:p>
        </draw:rect>
        <draw:rect draw:style-name="gr41" draw:text-style-name="P5" xml:id="id199" draw:id="id199" draw:layer="layout" svg:width="2.79cm" svg:height="0.955cm" svg:x="83.366cm" svg:y="46.782cm">
          <text:p text:style-name="P5">Planning</text:p>
        </draw:rect>
        <draw:connector draw:style-name="gr257" draw:text-style-name="P15" draw:layer="layout" draw:type="curve" svg:x1="88.549cm" svg:y1="43.47cm" svg:x2="84.761cm" svg:y2="46.782cm" draw:start-shape="id196" draw:start-glue-point="2" draw:end-shape="id199" draw:end-glue-point="0" svg:d="M88549 43470c0 2484-3788 828-3788 3312" svg:viewBox="0 0 3789 3313">
          <text:p/>
        </draw:connector>
        <draw:rect draw:style-name="gr41" draw:text-style-name="P5" xml:id="id200" draw:id="id200" draw:layer="layout" svg:width="2.79cm" svg:height="0.955cm" svg:x="89.668cm" svg:y="46.79cm">
          <text:p text:style-name="P5">Concept<text:line-break/>formation</text:p>
        </draw:rect>
        <draw:connector draw:style-name="gr258" draw:text-style-name="P15" draw:layer="layout" draw:type="curve" svg:x1="88.549cm" svg:y1="43.47cm" svg:x2="91.063cm" svg:y2="46.79cm" draw:start-shape="id196" draw:start-glue-point="2" draw:end-shape="id200" svg:d="M88549 43470c0 2490 2514 830 2514 3320" svg:viewBox="0 0 2515 3321">
          <text:p/>
        </draw:connector>
        <draw:rect draw:style-name="gr41" draw:text-style-name="P5" xml:id="id196" draw:id="id196"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196" draw:end-glue-point="0" svg:d="M84826 39775c0 2055 3723 685 3723 2740" svg:viewBox="0 0 3724 2741">
          <text:p/>
        </draw:connector>
        <draw:rect draw:style-name="gr41" draw:text-style-name="P5" xml:id="id207" draw:id="id207" draw:layer="layout" svg:width="2.79cm" svg:height="0.955cm" svg:x="83.872cm" svg:y="42.449cm">
          <text:p text:style-name="P5">learning</text:p>
        </draw:rect>
        <draw:rect draw:style-name="gr41" draw:text-style-name="P5" xml:id="id202" draw:id="id202" draw:layer="layout" svg:width="2.79cm" svg:height="0.955cm" svg:x="90.833cm" svg:y="42.515cm">
          <text:p text:style-name="P5">perception</text:p>
        </draw:rect>
        <draw:rect draw:style-name="gr41" draw:text-style-name="P5" xml:id="id204" draw:id="id204"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2"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3"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4" svg:d="M84826 39775c0 2055 11761 685 11761 2740" svg:viewBox="0 0 11762 2741">
          <text:p/>
        </draw:connector>
        <draw:rect draw:style-name="gr41" draw:text-style-name="P5" xml:id="id205" draw:id="id205" draw:layer="layout" svg:width="2.79cm" svg:height="0.955cm" svg:x="92.921cm" svg:y="46.79cm">
          <text:p text:style-name="P5">Problem<text:line-break/>solving</text:p>
        </draw:rect>
        <draw:rect draw:style-name="gr41" draw:text-style-name="P5" xml:id="id206" draw:id="id206" draw:layer="layout" svg:width="2.79cm" svg:height="0.955cm" svg:x="96.043cm" svg:y="46.79cm">
          <text:p text:style-name="P5">Reasoning</text:p>
        </draw:rect>
        <draw:connector draw:style-name="gr263" draw:text-style-name="P15" draw:layer="layout" draw:type="curve" svg:x1="88.549cm" svg:y1="43.47cm" svg:x2="94.316cm" svg:y2="46.79cm" draw:start-shape="id196" draw:start-glue-point="2" draw:end-shape="id205" svg:d="M88549 43470c0 2490 5767 830 5767 3320" svg:viewBox="0 0 5768 3321">
          <text:p/>
        </draw:connector>
        <draw:connector draw:style-name="gr264" draw:text-style-name="P15" draw:layer="layout" draw:type="curve" svg:x1="88.549cm" svg:y1="43.47cm" svg:x2="97.438cm" svg:y2="46.79cm" draw:start-shape="id196" draw:start-glue-point="2" draw:end-shape="id206" draw:end-glue-point="0" svg:d="M88549 43470c0 2490 8889 830 8889 3320" svg:viewBox="0 0 8890 3321">
          <text:p/>
        </draw:connector>
        <draw:connector draw:style-name="gr265" draw:text-style-name="P15" draw:layer="layout" draw:type="curve" svg:x1="84.826cm" svg:y1="39.775cm" svg:x2="85.267cm" svg:y2="42.449cm" draw:start-shape="id201" draw:start-glue-point="2" draw:end-shape="id207" draw:end-glue-point="0" svg:d="M84826 39775c0 2005 441 669 441 2674" svg:viewBox="0 0 442 2675">
          <text:p/>
        </draw:connector>
        <draw:connector draw:style-name="gr46" draw:text-style-name="P15" draw:layer="layout" draw:type="curve" svg:x1="85.267cm" svg:y1="42.449cm" svg:x2="81.639cm" svg:y2="39.866cm" draw:start-shape="id207" draw:start-glue-point="0" draw:end-shape="id208" draw:end-glue-point="7" svg:d="M85267 42449c0-1722-1209-2583-3628-2583" svg:viewBox="0 0 3629 2584">
          <text:p/>
        </draw:connector>
        <draw:custom-shape draw:name="comment box 4" draw:style-name="gr266" draw:text-style-name="P70" xml:id="id208" draw:id="id208" draw:layer="layout" svg:width="3.82cm" svg:height="3.055cm" svg:x="77.819cm" svg:y="38.338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7" draw:text-style-name="P68" xml:id="id209" draw:id="id209"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09" draw:end-glue-point="6" svg:d="M133450 26509c0-1380 3568-460 3568-1841" svg:viewBox="0 0 3569 1842">
          <text:p/>
        </draw:connector>
        <draw:custom-shape draw:name="comment box 5" draw:style-name="gr266" draw:text-style-name="P70" xml:id="id210" draw:id="id210" draw:layer="layout" svg:width="3.82cm" svg:height="2.201cm" svg:x="87.313cm" svg:y="38.47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196" draw:start-glue-point="0" draw:end-shape="id210" draw:end-glue-point="6" svg:d="M88549 42515c0-1378 674-460 674-1838" svg:viewBox="0 0 675 1839">
          <text:p/>
        </draw:connector>
        <draw:rect draw:style-name="gr255" draw:text-style-name="P67" xml:id="id212" draw:id="id212"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1" draw:id="id211" draw:layer="layout" svg:width="2.4cm" svg:height="1cm" svg:x="91.63cm" svg:y="35.148cm">
          <text:p text:style-name="P8"><text:span text:style-name="T29">Object</text:span><text:span text:style-name="T29"><text:line-break/></text:span><text:span text:style-name="T29">level</text:span></text:p>
        </draw:rect>
        <draw:connector draw:style-name="gr268" draw:text-style-name="P15" draw:layer="layout" draw:type="curve" svg:x1="92.83cm" svg:y1="36.148cm" svg:x2="84.826cm" svg:y2="38.775cm" draw:start-shape="id211" draw:start-glue-point="2" draw:end-shape="id201" draw:end-glue-point="0" svg:d="M92830 36148c0 1971-8004 658-8004 2627" svg:viewBox="0 0 8005 2628">
          <text:p/>
        </draw:connector>
        <draw:rect draw:style-name="gr255" draw:text-style-name="P71" xml:id="id213" draw:id="id213" draw:layer="layout" svg:width="2.885cm" svg:height="1cm" svg:x="101.415cm" svg:y="37.365cm">
          <text:p text:style-name="P3"><text:span text:style-name="T29">Self-</text:span><text:span text:style-name="T29"><text:line-break/></text:span><text:span text:style-name="T29">consciousness</text:span></text:p>
        </draw:rect>
        <draw:connector draw:style-name="gr269" draw:text-style-name="P15" draw:layer="layout" draw:type="curve" svg:x1="106.992cm" svg:y1="35.872cm" svg:x2="102.857cm" svg:y2="37.365cm" draw:start-shape="id212" draw:start-glue-point="2" draw:end-shape="id213" draw:end-glue-point="0" svg:d="M106992 35872c0 1120-4135 374-4135 1493" svg:viewBox="0 0 4136 1494">
          <text:p/>
        </draw:connector>
        <draw:rect draw:style-name="gr255" draw:text-style-name="P67" xml:id="id214" draw:id="id214" draw:layer="layout" svg:width="2.8cm" svg:height="1.2cm" svg:x="125.553cm" svg:y="28.971cm">
          <text:p text:style-name="P8"><text:span text:style-name="T29">Organ</text:span><text:span text:style-name="T29"><text:line-break/></text:span><text:span text:style-name="T29">(link)</text:span></text:p>
        </draw:rect>
        <draw:connector draw:style-name="gr270" draw:text-style-name="P15" draw:layer="layout" draw:type="curve" svg:x1="133.45cm" svg:y1="27.509cm" svg:x2="126.953cm" svg:y2="28.971cm" draw:start-shape="id188" draw:start-glue-point="2" draw:end-shape="id214"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1"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5" draw:id="id215" draw:layer="layout" svg:width="3.331cm" svg:height="1.431cm" svg:x="147.038cm" svg:y="36.861cm">
          <text:p text:style-name="P5">Peripheral<text:line-break/>nerves</text:p>
        </draw:rect>
        <draw:connector draw:style-name="gr272" draw:text-style-name="P15" draw:layer="layout" draw:type="curve" svg:x1="137.15cm" svg:y1="30.109cm" svg:x2="148.703cm" svg:y2="36.861cm" draw:start-shape="id190" draw:start-glue-point="2" draw:end-shape="id215" draw:end-glue-point="0" svg:d="M137150 30109c0 5064 11553 1688 11553 6752" svg:viewBox="0 0 11554 6753">
          <text:p/>
        </draw:connector>
        <draw:custom-shape draw:style-name="gr273" draw:text-style-name="P68" xml:id="id216" draw:id="id216"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4" draw:start-glue-point="0" draw:end-shape="id216"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648cm" svg:y2="38.017cm" draw:start-shape="id195" draw:start-glue-point="0" draw:end-shape="id217" draw:end-glue-point="6" svg:d="M141081 39048c0-772 1567-257 1567-1031" svg:viewBox="0 0 1568 1032">
          <text:p/>
        </draw:connector>
        <draw:connector draw:style-name="gr274"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5" draw:text-style-name="P68" xml:id="id218" draw:id="id218"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8" draw:end-glue-point="6" svg:d="M132337 28909c0-1065-2267-355-2267-1420" svg:viewBox="0 0 2268 1421">
          <text:p/>
        </draw:connector>
        <draw:rect draw:style-name="gr276" draw:text-style-name="P5" xml:id="id220" draw:id="id220" draw:layer="layout" svg:width="2.475cm" svg:height="0.752cm" svg:x="144.938cm" svg:y="42.835cm">
          <text:p text:style-name="P30"><text:span text:style-name="T28">Enteric</text:span></text:p>
        </draw:rect>
        <draw:connector draw:style-name="gr277" draw:text-style-name="P15" draw:layer="layout" draw:type="curve" svg:x1="146.179cm" svg:y1="41.453cm" svg:x2="146.175cm" svg:y2="42.835cm" draw:start-shape="id219" draw:start-glue-point="2" draw:end-shape="id220" svg:d="M146179 41453c0 1036-4 346-4 1382" svg:viewBox="0 0 5 1383">
          <text:p/>
        </draw:connector>
        <draw:rect draw:style-name="gr41" draw:text-style-name="P5" xml:id="id219" draw:id="id219" draw:layer="layout" svg:width="2.426cm" svg:height="1.051cm" svg:x="144.966cm" svg:y="40.402cm">
          <text:p text:style-name="P5">Automatic</text:p>
        </draw:rect>
        <draw:connector draw:style-name="gr278" draw:text-style-name="P15" draw:layer="layout" draw:type="curve" svg:x1="148.703cm" svg:y1="38.292cm" svg:x2="146.179cm" svg:y2="40.402cm" draw:start-shape="id215" draw:start-glue-point="2" draw:end-shape="id219" draw:end-glue-point="0" svg:d="M148703 38292c0 1582-2524 528-2524 2110" svg:viewBox="0 0 2525 2111">
          <text:p/>
        </draw:connector>
        <draw:custom-shape draw:style-name="gr279" draw:text-style-name="P68" xml:id="id217" draw:id="id217" draw:layer="layout" svg:width="4.159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ed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0" draw:text-style-name="P72" xml:id="id221" draw:id="id221" draw:layer="layout" svg:width="2.138cm" svg:height="1.014cm" svg:x="127.181cm" svg:y="31.128cm">
          <text:p text:style-name="P8"><text:span text:style-name="T27">Motor </text:span><text:span text:style-name="T27"><text:line-break/></text:span><text:span text:style-name="T27">neurons</text:span></text:p>
        </draw:rect>
        <draw:connector draw:style-name="gr281" draw:text-style-name="P15" draw:layer="layout" draw:type="curve" svg:x1="128.25cm" svg:y1="31.128cm" svg:x2="132.337cm" svg:y2="30.109cm" draw:start-shape="id221"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2" draw:start-glue-point="2" draw:end-shape="id192" draw:end-glue-point="0" svg:d="M130925 38049c0 864-227 289-227 1151" svg:viewBox="0 0 228 1152">
          <text:p/>
        </draw:connector>
        <draw:rect draw:style-name="gr280" draw:text-style-name="P72" xml:id="id222" draw:id="id222" draw:layer="layout" svg:width="2.138cm" svg:height="1.014cm" svg:x="129.856cm" svg:y="37.035cm">
          <text:p text:style-name="P8"><text:span text:style-name="T27">projecti</text:span><text:span text:style-name="T27">on </text:span><text:span text:style-name="T27"><text:line-break/></text:span><text:span text:style-name="T27">neuron</text:span><text:span text:style-name="T27">s</text:span></text:p>
        </draw:rect>
        <draw:custom-shape draw:style-name="gr283" draw:text-style-name="P68" xml:id="id223" draw:id="id223"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3" draw:start-glue-point="6" draw:end-shape="id222" draw:end-glue-point="0" svg:d="M129583 35929c0 831 1342 278 1342 1106" svg:viewBox="0 0 1343 1107">
          <text:p/>
        </draw:connector>
        <draw:rect draw:style-name="gr255" draw:text-style-name="P67" xml:id="id224" draw:id="id224" draw:layer="layout" svg:width="3.056cm" svg:height="1cm" svg:x="95.087cm" svg:y="39.17cm">
          <text:p text:style-name="P8"><text:span text:style-name="T29">non-cognitive</text:span><text:span text:style-name="T29"><text:line-break/></text:span><text:span text:style-name="T29">processes</text:span></text:p>
        </draw:rect>
        <draw:connector draw:style-name="gr285" draw:text-style-name="P15" draw:layer="layout" draw:type="curve" svg:x1="92.83cm" svg:y1="36.148cm" svg:x2="96.615cm" svg:y2="39.17cm" draw:start-shape="id211" draw:start-glue-point="2" draw:end-shape="id224" draw:end-glue-point="0" svg:d="M92830 36148c0 2266 3785 756 3785 3022" svg:viewBox="0 0 3786 3023">
          <text:p/>
        </draw:connector>
        <draw:rect draw:style-name="gr41" draw:text-style-name="P5" xml:id="id225" draw:id="id225" draw:layer="layout" svg:width="2.449cm" svg:height="1.254cm" svg:x="150.041cm" svg:y="40.2cm">
          <text:p text:style-name="P69"><text:span text:style-name="T12">Somatic</text:span><text:span text:style-name="T12"><text:line-break/></text:span><text:span text:style-name="T12">(voluntary)</text:span></text:p>
        </draw:rect>
        <draw:connector draw:style-name="gr286" draw:text-style-name="P15" draw:layer="layout" draw:type="curve" svg:x1="148.703cm" svg:y1="38.292cm" svg:x2="151.265cm" svg:y2="40.2cm" draw:start-shape="id215" draw:start-glue-point="2" draw:end-shape="id225" draw:end-glue-point="0" svg:d="M148703 38292c0 1431 2562 477 2562 1908" svg:viewBox="0 0 2563 1909">
          <text:p/>
        </draw:connector>
        <draw:rect draw:style-name="gr255" draw:text-style-name="P67" xml:id="id226" draw:id="id226" draw:layer="layout" svg:width="2.5cm" svg:height="1cm" svg:x="55.004cm" svg:y="51.128cm">
          <text:p text:style-name="P8"><text:span text:style-name="T29">explicit</text:span></text:p>
        </draw:rect>
        <draw:rect draw:style-name="gr255" draw:text-style-name="P67" xml:id="id227" draw:id="id227"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3" draw:start-glue-point="2" draw:end-shape="id226" svg:d="M69716 45549c0 4185-13462 1396-13462 5579" svg:viewBox="0 0 13463 5580">
          <text:p/>
        </draw:connector>
        <draw:connector draw:style-name="gr288" draw:text-style-name="P15" draw:layer="layout" draw:type="curve" svg:x1="56.254cm" svg:y1="52.128cm" svg:x2="46.254cm" svg:y2="53.528cm" draw:start-shape="id226" draw:start-glue-point="2" draw:end-shape="id227" draw:end-glue-point="0" svg:d="M56254 52128c0 1050-10000 350-10000 1400" svg:viewBox="0 0 10001 1401">
          <text:p/>
        </draw:connector>
        <draw:rect draw:style-name="gr255" draw:text-style-name="P67" xml:id="id228" draw:id="id228"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3" draw:start-glue-point="2" draw:end-shape="id228" draw:end-glue-point="0" svg:d="M69716 45549c0 5310-962 1771-962 7079" svg:viewBox="0 0 963 7080">
          <text:p/>
        </draw:connector>
        <draw:rect draw:style-name="gr255" draw:text-style-name="P67" xml:id="id230" draw:id="id230"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29" draw:id="id229"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8" draw:start-glue-point="2" draw:end-shape="id229" draw:end-glue-point="0" svg:d="M68754 53628c0 1050-1500 350-1500 1400" svg:viewBox="0 0 1501 1401">
          <text:p/>
        </draw:connector>
        <draw:connector draw:style-name="gr291" draw:text-style-name="P15" draw:layer="layout" draw:type="curve" svg:x1="68.754cm" svg:y1="53.628cm" svg:x2="70.254cm" svg:y2="55.028cm" draw:start-shape="id228" draw:start-glue-point="2" draw:end-shape="id230" draw:end-glue-point="0" svg:d="M68754 53628c0 1050 1500 350 1500 1400" svg:viewBox="0 0 1501 1401">
          <text:p/>
        </draw:connector>
        <draw:rect draw:style-name="gr255" draw:text-style-name="P67" xml:id="id232" draw:id="id232" draw:layer="layout" svg:width="2.56cm" svg:height="1.113cm" svg:x="35.83cm" svg:y="57.001cm">
          <text:p text:style-name="P8"><text:span text:style-name="T29">episodic</text:span></text:p>
        </draw:rect>
        <draw:rect draw:style-name="gr255" draw:text-style-name="P67" xml:id="id231" draw:id="id231" draw:layer="layout" svg:width="2.3cm" svg:height="1cm" svg:x="45.104cm" svg:y="56.528cm">
          <text:p text:style-name="P8"><text:span text:style-name="T29">semantic</text:span></text:p>
        </draw:rect>
        <draw:connector draw:style-name="gr65" draw:text-style-name="P15" draw:layer="layout" draw:type="curve" svg:x1="46.254cm" svg:y1="54.528cm" svg:x2="46.254cm" svg:y2="56.528cm" draw:start-shape="id227" draw:start-glue-point="2" draw:end-shape="id231" draw:end-glue-point="0" svg:d="M46254 54528v2000" svg:viewBox="0 0 1 2001">
          <text:p/>
        </draw:connector>
        <draw:connector draw:style-name="gr66" draw:text-style-name="P15" draw:layer="layout" draw:type="curve" svg:x1="46.254cm" svg:y1="54.528cm" svg:x2="37.11cm" svg:y2="57.001cm" draw:start-shape="id227" draw:start-glue-point="2" draw:end-shape="id232" draw:end-glue-point="0" svg:d="M46254 54528c0 1855-9144 619-9144 2473" svg:viewBox="0 0 9145 2474">
          <text:p/>
        </draw:connector>
        <draw:rect draw:style-name="gr292" draw:text-style-name="P35" xml:id="id245" draw:id="id245"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0" draw:start-glue-point="2" draw:end-shape="id233" draw:end-glue-point="0" svg:d="M70254 56028c0 1350 800 450 800 1800" svg:viewBox="0 0 801 1801">
          <text:p/>
        </draw:connector>
        <draw:rect draw:style-name="gr255" draw:text-style-name="P67" xml:id="id234" draw:id="id234"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7" draw:start-glue-point="2" draw:end-shape="id234" draw:end-glue-point="0" svg:d="M46254 54528c0 1500 7700 500 7700 2000" svg:viewBox="0 0 7701 2001">
          <text:p/>
        </draw:connector>
        <draw:rect draw:style-name="gr255" draw:text-style-name="P67" xml:id="id235" draw:id="id235"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4" draw:start-glue-point="2" draw:end-shape="id235" svg:d="M53954 57528v1700" svg:viewBox="0 0 1 1701">
          <text:p/>
        </draw:connector>
        <draw:connector draw:style-name="gr72" draw:text-style-name="P15" draw:layer="layout" draw:type="curve" svg:x1="46.254cm" svg:y1="57.528cm" svg:x2="53.954cm" svg:y2="59.228cm" draw:start-shape="id231" draw:start-glue-point="2" draw:end-shape="id235" draw:end-glue-point="0" svg:d="M46254 57528c0 1275 7700 425 7700 1700" svg:viewBox="0 0 7701 1701">
          <text:p/>
        </draw:connector>
        <draw:rect draw:name="memory" draw:style-name="gr40" draw:text-style-name="P63" xml:id="id203" draw:id="id203" draw:layer="layout" svg:width="2.4cm" svg:height="1cm" svg:x="68.516cm" svg:y="44.549cm">
          <text:p text:style-name="P5"><text:span text:style-name="T17">memory</text:span></text:p>
        </draw:rect>
        <draw:rect draw:style-name="gr255" draw:text-style-name="P67" xml:id="id236" draw:id="id236" draw:layer="layout" svg:width="2.3cm" svg:height="1cm" svg:x="59.804cm" svg:y="53.528cm">
          <text:p text:style-name="P8"><text:span text:style-name="T29">Short</text:span><text:span text:style-name="T29"><text:line-break/></text:span><text:span text:style-name="T29">term</text:span></text:p>
        </draw:rect>
        <draw:connector draw:style-name="gr293" draw:text-style-name="P15" draw:layer="layout" draw:type="curve" svg:x1="56.254cm" svg:y1="52.128cm" svg:x2="60.954cm" svg:y2="53.528cm" draw:start-shape="id226" draw:start-glue-point="2" draw:end-shape="id236" draw:end-glue-point="0" svg:d="M56254 52128c0 1050 4700 350 4700 1400" svg:viewBox="0 0 4701 1401">
          <text:p/>
        </draw:connector>
        <draw:rect draw:style-name="gr255" draw:text-style-name="P67" xml:id="id237" draw:id="id237"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5" draw:start-glue-point="2" draw:end-shape="id237" draw:end-glue-point="0" svg:d="M53954 60228v1000" svg:viewBox="0 0 1 1001">
          <text:p/>
        </draw:connector>
        <draw:rect draw:style-name="gr292" draw:text-style-name="P35" xml:id="id239" draw:id="id239" draw:layer="layout" svg:width="2.3cm" svg:height="1cm" svg:x="24.504cm" svg:y="72.628cm">
          <text:p text:style-name="P5">Goal</text:p>
        </draw:rect>
        <draw:connector draw:style-name="gr69" draw:text-style-name="P15" draw:layer="layout" draw:type="curve" svg:x1="23.654cm" svg:y1="70.528cm" svg:x2="25.654cm" svg:y2="72.628cm" draw:start-shape="id238" draw:end-shape="id239" draw:end-glue-point="0" svg:d="M23654 70528c0 1575 2000 525 2000 2100" svg:viewBox="0 0 2001 2101">
          <text:p/>
        </draw:connector>
        <draw:rect draw:style-name="gr292" draw:text-style-name="P35" xml:id="id238" draw:id="id238" draw:layer="layout" svg:width="2.3cm" svg:height="1cm" svg:x="22.504cm" svg:y="69.528cm">
          <text:p text:style-name="P5">Normal<text:line-break/>scenario</text:p>
        </draw:rect>
        <draw:rect draw:style-name="gr292" draw:text-style-name="P35" xml:id="id260" draw:id="id260" draw:layer="layout" svg:width="2.3cm" svg:height="1cm" svg:x="27.314cm" svg:y="69.587cm">
          <text:p text:style-name="P5">follow<text:line-break/>scenario</text:p>
        </draw:rect>
        <draw:rect draw:style-name="gr292" draw:text-style-name="P35" xml:id="id240" draw:id="id240" draw:layer="layout" svg:width="2.3cm" svg:height="1cm" svg:x="31.504cm" svg:y="72.528cm">
          <text:p text:style-name="P5">sensors</text:p>
        </draw:rect>
        <draw:connector draw:style-name="gr92" draw:text-style-name="P15" draw:layer="layout" draw:type="curve" svg:x1="23.654cm" svg:y1="70.528cm" svg:x2="32.654cm" svg:y2="72.528cm" draw:start-shape="id238" draw:start-glue-point="2" draw:end-shape="id240" draw:end-glue-point="0" svg:d="M23654 70528c0 1500 9000 500 9000 2000" svg:viewBox="0 0 9001 2001">
          <text:p/>
        </draw:connector>
        <draw:rect draw:style-name="gr292" draw:text-style-name="P35" xml:id="id241" draw:id="id241" draw:layer="layout" svg:width="2.3cm" svg:height="1cm" svg:x="27.504cm" svg:y="74.728cm">
          <text:p text:style-name="P5">Lidar <text:line-break/>ranges</text:p>
        </draw:rect>
        <draw:connector draw:style-name="gr94" draw:text-style-name="P15" draw:layer="layout" draw:type="curve" svg:x1="32.654cm" svg:y1="73.528cm" svg:x2="28.654cm" svg:y2="74.728cm" draw:start-shape="id240" draw:start-glue-point="2" draw:end-shape="id241" svg:d="M32654 73528c0 900-4000 300-4000 1200" svg:viewBox="0 0 4001 1201">
          <text:p/>
        </draw:connector>
        <draw:rect draw:style-name="gr292" draw:text-style-name="P35" xml:id="id242" draw:id="id242" draw:layer="layout" svg:width="2.3cm" svg:height="1cm" svg:x="30.204cm" svg:y="74.728cm">
          <text:p text:style-name="P5">GPS</text:p>
        </draw:rect>
        <draw:connector draw:style-name="gr95" draw:text-style-name="P15" draw:layer="layout" draw:type="curve" svg:x1="32.654cm" svg:y1="73.528cm" svg:x2="31.354cm" svg:y2="74.728cm" draw:start-shape="id240" draw:start-glue-point="2" draw:end-shape="id242" svg:d="M32654 73528c0 900-1300 300-1300 1200" svg:viewBox="0 0 1301 1201">
          <text:p/>
        </draw:connector>
        <draw:rect draw:style-name="gr255" draw:text-style-name="P73" xml:id="id244" draw:id="id244" draw:layer="layout" svg:width="3.154cm" svg:height="1.57cm" svg:x="29.31cm" svg:y="63.161cm">
          <text:p text:style-name="P8"><text:span text:style-name="T29">Event</text:span><text:span text:style-name="T29"><text:line-break/></text:span><text:span text:style-name="T29">specific</text:span><text:span text:style-name="T29"><text:line-break/></text:span><text:span text:style-name="T29">knowledge</text:span></text:p>
        </draw:rect>
        <draw:connector draw:style-name="gr293" draw:text-style-name="P15" draw:layer="layout" draw:type="curve" svg:x1="34.472cm" svg:y1="61.781cm" svg:x2="30.887cm" svg:y2="63.161cm" draw:start-shape="id243" draw:start-glue-point="2" draw:end-shape="id244" draw:end-glue-point="0" svg:d="M34472 61781c0 1035-3585 345-3585 1380" svg:viewBox="0 0 3586 1381">
          <text:p/>
        </draw:connector>
        <draw:rect draw:style-name="gr292" draw:text-style-name="P35" xml:id="id248" draw:id="id248" draw:layer="layout" svg:width="2.3cm" svg:height="1cm" svg:x="29.634cm" svg:y="66.468cm">
          <text:p text:style-name="P5">oldest</text:p>
        </draw:rect>
        <draw:rect draw:style-name="gr292" draw:text-style-name="P35" xml:id="id233" draw:id="id233" draw:layer="layout" svg:width="2.3cm" svg:height="1cm" svg:x="69.904cm" svg:y="57.828cm">
          <text:p text:style-name="P5">Robotic lab</text:p>
        </draw:rect>
        <draw:connector draw:style-name="gr293" draw:text-style-name="P15" draw:layer="layout" draw:type="curve" svg:x1="71.054cm" svg:y1="58.828cm" svg:x2="71.054cm" svg:y2="59.828cm" draw:start-shape="id233" draw:start-glue-point="2" draw:end-shape="id245" draw:end-glue-point="0" svg:d="M71054 58828v1000" svg:viewBox="0 0 1 1001">
          <text:p/>
        </draw:connector>
        <draw:rect draw:style-name="gr292" draw:text-style-name="P35" xml:id="id246" draw:id="id246" draw:layer="layout" svg:width="2.9cm" svg:height="1.2cm" svg:x="67.004cm" svg:y="62.528cm">
          <text:p text:style-name="P5">Architecture</text:p>
        </draw:rect>
        <draw:rect draw:style-name="gr292" draw:text-style-name="P35" xml:id="id247" draw:id="id247" draw:layer="layout" svg:width="2.9cm" svg:height="1.2cm" svg:x="72.304cm" svg:y="62.528cm">
          <text:p text:style-name="P5">Training config</text:p>
        </draw:rect>
        <draw:connector draw:style-name="gr293" draw:text-style-name="P15" draw:layer="layout" draw:type="curve" svg:x1="71.054cm" svg:y1="61.428cm" svg:x2="68.454cm" svg:y2="62.528cm" draw:start-shape="id245" draw:start-glue-point="2" draw:end-shape="id246" svg:d="M71054 61428c0 825-2600 275-2600 1100" svg:viewBox="0 0 2601 1101">
          <text:p/>
        </draw:connector>
        <draw:connector draw:style-name="gr293" draw:text-style-name="P15" draw:layer="layout" draw:type="curve" svg:x1="71.054cm" svg:y1="61.428cm" svg:x2="73.754cm" svg:y2="62.528cm" draw:start-shape="id245" draw:start-glue-point="2" draw:end-shape="id247" draw:end-glue-point="0" svg:d="M71054 61428c0 825 2700 275 2700 1100" svg:viewBox="0 0 2701 1101">
          <text:p/>
        </draw:connector>
        <draw:connector draw:style-name="gr293" draw:text-style-name="P15" draw:layer="layout" draw:type="curve" svg:x1="30.784cm" svg:y1="67.468cm" svg:x2="23.654cm" svg:y2="69.528cm" draw:start-shape="id248" draw:start-glue-point="2" draw:end-shape="id238" draw:end-glue-point="0" svg:d="M30784 67468c0 1545-7130 515-7130 2060" svg:viewBox="0 0 7131 2061">
          <text:p/>
        </draw:connector>
        <draw:rect draw:style-name="gr292" draw:text-style-name="P35" xml:id="id249" draw:id="id249" draw:layer="layout" svg:width="2.3cm" svg:height="1cm" svg:x="21.804cm" svg:y="72.628cm">
          <text:p text:style-name="P5">Actions</text:p>
        </draw:rect>
        <draw:rect draw:style-name="gr292" draw:text-style-name="P35" xml:id="id250" draw:id="id250" draw:layer="layout" svg:width="2.3cm" svg:height="1cm" svg:x="19.004cm" svg:y="72.628cm">
          <text:p text:style-name="P5">Plans</text:p>
        </draw:rect>
        <draw:connector draw:style-name="gr294" draw:text-style-name="P15" draw:layer="layout" draw:type="curve" svg:x1="23.654cm" svg:y1="70.528cm" svg:x2="22.954cm" svg:y2="72.628cm" draw:start-shape="id238" draw:start-glue-point="2" draw:end-shape="id249" draw:end-glue-point="0" svg:d="M23654 70528c0 1575-700 525-700 2100" svg:viewBox="0 0 701 2101">
          <text:p/>
        </draw:connector>
        <draw:connector draw:style-name="gr295" draw:text-style-name="P15" draw:layer="layout" draw:type="curve" svg:x1="23.654cm" svg:y1="70.528cm" svg:x2="20.154cm" svg:y2="72.628cm" draw:start-shape="id238" draw:start-glue-point="2" draw:end-shape="id250" svg:d="M23654 70528c0 1575-3500 525-3500 2100" svg:viewBox="0 0 3501 2101">
          <text:p/>
        </draw:connector>
        <draw:rect draw:style-name="gr254" draw:text-style-name="P33" xml:id="id251" draw:id="id251" draw:layer="layout" svg:width="2.5cm" svg:height="1cm" svg:x="84.808cm" svg:y="53.174cm">
          <text:p text:style-name="P5">action</text:p>
        </draw:rect>
        <draw:connector draw:style-name="gr296" draw:text-style-name="P15" draw:layer="layout" draw:type="curve" svg:x1="69.716cm" svg:y1="45.549cm" svg:x2="86.058cm" svg:y2="53.174cm" draw:start-shape="id203" draw:start-glue-point="2" draw:end-shape="id251" draw:end-glue-point="0" svg:d="M69716 45549c0 5719 16342 1907 16342 7625" svg:viewBox="0 0 16343 7626">
          <text:p/>
        </draw:connector>
        <draw:rect draw:style-name="gr280" draw:text-style-name="P72" xml:id="id252" draw:id="id252" draw:layer="layout" svg:width="2.5cm" svg:height="1cm" svg:x="80.004cm" svg:y="57.328cm">
          <text:p text:style-name="P5">Segregarion</text:p>
        </draw:rect>
        <draw:rect draw:style-name="gr292" draw:text-style-name="P35" xml:id="id253" draw:id="id253" draw:layer="layout" svg:width="2.5cm" svg:height="1cm" svg:x="76.904cm" svg:y="60.528cm">
          <text:p text:style-name="P8"><text:span text:style-name="T27">Auto </text:span><text:span text:style-name="T27"><text:line-break/></text:span><text:span text:style-name="T27">correlation</text:span></text:p>
        </draw:rect>
        <draw:rect draw:style-name="gr292" draw:text-style-name="P35" xml:id="id254" draw:id="id254" draw:layer="layout" svg:width="2.5cm" svg:height="1cm" svg:x="79.871cm" svg:y="60.528cm">
          <text:p text:style-name="P8"><text:span text:style-name="T27">split</text:span></text:p>
        </draw:rect>
        <draw:rect draw:style-name="gr292" draw:text-style-name="P35" xml:id="id255" draw:id="id255" draw:layer="layout" svg:width="2.5cm" svg:height="1cm" svg:x="82.837cm" svg:y="60.528cm">
          <text:p text:style-name="P8"><text:span text:style-name="T27">clustering</text:span></text:p>
        </draw:rect>
        <draw:connector draw:style-name="gr297" draw:text-style-name="P15" draw:layer="layout" draw:type="curve" svg:x1="81.254cm" svg:y1="58.328cm" svg:x2="78.154cm" svg:y2="60.528cm" draw:start-shape="id252" draw:start-glue-point="2" draw:end-shape="id253" draw:end-glue-point="0" svg:d="M81254 58328c0 1650-3100 550-3100 2200" svg:viewBox="0 0 3101 2201">
          <text:p/>
        </draw:connector>
        <draw:connector draw:style-name="gr298" draw:text-style-name="P15" draw:layer="layout" draw:type="curve" svg:x1="81.254cm" svg:y1="58.328cm" svg:x2="81.121cm" svg:y2="60.528cm" draw:start-shape="id252" draw:start-glue-point="2" draw:end-shape="id254" draw:end-glue-point="0" svg:d="M81254 58328c0 1650-133 550-133 2200" svg:viewBox="0 0 134 2201">
          <text:p/>
        </draw:connector>
        <draw:connector draw:style-name="gr299" draw:text-style-name="P15" draw:layer="layout" draw:type="curve" svg:x1="81.254cm" svg:y1="58.328cm" svg:x2="84.087cm" svg:y2="60.528cm" draw:start-shape="id252" draw:start-glue-point="2" draw:end-shape="id255" svg:d="M81254 58328c0 1650 2833 550 2833 2200" svg:viewBox="0 0 2834 2201">
          <text:p/>
        </draw:connector>
        <draw:connector draw:style-name="gr300" draw:text-style-name="P15" draw:layer="layout" draw:type="curve" svg:x1="86.058cm" svg:y1="54.174cm" svg:x2="81.254cm" svg:y2="57.328cm" draw:start-shape="id251" draw:start-glue-point="2" draw:end-shape="id252" draw:end-glue-point="0" svg:d="M86058 54174c0 2365-4804 789-4804 3154" svg:viewBox="0 0 4805 3155">
          <text:p/>
        </draw:connector>
        <draw:rect draw:style-name="gr292" draw:text-style-name="P35" xml:id="id483" draw:id="id483" draw:layer="layout" svg:width="2.5cm" svg:height="1cm" svg:x="85.804cm" svg:y="60.528cm">
          <text:p text:style-name="P8"><text:span text:style-name="T27">Feature</text:span><text:span text:style-name="T27"><text:line-break/></text:span><text:span text:style-name="T27">slice</text:span></text:p>
        </draw:rect>
        <draw:rect draw:style-name="gr292" draw:text-style-name="P35" xml:id="id256" draw:id="id256" draw:layer="layout" svg:width="2.3cm" svg:height="1cm" svg:x="48.472cm" svg:y="59.941cm">
          <text:p text:style-name="P5">Goal<text:line-break/>types</text:p>
        </draw:rect>
        <draw:connector draw:style-name="gr301" draw:text-style-name="P15" draw:layer="layout" draw:type="curve" svg:x1="46.254cm" svg:y1="57.528cm" svg:x2="49.622cm" svg:y2="59.941cm" draw:start-shape="id231" draw:start-glue-point="2" draw:end-shape="id256" draw:end-glue-point="0" svg:d="M46254 57528c0 1810 3368 604 3368 2413" svg:viewBox="0 0 3369 2414">
          <text:p/>
        </draw:connector>
        <draw:rect draw:style-name="gr292" draw:text-style-name="P35" xml:id="id257" draw:id="id257" draw:layer="layout" svg:width="2.3cm" svg:height="1cm" svg:x="48.418cm" svg:y="61.675cm">
          <text:p text:style-name="P5">Suprise<text:line-break/>reduction</text:p>
        </draw:rect>
        <draw:connector draw:style-name="gr302" draw:text-style-name="P15" draw:layer="layout" draw:type="curve" svg:x1="49.622cm" svg:y1="60.941cm" svg:x2="49.568cm" svg:y2="61.675cm" draw:start-shape="id256" draw:start-glue-point="2" draw:end-shape="id257" draw:end-glue-point="0" svg:d="M49622 60941c0 550-54 184-54 734" svg:viewBox="0 0 55 735">
          <text:p/>
        </draw:connector>
        <draw:rect draw:style-name="gr255" draw:text-style-name="P67" xml:id="id258" draw:id="id258" draw:layer="layout" svg:width="3.154cm" svg:height="1.57cm" svg:x="36.695cm" svg:y="63.161cm">
          <text:p text:style-name="P8"><text:span text:style-name="T29">General events</text:span></text:p>
        </draw:rect>
        <draw:connector draw:style-name="gr303" draw:text-style-name="P15" draw:layer="layout" draw:type="curve" svg:x1="34.472cm" svg:y1="61.781cm" svg:x2="38.272cm" svg:y2="63.161cm" draw:start-shape="id243" draw:start-glue-point="2" draw:end-shape="id258" draw:end-glue-point="0" svg:d="M34472 61781c0 1035 3800 345 3800 1380" svg:viewBox="0 0 3801 1381">
          <text:p/>
        </draw:connector>
        <draw:rect draw:style-name="gr304" draw:text-style-name="P75" xml:id="id259" draw:id="id259" draw:layer="layout" svg:width="3.154cm" svg:height="1.57cm" svg:x="33.003cm" svg:y="63.161cm">
          <text:p text:style-name="P74"><text:span text:style-name="T29">lifetime</text:span></text:p>
        </draw:rect>
        <draw:connector draw:style-name="gr305" draw:text-style-name="P15" draw:layer="layout" draw:type="curve" svg:x1="34.472cm" svg:y1="61.781cm" svg:x2="34.58cm" svg:y2="63.161cm" draw:start-shape="id243" draw:end-shape="id259" draw:end-glue-point="0" svg:d="M34472 61781c0 1035 108 345 108 1380" svg:viewBox="0 0 109 1381">
          <text:p/>
        </draw:connector>
        <draw:connector draw:style-name="gr306" draw:text-style-name="P15" draw:layer="layout" draw:type="curve" svg:x1="30.887cm" svg:y1="64.731cm" svg:x2="30.784cm" svg:y2="66.468cm" draw:start-shape="id244" draw:start-glue-point="2" draw:end-shape="id248" draw:end-glue-point="0" svg:d="M30887 64731c0 1303-103 435-103 1737" svg:viewBox="0 0 104 1738">
          <text:p/>
        </draw:connector>
        <draw:connector draw:style-name="gr307" draw:text-style-name="P15" draw:layer="layout" draw:type="curve" svg:x1="30.784cm" svg:y1="67.468cm" svg:x2="28.464cm" svg:y2="69.587cm" draw:start-shape="id248" draw:start-glue-point="2" draw:end-shape="id260" draw:end-glue-point="0" svg:d="M30784 67468c0 1590-2320 531-2320 2119" svg:viewBox="0 0 2321 2120">
          <text:p/>
        </draw:connector>
        <draw:rect draw:style-name="gr255" draw:text-style-name="P67" xml:id="id243" draw:id="id243" draw:layer="layout" svg:width="3.804cm" svg:height="1cm" svg:x="32.57cm" svg:y="60.781cm">
          <text:p text:style-name="P8"><text:span text:style-name="T29">Auto</text:span><text:span text:style-name="T29">biogr</text:span><text:span text:style-name="T29">aphi</text:span><text:span text:style-name="T29">c</text:span></text:p>
        </draw:rect>
        <draw:connector draw:style-name="gr308" draw:text-style-name="P15" draw:layer="layout" draw:type="curve" svg:x1="37.11cm" svg:y1="58.114cm" svg:x2="34.472cm" svg:y2="60.781cm" draw:start-shape="id232" draw:end-shape="id243" draw:end-glue-point="0" svg:d="M37110 58114c0 2001-2638 668-2638 2667" svg:viewBox="0 0 2639 2668">
          <text:p/>
        </draw:connector>
        <draw:rect draw:style-name="gr292" draw:text-style-name="P35" xml:id="id261" draw:id="id261" draw:layer="layout" svg:width="2.138cm" svg:height="1.014cm" svg:x="119.674cm" svg:y="37.646cm">
          <text:p text:style-name="P5">neurons</text:p>
        </draw:rect>
        <draw:rect draw:style-name="gr255" draw:text-style-name="P67" xml:id="id264" draw:id="id264"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3" draw:id="id263"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2" draw:id="id262" draw:layer="layout" svg:width="2.138cm" svg:height="1.014cm" svg:x="118.571cm" svg:y="40.55cm">
          <text:p text:style-name="P8"><text:span text:style-name="T29">projection </text:span><text:span text:style-name="T29"><text:line-break/></text:span><text:span text:style-name="T29">neurons</text:span></text:p>
        </draw:rect>
        <draw:connector draw:style-name="gr309" draw:text-style-name="P46" draw:layer="layout" draw:type="curve" svg:x1="120.743cm" svg:y1="38.66cm" svg:x2="119.64cm" svg:y2="40.55cm" draw:start-shape="id261" draw:start-glue-point="2" draw:end-shape="id262" svg:d="M120743 38660c0 1417-1103 473-1103 1890" svg:viewBox="0 0 1104 1891">
          <text:p/>
        </draw:connector>
        <draw:connector draw:style-name="gr310" draw:text-style-name="P46" draw:layer="layout" draw:type="curve" svg:x1="120.743cm" svg:y1="38.66cm" svg:x2="122.227cm" svg:y2="40.526cm" draw:start-shape="id261" draw:start-glue-point="2" draw:end-shape="id263" draw:end-glue-point="0" svg:d="M120743 38660c0 1399 1484 467 1484 1866" svg:viewBox="0 0 1485 1867">
          <text:p/>
        </draw:connector>
        <draw:connector draw:style-name="gr311" draw:text-style-name="P46" draw:layer="layout" draw:type="curve" svg:x1="120.743cm" svg:y1="38.66cm" svg:x2="124.862cm" svg:y2="40.623cm" draw:start-shape="id261" draw:start-glue-point="2" draw:end-shape="id264" draw:end-glue-point="0" svg:d="M120743 38660c0 1473 4119 492 4119 1963" svg:viewBox="0 0 4120 1964">
          <text:p/>
        </draw:connector>
        <draw:rect draw:style-name="gr255" draw:text-style-name="P67" xml:id="id265" draw:id="id265" draw:layer="layout" svg:width="2.51cm" svg:height="1.014cm" svg:x="115.804cm" svg:y="40.53cm">
          <text:p text:style-name="P8"><text:span text:style-name="T29">Inter-neuron </text:span><text:span text:style-name="T29"><text:line-break/></text:span><text:span text:style-name="T29">neurons</text:span></text:p>
        </draw:rect>
        <draw:connector draw:style-name="gr312" draw:text-style-name="P46" draw:layer="layout" draw:type="curve" svg:x1="120.743cm" svg:y1="38.66cm" svg:x2="117.059cm" svg:y2="40.53cm" draw:start-shape="id261" draw:start-glue-point="2" draw:end-shape="id265" draw:end-glue-point="0" svg:d="M120743 38660c0 1402-3684 468-3684 1870" svg:viewBox="0 0 3685 1871">
          <text:p/>
        </draw:connector>
        <draw:rect draw:style-name="gr255" draw:text-style-name="P67" xml:id="id323" draw:id="id323" draw:layer="layout" svg:width="2.4cm" svg:height="1cm" svg:x="111.805cm" svg:y="32.625cm">
          <text:p text:style-name="P8"><text:span text:style-name="T29">awareness</text:span></text:p>
        </draw:rect>
        <draw:rect draw:style-name="gr255" draw:text-style-name="P77" xml:id="id267" draw:id="id267" draw:layer="layout" svg:width="2.962cm" svg:height="1cm" svg:x="111.461cm" svg:y="30.205cm">
          <text:p text:style-name="P76"><text:span text:style-name="T29">Consciousness</text:span></text:p>
        </draw:rect>
        <draw:connector draw:style-name="gr313" draw:text-style-name="P15" draw:layer="layout" draw:type="curve" svg:x1="115.171cm" svg:y1="28.951cm" svg:x2="112.942cm" svg:y2="30.205cm" draw:start-shape="id266" draw:start-glue-point="2" draw:end-shape="id267" draw:end-glue-point="0" svg:d="M115171 28951c0 314-557 627-1115 627-557 0-1114 314-1114 627" svg:viewBox="0 0 2230 1255">
          <text:p/>
        </draw:connector>
        <draw:rect draw:style-name="gr255" draw:text-style-name="P77" xml:id="id268" draw:id="id268" draw:layer="layout" svg:width="3.448cm" svg:height="1cm" svg:x="115.797cm" svg:y="30.671cm">
          <text:p text:style-name="P76"><text:span text:style-name="T29">unconsciousness</text:span></text:p>
        </draw:rect>
        <draw:connector draw:style-name="gr314" draw:text-style-name="P15" draw:layer="layout" draw:type="curve" svg:x1="115.171cm" svg:y1="28.951cm" svg:x2="117.521cm" svg:y2="30.671cm" draw:start-shape="id266" draw:start-glue-point="2" draw:end-shape="id268" draw:end-glue-point="0" svg:d="M115171 28951c0 1290 2350 430 2350 1720" svg:viewBox="0 0 2351 1721">
          <text:p/>
        </draw:connector>
        <draw:rect draw:style-name="gr255" draw:text-style-name="P67" xml:id="id269" draw:id="id269" draw:layer="layout" svg:width="2.4cm" svg:height="1cm" svg:x="101.7cm" svg:y="39.065cm">
          <text:p text:style-name="P8"><text:span text:style-name="T29">Self-</text:span><text:span text:style-name="T29"><text:line-break/></text:span><text:span text:style-name="T29">awareness</text:span></text:p>
        </draw:rect>
        <draw:connector draw:style-name="gr315" draw:text-style-name="P15" draw:layer="layout" draw:type="curve" svg:x1="102.857cm" svg:y1="38.365cm" svg:x2="102.9cm" svg:y2="39.065cm" draw:start-shape="id213" draw:start-glue-point="2" draw:end-shape="id269" draw:end-glue-point="0" svg:d="M102857 38365c0 525 43 175 43 700" svg:viewBox="0 0 44 701">
          <text:p/>
        </draw:connector>
        <draw:rect draw:style-name="gr41" draw:text-style-name="P5" xml:id="id270" draw:id="id270" draw:layer="layout" svg:width="2.143cm" svg:height="1.085cm" svg:x="101.829cm" svg:y="40.952cm">
          <text:p text:style-name="P5">Body<text:line-break/>awareness</text:p>
        </draw:rect>
        <draw:connector draw:style-name="gr316" draw:text-style-name="P15" draw:layer="layout" draw:type="curve" svg:x1="102.9cm" svg:y1="40.065cm" svg:x2="102.9cm" svg:y2="40.952cm" draw:start-shape="id269" draw:start-glue-point="2" draw:end-shape="id270" draw:end-glue-point="0" svg:d="M102900 40065v887" svg:viewBox="0 0 1 888">
          <text:p/>
        </draw:connector>
        <draw:custom-shape draw:style-name="gr317" draw:text-style-name="P68" xml:id="id272" draw:id="id272"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6" draw:id="id266" draw:layer="layout" svg:width="2.4cm" svg:height="1cm" svg:x="113.971cm" svg:y="27.951cm">
          <text:p text:style-name="P8"><text:span text:style-name="T29">Psyche</text:span></text:p>
        </draw:rect>
        <draw:connector draw:style-name="gr318" draw:text-style-name="P15" draw:layer="layout" draw:type="curve" svg:x1="110.471cm" svg:y1="27.075cm" svg:x2="115.171cm" svg:y2="27.951cm" draw:start-shape="id187" draw:start-glue-point="2" draw:end-shape="id266" draw:end-glue-point="0" svg:d="M110471 27075c0 251 624 501 1248 501 623 0 1247-32 1247-63 0-32 551-63 1103-63 551 0 1102 251 1102 501" svg:viewBox="0 0 4701 877">
          <text:p/>
        </draw:connector>
        <draw:rect draw:style-name="gr255" draw:text-style-name="P67" xml:id="id271" draw:id="id271"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1" draw:start-glue-point="2" draw:end-shape="id212" draw:end-glue-point="0" svg:d="M103326 31338c0 2341 3666 781 3666 3122" svg:viewBox="0 0 3667 3123">
          <text:p/>
        </draw:connector>
        <draw:connector draw:style-name="gr320" draw:text-style-name="P15" draw:layer="layout" draw:type="curve" svg:x1="103.326cm" svg:y1="31.338cm" svg:x2="92.83cm" svg:y2="35.148cm" draw:start-shape="id271" draw:start-glue-point="2" draw:end-shape="id211"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1" draw:end-glue-point="0" svg:d="M110471 27075c0 2139-7145 714-7145 2851" svg:viewBox="0 0 7146 2852">
          <text:p/>
        </draw:connector>
        <draw:connector draw:style-name="gr284" draw:text-style-name="P15" draw:layer="layout" draw:type="curve" svg:x1="102.857cm" svg:y1="37.365cm" svg:x2="103.55cm" svg:y2="36.083cm" draw:start-shape="id213" draw:end-shape="id272" draw:end-glue-point="6" svg:d="M102857 37365c0-961 693-321 693-1282" svg:viewBox="0 0 694 1283">
          <text:p/>
        </draw:connector>
        <draw:rect draw:style-name="gr255" draw:text-style-name="P71" xml:id="id273" draw:id="id273" draw:layer="layout" svg:width="2.4cm" svg:height="1cm" svg:x="104.817cm" svg:y="37.308cm">
          <text:p text:style-name="P3"><text:span text:style-name="T29">Self-</text:span><text:span text:style-name="T29"><text:line-break/></text:span><text:span text:style-name="T29">monitoring</text:span></text:p>
        </draw:rect>
        <draw:rect draw:style-name="gr255" draw:text-style-name="P77" xml:id="id274" draw:id="id274" draw:layer="layout" svg:width="2.4cm" svg:height="1cm" svg:x="107.733cm" svg:y="37.27cm">
          <text:p text:style-name="P78"><text:span text:style-name="T29">Self-</text:span><text:span text:style-name="T29"><text:line-break/></text:span><text:span text:style-name="T29">evaluation</text:span></text:p>
        </draw:rect>
        <draw:rect draw:style-name="gr255" draw:text-style-name="P71" xml:id="id275" draw:id="id275" draw:layer="layout" svg:width="2.4cm" svg:height="1cm" svg:x="110.65cm" svg:y="37.27cm">
          <text:p text:style-name="P3"><text:span text:style-name="T29">Self-</text:span><text:span text:style-name="T29"><text:line-break/></text:span><text:span text:style-name="T29">regulation</text:span></text:p>
        </draw:rect>
        <draw:connector draw:style-name="gr322" draw:text-style-name="P15" draw:layer="layout" draw:type="curve" svg:x1="106.992cm" svg:y1="35.872cm" svg:x2="106.017cm" svg:y2="37.308cm" draw:start-shape="id212" draw:start-glue-point="2" draw:end-shape="id273" draw:end-glue-point="0" svg:d="M106992 35872c0 1077-975 359-975 1436" svg:viewBox="0 0 976 1437">
          <text:p/>
        </draw:connector>
        <draw:connector draw:style-name="gr323" draw:text-style-name="P15" draw:layer="layout" draw:type="curve" svg:x1="106.992cm" svg:y1="35.872cm" svg:x2="108.933cm" svg:y2="37.27cm" draw:start-shape="id212" draw:start-glue-point="2" draw:end-shape="id274" draw:end-glue-point="0" svg:d="M106992 35872c0 1048 1941 350 1941 1398" svg:viewBox="0 0 1942 1399">
          <text:p/>
        </draw:connector>
        <draw:connector draw:style-name="gr324" draw:text-style-name="P15" draw:layer="layout" draw:type="curve" svg:x1="106.992cm" svg:y1="35.872cm" svg:x2="111.85cm" svg:y2="37.27cm" draw:start-shape="id212" draw:start-glue-point="2" draw:end-shape="id275" draw:end-glue-point="0" svg:d="M106992 35872c0 1048 4858 350 4858 1398" svg:viewBox="0 0 4859 1399">
          <text:p/>
        </draw:connector>
        <draw:connector draw:style-name="gr325" draw:text-style-name="P15" draw:layer="layout" draw:type="curve" svg:x1="122.751cm" svg:y1="35.691cm" svg:x2="120.743cm" svg:y2="37.646cm" draw:start-shape="id276" draw:start-glue-point="2" draw:end-shape="id261" draw:end-glue-point="0" svg:d="M122751 35691c0 1467-2008 490-2008 1955" svg:viewBox="0 0 2009 1956">
          <text:p/>
        </draw:connector>
        <draw:rect draw:style-name="gr292" draw:text-style-name="P35" xml:id="id277" draw:id="id277" draw:layer="layout" svg:width="2.138cm" svg:height="1.014cm" svg:x="123.702cm" svg:y="37.693cm">
          <text:p text:style-name="P5">Nerve</text:p>
        </draw:rect>
        <draw:connector draw:style-name="gr326" draw:text-style-name="P15" draw:layer="layout" draw:type="curve" svg:x1="122.751cm" svg:y1="35.691cm" svg:x2="124.771cm" svg:y2="37.693cm" draw:start-shape="id276" draw:start-glue-point="2" draw:end-shape="id277" draw:end-glue-point="0" svg:d="M122751 35691c0 1501 2020 501 2020 2002" svg:viewBox="0 0 2021 2003">
          <text:p/>
        </draw:connector>
        <draw:rect draw:style-name="gr254" draw:text-style-name="P33" xml:id="id276" draw:id="id276"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6" draw:end-glue-point="0" svg:d="M137150 30109c0 3448-14399 1150-14399 4598" svg:viewBox="0 0 14400 4599">
          <text:p/>
        </draw:connector>
        <draw:g draw:style-name="gr31">
          <draw:frame draw:style-name="gr328" draw:text-style-name="P79"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79"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79" draw:layer="layout" draw:type="line" svg:x1="-101.046cm" svg:y1="68.701cm" svg:x2="-98.561cm" svg:y2="68.713cm" svg:d="M-101046 68701l2485 12" svg:viewBox="0 0 2486 13">
            <text:p/>
          </draw:connector>
          <draw:connector draw:style-name="gr329" draw:text-style-name="P79" draw:layer="layout" draw:type="line" svg:x1="-101.056cm" svg:y1="75.29cm" svg:x2="-98.571cm" svg:y2="75.3cm" svg:d="M-101056 75290l2485 10" svg:viewBox="0 0 2486 11">
            <text:p/>
          </draw:connector>
          <draw:custom-shape draw:style-name="gr330" draw:text-style-name="P80" xml:id="id278" draw:id="id278"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1" draw:layer="layout" svg:width="4.719cm" svg:height="3.139cm" draw:transform="rotate (1.5707963267949) translate (-102.479cm 74.219cm)">
            <draw:text-box>
              <text:p text:style-name="P3"><text:span text:style-name="T30">Exteroceptive </text:span></text:p>
              <text:p text:style-name="P3"><text:span text:style-name="T30">and </text:span></text:p>
              <text:p text:style-name="P3"><text:span text:style-name="T30">proprioceptive </text:span></text:p>
              <text:p text:style-name="P3"><text:span text:style-name="T30">data</text:span></text:p>
            </draw:text-box>
          </draw:frame>
          <draw:custom-shape draw:style-name="gr332" draw:text-style-name="P82" xml:id="id279" draw:id="id279"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5.15cm" svg:y1="71.967cm" svg:x2="-93.325cm" svg:y2="72.02cm" draw:start-shape="id278" draw:start-glue-point="1" draw:end-shape="id279" draw:end-glue-point="6" svg:d="M-95150 71967l1825 53" svg:viewBox="0 0 1826 54">
            <text:p/>
          </draw:connector>
          <draw:custom-shape draw:style-name="gr332" draw:text-style-name="P82" xml:id="id280" draw:id="id280"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2" xml:id="id282" draw:id="id282"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2.923cm" svg:y1="72.02cm" svg:x2="-92.172cm" svg:y2="69.475cm" draw:start-shape="id279" draw:start-glue-point="10" draw:end-shape="id280" draw:end-glue-point="8" svg:d="M-92923 72020l751-2545" svg:viewBox="0 0 752 2546">
            <text:p/>
          </draw:connector>
          <draw:custom-shape draw:style-name="gr334" draw:text-style-name="P83" xml:id="id281" draw:id="id281"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4" draw:layer="layout" svg:width="5.423cm" svg:height="1.697cm" svg:x="-87.435cm" svg:y="66.065cm">
            <draw:text-box>
              <text:p text:style-name="P5"><text:span text:style-name="T31">Clustering </text:span></text:p>
              <text:p text:style-name="P5"><text:span text:style-name="T31">abstraction</text:span></text:p>
            </draw:text-box>
          </draw:frame>
          <draw:frame draw:style-name="gr336" draw:text-style-name="P84" draw:layer="layout" svg:width="3.515cm" svg:height="1.696cm" draw:transform="rotate (1.5707963267949) translate (-78.895cm 72.031cm)">
            <draw:text-box>
              <text:p text:style-name="P5"><text:span text:style-name="T31">Offline </text:span></text:p>
              <text:p text:style-name="P5"><text:span text:style-name="T31">learning</text:span></text:p>
            </draw:text-box>
          </draw:frame>
          <draw:custom-shape draw:style-name="gr337" draw:text-style-name="P83"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3" xml:id="id283" draw:id="id283"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5"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5"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79" draw:layer="layout" svg:x1="-92.172cm" svg:y1="69.065cm" svg:x2="-89.265cm" svg:y2="66.815cm" draw:start-shape="id280" draw:start-glue-point="4" draw:end-shape="id281" draw:end-glue-point="0" svg:d="M-92172 69065v-2250h2907" svg:viewBox="0 0 2908 2251">
            <text:p/>
          </draw:connector>
          <draw:connector draw:style-name="gr340" draw:text-style-name="P79" draw:layer="layout" svg:x1="-92.178cm" svg:y1="74.897cm" svg:x2="-89.265cm" svg:y2="77.107cm" draw:start-shape="id282" draw:start-glue-point="8" draw:end-shape="id283" draw:end-glue-point="0" svg:d="M-92178 74897v2210h2913" svg:viewBox="0 0 2914 2211">
            <text:p/>
          </draw:connector>
          <draw:frame draw:style-name="gr336" draw:text-style-name="P84" draw:layer="layout" svg:width="5.422cm" svg:height="1.696cm" svg:x="-87.433cm" svg:y="76.42cm">
            <draw:text-box>
              <text:p text:style-name="P5"><text:span text:style-name="T31">Abnormality</text:span></text:p>
              <text:p text:style-name="P5"><text:span text:style-name="T31">detection</text:span></text:p>
            </draw:text-box>
          </draw:frame>
          <draw:frame draw:style-name="gr341" draw:text-style-name="P84" draw:layer="layout" svg:width="4.203cm" svg:height="2.417cm" draw:transform="rotate (1.5707963267949) translate (-79.09cm 79.256cm)">
            <draw:text-box>
              <text:p text:style-name="P5"><text:span text:style-name="T31">Online</text:span></text:p>
              <text:p text:style-name="P5"><text:span text:style-name="T31">inference</text:span></text:p>
            </draw:text-box>
          </draw:frame>
          <draw:custom-shape draw:style-name="gr342" draw:text-style-name="P79"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6" draw:layer="layout" svg:width="6.047cm" svg:height="1.697cm" draw:transform="rotate (1.5707963267949) translate (-87.207cm 75.046cm)">
            <draw:text-box>
              <text:p text:style-name="P5"><text:span text:style-name="T31">Proprioceptive DBN</text:span></text:p>
            </draw:text-box>
          </draw:frame>
          <draw:frame draw:style-name="gr336" draw:text-style-name="P86" draw:layer="layout" svg:width="6.047cm" svg:height="1.696cm" draw:transform="rotate (1.5707963267949) translate (-83.337cm 75.046cm)">
            <draw:text-box>
              <text:p text:style-name="P5"><text:span text:style-name="T31">Exteroceptive </text:span></text:p>
              <text:p text:style-name="P5"><text:span text:style-name="T31">DBN</text:span></text:p>
            </draw:text-box>
          </draw:frame>
          <draw:connector draw:style-name="gr343" draw:text-style-name="P79" draw:layer="layout" draw:type="line" svg:x1="-86.991cm" svg:y1="67.564cm" svg:x2="-86.96cm" svg:y2="69.289cm" svg:d="M-86991 67564l31 1725" svg:viewBox="0 0 32 1726">
            <text:p/>
          </draw:connector>
          <draw:connector draw:style-name="gr343" draw:text-style-name="P79" draw:layer="layout" draw:type="line" svg:x1="-82.745cm" svg:y1="67.553cm" svg:x2="-82.713cm" svg:y2="69.28cm" svg:d="M-82745 67553l32 1727" svg:viewBox="0 0 33 1728">
            <text:p/>
          </draw:connector>
          <draw:connector draw:style-name="gr343" draw:text-style-name="P79" draw:layer="layout" draw:type="line" svg:x1="-86.672cm" svg:y1="74.463cm" svg:x2="-86.641cm" svg:y2="76.188cm" svg:d="M-86672 74463l31 1725" svg:viewBox="0 0 32 1726">
            <text:p/>
          </draw:connector>
          <draw:connector draw:style-name="gr343" draw:text-style-name="P79" draw:layer="layout" draw:type="line" svg:x1="-82.424cm" svg:y1="74.453cm" svg:x2="-82.395cm" svg:y2="76.178cm" svg:d="M-82424 74453l29 1725" svg:viewBox="0 0 30 1726">
            <text:p/>
          </draw:connector>
          <draw:connector draw:style-name="gr344" draw:text-style-name="P87" draw:layer="layout" svg:x1="-89.265cm" svg:y1="78.209cm" svg:x2="-92.982cm" svg:y2="72.165cm" draw:start-shape="id283" draw:start-glue-point="4" draw:end-shape="id279" draw:end-glue-point="9" svg:d="M-89265 78209h-1828v-6044h-1889" svg:viewBox="0 0 3718 6045">
            <text:p/>
          </draw:connector>
          <draw:frame draw:style-name="gr345" draw:text-style-name="P88" draw:layer="layout" svg:width="4.985cm" svg:height="1.593cm" draw:transform="rotate (1.5707963267949) translate (-97.297cm 74.331cm)">
            <draw:text-box>
              <text:p><text:span text:style-name="T31">Preprocessing</text:span></text:p>
            </draw:text-box>
          </draw:frame>
          <draw:frame draw:style-name="gr346" draw:text-style-name="P89" draw:layer="layout" svg:width="3.073cm" svg:height="2.168cm" svg:x="-92.954cm" svg:y="71.578cm">
            <draw:text-box>
              <text:p><text:span text:style-name="T32">Create/update</text:span><text:span text:style-name="T32"><text:line-break/></text:span><text:span text:style-name="T32">models</text:span></text:p>
            </draw:text-box>
          </draw:frame>
        </draw:g>
        <draw:g draw:style-name="gr31">
          <draw:custom-shape draw:style-name="gr347" draw:text-style-name="P90"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3"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4"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5"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6" xml:id="id284" draw:id="id284"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5" draw:id="id285"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6" draw:id="id286"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5cm" svg:y1="75.144cm" svg:x2="-115.355cm" svg:y2="75.931cm" draw:start-shape="id284" draw:start-glue-point="8" draw:end-shape="id285" draw:end-glue-point="0" svg:d="M-115355 75144v787" svg:viewBox="0 0 1 788">
            <text:p/>
          </draw:connector>
          <draw:connector draw:style-name="gr360" draw:text-style-name="P97" draw:layer="layout" draw:type="line" svg:x1="-115.355cm" svg:y1="76.838cm" svg:x2="-115.355cm" svg:y2="77.647cm" draw:start-shape="id285" draw:start-glue-point="8" draw:end-shape="id286" draw:end-glue-point="4" svg:d="M-115355 76838v809" svg:viewBox="0 0 1 810">
            <text:p/>
          </draw:connector>
          <draw:custom-shape draw:style-name="gr361" draw:text-style-name="P96" xml:id="id287" draw:id="id287"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88" draw:id="id288"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6" xml:id="id289" draw:id="id289"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3cm" svg:y1="75.147cm" svg:x2="-110.363cm" svg:y2="75.931cm" draw:start-shape="id287" draw:start-glue-point="8" draw:end-shape="id288" draw:end-glue-point="0" svg:d="M-110363 75147v784" svg:viewBox="0 0 1 785">
            <text:p/>
          </draw:connector>
          <draw:connector draw:style-name="gr360" draw:text-style-name="P97" draw:layer="layout" draw:type="line" svg:x1="-110.363cm" svg:y1="76.838cm" svg:x2="-110.363cm" svg:y2="77.649cm" draw:start-shape="id288" draw:start-glue-point="8" draw:end-shape="id289" draw:end-glue-point="4" svg:d="M-110363 76838v811" svg:viewBox="0 0 1 812">
            <text:p/>
          </draw:connector>
          <draw:connector draw:style-name="gr360" draw:text-style-name="P97" draw:layer="layout" draw:type="line" svg:x1="-114.848cm" svg:y1="74.692cm" svg:x2="-110.871cm" svg:y2="74.694cm" draw:start-shape="id284" draw:start-glue-point="10" draw:end-shape="id287" draw:end-glue-point="6" svg:d="M-114848 74692l3977 2" svg:viewBox="0 0 3978 3">
            <text:p/>
          </draw:connector>
          <draw:connector draw:style-name="gr360" draw:text-style-name="P97" draw:layer="layout" draw:type="line" svg:x1="-114.848cm" svg:y1="76.385cm" svg:x2="-110.871cm" svg:y2="76.385cm" draw:start-shape="id285" draw:start-glue-point="10" draw:end-shape="id288" draw:end-glue-point="6" svg:d="M-114848 76385h3977" svg:viewBox="0 0 3978 1">
            <text:p/>
          </draw:connector>
          <draw:g draw:style-name="gr23">
            <svg:title>TexMaths</svg:title>
            <svg:desc>14§display§\lambda_{X^{1}S^{2}}§svg§600§FALSE§</svg:desc>
            <draw:path draw:style-name="gr363" draw:text-style-name="P98"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8"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8" draw:layer="layout" svg:width="0.068cm" svg:height="0.11cm" svg:x="-108.942cm" svg:y="75.389cm" svg:viewBox="0 0 69 111" svg:d="M44 5c0-5-1-5-7-5-11 11-31 11-34 11h-3v7h3c4 0 14-1 24-4v83c0 5 0 8-17 8h-8v6c9 0 25 0 34 0s24 0 33 0v-6h-8c-17 0-17-3-17-8z">
              <text:p/>
            </draw:path>
            <draw:path draw:style-name="gr363" draw:text-style-name="P98"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8"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8"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086cm" svg:height="0.155cm" svg:x="-113.076cm" svg:y="74.24cm" svg:viewBox="0 0 87 156" svg:d="M53 7c0-7-1-7-7-7-15 15-36 15-46 15v9c5 0 21 0 34-8v121c0 7 0 10-23 10h-9v9c4 0 34-2 42-2 7 0 37 2 43 2v-9h-10c-24 0-24-3-24-10z">
              <text:p/>
            </draw:path>
            <draw:path draw:style-name="gr363" draw:text-style-name="P98"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8"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085cm" svg:height="0.154cm" svg:x="-113.076cm" svg:y="75.967cm" svg:viewBox="0 0 86 155" svg:d="M53 7c0-7-1-7-7-7-15 15-36 15-46 15v9c5 0 21 0 34-8v120c0 8 0 11-23 11h-9v8c4 0 33-1 42-1 7 0 37 1 42 1v-8h-9c-24 0-24-3-24-11z">
              <text:p/>
            </draw:path>
            <draw:path draw:style-name="gr363" draw:text-style-name="P98"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8"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086cm" svg:height="0.154cm" svg:x="-115.427cm" svg:y="74.481cm" svg:viewBox="0 0 87 155" svg:d="M53 7c0-7 0-7-7-7-15 15-36 15-46 15v9c5 0 21 0 34-8v120c0 8 0 11-23 11h-9v8c4 0 34-1 42-1 7 0 37 1 43 1v-8h-10c-24 0-24-3-24-11z">
              <text:p/>
            </draw:path>
            <draw:path draw:style-name="gr363" draw:text-style-name="P98"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7cm" svg:y="74.792cm" svg:viewBox="0 0 159 12" svg:d="M150 12c3 0 9 0 9-6s-6-6-9-6h-141c-4 0-9 0-9 6s5 6 9 6z">
              <text:p/>
            </draw:path>
            <draw:path draw:style-name="gr363" draw:text-style-name="P98"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8"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086cm" svg:height="0.154cm" svg:x="-115.379cm" svg:y="76.178cm" svg:viewBox="0 0 87 155" svg:d="M53 7c0-7 0-7-7-7-15 15-36 15-46 15v9c5 0 21 0 34-8v120c0 8 0 11-23 11h-9v8c4 0 34-1 42-1 7 0 37 1 43 1v-8h-10c-24 0-24-3-24-11z">
              <text:p/>
            </draw:path>
            <draw:path draw:style-name="gr363" draw:text-style-name="P98"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05cm" svg:y="76.489cm" svg:viewBox="0 0 159 12" svg:d="M150 12c3 0 9 0 9-6s-6-6-9-6h-141c-4 0-9 0-9 6s5 6 9 6z">
              <text:p/>
            </draw:path>
            <draw:path draw:style-name="gr363" draw:text-style-name="P98"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8"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5.41cm" svg:y="77.893cm" svg:viewBox="0 0 87 155" svg:d="M53 7c0-7-1-7-7-7-15 15-36 15-46 15v9c5 0 21 0 34-8v120c0 8 0 11-23 11h-9v8c4 0 34-1 42-1 7 0 37 1 43 1v-8h-10c-24 0-24-3-24-11z">
              <text:p/>
            </draw:path>
            <draw:path draw:style-name="gr363" draw:text-style-name="P98"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4cm" svg:y="78.205cm" svg:viewBox="0 0 159 12" svg:d="M150 12c3 0 9 0 9-6s-6-6-9-6h-141c-4 0-9 0-9 6s5 6 9 6z">
              <text:p/>
            </draw:path>
            <draw:path draw:style-name="gr363" draw:text-style-name="P98"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8"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8" draw:layer="layout" svg:width="0.085cm" svg:height="0.154cm" svg:x="-110.269cm" svg:y="74.483cm" svg:viewBox="0 0 86 155" svg:d="M53 7c0-7 0-7-7-7-15 15-36 15-46 15v9c5 0 21 0 34-8v120c0 8 0 11-23 11h-9v8c4 0 33-1 42-1 7 0 37 1 42 1v-8h-9c-24 0-24-3-24-11z">
              <text:p/>
            </draw:path>
            <draw:path draw:style-name="gr363" draw:text-style-name="P98"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8"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8" draw:layer="layout" svg:width="0.085cm" svg:height="0.154cm" svg:x="-110.223cm" svg:y="76.178cm" svg:viewBox="0 0 86 155" svg:d="M53 7c0-7 0-7-7-7-15 15-36 15-46 15v9c5 0 21 0 34-8v120c0 8 0 11-23 11h-9v8c4 0 33-1 42-1 7 0 37 1 42 1v-8h-9c-24 0-24-3-24-11z">
              <text:p/>
            </draw:path>
            <draw:path draw:style-name="gr363" draw:text-style-name="P98"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8"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0.252cm" svg:y="77.893cm" svg:viewBox="0 0 87 155" svg:d="M53 7c0-7-1-7-7-7-15 15-36 15-46 15v9c5 0 21 0 34-8v120c0 8 0 11-23 11h-9v8c4 0 34-1 42-1 7 0 37 1 43 1v-8h-10c-24 0-24-3-24-11z">
              <text:p/>
            </draw:path>
            <draw:path draw:style-name="gr363" draw:text-style-name="P98"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6" xml:id="id291" draw:id="id291"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6" xml:id="id290" draw:id="id290"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92" draw:id="id292"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9cm" svg:y1="69.615cm" svg:x2="-115.359cm" svg:y2="68.829cm" draw:start-shape="id290" draw:start-glue-point="4" draw:end-shape="id291" draw:end-glue-point="8" svg:d="M-115359 69615v-786" svg:viewBox="0 0 1 787">
            <text:p/>
          </draw:connector>
          <draw:connector draw:style-name="gr360" draw:text-style-name="P97" draw:layer="layout" draw:type="line" svg:x1="-115.359cm" svg:y1="71.329cm" svg:x2="-115.359cm" svg:y2="70.521cm" draw:start-shape="id292" draw:start-glue-point="4" draw:end-shape="id290" draw:end-glue-point="8" svg:d="M-115359 71329v-808" svg:viewBox="0 0 1 809">
            <text:p/>
          </draw:connector>
          <draw:custom-shape draw:style-name="gr365" draw:text-style-name="P96" xml:id="id294" draw:id="id294"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3" draw:id="id293"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5" draw:id="id295"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6cm" svg:y1="69.615cm" svg:x2="-110.366cm" svg:y2="68.829cm" draw:start-shape="id293" draw:start-glue-point="4" draw:end-shape="id294" draw:end-glue-point="8" svg:d="M-110366 69615v-786" svg:viewBox="0 0 1 787">
            <text:p/>
          </draw:connector>
          <draw:connector draw:style-name="gr360" draw:text-style-name="P97" draw:layer="layout" draw:type="line" svg:x1="-110.366cm" svg:y1="71.332cm" svg:x2="-110.366cm" svg:y2="70.521cm" draw:start-shape="id295" draw:start-glue-point="4" draw:end-shape="id293" draw:end-glue-point="8" svg:d="M-110366 71332v-811" svg:viewBox="0 0 1 812">
            <text:p/>
          </draw:connector>
          <draw:connector draw:style-name="gr360" draw:text-style-name="P97" draw:layer="layout" draw:type="line" svg:x1="-114.851cm" svg:y1="71.784cm" svg:x2="-110.875cm" svg:y2="71.785cm" draw:start-shape="id292" draw:start-glue-point="10" draw:end-shape="id295" draw:end-glue-point="6" svg:d="M-114851 71784l3976 1" svg:viewBox="0 0 3977 2">
            <text:p/>
          </draw:connector>
          <draw:connector draw:style-name="gr360" draw:text-style-name="P97" draw:layer="layout" draw:type="line" svg:x1="-114.851cm" svg:y1="70.068cm" svg:x2="-110.875cm" svg:y2="70.068cm" draw:start-shape="id290" draw:start-glue-point="10" draw:end-shape="id293" draw:end-glue-point="6" svg:d="M-114851 70068h3976" svg:viewBox="0 0 3977 1">
            <text:p/>
          </draw:connector>
          <draw:g draw:style-name="gr23">
            <svg:title>TexMaths</svg:title>
            <svg:desc>14§display§X_{t-1}^{2}§svg§600§FALSE§</svg:desc>
            <draw:path draw:style-name="gr363" draw:text-style-name="P98"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1cm" svg:y="70.171cm" svg:viewBox="0 0 159 12" svg:d="M150 12c3 0 9 0 9-6s-6-6-9-6h-141c-4 0-9 0-9 6s5 6 9 6z">
              <text:p/>
            </draw:path>
            <draw:path draw:style-name="gr363" draw:text-style-name="P98"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8"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7cm" svg:y="68.495cm" svg:viewBox="0 0 159 12" svg:d="M150 12c3 0 9 0 9-6s-6-6-9-6h-141c-4 0-9 0-9 6s5 6 9 6z">
              <text:p/>
            </draw:path>
            <draw:path draw:style-name="gr363" draw:text-style-name="P98"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8"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8"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8"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6" xml:id="id296" draw:id="id296"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97" draw:id="id297"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4.358cm" svg:y1="73.522cm" svg:x2="-115.355cm" svg:y2="74.24cm" draw:start-shape="id296" draw:start-glue-point="7" draw:end-shape="id284" draw:end-glue-point="4" svg:d="M-114358 73522l-997 718" svg:viewBox="0 0 998 719">
            <text:p/>
          </draw:connector>
          <draw:connector draw:style-name="gr360" draw:text-style-name="P97" draw:layer="layout" draw:type="line" svg:x1="-114.358cm" svg:y1="72.88cm" svg:x2="-115.359cm" svg:y2="72.238cm" draw:start-shape="id296" draw:start-glue-point="5" draw:end-shape="id292" draw:end-glue-point="8" svg:d="M-114358 72880l-1001-642" svg:viewBox="0 0 1002 643">
            <text:p/>
          </draw:connector>
          <draw:connector draw:style-name="gr360" draw:text-style-name="P97" draw:layer="layout" draw:type="line" svg:x1="-111.36cm" svg:y1="73.523cm" svg:x2="-110.723cm" svg:y2="74.372cm" draw:start-shape="id297" draw:start-glue-point="9" draw:end-shape="id287" draw:end-glue-point="5" svg:d="M-111360 73523l637 849" svg:viewBox="0 0 638 850">
            <text:p/>
          </draw:connector>
          <draw:connector draw:style-name="gr360" draw:text-style-name="P97" draw:layer="layout" draw:type="line" svg:x1="-111.36cm" svg:y1="72.88cm" svg:x2="-110.726cm" svg:y2="72.106cm" draw:start-shape="id297" draw:start-glue-point="11" draw:end-shape="id295" draw:end-glue-point="7" svg:d="M-111360 72880l634-774" svg:viewBox="0 0 635 775">
            <text:p/>
          </draw:connector>
          <draw:connector draw:style-name="gr360" draw:text-style-name="P97" draw:layer="layout" draw:type="line" svg:x1="-113.49cm" svg:y1="73.201cm" svg:x2="-112.228cm" svg:y2="73.202cm" draw:start-shape="id296" draw:start-glue-point="10" draw:end-shape="id297" draw:end-glue-point="6" svg:d="M-113490 73201l1262 1" svg:viewBox="0 0 1263 2">
            <text:p/>
          </draw:connector>
          <draw:g draw:style-name="gr23">
            <svg:title>TexMaths</svg:title>
            <svg:desc>14§display§D_{t-1}§svg§600§FALSE§</svg:desc>
            <draw:path draw:style-name="gr363" draw:text-style-name="P98"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8"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3.913cm" svg:y="73.258cm" svg:viewBox="0 0 159 12" svg:d="M150 12c3 0 9 0 9-6s-6-6-9-6h-141c-4 0-9 0-9 6s5 6 9 6z">
              <text:p/>
            </draw:path>
            <draw:path draw:style-name="gr363" draw:text-style-name="P98"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8"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8"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5" draw:start-glue-point="10" draw:end-shape="id288" svg:d="M-109858 71785c775 0 774 4599 3 4599" svg:viewBox="0 0 582 4600">
            <text:p/>
          </draw:connector>
          <draw:connector draw:style-name="gr366" draw:text-style-name="P41" draw:layer="layout" draw:type="curve" svg:x1="-109.855cm" svg:y1="74.694cm" svg:x2="-109.858cm" svg:y2="70.068cm" draw:start-shape="id287" draw:start-glue-point="10" draw:end-shape="id293" draw:end-glue-point="10" svg:d="M-109855 74694c771 0 772-4626-3-4626" svg:viewBox="0 0 582 4627">
            <text:p/>
          </draw:connector>
          <draw:connector draw:style-name="gr366" draw:text-style-name="P41" draw:layer="layout" draw:type="curve" svg:x1="-115.867cm" svg:y1="71.784cm" svg:x2="-115.863cm" svg:y2="76.385cm" draw:start-shape="id292" draw:start-glue-point="6" draw:end-shape="id285" draw:end-glue-point="6" svg:d="M-115867 71784c-769 0-771 4601 4 4601" svg:viewBox="0 0 582 4602">
            <text:p/>
          </draw:connector>
          <draw:connector draw:style-name="gr366" draw:text-style-name="P41" draw:layer="layout" draw:type="curve" svg:x1="-115.863cm" svg:y1="74.692cm" svg:x2="-115.867cm" svg:y2="70.068cm" draw:start-shape="id284" draw:start-glue-point="6" draw:end-shape="id290" draw:end-glue-point="6" svg:d="M-115863 74692c-775 0-773-4624-4-4624" svg:viewBox="0 0 582 4625">
            <text:p/>
          </draw:connector>
          <draw:g draw:style-name="gr23">
            <svg:title>TexMaths</svg:title>
            <svg:desc>14§display§\pi_{SS}^{2}§svg§600§FALSE§</svg:desc>
            <draw:path draw:style-name="gr363" draw:text-style-name="P98"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8"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8"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8"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8"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8"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8"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5cm" svg:y="71.875cm" svg:viewBox="0 0 159 12" svg:d="M150 12c3 0 9 0 9-6s-6-6-9-6h-141c-4 0-9 0-9 6s5 6 9 6z">
              <text:p/>
            </draw:path>
            <draw:path draw:style-name="gr363" draw:text-style-name="P98"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8"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8"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8"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8"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086cm" svg:height="0.155cm" svg:x="-110.874cm" svg:y="75.275cm" svg:viewBox="0 0 87 156" svg:d="M53 7c0-7 0-7-7-7-15 15-36 15-46 15v9c5 0 21 0 34-8v121c0 7 0 10-23 10h-9v9c4 0 34-2 42-2 7 0 37 2 43 2v-9h-10c-24 0-24-3-24-10z">
              <text:p/>
            </draw:path>
            <draw:path draw:style-name="gr363" draw:text-style-name="P98"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8"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8"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8"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8"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8"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8" draw:layer="layout" svg:width="0.068cm" svg:height="0.11cm" svg:x="-108.634cm" svg:y="70.912cm" svg:viewBox="0 0 69 111" svg:d="M44 5c0-5-1-5-7-5-11 11-31 11-34 11h-3v7h3c4 0 14-1 24-4v83c0 5 0 8-17 8h-8v6c9 0 25 0 33 0 10 0 24 0 34 0v-6h-8c-17 0-17-3-17-8z">
              <text:p/>
            </draw:path>
          </draw:g>
          <draw:frame draw:style-name="gr367" draw:text-style-name="P100" draw:layer="layout" svg:width="2.93cm" svg:height="1.096cm" draw:transform="rotate (1.5707963267949) translate (-108.336cm 77.328cm)">
            <draw:text-box>
              <text:p text:style-name="P99"><text:span text:style-name="T33">robot 1</text:span></text:p>
            </draw:text-box>
          </draw:frame>
          <draw:frame draw:style-name="gr367" draw:text-style-name="P101" draw:layer="layout" svg:width="2.93cm" svg:height="1.096cm" draw:transform="rotate (1.5707963267949) translate (-108.291cm 70.891cm)">
            <draw:text-box>
              <text:p text:style-name="P99"><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0"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3"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0"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2"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2"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3"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8" draw:id="id298" draw:layer="layout" svg:width="2.6cm" svg:height="1.4cm" svg:x="30.735cm" svg:y="58.2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34.472cm" svg:y1="60.781cm" svg:x2="32.035cm" svg:y2="59.634cm" draw:start-shape="id243" draw:start-glue-point="0" draw:end-shape="id298" draw:end-glue-point="6" svg:d="M34472 60781c0-859-2437-286-2437-1147" svg:viewBox="0 0 2438 1148">
          <text:p/>
        </draw:connector>
        <draw:g draw:style-name="gr31">
          <draw:rect draw:style-name="gr376" draw:text-style-name="P103" draw:layer="layout" svg:width="3.611cm" svg:height="7.25cm" svg:x="236.382cm" svg:y="-9.872cm">
            <text:p/>
          </draw:rect>
          <draw:rect draw:style-name="gr377" draw:text-style-name="P104" xml:id="id299" draw:id="id299" draw:layer="layout" svg:width="3.01cm" svg:height="1.489cm" svg:x="211.272cm" svg:y="-7.578cm">
            <text:p text:style-name="P5">stimulus</text:p>
          </draw:rect>
          <draw:rect draw:style-name="gr378" draw:text-style-name="P105" xml:id="id307" draw:id="id307" draw:layer="layout" svg:width="3.01cm" svg:height="1.489cm" svg:x="236.645cm" svg:y="-9.278cm">
            <text:p text:style-name="P5">trace</text:p>
          </draw:rect>
          <draw:connector draw:style-name="gr379" draw:text-style-name="P15" draw:layer="layout" draw:type="curve" svg:x1="214.282cm" svg:y1="-6.833cm" svg:x2="215.346cm" svg:y2="-6.833cm" draw:start-shape="id299" draw:start-glue-point="1" draw:end-shape="id300" draw:end-glue-point="3" svg:d="M214282-6833h1064" svg:viewBox="0 0 1065 1">
            <text:p/>
          </draw:connector>
          <draw:connector draw:style-name="gr380" draw:text-style-name="P15" draw:layer="layout" draw:type="curve" svg:x1="235.58cm" svg:y1="-6.833cm" svg:x2="236.645cm" svg:y2="-6.832cm" draw:start-shape="id301" draw:start-glue-point="1" draw:end-shape="id302" draw:end-glue-point="3" svg:d="M235580-6833c799 0 267 1 1065 1" svg:viewBox="0 0 1066 2">
            <text:p/>
          </draw:connector>
          <draw:rect draw:style-name="gr377" draw:text-style-name="P104" xml:id="id301" draw:id="id301" draw:layer="layout" svg:width="3.01cm" svg:height="1.489cm" svg:x="232.57cm" svg:y="-7.578cm">
            <text:p text:style-name="P5">brain</text:p>
          </draw:rect>
          <draw:rect draw:style-name="gr377" draw:text-style-name="P104" xml:id="id303" draw:id="id303"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3" draw:start-glue-point="1" draw:end-shape="id299" draw:end-glue-point="3" svg:d="M210207-6833h1065" svg:viewBox="0 0 1066 1">
            <text:p/>
          </draw:connector>
          <draw:rect draw:style-name="gr377" draw:text-style-name="P104" xml:id="id300" draw:id="id300"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0" draw:start-glue-point="1" draw:end-shape="id304" draw:end-glue-point="3" svg:d="M218356-6833h1140" svg:viewBox="0 0 1141 1">
            <text:p/>
          </draw:connector>
          <draw:rect draw:style-name="gr377" draw:text-style-name="P104" xml:id="id304" draw:id="id304"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5" draw:start-glue-point="1" draw:end-shape="id306" draw:end-glue-point="3" svg:d="M226892-6833h1733" svg:viewBox="0 0 1734 1">
            <text:p/>
          </draw:connector>
          <draw:custom-shape draw:name="comment box 7" draw:style-name="gr384" draw:text-style-name="P52" xml:id="id308" draw:id="id308"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7" draw:start-glue-point="1" draw:end-shape="id308" draw:end-glue-point="6" svg:d="M239655-8533c482 0 723-963 723-2889" svg:viewBox="0 0 724 2890">
            <text:p/>
          </draw:connector>
          <draw:rect draw:style-name="gr377" draw:text-style-name="P104" xml:id="id306" draw:id="id306"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6" draw:start-glue-point="1" draw:end-shape="id301" draw:end-glue-point="3" svg:d="M231635-6833h935" svg:viewBox="0 0 936 1">
            <text:p/>
          </draw:connector>
          <draw:rect draw:style-name="gr377" draw:text-style-name="P104" xml:id="id305" draw:id="id305"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4" draw:start-glue-point="1" draw:end-shape="id305"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5" xml:id="id313" draw:id="id313" draw:layer="layout" svg:width="3.01cm" svg:height="1.489cm" svg:x="236.645cm" svg:y="-4.277cm">
            <text:p text:style-name="P5">trace</text:p>
          </draw:rect>
          <draw:rect draw:style-name="gr378" draw:text-style-name="P105" xml:id="id302" draw:id="id302"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09" draw:id="id309" draw:layer="layout" svg:width="3.01cm" svg:height="1.489cm" svg:x="241.467cm" svg:y="-7.032cm">
            <text:p text:style-name="P5">Episode</text:p>
          </draw:rect>
          <draw:frame draw:style-name="gr389" draw:text-style-name="P38" xml:id="id314" draw:id="id314" draw:layer="layout" svg:width="2.775cm" svg:height="0.725cm" svg:x="236.375cm" svg:y="-9.938cm">
            <draw:text-box>
              <text:p>Trace group</text:p>
            </draw:text-box>
          </draw:frame>
          <draw:rect draw:style-name="gr390" draw:text-style-name="P106" draw:layer="layout" svg:width="4.727cm" svg:height="7.25cm" svg:x="245.382cm" svg:y="-9.872cm">
            <text:p/>
          </draw:rect>
          <draw:rect draw:style-name="gr391" draw:text-style-name="P107" xml:id="id310" draw:id="id310" draw:layer="layout" svg:width="4.153cm" svg:height="1.489cm" svg:x="245.645cm" svg:y="-9.278cm">
            <text:p text:style-name="P5">Modality<text:line-break/>(ie times-ranges)</text:p>
          </draw:rect>
          <draw:rect draw:style-name="gr392" draw:text-style-name="P108" xml:id="id312" draw:id="id312" draw:layer="layout" svg:width="4.153cm" svg:height="1.489cm" svg:x="245.645cm" svg:y="-4.277cm">
            <text:p text:style-name="P3">Modality</text:p>
          </draw:rect>
          <draw:rect draw:style-name="gr393" draw:text-style-name="P108" xml:id="id311" draw:id="id311"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09" draw:start-glue-point="1" draw:end-shape="id310" draw:end-glue-point="3" svg:d="M244477-6287c876 0 292-2246 1168-2246" svg:viewBox="0 0 1169 2247">
            <text:p/>
          </draw:connector>
          <draw:connector draw:style-name="gr395" draw:text-style-name="P15" draw:layer="layout" draw:type="curve" svg:x1="244.477cm" svg:y1="-6.287cm" svg:x2="245.645cm" svg:y2="-6.832cm" draw:start-shape="id309" draw:start-glue-point="1" draw:end-shape="id311" svg:d="M244477-6287c876 0 292-545 1168-545" svg:viewBox="0 0 1169 546">
            <text:p/>
          </draw:connector>
          <draw:connector draw:style-name="gr396" draw:text-style-name="P15" draw:layer="layout" draw:type="curve" svg:x1="244.477cm" svg:y1="-6.287cm" svg:x2="245.645cm" svg:y2="-3.532cm" draw:start-shape="id309" draw:start-glue-point="1" draw:end-shape="id312" draw:end-glue-point="3" svg:d="M244477-6287c876 0 292 2755 1168 2755" svg:viewBox="0 0 1169 2756">
            <text:p/>
          </draw:connector>
          <draw:connector draw:style-name="gr397" draw:text-style-name="P15" draw:layer="layout" draw:type="curve" svg:x1="239.655cm" svg:y1="-8.533cm" svg:x2="241.467cm" svg:y2="-6.287cm" draw:start-shape="id307" draw:start-glue-point="1" draw:end-shape="id309" draw:end-glue-point="3" svg:d="M239655-8533c1359 0 453 2246 1812 2246" svg:viewBox="0 0 1813 2247">
            <text:p/>
          </draw:connector>
          <draw:connector draw:style-name="gr398" draw:text-style-name="P15" draw:layer="layout" draw:type="curve" svg:x1="239.655cm" svg:y1="-6.832cm" svg:x2="241.467cm" svg:y2="-6.287cm" draw:start-shape="id302" draw:start-glue-point="1" draw:end-shape="id309" draw:end-glue-point="3" svg:d="M239655-6832c1359 0 453 545 1812 545" svg:viewBox="0 0 1813 546">
            <text:p/>
          </draw:connector>
          <draw:connector draw:style-name="gr399" draw:text-style-name="P15" draw:layer="layout" draw:type="curve" svg:x1="239.655cm" svg:y1="-3.532cm" svg:x2="241.467cm" svg:y2="-6.287cm" draw:start-shape="id313" draw:start-glue-point="1" draw:end-shape="id309" draw:end-glue-point="3" svg:d="M239655-3532c1359 0 453-2755 1812-2755" svg:viewBox="0 0 1813 2756">
            <text:p/>
          </draw:connector>
          <draw:custom-shape draw:name="comment box 8" draw:style-name="gr384" draw:text-style-name="P52" xml:id="id315" draw:id="id315"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4" draw:end-shape="id315" draw:end-glue-point="6" svg:d="M237762-9938c0-1458-3139-485-3139-1946" svg:viewBox="0 0 3140 1947">
            <text:p/>
          </draw:connector>
        </draw:g>
        <draw:rect draw:style-name="gr41" draw:text-style-name="P5" xml:id="id316" draw:id="id316" draw:layer="layout" svg:width="3.01cm" svg:height="1.489cm" svg:x="258.162cm" svg:y="-7.1cm">
          <text:p text:style-name="P5">Episode</text:p>
        </draw:rect>
        <draw:rect draw:style-name="gr41" draw:text-style-name="P5" xml:id="id317" draw:id="id317" draw:layer="layout" svg:width="3.01cm" svg:height="1.489cm" svg:x="258.162cm" svg:y="-3.883cm">
          <text:p text:style-name="P5">parts</text:p>
        </draw:rect>
        <draw:rect draw:style-name="gr41" draw:text-style-name="P5" xml:id="id321" draw:id="id321" draw:layer="layout" svg:width="3.01cm" svg:height="1.489cm" svg:x="261.697cm" svg:y="3.118cm">
          <text:p text:style-name="P5">action</text:p>
        </draw:rect>
        <draw:rect draw:style-name="gr41" draw:text-style-name="P5" xml:id="id322" draw:id="id322" draw:layer="layout" svg:width="3.01cm" svg:height="1.489cm" svg:x="261.67cm" svg:y="5.897cm">
          <text:p text:style-name="P5">property</text:p>
        </draw:rect>
        <draw:rect draw:style-name="gr41" draw:text-style-name="P5" xml:id="id319" draw:id="id319" draw:layer="layout" svg:width="3.01cm" svg:height="1.489cm" svg:x="258.162cm" svg:y="0.338cm">
          <text:p text:style-name="P5">time</text:p>
        </draw:rect>
        <draw:rect draw:style-name="gr41" draw:text-style-name="P5" xml:id="id318" draw:id="id318" draw:layer="layout" svg:width="3.01cm" svg:height="1.489cm" svg:x="254.728cm" svg:y="0.338cm">
          <text:p text:style-name="P5">location</text:p>
        </draw:rect>
        <draw:connector draw:style-name="gr400" draw:text-style-name="P15" draw:layer="layout" draw:type="curve" svg:x1="259.667cm" svg:y1="-5.611cm" svg:x2="259.667cm" svg:y2="-3.883cm" draw:start-shape="id316" draw:start-glue-point="2" draw:end-shape="id317" draw:end-glue-point="0" svg:d="M259667-5611v1728" svg:viewBox="0 0 1 1729">
          <text:p/>
        </draw:connector>
        <draw:connector draw:style-name="gr401" draw:text-style-name="P15" draw:layer="layout" draw:type="curve" svg:x1="259.667cm" svg:y1="-2.394cm" svg:x2="256.233cm" svg:y2="0.338cm" draw:start-shape="id317" draw:start-glue-point="2" draw:end-shape="id318" draw:end-glue-point="0" svg:d="M259667-2394c0 2050-3434 685-3434 2732" svg:viewBox="0 0 3435 2733">
          <text:p/>
        </draw:connector>
        <draw:connector draw:style-name="gr402" draw:text-style-name="P15" draw:layer="layout" draw:type="curve" svg:x1="259.667cm" svg:y1="-2.394cm" svg:x2="259.667cm" svg:y2="0.338cm" draw:start-shape="id317" draw:start-glue-point="2" draw:end-shape="id319" draw:end-glue-point="0" svg:d="M259667-2394v2732" svg:viewBox="0 0 1 2733">
          <text:p/>
        </draw:connector>
        <draw:connector draw:style-name="gr403" draw:text-style-name="P15" draw:layer="layout" draw:type="curve" svg:x1="263.136cm" svg:y1="1.827cm" svg:x2="263.202cm" svg:y2="3.118cm" draw:start-shape="id320" draw:end-shape="id321" draw:end-glue-point="0" svg:d="M263136 1827c0 969 66 324 66 1291" svg:viewBox="0 0 67 1292">
          <text:p/>
        </draw:connector>
        <draw:connector draw:style-name="gr404" draw:text-style-name="P15" draw:layer="layout" draw:type="curve" svg:x1="263.202cm" svg:y1="4.607cm" svg:x2="263.175cm" svg:y2="5.897cm" draw:start-shape="id321" draw:start-glue-point="2" draw:end-shape="id322" draw:end-glue-point="0" svg:d="M263202 4607c0 967-27 323-27 1290" svg:viewBox="0 0 28 1291">
          <text:p/>
        </draw:connector>
        <draw:rect draw:style-name="gr41" draw:text-style-name="P5" xml:id="id320" draw:id="id320" draw:layer="layout" svg:width="3.01cm" svg:height="1.489cm" svg:x="261.631cm" svg:y="0.338cm">
          <text:p text:style-name="P5">event</text:p>
        </draw:rect>
        <draw:connector draw:style-name="gr405" draw:text-style-name="P15" draw:layer="layout" draw:type="curve" svg:x1="259.667cm" svg:y1="-2.394cm" svg:x2="263.136cm" svg:y2="0.338cm" draw:start-shape="id317" draw:start-glue-point="2" draw:end-shape="id320"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2.942cm" svg:y1="31.205cm" svg:x2="113.005cm" svg:y2="32.625cm" draw:start-shape="id267" draw:start-glue-point="2" draw:end-shape="id323" svg:d="M112942 31205c0 1065 63 355 63 1420" svg:viewBox="0 0 64 1421">
          <text:p/>
        </draw:connector>
        <draw:frame draw:style-name="gr135" draw:text-style-name="P41" draw:layer="layout" svg:width="18.252cm" svg:height="25.316cm" svg:x="105.306cm" svg:y="-33.832cm">
          <draw:image xlink:href="Pictures/10000000000002B2000003BD26BB6070.png" xlink:type="simple" xlink:show="embed" xlink:actuate="onLoad" draw:mime-type="image/png">
            <text:p/>
          </draw:image>
        </draw:frame>
        <draw:rect draw:style-name="gr407" draw:text-style-name="P105" draw:layer="layout" svg:width="3.439cm" svg:height="4.472cm" svg:x="-55.906cm" svg:y="15.663cm">
          <text:p/>
        </draw:rect>
        <draw:rect draw:style-name="gr408" draw:text-style-name="P109" xml:id="id325" draw:id="id325" draw:layer="layout" svg:width="2.256cm" svg:height="1.003cm" svg:x="-55.314cm" svg:y="18.923cm">
          <text:p text:style-name="P5"><text:span text:style-name="T35">Suprise </text:span><text:span text:style-name="T35"><text:line-break/></text:span><text:span text:style-name="T35">Poise</text:span></text:p>
        </draw:rect>
        <draw:connector draw:style-name="gr409" draw:text-style-name="P15" draw:layer="layout" draw:type="curve" svg:x1="-54.186cm" svg:y1="17.186cm" svg:x2="-54.186cm" svg:y2="18.923cm" draw:start-shape="id324" draw:start-glue-point="2" draw:end-shape="id325" draw:end-glue-point="0" svg:d="M-54186 17186v1737" svg:viewBox="0 0 1 1738">
          <text:p/>
        </draw:connector>
        <draw:rect draw:style-name="gr410" draw:text-style-name="P110" xml:id="id324" draw:id="id324" draw:layer="layout" svg:width="2.726cm" svg:height="1.24cm" svg:x="-55.549cm" svg:y="15.946cm">
          <text:p text:style-name="P5"><text:span text:style-name="T26">composite</text:span><text:span text:style-name="T26"><text:line-break/></text:span><text:span text:style-name="T26">goal</text:span></text:p>
        </draw:rect>
        <draw:rect draw:style-name="gr388" draw:text-style-name="P111" draw:layer="layout" svg:width="2.256cm" svg:height="1.003cm" svg:x="-51.234cm" svg:y="17.569cm">
          <text:p text:style-name="P5"><text:span text:style-name="T17">Planning</text:span></text:p>
        </draw:rect>
        <draw:rect draw:style-name="gr407" draw:text-style-name="P105" draw:layer="layout" svg:width="3.439cm" svg:height="4.472cm" svg:x="-47.912cm" svg:y="15.663cm">
          <text:p/>
        </draw:rect>
        <draw:rect draw:style-name="gr408" draw:text-style-name="P112" xml:id="id327" draw:id="id327" draw:layer="layout" svg:width="2.256cm" svg:height="1.003cm" svg:x="-47.32cm" svg:y="18.923cm">
          <text:p text:style-name="P5"><text:span text:style-name="T35">Suprise </text:span><text:span text:style-name="T35"><text:line-break/></text:span><text:span text:style-name="T35">reduction</text:span></text:p>
        </draw:rect>
        <draw:connector draw:style-name="gr409" draw:text-style-name="P15" draw:layer="layout" draw:type="curve" svg:x1="-46.192cm" svg:y1="17.186cm" svg:x2="-46.192cm" svg:y2="18.923cm" draw:start-shape="id326" draw:start-glue-point="2" draw:end-shape="id327" draw:end-glue-point="0" svg:d="M-46192 17186v1737" svg:viewBox="0 0 1 1738">
          <text:p/>
        </draw:connector>
        <draw:rect draw:style-name="gr410" draw:text-style-name="P110" xml:id="id326" draw:id="id326" draw:layer="layout" svg:width="2.726cm" svg:height="1.24cm" svg:x="-47.555cm" svg:y="15.946cm">
          <text:p text:style-name="P5"><text:span text:style-name="T26">composi</text:span><text:span text:style-name="T26">te</text:span><text:span text:style-name="T26"><text:line-break/></text:span><text:span text:style-name="T26">actio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3"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3"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4" xml:id="id328" draw:id="id328"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5" draw:start-glue-point="1" draw:end-shape="id328" draw:end-glue-point="6" svg:d="M-53058 19424c890 0 1334-1368 1334-4105" svg:viewBox="0 0 1335 4106">
          <text:p/>
        </draw:connector>
        <draw:rect draw:style-name="gr408" draw:text-style-name="P115" xml:id="id329" draw:id="id329" draw:layer="layout" svg:width="2.714cm" svg:height="1.841cm" svg:x="-47.549cm" svg:y="23.785cm">
          <text:p text:style-name="P5"><text:span text:style-name="T36">Build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connector draw:style-name="gr415" draw:text-style-name="P15" draw:layer="layout" draw:type="curve" svg:x1="-46.192cm" svg:y1="23.785cm" svg:x2="-46.192cm" svg:y2="22.771cm" draw:start-shape="id329" draw:start-glue-point="0" draw:end-shape="id330" draw:end-glue-point="2" svg:d="M-46192 23785v-1014" svg:viewBox="0 0 1 1015">
          <text:p/>
        </draw:connector>
        <draw:rect draw:style-name="gr408" draw:text-style-name="P115" xml:id="id330" draw:id="id330" draw:layer="layout" svg:width="2.714cm" svg:height="1.841cm" svg:x="-47.549cm" svg:y="20.93cm">
          <text:p text:style-name="P5"><text:span text:style-name="T36">Learning by </text:span><text:span text:style-name="T36"><text:line-break/></text:span><text:span text:style-name="T36">demonstration</text:span></text:p>
        </draw:rect>
        <draw:connector draw:style-name="gr416" draw:text-style-name="P15" draw:layer="layout" draw:type="curve" svg:x1="-46.192cm" svg:y1="20.93cm" svg:x2="-46.192cm" svg:y2="19.926cm" draw:start-shape="id330" draw:start-glue-point="0" draw:end-shape="id327" draw:end-glue-point="2" svg:d="M-46192 20930v-1004" svg:viewBox="0 0 1 1005">
          <text:p/>
        </draw:connector>
        <draw:rect draw:style-name="gr408" draw:text-style-name="P115" xml:id="id331" draw:id="id331" draw:layer="layout" svg:width="2.714cm" svg:height="1.841cm" svg:x="-47.549cm" svg:y="26.586cm">
          <text:p text:style-name="P5"><text:span text:style-name="T36">improv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rect draw:style-name="gr408" draw:text-style-name="P115" draw:layer="layout" svg:width="2.714cm" svg:height="1.841cm" svg:x="-49.606cm" svg:y="29.466cm">
          <text:p text:style-name="P5"><text:span text:style-name="T36">Clustering</text:span><text:span text:style-name="T36"><text:line-break/></text:span><text:span text:style-name="T36">then training</text:span><text:span text:style-name="T36"><text:line-break/></text:span><text:span text:style-name="T36">forecasting</text:span></text:p>
        </draw:rect>
        <draw:connector draw:style-name="gr417" draw:text-style-name="P15" draw:layer="layout" draw:type="curve" svg:x1="-46.192cm" svg:y1="26.586cm" svg:x2="-46.192cm" svg:y2="25.626cm" draw:start-shape="id331" draw:start-glue-point="0" draw:end-shape="id329" draw:end-glue-point="2" svg:d="M-46192 26586v-960" svg:viewBox="0 0 1 961">
          <text:p/>
        </draw:connector>
        <draw:connector draw:style-name="gr418" draw:text-style-name="P15" draw:layer="layout" draw:type="curve" svg:x1="-47.406cm" svg:y1="29.466cm" svg:x2="-46.192cm" svg:y2="28.427cm" draw:end-shape="id331" draw:end-glue-point="2" svg:d="M-47406 29466c0-403 1214 116 1214-1039" svg:viewBox="0 0 1215 1040">
          <text:p/>
        </draw:connector>
        <draw:rect draw:style-name="gr408" draw:text-style-name="P115" xml:id="id332" draw:id="id332" draw:layer="layout" svg:width="2.714cm" svg:height="1.841cm" svg:x="-45.835cm" svg:y="29.484cm">
          <text:p text:style-name="P5"><text:span text:style-name="T36">Using KF</text:span><text:span text:style-name="T36"><text:line-break/></text:span><text:span text:style-name="T36">in predictions</text:span></text:p>
        </draw:rect>
        <draw:connector draw:style-name="gr419" draw:text-style-name="P15" draw:layer="layout" draw:type="curve" svg:x1="-44.478cm" svg:y1="29.484cm" svg:x2="-46.192cm" svg:y2="28.427cm" draw:start-shape="id332" draw:start-glue-point="0" draw:end-shape="id331"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3" draw:id="id333"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3" draw:start-glue-point="2" draw:end-shape="id334" svg:d="M-23404 2210c0 2025-6808 676-6808 2699" svg:viewBox="0 0 6809 2700">
          <text:p/>
        </draw:connector>
        <draw:connector draw:style-name="gr421" draw:text-style-name="P15" draw:layer="layout" draw:type="curve" svg:x1="-23.404cm" svg:y1="2.21cm" svg:x2="-25.726cm" svg:y2="4.925cm" draw:start-shape="id333" draw:start-glue-point="2" draw:end-shape="id335" svg:d="M-23404 2210c0 2037-2322 680-2322 2715" svg:viewBox="0 0 2323 2716">
          <text:p/>
        </draw:connector>
        <draw:rect draw:style-name="gr37" draw:text-style-name="P116" xml:id="id334" draw:id="id334" draw:layer="layout" svg:width="3.177cm" svg:height="1.897cm" svg:x="-31.801cm" svg:y="4.909cm">
          <text:p text:style-name="P8"><text:span text:style-name="T5">Surprise </text:span><text:span text:style-name="T5">poise</text:span><text:span text:style-name="T5"><text:line-break/></text:span><text:span text:style-name="T5">(keeping </text:span><text:span text:style-name="T5">surprise</text:span><text:span text:style-name="T5"><text:line-break/></text:span><text:span text:style-name="T5">below a </text:span><text:span text:style-name="T5">tolerance)</text:span></text:p>
        </draw:rect>
        <draw:rect draw:style-name="gr38" draw:text-style-name="P4" xml:id="id335" draw:id="id335" draw:layer="layout" svg:width="3.67cm" svg:height="1.892cm" svg:x="-27.561cm" svg:y="4.925cm">
          <text:p text:style-name="P5"><text:span text:style-name="T2">Homeostasis</text:span><text:span text:style-name="T2"><text:line-break/></text:span><text:span text:style-name="T2">(keeping the </text:span><text:span text:style-name="T2">physical</text:span><text:span text:style-name="T2"><text:line-break/></text:span><text:span text:style-name="T2">and chemical </text:span><text:span text:style-name="T2"><text:line-break/></text:span><text:span text:style-name="T2">conditions, </text:span><text:span text:style-name="T2">balanced)</text:span></text:p>
        </draw:rect>
        <draw:rect draw:style-name="gr292" draw:text-style-name="P35" xml:id="id336" draw:id="id336" draw:layer="layout" svg:width="2.3cm" svg:height="1cm" svg:x="45.707cm" svg:y="59.941cm">
          <text:p text:style-name="P5">Action<text:line-break/>types</text:p>
        </draw:rect>
        <draw:connector draw:style-name="gr422" draw:text-style-name="P15" draw:layer="layout" draw:type="curve" svg:x1="46.254cm" svg:y1="57.528cm" svg:x2="46.857cm" svg:y2="59.941cm" draw:start-shape="id231" draw:start-glue-point="2" draw:end-shape="id336" draw:end-glue-point="0" svg:d="M46254 57528c0 1810 603 604 603 2413" svg:viewBox="0 0 604 2414">
          <text:p/>
        </draw:connector>
        <draw:rect draw:style-name="gr292" draw:text-style-name="P35" xml:id="id338" draw:id="id338" draw:layer="layout" svg:width="2.3cm" svg:height="1cm" svg:x="41.538cm" svg:y="59.541cm">
          <text:p text:style-name="P5">Plan</text:p>
        </draw:rect>
        <draw:rect draw:style-name="gr292" draw:text-style-name="P35" xml:id="id337" draw:id="id337" draw:layer="layout" svg:width="2.3cm" svg:height="1cm" svg:x="45.707cm" svg:y="61.675cm">
          <text:p text:style-name="P5">Suprise<text:line-break/>poise</text:p>
        </draw:rect>
        <draw:connector draw:style-name="gr423" draw:text-style-name="P15" draw:layer="layout" draw:type="curve" svg:x1="46.857cm" svg:y1="60.941cm" svg:x2="46.857cm" svg:y2="61.675cm" draw:start-shape="id336" draw:start-glue-point="2" draw:end-shape="id337" draw:end-glue-point="0" svg:d="M46857 60941v734" svg:viewBox="0 0 1 735">
          <text:p/>
        </draw:connector>
        <draw:connector draw:style-name="gr424" draw:text-style-name="P15" draw:layer="layout" draw:type="curve" svg:x1="46.254cm" svg:y1="57.528cm" svg:x2="42.688cm" svg:y2="59.541cm" draw:start-shape="id231" draw:start-glue-point="2" draw:end-shape="id338" draw:end-glue-point="0" svg:d="M46254 57528c0 1510-3566 504-3566 2013" svg:viewBox="0 0 3567 2014">
          <text:p/>
        </draw:connector>
        <draw:rect draw:style-name="gr292" draw:text-style-name="P35" xml:id="id339" draw:id="id339" draw:layer="layout" svg:width="2.3cm" svg:height="1cm" svg:x="63.329cm" svg:y="55.972cm">
          <text:p text:style-name="P5">Running<text:line-break/>plan</text:p>
        </draw:rect>
        <draw:connector draw:style-name="gr425" draw:text-style-name="P15" draw:layer="layout" draw:type="curve" svg:x1="60.954cm" svg:y1="54.528cm" svg:x2="64.479cm" svg:y2="55.972cm" draw:start-shape="id236" draw:start-glue-point="2" draw:end-shape="id339" draw:end-glue-point="0" svg:d="M60954 54528c0 1083 3525 361 3525 1444" svg:viewBox="0 0 3526 1445">
          <text:p/>
        </draw:connector>
        <draw:rect draw:style-name="gr292" draw:text-style-name="P35" xml:id="id340" draw:id="id340" draw:layer="layout" svg:width="2.3cm" svg:height="1cm" svg:x="60.945cm" svg:y="58.704cm">
          <text:p text:style-name="P5">Goal<text:line-break/>composite</text:p>
        </draw:rect>
        <draw:rect draw:style-name="gr292" draw:text-style-name="P35" xml:id="id341" draw:id="id341" draw:layer="layout" svg:width="2.3cm" svg:height="1cm" svg:x="65.867cm" svg:y="58.704cm">
          <text:p text:style-name="P5">Action<text:line-break/>composite</text:p>
        </draw:rect>
        <draw:connector draw:style-name="gr426" draw:text-style-name="P15" draw:layer="layout" draw:type="curve" svg:x1="63.245cm" svg:y1="59.204cm" svg:x2="65.867cm" svg:y2="59.204cm" draw:start-shape="id340" draw:start-glue-point="1" draw:end-shape="id341" draw:end-glue-point="3" svg:d="M63245 59204h2622" svg:viewBox="0 0 2623 1">
          <text:p text:style-name="P5">updates</text:p>
        </draw:connector>
        <draw:connector draw:style-name="gr427" draw:text-style-name="P15" draw:layer="layout" draw:type="curve" svg:x1="64.479cm" svg:y1="56.972cm" svg:x2="62.095cm" svg:y2="58.704cm" draw:start-shape="id339" draw:start-glue-point="2" draw:end-shape="id340" draw:end-glue-point="0" svg:d="M64479 56972c0 1299-2384 433-2384 1732" svg:viewBox="0 0 2385 1733">
          <text:p/>
        </draw:connector>
        <draw:connector draw:style-name="gr428" draw:text-style-name="P15" draw:layer="layout" draw:type="curve" svg:x1="64.479cm" svg:y1="56.972cm" svg:x2="67.017cm" svg:y2="58.704cm" draw:start-shape="id339" draw:start-glue-point="2" draw:end-shape="id341" draw:end-glue-point="0" svg:d="M64479 56972c0 1299 2538 433 2538 1732" svg:viewBox="0 0 2539 1733">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42" draw:id="id342"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43" draw:id="id343"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29" draw:text-style-name="P15" draw:layer="layout" draw:type="curve" svg:x1="-23.404cm" svg:y1="2.21cm" svg:x2="-21.009cm" svg:y2="4.979cm" draw:start-shape="id333" draw:start-glue-point="2" draw:end-shape="id342" draw:end-glue-point="0" svg:d="M-23404 2210c0 2077 2395 693 2395 2769" svg:viewBox="0 0 2396 2770">
          <text:p/>
        </draw:connector>
        <draw:connector draw:style-name="gr430" draw:text-style-name="P15" draw:layer="layout" draw:type="curve" svg:x1="-23.404cm" svg:y1="2.21cm" svg:x2="-16.293cm" svg:y2="5.008cm" draw:start-shape="id333" draw:start-glue-point="2" draw:end-shape="id343" draw:end-glue-point="0" svg:d="M-23404 2210c0 2098 7111 700 7111 2798" svg:viewBox="0 0 7112 2799">
          <text:p/>
        </draw:connector>
        <draw:rect draw:name="goal kinds 6" draw:style-name="gr388" draw:text-style-name="P23" xml:id="id344" draw:id="id344"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44" draw:start-glue-point="2" draw:end-shape="id345" draw:end-glue-point="0" svg:d="M-23138 11778c0 1962-3379 655-3379 2615" svg:viewBox="0 0 3380 2616">
          <text:p/>
        </draw:connector>
        <draw:connector draw:style-name="gr431" draw:text-style-name="P15" draw:layer="layout" draw:type="curve" svg:x1="-23.138cm" svg:y1="11.778cm" svg:x2="-29.881cm" svg:y2="14.393cm" draw:start-shape="id344" draw:start-glue-point="2" draw:end-shape="id346" draw:end-glue-point="0" svg:d="M-23138 11778c0 1962-6743 655-6743 2615" svg:viewBox="0 0 6744 2616">
          <text:p/>
        </draw:connector>
        <draw:connector draw:style-name="gr429" draw:text-style-name="P15" draw:layer="layout" draw:type="curve" svg:x1="-23.138cm" svg:y1="11.778cm" svg:x2="-19.79cm" svg:y2="14.393cm" draw:start-shape="id344" draw:start-glue-point="2" draw:end-shape="id347" draw:end-glue-point="0" svg:d="M-23138 11778c0 1962 3348 655 3348 2615" svg:viewBox="0 0 3349 2616">
          <text:p/>
        </draw:connector>
        <draw:connector draw:style-name="gr430" draw:text-style-name="P15" draw:layer="layout" draw:type="curve" svg:x1="-23.138cm" svg:y1="11.778cm" svg:x2="-16.427cm" svg:y2="14.393cm" draw:start-shape="id344" draw:start-glue-point="2" draw:end-shape="id348" draw:end-glue-point="0" svg:d="M-23138 11778c0 1962 6711 655 6711 2615" svg:viewBox="0 0 6712 2616">
          <text:p/>
        </draw:connector>
        <draw:rect draw:name="goal kinds 7" draw:style-name="gr388" draw:text-style-name="P23" xml:id="id384" draw:id="id384" draw:layer="layout" svg:width="4.06cm" svg:height="1.64cm" svg:x="-25.168cm" svg:y="10.138cm">
          <text:p text:style-name="P5">Biological <text:line-break/>actions</text:p>
        </draw:rect>
        <draw:rect draw:style-name="gr255" draw:text-style-name="P106" xml:id="id356" draw:id="id356" draw:layer="layout" svg:width="2.022cm" svg:height="1.04cm" svg:x="15.446cm" svg:y="98.421cm">
          <text:p text:style-name="P5">Control</text:p>
        </draw:rect>
        <draw:g draw:style-name="gr23">
          <draw:rect draw:style-name="gr432" draw:text-style-name="P106" draw:layer="layout" svg:width="2.022cm" svg:height="1.04cm" svg:x="-26.217cm" svg:y="99.337cm">
            <text:p text:style-name="P5">Action</text:p>
          </draw:rect>
          <draw:rect draw:style-name="gr433" draw:text-style-name="P106" xml:id="id349" draw:id="id349" draw:layer="layout" svg:width="4.3cm" svg:height="2.151cm" svg:x="-27.377cm" svg:y="98.226cm">
            <text:p text:style-name="P5">Control<text:line-break/>signal<text:line-break/>(generated by<text:line-break/>Flight controller)</text:p>
          </draw:rect>
          <draw:rect draw:style-name="gr433" draw:text-style-name="P106" xml:id="id351" draw:id="id351" draw:layer="layout" svg:width="2.022cm" svg:height="1.04cm" svg:x="-28.232cm" svg:y="103.515cm">
            <text:p text:style-name="P5">Goal gain</text:p>
          </draw:rect>
          <draw:rect draw:style-name="gr432" draw:text-style-name="P106" draw:layer="layout" svg:width="2.022cm" svg:height="1.04cm" svg:x="-26.217cm" svg:y="101.337cm">
            <text:p text:style-name="P5">Action</text:p>
          </draw:rect>
          <draw:rect draw:style-name="gr433" draw:text-style-name="P106" xml:id="id350" draw:id="id350" draw:layer="layout" svg:width="2.022cm" svg:height="1.04cm" svg:x="-26.217cm" svg:y="101.337cm">
            <text:p text:style-name="P5">Feedback</text:p>
          </draw:rect>
          <draw:rect draw:style-name="gr433" draw:text-style-name="P106" xml:id="id352" draw:id="id352" draw:layer="layout" svg:width="2.022cm" svg:height="1.04cm" svg:x="-24.19cm" svg:y="103.49cm">
            <text:p text:style-name="P5">Resource <text:line-break/>gain</text:p>
          </draw:rect>
          <draw:connector draw:style-name="gr434" draw:text-style-name="P15" draw:layer="layout" draw:type="curve" svg:x1="-25.227cm" svg:y1="100.377cm" svg:x2="-25.206cm" svg:y2="101.337cm" draw:start-shape="id349" draw:start-glue-point="2" draw:end-shape="id350" draw:end-glue-point="0" svg:d="M-25227 100377c0 720 21 240 21 960" svg:viewBox="0 0 22 961">
            <text:p/>
          </draw:connector>
          <draw:connector draw:style-name="gr435" draw:text-style-name="P15" draw:layer="layout" draw:type="curve" svg:x1="-25.206cm" svg:y1="102.377cm" svg:x2="-27.221cm" svg:y2="103.515cm" draw:start-shape="id350" draw:start-glue-point="2" draw:end-shape="id351" draw:end-glue-point="0" svg:d="M-25206 102377c0 853-2015 285-2015 1138" svg:viewBox="0 0 2016 1139">
            <text:p/>
          </draw:connector>
          <draw:connector draw:style-name="gr436" draw:text-style-name="P15" draw:layer="layout" draw:type="curve" svg:x1="-25.206cm" svg:y1="102.377cm" svg:x2="-23.179cm" svg:y2="103.49cm" draw:start-shape="id350" draw:start-glue-point="2" draw:end-shape="id352" draw:end-glue-point="0" svg:d="M-25206 102377c0 835 2027 279 2027 1113" svg:viewBox="0 0 2028 1114">
            <text:p/>
          </draw:connector>
          <draw:rect draw:style-name="gr433" draw:text-style-name="P106" xml:id="id353" draw:id="id353" draw:layer="layout" svg:width="2.022cm" svg:height="1.04cm" svg:x="-23.837cm" svg:y="105.651cm">
            <text:p text:style-name="P5">Battery</text:p>
          </draw:rect>
          <draw:connector draw:style-name="gr436" draw:text-style-name="P15" draw:layer="layout" draw:type="curve" svg:x1="-23.179cm" svg:y1="104.53cm" svg:x2="-22.826cm" svg:y2="105.651cm" draw:start-shape="id352" draw:start-glue-point="2" draw:end-shape="id353" draw:end-glue-point="0" svg:d="M-23179 104530c0 841 353 281 353 1121" svg:viewBox="0 0 354 1122">
            <text:p/>
          </draw:connector>
          <draw:rect draw:style-name="gr433" draw:text-style-name="P106" xml:id="id354" draw:id="id354" draw:layer="layout" svg:width="2.022cm" svg:height="1.04cm" svg:x="-30.196cm" svg:y="105.688cm">
            <text:p text:style-name="P5">From <text:line-break/>pose</text:p>
          </draw:rect>
          <draw:connector draw:style-name="gr436" draw:text-style-name="P15" draw:layer="layout" draw:type="curve" svg:x1="-27.221cm" svg:y1="104.555cm" svg:x2="-29.185cm" svg:y2="105.688cm" draw:start-shape="id351" draw:start-glue-point="2" draw:end-shape="id354" draw:end-glue-point="0" svg:d="M-27221 104555c0 850-1964 284-1964 1133" svg:viewBox="0 0 1965 1134">
            <text:p/>
          </draw:connector>
          <draw:rect draw:style-name="gr433" draw:text-style-name="P106" xml:id="id355" draw:id="id355" draw:layer="layout" svg:width="2.502cm" svg:height="1.583cm" svg:x="-27.241cm" svg:y="106.129cm">
            <text:p text:style-name="P5">From<text:line-break/>anomaly|<text:line-break/>reduction</text:p>
          </draw:rect>
          <draw:connector draw:style-name="gr436" draw:text-style-name="P15" draw:layer="layout" draw:type="curve" svg:x1="-27.221cm" svg:y1="104.556cm" svg:x2="-25.99cm" svg:y2="106.129cm" draw:end-shape="id355" draw:end-glue-point="0" svg:d="M-27221 104556c0 804 1231 18 1231 1573" svg:viewBox="0 0 1232 1574">
            <text:p/>
          </draw:connector>
        </draw:g>
        <draw:rect draw:style-name="gr41" draw:text-style-name="P5" xml:id="id364" draw:id="id364" draw:layer="layout" svg:width="2.434cm" svg:height="1.059cm" svg:x="17.411cm" svg:y="102.937cm">
          <text:p text:style-name="P5">behavior</text:p>
        </draw:rect>
        <draw:rect draw:style-name="gr255" draw:text-style-name="P106" xml:id="id359" draw:id="id359" draw:layer="layout" svg:width="2.022cm" svg:height="1.04cm" svg:x="27.053cm" svg:y="101.034cm">
          <text:p text:style-name="P5">Planing</text:p>
        </draw:rect>
        <draw:rect draw:style-name="gr255" draw:text-style-name="P106" xml:id="id451" draw:id="id451" draw:layer="layout" svg:width="2.022cm" svg:height="1.04cm" svg:x="29.798cm" svg:y="107.092cm">
          <text:p text:style-name="P5">Decision</text:p>
        </draw:rect>
        <draw:rect draw:style-name="gr41" draw:text-style-name="P5" xml:id="id357" draw:id="id357" draw:layer="layout" svg:width="2.064cm" svg:height="1.085cm" svg:x="14.199cm" svg:y="102.754cm">
          <text:p text:style-name="P5">open-loop</text:p>
        </draw:rect>
        <draw:connector draw:style-name="gr437" draw:text-style-name="P15" draw:layer="layout" draw:type="curve" svg:x1="16.457cm" svg:y1="99.461cm" svg:x2="15.231cm" svg:y2="102.754cm" draw:start-shape="id356" draw:start-glue-point="2" draw:end-shape="id357" draw:end-glue-point="0" svg:d="M16457 99461c0 824-307 1647-613 1647-307 0-613 823-613 1646" svg:viewBox="0 0 1227 3294">
          <text:p/>
        </draw:connector>
        <draw:rect draw:style-name="gr255" draw:text-style-name="P106" xml:id="id365" draw:id="id365" draw:layer="layout" svg:width="2.022cm" svg:height="1.04cm" svg:x="21.776cm" svg:y="102.207cm">
          <text:p text:style-name="P5">Attention</text:p>
        </draw:rect>
        <draw:rect draw:style-name="gr255" draw:text-style-name="P106" xml:id="id358" draw:id="id358" draw:layer="layout" svg:width="2.022cm" svg:height="1.04cm" svg:x="26.074cm" svg:y="103.745cm">
          <text:p text:style-name="P5">Motion<text:line-break/>planing</text:p>
        </draw:rect>
        <draw:connector draw:style-name="gr438" draw:text-style-name="P15" draw:layer="layout" draw:type="curve" svg:x1="27.085cm" svg:y1="103.745cm" svg:x2="28.064cm" svg:y2="102.074cm" draw:start-shape="id358" draw:start-glue-point="0" draw:end-shape="id359" draw:end-glue-point="2" svg:d="M27085 103745c0-1252 979-417 979-1671" svg:viewBox="0 0 980 1672">
          <text:p/>
        </draw:connector>
        <draw:rect draw:style-name="gr41" draw:text-style-name="P5" xml:id="id360" draw:id="id360" draw:layer="layout" svg:width="2.79cm" svg:height="0.955cm" svg:x="79.36cm" svg:y="44.135cm">
          <text:p text:style-name="P5">executive<text:line-break/>functions</text:p>
        </draw:rect>
        <draw:connector draw:style-name="gr439" draw:text-style-name="P15" draw:layer="layout" draw:type="curve" svg:x1="84.826cm" svg:y1="39.775cm" svg:x2="80.755cm" svg:y2="44.135cm" draw:start-shape="id201" draw:start-glue-point="2" draw:end-shape="id360" svg:d="M84826 39775c0 3270-4071 1090-4071 4360" svg:viewBox="0 0 4072 4361">
          <text:p/>
        </draw:connector>
        <draw:rect draw:style-name="gr41" draw:text-style-name="P5" xml:id="id361" draw:id="id361" draw:layer="layout" svg:width="2.79cm" svg:height="0.955cm" svg:x="79.382cm" svg:y="46.861cm">
          <text:p text:style-name="P5">Working<text:line-break/>memory</text:p>
        </draw:rect>
        <draw:connector draw:style-name="gr440" draw:text-style-name="P15" draw:layer="layout" draw:type="curve" svg:x1="80.755cm" svg:y1="45.09cm" svg:x2="80.777cm" svg:y2="46.861cm" draw:start-shape="id360" draw:start-glue-point="2" draw:end-shape="id361" draw:end-glue-point="0" svg:d="M80755 45090c0 1329 22 444 22 1771" svg:viewBox="0 0 23 1772">
          <text:p/>
        </draw:connector>
        <draw:rect draw:style-name="gr441" draw:text-style-name="P117" xml:id="id363" draw:id="id363" draw:layer="layout" svg:width="1.859cm" svg:height="0.972cm" svg:x="21.208cm" svg:y="97.838cm">
          <text:p text:style-name="P5"><text:span text:style-name="T36">Working</text:span><text:span text:style-name="T36"><text:line-break/></text:span><text:span text:style-name="T36">memory</text:span></text:p>
        </draw:rect>
        <draw:rect draw:style-name="gr255" draw:text-style-name="P106" xml:id="id366" draw:id="id366" draw:layer="layout" svg:width="2.022cm" svg:height="1.04cm" svg:x="25.567cm" svg:y="97.929cm">
          <text:p text:style-name="P5">Short term<text:line-break/>memory</text:p>
        </draw:rect>
        <draw:rect draw:style-name="gr442" draw:text-style-name="P118" xml:id="id362" draw:id="id362" draw:layer="layout" svg:width="1.859cm" svg:height="0.972cm" svg:x="20.302cm" svg:y="95.627cm">
          <text:p text:style-name="P5"><text:span text:style-name="T36">Executive</text:span><text:span text:style-name="T36"><text:line-break/></text:span><text:span text:style-name="T36">functions</text:span></text:p>
        </draw:rect>
        <draw:connector draw:style-name="gr443" draw:text-style-name="P15" draw:layer="layout" draw:type="curve" svg:x1="21.231cm" svg:y1="96.599cm" svg:x2="22.137cm" svg:y2="97.838cm" draw:start-shape="id362" draw:start-glue-point="2" draw:end-shape="id363" svg:d="M21231 96599c0 930 906 311 906 1239" svg:viewBox="0 0 907 1240">
          <text:p/>
        </draw:connector>
        <draw:connector draw:style-name="gr444" draw:text-style-name="P15" draw:layer="layout" draw:type="curve" svg:x1="21.231cm" svg:y1="96.599cm" svg:x2="16.457cm" svg:y2="98.421cm" draw:start-shape="id362" draw:start-glue-point="2" draw:end-shape="id356" svg:d="M21231 96599c0 1366-4774 456-4774 1822" svg:viewBox="0 0 4775 1823">
          <text:p/>
        </draw:connector>
        <draw:connector draw:style-name="gr445" draw:text-style-name="P15" draw:layer="layout" draw:type="curve" svg:x1="22.137cm" svg:y1="98.81cm" svg:x2="18.628cm" svg:y2="102.937cm" draw:start-shape="id363" draw:start-glue-point="2" draw:end-shape="id364" draw:end-glue-point="0" svg:d="M22137 98810c0 3096-3509 1033-3509 4127" svg:viewBox="0 0 3510 4128">
          <text:p/>
        </draw:connector>
        <draw:connector draw:style-name="gr446" draw:text-style-name="P15" draw:layer="layout" draw:type="curve" svg:x1="22.137cm" svg:y1="98.81cm" svg:x2="22.787cm" svg:y2="102.207cm" draw:start-shape="id363" draw:start-glue-point="2" draw:end-shape="id365" svg:d="M22137 98810c0 2548 650 850 650 3397" svg:viewBox="0 0 651 3398">
          <text:p/>
        </draw:connector>
        <draw:connector draw:style-name="gr447" draw:text-style-name="P15" draw:layer="layout" draw:type="curve" svg:x1="23.067cm" svg:y1="98.324cm" svg:x2="25.567cm" svg:y2="98.449cm" draw:start-shape="id363" draw:start-glue-point="1" draw:end-shape="id366" draw:end-glue-point="3" svg:d="M23067 98324c1875 0 625 125 2500 125" svg:viewBox="0 0 2501 126">
          <text:p/>
        </draw:connector>
        <draw:connector draw:style-name="gr448" draw:text-style-name="P15" draw:layer="layout" draw:type="curve" svg:x1="22.137cm" svg:y1="98.81cm" svg:x2="28.064cm" svg:y2="101.034cm" draw:start-shape="id363" draw:start-glue-point="2" draw:end-shape="id359" draw:end-glue-point="0" svg:d="M22137 98810c0 1668 5927 556 5927 2224" svg:viewBox="0 0 5928 2225">
          <text:p/>
        </draw:connector>
        <draw:rect draw:style-name="gr255" draw:text-style-name="P106" xml:id="id367" draw:id="id367" draw:layer="layout" svg:width="2.022cm" svg:height="1.04cm" svg:x="29.396cm" svg:y="104.739cm">
          <text:p text:style-name="P5">Motor<text:line-break/>planning</text:p>
        </draw:rect>
        <draw:connector draw:style-name="gr449" draw:text-style-name="P15" draw:layer="layout" draw:type="curve" svg:x1="30.407cm" svg:y1="104.739cm" svg:x2="28.064cm" svg:y2="102.074cm" draw:start-shape="id367" draw:start-glue-point="0" draw:end-shape="id359" draw:end-glue-point="2" svg:d="M30407 104739c0-1998-2343-666-2343-2665" svg:viewBox="0 0 2344 2666">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50" draw:text-style-name="P120" draw:layer="layout" svg:width="9.739cm" svg:height="2.221cm" svg:x="-96.545cm" svg:y="31.437cm">
            <draw:text-box>
              <text:p text:style-name="P119"><text:span text:style-name="T12">From A Neurocognitive Perspective on the</text:span></text:p>
              <text:p text:style-name="P119"><text:span text:style-name="T12">Forms and Functions of Autobiographical Memory Retrieval</text:span><text:span text:style-name="T12"><text:line-break/></text:span><text:span text:style-name="T12">and the Construction of Autobiographical Memories</text:span></text:p>
              <text:p text:style-name="P119"><text:span text:style-name="T12">in the Self-Memory System and AI</text:span></text:p>
              <text:p text:style-name="P119"><text:span text:style-name="T12"/></text:p>
            </draw:text-box>
          </draw:frame>
        </draw:g>
        <draw:g draw:style-name="gr23">
          <draw:rect draw:style-name="gr3" draw:text-style-name="P4" xml:id="id369" draw:id="id369" draw:layer="layout" svg:width="2.015cm" svg:height="0.775cm" svg:x="-4.369cm" svg:y="26.431cm">
            <text:p text:style-name="P5"><text:span text:style-name="T2">event</text:span></text:p>
          </draw:rect>
          <draw:rect draw:style-name="gr4" draw:text-style-name="P6" xml:id="id368" draw:id="id368" draw:layer="layout" svg:width="2.324cm" svg:height="0.915cm" svg:x="-1.811cm" svg:y="23.973cm">
            <text:p text:style-name="P5"><text:span text:style-name="T3">Perception</text:span></text:p>
          </draw:rect>
          <draw:connector draw:style-name="gr451" draw:text-style-name="P15" draw:layer="layout" draw:type="curve" svg:x1="-0.649cm" svg:y1="24.888cm" svg:x2="-3.361cm" svg:y2="26.431cm" draw:start-shape="id368" draw:start-glue-point="2" draw:end-shape="id369" draw:end-glue-point="0" svg:d="M-649 24888c0 1158-2712 387-2712 1543" svg:viewBox="0 0 2713 1544">
            <text:p/>
          </draw:connector>
          <draw:rect draw:style-name="gr3" draw:text-style-name="P4" xml:id="id370" draw:id="id370" draw:layer="layout" svg:width="2.015cm" svg:height="0.775cm" svg:x="-1.579cm" svg:y="26.412cm">
            <text:p text:style-name="P5"><text:span text:style-name="T2">object</text:span></text:p>
          </draw:rect>
          <draw:connector draw:style-name="gr452" draw:text-style-name="P15" draw:layer="layout" draw:type="curve" svg:x1="-0.649cm" svg:y1="24.888cm" svg:x2="-0.571cm" svg:y2="26.412cm" draw:start-shape="id368" draw:start-glue-point="2" draw:end-shape="id370" draw:end-glue-point="0" svg:d="M-649 24888c0 1143 78 381 78 1524" svg:viewBox="0 0 79 1525">
            <text:p/>
          </draw:connector>
          <draw:rect draw:style-name="gr3" draw:text-style-name="P4" xml:id="id371" draw:id="id371"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53" draw:text-style-name="P15" draw:layer="layout" draw:type="curve" svg:x1="-0.649cm" svg:y1="24.888cm" svg:x2="2.136cm" svg:y2="26.474cm" draw:start-shape="id368" draw:start-glue-point="2" draw:end-shape="id371" draw:end-glue-point="0" svg:d="M-649 24888c0 1189 2785 397 2785 1586" svg:viewBox="0 0 2786 1587">
            <text:p/>
          </draw:connector>
          <draw:connector draw:style-name="gr451" draw:text-style-name="P15" draw:layer="layout" draw:type="curve" svg:x1="-0.605cm" svg:y1="22.246cm" svg:x2="-0.649cm" svg:y2="23.973cm" draw:end-shape="id368" draw:end-glue-point="0" svg:d="M-605 22246c0 919-44 56-44 1727" svg:viewBox="0 0 45 1728">
            <text:p/>
          </draw:connector>
          <draw:rect draw:style-name="gr3" draw:text-style-name="P4" xml:id="id372" draw:id="id372" draw:layer="layout" svg:width="2.015cm" svg:height="0.775cm" svg:x="-4.772cm" svg:y="28.979cm">
            <text:p text:style-name="P5"><text:span text:style-name="T2">Mental</text:span><text:span text:style-name="T2"><text:line-break/></text:span><text:span text:style-name="T2">state change</text:span></text:p>
          </draw:rect>
          <draw:connector draw:style-name="gr454" draw:text-style-name="P15" draw:layer="layout" draw:type="curve" svg:x1="-3.361cm" svg:y1="27.206cm" svg:x2="-3.764cm" svg:y2="28.979cm" draw:start-shape="id369" draw:start-glue-point="2" draw:end-shape="id372" svg:d="M-3361 27206c0 1330-403 444-403 1773" svg:viewBox="0 0 404 1774">
            <text:p/>
          </draw:connector>
          <draw:rect draw:style-name="gr3" draw:text-style-name="P4" xml:id="id373" draw:id="id373"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55" draw:text-style-name="P15" draw:layer="layout" draw:type="curve" svg:x1="-3.764cm" svg:y1="29.754cm" svg:x2="-4.884cm" svg:y2="31.683cm" draw:start-shape="id372" draw:start-glue-point="2" draw:end-shape="id373" draw:end-glue-point="0" svg:d="M-3764 29754c0 1449-1120 485-1120 1929" svg:viewBox="0 0 1121 1930">
            <text:p/>
          </draw:connector>
          <draw:path draw:style-name="gr456" draw:text-style-name="P121"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5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82" draw:id="id382"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58" draw:text-style-name="P123" xml:id="id375" draw:id="id375" draw:layer="layout" svg:width="0.323cm" svg:height="0.323cm" svg:x="-43.371cm" svg:y="40.411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9" draw:text-style-name="P7" draw:layer="layout" draw:type="curve" svg:x1="-40.74cm" svg:y1="40.783cm" svg:x2="-43.048cm" svg:y2="40.573cm" draw:start-shape="id374" draw:start-glue-point="3" draw:end-shape="id375" draw:end-glue-point="10" svg:d="M-40740 40783c-1729 0-576-210-2308-210" svg:viewBox="0 0 2309 211">
          <text:p text:style-name="P5"><text:span text:style-name="T4">Action</text:span><text:span text:style-name="T4"><text:line-break/></text:span><text:span text:style-name="T4">potential</text:span></text:p>
        </draw:connector>
        <draw:custom-shape draw:style-name="gr460" draw:text-style-name="P125" xml:id="id377" draw:id="id377" draw:layer="layout" svg:width="0.323cm" svg:height="0.323cm" svg:x="-43.357cm" svg:y="43.572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1" draw:text-style-name="P7" draw:layer="layout" draw:type="curve" svg:x1="-40.74cm" svg:y1="43.498cm" svg:x2="-43.034cm" svg:y2="43.734cm" draw:start-shape="id376" draw:start-glue-point="3" draw:end-shape="id37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60" draw:text-style-name="P125" xml:id="id379" draw:id="id379" draw:layer="layout" svg:width="0.323cm" svg:height="0.323cm" svg:x="-43.679cm" svg:y="41.97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2" draw:text-style-name="P7" draw:layer="layout" draw:type="curve" svg:x1="-40.74cm" svg:y1="42.14cm" svg:x2="-43.356cm" svg:y2="42.14cm" draw:start-shape="id378" draw:start-glue-point="3" draw:end-shape="id379" draw:end-glue-point="10" svg:d="M-40740 42140h-2616" svg:viewBox="0 0 2617 1">
          <text:p text:style-name="P5"><text:span text:style-name="T4">Action</text:span><text:span text:style-name="T4"><text:line-break/></text:span><text:span text:style-name="T4">potential</text:span></text:p>
        </draw:connector>
        <draw:custom-shape draw:style-name="gr460" draw:text-style-name="P125" xml:id="id381" draw:id="id381" draw:layer="layout" svg:width="0.323cm" svg:height="0.323cm" svg:x="-43.61cm" svg:y="44.87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43.708cm 45.251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46.424cm" svg:y="42.213cm">
          <draw:text-box>
            <text:p text:style-name="P5">Sensors<text:line-break/>(receptors)</text:p>
          </draw:text-box>
        </draw:frame>
        <draw:connector draw:style-name="gr465" draw:text-style-name="P7" draw:layer="layout" draw:type="curve" svg:x1="-40.74cm" svg:y1="44.855cm" svg:x2="-43.287cm" svg:y2="45.035cm" draw:start-shape="id380" draw:start-glue-point="3" draw:end-shape="id38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66" draw:text-style-name="P128" draw:layer="layout" svg:width="2.381cm" svg:height="1.985cm" svg:x="-48.849cm" svg:y="41.842cm">
          <text:p text:style-name="P127"><text:span text:style-name="T3">physical</text:span><text:span text:style-name="T3"><text:line-break/></text:span><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399" draw:id="id39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83" draw:id="id38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encoded FMM</text:span><text:span text:style-name="T4"><text:line-break/></text:span><text:span text:style-name="T4">wave params)</text:span></text:p>
        </draw:rect>
        <draw:rect draw:style-name="gr41" draw:text-style-name="P19" xml:id="id374" draw:id="id374"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68" draw:text-style-name="P7" draw:layer="layout" draw:type="curve" svg:x1="-37.022cm" svg:y1="42.815cm" svg:x2="-39.475cm" svg:y2="40.783cm" draw:start-shape="id382" draw:start-glue-point="3" draw:end-shape="id374" draw:end-glue-point="1" svg:d="M-37022 42815c-1839 0-613-2032-2453-2032" svg:viewBox="0 0 2454 2033">
          <text:p/>
        </draw:connector>
        <draw:rect draw:style-name="gr41" draw:text-style-name="P19" xml:id="id378" draw:id="id378"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76" draw:id="id376"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0" draw:id="id380"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69" draw:text-style-name="P7" draw:layer="layout" draw:type="curve" svg:x1="-37.022cm" svg:y1="42.815cm" svg:x2="-39.475cm" svg:y2="42.14cm" draw:start-shape="id382" draw:start-glue-point="3" draw:end-shape="id378" draw:end-glue-point="1" svg:d="M-37022 42815c-1839 0-613-675-2453-675" svg:viewBox="0 0 2454 676">
          <text:p/>
        </draw:connector>
        <draw:connector draw:style-name="gr470" draw:text-style-name="P7" draw:layer="layout" draw:type="curve" svg:x1="-37.022cm" svg:y1="42.815cm" svg:x2="-39.475cm" svg:y2="43.498cm" draw:start-shape="id382" draw:start-glue-point="3" draw:end-shape="id376" draw:end-glue-point="1" svg:d="M-37022 42815c-1839 0-613 683-2453 683" svg:viewBox="0 0 2454 684">
          <text:p/>
        </draw:connector>
        <draw:connector draw:style-name="gr36" draw:text-style-name="P7" draw:layer="layout" draw:type="curve" svg:x1="-37.022cm" svg:y1="42.815cm" svg:x2="-39.475cm" svg:y2="44.855cm" draw:start-shape="id382" draw:start-glue-point="3" draw:end-shape="id380" draw:end-glue-point="1" svg:d="M-37022 42815c-1839 0-613 2040-2453 2040" svg:viewBox="0 0 2454 2041">
          <text:p/>
        </draw:connector>
        <draw:custom-shape draw:style-name="gr471" draw:text-style-name="P41" draw:layer="layout" svg:width="0.215cm" svg:height="1.199cm" draw:transform="rotate (-1.5707963267949) translate (-39.583cm 39.802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2" draw:text-style-name="P16" draw:layer="layout" svg:width="1.632cm" svg:height="0.569cm" svg:x="-40.927cm" svg:y="39.205cm">
          <draw:text-box>
            <text:p><text:span text:style-name="T4">Buffering</text:span></text:p>
          </draw:text-box>
        </draw:frame>
        <draw:connector draw:style-name="gr473" draw:text-style-name="P15" draw:layer="layout" draw:type="line" svg:x1="-27.845cm" svg:y1="44.056cm" svg:x2="-22.439cm" svg:y2="44.01cm" svg:d="M-27845 44056l5406-46" svg:viewBox="0 0 5407 47">
          <text:p/>
        </draw:connector>
        <draw:frame draw:style-name="gr474" draw:text-style-name="P129" draw:layer="layout" svg:width="3.263cm" svg:height="1.199cm" svg:x="-27.926cm" svg:y="44.049cm">
          <draw:text-box>
            <text:p><text:span text:style-name="T39">Semantic</text:span></text:p>
          </draw:text-box>
        </draw:frame>
        <draw:connector draw:style-name="gr36" draw:text-style-name="P7" draw:layer="layout" draw:type="curve" svg:x1="-33.461cm" svg:y1="42.816cm" svg:x2="-34.521cm" svg:y2="42.815cm" draw:start-shape="id383" draw:start-glue-point="3" draw:end-shape="id382" draw:end-glue-point="1" svg:d="M-33461 42816c-793 0-264-1-1060-1" svg:viewBox="0 0 1061 2">
          <text:p/>
        </draw:connector>
        <draw:g draw:style-name="gr23">
          <draw:path draw:style-name="gr475" draw:text-style-name="P130" xml:id="id400" draw:id="id40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29.6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397" draw:id="id39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36.644cm" svg:y1="44.056cm" svg:x2="-31.238cm" svg:y2="44.01cm" svg:d="M-36644 44056l5406-46" svg:viewBox="0 0 5407 47">
          <text:p/>
        </draw:connector>
        <draw:frame draw:style-name="gr474" draw:text-style-name="P129" draw:layer="layout" svg:width="3.263cm" svg:height="1.199cm" svg:x="-33.725cm" svg:y="44.149cm">
          <draw:text-box>
            <text:p><text:span text:style-name="T39">signal-level</text:span></text:p>
          </draw:text-box>
        </draw:frame>
        <draw:rect draw:style-name="gr467" draw:text-style-name="P19" xml:id="id398" draw:id="id398"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78" draw:text-style-name="P15" draw:layer="layout" draw:type="curve" svg:x1="-23.138cm" svg:y1="11.778cm" svg:x2="-23.153cm" svg:y2="14.393cm" draw:start-shape="id384" draw:start-glue-point="2" draw:end-shape="id385" svg:d="M-23138 11778c0 1962-15 655-15 2615" svg:viewBox="0 0 16 2616">
          <text:p/>
        </draw:connector>
        <draw:custom-shape draw:style-name="gr34" draw:text-style-name="P26" xml:id="id387" draw:id="id387"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6" draw:id="id386"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86" draw:start-glue-point="6" draw:end-shape="id387" draw:end-glue-point="10" svg:d="M-43898 75064h-1110" svg:viewBox="0 0 1111 1">
          <text:p/>
        </draw:connector>
        <draw:connector draw:style-name="gr36" draw:text-style-name="P7" draw:layer="layout" draw:type="curve" svg:x1="-45.899cm" svg:y1="75.064cm" svg:x2="-47.007cm" svg:y2="75.064cm" draw:start-shape="id387" draw:start-glue-point="6" draw:end-shape="id16" draw:end-glue-point="10" svg:d="M-45899 75064h-1108" svg:viewBox="0 0 1109 1">
          <text:p/>
        </draw:connector>
        <draw:custom-shape draw:style-name="gr34" draw:text-style-name="P26" xml:id="id389" draw:id="id389"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8" draw:id="id388"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88" draw:start-glue-point="6" draw:end-shape="id389" draw:end-glue-point="10" svg:d="M-36898 75064h-1110" svg:viewBox="0 0 1111 1">
          <text:p/>
        </draw:connector>
        <draw:custom-shape draw:style-name="gr479" draw:text-style-name="P106" draw:layer="layout" svg:width="16.317cm" svg:height="1.952cm" svg:x="-51.303cm" svg:y="72.113cm">
          <text:p/>
          <draw:enhanced-geometry svg:viewBox="0 0 21600 21600" draw:type="rectangle" draw:enhanced-path="M 0 0 L 21600 0 21600 21600 0 21600 0 0 Z N"/>
        </draw:custom-shape>
        <draw:frame draw:style-name="gr480" draw:text-style-name="P38" draw:layer="layout" svg:width="1.966cm" svg:height="1.433cm" svg:x="-44.749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81" draw:text-style-name="P133"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2" draw:text-style-name="P38" draw:layer="layout" svg:width="0.749cm" svg:height="0.725cm" svg:x="-42.98cm" svg:y="72.774cm">
          <draw:text-box>
            <text:p>+</text:p>
          </draw:text-box>
        </draw:frame>
        <draw:frame draw:style-name="gr483" draw:text-style-name="P38" draw:layer="layout" svg:width="1.849cm" svg:height="1.039cm" svg:x="-48.949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9cm" svg:y="72.774cm">
          <draw:text-box>
            <text:p>+</text:p>
          </draw:text-box>
        </draw:frame>
        <draw:frame draw:style-name="gr484" draw:text-style-name="P11" draw:layer="layout" svg:width="1.684cm" svg:height="0.57cm" svg:x="-42.281cm" svg:y="72.851cm">
          <draw:text-box>
            <text:p><text:span text:style-name="T4">DBSCAN</text:span></text:p>
          </draw:text-box>
        </draw:frame>
        <draw:custom-shape draw:style-name="gr485" draw:text-style-name="P134" draw:layer="layout" svg:width="1.539cm" svg:height="1.287cm" draw:transform="rotate (1.5707963267949) translate (-40.535cm 73.936cm)">
          <text:p text:style-name="P19"><text:span text:style-name="T4">Dictionar</text:span><text:span text:style-name="T4">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1" draw:text-style-name="P133"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3cm" svg:y="70.679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3cm" svg:y="70.679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001cm" svg:y="70.679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8cm" svg:y="70.679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4cm" svg:y1="70.944cm" svg:x2="-44.059cm" svg:y2="70.962cm">
            <text:p/>
          </draw:line>
          <draw:line draw:style-name="gr488" draw:text-style-name="P15" draw:layer="layout" svg:x1="-43.511cm" svg:y1="70.961cm" svg:x2="-43.013cm" svg:y2="70.956cm">
            <text:p/>
          </draw:line>
          <draw:line draw:style-name="gr488" draw:text-style-name="P15" draw:layer="layout" svg:x1="-42.465cm" svg:y1="70.961cm" svg:x2="-41.948cm" svg:y2="70.956cm">
            <text:p/>
          </draw:line>
        </draw:g>
        <draw:connector draw:style-name="gr489" draw:text-style-name="P7" draw:layer="layout" draw:type="curve" svg:x1="-39.312cm" svg:y1="75.023cm" svg:x2="-42.625cm" svg:y2="75.026cm" svg:d="M-39312 75023c-2484 0-828 3-3313 3" svg:viewBox="0 0 3314 4">
          <text:p/>
        </draw:connector>
        <draw:connector draw:style-name="gr489" draw:text-style-name="P7" draw:layer="layout" draw:type="curve" svg:x1="-45.797cm" svg:y1="70.923cm" svg:x2="-46.878cm" svg:y2="70.927cm" svg:d="M-45797 70923c-810 0-270 4-1081 4" svg:viewBox="0 0 1082 5">
          <text:p/>
        </draw:connector>
        <draw:connector draw:style-name="gr489" draw:text-style-name="P7" draw:layer="layout" draw:type="curve" svg:x1="-39.807cm" svg:y1="70.923cm" svg:x2="-40.888cm" svg:y2="70.927cm" svg:d="M-39807 70923c-810 0-270 4-1081 4" svg:viewBox="0 0 1082 5">
          <text:p/>
        </draw:connector>
        <draw:custom-shape draw:style-name="gr481" draw:text-style-name="P133"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2cm" svg:y="76.113cm">
          <text:p/>
          <draw:enhanced-geometry svg:viewBox="0 0 21600 21600" draw:type="rectangle" draw:enhanced-path="M 0 0 L 21600 0 21600 21600 0 21600 0 0 Z N"/>
        </draw:custom-shape>
        <draw:frame draw:style-name="gr490" draw:text-style-name="P41" draw:layer="layout" svg:width="1.684cm" svg:height="1.205cm" svg:x="-44.28cm" svg:y="76.451cm">
          <draw:text-box>
            <text:p text:style-name="P5"><text:span text:style-name="T4">D</text:span><text:span text:style-name="T4">B</text:span><text:span text:style-name="T4">S</text:span><text:span text:style-name="T4">C</text:span><text:span text:style-name="T4">A</text:span><text:span text:style-name="T4">N </text:span><text:span text:style-name="T4">o</text:span><text:span text:style-name="T4">n </text:span><text:span text:style-name="T4">0</text:span><text:span text:style-name="T43">th</text:span><text:span text:style-name="T44">a</text:span><text:span text:style-name="T44">n</text:span><text:span text:style-name="T44">d</text:span><text:span text:style-name="T44"><text:line-break/></text:span><text:span text:style-name="T44">2</text:span><text:span text:style-name="T43">n</text:span><text:span text:style-name="T43">d</text:span></text:p>
          </draw:text-box>
        </draw:frame>
        <draw:custom-shape draw:style-name="gr491" draw:text-style-name="P134"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391" draw:id="id391"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0" draw:id="id390"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390" draw:start-glue-point="6" draw:end-shape="id391" draw:end-glue-point="10" svg:d="M-47898 79064h-1110" svg:viewBox="0 0 1111 1">
          <text:p/>
        </draw:connector>
        <draw:custom-shape draw:style-name="gr34" draw:text-style-name="P26" xml:id="id393" draw:id="id393"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2" draw:id="id392"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392" draw:start-glue-point="6" draw:end-shape="id393" draw:end-glue-point="10" svg:d="M-43898 79064h-1110" svg:viewBox="0 0 1111 1">
          <text:p/>
        </draw:connector>
        <draw:connector draw:style-name="gr36" draw:text-style-name="P7" draw:layer="layout" draw:type="curve" svg:x1="-45.899cm" svg:y1="79.064cm" svg:x2="-47.007cm" svg:y2="79.064cm" draw:start-shape="id393" draw:start-glue-point="6" draw:end-shape="id390" draw:end-glue-point="10" svg:d="M-45899 79064h-1108" svg:viewBox="0 0 1109 1">
          <text:p/>
        </draw:connector>
        <draw:custom-shape draw:style-name="gr34" draw:text-style-name="P26" xml:id="id395" draw:id="id395"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4" draw:id="id394"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394" draw:start-glue-point="6" draw:end-shape="id395" draw:end-glue-point="10" svg:d="M-36898 79064h-1110" svg:viewBox="0 0 1111 1">
          <text:p/>
        </draw:connector>
        <draw:connector draw:style-name="gr489" draw:text-style-name="P7" draw:layer="layout" draw:type="curve" svg:x1="-39.312cm" svg:y1="79.023cm" svg:x2="-42.625cm" svg:y2="79.026cm" svg:d="M-39312 79023c-2484 0-828 3-3313 3" svg:viewBox="0 0 3314 4">
          <text:p/>
        </draw:connector>
        <draw:custom-shape draw:style-name="gr479" draw:text-style-name="P106" draw:layer="layout" svg:width="16.317cm" svg:height="1.952cm" svg:x="-51.301cm" svg:y="79.913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3" draw:text-style-name="P137" draw:layer="layout" svg:width="2.011cm" svg:height="1.705cm" svg:x="-44.457cm" svg:y="80.092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79" draw:text-style-name="P106" draw:layer="layout" svg:width="16.317cm" svg:height="1.952cm" svg:x="-51.302cm" svg:y="72.113cm">
          <text:p/>
          <draw:enhanced-geometry svg:viewBox="0 0 21600 21600" draw:type="rectangle" draw:enhanced-path="M 0 0 L 21600 0 21600 21600 0 21600 0 0 Z N"/>
        </draw:custom-shape>
        <draw:frame draw:style-name="gr494" draw:text-style-name="P139" draw:layer="layout" svg:width="3.743cm" svg:height="1.158cm" svg:x="-46.519cm" svg:y="72.64cm">
          <draw:text-box>
            <text:p text:style-name="P138"><text:span text:style-name="T12">M</text:span><text:span text:style-name="T12">a</text:span><text:span text:style-name="T12">t</text:span><text:span text:style-name="T12">ri</text:span><text:span text:style-name="T12">x</text:span><text:span text:style-name="T12">-</text:span><text:span text:style-name="T12">P</text:span><text:span text:style-name="T12">r</text:span><text:span text:style-name="T12">o</text:span><text:span text:style-name="T12">fi</text:span><text:span text:style-name="T12">l</text:span><text:span text:style-name="T12">e</text:span><text:span text:style-name="T12">-</text:span><text:span text:style-name="T12">b</text:span><text:span text:style-name="T12">a</text:span><text:span text:style-name="T12">s</text:span><text:span text:style-name="T12">e</text:span><text:span text:style-name="T12">d </text:span><text:span text:style-name="T12"><text:line-break/></text:span><text:span text:style-name="T12">M</text:span><text:span text:style-name="T12">o</text:span><text:span text:style-name="T12">ti</text:span><text:span text:style-name="T12">f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p>
          </draw:text-box>
        </draw:frame>
        <draw:frame draw:style-name="gr482" draw:text-style-name="P38" draw:layer="layout" svg:width="0.749cm" svg:height="0.725cm" svg:x="-42.979cm" svg:y="72.774cm">
          <draw:text-box>
            <text:p>+</text:p>
          </draw:text-box>
        </draw:frame>
        <draw:frame draw:style-name="gr483" draw:text-style-name="P38" draw:layer="layout" svg:width="1.849cm" svg:height="1.039cm" svg:x="-48.948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8cm" svg:y="72.774cm">
          <draw:text-box>
            <text:p>+</text:p>
          </draw:text-box>
        </draw:frame>
        <draw:frame draw:style-name="gr484" draw:text-style-name="P11" draw:layer="layout" svg:width="1.684cm" svg:height="0.57cm" svg:x="-42.28cm" svg:y="72.851cm">
          <draw:text-box>
            <text:p><text:span text:style-name="T4">DBSCAN</text:span></text:p>
          </draw:text-box>
        </draw:frame>
        <draw:custom-shape draw:style-name="gr491" draw:text-style-name="P134"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3cm" svg:y="68.113cm">
          <text:p/>
          <draw:enhanced-geometry svg:viewBox="0 0 21600 21600" draw:type="rectangle" draw:enhanced-path="M 0 0 L 21600 0 21600 21600 0 21600 0 0 Z N"/>
        </draw:custom-shape>
        <draw:frame draw:style-name="gr480" draw:text-style-name="P38" draw:layer="layout" svg:width="1.966cm" svg:height="1.433cm" svg:x="-44.749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8cm" svg:y="68.774cm">
          <draw:text-box>
            <text:p>+</text:p>
          </draw:text-box>
        </draw:frame>
        <draw:frame draw:style-name="gr483" draw:text-style-name="P38" draw:layer="layout" svg:width="1.849cm" svg:height="1.039cm" svg:x="-46.949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68.774cm">
          <draw:text-box>
            <text:p>+</text:p>
          </draw:text-box>
        </draw:frame>
        <draw:frame draw:style-name="gr484" draw:text-style-name="P11" draw:layer="layout" svg:width="1.684cm" svg:height="0.57cm" svg:x="-42.281cm" svg:y="68.851cm">
          <draw:text-box>
            <text:p><text:span text:style-name="T4">DBSCAN</text:span></text:p>
          </draw:text-box>
        </draw:frame>
        <draw:custom-shape draw:style-name="gr485" draw:text-style-name="P134"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68.113cm">
          <text:p/>
          <draw:enhanced-geometry svg:viewBox="0 0 21600 21600" draw:type="rectangle" draw:enhanced-path="M 0 0 L 21600 0 21600 21600 0 21600 0 0 Z N"/>
        </draw:custom-shape>
        <draw:frame draw:style-name="gr482" draw:text-style-name="P38" draw:layer="layout" svg:width="0.749cm" svg:height="0.725cm" svg:x="-42.979cm" svg:y="68.774cm">
          <draw:text-box>
            <text:p>+</text:p>
          </draw:text-box>
        </draw:frame>
        <draw:frame draw:style-name="gr483" draw:text-style-name="P38" draw:layer="layout" svg:width="1.849cm" svg:height="1.039cm" svg:x="-48.948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8cm" svg:y="68.774cm">
          <draw:text-box>
            <text:p>+</text:p>
          </draw:text-box>
        </draw:frame>
        <draw:frame draw:style-name="gr484" draw:text-style-name="P11" draw:layer="layout" svg:width="1.684cm" svg:height="0.57cm" svg:x="-42.28cm" svg:y="68.851cm">
          <draw:text-box>
            <text:p><text:span text:style-name="T4">DBSCAN</text:span></text:p>
          </draw:text-box>
        </draw:frame>
        <draw:custom-shape draw:style-name="gr491" draw:text-style-name="P134"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81" draw:text-style-name="P133"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8cm" svg:y="66.68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3cm" svg:y="66.68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4cm" svg:y="66.68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9cm" svg:y="66.68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3cm" svg:y1="66.948cm" svg:x2="-44.133cm" svg:y2="66.938cm">
            <text:p/>
          </draw:line>
          <draw:line draw:style-name="gr488" draw:text-style-name="P15" draw:layer="layout" svg:x1="-43.511cm" svg:y1="66.962cm" svg:x2="-43.088cm" svg:y2="66.951cm">
            <text:p/>
          </draw:line>
          <draw:line draw:style-name="gr488" draw:text-style-name="P15" draw:layer="layout" svg:x1="-42.465cm" svg:y1="66.962cm" svg:x2="-41.95cm" svg:y2="66.965cm">
            <text:p/>
          </draw:line>
        </draw:g>
        <draw:connector draw:style-name="gr489" draw:text-style-name="P7" draw:layer="layout" draw:type="curve" svg:x1="-45.797cm" svg:y1="66.924cm" svg:x2="-46.878cm" svg:y2="66.928cm" svg:d="M-45797 66924c-810 0-270 4-1081 4" svg:viewBox="0 0 1082 5">
          <text:p/>
        </draw:connector>
        <draw:connector draw:style-name="gr489" draw:text-style-name="P7" draw:layer="layout" draw:type="curve" svg:x1="-39.807cm" svg:y1="66.924cm" svg:x2="-40.888cm" svg:y2="66.928cm" svg:d="M-39807 66924c-810 0-270 4-1081 4" svg:viewBox="0 0 1082 5">
          <text:p/>
        </draw:connector>
        <draw:custom-shape draw:style-name="gr481" draw:text-style-name="P133"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95" draw:text-style-name="P140" xml:id="id396" draw:id="id396" draw:layer="layout" svg:width="5.693cm" svg:height="3.474cm" svg:x="-16.503cm" svg:y="49.103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3.656cm" svg:y1="49.103cm" svg:x2="-18.631cm" svg:y2="43.425cm" draw:start-shape="id396" draw:start-glue-point="0" draw:end-shape="id397" draw:end-glue-point="2" svg:d="M-13656 49103c0-4258-4975-1420-4975-5678" svg:viewBox="0 0 4976 5679">
          <text:p/>
        </draw:connector>
        <draw:connector draw:style-name="gr36" draw:text-style-name="P7" draw:layer="layout" draw:type="curve" svg:x1="-23.371cm" svg:y1="42.727cm" svg:x2="-24.444cm" svg:y2="42.727cm" draw:start-shape="id398" draw:start-glue-point="3" draw:end-shape="id399" draw:end-glue-point="1" svg:d="M-23371 42727h-1073" svg:viewBox="0 0 1074 1">
          <text:p/>
        </draw:connector>
        <draw:connector draw:style-name="gr36" draw:text-style-name="P7" draw:layer="layout" draw:type="curve" svg:x1="-19.918cm" svg:y1="42.727cm" svg:x2="-20.797cm" svg:y2="42.727cm" draw:start-shape="id397" draw:start-glue-point="3" draw:end-shape="id398" draw:end-glue-point="1" svg:d="M-19918 42727h-879" svg:viewBox="0 0 880 1">
          <text:p/>
        </draw:connector>
        <draw:connector draw:style-name="gr36" draw:text-style-name="P7" draw:layer="layout" draw:type="curve" svg:x1="-30.222cm" svg:y1="42.794cm" svg:x2="-31.32cm" svg:y2="42.816cm" draw:start-shape="id400" draw:end-shape="id383" draw:end-glue-point="1" svg:d="M-30222 42794c-837 0-288 22-1098 22" svg:viewBox="0 0 1099 23">
          <text:p/>
        </draw:connector>
        <draw:path draw:style-name="gr496" draw:text-style-name="P141"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497" draw:text-style-name="P13" draw:layer="layout" svg:width="3.475cm" svg:height="0.878cm" svg:x="-36.072cm" svg:y="39.061cm">
          <draw:text-box>
            <text:p text:style-name="P3"><text:span text:style-name="T7">Robot 1</text:span></text:p>
          </draw:text-box>
        </draw:frame>
        <draw:connector draw:style-name="gr498" draw:text-style-name="P7" draw:layer="layout" draw:type="curve" svg:x1="-20.661cm" svg:y1="51.489cm" svg:x2="-16.503cm" svg:y2="50.84cm" draw:start-shape="id401" draw:start-glue-point="1" draw:end-shape="id396" draw:end-glue-point="3" svg:d="M-20661 51489c3120 0 1041-649 4158-649" svg:viewBox="0 0 4159 650">
          <text:p text:style-name="P5"><text:span text:style-name="T4">Robot 1</text:span><text:span text:style-name="T4"><text:line-break/></text:span><text:span text:style-name="T4">utters</text:span><text:span text:style-name="T4"><text:line-break/></text:span><text:span text:style-name="T4">and decoder</text:span></text:p>
        </draw:connector>
        <draw:frame draw:style-name="gr499" draw:text-style-name="P13" draw:layer="layout" svg:width="3.475cm" svg:height="0.878cm" svg:x="-30.214cm" svg:y="49.736cm">
          <draw:text-box>
            <text:p text:style-name="P3"><text:span text:style-name="T7">Robot 2</text:span></text:p>
          </draw:text-box>
        </draw:frame>
        <draw:g draw:style-name="gr31">
          <draw:custom-shape draw:style-name="gr500" draw:text-style-name="P143" xml:id="id402" draw:id="id402" draw:layer="layout" svg:width="0.891cm" svg:height="0.97cm" svg:x="-59.84cm" svg:y="46.447cm">
            <text:p text:style-name="P142"><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43" xml:id="id404" draw:id="id404" draw:layer="layout" svg:width="0.891cm" svg:height="0.97cm" svg:x="-59.839cm" svg:y="47.747cm">
            <text:p text:style-name="P142"><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43" xml:id="id406" draw:id="id406" draw:layer="layout" svg:width="0.891cm" svg:height="0.97cm" svg:x="-59.838cm" svg:y="49.047cm">
            <text:p text:style-name="P142"><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43" xml:id="id408" draw:id="id408" draw:layer="layout" svg:width="0.891cm" svg:height="0.97cm" svg:x="-59.837cm" svg:y="50.347cm">
            <text:p text:style-name="P142"><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4" xml:id="id403" draw:id="id403" draw:layer="layout" svg:width="0.891cm" svg:height="0.97cm" svg:x="-56.936cm" svg:y="47.747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4" xml:id="id405" draw:id="id405" draw:layer="layout" svg:width="0.891cm" svg:height="0.97cm" svg:x="-56.935cm" svg:y="48.847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4" xml:id="id407" draw:id="id407" draw:layer="layout" svg:width="0.891cm" svg:height="0.97cm" svg:x="-56.934cm" svg:y="49.947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draw:layer="layout" draw:type="line" svg:x1="-58.949cm" svg:y1="46.932cm" svg:x2="-56.936cm" svg:y2="48.232cm" draw:start-shape="id402" draw:start-glue-point="10" draw:end-shape="id403" draw:end-glue-point="6" svg:d="M-58949 46932l2013 1300" svg:viewBox="0 0 2014 1301">
            <text:p/>
          </draw:connector>
          <draw:connector draw:style-name="gr502" draw:text-style-name="P15" draw:layer="layout" draw:type="line" svg:x1="-58.948cm" svg:y1="48.232cm" svg:x2="-56.935cm" svg:y2="49.332cm" draw:start-shape="id404" draw:start-glue-point="10" draw:end-shape="id405" draw:end-glue-point="6" svg:d="M-58948 48232l2013 1100" svg:viewBox="0 0 2014 1101">
            <text:p/>
          </draw:connector>
          <draw:connector draw:style-name="gr502" draw:text-style-name="P15" draw:layer="layout" draw:type="line" svg:x1="-58.947cm" svg:y1="49.532cm" svg:x2="-56.934cm" svg:y2="50.432cm" draw:start-shape="id406" draw:start-glue-point="10" draw:end-shape="id407" draw:end-glue-point="6" svg:d="M-58947 49532l2013 900" svg:viewBox="0 0 2014 901">
            <text:p/>
          </draw:connector>
          <draw:connector draw:style-name="gr502" draw:text-style-name="P15" draw:layer="layout" draw:type="line" svg:x1="-58.946cm" svg:y1="50.832cm" svg:x2="-56.934cm" svg:y2="50.432cm" draw:start-shape="id408" draw:start-glue-point="10" draw:end-shape="id407" draw:end-glue-point="6" svg:d="M-58946 50832l2012-400" svg:viewBox="0 0 2013 401">
            <text:p/>
          </draw:connector>
          <draw:connector draw:style-name="gr502" draw:text-style-name="P15" draw:layer="layout" draw:type="line" svg:x1="-58.946cm" svg:y1="50.832cm" svg:x2="-56.935cm" svg:y2="49.332cm" draw:start-shape="id408" draw:start-glue-point="10" draw:end-shape="id405" draw:end-glue-point="6" svg:d="M-58946 50832l2011-1500" svg:viewBox="0 0 2012 1501">
            <text:p/>
          </draw:connector>
          <draw:connector draw:style-name="gr502" draw:text-style-name="P15" draw:layer="layout" draw:type="line" svg:x1="-58.946cm" svg:y1="50.832cm" svg:x2="-56.936cm" svg:y2="48.232cm" draw:start-shape="id408" draw:start-glue-point="10" draw:end-shape="id403" draw:end-glue-point="6" svg:d="M-58946 50832l2010-2600" svg:viewBox="0 0 2011 2601">
            <text:p/>
          </draw:connector>
          <draw:connector draw:style-name="gr502" draw:text-style-name="P15" draw:layer="layout" draw:type="line" svg:x1="-58.947cm" svg:y1="49.532cm" svg:x2="-56.935cm" svg:y2="49.332cm" draw:start-shape="id406" draw:start-glue-point="10" draw:end-shape="id405" draw:end-glue-point="6" svg:d="M-58947 49532l2012-200" svg:viewBox="0 0 2013 201">
            <text:p/>
          </draw:connector>
          <draw:connector draw:style-name="gr502" draw:text-style-name="P15" draw:layer="layout" draw:type="line" svg:x1="-58.947cm" svg:y1="49.532cm" svg:x2="-56.936cm" svg:y2="48.232cm" draw:start-shape="id406" draw:start-glue-point="10" draw:end-shape="id403" draw:end-glue-point="6" svg:d="M-58947 49532l2011-1300" svg:viewBox="0 0 2012 1301">
            <text:p/>
          </draw:connector>
          <draw:connector draw:style-name="gr502" draw:text-style-name="P15" draw:layer="layout" draw:type="line" svg:x1="-58.948cm" svg:y1="48.232cm" svg:x2="-56.936cm" svg:y2="48.232cm" draw:start-shape="id404" draw:start-glue-point="10" draw:end-shape="id403" draw:end-glue-point="6" svg:d="M-58948 48232h2012" svg:viewBox="0 0 2013 1">
            <text:p/>
          </draw:connector>
          <draw:connector draw:style-name="gr502" draw:text-style-name="P15" draw:layer="layout" draw:type="line" svg:x1="-58.948cm" svg:y1="48.232cm" svg:x2="-56.934cm" svg:y2="50.432cm" draw:start-shape="id404" draw:start-glue-point="10" draw:end-shape="id407" draw:end-glue-point="6" svg:d="M-58948 48232l2014 2200" svg:viewBox="0 0 2015 2201">
            <text:p/>
          </draw:connector>
          <draw:connector draw:style-name="gr502" draw:text-style-name="P15" draw:layer="layout" draw:type="line" svg:x1="-58.949cm" svg:y1="46.932cm" svg:x2="-56.935cm" svg:y2="49.332cm" draw:start-shape="id402" draw:start-glue-point="10" draw:end-shape="id405" draw:end-glue-point="6" svg:d="M-58949 46932l2014 2400" svg:viewBox="0 0 2015 2401">
            <text:p/>
          </draw:connector>
          <draw:connector draw:style-name="gr502" draw:text-style-name="P15" draw:layer="layout" draw:type="line" svg:x1="-58.949cm" svg:y1="46.932cm" svg:x2="-56.934cm" svg:y2="50.432cm" draw:start-shape="id402" draw:start-glue-point="10" draw:end-shape="id407" draw:end-glue-point="6" svg:d="M-58949 46932l2015 3500" svg:viewBox="0 0 2016 3501">
            <text:p/>
          </draw:connector>
          <draw:custom-shape draw:style-name="gr500" draw:text-style-name="P143" xml:id="id409" draw:id="id409" draw:layer="layout" svg:width="0.891cm" svg:height="0.97cm" svg:x="-54.04cm" svg:y="46.447cm">
            <text:p text:style-name="P145"><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43" xml:id="id410" draw:id="id410" draw:layer="layout" svg:width="0.891cm" svg:height="0.97cm" svg:x="-54.039cm" svg:y="47.747cm">
            <text:p text:style-name="P145"><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43" xml:id="id411" draw:id="id411" draw:layer="layout" svg:width="0.891cm" svg:height="0.97cm" svg:x="-54.038cm" svg:y="49.047cm">
            <text:p text:style-name="P145"><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43" xml:id="id412" draw:id="id412" draw:layer="layout" svg:width="0.891cm" svg:height="0.97cm" svg:x="-54.037cm" svg:y="50.347cm">
            <text:p text:style-name="P145"><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draw:layer="layout" draw:type="line" svg:x1="-56.045cm" svg:y1="48.232cm" svg:x2="-54.04cm" svg:y2="46.932cm" draw:start-shape="id403" draw:start-glue-point="10" draw:end-shape="id409" draw:end-glue-point="6" svg:d="M-56045 48232l2005-1300" svg:viewBox="0 0 2006 1301">
            <text:p/>
          </draw:connector>
          <draw:connector draw:style-name="gr502" draw:text-style-name="P15" draw:layer="layout" draw:type="line" svg:x1="-56.044cm" svg:y1="48.232cm" svg:x2="-54.039cm" svg:y2="48.232cm" draw:end-shape="id410" draw:end-glue-point="6" svg:d="M-56044 48232h2005" svg:viewBox="0 0 2006 1">
            <text:p/>
          </draw:connector>
          <draw:connector draw:style-name="gr502" draw:text-style-name="P15" draw:layer="layout" draw:type="line" svg:x1="-56.043cm" svg:y1="48.232cm" svg:x2="-54.038cm" svg:y2="49.532cm" draw:end-shape="id411" draw:end-glue-point="6" svg:d="M-56043 48232l2005 1300" svg:viewBox="0 0 2006 1301">
            <text:p/>
          </draw:connector>
          <draw:connector draw:style-name="gr502" draw:text-style-name="P15" xml:id="id432" draw:id="id432" draw:layer="layout" draw:type="line" svg:x1="-56.042cm" svg:y1="48.232cm" svg:x2="-54.037cm" svg:y2="50.832cm" draw:end-shape="id412" draw:end-glue-point="6" svg:d="M-56042 48232l2005 2600" svg:viewBox="0 0 2006 2601">
            <text:p/>
          </draw:connector>
          <draw:connector draw:style-name="gr502" draw:text-style-name="P15" draw:layer="layout" draw:type="line" svg:x1="-56.044cm" svg:y1="49.332cm" svg:x2="-54.04cm" svg:y2="46.932cm" draw:start-shape="id405" draw:start-glue-point="10" draw:end-shape="id409" draw:end-glue-point="6" svg:d="M-56044 49332l2004-2400" svg:viewBox="0 0 2005 2401">
            <text:p/>
          </draw:connector>
          <draw:connector draw:style-name="gr502" draw:text-style-name="P15" draw:layer="layout" draw:type="line" svg:x1="-56.043cm" svg:y1="49.332cm" svg:x2="-54.039cm" svg:y2="48.232cm" draw:end-shape="id410" draw:end-glue-point="6" svg:d="M-56043 49332l2004-1100" svg:viewBox="0 0 2005 1101">
            <text:p/>
          </draw:connector>
          <draw:connector draw:style-name="gr502" draw:text-style-name="P15" draw:layer="layout" draw:type="line" svg:x1="-56.043cm" svg:y1="49.332cm" svg:x2="-54.038cm" svg:y2="49.532cm" draw:end-shape="id411" draw:end-glue-point="6" svg:d="M-56043 49332l2005 200" svg:viewBox="0 0 2006 201">
            <text:p/>
          </draw:connector>
          <draw:connector draw:style-name="gr502" draw:text-style-name="P15" xml:id="id431" draw:id="id431" draw:layer="layout" draw:type="line" svg:x1="-56.042cm" svg:y1="49.332cm" svg:x2="-54.037cm" svg:y2="50.832cm" draw:end-shape="id412" draw:end-glue-point="6" svg:d="M-56042 49332l2005 1500" svg:viewBox="0 0 2006 1501">
            <text:p/>
          </draw:connector>
          <draw:connector draw:style-name="gr502" draw:text-style-name="P15" draw:layer="layout" draw:type="line" svg:x1="-56.043cm" svg:y1="50.432cm" svg:x2="-54.037cm" svg:y2="50.832cm" draw:start-shape="id407" draw:start-glue-point="10" draw:end-shape="id412" draw:end-glue-point="6" svg:d="M-56043 50432l2006 400" svg:viewBox="0 0 2007 401">
            <text:p/>
          </draw:connector>
          <draw:connector draw:style-name="gr502" draw:text-style-name="P15" draw:layer="layout" draw:type="line" svg:x1="-56.042cm" svg:y1="50.432cm" svg:x2="-54.038cm" svg:y2="49.532cm" draw:end-shape="id411" draw:end-glue-point="6" svg:d="M-56042 50432l2004-900" svg:viewBox="0 0 2005 901">
            <text:p/>
          </draw:connector>
          <draw:connector draw:style-name="gr502" draw:text-style-name="P15" draw:layer="layout" draw:type="line" svg:x1="-56.042cm" svg:y1="50.432cm" svg:x2="-54.039cm" svg:y2="48.232cm" draw:end-shape="id410" draw:end-glue-point="6" svg:d="M-56042 50432l2003-2200" svg:viewBox="0 0 2004 2201">
            <text:p/>
          </draw:connector>
          <draw:connector draw:style-name="gr502" draw:text-style-name="P15" draw:layer="layout" draw:type="line" svg:x1="-56.041cm" svg:y1="50.432cm" svg:x2="-54.04cm" svg:y2="46.932cm" draw:end-shape="id409" draw:end-glue-point="6" svg:d="M-56041 50432l2001-3500" svg:viewBox="0 0 2002 3501">
            <text:p/>
          </draw:connector>
          <draw:frame draw:style-name="gr503" draw:text-style-name="P38" draw:layer="layout" svg:width="2.903cm" svg:height="0.725cm" svg:x="-58.103cm" svg:y="56.045cm">
            <draw:text-box>
              <text:p>Autoencoder</text:p>
            </draw:text-box>
          </draw:frame>
          <draw:line draw:style-name="gr504" draw:text-style-name="P15" draw:layer="layout" svg:x1="-56.789cm" svg:y1="55.649cm" svg:x2="-59.907cm" svg:y2="55.64cm">
            <text:p/>
          </draw:line>
          <draw:line draw:style-name="gr505" draw:text-style-name="P15" draw:layer="layout" svg:x1="-56.389cm" svg:y1="55.65cm" svg:x2="-53.349cm" svg:y2="55.596cm">
            <text:p/>
          </draw:line>
          <draw:frame draw:style-name="gr506" draw:text-style-name="P38" draw:layer="layout" svg:width="2.22cm" svg:height="0.725cm" svg:x="-56.043cm" svg:y="55.031cm">
            <draw:text-box>
              <text:p>decoding</text:p>
            </draw:text-box>
          </draw:frame>
          <draw:frame draw:style-name="gr506" draw:text-style-name="P38" draw:layer="layout" svg:width="2.22cm" svg:height="0.725cm" svg:x="-59.124cm" svg:y="55.014cm">
            <draw:text-box>
              <text:p>encoding</text:p>
            </draw:text-box>
          </draw:frame>
          <draw:g draw:style-name="gr23">
            <draw:polygon draw:style-name="gr507" draw:text-style-name="P146" draw:layer="layout" svg:width="1.215cm" svg:height="1.383cm" svg:x="-58.949cm" svg:y="57.122cm" svg:viewBox="0 0 1216 1384" draw:points="1216,1384 0,792 0,591 1216,0">
              <text:p/>
            </draw:polygon>
            <draw:frame draw:style-name="gr508" draw:text-style-name="P147" draw:layer="layout" svg:width="1.527cm" svg:height="0.569cm" svg:x="-59.05cm" svg:y="57.52cm">
              <draw:text-box>
                <text:p><text:span text:style-name="T49">decoder</text:span></text:p>
              </draw:text-box>
            </draw:frame>
          </draw:g>
          <draw:g draw:style-name="gr31">
            <draw:g draw:style-name="gr23">
              <draw:polygon draw:style-name="gr509" draw:text-style-name="P113" draw:layer="layout" svg:width="1.179cm" svg:height="1.358cm" svg:x="-55.796cm" svg:y="57.231cm" svg:viewBox="0 0 1180 1359" draw:points="0,0 1180,581 1180,777 0,1359">
                <text:p/>
              </draw:polygon>
            </draw:g>
            <draw:frame draw:style-name="gr484" draw:text-style-name="P11" draw:layer="layout" svg:width="1.527cm" svg:height="0.57cm" svg:x="-56.027cm" svg:y="57.594cm">
              <draw:text-box>
                <text:p><text:span text:style-name="T49">encoder</text:span></text:p>
              </draw:text-box>
            </draw:frame>
          </draw:g>
          <draw:custom-shape draw:style-name="gr510" draw:text-style-name="P149" xml:id="id413" draw:id="id413" draw:layer="layout" svg:width="1.34cm" svg:height="1.458cm" svg:x="-72.248cm" svg:y="53.908cm">
            <text:p text:style-name="P148"><text:span text:style-name="T3">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9" xml:id="id415" draw:id="id415" draw:layer="layout" svg:width="1.34cm" svg:height="1.458cm" svg:x="-72.248cm" svg:y="55.863cm">
            <text:p text:style-name="P148"><text:span text:style-name="T3">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9" xml:id="id417" draw:id="id417" draw:layer="layout" svg:width="1.34cm" svg:height="1.459cm" svg:x="-72.248cm" svg:y="57.817cm">
            <text:p text:style-name="P148"><text:span text:style-name="T3">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9" xml:id="id419" draw:id="id419" draw:layer="layout" svg:width="1.34cm" svg:height="1.458cm" svg:x="-72.248cm" svg:y="59.772cm">
            <text:p text:style-name="P148"><text:span text:style-name="T3">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1" xml:id="id414" draw:id="id414" draw:layer="layout" svg:width="1.34cm" svg:height="1.458cm" svg:x="-67.882cm" svg:y="54.209cm">
            <text:p text:style-name="P150"><text:span text:style-name="T50">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1" xml:id="id416" draw:id="id416" draw:layer="layout" svg:width="1.34cm" svg:height="1.458cm" svg:x="-67.882cm" svg:y="55.863cm">
            <text:p text:style-name="P150"><text:span text:style-name="T50">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1" xml:id="id418" draw:id="id418" draw:layer="layout" svg:width="1.34cm" svg:height="1.458cm" svg:x="-67.882cm" svg:y="57.517cm">
            <text:p text:style-name="P150"><text:span text:style-name="T50">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draw:layer="layout" draw:type="line" svg:x1="-70.908cm" svg:y1="54.637cm" svg:x2="-67.882cm" svg:y2="54.938cm" draw:start-shape="id413" draw:start-glue-point="10" draw:end-shape="id414" draw:end-glue-point="6" svg:d="M-70908 54637l3026 301" svg:viewBox="0 0 3027 302">
            <text:p/>
          </draw:connector>
          <draw:connector draw:style-name="gr502" draw:text-style-name="P15" draw:layer="layout" draw:type="line" svg:x1="-70.908cm" svg:y1="56.592cm" svg:x2="-67.882cm" svg:y2="56.592cm" draw:start-shape="id415" draw:start-glue-point="10" draw:end-shape="id416" draw:end-glue-point="6" svg:d="M-70908 56592h3026" svg:viewBox="0 0 3027 1">
            <text:p/>
          </draw:connector>
          <draw:connector draw:style-name="gr502" draw:text-style-name="P15" draw:layer="layout" draw:type="line" svg:x1="-70.908cm" svg:y1="58.547cm" svg:x2="-67.882cm" svg:y2="58.246cm" draw:start-shape="id417" draw:start-glue-point="10" draw:end-shape="id418" draw:end-glue-point="6" svg:d="M-70908 58547l3026-301" svg:viewBox="0 0 3027 302">
            <text:p/>
          </draw:connector>
          <draw:connector draw:style-name="gr502" draw:text-style-name="P15" draw:layer="layout" draw:type="line" svg:x1="-70.908cm" svg:y1="60.501cm" svg:x2="-67.882cm" svg:y2="58.246cm" draw:start-shape="id419" draw:start-glue-point="10" draw:end-shape="id418" draw:end-glue-point="6" svg:d="M-70908 60501l3026-2255" svg:viewBox="0 0 3027 2256">
            <text:p/>
          </draw:connector>
          <draw:connector draw:style-name="gr502" draw:text-style-name="P15" draw:layer="layout" draw:type="line" svg:x1="-70.908cm" svg:y1="60.501cm" svg:x2="-67.882cm" svg:y2="56.592cm" draw:start-shape="id419" draw:start-glue-point="10" draw:end-shape="id416" draw:end-glue-point="6" svg:d="M-70908 60501l3026-3909" svg:viewBox="0 0 3027 3910">
            <text:p/>
          </draw:connector>
          <draw:connector draw:style-name="gr502" draw:text-style-name="P15" draw:layer="layout" draw:type="line" svg:x1="-70.908cm" svg:y1="60.501cm" svg:x2="-67.882cm" svg:y2="54.938cm" draw:start-shape="id419" draw:start-glue-point="10" draw:end-shape="id414" draw:end-glue-point="6" svg:d="M-70908 60501l3026-5563" svg:viewBox="0 0 3027 5564">
            <text:p/>
          </draw:connector>
          <draw:connector draw:style-name="gr502" draw:text-style-name="P15" draw:layer="layout" draw:type="line" svg:x1="-70.908cm" svg:y1="58.547cm" svg:x2="-67.882cm" svg:y2="56.592cm" draw:start-shape="id417" draw:start-glue-point="10" draw:end-shape="id416" draw:end-glue-point="6" svg:d="M-70908 58547l3026-1955" svg:viewBox="0 0 3027 1956">
            <text:p/>
          </draw:connector>
          <draw:connector draw:style-name="gr502" draw:text-style-name="P15" draw:layer="layout" draw:type="line" svg:x1="-70.908cm" svg:y1="58.547cm" svg:x2="-67.882cm" svg:y2="54.938cm" draw:start-shape="id417" draw:start-glue-point="10" draw:end-shape="id414" draw:end-glue-point="6" svg:d="M-70908 58547l3026-3609" svg:viewBox="0 0 3027 3610">
            <text:p/>
          </draw:connector>
          <draw:connector draw:style-name="gr502" draw:text-style-name="P15" draw:layer="layout" draw:type="line" svg:x1="-70.908cm" svg:y1="56.592cm" svg:x2="-67.882cm" svg:y2="54.938cm" draw:start-shape="id415" draw:start-glue-point="10" draw:end-shape="id414" draw:end-glue-point="6" svg:d="M-70908 56592l3026-1654" svg:viewBox="0 0 3027 1655">
            <text:p/>
          </draw:connector>
          <draw:connector draw:style-name="gr502" draw:text-style-name="P15" draw:layer="layout" draw:type="line" svg:x1="-70.908cm" svg:y1="56.592cm" svg:x2="-67.882cm" svg:y2="58.246cm" draw:start-shape="id415" draw:start-glue-point="10" draw:end-shape="id418" draw:end-glue-point="6" svg:d="M-70908 56592l3026 1654" svg:viewBox="0 0 3027 1655">
            <text:p/>
          </draw:connector>
          <draw:connector draw:style-name="gr502" draw:text-style-name="P15" draw:layer="layout" draw:type="line" svg:x1="-70.908cm" svg:y1="54.637cm" svg:x2="-67.882cm" svg:y2="56.592cm" draw:start-shape="id413" draw:start-glue-point="10" draw:end-shape="id416" draw:end-glue-point="6" svg:d="M-70908 54637l3026 1955" svg:viewBox="0 0 3027 1956">
            <text:p/>
          </draw:connector>
          <draw:connector draw:style-name="gr502" draw:text-style-name="P15" draw:layer="layout" draw:type="line" svg:x1="-70.908cm" svg:y1="54.637cm" svg:x2="-67.882cm" svg:y2="58.246cm" draw:start-shape="id413" draw:start-glue-point="10" draw:end-shape="id418" draw:end-glue-point="6" svg:d="M-70908 54637l3026 3609" svg:viewBox="0 0 3027 3610">
            <text:p/>
          </draw:connector>
          <draw:custom-shape draw:style-name="gr513" draw:text-style-name="P153" xml:id="id420" draw:id="id420" draw:layer="layout" svg:width="1.34cm" svg:height="1.458cm" svg:x="-63.523cm" svg:y="53.908cm">
            <text:p text:style-name="P152"><text:span text:style-name="T51">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4" draw:text-style-name="P153" xml:id="id421" draw:id="id421" draw:layer="layout" svg:width="1.34cm" svg:height="1.458cm" svg:x="-63.523cm" svg:y="55.863cm">
            <text:p text:style-name="P152"><text:span text:style-name="T51">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5" draw:text-style-name="P153" xml:id="id422" draw:id="id422" draw:layer="layout" svg:width="1.34cm" svg:height="1.459cm" svg:x="-63.523cm" svg:y="57.817cm">
            <text:p text:style-name="P152"><text:span text:style-name="T51">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6" draw:text-style-name="P153" xml:id="id423" draw:id="id423" draw:layer="layout" svg:width="1.34cm" svg:height="1.458cm" svg:x="-63.523cm" svg:y="59.772cm">
            <text:p text:style-name="P152"><text:span text:style-name="T51">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draw:layer="layout" draw:type="line" svg:x1="-66.542cm" svg:y1="54.938cm" svg:x2="-63.523cm" svg:y2="54.637cm" draw:start-shape="id414" draw:start-glue-point="10" draw:end-shape="id420" draw:end-glue-point="6" svg:d="M-66542 54938l3019-301" svg:viewBox="0 0 3020 302">
            <text:p/>
          </draw:connector>
          <draw:connector draw:style-name="gr502" draw:text-style-name="P15" draw:layer="layout" draw:type="line" svg:x1="-66.542cm" svg:y1="54.938cm" svg:x2="-63.523cm" svg:y2="56.592cm" draw:start-shape="id414" draw:start-glue-point="10" draw:end-shape="id421" draw:end-glue-point="6" svg:d="M-66542 54938l3019 1654" svg:viewBox="0 0 3020 1655">
            <text:p/>
          </draw:connector>
          <draw:connector draw:style-name="gr502" draw:text-style-name="P15" draw:layer="layout" draw:type="line" svg:x1="-66.542cm" svg:y1="54.938cm" svg:x2="-63.523cm" svg:y2="58.547cm" draw:start-shape="id414" draw:start-glue-point="10" draw:end-shape="id422" draw:end-glue-point="6" svg:d="M-66542 54938l3019 3609" svg:viewBox="0 0 3020 3610">
            <text:p/>
          </draw:connector>
          <draw:connector draw:style-name="gr502" draw:text-style-name="P15" draw:layer="layout" draw:type="line" svg:x1="-66.542cm" svg:y1="54.938cm" svg:x2="-63.523cm" svg:y2="60.501cm" draw:start-shape="id414" draw:start-glue-point="10" draw:end-shape="id423" draw:end-glue-point="6" svg:d="M-66542 54938l3019 5563" svg:viewBox="0 0 3020 5564">
            <text:p/>
          </draw:connector>
          <draw:connector draw:style-name="gr502" draw:text-style-name="P15" xml:id="id424" draw:id="id424" draw:layer="layout" draw:type="line" svg:x1="-66.542cm" svg:y1="56.592cm" svg:x2="-63.526cm" svg:y2="54.637cm" draw:start-shape="id416" draw:start-glue-point="10" svg:d="M-66542 56592l3016-1955" svg:viewBox="0 0 3017 1956">
            <text:p/>
          </draw:connector>
          <draw:connector draw:style-name="gr502" draw:text-style-name="P15" draw:layer="layout" draw:type="line" svg:x1="-66.542cm" svg:y1="56.592cm" svg:x2="-63.523cm" svg:y2="56.592cm" draw:start-shape="id416" draw:start-glue-point="10" draw:end-shape="id421" draw:end-glue-point="6" svg:d="M-66542 56592h3019" svg:viewBox="0 0 3020 1">
            <text:p/>
          </draw:connector>
          <draw:connector draw:style-name="gr502" draw:text-style-name="P15" draw:layer="layout" draw:type="line" svg:x1="-66.542cm" svg:y1="56.592cm" svg:x2="-63.523cm" svg:y2="58.547cm" draw:start-shape="id416" draw:start-glue-point="10" draw:end-shape="id422" draw:end-glue-point="6" svg:d="M-66542 56592l3019 1955" svg:viewBox="0 0 3020 1956">
            <text:p/>
          </draw:connector>
          <draw:connector draw:style-name="gr502" draw:text-style-name="P15" draw:layer="layout" draw:type="line" svg:x1="-66.542cm" svg:y1="56.592cm" svg:x2="-63.523cm" svg:y2="60.501cm" draw:start-shape="id416" draw:start-glue-point="10" draw:end-shape="id423" draw:end-glue-point="6" svg:d="M-66542 56592l3019 3909" svg:viewBox="0 0 3020 3910">
            <text:p/>
          </draw:connector>
          <draw:connector draw:style-name="gr502" draw:text-style-name="P15" xml:id="id426" draw:id="id426" draw:layer="layout" draw:type="line" svg:x1="-66.542cm" svg:y1="58.246cm" svg:x2="-63.521cm" svg:y2="60.501cm" draw:start-shape="id418" draw:start-glue-point="10" svg:d="M-66542 58246l3021 2255" svg:viewBox="0 0 3022 2256">
            <text:p/>
          </draw:connector>
          <draw:connector draw:style-name="gr502" draw:text-style-name="P15" draw:layer="layout" draw:type="line" svg:x1="-66.542cm" svg:y1="58.246cm" svg:x2="-63.523cm" svg:y2="58.547cm" draw:start-shape="id418" draw:start-glue-point="10" draw:end-shape="id422" draw:end-glue-point="6" svg:d="M-66542 58246l3019 301" svg:viewBox="0 0 3020 302">
            <text:p/>
          </draw:connector>
          <draw:connector draw:style-name="gr502" draw:text-style-name="P15" draw:layer="layout" draw:type="line" svg:x1="-66.542cm" svg:y1="58.246cm" svg:x2="-63.523cm" svg:y2="56.592cm" draw:start-shape="id418" draw:start-glue-point="10" draw:end-shape="id421" draw:end-glue-point="6" svg:d="M-66542 58246l3019-1654" svg:viewBox="0 0 3020 1655">
            <text:p/>
          </draw:connector>
          <draw:connector draw:style-name="gr502" draw:text-style-name="P15" draw:layer="layout" draw:type="line" svg:x1="-66.542cm" svg:y1="58.246cm" svg:x2="-63.526cm" svg:y2="54.637cm" draw:start-shape="id418" draw:start-glue-point="10" draw:end-shape="id424" draw:end-glue-point="3" svg:d="M-66542 58246l3016-3609" svg:viewBox="0 0 3017 3610">
            <text:p/>
          </draw:connector>
          <draw:frame draw:style-name="gr517" draw:text-style-name="P38" draw:layer="layout" svg:width="4.668cm" svg:height="3.095cm" svg:x="-65.318cm" svg:y="48.985cm">
            <draw:text-box>
              <text:p>Continue<text:line-break/>back decoding<text:line-break/>until the parameters<text:line-break/>each parameter<text:line-break/>one node for AE <text:line-break/>for the action potential</text:p>
            </draw:text-box>
          </draw:frame>
          <draw:custom-shape draw:style-name="gr512" draw:text-style-name="P151" xml:id="id425" draw:id="id425" draw:layer="layout" svg:width="1.34cm" svg:height="1.458cm" svg:x="-67.882cm" svg:y="59.321cm">
            <text:p text:style-name="P150"><text:span text:style-name="T50">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xml:id="id428" draw:id="id428" draw:layer="layout" draw:type="line" svg:x1="-66.542cm" svg:y1="60.05cm" svg:x2="-63.526cm" svg:y2="54.637cm" draw:start-shape="id425" draw:start-glue-point="10" svg:d="M-66542 60050l3016-5413" svg:viewBox="0 0 3017 5414">
            <text:p/>
          </draw:connector>
          <draw:connector draw:style-name="gr502" draw:text-style-name="P15" draw:layer="layout" draw:type="line" svg:x1="-66.542cm" svg:y1="60.05cm" svg:x2="-63.521cm" svg:y2="60.501cm" draw:start-shape="id425" draw:start-glue-point="10" draw:end-shape="id426" draw:end-glue-point="3" svg:d="M-66542 60050l3021 451" svg:viewBox="0 0 3022 452">
            <text:p/>
          </draw:connector>
          <draw:connector draw:style-name="gr502" draw:text-style-name="P15" draw:layer="layout" draw:type="line" svg:x1="-66.542cm" svg:y1="60.05cm" svg:x2="-63.523cm" svg:y2="58.547cm" draw:start-shape="id425" draw:start-glue-point="10" draw:end-shape="id422" draw:end-glue-point="6" svg:d="M-66542 60050l3019-1503" svg:viewBox="0 0 3020 1504">
            <text:p/>
          </draw:connector>
          <draw:connector draw:style-name="gr502" draw:text-style-name="P15" draw:layer="layout" draw:type="line" svg:x1="-66.542cm" svg:y1="60.05cm" svg:x2="-63.523cm" svg:y2="56.592cm" draw:start-shape="id425" draw:start-glue-point="10" draw:end-shape="id421" draw:end-glue-point="6" svg:d="M-66542 60050l3019-3458" svg:viewBox="0 0 3020 3459">
            <text:p/>
          </draw:connector>
          <draw:connector draw:style-name="gr502" draw:text-style-name="P15" draw:layer="layout" draw:type="line" svg:x1="-70.904cm" svg:y1="60.501cm" svg:x2="-67.882cm" svg:y2="60.05cm" draw:end-shape="id425" draw:end-glue-point="6" svg:d="M-70904 60501l3022-451" svg:viewBox="0 0 3023 452">
            <text:p/>
          </draw:connector>
          <draw:connector draw:style-name="gr502" draw:text-style-name="P15" draw:layer="layout" draw:type="line" svg:x1="-70.908cm" svg:y1="58.547cm" svg:x2="-67.882cm" svg:y2="60.05cm" draw:start-shape="id417" draw:start-glue-point="10" draw:end-shape="id425" draw:end-glue-point="6" svg:d="M-70908 58547l3026 1503" svg:viewBox="0 0 3027 1504">
            <text:p/>
          </draw:connector>
          <draw:connector draw:style-name="gr502" draw:text-style-name="P15" draw:layer="layout" draw:type="line" svg:x1="-70.908cm" svg:y1="56.592cm" svg:x2="-67.882cm" svg:y2="60.05cm" draw:start-shape="id415" draw:start-glue-point="10" draw:end-shape="id425" draw:end-glue-point="6" svg:d="M-70908 56592l3026 3458" svg:viewBox="0 0 3027 3459">
            <text:p/>
          </draw:connector>
          <draw:connector draw:style-name="gr502" draw:text-style-name="P15" draw:layer="layout" draw:type="line" svg:x1="-70.908cm" svg:y1="54.637cm" svg:x2="-67.882cm" svg:y2="60.05cm" draw:start-shape="id413" draw:start-glue-point="10" draw:end-shape="id425" draw:end-glue-point="6" svg:d="M-70908 54637l3026 5413" svg:viewBox="0 0 3027 5414">
            <text:p/>
          </draw:connector>
          <draw:custom-shape draw:style-name="gr518" draw:text-style-name="P151" xml:id="id427" draw:id="id427" draw:layer="layout" svg:width="1.34cm" svg:height="1.459cm" svg:x="-67.882cm" svg:y="61.125cm">
            <text:p text:style-name="P150"><text:span text:style-name="T5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draw:layer="layout" draw:type="line" svg:x1="-66.542cm" svg:y1="61.855cm" svg:x2="-63.521cm" svg:y2="60.501cm" draw:start-shape="id427" draw:start-glue-point="10" svg:d="M-66542 61855l3021-1354" svg:viewBox="0 0 3022 1355">
            <text:p/>
          </draw:connector>
          <draw:connector draw:style-name="gr502" draw:text-style-name="P15" draw:layer="layout" draw:type="line" svg:x1="-66.542cm" svg:y1="61.855cm" svg:x2="-63.523cm" svg:y2="58.547cm" draw:start-shape="id427" draw:start-glue-point="10" draw:end-shape="id422" draw:end-glue-point="6" svg:d="M-66542 61855l3019-3308" svg:viewBox="0 0 3020 3309">
            <text:p/>
          </draw:connector>
          <draw:connector draw:style-name="gr502" draw:text-style-name="P15" draw:layer="layout" draw:type="line" svg:x1="-66.542cm" svg:y1="61.855cm" svg:x2="-63.523cm" svg:y2="56.592cm" draw:start-shape="id427" draw:start-glue-point="10" draw:end-shape="id421" draw:end-glue-point="6" svg:d="M-66542 61855l3019-5263" svg:viewBox="0 0 3020 5264">
            <text:p/>
          </draw:connector>
          <draw:connector draw:style-name="gr502" draw:text-style-name="P15" draw:layer="layout" draw:type="line" svg:x1="-66.542cm" svg:y1="61.855cm" svg:x2="-63.526cm" svg:y2="54.637cm" draw:start-shape="id427" draw:start-glue-point="10" draw:end-shape="id428" draw:end-glue-point="3" svg:d="M-66542 61855l3016-7218" svg:viewBox="0 0 3017 7219">
            <text:p/>
          </draw:connector>
          <draw:connector draw:style-name="gr502" draw:text-style-name="P15" draw:layer="layout" draw:type="line" svg:x1="-70.902cm" svg:y1="60.501cm" svg:x2="-67.882cm" svg:y2="61.855cm" draw:end-shape="id427" draw:end-glue-point="6" svg:d="M-70902 60501l3020 1354" svg:viewBox="0 0 3021 1355">
            <text:p/>
          </draw:connector>
          <draw:connector draw:style-name="gr502" draw:text-style-name="P15" draw:layer="layout" draw:type="line" svg:x1="-70.908cm" svg:y1="58.547cm" svg:x2="-67.882cm" svg:y2="61.855cm" draw:start-shape="id417" draw:start-glue-point="10" draw:end-shape="id427" draw:end-glue-point="6" svg:d="M-70908 58547l3026 3308" svg:viewBox="0 0 3027 3309">
            <text:p/>
          </draw:connector>
          <draw:connector draw:style-name="gr502" draw:text-style-name="P15" draw:layer="layout" draw:type="line" svg:x1="-70.908cm" svg:y1="56.592cm" svg:x2="-67.882cm" svg:y2="61.855cm" draw:start-shape="id415" draw:start-glue-point="10" draw:end-shape="id427" draw:end-glue-point="6" svg:d="M-70908 56592l3026 5263" svg:viewBox="0 0 3027 5264">
            <text:p/>
          </draw:connector>
          <draw:connector draw:style-name="gr502" draw:text-style-name="P15" draw:layer="layout" draw:type="line" svg:x1="-70.908cm" svg:y1="54.637cm" svg:x2="-67.882cm" svg:y2="61.855cm" draw:start-shape="id413" draw:start-glue-point="10" draw:end-shape="id427" draw:end-glue-point="6" svg:d="M-70908 54637l3026 7218" svg:viewBox="0 0 3027 7219">
            <text:p/>
          </draw:connector>
          <draw:custom-shape draw:style-name="gr500" draw:text-style-name="P143" xml:id="id429" draw:id="id429" draw:layer="layout" svg:width="0.891cm" svg:height="0.97cm" svg:x="-59.836cm" svg:y="51.547cm">
            <text:p text:style-name="P142"><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43" xml:id="id430" draw:id="id430" draw:layer="layout" svg:width="0.891cm" svg:height="0.97cm" svg:x="-54.035cm" svg:y="51.547cm">
            <text:p text:style-name="P142"><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draw:layer="layout" draw:type="line" svg:x1="-58.945cm" svg:y1="52.032cm" svg:x2="-56.934cm" svg:y2="50.432cm" draw:start-shape="id429" draw:start-glue-point="10" svg:d="M-58945 52032l2011-1600" svg:viewBox="0 0 2012 1601">
            <text:p/>
          </draw:connector>
          <draw:connector draw:style-name="gr502" draw:text-style-name="P15" draw:layer="layout" draw:type="line" svg:x1="-58.945cm" svg:y1="52.032cm" svg:x2="-56.935cm" svg:y2="49.332cm" draw:start-shape="id429" draw:start-glue-point="10" draw:end-shape="id405" draw:end-glue-point="6" svg:d="M-58945 52032l2010-2700" svg:viewBox="0 0 2011 2701">
            <text:p/>
          </draw:connector>
          <draw:connector draw:style-name="gr502" draw:text-style-name="P15" draw:layer="layout" draw:type="line" svg:x1="-58.945cm" svg:y1="52.032cm" svg:x2="-56.936cm" svg:y2="48.232cm" draw:start-shape="id429" draw:start-glue-point="10" draw:end-shape="id403" draw:end-glue-point="6" svg:d="M-58945 52032l2009-3800" svg:viewBox="0 0 2010 3801">
            <text:p/>
          </draw:connector>
          <draw:connector draw:style-name="gr502" draw:text-style-name="P15" draw:layer="layout" draw:type="line" svg:x1="-56.042cm" svg:y1="50.432cm" svg:x2="-54.035cm" svg:y2="52.032cm" draw:end-shape="id430" draw:end-glue-point="6" svg:d="M-56042 50432l2007 1600" svg:viewBox="0 0 2008 1601">
            <text:p/>
          </draw:connector>
          <draw:connector draw:style-name="gr502" draw:text-style-name="P15" draw:layer="layout" draw:type="line" svg:x1="-56.042cm" svg:y1="49.332cm" svg:x2="-54.035cm" svg:y2="52.032cm" draw:start-shape="id431" draw:start-glue-point="2" draw:end-shape="id430" draw:end-glue-point="6" svg:d="M-56042 49332l2007 2700" svg:viewBox="0 0 2008 2701">
            <text:p/>
          </draw:connector>
          <draw:connector draw:style-name="gr502" draw:text-style-name="P15" draw:layer="layout" draw:type="line" svg:x1="-56.042cm" svg:y1="48.232cm" svg:x2="-54.035cm" svg:y2="52.032cm" draw:start-shape="id432" draw:start-glue-point="2" draw:end-shape="id430" draw:end-glue-point="6" svg:d="M-56042 48232l2007 3800" svg:viewBox="0 0 2008 3801">
            <text:p/>
          </draw:connector>
          <draw:custom-shape draw:style-name="gr510" draw:text-style-name="P149" xml:id="id434" draw:id="id434" draw:layer="layout" svg:width="1.34cm" svg:height="1.458cm" svg:x="-63.502cm" svg:y="61.632cm">
            <text:p text:style-name="P148"><text:span text:style-name="T3">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9" xml:id="id433" draw:id="id433" draw:layer="layout" svg:width="1.34cm" svg:height="1.458cm" svg:x="-72.221cm" svg:y="61.632cm">
            <text:p text:style-name="P148"><text:span text:style-name="T3">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draw:layer="layout" draw:type="line" svg:x1="-70.881cm" svg:y1="62.361cm" svg:x2="-67.882cm" svg:y2="61.855cm" draw:start-shape="id433" draw:start-glue-point="10" draw:end-shape="id427" draw:end-glue-point="6" svg:d="M-70881 62361l2999-506" svg:viewBox="0 0 3000 507">
            <text:p/>
          </draw:connector>
          <draw:connector draw:style-name="gr502" draw:text-style-name="P15" draw:layer="layout" draw:type="line" svg:x1="-70.881cm" svg:y1="62.363cm" svg:x2="-67.882cm" svg:y2="60.05cm" draw:end-shape="id425" draw:end-glue-point="6" svg:d="M-70881 62363l2999-2313" svg:viewBox="0 0 3000 2314">
            <text:p/>
          </draw:connector>
          <draw:connector draw:style-name="gr502" draw:text-style-name="P15" draw:layer="layout" draw:type="line" svg:x1="-70.88cm" svg:y1="62.363cm" svg:x2="-67.882cm" svg:y2="58.246cm" draw:end-shape="id418" draw:end-glue-point="6" svg:d="M-70880 62363l2998-4117" svg:viewBox="0 0 2999 4118">
            <text:p/>
          </draw:connector>
          <draw:connector draw:style-name="gr502" draw:text-style-name="P15" draw:layer="layout" draw:type="line" svg:x1="-70.88cm" svg:y1="62.363cm" svg:x2="-67.882cm" svg:y2="56.592cm" draw:end-shape="id416" draw:end-glue-point="6" svg:d="M-70880 62363l2998-5771" svg:viewBox="0 0 2999 5772">
            <text:p/>
          </draw:connector>
          <draw:connector draw:style-name="gr502" draw:text-style-name="P15" draw:layer="layout" draw:type="line" svg:x1="-70.88cm" svg:y1="62.363cm" svg:x2="-67.882cm" svg:y2="54.938cm" draw:end-shape="id414" draw:end-glue-point="6" svg:d="M-70880 62363l2998-7425" svg:viewBox="0 0 2999 7426">
            <text:p/>
          </draw:connector>
          <draw:connector draw:style-name="gr502" draw:text-style-name="P15" draw:layer="layout" draw:type="line" svg:x1="-66.542cm" svg:y1="61.855cm" svg:x2="-63.502cm" svg:y2="62.361cm" draw:start-shape="id427" draw:start-glue-point="10" draw:end-shape="id434" draw:end-glue-point="6" svg:d="M-66542 61855l3040 506" svg:viewBox="0 0 3041 507">
            <text:p/>
          </draw:connector>
          <draw:connector draw:style-name="gr502" draw:text-style-name="P15" draw:layer="layout" draw:type="line" svg:x1="-66.542cm" svg:y1="60.05cm" svg:x2="-63.5cm" svg:y2="62.363cm" draw:start-shape="id425" draw:start-glue-point="10" svg:d="M-66542 60050l3042 2313" svg:viewBox="0 0 3043 2314">
            <text:p/>
          </draw:connector>
          <draw:connector draw:style-name="gr502" draw:text-style-name="P15" draw:layer="layout" draw:type="line" svg:x1="-66.542cm" svg:y1="58.246cm" svg:x2="-63.499cm" svg:y2="62.363cm" draw:start-shape="id418" draw:start-glue-point="10" svg:d="M-66542 58246l3043 4117" svg:viewBox="0 0 3044 4118">
            <text:p/>
          </draw:connector>
          <draw:connector draw:style-name="gr502" draw:text-style-name="P15" draw:layer="layout" draw:type="line" svg:x1="-66.542cm" svg:y1="56.592cm" svg:x2="-63.499cm" svg:y2="62.363cm" draw:start-shape="id416" draw:start-glue-point="10" svg:d="M-66542 56592l3043 5771" svg:viewBox="0 0 3044 5772">
            <text:p/>
          </draw:connector>
          <draw:connector draw:style-name="gr502" draw:text-style-name="P15" draw:layer="layout" draw:type="line" svg:x1="-66.542cm" svg:y1="54.938cm" svg:x2="-63.499cm" svg:y2="62.363cm" draw:start-shape="id414" draw:start-glue-point="10" svg:d="M-66542 54938l3043 7425" svg:viewBox="0 0 3044 7426">
            <text:p/>
          </draw:connector>
          <draw:custom-shape draw:style-name="gr519" draw:text-style-name="P41" draw:layer="layout" svg:width="0.643cm" svg:height="5.878cm" svg:x="-53.044cm" svg:y="46.5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20" draw:text-style-name="P38" draw:layer="layout" svg:width="1.89cm" svg:height="1.673cm" svg:x="-52.41cm" svg:y="48.679cm">
            <draw:text-box>
              <text:p>Fusion <text:line-break/>from <text:line-break/>traces</text:p>
            </draw:text-box>
          </draw:frame>
          <draw:custom-shape draw:style-name="gr521" draw:text-style-name="P41" draw:layer="layout" svg:width="1.563cm" svg:height="9.521cm" svg:x="-74.077cm" svg:y="53.544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2" draw:text-style-name="P38" draw:layer="layout" svg:width="4.836cm" svg:height="3.941cm" svg:x="-78.452cm" svg:y="56.586cm">
            <draw:text-box>
              <text:p>Conversion<text:line-break/>to action <text:line-break/>potentials<text:line-break/>(Just the<text:line-break/>four clusters)</text:p>
            </draw:text-box>
          </draw:frame>
          <draw:frame draw:style-name="gr135" draw:text-style-name="P41" draw:layer="layout" svg:width="4.004cm" svg:height="2.423cm" svg:x="-70.533cm" svg:y="44.08cm">
            <draw:image xlink:href="Pictures/10000000000002C5000001ADB823F0C7.png" xlink:type="simple" xlink:show="embed" xlink:actuate="onLoad" draw:mime-type="image/png">
              <text:p/>
            </draw:image>
          </draw:frame>
          <draw:frame draw:style-name="gr135" draw:text-style-name="P41" draw:layer="layout" svg:width="2.664cm" svg:height="1.582cm" svg:x="-69.357cm" svg:y="48.757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71.281cm" svg:y="49.419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71.165cm" svg:y="47.835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3" draw:text-style-name="P5" draw:layer="layout" svg:width="4.615cm" svg:height="0.907cm" svg:x="-70.141cm" svg:y="46.785cm">
            <draw:object xlink:href="./Object 7" xlink:type="simple" xlink:show="embed" xlink:actuate="onLoad">
              <loext:p/>
            </draw:object>
            <draw:image xlink:href="./ObjectReplacements/Object 7" xlink:type="simple" xlink:show="embed" xlink:actuate="onLoad"/>
          </draw:frame>
          <draw:connector draw:style-name="gr502" draw:text-style-name="P15" draw:layer="layout" draw:type="line" svg:x1="-66.54cm" svg:y1="60.05cm" svg:x2="-63.52cm" svg:y2="60.501cm" svg:d="M-66540 60050l3020 451" svg:viewBox="0 0 3021 452">
            <text:p/>
          </draw:connector>
          <draw:custom-shape draw:style-name="gr500" draw:text-style-name="P143" xml:id="id435" draw:id="id435" draw:layer="layout" svg:width="0.891cm" svg:height="0.97cm" svg:x="-58.855cm" svg:y="60.441cm">
            <text:p text:style-name="P142"><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43" xml:id="id437" draw:id="id437" draw:layer="layout" svg:width="0.891cm" svg:height="0.97cm" svg:x="-58.855cm" svg:y="61.741cm">
            <text:p text:style-name="P142"><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43" xml:id="id439" draw:id="id439" draw:layer="layout" svg:width="0.891cm" svg:height="0.97cm" svg:x="-58.855cm" svg:y="63.041cm">
            <text:p text:style-name="P142"><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54" xml:id="id436" draw:id="id436" draw:layer="layout" svg:width="0.891cm" svg:height="0.97cm" svg:x="-55.951cm" svg:y="60.041cm">
            <text:p text:style-name="P138"><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54" xml:id="id438" draw:id="id438" draw:layer="layout" svg:width="0.891cm" svg:height="0.97cm" svg:x="-55.951cm" svg:y="61.141cm">
            <text:p text:style-name="P138"><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54" xml:id="id440" draw:id="id440" draw:layer="layout" svg:width="0.891cm" svg:height="0.97cm" svg:x="-55.951cm" svg:y="62.241cm">
            <text:p text:style-name="P138"><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draw:layer="layout" draw:type="line" svg:x1="-57.964cm" svg:y1="60.926cm" svg:x2="-55.951cm" svg:y2="60.526cm" draw:start-shape="id435" draw:start-glue-point="10" draw:end-shape="id436" draw:end-glue-point="6" svg:d="M-57964 60926l2013-400" svg:viewBox="0 0 2014 401">
            <text:p/>
          </draw:connector>
          <draw:connector draw:style-name="gr502" draw:text-style-name="P15" draw:layer="layout" draw:type="line" svg:x1="-57.964cm" svg:y1="62.226cm" svg:x2="-55.951cm" svg:y2="61.626cm" draw:start-shape="id437" draw:start-glue-point="10" draw:end-shape="id438" draw:end-glue-point="6" svg:d="M-57964 62226l2013-600" svg:viewBox="0 0 2014 601">
            <text:p/>
          </draw:connector>
          <draw:connector draw:style-name="gr502" draw:text-style-name="P15" draw:layer="layout" draw:type="line" svg:x1="-57.964cm" svg:y1="63.526cm" svg:x2="-55.951cm" svg:y2="62.726cm" draw:start-shape="id439" draw:start-glue-point="10" draw:end-shape="id440" draw:end-glue-point="6" svg:d="M-57964 63526l2013-800" svg:viewBox="0 0 2014 801">
            <text:p/>
          </draw:connector>
          <draw:connector draw:style-name="gr502" draw:text-style-name="P15" draw:layer="layout" draw:type="line" svg:x1="-57.964cm" svg:y1="63.526cm" svg:x2="-55.951cm" svg:y2="61.626cm" draw:start-shape="id439" draw:start-glue-point="10" draw:end-shape="id438" draw:end-glue-point="6" svg:d="M-57964 63526l2013-1900" svg:viewBox="0 0 2014 1901">
            <text:p/>
          </draw:connector>
          <draw:connector draw:style-name="gr502" draw:text-style-name="P15" draw:layer="layout" draw:type="line" svg:x1="-57.964cm" svg:y1="63.526cm" svg:x2="-55.951cm" svg:y2="60.526cm" draw:start-shape="id439" draw:start-glue-point="10" draw:end-shape="id436" draw:end-glue-point="6" svg:d="M-57964 63526l2013-3000" svg:viewBox="0 0 2014 3001">
            <text:p/>
          </draw:connector>
          <draw:connector draw:style-name="gr502" draw:text-style-name="P15" draw:layer="layout" draw:type="line" svg:x1="-57.964cm" svg:y1="62.226cm" svg:x2="-55.951cm" svg:y2="60.526cm" draw:start-shape="id437" draw:start-glue-point="10" draw:end-shape="id436" draw:end-glue-point="6" svg:d="M-57964 62226l2013-1700" svg:viewBox="0 0 2014 1701">
            <text:p/>
          </draw:connector>
          <draw:connector draw:style-name="gr502" draw:text-style-name="P15" draw:layer="layout" draw:type="line" svg:x1="-57.964cm" svg:y1="62.226cm" svg:x2="-55.951cm" svg:y2="62.726cm" draw:start-shape="id437" draw:start-glue-point="10" draw:end-shape="id440" draw:end-glue-point="6" svg:d="M-57964 62226l2013 500" svg:viewBox="0 0 2014 501">
            <text:p/>
          </draw:connector>
          <draw:connector draw:style-name="gr502" draw:text-style-name="P15" draw:layer="layout" draw:type="line" svg:x1="-57.964cm" svg:y1="60.926cm" svg:x2="-55.951cm" svg:y2="61.626cm" draw:start-shape="id435" draw:start-glue-point="10" draw:end-shape="id438" draw:end-glue-point="6" svg:d="M-57964 60926l2013 700" svg:viewBox="0 0 2014 701">
            <text:p/>
          </draw:connector>
          <draw:connector draw:style-name="gr502" draw:text-style-name="P15" draw:layer="layout" draw:type="line" svg:x1="-57.964cm" svg:y1="60.926cm" svg:x2="-55.951cm" svg:y2="62.726cm" draw:start-shape="id435" draw:start-glue-point="10" draw:end-shape="id440" draw:end-glue-point="6" svg:d="M-57964 60926l2013 1800" svg:viewBox="0 0 2014 1801">
            <text:p/>
          </draw:connector>
          <draw:custom-shape draw:style-name="gr524" draw:text-style-name="P156" xml:id="id441" draw:id="id441" draw:layer="layout" svg:width="0.891cm" svg:height="0.97cm" svg:x="-53.052cm" svg:y="60.441cm">
            <text:p text:style-name="P155"><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6" xml:id="id442" draw:id="id442" draw:layer="layout" svg:width="0.891cm" svg:height="0.97cm" svg:x="-53.052cm" svg:y="61.741cm">
            <text:p text:style-name="P155"><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56" xml:id="id443" draw:id="id443" draw:layer="layout" svg:width="0.891cm" svg:height="0.97cm" svg:x="-53.052cm" svg:y="63.041cm">
            <text:p text:style-name="P155"><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draw:layer="layout" draw:type="line" svg:x1="-55.06cm" svg:y1="60.526cm" svg:x2="-53.052cm" svg:y2="60.926cm" draw:start-shape="id436" draw:start-glue-point="10" draw:end-shape="id441" draw:end-glue-point="6" svg:d="M-55060 60526l2008 400" svg:viewBox="0 0 2009 401">
            <text:p/>
          </draw:connector>
          <draw:connector draw:style-name="gr502" draw:text-style-name="P15" draw:layer="layout" draw:type="line" svg:x1="-55.06cm" svg:y1="60.526cm" svg:x2="-53.052cm" svg:y2="62.226cm" draw:start-shape="id436" draw:start-glue-point="10" draw:end-shape="id442" draw:end-glue-point="6" svg:d="M-55060 60526l2008 1700" svg:viewBox="0 0 2009 1701">
            <text:p/>
          </draw:connector>
          <draw:connector draw:style-name="gr502" draw:text-style-name="P15" draw:layer="layout" draw:type="line" svg:x1="-55.06cm" svg:y1="60.526cm" svg:x2="-53.052cm" svg:y2="63.526cm" draw:start-shape="id436" draw:start-glue-point="10" draw:end-shape="id443" draw:end-glue-point="6" svg:d="M-55060 60526l2008 3000" svg:viewBox="0 0 2009 3001">
            <text:p/>
          </draw:connector>
          <draw:connector draw:style-name="gr502" draw:text-style-name="P15" draw:layer="layout" draw:type="line" svg:x1="-55.06cm" svg:y1="61.626cm" svg:x2="-53.052cm" svg:y2="60.926cm" draw:start-shape="id438" draw:start-glue-point="10" draw:end-shape="id441" draw:end-glue-point="6" svg:d="M-55060 61626l2008-700" svg:viewBox="0 0 2009 701">
            <text:p/>
          </draw:connector>
          <draw:connector draw:style-name="gr502" draw:text-style-name="P15" draw:layer="layout" draw:type="line" svg:x1="-55.06cm" svg:y1="61.626cm" svg:x2="-53.052cm" svg:y2="62.226cm" draw:start-shape="id438" draw:start-glue-point="10" draw:end-shape="id442" draw:end-glue-point="6" svg:d="M-55060 61626l2008 600" svg:viewBox="0 0 2009 601">
            <text:p/>
          </draw:connector>
          <draw:connector draw:style-name="gr502" draw:text-style-name="P15" draw:layer="layout" draw:type="line" svg:x1="-55.06cm" svg:y1="61.626cm" svg:x2="-53.052cm" svg:y2="63.526cm" draw:start-shape="id438" draw:start-glue-point="10" draw:end-shape="id443" draw:end-glue-point="6" svg:d="M-55060 61626l2008 1900" svg:viewBox="0 0 2009 1901">
            <text:p/>
          </draw:connector>
          <draw:connector draw:style-name="gr502" draw:text-style-name="P15" draw:layer="layout" draw:type="line" svg:x1="-55.06cm" svg:y1="62.726cm" svg:x2="-53.052cm" svg:y2="63.526cm" draw:start-shape="id440" draw:start-glue-point="10" draw:end-shape="id443" draw:end-glue-point="6" svg:d="M-55060 62726l2008 800" svg:viewBox="0 0 2009 801">
            <text:p/>
          </draw:connector>
          <draw:connector draw:style-name="gr502" draw:text-style-name="P15" draw:layer="layout" draw:type="line" svg:x1="-55.06cm" svg:y1="62.726cm" svg:x2="-53.052cm" svg:y2="62.226cm" draw:start-shape="id440" draw:start-glue-point="10" draw:end-shape="id442" draw:end-glue-point="6" svg:d="M-55060 62726l2008-500" svg:viewBox="0 0 2009 501">
            <text:p/>
          </draw:connector>
          <draw:connector draw:style-name="gr502" draw:text-style-name="P15" draw:layer="layout" draw:type="line" svg:x1="-55.06cm" svg:y1="62.726cm" svg:x2="-53.052cm" svg:y2="60.926cm" draw:start-shape="id440" draw:start-glue-point="10" draw:end-shape="id441" draw:end-glue-point="6" svg:d="M-55060 62726l2008-1800" svg:viewBox="0 0 2009 1801">
            <text:p/>
          </draw:connector>
          <draw:custom-shape draw:style-name="gr501" draw:text-style-name="P154" xml:id="id444" draw:id="id444" draw:layer="layout" svg:width="0.891cm" svg:height="0.97cm" svg:x="-55.951cm" svg:y="63.441cm">
            <text:p text:style-name="P138"><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xml:id="id446" draw:id="id446" draw:layer="layout" draw:type="line" svg:x1="-55.06cm" svg:y1="63.926cm" svg:x2="-53.052cm" svg:y2="60.926cm" draw:start-shape="id444" draw:start-glue-point="10" draw:end-shape="id441" draw:end-glue-point="6" svg:d="M-55060 63926l2008-3000" svg:viewBox="0 0 2009 3001">
            <text:p/>
          </draw:connector>
          <draw:connector draw:style-name="gr502" draw:text-style-name="P15" draw:layer="layout" draw:type="line" svg:x1="-55.06cm" svg:y1="63.926cm" svg:x2="-53.052cm" svg:y2="63.526cm" draw:start-shape="id444" draw:start-glue-point="10" draw:end-shape="id443" draw:end-glue-point="6" svg:d="M-55060 63926l2008-400" svg:viewBox="0 0 2009 401">
            <text:p/>
          </draw:connector>
          <draw:connector draw:style-name="gr502" draw:text-style-name="P15" draw:layer="layout" draw:type="line" svg:x1="-55.06cm" svg:y1="63.926cm" svg:x2="-53.052cm" svg:y2="62.226cm" draw:start-shape="id444" draw:start-glue-point="10" draw:end-shape="id442" draw:end-glue-point="6" svg:d="M-55060 63926l2008-1700" svg:viewBox="0 0 2009 1701">
            <text:p/>
          </draw:connector>
          <draw:connector draw:style-name="gr502" draw:text-style-name="P15" draw:layer="layout" draw:type="line" svg:x1="-57.964cm" svg:y1="63.526cm" svg:x2="-55.951cm" svg:y2="63.926cm" draw:start-shape="id439" draw:start-glue-point="10" draw:end-shape="id444" draw:end-glue-point="6" svg:d="M-57964 63526l2013 400" svg:viewBox="0 0 2014 401">
            <text:p/>
          </draw:connector>
          <draw:connector draw:style-name="gr502" draw:text-style-name="P15" draw:layer="layout" draw:type="line" svg:x1="-57.964cm" svg:y1="62.226cm" svg:x2="-55.951cm" svg:y2="63.926cm" draw:start-shape="id437" draw:start-glue-point="10" draw:end-shape="id444" draw:end-glue-point="6" svg:d="M-57964 62226l2013 1700" svg:viewBox="0 0 2014 1701">
            <text:p/>
          </draw:connector>
          <draw:connector draw:style-name="gr502" draw:text-style-name="P15" draw:layer="layout" draw:type="line" svg:x1="-57.964cm" svg:y1="60.926cm" svg:x2="-55.951cm" svg:y2="63.926cm" draw:start-shape="id435" draw:start-glue-point="10" draw:end-shape="id444" draw:end-glue-point="6" svg:d="M-57964 60926l2013 3000" svg:viewBox="0 0 2014 3001">
            <text:p/>
          </draw:connector>
          <draw:custom-shape draw:style-name="gr501" draw:text-style-name="P154" xml:id="id445" draw:id="id445" draw:layer="layout" svg:width="0.891cm" svg:height="0.97cm" svg:x="-55.951cm" svg:y="64.641cm">
            <text:p text:style-name="P138"><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draw:layer="layout" draw:type="line" svg:x1="-55.06cm" svg:y1="65.126cm" svg:x2="-53.052cm" svg:y2="63.526cm" draw:start-shape="id445" draw:start-glue-point="10" draw:end-shape="id443" draw:end-glue-point="6" svg:d="M-55060 65126l2008-1600" svg:viewBox="0 0 2009 1601">
            <text:p/>
          </draw:connector>
          <draw:connector draw:style-name="gr502" draw:text-style-name="P15" draw:layer="layout" draw:type="line" svg:x1="-55.06cm" svg:y1="65.126cm" svg:x2="-53.052cm" svg:y2="62.226cm" draw:start-shape="id445" draw:start-glue-point="10" draw:end-shape="id442" draw:end-glue-point="6" svg:d="M-55060 65126l2008-2900" svg:viewBox="0 0 2009 2901">
            <text:p/>
          </draw:connector>
          <draw:connector draw:style-name="gr502" draw:text-style-name="P15" draw:layer="layout" draw:type="line" svg:x1="-55.06cm" svg:y1="65.126cm" svg:x2="-54.056cm" svg:y2="62.426cm" draw:start-shape="id445" draw:start-glue-point="10" draw:end-shape="id446" draw:end-glue-point="3" svg:d="M-55060 65126l1004-2700" svg:viewBox="0 0 1005 2701">
            <text:p/>
          </draw:connector>
          <draw:connector draw:style-name="gr502" draw:text-style-name="P15" draw:layer="layout" draw:type="line" svg:x1="-57.964cm" svg:y1="63.526cm" svg:x2="-55.951cm" svg:y2="65.126cm" draw:start-shape="id439" draw:start-glue-point="10" draw:end-shape="id445" draw:end-glue-point="6" svg:d="M-57964 63526l2013 1600" svg:viewBox="0 0 2014 1601">
            <text:p/>
          </draw:connector>
          <draw:connector draw:style-name="gr502" draw:text-style-name="P15" draw:layer="layout" draw:type="line" svg:x1="-57.964cm" svg:y1="62.226cm" svg:x2="-55.951cm" svg:y2="65.126cm" draw:start-shape="id437" draw:start-glue-point="10" draw:end-shape="id445" draw:end-glue-point="6" svg:d="M-57964 62226l2013 2900" svg:viewBox="0 0 2014 2901">
            <text:p/>
          </draw:connector>
          <draw:connector draw:style-name="gr502" draw:text-style-name="P15" draw:layer="layout" draw:type="line" svg:x1="-57.964cm" svg:y1="60.926cm" svg:x2="-55.951cm" svg:y2="65.126cm" draw:start-shape="id435" draw:start-glue-point="10" draw:end-shape="id445" draw:end-glue-point="6" svg:d="M-57964 60926l2013 4200" svg:viewBox="0 0 2014 4201">
            <text:p/>
          </draw:connector>
          <draw:custom-shape draw:style-name="gr500" draw:text-style-name="P143" xml:id="id448" draw:id="id448" draw:layer="layout" svg:width="0.891cm" svg:height="0.97cm" svg:x="-53.052cm" svg:y="64.387cm">
            <text:p text:style-name="P142"><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43" xml:id="id447" draw:id="id447" draw:layer="layout" svg:width="0.891cm" svg:height="0.97cm" svg:x="-58.855cm" svg:y="64.426cm">
            <text:p text:style-name="P142"><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2" draw:text-style-name="P15" draw:layer="layout" draw:type="line" svg:x1="-57.964cm" svg:y1="64.911cm" svg:x2="-55.951cm" svg:y2="65.126cm" draw:start-shape="id447" draw:start-glue-point="10" draw:end-shape="id445" draw:end-glue-point="6" svg:d="M-57964 64911l2013 215" svg:viewBox="0 0 2014 216">
            <text:p/>
          </draw:connector>
          <draw:connector draw:style-name="gr502" draw:text-style-name="P15" draw:layer="layout" draw:type="line" svg:x1="-57.964cm" svg:y1="64.911cm" svg:x2="-55.951cm" svg:y2="63.926cm" draw:start-shape="id447" draw:start-glue-point="10" draw:end-shape="id444" draw:end-glue-point="6" svg:d="M-57964 64911l2013-985" svg:viewBox="0 0 2014 986">
            <text:p/>
          </draw:connector>
          <draw:connector draw:style-name="gr502" draw:text-style-name="P15" draw:layer="layout" draw:type="line" svg:x1="-57.964cm" svg:y1="64.911cm" svg:x2="-55.951cm" svg:y2="62.726cm" draw:start-shape="id447" draw:start-glue-point="10" draw:end-shape="id440" draw:end-glue-point="6" svg:d="M-57964 64911l2013-2185" svg:viewBox="0 0 2014 2186">
            <text:p/>
          </draw:connector>
          <draw:connector draw:style-name="gr502" draw:text-style-name="P15" draw:layer="layout" draw:type="line" svg:x1="-57.964cm" svg:y1="64.911cm" svg:x2="-55.951cm" svg:y2="61.626cm" draw:start-shape="id447" draw:start-glue-point="10" draw:end-shape="id438" draw:end-glue-point="6" svg:d="M-57964 64911l2013-3285" svg:viewBox="0 0 2014 3286">
            <text:p/>
          </draw:connector>
          <draw:connector draw:style-name="gr502" draw:text-style-name="P15" draw:layer="layout" draw:type="line" svg:x1="-57.964cm" svg:y1="64.911cm" svg:x2="-55.951cm" svg:y2="60.526cm" draw:start-shape="id447" draw:start-glue-point="10" draw:end-shape="id436" draw:end-glue-point="6" svg:d="M-57964 64911l2013-4385" svg:viewBox="0 0 2014 4386">
            <text:p/>
          </draw:connector>
          <draw:connector draw:style-name="gr502" draw:text-style-name="P15" draw:layer="layout" draw:type="line" svg:x1="-55.06cm" svg:y1="65.126cm" svg:x2="-53.052cm" svg:y2="64.872cm" draw:start-shape="id445" draw:start-glue-point="10" draw:end-shape="id448" draw:end-glue-point="6" svg:d="M-55060 65126l2008-254" svg:viewBox="0 0 2009 255">
            <text:p/>
          </draw:connector>
          <draw:connector draw:style-name="gr502" draw:text-style-name="P15" draw:layer="layout" draw:type="line" svg:x1="-55.06cm" svg:y1="63.926cm" svg:x2="-53.052cm" svg:y2="64.872cm" draw:start-shape="id444" draw:start-glue-point="10" draw:end-shape="id448" draw:end-glue-point="6" svg:d="M-55060 63926l2008 946" svg:viewBox="0 0 2009 947">
            <text:p/>
          </draw:connector>
          <draw:connector draw:style-name="gr502" draw:text-style-name="P15" draw:layer="layout" draw:type="line" svg:x1="-55.06cm" svg:y1="62.726cm" svg:x2="-53.052cm" svg:y2="64.872cm" draw:start-shape="id440" draw:start-glue-point="10" draw:end-shape="id448" draw:end-glue-point="6" svg:d="M-55060 62726l2008 2146" svg:viewBox="0 0 2009 2147">
            <text:p/>
          </draw:connector>
          <draw:connector draw:style-name="gr502" draw:text-style-name="P15" draw:layer="layout" draw:type="line" svg:x1="-55.06cm" svg:y1="61.626cm" svg:x2="-53.052cm" svg:y2="64.872cm" draw:start-shape="id438" draw:start-glue-point="10" draw:end-shape="id448" draw:end-glue-point="6" svg:d="M-55060 61626l2008 3246" svg:viewBox="0 0 2009 3247">
            <text:p/>
          </draw:connector>
          <draw:connector draw:style-name="gr502" draw:text-style-name="P15" draw:layer="layout" draw:type="line" svg:x1="-55.06cm" svg:y1="60.526cm" svg:x2="-53.052cm" svg:y2="64.872cm" draw:start-shape="id436" draw:start-glue-point="10" draw:end-shape="id448" draw:end-glue-point="6" svg:d="M-55060 60526l2008 4346" svg:viewBox="0 0 2009 4347">
            <text:p/>
          </draw:connector>
        </draw:g>
        <draw:rect draw:style-name="gr467" draw:text-style-name="P19" xml:id="id401" draw:id="id401" draw:layer="layout" svg:width="2.349cm" svg:height="1.195cm" svg:x="-23.01cm" svg:y="50.892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500" draw:id="id500" draw:layer="layout" svg:width="2.063cm" svg:height="1.396cm" svg:x="-22.913cm" svg:y="52.944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492" draw:id="id492"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2.181cm" svg:y="52.134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1.136cm" svg:y="52.134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0.157cm" svg:y="52.134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9.033cm" svg:y="52.134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1.626cm" svg:y1="52.402cm" svg:x2="-41.176cm" svg:y2="52.392cm">
            <text:p/>
          </draw:line>
          <draw:line draw:style-name="gr488" draw:text-style-name="P15" draw:layer="layout" svg:x1="-40.554cm" svg:y1="52.416cm" svg:x2="-40.131cm" svg:y2="52.405cm">
            <text:p/>
          </draw:line>
          <draw:line draw:style-name="gr488" draw:text-style-name="P15" draw:layer="layout" svg:x1="-39.508cm" svg:y1="52.416cm" svg:x2="-38.993cm" svg:y2="52.419cm">
            <text:p/>
          </draw:line>
        </draw:g>
        <draw:connector draw:style-name="gr36" draw:text-style-name="P7" draw:layer="layout" draw:type="curve" svg:x1="-27.151cm" svg:y1="52.428cm" svg:x2="-25.491cm" svg:y2="53.738cm" draw:start-shape="id449" draw:start-glue-point="1" draw:end-shape="id450" draw:end-glue-point="3" svg:d="M-27151 52428c1246 0 417 1310 1660 1310" svg:viewBox="0 0 1661 1311">
          <text:p/>
        </draw:connector>
        <draw:connector draw:style-name="gr527" draw:text-style-name="P15" draw:layer="layout" draw:type="curve" svg:x1="30.809cm" svg:y1="107.092cm" svg:x2="30.407cm" svg:y2="105.779cm" draw:start-shape="id451" draw:start-glue-point="0" draw:end-shape="id367" draw:end-glue-point="2" svg:d="M30809 107092c0-984-402-328-402-1313" svg:viewBox="0 0 403 1314">
          <text:p/>
        </draw:connector>
        <draw:custom-shape draw:name="comment box 15" draw:style-name="gr528" draw:text-style-name="P158" xml:id="id452" draw:id="id452" draw:layer="layout" svg:width="1.885cm" svg:height="1.575cm" svg:x="-48.78cm" svg:y="76.294cm">
          <text:p text:style-name="P157"><text:span text:style-name="T4">DBSCAN</text:span><text:span text:style-name="T4"><text:line-break/></text:span><text:span text:style-name="T4">on 2</text:span><text:span text:style-name="T43">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52" draw:end-glue-point="4" svg:d="M-47452 75549c0 168-385-204-385 745" svg:viewBox="0 0 386 746">
          <text:p/>
        </draw:connector>
        <draw:connector draw:style-name="gr29" draw:text-style-name="P15" draw:layer="layout" draw:type="curve" svg:x1="-49.453cm" svg:y1="75.549cm" svg:x2="-49.92cm" svg:y2="76.336cm" draw:end-shape="id453" draw:end-glue-point="4" svg:d="M-49453 75549c0 199-467-194-467 787" svg:viewBox="0 0 468 788">
          <text:p/>
        </draw:connector>
        <draw:custom-shape draw:name="comment box 14" draw:style-name="gr529" draw:text-style-name="P158" xml:id="id453" draw:id="id453" draw:layer="layout" svg:width="1.884cm" svg:height="1.523cm" svg:x="-50.862cm" svg:y="76.336cm">
          <text:p text:style-name="P157"><text:span text:style-name="T4">DBSCAN</text:span><text:span text:style-name="T4"><text:line-break/></text:span><text:span text:style-name="T4">on 0</text:span><text:span text:style-name="T43">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09" draw:text-style-name="P113" draw:layer="layout" svg:width="1.179cm" svg:height="1.358cm" svg:x="-51.118cm" svg:y="80.163cm" svg:viewBox="0 0 1180 1359" draw:points="0,0 1180,581 1180,777 0,1359">
              <text:p/>
            </draw:polygon>
          </draw:g>
          <draw:frame draw:style-name="gr484" draw:text-style-name="P11" draw:layer="layout" svg:width="1.527cm" svg:height="0.57cm" svg:x="-51.349cm" svg:y="80.526cm">
            <draw:text-box>
              <text:p><text:span text:style-name="T49">encoder</text:span></text:p>
            </draw:text-box>
          </draw:frame>
        </draw:g>
        <draw:frame draw:style-name="gr530" draw:text-style-name="P41" draw:layer="layout" svg:width="4.125cm" svg:height="2.221cm" svg:x="-49.213cm" svg:y="79.993cm">
          <draw:text-box>
            <text:p text:style-name="P5"><text:span text:style-name="T12">Action </text:span><text:span text:style-name="T12">potential </text:span><text:span text:style-name="T12">(with </text:span><text:span text:style-name="T12">autoencode</text:span><text:span text:style-name="T12">r)</text:span><text:span text:style-name="T12"><text:line-break/></text:span><text:span text:style-name="T12">and</text:span><text:span text:style-name="T12"><text:line-break/></text:span><text:span text:style-name="T12">observation </text:span><text:span text:style-name="T12">matrix (H)</text:span></text:p>
          </draw:text-box>
        </draw:frame>
        <draw:rect draw:style-name="gr292" draw:text-style-name="P35" xml:id="id454" draw:id="id454" draw:layer="layout" svg:width="2.3cm" svg:height="1cm" svg:x="33.204cm" svg:y="74.728cm">
          <text:p text:style-name="P5">IMU</text:p>
        </draw:rect>
        <draw:rect draw:style-name="gr292" draw:text-style-name="P35" xml:id="id455" draw:id="id455" draw:layer="layout" svg:width="2.3cm" svg:height="1cm" svg:x="36.204cm" svg:y="74.728cm">
          <text:p text:style-name="P5">Battery</text:p>
        </draw:rect>
        <draw:connector draw:style-name="gr293" draw:text-style-name="P15" draw:layer="layout" draw:type="curve" svg:x1="32.654cm" svg:y1="73.528cm" svg:x2="34.354cm" svg:y2="74.728cm" draw:start-shape="id240" draw:start-glue-point="2" draw:end-shape="id454" svg:d="M32654 73528c0 900 1700 300 1700 1200" svg:viewBox="0 0 1701 1201">
          <text:p/>
        </draw:connector>
        <draw:connector draw:style-name="gr293" draw:text-style-name="P15" draw:layer="layout" draw:type="curve" svg:x1="32.654cm" svg:y1="73.528cm" svg:x2="37.354cm" svg:y2="74.728cm" draw:start-shape="id240" draw:start-glue-point="2" draw:end-shape="id455" draw:end-glue-point="0" svg:d="M32654 73528c0 900 4700 300 4700 1200" svg:viewBox="0 0 4701 1201">
          <text:p/>
        </draw:connector>
        <draw:g draw:style-name="gr31">
          <draw:polygon draw:style-name="gr531" draw:text-style-name="P5" draw:layer="layout" svg:width="2.947cm" svg:height="4.308cm" svg:x="-69.005cm" svg:y="71.164cm" svg:viewBox="0 0 2948 4309" draw:points="0,3742 18,699 2891,0 2948,4309">
            <text:p/>
          </draw:polygon>
          <draw:g draw:style-name="gr31">
            <draw:custom-shape draw:style-name="gr532" draw:text-style-name="P159" draw:layer="layout" svg:width="0.254cm" svg:height="0.254cm" svg:x="-72.335cm" svg:y="71.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3" draw:text-style-name="P16" draw:layer="layout" svg:width="1.101cm" svg:height="0.569cm" svg:x="-72.247cm" svg:y="71.701cm">
              <draw:text-box>
                <text:p><text:span text:style-name="T4">GPS</text:span></text:p>
              </draw:text-box>
            </draw:frame>
          </draw:g>
          <draw:g draw:style-name="gr31">
            <draw:custom-shape draw:style-name="gr534" draw:text-style-name="P106" draw:layer="layout" svg:width="0.254cm" svg:height="0.254cm" svg:x="-72.342cm" svg:y="7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5" draw:text-style-name="P16" draw:layer="layout" svg:width="1.337cm" svg:height="0.569cm" svg:x="-72.221cm" svg:y="71.194cm">
              <draw:text-box>
                <text:p><text:span text:style-name="T4">LIDAR</text:span></text:p>
              </draw:text-box>
            </draw:frame>
          </draw:g>
          <draw:custom-shape draw:style-name="gr534"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254cm" svg:height="0.254cm" svg:x="-71.337cm" svg:y="7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254cm" svg:height="0.254cm" svg:x="-71.4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254cm" svg:height="0.254cm" svg:x="-71.139cm" svg:y="7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254cm" svg:height="0.254cm" svg:x="-72.102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254cm" svg:height="0.254cm" svg:x="-71.763cm" svg:y="73.6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254cm" svg:height="0.254cm" svg:x="-71.562cm" svg:y="72.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254cm" svg:height="0.254cm" svg:x="-71.043cm" svg:y="73.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254cm" svg:height="0.254cm" svg:x="-71.572cm" svg:y="73.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6" draw:text-style-name="P16" draw:layer="layout" svg:width="2.047cm" svg:height="0.569cm" svg:x="-70.737cm" svg:y="72.996cm">
            <draw:text-box>
              <text:p><text:span text:style-name="T4">AE mapping</text:span></text:p>
            </draw:text-box>
          </draw:frame>
          <draw:polygon draw:style-name="gr531" draw:text-style-name="P5" draw:layer="layout" svg:width="3.884cm" svg:height="5.678cm" svg:x="-64.164cm" svg:y="70.371cm" svg:viewBox="0 0 3885 5679" draw:points="0,4931 24,921 3810,0 3885,5679">
            <text:p/>
          </draw:polygon>
          <draw:custom-shape draw:style-name="gr537" draw:text-style-name="P41" draw:layer="layout" svg:width="1.612cm" svg:height="1.163cm" svg:x="-63.343cm" svg:y="72.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8" draw:text-style-name="P41" draw:layer="layout" svg:width="1.976cm" svg:height="1.426cm" svg:x="-63.491cm" svg:y="7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9" draw:text-style-name="P41" draw:layer="layout" svg:width="2.28cm" svg:height="1.645cm" svg:x="-63.597cm" svg:y="7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164cm" svg:height="0.164cm" svg:x="-61.917cm" svg:y="73.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164cm" svg:height="0.164cm" svg:x="-63.172cm" svg:y="7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164cm" svg:height="0.164cm" svg:x="-61.925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164cm" svg:height="0.163cm" svg:x="-62.687cm" svg:y="72.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164cm" svg:height="0.164cm" svg:x="-62.83cm" svg:y="7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0" draw:text-style-name="P41" draw:layer="layout" svg:width="1.388cm" svg:height="1.002cm" svg:x="-63.243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165cm" svg:height="0.165cm" svg:x="-62.633cm" svg:y="73.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1" draw:text-style-name="P15" draw:layer="layout" svg:x1="-66.058cm" svg:y1="73.543cm" svg:x2="-62.556cm" svg:y2="73.505cm">
            <text:p/>
          </draw:line>
          <draw:frame draw:style-name="gr542" draw:text-style-name="P160" draw:layer="layout" svg:width="2.473cm" svg:height="1.205cm" svg:x="-66.36cm" svg:y="73.072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57" draw:id="id457">
            <draw:custom-shape draw:style-name="gr534"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164cm" svg:height="0.163cm" svg:x="-67.67cm" svg:y="7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164cm" svg:height="0.164cm" svg:x="-67.764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164cm" svg:height="0.164cm" svg:x="-67.542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164cm" svg:height="0.164cm" svg:x="-68.163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164cm" svg:height="0.164cm" svg:x="-67.944cm" svg:y="73.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164cm" svg:height="0.163cm" svg:x="-67.815cm" svg:y="73.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164cm" svg:height="0.164cm" svg:x="-67.48cm" svg:y="7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59" draw:layer="layout" svg:width="0.164cm" svg:height="0.164cm" svg:x="-67.821cm" svg:y="73.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41" draw:text-style-name="P15" draw:layer="layout" svg:x1="-70.556cm" svg:y1="73.537cm" svg:x2="-67.656cm" svg:y2="73.505cm">
            <text:p/>
          </draw:line>
          <draw:frame draw:style-name="gr543" draw:text-style-name="P16" draw:layer="layout" svg:width="3.576cm" svg:height="1.205cm" svg:x="-66.669cm" svg:y="70.062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44" draw:text-style-name="P161" draw:layer="layout" svg:width="2.126cm" svg:height="0.569cm" svg:x="-68.667cm" svg:y="71.77cm">
            <draw:text-box>
              <text:p><text:span text:style-name="T52">Latent space</text:span></text:p>
            </draw:text-box>
          </draw:frame>
          <draw:frame draw:style-name="gr545" draw:text-style-name="P163" draw:layer="layout" svg:width="0.87cm" svg:height="0.73cm" svg:x="-62.263cm" svg:y="74.119cm">
            <draw:text-box>
              <text:p text:style-name="P162"><text:span text:style-name="T4">μ</text:span><text:span text:style-name="T43">’</text:span><text:span text:style-name="T42">G</text:span></text:p>
            </draw:text-box>
          </draw:frame>
          <draw:frame draw:style-name="gr546" draw:text-style-name="P163" draw:layer="layout" svg:width="0.87cm" svg:height="0.73cm" svg:x="-62.689cm" svg:y="73.127cm">
            <draw:text-box>
              <text:p text:style-name="P162"><text:span text:style-name="T4">μ</text:span><text:span text:style-name="T43">’</text:span><text:span text:style-name="T42">L</text:span></text:p>
            </draw:text-box>
          </draw:frame>
          <draw:frame draw:style-name="gr547" draw:text-style-name="P161" draw:layer="layout" svg:width="2.346cm" svg:height="0.887cm" svg:x="-63.709cm" svg:y="71.199cm">
            <draw:text-box>
              <text:p><text:span text:style-name="T52">clusters mean</text:span><text:span text:style-name="T52"><text:line-break/></text:span><text:span text:style-name="T52">in latent space</text:span></text:p>
            </draw:text-box>
          </draw:frame>
          <draw:custom-shape draw:style-name="gr532" draw:text-style-name="P159" xml:id="id456" draw:id="id456" draw:layer="layout" svg:width="0.164cm" svg:height="0.164cm" svg:x="-62.181cm" svg:y="74.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8" draw:text-style-name="P5" draw:layer="layout" svg:x1="-62.487cm" svg:y1="73.557cm" svg:x2="-62.132cm" svg:y2="74.164cm">
            <text:p/>
          </draw:line>
          <draw:frame draw:style-name="gr549" draw:text-style-name="P16" draw:layer="layout" svg:width="0.697cm" svg:height="0.569cm" svg:x="-62.724cm" svg:y="73.709cm">
            <draw:text-box>
              <text:p><text:span text:style-name="T4">d</text:span><text:span text:style-name="T43">’</text:span></text:p>
            </draw:text-box>
          </draw:frame>
          <draw:connector draw:style-name="gr550" draw:text-style-name="P15" draw:layer="layout" draw:type="curve" draw:line-skew="0.315cm" svg:x1="-62.099cm" svg:y1="74.301cm" svg:x2="-67.739cm" svg:y2="73.922cm" draw:start-shape="id456" draw:start-glue-point="8" draw:end-shape="id457" draw:end-glue-point="2" svg:d="M-62099 74301c0 1224-5640 1413-5640-379" svg:viewBox="0 0 5641 1323">
            <text:p/>
          </draw:connector>
          <draw:frame draw:style-name="gr551" draw:text-style-name="P16" draw:layer="layout" svg:width="1.595cm" svg:height="0.887cm" svg:x="-65.852cm" svg:y="75.137cm">
            <draw:text-box>
              <text:p text:style-name="P162"><text:span text:style-name="T10">Decode</text:span><text:span text:style-name="T10"><text:line-break/></text:span><text:span text:style-name="T10">GPS+</text:span><text:span text:style-name="T4">μ</text:span><text:span text:style-name="T43">’</text:span><text:span text:style-name="T42">G</text:span></text:p>
            </draw:text-box>
          </draw:frame>
          <draw:frame draw:style-name="gr552" draw:text-style-name="P164" draw:layer="layout" svg:width="5.09cm" svg:height="1.039cm" svg:x="-67.482cm" svg:y="76.119cm">
            <draw:text-box>
              <text:p text:style-name="P5"><text:span text:style-name="T53">Mapping GPS to the center </text:span><text:span text:style-name="T53"><text:line-break/></text:span><text:span text:style-name="T53">of mapped LIDAR-class</text:span></text:p>
            </draw:text-box>
          </draw:frame>
        </draw:g>
        <draw:g draw:style-name="gr23">
          <draw:rect draw:style-name="gr41" draw:text-style-name="P5" xml:id="id459" draw:id="id459" draw:layer="layout" svg:width="1.283cm" svg:height="1.495cm" svg:x="-20.906cm" svg:y="108.783cm">
            <text:p text:style-name="P5">Robot</text:p>
          </draw:rect>
          <draw:line draw:style-name="gr553" draw:text-style-name="P5" xml:id="id458" draw:id="id458" draw:layer="layout" svg:x1="-19.65cm" svg:y1="109.523cm" svg:x2="-17.956cm" svg:y2="109.497cm">
            <text:p/>
          </draw:line>
          <draw:connector draw:style-name="gr554" draw:text-style-name="P15" draw:layer="layout" svg:x1="-18.803cm" svg:y1="109.523cm" svg:x2="-20.264cm" svg:y2="110.278cm" draw:start-shape="id458" draw:start-glue-point="2" draw:end-shape="id459" svg:d="M-18803 109523v1256h-1461v-501" svg:viewBox="0 0 1462 1257">
            <text:p/>
          </draw:connector>
          <draw:line draw:style-name="gr553" draw:text-style-name="P5" draw:layer="layout" svg:x1="-22.401cm" svg:y1="109.497cm" svg:x2="-20.92cm" svg:y2="109.497cm">
            <text:p/>
          </draw:line>
          <draw:frame draw:style-name="gr555" draw:text-style-name="P16" draw:layer="layout" svg:width="1.117cm" svg:height="0.569cm" svg:x="-22.168cm" svg:y="109.009cm">
            <draw:text-box>
              <text:p><text:span text:style-name="T4">input</text:span></text:p>
            </draw:text-box>
          </draw:frame>
          <draw:frame draw:style-name="gr556" draw:text-style-name="P16" draw:layer="layout" svg:width="1.291cm" svg:height="0.569cm" svg:x="-19.567cm" svg:y="109.01cm">
            <draw:text-box>
              <text:p><text:span text:style-name="T4">output</text:span></text:p>
            </draw:text-box>
          </draw:frame>
          <draw:frame draw:style-name="gr557" draw:text-style-name="P16" draw:layer="layout" svg:width="1.748cm" svg:height="0.569cm" svg:x="-20.366cm" svg:y="110.711cm">
            <draw:text-box>
              <text:p><text:span text:style-name="T4">Feedback</text:span></text:p>
            </draw:text-box>
          </draw:frame>
        </draw:g>
        <draw:line draw:style-name="gr558" draw:text-style-name="P15" draw:layer="layout" svg:x1="-51.273cm" svg:y1="82.253cm" svg:x2="-35.038cm" svg:y2="82.253cm">
          <text:p/>
        </draw:line>
        <draw:frame draw:style-name="gr559" draw:text-style-name="P165" draw:layer="layout" svg:width="4.884cm" svg:height="2.015cm" svg:x="-45.762cm" svg:y="82.29cm">
          <draw:text-box>
            <text:p text:style-name="P5"><text:span text:style-name="T54">Predic</text:span><text:span text:style-name="T54">tive </text:span><text:span text:style-name="T54">model </text:span><text:span text:style-name="T54"><text:line-break/></text:span><text:span text:style-name="T54">buildin</text:span><text:span text:style-name="T54">g with </text:span><text:span text:style-name="T54"><text:line-break/></text:span><text:span text:style-name="T54">transf</text:span><text:span text:style-name="T54">ormer</text:span><text:span text:style-name="T54">s</text:span></text:p>
          </draw:text-box>
        </draw:frame>
        <draw:line draw:style-name="gr560" draw:text-style-name="P15" draw:layer="layout" svg:x1="-34.727cm" svg:y1="66.427cm" svg:x2="-34.694cm" svg:y2="81.856cm">
          <text:p/>
        </draw:line>
        <draw:frame draw:style-name="gr561" draw:text-style-name="P166" draw:layer="layout" svg:width="5.588cm" svg:height="1.038cm" draw:transform="rotate (1.5707963267949) translate (-34.753cm 76.743cm)">
          <draw:text-box>
            <text:p><text:span text:style-name="T54">Langua</text:span><text:span text:style-name="T54">ge </text:span><text:span text:style-name="T54">formati</text:span><text:span text:style-name="T54">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61" draw:id="id461"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0" draw:id="id460"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60" draw:start-glue-point="6" draw:end-shape="id461" draw:end-glue-point="10" svg:d="M-47897 100065h-1110" svg:viewBox="0 0 1111 1">
            <text:p/>
          </draw:connector>
          <draw:custom-shape draw:style-name="gr34" draw:text-style-name="P26" xml:id="id463" draw:id="id463"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2" draw:id="id462"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62" draw:start-glue-point="6" draw:end-shape="id463" draw:end-glue-point="10" svg:d="M-43897 100065h-1110" svg:viewBox="0 0 1111 1">
            <text:p/>
          </draw:connector>
          <draw:connector draw:style-name="gr36" draw:text-style-name="P7" draw:layer="layout" draw:type="curve" svg:x1="-45.898cm" svg:y1="100.065cm" svg:x2="-47.006cm" svg:y2="100.065cm" draw:start-shape="id463" draw:start-glue-point="6" draw:end-shape="id460" draw:end-glue-point="10" svg:d="M-45898 100065h-1108" svg:viewBox="0 0 1109 1">
            <text:p/>
          </draw:connector>
          <draw:custom-shape draw:style-name="gr34" draw:text-style-name="P26" xml:id="id465" draw:id="id465"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4" draw:id="id464"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64" draw:start-glue-point="6" draw:end-shape="id465" draw:end-glue-point="10" svg:d="M-36897 100065h-1110" svg:viewBox="0 0 1111 1">
            <text:p/>
          </draw:connector>
          <draw:custom-shape draw:style-name="gr479" draw:text-style-name="P106" draw:layer="layout" svg:width="16.317cm" svg:height="1.952cm" svg:x="-51.302cm" svg:y="97.114cm">
            <text:p/>
            <draw:enhanced-geometry svg:viewBox="0 0 21600 21600" draw:type="rectangle" draw:enhanced-path="M 0 0 L 21600 0 21600 21600 0 21600 0 0 Z N"/>
          </draw:custom-shape>
          <draw:custom-shape draw:style-name="gr48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2cm" svg:y="95.68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2cm" svg:y="95.68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cm" svg:y="95.68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7cm" svg:y="95.68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3cm" svg:y1="95.945cm" svg:x2="-44.058cm" svg:y2="95.963cm">
              <text:p/>
            </draw:line>
            <draw:line draw:style-name="gr488" draw:text-style-name="P15" draw:layer="layout" svg:x1="-43.51cm" svg:y1="95.962cm" svg:x2="-43.012cm" svg:y2="95.957cm">
              <text:p/>
            </draw:line>
            <draw:line draw:style-name="gr488" draw:text-style-name="P15" draw:layer="layout" svg:x1="-42.464cm" svg:y1="95.962cm" svg:x2="-41.947cm" svg:y2="95.957cm">
              <text:p/>
            </draw:line>
          </draw:g>
          <draw:connector draw:style-name="gr489" draw:text-style-name="P7" draw:layer="layout" draw:type="curve" svg:x1="-39.311cm" svg:y1="100.024cm" svg:x2="-42.624cm" svg:y2="100.027cm" svg:d="M-39311 100024c-2484 0-828 3-3313 3" svg:viewBox="0 0 3314 4">
            <text:p/>
          </draw:connector>
          <draw:connector draw:style-name="gr489" draw:text-style-name="P7" draw:layer="layout" draw:type="curve" svg:x1="-45.796cm" svg:y1="95.924cm" svg:x2="-46.877cm" svg:y2="95.928cm" svg:d="M-45796 95924c-810 0-270 4-1081 4" svg:viewBox="0 0 1082 5">
            <text:p/>
          </draw:connector>
          <draw:connector draw:style-name="gr489" draw:text-style-name="P7" draw:layer="layout" draw:type="curve" svg:x1="-39.806cm" svg:y1="95.924cm" svg:x2="-40.887cm" svg:y2="95.928cm" svg:d="M-39806 95924c-810 0-270 4-1081 4" svg:viewBox="0 0 1082 5">
            <text:p/>
          </draw:connector>
          <draw:custom-shape draw:style-name="gr48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1cm" svg:y="101.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1"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93.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8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7cm" svg:y="91.681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2cm" svg:y="91.681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3cm" svg:y="91.681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89cm" svg:y="91.681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2cm" svg:y1="91.949cm" svg:x2="-44.132cm" svg:y2="91.939cm">
              <text:p/>
            </draw:line>
            <draw:line draw:style-name="gr488" draw:text-style-name="P15" draw:layer="layout" svg:x1="-43.51cm" svg:y1="91.963cm" svg:x2="-43.087cm" svg:y2="91.952cm">
              <text:p/>
            </draw:line>
            <draw:line draw:style-name="gr488" draw:text-style-name="P15" draw:layer="layout" svg:x1="-42.464cm" svg:y1="91.963cm" svg:x2="-41.949cm" svg:y2="91.966cm">
              <text:p/>
            </draw:line>
          </draw:g>
          <draw:connector draw:style-name="gr489" draw:text-style-name="P7" draw:layer="layout" draw:type="curve" svg:x1="-45.796cm" svg:y1="91.925cm" svg:x2="-46.877cm" svg:y2="91.929cm" svg:d="M-45796 91925c-810 0-270 4-1081 4" svg:viewBox="0 0 1082 5">
            <text:p/>
          </draw:connector>
          <draw:connector draw:style-name="gr489" draw:text-style-name="P7" draw:layer="layout" draw:type="curve" svg:x1="-39.806cm" svg:y1="91.925cm" svg:x2="-40.887cm" svg:y2="91.929cm" svg:d="M-39806 91925c-810 0-270 4-1081 4" svg:viewBox="0 0 1082 5">
            <text:p/>
          </draw:connector>
          <draw:custom-shape draw:style-name="gr48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8" draw:text-style-name="P15" draw:layer="layout" svg:x1="-34.76cm" svg:y1="88.884cm" svg:x2="-34.671cm" svg:y2="102.989cm">
            <text:p/>
          </draw:line>
          <draw:frame draw:style-name="gr562" draw:text-style-name="P165" draw:layer="layout" svg:width="5.06cm" svg:height="2.015cm" draw:transform="rotate (1.5707963267949) translate (-34.659cm 98.445cm)">
            <draw:text-box>
              <text:p text:style-name="P5"><text:span text:style-name="T54">Live remembering</text:span><text:span text:style-name="T54"><text:line-break/></text:span><text:span text:style-name="T54">and</text:span><text:span text:style-name="T54"><text:line-break/></text:span><text:span text:style-name="T54">State estimation</text:span></text:p>
            </draw:text-box>
          </draw:frame>
          <draw:custom-shape draw:style-name="gr479" draw:text-style-name="P106" draw:layer="layout" svg:width="16.317cm" svg:height="1.952cm" svg:x="-51.299cm" svg:y="88.915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39.994cm 89.04cm)">
            <text:p text:style-name="P19"><text:span text:style-name="T4">fu</text:span><text:span text:style-name="T4">se</text:span><text:span text:style-name="T4">d</text:span><text:span text:style-name="T4"><text:line-break/></text:span><text:span text:style-name="T4">ob</text:span><text:span text:style-name="T4">se</text:span><text:span text:style-name="T4">rv</text:span><text:span text:style-name="T4">ati</text:span><text:span text:style-name="T4">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3" draw:text-style-name="P137" draw:layer="layout" svg:width="2.198cm" svg:height="1.705cm" svg:x="-44.455cm" svg:y="89.094cm">
            <text:p text:style-name="P136"><text:span text:style-name="T45">Stim</text:span><text:span text:style-name="T45">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09" draw:text-style-name="P113" draw:layer="layout" svg:width="1.179cm" svg:height="1.358cm" svg:x="-51.116cm" svg:y="89.165cm" svg:viewBox="0 0 1180 1359" draw:points="0,0 1180,581 1180,777 0,1359">
                <text:p/>
              </draw:polygon>
            </draw:g>
            <draw:frame draw:style-name="gr484" draw:text-style-name="P11" draw:layer="layout" svg:width="1.527cm" svg:height="0.57cm" svg:x="-51.347cm" svg:y="89.528cm">
              <draw:text-box>
                <text:p><text:span text:style-name="T49">encoder</text:span></text:p>
              </draw:text-box>
            </draw:frame>
          </draw:g>
          <draw:frame draw:style-name="gr564"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4"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4"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4"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65" draw:text-style-name="P27" xml:id="id466" draw:id="id466"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5" draw:text-style-name="P27" xml:id="id467" draw:id="id467"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6" draw:text-style-name="P15" draw:layer="layout" draw:type="curve" svg:x1="-39.402cm" svg:y1="89.666cm" svg:x2="-39.402cm" svg:y2="90.138cm" draw:start-shape="id466" draw:start-glue-point="8" draw:end-shape="id467" draw:end-glue-point="4" svg:d="M-39402 89666v472" svg:viewBox="0 0 1 473">
            <text:p/>
          </draw:connector>
          <draw:frame draw:style-name="gr523"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9" draw:id="id469"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7" draw:text-style-name="P167" draw:layer="layout" svg:width="3.958cm" svg:height="0.645cm" svg:x="-39.467cm" svg:y="89.59cm">
            <draw:text-box>
              <text:p><text:span text:style-name="T12">H </text:span><text:span text:style-name="T55">(observation matrix)</text:span></text:p>
            </draw:text-box>
          </draw:frame>
          <draw:custom-shape draw:style-name="gr34" draw:text-style-name="P26" xml:id="id468" draw:id="id468"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8" draw:start-glue-point="6" draw:end-shape="id469" draw:end-glue-point="10" svg:d="M-42586 102121c-786 0-261 1-1050 1" svg:viewBox="0 0 1051 2">
            <text:p/>
          </draw:connector>
          <draw:g draw:style-name="gr31">
            <draw:custom-shape draw:style-name="gr568" draw:text-style-name="P26" xml:id="id473" draw:id="id473"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168" xml:id="id475" draw:id="id475"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7" xml:id="id470" draw:id="id470"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1" draw:text-style-name="P27" xml:id="id471" draw:id="id471"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2" draw:text-style-name="P7" draw:layer="layout" draw:type="curve" svg:x1="-47.286cm" svg:y1="104.685cm" svg:x2="-46.42cm" svg:y2="104.691cm" draw:start-shape="id470" draw:start-glue-point="10" draw:end-shape="id471" draw:end-glue-point="6" svg:d="M-47286 104685c651 0 218 6 866 6" svg:viewBox="0 0 867 7">
              <text:p/>
            </draw:connector>
            <draw:custom-shape draw:style-name="gr571" draw:text-style-name="P27" xml:id="id472" draw:id="id472"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8" draw:text-style-name="P26" xml:id="id474" draw:id="id474"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3"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84" draw:text-style-name="P11" draw:layer="layout" svg:width="0.707cm" svg:height="0.57cm" svg:x="-47.292cm" svg:y="104.207cm">
              <draw:text-box>
                <text:p><text:span text:style-name="T4">H</text:span></text:p>
              </draw:text-box>
            </draw:frame>
            <draw:connector draw:style-name="gr566" draw:text-style-name="P15" draw:layer="layout" draw:type="curve" svg:x1="-45.602cm" svg:y1="104.692cm" svg:x2="-44.106cm" svg:y2="105.584cm" draw:start-shape="id472" draw:start-glue-point="10" draw:end-shape="id473" draw:end-glue-point="6" svg:d="M-45602 104692c1123 0 376 892 1496 892" svg:viewBox="0 0 1497 893">
              <text:p/>
            </draw:connector>
            <draw:connector draw:style-name="gr566" draw:text-style-name="P15" draw:layer="layout" draw:type="curve" svg:x1="-45.602cm" svg:y1="104.692cm" svg:x2="-44.157cm" svg:y2="103.694cm" draw:start-shape="id472" draw:start-glue-point="10" draw:end-shape="id474" draw:end-glue-point="6" svg:d="M-45602 104692c1086 0 364-998 1445-998" svg:viewBox="0 0 1446 999">
              <text:p/>
            </draw:connector>
            <draw:connector draw:style-name="gr566" draw:text-style-name="P15" draw:layer="layout" draw:type="curve" svg:x1="-42.156cm" svg:y1="103.694cm" svg:x2="-40.648cm" svg:y2="104.697cm" draw:start-shape="id474" draw:start-glue-point="10" draw:end-shape="id475" draw:end-glue-point="6" svg:d="M-42156 103694c1132 0 379 1003 1508 1003" svg:viewBox="0 0 1509 1004">
              <text:p/>
            </draw:connector>
            <draw:connector draw:style-name="gr566" draw:text-style-name="P15" draw:layer="layout" draw:type="curve" svg:x1="-42.105cm" svg:y1="105.584cm" svg:x2="-40.648cm" svg:y2="104.697cm" draw:start-shape="id473" draw:end-shape="id475" draw:end-glue-point="6" svg:d="M-42105 105584c1095 0 367-887 1457-887" svg:viewBox="0 0 1458 888">
              <text:p/>
            </draw:connector>
            <draw:frame draw:style-name="gr523"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6" draw:id="id476">
              <draw:custom-shape draw:style-name="gr573"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3"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66" draw:text-style-name="P15" draw:layer="layout" draw:type="curve" svg:x1="-39.757cm" svg:y1="104.697cm" svg:x2="-38.671cm" svg:y2="104.679cm" draw:start-shape="id475" draw:start-glue-point="10" draw:end-shape="id476" draw:end-glue-point="3" svg:d="M-39757 104697c816 0 273-18 1086-18" svg:viewBox="0 0 1087 19">
              <text:p/>
            </draw:connector>
            <draw:custom-shape draw:style-name="gr570" draw:text-style-name="P27" xml:id="id477" draw:id="id477"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1"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2" draw:text-style-name="P7" draw:layer="layout" draw:type="curve" svg:x1="-43.106cm" svg:y1="108.048cm" svg:x2="-43.094cm" svg:y2="107.208cm" draw:start-shape="id477" draw:start-glue-point="4" draw:end-shape="id478" draw:end-glue-point="8" svg:d="M-43106 108048c0-630 12-210 12-840" svg:viewBox="0 0 13 841">
              <text:p/>
            </draw:connector>
            <draw:custom-shape draw:style-name="gr571" draw:text-style-name="P27" xml:id="id478" draw:id="id478"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4" draw:text-style-name="P11" draw:layer="layout" svg:width="0.707cm" svg:height="0.57cm" svg:x="-43.61cm" svg:y="107.393cm">
              <draw:text-box>
                <text:p><text:span text:style-name="T4">H</text:span></text:p>
              </draw:text-box>
            </draw:frame>
            <draw:connector draw:style-name="gr572" draw:text-style-name="P7" draw:layer="layout" draw:type="curve" svg:x1="-43.094cm" svg:y1="106.509cm" svg:x2="-43.105cm" svg:y2="106.029cm" draw:start-shape="id478" draw:start-glue-point="4" draw:end-shape="id473" draw:end-glue-point="8" svg:d="M-43094 106509c0-360-11-120-11-480" svg:viewBox="0 0 12 481">
              <text:p/>
            </draw:connector>
            <draw:measure draw:style-name="gr574" draw:text-style-name="P170" draw:layer="measurelines" svg:x1="-42.622cm" svg:y1="108.335cm" svg:x2="-38.396cm" svg:y2="105.093cm">
              <text:p text:style-name="P169"><text:span text:style-name="T56">Suprise</text:span><text:span text:style-name="T56"><text:line-break/></text:span><text:span text:style-name="T56"><text:measure text:kind="gap"/></text:span><text:span text:style-name="T56">Wasserstein</text:span></text:p>
            </draw:measure>
          </draw:g>
        </draw:g>
        <draw:rect draw:style-name="gr41" draw:text-style-name="P5" xml:id="id479" draw:id="id479" draw:layer="layout" svg:width="2.064cm" svg:height="1.085cm" svg:x="10.737cm" svg:y="102.447cm">
          <text:p text:style-name="P5">close-loop</text:p>
        </draw:rect>
        <draw:connector draw:style-name="gr293" draw:text-style-name="P15" draw:layer="layout" draw:type="curve" svg:x1="16.457cm" svg:y1="99.461cm" svg:x2="11.769cm" svg:y2="102.447cm" draw:start-shape="id356" draw:start-glue-point="2" draw:end-shape="id479" draw:end-glue-point="0" svg:d="M16457 99461c0 2239-4688 747-4688 2986" svg:viewBox="0 0 4689 2987">
          <text:p/>
        </draw:connector>
        <draw:path draw:style-name="gr575" draw:text-style-name="P171"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75" draw:text-style-name="P171"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75" draw:text-style-name="P171" draw:layer="layout" svg:width="0.168cm" svg:height="0.432cm" svg:x="-28.37cm" svg:y="91.818cm" svg:viewBox="0 0 169 433" svg:d="M169 425c-19 5-39 8-59 8-46 0-70-26-70-79v-234h-40v-42h43l17-78h38v78h65v42h-65v221c0 17 3 29 9 36 5 6 15 10 28 10 8 0 19-2 34-5z">
          <text:p/>
        </draw:path>
        <draw:path draw:style-name="gr575" draw:text-style-name="P171"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75" draw:text-style-name="P171"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75" draw:text-style-name="P171" draw:layer="layout" svg:width="0.057cm" svg:height="0.479cm" svg:x="-27.161cm" svg:y="91.767cm" svg:viewBox="0 0 58 480" svg:d="M0 56c0-19 0-37 0-56 19 0 39 0 58 0 0 19 0 37 0 56-19 0-39 0-58 0zM0 480c0-117 0-233 0-350 19 0 39 0 58 0 0 117 0 233 0 350-19 0-39 0-58 0z">
          <text:p/>
        </draw:path>
        <draw:path draw:style-name="gr575" draw:text-style-name="P171"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75" draw:text-style-name="P171" draw:layer="layout" svg:width="0.168cm" svg:height="0.432cm" svg:x="-26.682cm" svg:y="91.818cm" svg:viewBox="0 0 169 433" svg:d="M169 425c-19 5-39 8-59 8-46 0-70-26-70-79v-234h-40v-42h43l17-78h38v78h65v42h-65v221c0 17 3 29 9 36 5 6 15 10 28 10 8 0 19-2 34-5z">
          <text:p/>
        </draw:path>
        <draw:g draw:style-name="gr23">
          <draw:path draw:style-name="gr576" draw:text-style-name="P172" draw:layer="layout" svg:width="0.194cm" svg:height="0.298cm" svg:x="-26.733cm" svg:y="92.957cm" svg:viewBox="0 0 195 299" svg:d="M186 45c-8-3-16-4-25-4-19 0-36 10-51 30s-26 45-31 75l-30 153h-49l44-225 7-38 5-31h46l-10 60h1c12-24 24-41 36-50 11-10 25-15 40-15 8 0 17 1 26 4z">
            <text:p/>
          </draw:path>
          <draw:path draw:style-name="gr576" draw:text-style-name="P172" draw:layer="layout" svg:width="0.205cm" svg:height="0.517cm" svg:x="-26.531cm" svg:y="92.853cm" svg:viewBox="0 0 206 518" svg:d="M206 0c-105 92-157 203-157 332 0 70 19 132 56 186h-47c-39-54-58-117-58-191 0-67 14-128 41-184 27-55 66-103 118-143z">
            <text:p/>
          </draw:path>
          <draw:path draw:style-name="gr576" draw:text-style-name="P172"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76" draw:text-style-name="P172" draw:layer="layout" svg:width="0.205cm" svg:height="0.517cm" svg:x="-26.273cm" svg:y="92.853cm" svg:viewBox="0 0 206 518" svg:d="M0 518c105-92 157-203 157-332 0-70-19-132-56-186h47c39 54 58 117 58 191 0 67-14 128-41 184-27 55-66 103-118 143z">
            <text:p/>
          </draw:path>
        </draw:g>
        <draw:path draw:style-name="gr577" draw:text-style-name="P5" draw:layer="layout" svg:width="4.073cm" svg:height="0cm" svg:x="-29.294cm" svg:y="92.706cm" svg:viewBox="0 0 4074 0" svg:d="M0 0c1358 0 2716 0 4074 0">
          <text:p/>
        </draw:path>
        <draw:path draw:style-name="gr578" draw:text-style-name="P173" draw:layer="layout" svg:width="0.316cm" svg:height="0.316cm" svg:x="-25.484cm" svg:y="92.547cm" svg:viewBox="0 0 317 317" svg:d="M0 0c106 53 211 106 317 159-106 53-211 105-317 158 0-106 0-211 0-317z">
          <text:p/>
        </draw:path>
        <draw:path draw:style-name="gr579" draw:text-style-name="P174"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0" draw:text-style-name="P126"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1" draw:text-style-name="P171"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81" draw:text-style-name="P171" draw:layer="layout" svg:width="0.32cm" svg:height="0.046cm" svg:x="-25.287cm" svg:y="93.431cm" svg:viewBox="0 0 321 47" svg:d="M0 47c0-16 0-31 0-47 107 0 214 0 321 0 0 16 0 31 0 47-107 0-214 0-321 0z">
          <text:p/>
        </draw:path>
        <draw:g draw:style-name="gr23">
          <draw:path draw:style-name="gr582" draw:text-style-name="P171"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2" draw:text-style-name="P171"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2" draw:text-style-name="P171"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2" draw:text-style-name="P171"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2" draw:text-style-name="P171"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2" draw:text-style-name="P171" draw:layer="layout" svg:width="0.123cm" svg:height="0.266cm" svg:x="-23.015cm" svg:y="89.987cm" svg:viewBox="0 0 124 267" svg:d="M2 267v-201c0-19-1-39-2-61h41c2 30 2 48 2 54h1c7-23 15-39 24-47 9-7 22-12 39-12 5 0 11 1 17 2v41c-5-2-14-3-23-3-18 0-32 8-42 23-9 16-14 38-14 68v136z">
            <text:p/>
          </draw:path>
          <draw:path draw:style-name="gr582" draw:text-style-name="P171"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2" draw:text-style-name="P171"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3" draw:text-style-name="P171"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3" draw:text-style-name="P171" draw:layer="layout" svg:width="0.123cm" svg:height="0.266cm" svg:x="-23.696cm" svg:y="90.683cm" svg:viewBox="0 0 124 267" svg:d="M2 267v-201c0-19-1-39-2-61h41c2 30 2 48 2 54h1c7-23 15-39 24-47 9-7 22-12 39-12 5 0 11 1 17 2v41c-5-2-14-3-23-3-18 0-32 8-42 23-9 16-14 38-14 68v136z">
            <text:p/>
          </draw:path>
          <draw:path draw:style-name="gr583" draw:text-style-name="P171" draw:layer="layout" svg:width="0.123cm" svg:height="0.266cm" svg:x="-23.531cm" svg:y="90.683cm" svg:viewBox="0 0 124 267" svg:d="M2 267v-201c0-19-1-39-2-61h41c2 30 2 48 2 54h1c7-23 15-39 24-47 9-7 22-12 39-12 5 0 11 1 17 2v41c-5-2-14-3-23-3-18 0-32 8-42 23-9 16-14 38-14 68v136z">
            <text:p/>
          </draw:path>
          <draw:path draw:style-name="gr583" draw:text-style-name="P171"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3" draw:text-style-name="P171"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4" draw:text-style-name="P172"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4" draw:text-style-name="P172" draw:layer="layout" svg:width="0.205cm" svg:height="0.517cm" svg:x="-23.721cm" svg:y="91.749cm" svg:viewBox="0 0 206 518" svg:d="M206 0c-105 92-157 203-157 332 0 70 19 132 56 186h-47c-39-54-58-117-58-191 0-67 14-128 41-184 27-55 66-103 118-143z">
            <text:p/>
          </draw:path>
          <draw:path draw:style-name="gr584" draw:text-style-name="P172"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4" draw:text-style-name="P172" draw:layer="layout" svg:width="0.205cm" svg:height="0.517cm" svg:x="-23.462cm" svg:y="91.749cm" svg:viewBox="0 0 206 518" svg:d="M0 518c105-92 157-203 157-332 0-70-19-132-56-186h47c39 54 58 117 58 191 0 67-14 128-41 184-27 55-66 103-118 143z">
            <text:p/>
          </draw:path>
        </draw:g>
        <draw:path draw:style-name="gr577" draw:text-style-name="P5" draw:layer="layout" svg:width="1.904cm" svg:height="0cm" svg:x="-24.161cm" svg:y="92.706cm" svg:viewBox="0 0 1905 0" svg:d="M0 0c635 0 1270 0 1905 0">
          <text:p/>
        </draw:path>
        <draw:path draw:style-name="gr578" draw:text-style-name="P173" draw:layer="layout" svg:width="0.317cm" svg:height="0.316cm" svg:x="-22.521cm" svg:y="92.547cm" svg:viewBox="0 0 318 317" svg:d="M0 0c106 53 212 106 318 159-106 53-212 105-318 158 0-106 0-211 0-317z">
          <text:p/>
        </draw:path>
        <draw:path draw:style-name="gr578" draw:text-style-name="P173" draw:layer="layout" svg:width="0.317cm" svg:height="0.316cm" svg:x="-22.521cm" svg:y="92.547cm" svg:viewBox="0 0 318 317" svg:d="M0 0c106 53 212 106 318 159-106 53-212 105-318 158 0-106 0-211 0-317z">
          <text:p/>
        </draw:path>
        <draw:path draw:style-name="gr585" draw:text-style-name="P175" draw:layer="layout" svg:width="4.629cm" svg:height="1.772cm" svg:x="-22.15cm" svg:y="91.595cm" svg:viewBox="0 0 4630 1773" svg:d="M0 0c1543 0 3087 0 4630 0 0 591 0 1182 0 1773-1543 0-3087 0-4630 0 0-591 0-1182 0-1773z">
          <text:p/>
        </draw:path>
        <draw:path draw:style-name="gr586" draw:text-style-name="P176" draw:layer="layout" svg:width="4.629cm" svg:height="1.772cm" svg:x="-22.15cm" svg:y="91.595cm" svg:viewBox="0 0 4630 1773" svg:d="M0 0c1543 0 3087 0 4630 0 0 591 0 1182 0 1773-1543 0-3087 0-4630 0 0-591 0-1182 0-1773z">
          <text:p/>
        </draw:path>
        <draw:g draw:style-name="gr23">
          <draw:path draw:style-name="gr587" draw:text-style-name="P177"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87" draw:text-style-name="P177"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7" draw:text-style-name="P177"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87" draw:text-style-name="P177" draw:layer="layout" svg:width="0.183cm" svg:height="0.471cm" svg:x="-20.2cm" svg:y="92.303cm" svg:viewBox="0 0 184 472" svg:d="M184 463c-21 6-42 9-64 9-51 0-76-30-76-87v-254h-44v-45h47l18-86h42v86h71v45h-71v240c0 19 3 32 10 39 6 7 15 11 31 11 8 0 20-1 36-5z">
            <text:p/>
          </draw:path>
          <draw:path draw:style-name="gr587" draw:text-style-name="P177" draw:layer="layout" svg:width="0.179cm" svg:height="0.387cm" svg:x="-19.962cm" svg:y="92.381cm" svg:viewBox="0 0 180 388" svg:d="M2 388v-293c0-26-1-55-2-88h60c1 44 2 69 2 78h2c10-32 22-55 35-67s31-18 56-18c8 0 16 1 25 4v57c-8-2-20-3-33-3-26 0-47 11-60 34-15 23-22 55-22 98v198z">
            <text:p/>
          </draw:path>
          <draw:path draw:style-name="gr587" draw:text-style-name="P177"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7" draw:text-style-name="P177" draw:layer="layout" svg:width="0.062cm" svg:height="0.522cm" svg:x="-19.321cm" svg:y="92.247cm" svg:viewBox="0 0 63 523" svg:d="M0 523c0-175 0-349 0-523 21 0 42 0 63 0 0 174 0 348 0 523-21 0-42 0-63 0z">
            <text:p/>
          </draw:path>
          <draw:path draw:style-name="gr587" draw:text-style-name="P177" draw:layer="layout" svg:width="0.062cm" svg:height="0.522cm" svg:x="-19.161cm" svg:y="92.247cm" svg:viewBox="0 0 63 523" svg:d="M0 523c0-175 0-349 0-523 21 0 42 0 63 0 0 174 0 348 0 523-21 0-42 0-63 0z">
            <text:p/>
          </draw:path>
          <draw:path draw:style-name="gr587" draw:text-style-name="P177"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87" draw:text-style-name="P177"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88" draw:text-style-name="P171"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88" draw:text-style-name="P171"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8" draw:text-style-name="P171"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88" draw:text-style-name="P171" draw:layer="layout" svg:width="0.113cm" svg:height="0.29cm" svg:x="-16.968cm" svg:y="90.242cm" svg:viewBox="0 0 114 291" svg:d="M114 286c-13 3-27 5-40 5-31 0-47-18-47-53v-157h-27v-29h29l11-52h26v52h44v29h-44v148c0 12 2 20 6 24 3 4 10 7 19 7 5 0 12-1 23-3z">
            <text:p/>
          </draw:path>
          <draw:path draw:style-name="gr588" draw:text-style-name="P171" draw:layer="layout" svg:width="0.11cm" svg:height="0.238cm" svg:x="-16.821cm" svg:y="90.291cm" svg:viewBox="0 0 111 239" svg:d="M1 239v-180c0-17 0-35-1-55h37c1 27 1 43 1 48h2c6-20 13-34 21-41s20-11 34-11c5 0 10 1 16 2v36c-5-2-12-2-21-2-16 0-28 7-37 20-9 15-13 35-13 61v122z">
            <text:p/>
          </draw:path>
          <draw:path draw:style-name="gr588" draw:text-style-name="P171"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8" draw:text-style-name="P171" draw:layer="layout" svg:width="0.038cm" svg:height="0.321cm" svg:x="-16.426cm" svg:y="90.208cm" svg:viewBox="0 0 39 322" svg:d="M0 322c0-107 0-215 0-322 13 0 26 0 39 0 0 107 0 215 0 322-13 0-26 0-39 0z">
            <text:p/>
          </draw:path>
          <draw:path draw:style-name="gr588" draw:text-style-name="P171" draw:layer="layout" svg:width="0.038cm" svg:height="0.321cm" svg:x="-16.328cm" svg:y="90.208cm" svg:viewBox="0 0 39 322" svg:d="M0 322c0-107 0-215 0-322 13 0 26 0 39 0 0 107 0 215 0 322-13 0-26 0-39 0z">
            <text:p/>
          </draw:path>
          <draw:path draw:style-name="gr588" draw:text-style-name="P171"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88" draw:text-style-name="P171" draw:layer="layout" svg:width="0.11cm" svg:height="0.238cm" svg:x="-15.983cm" svg:y="90.291cm" svg:viewBox="0 0 111 239" svg:d="M1 239v-180c0-17 0-35-1-55h37c1 27 1 43 1 48h2c6-20 13-34 21-41s20-11 34-11c5 0 10 1 16 2v36c-5-2-12-2-21-2-16 0-28 7-37 20-9 15-13 35-13 61v122z">
            <text:p/>
          </draw:path>
          <draw:path draw:style-name="gr589" draw:text-style-name="P171"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89" draw:text-style-name="P171"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89" draw:text-style-name="P171" draw:layer="layout" svg:width="0.113cm" svg:height="0.29cm" svg:x="-16.887cm" svg:y="90.864cm" svg:viewBox="0 0 114 291" svg:d="M114 286c-13 3-27 5-40 5-31 0-47-18-47-53v-157h-27v-29h29l11-52h26v52h44v29h-44v148c0 12 2 20 6 24 3 4 10 7 19 7 5 0 12-1 23-3z">
            <text:p/>
          </draw:path>
          <draw:path draw:style-name="gr589" draw:text-style-name="P171"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89" draw:text-style-name="P171"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89" draw:text-style-name="P171" draw:layer="layout" svg:width="0.113cm" svg:height="0.29cm" svg:x="-16.27cm" svg:y="90.864cm" svg:viewBox="0 0 114 291" svg:d="M114 286c-13 3-27 5-40 5-31 0-47-18-47-53v-157h-27v-29h29l11-52h26v52h44v29h-44v148c0 12 2 20 6 24 3 4 10 7 19 7 5 0 12-1 23-3z">
            <text:p/>
          </draw:path>
        </draw:g>
        <draw:path draw:style-name="gr584" draw:text-style-name="P172"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4" draw:text-style-name="P172" draw:layer="layout" svg:width="0.205cm" svg:height="0.517cm" svg:x="-16.895cm" svg:y="91.749cm" svg:viewBox="0 0 206 518" svg:d="M206 0c-105 92-157 203-157 332 0 70 19 132 56 186h-47c-39-54-58-117-58-191 0-67 14-128 41-184 27-55 66-103 118-143z">
          <text:p/>
        </draw:path>
        <draw:path draw:style-name="gr584" draw:text-style-name="P172"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4" draw:text-style-name="P172" draw:layer="layout" svg:width="0.205cm" svg:height="0.517cm" svg:x="-16.636cm" svg:y="91.749cm" svg:viewBox="0 0 206 518" svg:d="M0 518c105-92 157-203 157-332 0-70-19-132-56-186h47c39 54 58 117 58 191 0 67-14 128-41 184-27 55-66 103-118 143z">
          <text:p/>
        </draw:path>
        <draw:path draw:style-name="gr577" draw:text-style-name="P5" draw:layer="layout" svg:width="1.692cm" svg:height="0cm" svg:x="-17.52cm" svg:y="92.706cm" svg:viewBox="0 0 1693 0" svg:d="M0 0c564 0 1129 0 1693 0">
          <text:p/>
        </draw:path>
        <draw:path draw:style-name="gr578" draw:text-style-name="P173" draw:layer="layout" svg:width="0.317cm" svg:height="0.316cm" svg:x="-16.092cm" svg:y="92.547cm" svg:viewBox="0 0 318 317" svg:d="M0 0c106 53 212 106 318 159-106 53-212 105-318 158 0-106 0-211 0-317z">
          <text:p/>
        </draw:path>
        <draw:path draw:style-name="gr578" draw:text-style-name="P173" draw:layer="layout" svg:width="0.317cm" svg:height="0.316cm" svg:x="-16.092cm" svg:y="92.547cm" svg:viewBox="0 0 318 317" svg:d="M0 0c106 53 212 106 318 159-106 53-212 105-318 158 0-106 0-211 0-317z">
          <text:p/>
        </draw:path>
        <draw:path draw:style-name="gr578" draw:text-style-name="P173" draw:layer="layout" svg:width="0.317cm" svg:height="0.316cm" svg:x="-16.092cm" svg:y="92.547cm" svg:viewBox="0 0 318 317" svg:d="M0 0c106 53 212 106 318 159-106 53-212 105-318 158 0-106 0-211 0-317z">
          <text:p/>
        </draw:path>
        <draw:path draw:style-name="gr590" draw:text-style-name="P178" draw:layer="layout" svg:width="4.1cm" svg:height="1.772cm" svg:x="-15.721cm" svg:y="91.595cm" svg:viewBox="0 0 4101 1773" svg:d="M0 0c1367 0 2734 0 4101 0 0 591 0 1182 0 1773-1367 0-2734 0-4101 0 0-591 0-1182 0-1773z">
          <text:p/>
        </draw:path>
        <draw:path draw:style-name="gr591" draw:text-style-name="P179" draw:layer="layout" svg:width="4.1cm" svg:height="1.772cm" svg:x="-15.721cm" svg:y="91.595cm" svg:viewBox="0 0 4101 1773" svg:d="M0 0c1367 0 2734 0 4101 0 0 591 0 1182 0 1773-1367 0-2734 0-4101 0 0-591 0-1182 0-1773z">
          <text:p/>
        </draw:path>
        <draw:g draw:style-name="gr23">
          <draw:path draw:style-name="gr592" draw:text-style-name="P177" draw:layer="layout" svg:width="0.43cm" svg:height="0.447cm" svg:x="-14.995cm" svg:y="92.224cm" svg:viewBox="0 0 431 448" svg:d="M370 448l-51-131h-205l-51 131h-63l183-448h69l179 448zM216 46l-3 8c-5 18-13 41-23 68l-57 148h167l-58-148c-5-15-11-32-17-50z">
            <text:p/>
          </draw:path>
          <draw:path draw:style-name="gr592" draw:text-style-name="P177"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2" draw:text-style-name="P177" draw:layer="layout" svg:width="0.165cm" svg:height="0.425cm" svg:x="-14.227cm" svg:y="92.251cm" svg:viewBox="0 0 166 426" svg:d="M166 418c-18 5-38 8-58 8-46 0-68-26-68-78v-229h-40v-42h42l17-77h38v77h64v42h-64v216c0 17 2 29 8 36 6 6 14 9 28 9 8 0 19-1 33-4z">
            <text:p/>
          </draw:path>
          <draw:path draw:style-name="gr592" draw:text-style-name="P177"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2" draw:text-style-name="P177"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2" draw:text-style-name="P177" draw:layer="layout" svg:width="0.165cm" svg:height="0.425cm" svg:x="-13.322cm" svg:y="92.251cm" svg:viewBox="0 0 166 426" svg:d="M166 418c-18 5-38 8-58 8-46 0-68-26-68-78v-229h-40v-42h42l17-77h38v77h64v42h-64v216c0 17 2 29 8 36 6 6 14 9 28 9 8 0 19-1 33-4z">
            <text:p/>
          </draw:path>
          <draw:path draw:style-name="gr592" draw:text-style-name="P177"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2" draw:text-style-name="P177"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3" draw:text-style-name="P171"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3" draw:text-style-name="P171"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3" draw:text-style-name="P171"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3" draw:text-style-name="P171" draw:layer="layout" svg:width="0.125cm" svg:height="0.322cm" svg:x="-10.922cm" svg:y="90.298cm" svg:viewBox="0 0 126 323" svg:d="M126 317c-14 4-29 6-44 6-34 0-52-19-52-59v-174h-30v-32h32l13-58h28v58h49v32h-49v165c0 12 2 21 7 27 4 4 11 7 21 7 6 0 14-1 25-4z">
            <text:p/>
          </draw:path>
          <draw:path draw:style-name="gr593" draw:text-style-name="P171"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3" draw:text-style-name="P171"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3" draw:text-style-name="P171" draw:layer="layout" svg:width="0.045cm" svg:height="0.339cm" svg:x="-11.43cm" svg:y="90.97cm" svg:viewBox="0 0 46 340" svg:d="M0 340c0-114 0-226 0-340 16 0 31 0 46 0 0 114 0 226 0 340-15 0-30 0-46 0z">
            <text:p/>
          </draw:path>
          <draw:path draw:style-name="gr583" draw:text-style-name="P171"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3" draw:text-style-name="P171"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3" draw:text-style-name="P171"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3" draw:text-style-name="P171" draw:layer="layout" svg:width="0.125cm" svg:height="0.322cm" svg:x="-10.509cm" svg:y="90.99cm" svg:viewBox="0 0 126 323" svg:d="M126 317c-14 4-29 6-44 6-34 0-52-19-52-59v-174h-30v-32h32l13-58h28v58h49v32h-49v165c0 12 2 21 7 27 4 4 11 7 21 7 6 0 14-1 25-4z">
            <text:p/>
          </draw:path>
        </draw:g>
        <draw:path draw:style-name="gr594" draw:text-style-name="P172"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95" draw:text-style-name="P180"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96" draw:text-style-name="P172" draw:layer="layout" svg:width="0.205cm" svg:height="0.517cm" svg:x="-10.775cm" svg:y="91.749cm" svg:viewBox="0 0 206 518" svg:d="M206 0c-105 92-157 203-157 332 0 70 19 132 56 186h-47c-39-54-58-117-58-191 0-67 14-128 41-184 27-55 66-103 118-143z">
          <text:p/>
        </draw:path>
        <draw:path draw:style-name="gr596" draw:text-style-name="P172"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96" draw:text-style-name="P172" draw:layer="layout" svg:width="0.205cm" svg:height="0.517cm" svg:x="-10.516cm" svg:y="91.749cm" svg:viewBox="0 0 206 518" svg:d="M0 518c105-92 157-203 157-332 0-70-19-132-56-186h47c39 54 58 117 58 191 0 67-14 128-41 184-27 55-66 103-118 143z">
          <text:p/>
        </draw:path>
        <draw:path draw:style-name="gr577" draw:text-style-name="P5" draw:layer="layout" svg:width="2.3cm" svg:height="0cm" svg:x="-11.621cm" svg:y="92.706cm" svg:viewBox="0 0 2301 0" svg:d="M0 0c767 0 1534 0 2301 0">
          <text:p/>
        </draw:path>
        <draw:path draw:style-name="gr578" draw:text-style-name="P173" draw:layer="layout" svg:width="0.316cm" svg:height="0.316cm" svg:x="-9.584cm" svg:y="92.547cm" svg:viewBox="0 0 317 317" svg:d="M0 0c106 53 211 106 317 159-106 53-211 105-317 158 0-106 0-211 0-317z">
          <text:p/>
        </draw:path>
        <draw:path draw:style-name="gr578" draw:text-style-name="P173" draw:layer="layout" svg:width="0.316cm" svg:height="0.316cm" svg:x="-9.584cm" svg:y="92.547cm" svg:viewBox="0 0 317 317" svg:d="M0 0c106 53 211 106 317 159-106 53-211 105-317 158 0-106 0-211 0-317z">
          <text:p/>
        </draw:path>
        <draw:path draw:style-name="gr578" draw:text-style-name="P173" draw:layer="layout" svg:width="0.316cm" svg:height="0.316cm" svg:x="-9.584cm" svg:y="92.547cm" svg:viewBox="0 0 317 317" svg:d="M0 0c106 53 211 106 317 159-106 53-211 105-317 158 0-106 0-211 0-317z">
          <text:p/>
        </draw:path>
        <draw:path draw:style-name="gr578" draw:text-style-name="P173" draw:layer="layout" svg:width="0.316cm" svg:height="0.316cm" svg:x="-9.584cm" svg:y="92.547cm" svg:viewBox="0 0 317 317" svg:d="M0 0c106 53 211 106 317 159-106 53-211 105-317 158 0-106 0-211 0-317z">
          <text:p/>
        </draw:path>
        <draw:g draw:style-name="gr23">
          <draw:path draw:style-name="gr597" draw:text-style-name="P171"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97" draw:text-style-name="P171" draw:layer="layout" svg:width="0.049cm" svg:height="0.357cm" svg:x="-9.082cm" svg:y="88.46cm" svg:viewBox="0 0 50 358" svg:d="M0 42c0-14 0-28 0-42 16 0 33 0 50 0 0 14 0 28 0 42-17 0-34 0-50 0zM0 358c0-88 0-174 0-261 16 0 33 0 50 0 0 87 0 173 0 261-17 0-34 0-50 0z">
            <text:p/>
          </draw:path>
          <draw:path draw:style-name="gr597" draw:text-style-name="P171"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97" draw:text-style-name="P171" draw:layer="layout" svg:width="0.144cm" svg:height="0.322cm" svg:x="-8.703cm" svg:y="88.498cm" svg:viewBox="0 0 145 323" svg:d="M145 317c-17 3-34 6-51 6-39 0-60-20-60-59v-175h-34v-31h37l14-58h33v58h56v31h-56v165c0 13 3 22 8 27 4 4 12 7 24 7 6 0 16-1 29-3z">
            <text:p/>
          </draw:path>
          <draw:path draw:style-name="gr597" draw:text-style-name="P171"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97" draw:text-style-name="P171" draw:layer="layout" svg:width="0.14cm" svg:height="0.264cm" svg:x="-8.202cm" svg:y="88.552cm" svg:viewBox="0 0 141 265" svg:d="M2 265v-199c0-19-1-39-2-62h47c2 30 2 48 2 54h2c7-22 17-38 27-46s25-12 44-12c6 0 12 1 19 2v40c-6-2-15-3-26-3-21 0-36 9-47 24s-17 38-17 67v135z">
            <text:p/>
          </draw:path>
          <draw:path draw:style-name="gr597" draw:text-style-name="P171"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97" draw:text-style-name="P171"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97" draw:text-style-name="P171"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97" draw:text-style-name="P171"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97" draw:text-style-name="P171"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4" draw:text-style-name="P172"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4" draw:text-style-name="P172" draw:layer="layout" svg:width="0.205cm" svg:height="0.517cm" svg:x="-7.61cm" svg:y="89.765cm" svg:viewBox="0 0 206 518" svg:d="M206 0c-105 92-157 203-157 332 0 70 19 132 56 186h-47c-39-54-58-117-58-191 0-67 14-128 41-184 27-55 66-103 118-143z">
          <text:p/>
        </draw:path>
        <draw:path draw:style-name="gr584" draw:text-style-name="P172"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4" draw:text-style-name="P172" draw:layer="layout" svg:width="0.205cm" svg:height="0.517cm" svg:x="-7.351cm" svg:y="89.765cm" svg:viewBox="0 0 206 518" svg:d="M0 518c105-92 157-203 157-332 0-70-19-132-56-186h47c39 54 58 117 58 191 0 67-14 128-41 184-27 55-66 103-118 143z">
          <text:p/>
        </draw:path>
        <draw:path draw:style-name="gr598" draw:text-style-name="P5" draw:layer="layout" svg:width="2.3cm" svg:height="0cm" draw:transform="rotate (-1.5707963267949) translate (-8.0757565784782cm 89.0559062241644cm)" svg:viewBox="0 0 2301 0" svg:d="M0 0c767 0 1534 0 2301 0">
          <text:p/>
        </draw:path>
        <draw:path draw:style-name="gr599" draw:text-style-name="P181" draw:layer="layout" svg:width="0.317cm" svg:height="0.316cm" svg:x="-8.235cm" svg:y="91.093cm" svg:viewBox="0 0 318 317" svg:d="M318 0c-53 106-106 211-159 317-53-106-106-211-159-317 106 0 212 0 318 0z">
          <text:p/>
        </draw:path>
        <draw:path draw:style-name="gr600" draw:text-style-name="P182" draw:layer="layout" svg:width="4.497cm" svg:height="1.772cm" svg:x="-9.214cm" svg:y="91.595cm" svg:viewBox="0 0 4498 1773" svg:d="M0 0c1499 0 2999 0 4498 0 0 591 0 1182 0 1773-1499 0-2999 0-4498 0 0-591 0-1182 0-1773z">
          <text:p/>
        </draw:path>
        <draw:path draw:style-name="gr601" draw:text-style-name="P183" draw:layer="layout" svg:width="4.497cm" svg:height="1.772cm" svg:x="-9.214cm" svg:y="91.595cm" svg:viewBox="0 0 4498 1773" svg:d="M0 0c1499 0 2999 0 4498 0 0 591 0 1182 0 1773-1499 0-2999 0-4498 0 0-591 0-1182 0-1773z">
          <text:p/>
        </draw:path>
        <draw:path draw:style-name="gr602" draw:text-style-name="P172"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2" draw:text-style-name="P172" draw:layer="layout" svg:width="0.205cm" svg:height="0.517cm" svg:x="-4.175cm" svg:y="91.749cm" svg:viewBox="0 0 206 518" svg:d="M206 0c-105 92-157 203-157 332 0 70 19 132 56 186h-47c-39-54-58-117-58-191 0-67 14-128 41-184 27-55 66-103 118-143z">
          <text:p/>
        </draw:path>
        <draw:path draw:style-name="gr602" draw:text-style-name="P172"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2" draw:text-style-name="P172" draw:layer="layout" svg:width="0.205cm" svg:height="0.517cm" svg:x="-3.916cm" svg:y="91.749cm" svg:viewBox="0 0 206 518" svg:d="M0 518c105-92 157-203 157-332 0-70-19-132-56-186h47c39 54 58 117 58 191 0 67-14 128-41 184-27 55-66 103-118 143z">
          <text:p/>
        </draw:path>
        <draw:path draw:style-name="gr577" draw:text-style-name="P5" draw:layer="layout" svg:width="3.095cm" svg:height="0cm" svg:x="-4.716cm" svg:y="92.706cm" svg:viewBox="0 0 3096 0" svg:d="M0 0c1032 0 2064 0 3096 0">
          <text:p/>
        </draw:path>
        <draw:path draw:style-name="gr578" draw:text-style-name="P173" draw:layer="layout" svg:width="0.317cm" svg:height="0.316cm" svg:x="-1.885cm" svg:y="92.547cm" svg:viewBox="0 0 318 317" svg:d="M0 0c106 53 212 106 318 159-106 53-212 105-318 158 0-106 0-211 0-317z">
          <text:p/>
        </draw:path>
        <draw:path draw:style-name="gr578" draw:text-style-name="P173" draw:layer="layout" svg:width="0.317cm" svg:height="0.316cm" svg:x="-1.885cm" svg:y="92.547cm" svg:viewBox="0 0 318 317" svg:d="M0 0c106 53 212 106 318 159-106 53-212 105-318 158 0-106 0-211 0-317z">
          <text:p/>
        </draw:path>
        <draw:path draw:style-name="gr578" draw:text-style-name="P173" draw:layer="layout" svg:width="0.317cm" svg:height="0.316cm" svg:x="-1.885cm" svg:y="92.547cm" svg:viewBox="0 0 318 317" svg:d="M0 0c106 53 212 106 318 159-106 53-212 105-318 158 0-106 0-211 0-317z">
          <text:p/>
        </draw:path>
        <draw:path draw:style-name="gr578" draw:text-style-name="P173" draw:layer="layout" svg:width="0.317cm" svg:height="0.316cm" svg:x="-1.885cm" svg:y="92.547cm" svg:viewBox="0 0 318 317" svg:d="M0 0c106 53 212 106 318 159-106 53-212 105-318 158 0-106 0-211 0-317z">
          <text:p/>
        </draw:path>
        <draw:path draw:style-name="gr578" draw:text-style-name="P173" draw:layer="layout" svg:width="0.317cm" svg:height="0.316cm" svg:x="-1.885cm" svg:y="92.547cm" svg:viewBox="0 0 318 317" svg:d="M0 0c106 53 212 106 318 159-106 53-212 105-318 158 0-106 0-211 0-317z">
          <text:p/>
        </draw:path>
        <draw:path draw:style-name="gr577" draw:text-style-name="P5" draw:layer="layout" svg:width="7.169cm" svg:height="2.406cm" svg:x="-10.272cm" svg:y="92.706cm" svg:viewBox="0 0 7170 2407" svg:d="M7170 0c0 802 0 1604 0 2407-2390 0-4780 0-7170 0">
          <text:p/>
        </draw:path>
        <draw:path draw:style-name="gr578" draw:text-style-name="P173" draw:layer="layout" svg:width="0.317cm" svg:height="0.317cm" svg:x="-10.325cm" svg:y="94.954cm" svg:viewBox="0 0 318 318" svg:d="M318 318c-106-53-212-106-318-159 106-53 212-106 318-159 0 106 0 212 0 318z">
          <text:p/>
        </draw:path>
        <draw:path draw:style-name="gr578" draw:text-style-name="P173" draw:layer="layout" svg:width="0.317cm" svg:height="0.317cm" svg:x="-10.325cm" svg:y="94.954cm" svg:viewBox="0 0 318 318" svg:d="M318 318c-106-53-212-106-318-159 106-53 212-106 318-159 0 106 0 212 0 318z">
          <text:p/>
        </draw:path>
        <draw:path draw:style-name="gr578" draw:text-style-name="P173" draw:layer="layout" svg:width="0.317cm" svg:height="0.317cm" svg:x="-10.325cm" svg:y="94.954cm" svg:viewBox="0 0 318 318" svg:d="M318 318c-106-53-212-106-318-159 106-53 212-106 318-159 0 106 0 212 0 318z">
          <text:p/>
        </draw:path>
        <draw:path draw:style-name="gr578" draw:text-style-name="P173" draw:layer="layout" svg:width="0.317cm" svg:height="0.317cm" svg:x="-10.325cm" svg:y="94.954cm" svg:viewBox="0 0 318 318" svg:d="M318 318c-106-53-212-106-318-159 106-53 212-106 318-159 0 106 0 212 0 318z">
          <text:p/>
        </draw:path>
        <draw:path draw:style-name="gr578" draw:text-style-name="P173" draw:layer="layout" svg:width="0.317cm" svg:height="0.317cm" svg:x="-10.325cm" svg:y="94.954cm" svg:viewBox="0 0 318 318" svg:d="M318 318c-106-53-212-106-318-159 106-53 212-106 318-159 0 106 0 212 0 318z">
          <text:p/>
        </draw:path>
        <draw:path draw:style-name="gr578" draw:text-style-name="P173" draw:layer="layout" svg:width="0.317cm" svg:height="0.317cm" svg:x="-10.325cm" svg:y="94.954cm" svg:viewBox="0 0 318 318" svg:d="M318 318c-106-53-212-106-318-159 106-53 212-106 318-159 0 106 0 212 0 318z">
          <text:p/>
        </draw:path>
        <draw:path draw:style-name="gr603" draw:text-style-name="P184" draw:layer="layout" svg:width="5.185cm" svg:height="1.533cm" svg:x="-15.536cm" svg:y="94.346cm" svg:viewBox="0 0 5186 1534" svg:d="M0 0c1729 0 3457 0 5186 0 0 511 0 1023 0 1534-1729 0-3457 0-5186 0 0-511 0-1023 0-1534z">
          <text:p/>
        </draw:path>
        <draw:path draw:style-name="gr604" draw:text-style-name="P185" draw:layer="layout" svg:width="5.185cm" svg:height="1.533cm" svg:x="-15.536cm" svg:y="94.346cm" svg:viewBox="0 0 5186 1534" svg:d="M0 0c1729 0 3457 0 5186 0 0 511 0 1023 0 1534-1729 0-3457 0-5186 0 0-511 0-1023 0-1534z">
          <text:p/>
        </draw:path>
        <draw:g draw:style-name="gr23">
          <draw:path draw:style-name="gr605" draw:text-style-name="P177"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05" draw:text-style-name="P177"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05" draw:text-style-name="P177"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05" draw:text-style-name="P177"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05" draw:text-style-name="P177"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05" draw:text-style-name="P177" draw:layer="layout" svg:width="0.184cm" svg:height="0.398cm" svg:x="-12.073cm" svg:y="94.987cm" svg:viewBox="0 0 185 399" svg:d="M2 399v-301c0-27-1-57-2-91h62c1 45 2 71 2 80h2c10-33 22-56 36-69 13-12 32-18 57-18 9 0 17 1 26 4v59c-8-2-20-3-34-3-27 0-48 11-62 35-15 23-22 56-22 100v204z">
            <text:p/>
          </draw:path>
        </draw:g>
        <draw:path draw:style-name="gr577" draw:text-style-name="P5" draw:layer="layout" svg:width="9.127cm" svg:height="1.904cm" svg:x="-24.664cm" svg:y="93.208cm" svg:viewBox="0 0 9128 1905" svg:d="M9128 1905c-3043 0-6085 0-9128 0 0-635 0-1270 0-1905">
          <text:p/>
        </draw:path>
        <draw:path draw:style-name="gr578" draw:text-style-name="P173" draw:layer="layout" svg:width="0.317cm" svg:height="0.317cm" svg:x="-24.823cm" svg:y="93.155cm" svg:viewBox="0 0 318 318" svg:d="M0 318c53-106 106-212 159-318 53 106 106 212 159 318-106 0-212 0-318 0z">
          <text:p/>
        </draw:path>
        <draw:path draw:style-name="gr578" draw:text-style-name="P173" draw:layer="layout" svg:width="0.317cm" svg:height="0.317cm" svg:x="-24.823cm" svg:y="93.155cm" svg:viewBox="0 0 318 318" svg:d="M0 318c53-106 106-212 159-318 53 106 106 212 159 318-106 0-212 0-318 0z">
          <text:p/>
        </draw:path>
        <draw:path draw:style-name="gr578" draw:text-style-name="P173" draw:layer="layout" svg:width="0.317cm" svg:height="0.317cm" svg:x="-24.823cm" svg:y="93.155cm" svg:viewBox="0 0 318 318" svg:d="M0 318c53-106 106-212 159-318 53 106 106 212 159 318-106 0-212 0-318 0z">
          <text:p/>
        </draw:path>
        <draw:path draw:style-name="gr578" draw:text-style-name="P173" draw:layer="layout" svg:width="0.317cm" svg:height="0.317cm" svg:x="-24.823cm" svg:y="93.155cm" svg:viewBox="0 0 318 318" svg:d="M0 318c53-106 106-212 159-318 53 106 106 212 159 318-106 0-212 0-318 0z">
          <text:p/>
        </draw:path>
        <draw:path draw:style-name="gr578" draw:text-style-name="P173" draw:layer="layout" svg:width="0.317cm" svg:height="0.317cm" svg:x="-24.823cm" svg:y="93.155cm" svg:viewBox="0 0 318 318" svg:d="M0 318c53-106 106-212 159-318 53 106 106 212 159 318-106 0-212 0-318 0z">
          <text:p/>
        </draw:path>
        <draw:path draw:style-name="gr578" draw:text-style-name="P173" draw:layer="layout" svg:width="0.317cm" svg:height="0.317cm" svg:x="-24.823cm" svg:y="93.155cm" svg:viewBox="0 0 318 318" svg:d="M0 318c53-106 106-212 159-318 53 106 106 212 159 318-106 0-212 0-318 0z">
          <text:p/>
        </draw:path>
        <draw:path draw:style-name="gr578" draw:text-style-name="P173" draw:layer="layout" svg:width="0.317cm" svg:height="0.317cm" svg:x="-24.823cm" svg:y="93.155cm" svg:viewBox="0 0 318 318" svg:d="M0 318c53-106 106-212 159-318 53 106 106 212 159 318-106 0-212 0-318 0z">
          <text:p/>
        </draw:path>
        <draw:g draw:style-name="gr23">
          <draw:path draw:style-name="gr606" draw:text-style-name="P171"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06" draw:text-style-name="P171"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6" draw:text-style-name="P171"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06" draw:text-style-name="P171"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06" draw:text-style-name="P171"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6" draw:text-style-name="P171" draw:layer="layout" svg:width="0.116cm" svg:height="0.25cm" svg:x="-20.632cm" svg:y="94.666cm" svg:viewBox="0 0 117 251" svg:d="M1 251v-189c0-17 0-37-1-58h39c1 28 1 45 1 51h2c6-21 14-36 22-44 9-7 21-11 36-11 5 0 11 1 17 2v38c-5-2-13-3-22-3-17 0-30 8-39 22-9 15-14 36-14 64v128z">
            <text:p/>
          </draw:path>
          <draw:path draw:style-name="gr606" draw:text-style-name="P171"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6" draw:text-style-name="P171"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06" draw:text-style-name="P171"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06" draw:text-style-name="P171"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6" draw:text-style-name="P171" draw:layer="layout" svg:width="0.118cm" svg:height="0.305cm" svg:x="-19.23cm" svg:y="94.615cm" svg:viewBox="0 0 119 306" svg:d="M119 300c-13 4-27 6-41 6-33 0-50-19-50-56v-165h-28v-30h30l12-55h27v55h46v30h-46v156c0 12 2 20 7 25 3 5 10 7 19 7 6 0 14-1 24-3z">
            <text:p/>
          </draw:path>
          <draw:path draw:style-name="gr606" draw:text-style-name="P171"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06" draw:text-style-name="P171"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6" draw:text-style-name="P171" draw:layer="layout" svg:width="0.118cm" svg:height="0.305cm" svg:x="-18.581cm" svg:y="94.615cm" svg:viewBox="0 0 119 306" svg:d="M119 300c-13 4-27 6-41 6-33 0-50-19-50-56v-165h-28v-30h30l12-55h27v55h46v30h-46v156c0 12 2 20 7 25 3 5 10 7 19 7 6 0 14-1 24-3z">
            <text:p/>
          </draw:path>
        </draw:g>
        <draw:path draw:style-name="gr607" draw:text-style-name="P172"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08" draw:text-style-name="P180"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96" draw:text-style-name="P172" draw:layer="layout" svg:width="0.205cm" svg:height="0.517cm" svg:x="-19.717cm" svg:y="95.399cm" svg:viewBox="0 0 206 518" svg:d="M206 0c-105 92-157 203-157 332 0 70 19 132 56 186h-47c-39-54-58-117-58-191 0-67 14-128 41-184 27-55 66-103 118-143z">
          <text:p/>
        </draw:path>
        <draw:path draw:style-name="gr596" draw:text-style-name="P172"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96" draw:text-style-name="P172" draw:layer="layout" svg:width="0.205cm" svg:height="0.517cm" svg:x="-19.458cm" svg:y="95.399cm" svg:viewBox="0 0 206 518" svg:d="M0 518c105-92 157-203 157-332 0-70-19-132-56-186h47c39 54 58 117 58 191 0 67-14 128-41 184-27 55-66 103-118 143z">
          <text:p/>
        </draw:path>
        <draw:frame draw:style-name="gr609" draw:text-style-name="P186" draw:layer="layout" svg:width="2.196cm" svg:height="0.962cm" svg:x="-8.062cm" svg:y="91.966cm">
          <draw:text-box>
            <text:p><text:span text:style-name="T57">Robot</text:span></text:p>
          </draw:text-box>
        </draw:frame>
        <draw:g draw:style-name="gr31">
          <draw:custom-shape draw:style-name="gr610" draw:text-style-name="P41" xml:id="id480" draw:id="id480" draw:layer="layout" svg:width="0.613cm" svg:height="1.825cm" draw:transform="rotate (-1.5707963267949) translate (-15.463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11" draw:text-style-name="P126" xml:id="id481" draw:id="id481" draw:layer="layout" svg:width="4.644cm" svg:height="2.896cm" svg:x="-17.653cm" svg:y="101.617cm">
            <draw:text-box>
              <text:p text:style-name="P30"><text:span text:style-name="T58">Replace with</text:span><text:span text:style-name="T58"><text:line-break/></text:span><text:span text:style-name="T58">discrepancy value</text:span><text:span text:style-name="T58"><text:line-break/></text:span><text:span text:style-name="T58">(Wasserstein)</text:span><text:span text:style-name="T58"><text:line-break/></text:span><text:span text:style-name="T58">or</text:span><text:span text:style-name="T58"><text:line-break/></text:span><text:span text:style-name="T58">pose</text:span></text:p>
            </draw:text-box>
          </draw:frame>
          <draw:custom-shape draw:style-name="gr612" draw:text-style-name="P41" xml:id="id482" draw:id="id482" draw:layer="layout" svg:width="0.613cm" svg:height="1.419cm" draw:transform="rotate (-1.5707963267949) translate (-13.55cm 10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3" draw:text-style-name="P15" draw:layer="layout" draw:type="curve" svg:x1="-16.375cm" svg:y1="100.902cm" svg:x2="-15.331cm" svg:y2="101.617cm" draw:start-shape="id480" draw:start-glue-point="6" draw:end-shape="id481" draw:end-glue-point="0" svg:d="M-16375 100902c0 537 1044 180 1044 715" svg:viewBox="0 0 1045 716">
            <text:p/>
          </draw:connector>
          <draw:connector draw:style-name="gr614" draw:text-style-name="P15" draw:layer="layout" draw:type="curve" svg:x1="-14.259cm" svg:y1="100.814cm" svg:x2="-15.331cm" svg:y2="101.617cm" draw:start-shape="id482" draw:start-glue-point="6" draw:end-shape="id481" draw:end-glue-point="0" svg:d="M-14259 100814c0 603-1072 202-1072 803" svg:viewBox="0 0 1073 804">
            <text:p/>
          </draw:connector>
          <draw:frame draw:style-name="gr615" draw:text-style-name="P38" draw:layer="layout" svg:width="4.869cm" svg:height="1.199cm" svg:x="-13.047cm" svg:y="100.641cm">
            <draw:text-box>
              <text:p>U<text:span text:style-name="T59">k is from the second derivative</text:span><text:span text:style-name="T59"><text:line-break/></text:span><text:span text:style-name="T59">(nu clustering is need for 2</text:span><text:span text:style-name="T60">nd</text:span><text:span text:style-name="T59"> derivative)</text:span></text:p>
            </draw:text-box>
          </draw:frame>
          <draw:frame draw:style-name="gr523" draw:text-style-name="P5" draw:layer="layout" svg:width="6.644cm" svg:height="1.142cm" svg:x="-18.551cm" svg:y="99.256cm">
            <draw:object xlink:href="./Object 5" xlink:type="simple" xlink:show="embed" xlink:actuate="onLoad">
              <loext:p/>
            </draw:object>
            <draw:image xlink:href="./ObjectReplacements/Object 5" xlink:type="simple" xlink:show="embed" xlink:actuate="onLoad"/>
          </draw:frame>
        </draw:g>
        <draw:rect draw:style-name="gr280" draw:text-style-name="P72" xml:id="id484" draw:id="id484" draw:layer="layout" svg:width="2.927cm" svg:height="1cm" svg:x="89.678cm" svg:y="57.757cm">
          <text:p text:style-name="P8"><text:span text:style-name="T27">remembering</text:span></text:p>
        </draw:rect>
        <draw:connector draw:style-name="gr293" draw:text-style-name="P15" draw:layer="layout" draw:type="curve" svg:x1="81.254cm" svg:y1="58.328cm" svg:x2="87.054cm" svg:y2="60.528cm" draw:start-shape="id252" draw:start-glue-point="2" draw:end-shape="id483" draw:end-glue-point="0" svg:d="M81254 58328c0 1650 5800 550 5800 2200" svg:viewBox="0 0 5801 2201">
          <text:p/>
        </draw:connector>
        <draw:connector draw:style-name="gr293" draw:text-style-name="P15" draw:layer="layout" draw:type="curve" svg:x1="86.058cm" svg:y1="54.174cm" svg:x2="91.141cm" svg:y2="57.757cm" draw:start-shape="id251" draw:start-glue-point="2" draw:end-shape="id484" draw:end-glue-point="0" svg:d="M86058 54174c0 2688 5083 897 5083 3583" svg:viewBox="0 0 5084 3584">
          <text:p/>
        </draw:connector>
        <draw:rect draw:style-name="gr41" draw:text-style-name="P5" xml:id="id485" draw:id="id485" draw:layer="layout" svg:width="2.47cm" svg:height="1.058cm" svg:x="89.113cm" svg:y="60.289cm">
          <text:p text:style-name="P5">By<text:line-break/>stimulus</text:p>
        </draw:rect>
        <draw:connector draw:style-name="gr293" draw:text-style-name="P15" draw:layer="layout" draw:type="curve" svg:x1="91.141cm" svg:y1="58.757cm" svg:x2="90.348cm" svg:y2="60.289cm" draw:start-shape="id484" draw:start-glue-point="2" draw:end-shape="id485" draw:end-glue-point="0" svg:d="M91141 58757c0 1149-793 383-793 1532" svg:viewBox="0 0 794 1533">
          <text:p/>
        </draw:connector>
        <draw:rect draw:style-name="gr41" draw:text-style-name="P5" xml:id="id486" draw:id="id486" draw:layer="layout" svg:width="2.47cm" svg:height="1.763cm" svg:x="92.113cm" svg:y="60.284cm">
          <text:p text:style-name="P5">Stimulus<text:line-break/>independent <text:line-break/>thought</text:p>
        </draw:rect>
        <draw:connector draw:style-name="gr293" draw:text-style-name="P15" draw:layer="layout" draw:type="curve" svg:x1="91.141cm" svg:y1="58.757cm" svg:x2="93.348cm" svg:y2="60.284cm" draw:start-shape="id484" draw:start-glue-point="2" draw:end-shape="id486" draw:end-glue-point="0" svg:d="M91141 58757c0 1146 2207 383 2207 1527" svg:viewBox="0 0 2208 1528">
          <text:p/>
        </draw:connector>
        <draw:rect draw:style-name="gr41" draw:text-style-name="P5" xml:id="id487" draw:id="id487" draw:layer="layout" svg:width="2.61cm" svg:height="1.235cm" svg:x="92.078cm" svg:y="63.246cm">
          <text:p text:style-name="P5">Mind<text:line-break/>wandering</text:p>
        </draw:rect>
        <draw:connector draw:style-name="gr293" draw:text-style-name="P15" draw:layer="layout" draw:type="curve" svg:x1="93.348cm" svg:y1="62.047cm" svg:x2="93.383cm" svg:y2="63.246cm" draw:start-shape="id486" draw:start-glue-point="2" draw:end-shape="id487" draw:end-glue-point="0" svg:d="M93348 62047c0 900 35 301 35 1199" svg:viewBox="0 0 36 1200">
          <text:p/>
        </draw:connector>
        <draw:connector draw:style-name="gr36" draw:text-style-name="P7" draw:layer="layout" draw:type="curve" svg:x1="-27.151cm" svg:y1="52.428cm" svg:x2="-25.649cm" svg:y2="51.138cm" draw:start-shape="id449" draw:start-glue-point="1" draw:end-shape="id488" draw:end-glue-point="3" svg:d="M-27151 52428c1128 0 377-1290 1502-1290" svg:viewBox="0 0 1503 1291">
          <text:p/>
        </draw:connector>
        <draw:custom-shape draw:name="comment box 1" draw:style-name="gr616" draw:text-style-name="P20" xml:id="id489" draw:id="id489"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7" draw:text-style-name="P133" xml:id="id490" draw:id="id490"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7" draw:text-style-name="P133" xml:id="id491" draw:id="id491"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80" draw:start-glue-point="3" draw:end-shape="id489" draw:end-glue-point="7" svg:d="M-40740 44855c-1263 0-411 1998-1705 1998" svg:viewBox="0 0 1706 1999">
          <text:p/>
        </draw:connector>
        <draw:connector draw:style-name="gr36" draw:text-style-name="P7" draw:layer="layout" draw:type="curve" svg:x1="-30.852cm" svg:y1="52.421cm" svg:x2="-29.549cm" svg:y2="52.428cm" draw:start-shape="id490" draw:start-glue-point="10" draw:end-shape="id449" draw:end-glue-point="3" svg:d="M-30852 52421c979 0 328 7 1303 7" svg:viewBox="0 0 1304 8">
          <text:p/>
        </draw:connector>
        <draw:connector draw:style-name="gr36" draw:text-style-name="P7" draw:layer="layout" draw:type="curve" svg:x1="-34.652cm" svg:y1="52.421cm" svg:x2="-33.526cm" svg:y2="52.421cm" draw:start-shape="id491" draw:start-glue-point="10" draw:end-shape="id490" draw:end-glue-point="6" svg:d="M-34652 52421h1126" svg:viewBox="0 0 1127 1">
          <text:p/>
        </draw:connector>
        <draw:connector draw:style-name="gr36" draw:text-style-name="P7" draw:layer="layout" draw:type="curve" svg:x1="-38.234cm" svg:y1="52.389cm" svg:x2="-37.326cm" svg:y2="52.421cm" draw:start-shape="id492" draw:start-glue-point="10" draw:end-shape="id491" draw:end-glue-point="6" svg:d="M-38234 52389c682 0 229 32 908 32" svg:viewBox="0 0 909 33">
          <text:p/>
        </draw:connector>
        <draw:g draw:style-name="gr31">
          <draw:rect draw:style-name="gr618" draw:text-style-name="P187" draw:layer="layout" svg:width="19.38cm" svg:height="1.608cm" svg:x="-39.952cm" svg:y="59.066cm">
            <text:p/>
          </draw:rect>
          <draw:rect draw:style-name="gr619" draw:text-style-name="P188" draw:layer="layout" svg:width="18.349cm" svg:height="1.608cm" svg:x="-34.991cm" svg:y="59.066cm">
            <text:p/>
          </draw:rect>
          <draw:g draw:style-name="gr31">
            <draw:custom-shape draw:style-name="gr34" draw:text-style-name="P26" xml:id="id494" draw:id="id494" draw:layer="layout" svg:width="0.891cm" svg:height="0.97cm" svg:x="-34.648cm" svg:y="59.423cm">
              <text:p text:style-name="P25"><text:span text:style-name="T12">L</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3" draw:id="id493" draw:layer="layout" svg:width="0.891cm" svg:height="0.97cm" svg:x="-32.647cm" svg:y="59.423cm">
              <text:p text:style-name="P25"><text:span text:style-name="T12">L</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93" draw:start-glue-point="6" draw:end-shape="id494" draw:end-glue-point="10" svg:d="M-32647 59908h-1110" svg:viewBox="0 0 1111 1">
              <text:p/>
            </draw:connector>
            <draw:custom-shape draw:style-name="gr34" draw:text-style-name="P26" xml:id="id496" draw:id="id496" draw:layer="layout" svg:width="0.891cm" svg:height="0.97cm" svg:x="-30.648cm" svg:y="59.423cm">
              <text:p text:style-name="P25"><text:span text:style-name="T12">L</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5" draw:id="id495" draw:layer="layout" svg:width="0.891cm" svg:height="0.97cm" svg:x="-28.647cm" svg:y="59.423cm">
              <text:p text:style-name="P25"><text:span text:style-name="T12">L</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5" draw:start-glue-point="6" draw:end-shape="id496" draw:end-glue-point="10" svg:d="M-28647 59908h-1110" svg:viewBox="0 0 1111 1">
              <text:p/>
            </draw:connector>
            <draw:connector draw:style-name="gr36" draw:text-style-name="P7" draw:layer="layout" draw:type="curve" svg:x1="-30.648cm" svg:y1="59.908cm" svg:x2="-31.756cm" svg:y2="59.908cm" draw:start-shape="id496" draw:start-glue-point="6" draw:end-shape="id493" draw:end-glue-point="10" svg:d="M-30648 59908h-1108" svg:viewBox="0 0 1109 1">
              <text:p/>
            </draw:connector>
            <draw:custom-shape draw:style-name="gr34" draw:text-style-name="P26" xml:id="id498" draw:id="id498" draw:layer="layout" svg:width="0.891cm" svg:height="0.97cm" svg:x="-23.648cm" svg:y="59.423cm">
              <text:p text:style-name="P25"><text:span text:style-name="T12">L</text:span><text:span text:style-name="T13">t+q</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7" draw:id="id497" draw:layer="layout" svg:width="0.891cm" svg:height="0.97cm" svg:x="-21.647cm" svg:y="59.423cm">
              <text:p text:style-name="P25"><text:span text:style-name="T12">L</text:span><text:span text:style-name="T13">t+q</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7" draw:start-glue-point="6" draw:end-shape="id498" draw:end-glue-point="10" svg:d="M-21647 59908h-1110" svg:viewBox="0 0 1111 1">
              <text:p/>
            </draw:connector>
            <draw:connector draw:style-name="gr489" draw:text-style-name="P7" draw:layer="layout" draw:type="curve" svg:x1="-24.061cm" svg:y1="59.867cm" svg:x2="-27.374cm" svg:y2="59.87cm" svg:d="M-24061 59867c-2484 0-828 3-3313 3" svg:viewBox="0 0 3314 4">
              <text:p/>
            </draw:connector>
            <draw:connector draw:style-name="gr48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L</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L</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9" draw:text-style-name="P7" draw:layer="layout" draw:type="curve" svg:x1="-17.866cm" svg:y1="59.873cm" svg:x2="-20.446cm" svg:y2="59.898cm" svg:d="M-17866 59873c-1933 0-644 25-2580 25" svg:viewBox="0 0 2581 26">
              <text:p/>
            </draw:connector>
          </draw:g>
          <draw:line draw:style-name="gr558" draw:text-style-name="P15" draw:layer="layout" svg:x1="-39.972cm" svg:y1="60.96cm" svg:x2="-16.587cm" svg:y2="60.919cm">
            <text:p/>
          </draw:line>
          <draw:frame draw:style-name="gr620" draw:text-style-name="P189" draw:layer="layout" svg:width="7.416cm" svg:height="1.038cm" svg:x="-30.706cm" svg:y="60.852cm">
            <draw:text-box>
              <text:p><text:span text:style-name="T61">Tran</text:span><text:span text:style-name="T61">sfor</text:span><text:span text:style-name="T61">mer </text:span><text:span text:style-name="T61">traini</text:span><text:span text:style-name="T61">ng</text:span></text:p>
            </draw:text-box>
          </draw:frame>
          <draw:connector draw:style-name="gr621" draw:text-style-name="P15" draw:layer="layout" draw:type="line" svg:x1="-34.912cm" svg:y1="58.563cm" svg:x2="-20.638cm" svg:y2="58.597cm" svg:d="M-34912 58563l14274 34" svg:viewBox="0 0 14275 35">
            <text:p/>
          </draw:connector>
          <draw:connector draw:style-name="gr622" draw:text-style-name="P15" draw:layer="layout" draw:type="line" svg:x1="-39.939cm" svg:y1="58.963cm" svg:x2="-20.658cm" svg:y2="58.917cm" svg:d="M-39939 58963l19281-46" svg:viewBox="0 0 19282 47">
            <text:p/>
          </draw:connector>
          <draw:frame draw:style-name="gr623" draw:text-style-name="P190" draw:layer="layout" svg:width="4.037cm" svg:height="0.645cm" svg:x="-28.867cm" svg:y="58.006cm">
            <draw:text-box>
              <text:p><text:span text:style-name="T12">Overlap (with length q)</text:span></text:p>
            </draw:text-box>
          </draw:frame>
          <draw:connector draw:style-name="gr622" draw:text-style-name="P15" draw:layer="layout" draw:type="line" svg:x1="-34.925cm" svg:y1="58.773cm" svg:x2="-16.591cm" svg:y2="58.773cm" svg:d="M-34925 58773h18334" svg:viewBox="0 0 18335 1">
            <text:p/>
          </draw:connector>
          <draw:frame draw:style-name="gr624" draw:text-style-name="P190" draw:layer="layout" svg:width="1.264cm" svg:height="0.645cm" svg:x="-38.08cm" svg:y="58.292cm">
            <draw:text-box>
              <text:p><text:span text:style-name="T12">input</text:span></text:p>
            </draw:text-box>
          </draw:frame>
          <draw:frame draw:style-name="gr625" draw:text-style-name="P190" draw:layer="layout" svg:width="1.479cm" svg:height="0.645cm" svg:x="-19.38cm" svg:y="58.093cm">
            <draw:text-box>
              <text:p><text:span text:style-name="T12">output</text:span></text:p>
            </draw:text-box>
          </draw:frame>
        </draw:g>
        <draw:custom-shape draw:name="comment box 2" draw:style-name="gr626" draw:text-style-name="P20" xml:id="id499" draw:id="id499"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396" draw:end-shape="id499" draw:end-glue-point="7" svg:d="M-13656 52577c0 1752-527 2627-1581 2627" svg:viewBox="0 0 1582 2628">
          <text:p/>
        </draw:connector>
        <draw:polygon draw:style-name="gr507" draw:text-style-name="P146" xml:id="id488" draw:id="id488" draw:layer="layout" svg:width="1.215cm" svg:height="1.383cm" svg:x="-25.649cm" svg:y="50.446cm" svg:viewBox="0 0 1216 1384" draw:points="1216,1384 0,971 0,325 1216,0">
          <text:p/>
        </draw:polygon>
        <draw:frame draw:style-name="gr627" draw:text-style-name="P191" draw:layer="layout" svg:width="1.669cm" svg:height="0.887cm" svg:x="-25.877cm" svg:y="50.683cm">
          <draw:text-box>
            <text:p text:style-name="P5"><text:span text:style-name="T49">Robot 1</text:span><text:span text:style-name="T49"><text:line-break/></text:span><text:span text:style-name="T49">decoders</text:span></text:p>
          </draw:text-box>
        </draw:frame>
        <draw:rect draw:style-name="gr41" draw:text-style-name="P19" xml:id="id449" draw:id="id449"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88" draw:start-glue-point="1" draw:end-shape="id401" draw:end-glue-point="3" svg:d="M-24433 51138c1050 0 339 351 1423 351" svg:viewBox="0 0 1424 352">
          <text:p/>
        </draw:connector>
        <draw:frame draw:style-name="gr628" draw:text-style-name="P167" draw:layer="layout" svg:width="1.563cm" svg:height="1.039cm" svg:x="-43.704cm" svg:y="39.88cm">
          <draw:text-box>
            <text:p><text:span text:style-name="T53">Pose</text:span></text:p>
          </draw:text-box>
        </draw:frame>
        <draw:frame draw:style-name="gr629" draw:text-style-name="P167" draw:layer="layout" svg:width="1.587cm" svg:height="0.645cm" svg:x="-44.104cm" svg:y="41.381cm">
          <draw:text-box>
            <text:p><text:span text:style-name="T53">LIDAR</text:span></text:p>
          </draw:text-box>
        </draw:frame>
        <draw:frame draw:style-name="gr629" draw:text-style-name="P167" draw:layer="layout" svg:width="1.587cm" svg:height="0.645cm" svg:x="-43.603cm" svg:y="42.982cm">
          <draw:text-box>
            <text:p><text:span text:style-name="T53">IMU</text:span></text:p>
          </draw:text-box>
        </draw:frame>
        <draw:frame draw:style-name="gr628" draw:text-style-name="P167" draw:layer="layout" svg:width="1.977cm" svg:height="1.039cm" svg:x="-44.002cm" svg:y="44.283cm">
          <draw:text-box>
            <text:p><text:span text:style-name="T53">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7" draw:text-style-name="P146" xml:id="id450" draw:id="id450" draw:layer="layout" svg:width="1.215cm" svg:height="1.383cm" svg:x="-25.491cm" svg:y="53.046cm" svg:viewBox="0 0 1216 1384" draw:points="1216,1384 0,971 0,325 1216,0">
          <text:p/>
        </draw:polygon>
        <draw:frame draw:style-name="gr627" draw:text-style-name="P191" draw:layer="layout" svg:width="1.669cm" svg:height="0.887cm" svg:x="-25.718cm" svg:y="53.295cm">
          <draw:text-box>
            <text:p text:style-name="P5"><text:span text:style-name="T49">Robot 2</text:span><text:span text:style-name="T49"><text:line-break/></text:span><text:span text:style-name="T49">decoders</text:span></text:p>
          </draw:text-box>
        </draw:frame>
        <draw:connector draw:style-name="gr36" draw:text-style-name="P7" draw:layer="layout" draw:type="curve" svg:x1="-24.275cm" svg:y1="53.738cm" svg:x2="-22.913cm" svg:y2="53.642cm" draw:start-shape="id450" draw:start-glue-point="1" draw:end-shape="id500" draw:end-glue-point="3" svg:d="M-24275 53738c1003 0 323-96 1362-96" svg:viewBox="0 0 1363 97">
          <text:p/>
        </draw:connector>
        <draw:frame draw:style-name="gr523" draw:text-style-name="P5" xml:id="id501" draw:id="id501"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90" draw:start-glue-point="4" draw:end-shape="id501" draw:end-glue-point="1" svg:d="M-32189 51936c0-1245 767-1037 1213-1381s571-1239-179-1239" svg:viewBox="0 0 1573 2621">
          <text:p/>
        </draw:connector>
        <draw:g draw:style-name="gr23">
          <draw:polygon draw:style-name="gr507" draw:text-style-name="P146" draw:layer="layout" svg:width="1.311cm" svg:height="1.383cm" svg:x="-32.916cm" svg:y="44.854cm" svg:viewBox="0 0 1312 1384" draw:points="1312,1384 0,792 0,591 1312,0">
            <text:p/>
          </draw:polygon>
          <draw:frame draw:style-name="gr630" draw:text-style-name="P192" draw:layer="layout" svg:width="1.732cm" svg:height="0.569cm" svg:x="-33.025cm" svg:y="45.252cm">
            <draw:text-box>
              <text:p><text:span text:style-name="T62">decoder</text:span></text:p>
            </draw:text-box>
          </draw:frame>
        </draw:g>
        <draw:g draw:style-name="gr31">
          <draw:g draw:style-name="gr23">
            <draw:polygon draw:style-name="gr509" draw:text-style-name="P113" draw:layer="layout" svg:width="1.292cm" svg:height="1.358cm" svg:x="-27.759cm" svg:y="44.804cm" svg:viewBox="0 0 1293 1359" draw:points="0,0 1293,581 1293,777 0,1359">
              <text:p/>
            </draw:polygon>
          </draw:g>
          <draw:frame draw:style-name="gr631" draw:text-style-name="P193" draw:layer="layout" svg:width="1.673cm" svg:height="0.887cm" svg:x="-27.938cm" svg:y="45.181cm">
            <draw:text-box>
              <text:p><text:span text:style-name="T62">encoder</text:span></text:p>
            </draw:text-box>
          </draw:frame>
        </draw:g>
        <draw:frame draw:style-name="gr632" draw:text-style-name="P16" xml:id="id502" draw:id="id502" draw:layer="layout" svg:width="2.796cm" svg:height="0.911cm" svg:x="-41.717cm" svg:y="48.506cm">
          <draw:text-box>
            <text:p text:style-name="P66"><text:span text:style-name="T63">derivative-free </text:span><text:span text:style-name="T63"><text:line-break/></text:span><text:span text:style-name="T63">global optimizer</text:span></text:p>
          </draw:text-box>
        </draw:frame>
        <draw:connector draw:style-name="gr633" draw:text-style-name="P7" draw:layer="layout" draw:type="curve" svg:x1="-36.53cm" svg:y1="49.316cm" svg:x2="-38.921cm" svg:y2="48.961cm" draw:start-shape="id501" draw:start-glue-point="3" draw:end-shape="id502" svg:d="M-36530 49316c-1792 0-597-355-2391-355" svg:viewBox="0 0 2392 356">
          <text:p text:style-name="P5"><text:span text:style-name="T4">using</text:span></text:p>
        </draw:connector>
        <draw:frame draw:style-name="gr523" draw:text-style-name="P5" xml:id="id503" draw:id="id503"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3" draw:text-style-name="P7" draw:layer="layout" draw:type="curve" svg:x1="-41.717cm" svg:y1="48.961cm" svg:x2="-43.268cm" svg:y2="50.542cm" draw:start-shape="id502" draw:start-glue-point="3" draw:end-shape="id503" draw:end-glue-point="0" svg:d="M-41717 48961c-1034 0-1551 527-1551 1581" svg:viewBox="0 0 1552 1582">
          <text:p text:style-name="P5"><text:span text:style-name="T4">converting</text:span></text:p>
        </draw:connector>
        <draw:connector draw:style-name="gr634" draw:text-style-name="P7" draw:layer="layout" draw:type="curve" draw:line-skew="0.726cm" svg:x1="-43.268cm" svg:y1="51.449cm" svg:x2="-34.652cm" svg:y2="52.421cm" draw:start-shape="id503" draw:start-glue-point="2" draw:end-shape="id491" draw:end-glue-point="10" svg:d="M-43268 51449c0 4027 4560 3357 6902 2593s2467-1621 1714-1621" svg:viewBox="0 0 9028 3172">
          <text:p text:style-name="P5"><text:span text:style-name="T4">converting</text:span></text:p>
        </draw:connector>
        <draw:rect draw:style-name="gr41" draw:text-style-name="P5" xml:id="id504" draw:id="id504" draw:layer="layout" svg:width="2.589cm" svg:height="1.784cm" svg:x="92.039cm" svg:y="65.721cm">
          <text:p text:style-name="P5">Default<text:line-break/>brain<text:line-break/>network</text:p>
        </draw:rect>
        <draw:connector draw:style-name="gr293" draw:text-style-name="P15" draw:layer="layout" draw:type="curve" svg:x1="93.383cm" svg:y1="64.481cm" svg:x2="93.333cm" svg:y2="65.721cm" draw:start-shape="id487" draw:start-glue-point="2" draw:end-shape="id504" draw:end-glue-point="0" svg:d="M93383 64481c0 930-50 310-50 1240" svg:viewBox="0 0 51 1241">
          <text:p/>
        </draw:connector>
        <draw:rect draw:style-name="gr292" draw:text-style-name="P35" xml:id="id508" draw:id="id508" draw:layer="layout" svg:width="2.3cm" svg:height="1cm" svg:x="40.457cm" svg:y="99.219cm">
          <text:p text:style-name="P5">Suprise<text:line-break/>reduction</text:p>
        </draw:rect>
        <draw:rect draw:style-name="gr292" draw:text-style-name="P35" xml:id="id506" draw:id="id506" draw:layer="layout" svg:width="2.853cm" svg:height="1.372cm" svg:x="37.683cm" svg:y="103.071cm">
          <text:p text:style-name="P5">Updating<text:line-break/>predicting<text:line-break/>models</text:p>
        </draw:rect>
        <draw:rect draw:style-name="gr292" draw:text-style-name="P35" xml:id="id507" draw:id="id507" draw:layer="layout" svg:width="2.853cm" svg:height="1.372cm" svg:x="42.435cm" svg:y="103.071cm">
          <text:p text:style-name="P5">Manipulating<text:line-break/>the world</text:p>
        </draw:rect>
        <draw:connector draw:style-name="gr635" draw:text-style-name="P15" draw:layer="layout" draw:type="curve" svg:x1="41.607cm" svg:y1="101.993cm" svg:x2="39.109cm" svg:y2="103.071cm" draw:start-shape="id505" draw:start-glue-point="2" draw:end-shape="id506" draw:end-glue-point="0" svg:d="M41607 101993c0 808-2498 270-2498 1078" svg:viewBox="0 0 2499 1079">
          <text:p/>
        </draw:connector>
        <draw:connector draw:style-name="gr636" draw:text-style-name="P15" draw:layer="layout" draw:type="curve" svg:x1="41.607cm" svg:y1="101.993cm" svg:x2="43.861cm" svg:y2="103.071cm" draw:start-shape="id505" draw:start-glue-point="2" draw:end-shape="id507" draw:end-glue-point="0" svg:d="M41607 101993c0 808 2254 270 2254 1078" svg:viewBox="0 0 2255 1079">
          <text:p/>
        </draw:connector>
        <draw:rect draw:style-name="gr292" draw:text-style-name="P35" xml:id="id505" draw:id="id505" draw:layer="layout" svg:width="1.437cm" svg:height="0.766cm" svg:x="40.889cm" svg:y="101.227cm">
          <text:p text:style-name="P5">kinds</text:p>
        </draw:rect>
        <draw:connector draw:style-name="gr637" draw:text-style-name="P15" draw:layer="layout" draw:type="curve" svg:x1="41.607cm" svg:y1="100.219cm" svg:x2="41.607cm" svg:y2="101.227cm" draw:start-shape="id508" draw:start-glue-point="2" draw:end-shape="id505" draw:end-glue-point="0" svg:d="M41607 100219v1008" svg:viewBox="0 0 1 1009">
          <text:p/>
        </draw:connector>
        <draw:rect draw:style-name="gr292" draw:text-style-name="P35" xml:id="id509" draw:id="id509" draw:layer="layout" svg:width="2.853cm" svg:height="1.372cm" svg:x="36.184cm" svg:y="105.571cm">
          <text:p text:style-name="P5">Updating<text:line-break/>forecasting<text:line-break/>models</text:p>
        </draw:rect>
        <draw:connector draw:style-name="gr638" draw:text-style-name="P15" draw:layer="layout" draw:type="curve" svg:x1="39.109cm" svg:y1="104.443cm" svg:x2="37.61cm" svg:y2="105.571cm" draw:start-shape="id506" draw:start-glue-point="2" draw:end-shape="id509" draw:end-glue-point="0" svg:d="M39109 104443c0 846-1499 282-1499 1128" svg:viewBox="0 0 1500 1129">
          <text:p/>
        </draw:connector>
        <draw:rect draw:style-name="gr292" draw:text-style-name="P35" xml:id="id510" draw:id="id510" draw:layer="layout" svg:width="2.853cm" svg:height="1.372cm" svg:x="39.185cm" svg:y="105.571cm">
          <text:p text:style-name="P5">Updating<text:line-break/>classification<text:line-break/>models</text:p>
        </draw:rect>
        <draw:connector draw:style-name="gr639" draw:text-style-name="P15" draw:layer="layout" draw:type="curve" svg:x1="39.109cm" svg:y1="104.443cm" svg:x2="40.611cm" svg:y2="105.571cm" draw:start-shape="id506" draw:start-glue-point="2" draw:end-shape="id510" svg:d="M39109 104443c0 846 1502 282 1502 1128" svg:viewBox="0 0 1503 1129">
          <text:p/>
        </draw:connector>
        <draw:custom-shape draw:style-name="gr640" draw:text-style-name="P68" xml:id="id511" draw:id="id511" draw:layer="layout" svg:width="4.56cm" svg:height="2.669cm" svg:x="152.195cm" svg:y="36.515cm">
          <text:p text:style-name="P17"><text:span text:style-name="T4">Connects brain and</text:span><text:span text:style-name="T4"><text:line-break/></text:span><text:span text:style-name="T4">spinal cord</text:span><text:span text:style-name="T4"><text:line-break/></text:span><text:span text:style-name="T4">and brain to sensory and skeltal</text:span><text:span text:style-name="T4"><text:line-break/></text:span><text:span text:style-name="T4">muscles</text:span><text:span text:style-name="T4"><text:line-break/></text:span><text:span text:style-name="T4">under </text:span><text:span text:style-name="T64">conscious</text:span><text:span text:style-name="T64"><text:line-break/></text:span><text:span text:style-name="T65">control</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1.265cm" svg:y1="40.2cm" svg:x2="154.475cm" svg:y2="39.184cm" draw:start-shape="id225" draw:start-glue-point="0" draw:end-shape="id511" draw:end-glue-point="6" svg:d="M151265 40200c0-762 3210-254 3210-1016" svg:viewBox="0 0 3211 1017">
          <text:p/>
        </draw:connector>
        <draw:connector draw:style-name="gr641" draw:text-style-name="P7" draw:layer="layout" draw:type="curve" svg:x1="-16.897cm" svg:y1="27.437cm" svg:x2="-23.334cm" svg:y2="26.699cm" draw:start-shape="id1" draw:start-glue-point="3" draw:end-shape="id3" draw:end-glue-point="0" svg:d="M-16897 27437c-3910 0-3258-620-3890-992s-2547-497-2547 254" svg:viewBox="0 0 6438 1289">
          <text:p text:style-name="P5"><text:span text:style-name="T4">What should</text:span><text:span text:style-name="T4"><text:line-break/></text:span><text:span text:style-name="T4">be saved</text:span></text:p>
        </draw:connector>
        <draw:connector draw:style-name="gr642" draw:text-style-name="P15" draw:layer="layout" draw:type="line" svg:x1="-25.784cm" svg:y1="39.701cm" svg:x2="-25.76cm" svg:y2="41.671cm" svg:d="M-25784 39701l24 1970" svg:viewBox="0 0 25 1971">
          <text:p/>
        </draw:connector>
        <draw:frame draw:style-name="gr643" draw:text-style-name="P194" draw:layer="layout" svg:width="3.475cm" svg:height="0.878cm" svg:x="-25.81cm" svg:y="40.138cm">
          <draw:text-box>
            <text:p text:style-name="P3"><text:span text:style-name="T66">ROS</text:span></text:p>
          </draw:text-box>
        </draw:frame>
        <draw:frame draw:style-name="gr523" draw:text-style-name="P5" draw:layer="layout" svg:width="4.672cm" svg:height="1.92cm" svg:x="-50.295cm" svg:y="54.885cm">
          <draw:object xlink:href="./Object 9" xlink:type="simple" xlink:show="embed" xlink:actuate="onLoad">
            <loext:p/>
          </draw:object>
          <draw:image xlink:href="./ObjectReplacements/Object 9" xlink:type="simple" xlink:show="embed" xlink:actuate="onLoad"/>
        </draw:frame>
        <draw:g draw:style-name="gr31">
          <draw:path draw:style-name="gr644" draw:text-style-name="P5" draw:layer="layout" svg:width="2.382cm" svg:height="2.15cm" svg:x="-101.135cm" svg:y="12.975cm" svg:viewBox="0 0 2383 2151" svg:d="M2383 2151c-953-685-1525-1369-2383-2151">
            <text:p/>
          </draw:path>
          <draw:path draw:style-name="gr644" draw:text-style-name="P5" draw:layer="layout" svg:width="1.429cm" svg:height="1.134cm" svg:x="-102.565cm" svg:y="11.84cm" svg:viewBox="0 0 1430 1135" svg:d="M1430 1135c-477-352-954-685-1430-1135">
            <text:p/>
          </draw:path>
          <draw:path draw:style-name="gr644" draw:text-style-name="P5" draw:layer="layout" svg:width="1.372cm" svg:height="0.429cm" svg:x="-102.508cm" svg:y="12.975cm" svg:viewBox="0 0 1373 430" svg:d="M1373 0c-477 195-916 293-1373 430">
            <text:p/>
          </draw:path>
          <draw:path draw:style-name="gr644" draw:text-style-name="P5" draw:layer="layout" svg:width="3.107cm" svg:height="0.586cm" svg:x="-101.86cm" svg:y="14.539cm" svg:viewBox="0 0 3108 587" svg:d="M3108 587c-1048-196-2002-293-3108-587">
            <text:p/>
          </draw:path>
          <draw:path draw:style-name="gr644" draw:text-style-name="P5" draw:layer="layout" svg:width="1.181cm" svg:height="0.82cm" svg:x="-103.042cm" svg:y="13.718cm" svg:viewBox="0 0 1182 821" svg:d="M1182 821c-457-234-839-489-1182-821">
            <text:p/>
          </draw:path>
          <draw:path draw:style-name="gr644" draw:text-style-name="P5" draw:layer="layout" svg:width="1.219cm" svg:height="0.684cm" svg:x="-103.08cm" svg:y="14.539cm" svg:viewBox="0 0 1220 685" svg:d="M1220 0c-515 157-896 391-1220 685">
            <text:p/>
          </draw:path>
          <draw:path draw:style-name="gr644" draw:text-style-name="P5" draw:layer="layout" svg:width="2.478cm" svg:height="2.346cm" svg:x="-101.231cm" svg:y="15.126cm" svg:viewBox="0 0 2479 2347" svg:d="M2479 0c-953 626-1716 1369-2479 2347">
            <text:p/>
          </draw:path>
          <draw:path draw:style-name="gr644" draw:text-style-name="P5" draw:layer="layout" svg:width="1.238cm" svg:height="1.251cm" svg:x="-102.47cm" svg:y="17.472cm" svg:viewBox="0 0 1239 1252" svg:d="M1239 0c-438 430-820 782-1239 1252">
            <text:p/>
          </draw:path>
          <draw:path draw:style-name="gr644" draw:text-style-name="P5" draw:layer="layout" svg:width="1.467cm" svg:height="0.429cm" svg:x="-102.699cm" svg:y="17.042cm" svg:viewBox="0 0 1468 430" svg:d="M1468 430c-514-156-972-293-1468-430">
            <text:p/>
          </draw:path>
          <draw:path draw:style-name="gr644" draw:text-style-name="P5" draw:layer="layout" svg:width="0.365cm" svg:height="2.933cm" svg:x="-98.641cm" svg:y="11.41cm" svg:viewBox="0 0 366 2934" svg:d="M366 2934c-381-978-477-1858-229-2934">
            <text:p/>
          </draw:path>
          <draw:path draw:style-name="gr644" draw:text-style-name="P5" draw:layer="layout" svg:width="0.628cm" svg:height="1.075cm" svg:x="-99.133cm" svg:y="10.334cm" svg:viewBox="0 0 629 1076" svg:d="M629 1076c-152-430-343-782-629-1076">
            <text:p/>
          </draw:path>
          <draw:path draw:style-name="gr644" draw:text-style-name="P5" draw:layer="layout" svg:width="1.525cm" svg:height="0.879cm" svg:x="-98.504cm" svg:y="10.53cm" svg:viewBox="0 0 1526 880" svg:d="M0 880c515-352 992-626 1526-880">
            <text:p/>
          </draw:path>
          <draw:path draw:style-name="gr644" draw:text-style-name="P5" draw:layer="layout" svg:width="2.382cm" svg:height="1.563cm" svg:x="-97.798cm" svg:y="12.975cm" svg:viewBox="0 0 2383 1564" svg:d="M0 1564c667-782 1430-1212 2383-1564">
            <text:p/>
          </draw:path>
          <draw:path draw:style-name="gr644" draw:text-style-name="P5" draw:layer="layout" svg:width="1.43cm" svg:height="0.88cm" svg:x="-95.415cm" svg:y="12.094cm" svg:viewBox="0 0 1431 881" svg:d="M0 881c496-294 954-548 1431-881">
            <text:p/>
          </draw:path>
          <draw:path draw:style-name="gr644" draw:text-style-name="P5" draw:layer="layout" svg:width="1.678cm" svg:height="0.624cm" svg:x="-95.415cm" svg:y="12.975cm" svg:viewBox="0 0 1679 625" svg:d="M0 0c573 234 1106 430 1679 625">
            <text:p/>
          </draw:path>
          <draw:path draw:style-name="gr644" draw:text-style-name="P5" draw:layer="layout" svg:width="1.562cm" svg:height="2.542cm" svg:x="-97.893cm" svg:y="15.907cm" svg:viewBox="0 0 1563 2543" svg:d="M0 0c572 744 1048 1526 1563 2543">
            <text:p/>
          </draw:path>
          <draw:path draw:style-name="gr644" draw:text-style-name="P5" draw:layer="layout" svg:width="1.01cm" svg:height="1.212cm" svg:x="-96.33cm" svg:y="18.45cm" svg:viewBox="0 0 1011 1213" svg:d="M0 0c343 430 629 782 1011 1213">
            <text:p/>
          </draw:path>
          <draw:path draw:style-name="gr644" draw:text-style-name="P5" draw:layer="layout" svg:width="1.372cm" svg:height="0.625cm" svg:x="-97.703cm" svg:y="18.45cm" svg:viewBox="0 0 1373 626" svg:d="M1373 0c-515 156-953 352-1373 626">
            <text:p/>
          </draw:path>
          <draw:path draw:style-name="gr645" draw:text-style-name="P195" draw:layer="layout" svg:width="3.037cm" svg:height="3.128cm" svg:x="-99.107cm" svg:y="13.751cm" svg:viewBox="0 0 3038 3129" svg:d="M450 298c953-645 2193-195 2517 880 343 1135-610 2152-1793 1917-1144-215-1582-1917-724-2797z">
            <text:p/>
          </draw:path>
          <draw:path draw:style-name="gr646" draw:text-style-name="P196" draw:layer="layout" svg:width="3.037cm" svg:height="3.128cm" svg:x="-99.107cm" svg:y="13.751cm" svg:viewBox="0 0 3038 3129" svg:d="M450 298c953-645 2193-195 2517 880 343 1135-610 2152-1793 1917-1144-215-1582-1917-724-2797z">
            <text:p/>
          </draw:path>
          <draw:path draw:style-name="gr647" draw:text-style-name="P197"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8" draw:text-style-name="P198"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9" draw:text-style-name="P199" draw:layer="layout" svg:width="0.304cm" svg:height="0.312cm" svg:x="-97.607cm" svg:y="14.93cm" svg:viewBox="0 0 305 313" svg:d="M305 157c0 27-8 54-21 78-14 24-33 43-56 57-24 13-49 21-76 21s-53-8-76-21c-23-14-43-33-56-57s-20-51-20-78c0-28 7-55 20-78 13-24 33-45 56-58 23-14 49-21 76-21s52 7 76 21c23 13 43 34 56 58 14 23 21 50 21 78z">
            <text:p/>
          </draw:path>
          <draw:path draw:style-name="gr644" draw:text-style-name="P5" draw:layer="layout" svg:width="2.535cm" svg:height="0.016cm" svg:x="-96.139cm" svg:y="15.108cm" svg:viewBox="0 0 2536 17" svg:d="M0 17c915-39 1678 0 2536 0">
            <text:p/>
          </draw:path>
          <draw:line draw:style-name="gr644" draw:text-style-name="P5" draw:layer="layout" svg:x1="-92.841cm" svg:y1="15.126cm" svg:x2="-91.792cm" svg:y2="15.126cm">
            <text:p/>
          </draw:line>
          <draw:line draw:style-name="gr644" draw:text-style-name="P5" draw:layer="layout" svg:x1="-91.03cm" svg:y1="15.126cm" svg:x2="-89.981cm" svg:y2="15.126cm">
            <text:p/>
          </draw:line>
          <draw:line draw:style-name="gr644" draw:text-style-name="P5" draw:layer="layout" svg:x1="-89.218cm" svg:y1="15.126cm" svg:x2="-88.169cm" svg:y2="15.126cm">
            <text:p/>
          </draw:line>
          <draw:path draw:style-name="gr650" draw:text-style-name="P200" draw:layer="layout" svg:width="1.315cm" svg:height="1.337cm" svg:x="-93.743cm" svg:y="14.514cm" svg:viewBox="0 0 1316 1338" svg:d="M139 220c286-293 667-293 953 0 325 352 287 782-57 1017-381 254-839 0-991-430-77-235-58-431 95-587z">
            <text:p/>
          </draw:path>
          <draw:path draw:style-name="gr651" draw:text-style-name="P201" draw:layer="layout" svg:width="1.315cm" svg:height="1.337cm" svg:x="-93.743cm" svg:y="14.514cm" svg:viewBox="0 0 1316 1338" svg:d="M139 220c286-293 667-294 953 0 325 352 287 782-57 1017-381 254-839 0-991-430-77-235-58-430 95-587z">
            <text:p/>
          </draw:path>
          <draw:path draw:style-name="gr652" draw:text-style-name="P200" draw:layer="layout" svg:width="1.314cm" svg:height="1.337cm" svg:x="-91.931cm" svg:y="14.514cm" svg:viewBox="0 0 1315 1338" svg:d="M139 220c286-293 667-293 953 0 324 352 286 782-57 1017-382 254-839 0-992-430-76-235-57-431 96-587z">
            <text:p/>
          </draw:path>
          <draw:path draw:style-name="gr651" draw:text-style-name="P201" draw:layer="layout" svg:width="1.314cm" svg:height="1.337cm" svg:x="-91.931cm" svg:y="14.514cm" svg:viewBox="0 0 1315 1338" svg:d="M139 220c287-293 667-294 953 0 324 352 286 782-57 1017-382 254-839 0-992-430-76-235-56-430 96-587z">
            <text:p/>
          </draw:path>
          <draw:path draw:style-name="gr652" draw:text-style-name="P200" draw:layer="layout" svg:width="1.314cm" svg:height="1.337cm" svg:x="-90.119cm" svg:y="14.514cm" svg:viewBox="0 0 1315 1338" svg:d="M138 220c286-293 668-293 954 0 324 352 286 782-58 1017-381 254-839 0-991-430-76-235-57-431 95-587z">
            <text:p/>
          </draw:path>
          <draw:path draw:style-name="gr651" draw:text-style-name="P201" draw:layer="layout" svg:width="1.314cm" svg:height="1.337cm" svg:x="-90.119cm" svg:y="14.514cm" svg:viewBox="0 0 1315 1338" svg:d="M138 220c286-293 668-294 954 0 324 352 286 782-58 1017-381 254-839 0-991-430-76-235-57-430 95-587z">
            <text:p/>
          </draw:path>
          <draw:path draw:style-name="gr644" draw:text-style-name="P5" draw:layer="layout" svg:width="1.81cm" svg:height="1.27cm" svg:x="-88.169cm" svg:y="13.855cm" svg:viewBox="0 0 1811 1271" svg:d="M0 1271c667-156 1239-587 1811-1271">
            <text:p/>
          </draw:path>
          <draw:line draw:style-name="gr644" draw:text-style-name="P5" draw:layer="layout" svg:x1="-88.169cm" svg:y1="15.126cm" svg:x2="-85.786cm" svg:y2="15.126cm">
            <text:p/>
          </draw:line>
          <draw:path draw:style-name="gr644" draw:text-style-name="P5" draw:layer="layout" svg:width="1.81cm" svg:height="1.368cm" svg:x="-88.169cm" svg:y="15.126cm" svg:viewBox="0 0 1811 1369" svg:d="M0 0c667 196 1239 626 1811 1369">
            <text:p/>
          </draw:path>
          <draw:path draw:style-name="gr644" draw:text-style-name="P5" draw:layer="layout" svg:width="1.391cm" svg:height="0.977cm" svg:x="-86.358cm" svg:y="12.877cm" svg:viewBox="0 0 1392 978" svg:d="M0 978c439-450 858-724 1392-978">
            <text:p/>
          </draw:path>
          <draw:path draw:style-name="gr644" draw:text-style-name="P5" draw:layer="layout" svg:width="1.334cm" svg:height="0.344cm" svg:x="-86.358cm" svg:y="13.522cm" svg:viewBox="0 0 1335 345" svg:d="M0 333c477 58 858-98 1335-333">
            <text:p/>
          </draw:path>
          <draw:path draw:style-name="gr644" draw:text-style-name="P5" draw:layer="layout" svg:width="1.143cm" svg:height="0.86cm" svg:x="-85.786cm" svg:y="14.265cm" svg:viewBox="0 0 1144 861" svg:d="M0 861c439-254 763-489 1144-861">
            <text:p/>
          </draw:path>
          <draw:line draw:style-name="gr644" draw:text-style-name="P5" draw:layer="layout" svg:x1="-85.786cm" svg:y1="15.126cm" svg:x2="-84.508cm" svg:y2="15.126cm">
            <text:p/>
          </draw:line>
          <draw:path draw:style-name="gr644" draw:text-style-name="P5" draw:layer="layout" svg:width="1.143cm" svg:height="0.977cm" svg:x="-85.786cm" svg:y="15.126cm" svg:viewBox="0 0 1144 978" svg:d="M0 0c439 293 763 587 1144 978">
            <text:p/>
          </draw:path>
          <draw:path draw:style-name="gr644" draw:text-style-name="P5" draw:layer="layout" svg:width="1.353cm" svg:height="1.075cm" svg:x="-86.358cm" svg:y="16.494cm" svg:viewBox="0 0 1354 1076" svg:d="M0 0c382 391 820 743 1354 1076">
            <text:p/>
          </draw:path>
          <draw:path draw:style-name="gr644" draw:text-style-name="P5" draw:layer="layout" svg:width="1.429cm" svg:height="0.316cm" svg:x="-86.358cm" svg:y="16.47cm" svg:viewBox="0 0 1430 317" svg:d="M0 24c477-78 954 39 1430 293">
            <text:p/>
          </draw:path>
          <draw:path draw:style-name="gr653" draw:text-style-name="P5" draw:layer="layout" svg:width="7.626cm" svg:height="0.439cm" svg:x="-95.128cm" svg:y="13.903cm" svg:viewBox="0 0 7627 440" svg:d="M0 440c2002-587 4862-587 7627 0">
            <text:p/>
          </draw:path>
          <draw:polygon draw:style-name="gr654" draw:text-style-name="P202" draw:layer="layout" svg:width="0.431cm" svg:height="0.401cm" svg:x="-87.895cm" svg:y="14.068cm" svg:viewBox="0 0 432 402" draw:points="81,0 432,284 0,402">
            <text:p/>
          </draw:polygon>
          <draw:frame draw:style-name="gr655" draw:text-style-name="P203" draw:layer="layout" svg:width="1.85cm" svg:height="0.484cm" svg:x="-102.384cm" svg:y="11.028cm">
            <draw:text-box>
              <text:p><text:span text:style-name="T67">Dendrites</text:span></text:p>
            </draw:text-box>
          </draw:frame>
          <draw:frame draw:style-name="gr656" draw:text-style-name="P203" draw:layer="layout" svg:width="3.194cm" svg:height="0.484cm" svg:x="-98.856cm" svg:y="17.286cm">
            <draw:text-box>
              <text:p><text:span text:style-name="T67">Soma / cell body</text:span></text:p>
            </draw:text-box>
          </draw:frame>
          <draw:frame draw:style-name="gr657" draw:text-style-name="P204" draw:layer="layout" svg:width="1.287cm" svg:height="0.389cm" svg:x="-98.57cm" svg:y="15.154cm">
            <draw:text-box>
              <text:p><text:span text:style-name="T68">Nucleus</text:span></text:p>
            </draw:text-box>
          </draw:frame>
          <draw:frame draw:style-name="gr658" draw:text-style-name="P203" draw:layer="layout" svg:width="2.306cm" svg:height="0.484cm" svg:x="-96.091cm" svg:y="14.451cm">
            <draw:text-box>
              <text:p><text:span text:style-name="T67">Axon hillock</text:span></text:p>
            </draw:text-box>
          </draw:frame>
          <draw:frame draw:style-name="gr659" draw:text-style-name="P203" draw:layer="layout" svg:width="2.666cm" svg:height="0.484cm" svg:x="-92.183cm" svg:y="13.962cm">
            <draw:text-box>
              <text:p><text:span text:style-name="T67">Myelin sheath</text:span></text:p>
            </draw:text-box>
          </draw:frame>
          <draw:frame draw:style-name="gr660" draw:text-style-name="P205" draw:layer="layout" svg:width="2.477cm" svg:height="0.389cm" svg:x="-91.459cm" svg:y="16.171cm">
            <draw:text-box>
              <text:p><text:span text:style-name="T69">Node of Ranvier</text:span></text:p>
            </draw:text-box>
          </draw:frame>
          <draw:frame draw:style-name="gr661" draw:text-style-name="P203" draw:layer="layout" svg:width="2.858cm" svg:height="0.484cm" svg:x="-87.893cm" svg:y="12.397cm">
            <draw:text-box>
              <text:p><text:span text:style-name="T67">Axon terminals</text:span></text:p>
            </draw:text-box>
          </draw:frame>
          <draw:frame draw:style-name="gr662" draw:text-style-name="P205" draw:layer="layout" svg:width="4.155cm" svg:height="0.389cm" svg:x="-92.851cm" svg:y="13.141cm">
            <draw:text-box>
              <text:p><text:span text:style-name="T69">Direction of action potential</text:span></text:p>
            </draw:text-box>
          </draw:frame>
          <draw:custom-shape draw:style-name="gr663" draw:text-style-name="P206" draw:layer="layout" svg:width="3.952cm" svg:height="3.294cm" svg:x="-110.764cm" svg:y="13.456cm">
            <text:p text:style-name="P127"><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64" draw:text-style-name="P134" draw:layer="layout" svg:width="2.106cm" svg:height="1.771cm" svg:x="-106.4cm" svg:y="14.177cm">
            <text:p text:style-name="P19"><text:span text:style-name="T4">environme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35" draw:text-style-name="P41" draw:layer="layout" svg:width="5.171cm" svg:height="3.42cm" svg:x="-80.433cm" svg:y="12.392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65" draw:text-style-name="P38" draw:layer="layout" svg:width="3.655cm" svg:height="1.199cm" svg:x="-79.675cm" svg:y="15.998cm">
            <draw:text-box>
              <text:p>Action potential<text:line-break/>(A voltage pulse)</text:p>
            </draw:text-box>
          </draw:frame>
          <draw:custom-shape draw:style-name="gr664" draw:text-style-name="P134" draw:layer="layout" svg:width="2.106cm" svg:height="1.771cm" svg:x="-83.261cm" svg:y="14.1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rect draw:style-name="gr41" draw:text-style-name="P5" xml:id="id512" draw:id="id512" draw:layer="layout" svg:width="2.863cm" svg:height="1.515cm" svg:x="-88.035cm" svg:y="106.604cm">
          <text:p text:style-name="P3">Sensor<text:line-break/>reading<text:line-break/>robot1</text:p>
        </draw:rect>
        <draw:connector draw:style-name="gr293" draw:text-style-name="P15" draw:layer="layout" draw:type="curve" svg:x1="-85.172cm" svg:y1="107.361cm" svg:x2="-84.079cm" svg:y2="107.361cm" draw:start-shape="id512" draw:start-glue-point="1" draw:end-shape="id513" draw:end-glue-point="3" svg:d="M-85172 107361h1093" svg:viewBox="0 0 1094 1">
          <text:p/>
        </draw:connector>
        <draw:rect draw:style-name="gr41" draw:text-style-name="P5" xml:id="id513" draw:id="id513" draw:layer="layout" svg:width="2.863cm" svg:height="1.515cm" svg:x="-84.079cm" svg:y="106.604cm">
          <text:p text:style-name="P3">Interpolation<text:line-break/>(frequency <text:line-break/>matching)</text:p>
        </draw:rect>
        <draw:connector draw:style-name="gr293" draw:text-style-name="P15" draw:layer="layout" draw:type="curve" svg:x1="-81.216cm" svg:y1="107.361cm" svg:x2="-79.594cm" svg:y2="107.361cm" draw:start-shape="id513" draw:start-glue-point="1" draw:end-shape="id514" draw:end-glue-point="3" svg:d="M-81216 107361h1622" svg:viewBox="0 0 1623 1">
          <text:p/>
        </draw:connector>
        <draw:rect draw:style-name="gr41" draw:text-style-name="P5" xml:id="id515" draw:id="id515" draw:layer="layout" svg:width="5.081cm" svg:height="3.199cm" svg:x="-70.426cm" svg:y="105.783cm">
          <text:p text:style-name="P3">Combine <text:line-break/>with other<text:line-break/>sensors<text:line-break/>(Simple <text:line-break/>appending vector <text:line-break/>components)</text:p>
        </draw:rect>
        <draw:rect draw:style-name="gr41" draw:text-style-name="P5" xml:id="id516" draw:id="id516" draw:layer="layout" svg:width="2.863cm" svg:height="1.515cm" svg:x="-63.711cm" svg:y="106.604cm">
          <text:p text:style-name="P3">Conversion<text:line-break/>to action <text:line-break/>potential wave</text:p>
        </draw:rect>
        <draw:connector draw:style-name="gr293" draw:text-style-name="P15" draw:layer="layout" draw:type="curve" svg:x1="-65.345cm" svg:y1="107.382cm" svg:x2="-63.711cm" svg:y2="107.361cm" draw:start-shape="id515" draw:start-glue-point="1" draw:end-shape="id516" draw:end-glue-point="3" svg:d="M-65345 107382c1227 0 410-21 1634-21" svg:viewBox="0 0 1635 22">
          <text:p/>
        </draw:connector>
        <draw:rect draw:style-name="gr41" draw:text-style-name="P5" draw:layer="layout" svg:width="2.863cm" svg:height="1.515cm" svg:x="-84.078cm" svg:y="106.604cm">
          <text:p text:style-name="P3">Interpolation<text:line-break/>(frequency <text:line-break/>matching)</text:p>
        </draw:rect>
        <draw:rect draw:style-name="gr41" draw:text-style-name="P5" xml:id="id514" draw:id="id514" draw:layer="layout" svg:width="3.93cm" svg:height="3.608cm" svg:x="-79.594cm" svg:y="105.557cm">
          <text:p text:style-name="P3">Buffering until all<text:line-break/>sensors have<text:line-break/>the same length <text:line-break/>as the one used<text:line-break/>for transformer<text:line-break/>sliding window <text:line-break/>training</text:p>
        </draw:rect>
        <draw:rect draw:style-name="gr41" draw:text-style-name="P5" xml:id="id517" draw:id="id517" draw:layer="layout" svg:width="2.574cm" svg:height="1.924cm" svg:x="-74.699cm" svg:y="106.399cm">
          <text:p text:style-name="P3">Averaging<text:line-break/>the sensor <text:line-break/>values</text:p>
        </draw:rect>
        <draw:connector draw:style-name="gr293" draw:text-style-name="P15" draw:layer="layout" draw:type="curve" svg:x1="-75.664cm" svg:y1="107.361cm" svg:x2="-74.699cm" svg:y2="107.361cm" draw:start-shape="id514" draw:start-glue-point="1" draw:end-shape="id517" draw:end-glue-point="3" svg:d="M-75664 107361h965" svg:viewBox="0 0 966 1">
          <text:p/>
        </draw:connector>
        <draw:connector draw:style-name="gr293" draw:text-style-name="P15" draw:layer="layout" draw:type="curve" svg:x1="-72.125cm" svg:y1="107.361cm" svg:x2="-70.426cm" svg:y2="107.382cm" draw:start-shape="id517" draw:start-glue-point="1" draw:end-shape="id515" svg:d="M-72125 107361c1275 0 426 21 1699 21" svg:viewBox="0 0 1700 22">
          <text:p/>
        </draw:connector>
        <draw:custom-shape draw:style-name="gr666" draw:text-style-name="P207" xml:id="id518" draw:id="id518" draw:layer="layout" svg:width="3.921cm" svg:height="2.237cm" svg:x="-94.048cm" svg:y="106.211cm">
          <text:p text:style-name="P5">Online<text:line-break/>testing<text:line-break/>(language<text:line-break/>exis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07.33cm" svg:x2="-88.035cm" svg:y2="107.361cm" draw:start-shape="id518" draw:start-glue-point="10" draw:end-shape="id512" draw:end-glue-point="3" svg:d="M-90127 107330c1570 0 525 31 2092 31" svg:viewBox="0 0 2093 32">
          <text:p/>
        </draw:connector>
        <draw:rect draw:style-name="gr254" draw:text-style-name="P33" xml:id="id522" draw:id="id522" draw:layer="layout" svg:width="2.978cm" svg:height="1cm" svg:x="89.465cm" svg:y="3.976cm">
          <text:p text:style-name="P5">Mind</text:p>
        </draw:rect>
        <draw:rect draw:style-name="gr255" draw:text-style-name="P67" xml:id="id523" draw:id="id523" draw:layer="layout" svg:width="2.4cm" svg:height="1cm" svg:x="87.559cm" svg:y="11.435cm">
          <text:p text:style-name="P8"><text:span text:style-name="T29">awareness</text:span></text:p>
        </draw:rect>
        <draw:rect draw:style-name="gr255" draw:text-style-name="P77" xml:id="id520" draw:id="id520" draw:layer="layout" svg:width="2.962cm" svg:height="1cm" svg:x="87.278cm" svg:y="9.015cm">
          <text:p text:style-name="P76"><text:span text:style-name="T29">Consciousness</text:span></text:p>
        </draw:rect>
        <draw:connector draw:style-name="gr313" draw:text-style-name="P15" draw:layer="layout" draw:type="curve" svg:x1="90.988cm" svg:y1="7.261cm" svg:x2="88.759cm" svg:y2="9.015cm" draw:start-shape="id519" draw:start-glue-point="2" draw:end-shape="id520" draw:end-glue-point="0" svg:d="M90988 7261c0 439-557 877-1115 877-557 0-1114 439-1114 877" svg:viewBox="0 0 2230 1755">
          <text:p/>
        </draw:connector>
        <draw:rect draw:style-name="gr255" draw:text-style-name="P77" xml:id="id521" draw:id="id521" draw:layer="layout" svg:width="3.448cm" svg:height="1cm" svg:x="91.714cm" svg:y="8.981cm">
          <text:p text:style-name="P76"><text:span text:style-name="T29">unconsciousness</text:span></text:p>
        </draw:rect>
        <draw:connector draw:style-name="gr314" draw:text-style-name="P15" draw:layer="layout" draw:type="curve" svg:x1="90.988cm" svg:y1="7.261cm" svg:x2="93.438cm" svg:y2="8.981cm" draw:start-shape="id519" draw:start-glue-point="2" draw:end-shape="id521" draw:end-glue-point="0" svg:d="M90988 7261c0 1290 2450 430 2450 1720" svg:viewBox="0 0 2451 1721">
          <text:p/>
        </draw:connector>
        <draw:rect draw:style-name="gr255" draw:text-style-name="P67" xml:id="id519" draw:id="id519" draw:layer="layout" svg:width="2.4cm" svg:height="1cm" svg:x="89.788cm" svg:y="6.261cm">
          <text:p text:style-name="P8"><text:span text:style-name="T29">Psyche</text:span></text:p>
        </draw:rect>
        <draw:connector draw:style-name="gr318" draw:text-style-name="P15" draw:layer="layout" draw:type="curve" svg:x1="90.954cm" svg:y1="4.976cm" svg:x2="90.988cm" svg:y2="6.261cm" draw:start-shape="id522" draw:start-glue-point="2" draw:end-shape="id519" draw:end-glue-point="0" svg:d="M90954 4976c0 322 9 643 17 643 9 0 17 321 17 642" svg:viewBox="0 0 35 1286">
          <text:p/>
        </draw:connector>
        <draw:connector draw:style-name="gr406" draw:text-style-name="P15" draw:layer="layout" draw:type="curve" svg:x1="88.759cm" svg:y1="10.015cm" svg:x2="88.759cm" svg:y2="11.435cm" draw:start-shape="id520" draw:start-glue-point="2" draw:end-shape="id523" svg:d="M88759 10015v1420" svg:viewBox="0 0 1 1421">
          <text:p/>
        </draw:connector>
        <draw:connector draw:style-name="gr46" draw:text-style-name="P15" draw:layer="layout" draw:type="curve" svg:x1="88.759cm" svg:y1="11.435cm" svg:x2="85.044cm" svg:y2="10.093cm" draw:start-shape="id523" draw:start-glue-point="0" draw:end-shape="id524" draw:end-glue-point="6" svg:d="M88759 11435c0-1006-3715-336-3715-1342" svg:viewBox="0 0 3716 1343">
          <text:p/>
        </draw:connector>
        <draw:custom-shape draw:style-name="gr667" draw:text-style-name="P68" xml:id="id524" draw:id="id524" draw:layer="layout" svg:width="2.475cm" svg:height="1.679cm" svg:x="83.806cm" svg:y="8.414cm">
          <text:p text:style-name="P17"><text:span text:style-name="T4">self-awarenes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525" draw:id="id525" draw:layer="layout" svg:width="2.4cm" svg:height="1cm" svg:x="105.81cm" svg:y="3.693cm">
          <text:p text:style-name="P8"><text:span text:style-name="T29">cognitive</text:span><text:span text:style-name="T29"><text:line-break/></text:span><text:span text:style-name="T29">processes</text:span></text:p>
        </draw:rect>
        <draw:rect draw:style-name="gr41" draw:text-style-name="P5" xml:id="id526" draw:id="id526" draw:layer="layout" svg:width="2.79cm" svg:height="0.955cm" svg:x="104.228cm" svg:y="7.294cm">
          <text:p text:style-name="P5">thinking</text:p>
        </draw:rect>
        <draw:connector draw:style-name="gr259" draw:text-style-name="P15" draw:layer="layout" draw:type="curve" svg:x1="107.01cm" svg:y1="4.693cm" svg:x2="105.623cm" svg:y2="7.294cm" draw:start-shape="id525" draw:start-glue-point="2" draw:end-shape="id526" draw:end-glue-point="0" svg:d="M107010 4693c0 1951-1387 651-1387 2601" svg:viewBox="0 0 1388 2602">
          <text:p/>
        </draw:connector>
        <draw:rect draw:style-name="gr41" draw:text-style-name="P5" xml:id="id529" draw:id="id529" draw:layer="layout" svg:width="2.79cm" svg:height="0.955cm" svg:x="100.455cm" svg:y="7.228cm">
          <text:p text:style-name="P5">learning</text:p>
        </draw:rect>
        <draw:rect draw:style-name="gr41" draw:text-style-name="P5" xml:id="id527" draw:id="id527" draw:layer="layout" svg:width="2.79cm" svg:height="0.955cm" svg:x="108.002cm" svg:y="7.294cm">
          <text:p text:style-name="P5">perception</text:p>
        </draw:rect>
        <draw:rect draw:style-name="gr41" draw:text-style-name="P5" xml:id="id528" draw:id="id528" draw:layer="layout" svg:width="2.79cm" svg:height="0.955cm" svg:x="111.775cm" svg:y="7.294cm">
          <text:p text:style-name="P5">attention</text:p>
        </draw:rect>
        <draw:connector draw:style-name="gr260" draw:text-style-name="P15" draw:layer="layout" draw:type="curve" svg:x1="107.01cm" svg:y1="4.693cm" svg:x2="109.397cm" svg:y2="7.294cm" draw:start-shape="id525" draw:start-glue-point="2" draw:end-shape="id527" draw:end-glue-point="0" svg:d="M107010 4693c0 1951 2387 651 2387 2601" svg:viewBox="0 0 2388 2602">
          <text:p/>
        </draw:connector>
        <draw:connector draw:style-name="gr262" draw:text-style-name="P15" draw:layer="layout" draw:type="curve" svg:x1="107.01cm" svg:y1="4.693cm" svg:x2="113.17cm" svg:y2="7.294cm" draw:start-shape="id525" draw:start-glue-point="2" draw:end-shape="id528" svg:d="M107010 4693c0 1951 6160 651 6160 2601" svg:viewBox="0 0 6161 2602">
          <text:p/>
        </draw:connector>
        <draw:connector draw:style-name="gr265" draw:text-style-name="P15" draw:layer="layout" draw:type="curve" svg:x1="107.01cm" svg:y1="4.693cm" svg:x2="101.85cm" svg:y2="7.228cm" draw:start-shape="id525" draw:start-glue-point="2" draw:end-shape="id529" draw:end-glue-point="0" svg:d="M107010 4693c0 1902-5160 635-5160 2535" svg:viewBox="0 0 5161 2536">
          <text:p/>
        </draw:connector>
        <draw:rect draw:style-name="gr292" draw:text-style-name="P35" xml:id="id530" draw:id="id530" draw:layer="layout" svg:width="3.093cm" svg:height="1.601cm" svg:x="56.276cm" svg:y="56.448cm">
          <text:p text:style-name="P5">Holding<text:line-break/>sliding window<text:line-break/>sensory data</text:p>
        </draw:rect>
        <draw:connector draw:style-name="gr293" draw:text-style-name="P15" draw:layer="layout" draw:type="curve" svg:x1="60.954cm" svg:y1="54.528cm" svg:x2="57.822cm" svg:y2="56.448cm" draw:start-shape="id236" draw:start-glue-point="2" draw:end-shape="id530" svg:d="M60954 54528c0 1440-3132 480-3132 1920" svg:viewBox="0 0 3133 1921">
          <text:p/>
        </draw:connector>
        <draw:rect draw:style-name="gr41" draw:text-style-name="P5" xml:id="id531" draw:id="id531" draw:layer="layout" svg:width="2.731cm" svg:height="1.2cm" svg:x="128.149cm" svg:y="42.022cm">
          <text:p text:style-name="P5">Networks</text:p>
        </draw:rect>
        <draw:rect draw:style-name="gr41" draw:text-style-name="P5" xml:id="id532" draw:id="id532" draw:layer="layout" svg:width="2.731cm" svg:height="1.2cm" svg:x="128.157cm" svg:y="44.651cm">
          <text:p text:style-name="P5">Large scale</text:p>
        </draw:rect>
        <draw:connector draw:style-name="gr293" draw:text-style-name="P15" draw:layer="layout" draw:type="curve" svg:x1="130.698cm" svg:y1="40.4cm" svg:x2="129.514cm" svg:y2="42.022cm" draw:start-shape="id192" draw:start-glue-point="2" draw:end-shape="id531" draw:end-glue-point="0" svg:d="M130698 40400c0 1216-1184 406-1184 1622" svg:viewBox="0 0 1185 1623">
          <text:p/>
        </draw:connector>
        <draw:connector draw:style-name="gr293" draw:text-style-name="P15" draw:layer="layout" draw:type="curve" svg:x1="129.514cm" svg:y1="43.222cm" svg:x2="129.522cm" svg:y2="44.651cm" draw:start-shape="id531" draw:start-glue-point="2" draw:end-shape="id532" draw:end-glue-point="0" svg:d="M129514 43222c0 1072 8 358 8 1429" svg:viewBox="0 0 9 1430">
          <text:p/>
        </draw:connector>
        <draw:rect draw:style-name="gr41" draw:text-style-name="P5" xml:id="id533" draw:id="id533" draw:layer="layout" svg:width="2.731cm" svg:height="1.2cm" svg:x="124.066cm" svg:y="48.178cm">
          <text:p text:style-name="P5">Default mode<text:line-break/>network</text:p>
        </draw:rect>
        <draw:rect draw:style-name="gr41" draw:text-style-name="P5" xml:id="id534" draw:id="id534" draw:layer="layout" svg:width="3.399cm" svg:height="1.44cm" svg:x="127.983cm" svg:y="48.037cm">
          <text:p text:style-name="P5">Dorsal<text:line-break/>attention network</text:p>
        </draw:rect>
        <draw:rect draw:style-name="gr41" draw:text-style-name="P5" xml:id="id535" draw:id="id535" draw:layer="layout" svg:width="3.223cm" svg:height="1.493cm" svg:x="132.286cm" svg:y="48.037cm">
          <text:p text:style-name="P66"><text:span text:style-name="T28">Ventral </text:span><text:span text:style-name="T28"><text:line-break/></text:span><text:span text:style-name="T28">attention network</text:span></text:p>
        </draw:rect>
        <draw:connector draw:style-name="gr293" draw:text-style-name="P15" draw:layer="layout" draw:type="curve" svg:x1="129.522cm" svg:y1="45.851cm" svg:x2="125.431cm" svg:y2="48.178cm" draw:start-shape="id532" draw:start-glue-point="2" draw:end-shape="id533" draw:end-glue-point="0" svg:d="M129522 45851c0 1746-4091 583-4091 2327" svg:viewBox="0 0 4092 2328">
          <text:p/>
        </draw:connector>
        <draw:connector draw:style-name="gr293" draw:text-style-name="P15" draw:layer="layout" draw:type="curve" svg:x1="129.522cm" svg:y1="45.851cm" svg:x2="129.682cm" svg:y2="48.037cm" draw:start-shape="id532" draw:start-glue-point="2" draw:end-shape="id534" draw:end-glue-point="0" svg:d="M129522 45851c0 1639 160 547 160 2186" svg:viewBox="0 0 161 2187">
          <text:p/>
        </draw:connector>
        <draw:connector draw:style-name="gr293" draw:text-style-name="P15" draw:layer="layout" draw:type="curve" svg:x1="129.522cm" svg:y1="45.851cm" svg:x2="133.897cm" svg:y2="48.037cm" draw:start-shape="id532" draw:start-glue-point="2" draw:end-shape="id535" draw:end-glue-point="0" svg:d="M129522 45851c0 1639 4375 547 4375 2186" svg:viewBox="0 0 4376 2187">
          <text:p/>
        </draw:connector>
        <draw:rect draw:style-name="gr41" draw:text-style-name="P5" xml:id="id536" draw:id="id536" draw:layer="layout" svg:width="2.731cm" svg:height="1.2cm" svg:x="124.103cm" svg:y="50.86cm">
          <text:p text:style-name="P5">Mind<text:line-break/>wandering</text:p>
        </draw:rect>
        <draw:connector draw:style-name="gr293" draw:text-style-name="P15" draw:layer="layout" draw:type="curve" svg:x1="125.431cm" svg:y1="49.378cm" svg:x2="125.468cm" svg:y2="50.86cm" draw:start-shape="id533" draw:start-glue-point="2" draw:end-shape="id536" draw:end-glue-point="0" svg:d="M125431 49378c0 1111 37 371 37 1482" svg:viewBox="0 0 38 1483">
          <text:p/>
        </draw:connector>
        <draw:rect draw:style-name="gr292" draw:text-style-name="P35" xml:id="id538" draw:id="id538" draw:layer="layout" svg:width="2.3cm" svg:height="1cm" svg:x="43.008cm" svg:y="61.741cm">
          <text:p text:style-name="P5">Goal<text:line-break/>types</text:p>
        </draw:rect>
        <draw:rect draw:style-name="gr292" draw:text-style-name="P35" xml:id="id537" draw:id="id537" draw:layer="layout" svg:width="2.3cm" svg:height="1cm" svg:x="40.243cm" svg:y="61.741cm">
          <text:p text:style-name="P5">Action<text:line-break/>types</text:p>
        </draw:rect>
        <draw:connector draw:style-name="gr293" draw:text-style-name="P15" draw:layer="layout" draw:type="curve" svg:x1="42.688cm" svg:y1="60.541cm" svg:x2="41.393cm" svg:y2="61.741cm" draw:start-shape="id338" draw:start-glue-point="2" draw:end-shape="id537" draw:end-glue-point="0" svg:d="M42688 60541c0 900-1295 300-1295 1200" svg:viewBox="0 0 1296 1201">
          <text:p/>
        </draw:connector>
        <draw:connector draw:style-name="gr293" draw:text-style-name="P15" draw:layer="layout" draw:type="curve" svg:x1="42.688cm" svg:y1="60.541cm" svg:x2="44.158cm" svg:y2="61.741cm" draw:start-shape="id338" draw:start-glue-point="2" draw:end-shape="id538" draw:end-glue-point="0" svg:d="M42688 60541c0 900 1470 300 1470 1200" svg:viewBox="0 0 1471 1201">
          <text:p/>
        </draw:connector>
        <draw:rect draw:style-name="gr292" draw:text-style-name="P35" xml:id="id539" draw:id="id539" draw:layer="layout" svg:width="2.3cm" svg:height="1cm" svg:x="31.239cm" svg:y="69.67cm">
          <text:p text:style-name="P5">next-to<text:line-break/>scenario</text:p>
        </draw:rect>
        <draw:connector draw:style-name="gr293" draw:text-style-name="P15" draw:layer="layout" draw:type="curve" svg:x1="30.784cm" svg:y1="67.468cm" svg:x2="32.389cm" svg:y2="69.67cm" draw:start-shape="id248" draw:start-glue-point="2" draw:end-shape="id539" draw:end-glue-point="0" svg:d="M30784 67468c0 1651 1605 551 1605 2202" svg:viewBox="0 0 1606 2203">
          <text:p/>
        </draw:connector>
        <draw:frame draw:style-name="gr135" draw:text-style-name="P41" draw:layer="layout" svg:width="17.692cm" svg:height="19.588cm" svg:x="-73.528cm" svg:y="78.655cm">
          <draw:image xlink:href="Pictures/10000000000002D80000032646F0B612.png" xlink:type="simple" xlink:show="embed" xlink:actuate="onLoad" draw:mime-type="image/png">
            <text:p/>
          </draw:image>
        </draw:frame>
        <draw:rect draw:style-name="gr41" draw:text-style-name="P5" xml:id="id540" draw:id="id540" draw:layer="layout" svg:width="2.863cm" svg:height="1.515cm" svg:x="-88.035cm" svg:y="110.604cm">
          <text:p text:style-name="P3">Switching<text:line-break/>to DMN</text:p>
        </draw:rect>
        <draw:connector draw:style-name="gr293" draw:text-style-name="P15" draw:layer="layout" draw:type="curve" svg:x1="-85.172cm" svg:y1="111.361cm" svg:x2="-84.079cm" svg:y2="111.361cm" draw:start-shape="id540" draw:start-glue-point="1" draw:end-shape="id541" draw:end-glue-point="3" svg:d="M-85172 111361h1093" svg:viewBox="0 0 1094 1">
          <text:p/>
        </draw:connector>
        <draw:rect draw:style-name="gr41" draw:text-style-name="P5" xml:id="id541" draw:id="id541" draw:layer="layout" svg:width="2.863cm" svg:height="1.515cm" svg:x="-84.079cm" svg:y="110.604cm">
          <text:p text:style-name="P3">Interpolation<text:line-break/>(frequency <text:line-break/>matching)</text:p>
        </draw:rect>
        <draw:connector draw:style-name="gr293" draw:text-style-name="P15" draw:layer="layout" draw:type="curve" svg:x1="-81.216cm" svg:y1="111.361cm" svg:x2="-79.594cm" svg:y2="111.361cm" draw:start-shape="id541" draw:start-glue-point="1" draw:end-shape="id542" draw:end-glue-point="3" svg:d="M-81216 111361h1622" svg:viewBox="0 0 1623 1">
          <text:p/>
        </draw:connector>
        <draw:rect draw:style-name="gr41" draw:text-style-name="P5" xml:id="id543" draw:id="id543" draw:layer="layout" svg:width="5.081cm" svg:height="3.199cm" svg:x="-70.426cm" svg:y="109.783cm">
          <text:p text:style-name="P3">Combine <text:line-break/>with other<text:line-break/>sensors<text:line-break/>(Simple <text:line-break/>appending vector <text:line-break/>components)</text:p>
        </draw:rect>
        <draw:rect draw:style-name="gr41" draw:text-style-name="P5" xml:id="id544" draw:id="id544" draw:layer="layout" svg:width="2.863cm" svg:height="1.515cm" svg:x="-63.711cm" svg:y="110.604cm">
          <text:p text:style-name="P3">Conversion<text:line-break/>to action <text:line-break/>potential wave</text:p>
        </draw:rect>
        <draw:connector draw:style-name="gr293" draw:text-style-name="P15" draw:layer="layout" draw:type="curve" svg:x1="-65.345cm" svg:y1="111.382cm" svg:x2="-63.711cm" svg:y2="111.361cm" draw:start-shape="id543" draw:start-glue-point="1" draw:end-shape="id544" draw:end-glue-point="3" svg:d="M-65345 111382c1227 0 410-21 1634-21" svg:viewBox="0 0 1635 22">
          <text:p/>
        </draw:connector>
        <draw:rect draw:style-name="gr41" draw:text-style-name="P5" draw:layer="layout" svg:width="2.863cm" svg:height="1.515cm" svg:x="-84.078cm" svg:y="110.604cm">
          <text:p text:style-name="P3">Interpolation<text:line-break/>(frequency <text:line-break/>matching)</text:p>
        </draw:rect>
        <draw:rect draw:style-name="gr41" draw:text-style-name="P5" xml:id="id542" draw:id="id542" draw:layer="layout" svg:width="3.93cm" svg:height="3.608cm" svg:x="-79.594cm" svg:y="109.557cm">
          <text:p text:style-name="P3">Buffering until all<text:line-break/>sensors have<text:line-break/>the same length <text:line-break/>as the one used<text:line-break/>for transformer<text:line-break/>sliding window <text:line-break/>training</text:p>
        </draw:rect>
        <draw:rect draw:style-name="gr41" draw:text-style-name="P5" xml:id="id545" draw:id="id545" draw:layer="layout" svg:width="2.574cm" svg:height="1.924cm" svg:x="-74.699cm" svg:y="110.399cm">
          <text:p text:style-name="P3">Averaging<text:line-break/>the sensor <text:line-break/>values</text:p>
        </draw:rect>
        <draw:connector draw:style-name="gr293" draw:text-style-name="P15" draw:layer="layout" draw:type="curve" svg:x1="-75.664cm" svg:y1="111.361cm" svg:x2="-74.699cm" svg:y2="111.361cm" draw:start-shape="id542" draw:start-glue-point="1" draw:end-shape="id545" draw:end-glue-point="3" svg:d="M-75664 111361h965" svg:viewBox="0 0 966 1">
          <text:p/>
        </draw:connector>
        <draw:connector draw:style-name="gr293" draw:text-style-name="P15" draw:layer="layout" draw:type="curve" svg:x1="-72.125cm" svg:y1="111.361cm" svg:x2="-70.426cm" svg:y2="111.382cm" draw:start-shape="id545" draw:start-glue-point="1" draw:end-shape="id543" svg:d="M-72125 111361c1275 0 426 21 1699 21" svg:viewBox="0 0 1700 22">
          <text:p/>
        </draw:connector>
        <draw:custom-shape draw:style-name="gr666" draw:text-style-name="P207" xml:id="id546" draw:id="id546" draw:layer="layout" svg:width="3.921cm" svg:height="2.237cm" svg:x="-94.048cm" svg:y="110.211cm">
          <text:p text:style-name="P5">Offline<text:line-break/>learning<text:line-break/>(Building <text:line-break/>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11.33cm" svg:x2="-88.035cm" svg:y2="111.361cm" draw:start-shape="id546" draw:start-glue-point="10" draw:end-shape="id540" draw:end-glue-point="3" svg:d="M-90127 111330c1570 0 525 31 2092 31" svg:viewBox="0 0 2093 32">
          <text:p/>
        </draw:connector>
        <draw:frame draw:style-name="gr494" draw:text-style-name="P139" draw:layer="layout" svg:width="3.743cm" svg:height="1.158cm" svg:x="-46.518cm" svg:y="68.54cm">
          <draw:text-box>
            <text:p text:style-name="P138"><text:span text:style-name="T12">Matrix-Profile-based </text:span><text:span text:style-name="T12"><text:line-break/></text:span><text:span text:style-name="T12">Motif Discovery</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6" draw:display-name="Arrowheads 36"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2DT3H48M43S</meta:editing-duration>
    <meta:editing-cycles>790</meta:editing-cycles>
    <meta:generator>LibreOffice/25.8.0.4$Linux_X86_64 LibreOffice_project/48f00303701489684e67c38c28aff00cd5929e67</meta:generator>
    <dc:title>diagram</dc:title>
    <dc:date>2026-05-09T21:22:36.343001643</dc:date>
    <meta:document-statistic meta:object-count="1965"/>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9/content.xml><?xml version="1.0" encoding="utf-8"?>
<math xmlns="http://www.w3.org/1998/Math/MathML" display="block">
  <semantics>
    <mtable>
      <mtr>
        <mtd>
          <mrow>
            <mrow>
              <msub>
                <mi>M</mi>
                <mn>1</mn>
              </msub>
              <mo stretchy="false">+</mo>
              <msub>
                <mi>A</mi>
                <mn>1</mn>
              </msub>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sub>
                <mi>M</mi>
                <mn>2</mn>
              </msub>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M_1 + A_1 cos left[ %beta_1 + 2 arctan left( %omega_1 tan left( {t - %alpha_1} over 2 right) right) right]
newline
M_2+A_2 cos left[ %beta_2 + 2 arctan left( %omega_2 tan left( {t - %alpha_2} over 2 right) right) right]</annotation>
  </semantics>
</math>
</file>