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4"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4"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Pictures/10000000000002D80000032646F0B612.png" manifest:media-type="image/png"/>
  <manifest:file-entry manifest:full-path="Pictures/10000001000002800000017CB1ECEB8C.png" manifest:media-type="image/png"/>
  <manifest:file-entry manifest:full-path="Pictures/10000001000002800000017CBF93BF78.png" manifest:media-type="image/png"/>
  <manifest:file-entry manifest:full-path="Pictures/100009960000422500002746BB38F83E.svg" manifest:media-type="image/svg+xml"/>
  <manifest:file-entry manifest:full-path="Pictures/10000000000008CD000003AE13A2E865.png" manifest:media-type="image/png"/>
  <manifest:file-entry manifest:full-path="Pictures/100009960000422500002746C89C7BB4.svg" manifest:media-type="image/svg+xml"/>
  <manifest:file-entry manifest:full-path="Pictures/10000000000002B80000024480E99178.png" manifest:media-type="image/png"/>
  <manifest:file-entry manifest:full-path="Pictures/10000000000002C4000001EEEA2707B2.png" manifest:media-type="image/png"/>
  <manifest:file-entry manifest:full-path="Pictures/1000099600004225000027461A447516.svg" manifest:media-type="image/svg+xml"/>
  <manifest:file-entry manifest:full-path="Pictures/10000000000008DF000003B9CB1644F7.png" manifest:media-type="image/png"/>
  <manifest:file-entry manifest:full-path="Pictures/10000000000001D2000001C08A1E74B0.png" manifest:media-type="image/png"/>
  <manifest:file-entry manifest:full-path="Pictures/1000000000000271000001D51A725A94.png" manifest:media-type="image/png"/>
  <manifest:file-entry manifest:full-path="Pictures/100000010000032000000236D36E8DB6.png" manifest:media-type="image/png"/>
  <manifest:file-entry manifest:full-path="Pictures/100000000000021E000001BE5AAB2A78.png" manifest:media-type="image/png"/>
  <manifest:file-entry manifest:full-path="Pictures/10000000000002C8000001F99B6A82D1.png" manifest:media-type="image/png"/>
  <manifest:file-entry manifest:full-path="Pictures/10000000000002B2000003BD26BB6070.png" manifest:media-type="image/png"/>
  <manifest:file-entry manifest:full-path="Pictures/10000000000003D00000024573F23757.png" manifest:media-type="image/png"/>
  <manifest:file-entry manifest:full-path="Pictures/100000000000022600000212DA83A646.png" manifest:media-type="image/png"/>
  <manifest:file-entry manifest:full-path="Pictures/10000000000003940000046C916862FF.png" manifest:media-type="image/png"/>
  <manifest:file-entry manifest:full-path="Pictures/10000000000002C5000001ADB823F0C7.png" manifest:media-type="image/png"/>
  <manifest:file-entry manifest:full-path="Pictures/10000001000002800000017C0782A2E4.png" manifest:media-type="image/png"/>
  <manifest:file-entry manifest:full-path="styles.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4"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4"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4" manifest:media-type="application/vnd.oasis.opendocument.formula"/>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7"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list-style-name="L1">
      <style:graphic-properties draw:stroke="dash" draw:stroke-dash="Long_20_Dash" svg:stroke-width="0.1cm" svg:stroke-color="#6390c2" draw:marker-start-width="0.36cm" draw:marker-end-width="0.36cm" svg:stroke-opacity="50%" draw:fill="solid" draw:fill-color="#b4d2ea" draw:opacity="50%" draw:textarea-horizontal-align="left" draw:textarea-vertical-align="top" fo:padding-top="0.15cm" fo:padding-bottom="0.15cm" fo:padding-left="0.15cm" fo:padding-right="0.15cm" draw:shadow-opacity="50%" loext:decorative="false"/>
    </style:style>
    <style:style style:name="gr2" style:family="graphic" style:parent-style-name="objectwithoutfill">
      <style:graphic-properties draw:stroke="dash" draw:stroke-dash="Long_20_Dash" svg:stroke-width="0.1cm" svg:stroke-color="#d86a50" draw:marker-start-width="0.35cm" draw:marker-end-width="0.35cm" svg:stroke-opacity="50%" draw:fill="solid" draw:fill-color="#ffe0d9" draw:opacity="75%" draw:textarea-vertical-align="middle" fo:padding-top="0.15cm" fo:padding-bottom="0.15cm" fo:padding-left="0.15cm" fo:padding-right="0.15cm" draw:shadow-opacity="75%" loext:decorative="false"/>
    </style:style>
    <style:style style:name="gr3" style:family="graphic" style:parent-style-name="standard">
      <style:graphic-properties draw:stroke="solid" svg:stroke-color="#d86a50" draw:fill="solid" draw:fill-color="#f7d375" draw:textarea-vertical-align="middle" loext:decorative="false"/>
      <style:paragraph-properties style:writing-mode="lr-tb"/>
    </style:style>
    <style:style style:name="gr4" style:family="graphic" style:parent-style-name="standard">
      <style:graphic-properties draw:stroke="solid" svg:stroke-color="#d86a50" draw:fill="solid" draw:fill-color="#e8995a" draw:textarea-vertical-align="middle" loext:decorative="false"/>
      <style:paragraph-properties style:writing-mode="lr-tb"/>
    </style:style>
    <style:style style:name="gr5" style:family="graphic" style:parent-style-name="objectwithoutfill">
      <style:graphic-properties draw:marker-end="Arrowheads_20_317" draw:marker-end-width="0.3cm" draw:fill="solid" draw:textarea-vertical-align="middle" loext:decorative="false"/>
      <style:paragraph-properties style:writing-mode="lr-tb"/>
    </style:style>
    <style:style style:name="gr6" style:family="graphic" style:parent-style-name="standard" style:list-style-name="L1">
      <style:graphic-properties draw:stroke="solid" svg:stroke-color="#70ae61" draw:fill="solid" draw:fill-color="#accda1" draw:textarea-vertical-align="middle" loext:decorative="false"/>
      <style:paragraph-properties style:writing-mode="lr-tb"/>
    </style:style>
    <style:style style:name="gr7" style:family="graphic" style:parent-style-name="objectwithoutfill">
      <style:graphic-properties draw:marker-end="Arrowheads_20_331" draw:marker-end-width="0.3cm" draw:fill="solid" draw:textarea-vertical-align="middle" loext:decorative="false"/>
    </style:style>
    <style:style style:name="gr8" style:family="graphic" style:parent-style-name="objectwithoutfill">
      <style:graphic-properties draw:marker-end="Arrowheads_20_334" draw:marker-end-width="0.3cm" draw:fill="solid" draw:textarea-vertical-align="middle" loext:decorative="false"/>
    </style:style>
    <style:style style:name="gr9" style:family="graphic" style:parent-style-name="objectwithoutfill" style:list-style-name="L1">
      <style:graphic-properties draw:marker-end="Arrowheads_20_361" draw:marker-end-width="0.3cm" draw:fill="solid" draw:textarea-horizontal-align="right" draw:textarea-vertical-align="bottom" loext:decorative="false"/>
    </style:style>
    <style:style style:name="gr10" style:family="graphic" style:parent-style-name="standard">
      <style:graphic-properties draw:stroke="none" draw:fill="none" fo:min-height="0.955cm" loext:decorative="false"/>
      <style:paragraph-properties style:writing-mode="lr-tb"/>
    </style:style>
    <style:style style:name="gr11" style:family="graphic" style:parent-style-name="objectwithoutfill">
      <style:graphic-properties draw:marker-end="Arrowheads_20_365" draw:marker-end-width="0.3cm" draw:fill="solid" draw:textarea-vertical-align="middle" loext:decorative="false"/>
      <style:paragraph-properties style:writing-mode="lr-tb"/>
    </style:style>
    <style:style style:name="gr12"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3.381cm" loext:decorative="false"/>
      <style:paragraph-properties style:writing-mode="lr-tb"/>
    </style:style>
    <style:style style:name="gr14" style:family="graphic" style:parent-style-name="objectwithoutfill">
      <style:graphic-properties draw:marker-end="Arrowheads_20_375" draw:marker-end-width="0.3cm" draw:fill="solid" draw:textarea-vertical-align="middle" loext:decorative="false"/>
    </style:style>
    <style:style style:name="gr15" style:family="graphic" style:parent-style-name="standard">
      <style:graphic-properties draw:stroke="none" draw:fill="none" fo:min-height="0.638cm" loext:decorative="false"/>
      <style:paragraph-properties style:writing-mode="lr-tb"/>
    </style:style>
    <style:style style:name="gr16" style:family="graphic" style:parent-style-name="standard">
      <style:graphic-properties draw:stroke="none" draw:fill="none" fo:min-height="0.956cm" loext:decorative="false"/>
      <style:paragraph-properties style:writing-mode="lr-tb"/>
    </style:style>
    <style:style style:name="gr17" style:family="graphic" style:parent-style-name="objectwithoutfill">
      <style:graphic-properties draw:marker-end="Arrowheads_20_376" draw:marker-end-width="0.3cm" draw:fill="solid" draw:textarea-vertical-align="middle"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0.319cm" fo:min-width="1.153cm" loext:decorative="false"/>
      <style:paragraph-properties style:writing-mode="lr-tb"/>
    </style:style>
    <style:style style:name="gr19" style:family="graphic" style:parent-style-name="standard" style:list-style-name="L1">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62cm" fo:min-width="2.749cm" fo:padding-top="0.45cm" fo:padding-bottom="0.145cm" fo:padding-left="0.27cm" fo:padding-right="0.27cm" style:writing-mode="lr-tb" loext:decorative="false"/>
      <style:paragraph-properties style:writing-mode="lr-tb"/>
    </style:style>
    <style:style style:name="gr20" style:family="graphic" style:parent-style-name="objectwithoutfill">
      <style:graphic-properties draw:stroke="dash" draw:stroke-dash="Long_20_Dash" svg:stroke-width="0.04cm" svg:stroke-color="#345d95" draw:marker-start-width="0.26cm" draw:marker-end="Arrowheads_20_25" draw:marker-end-width="0.36cm" draw:fill="solid" draw:textarea-vertical-align="middle" fo:padding-top="0.145cm" fo:padding-bottom="0.145cm" fo:padding-left="0.27cm" fo:padding-right="0.27cm" loext:decorative="false"/>
    </style:style>
    <style:style style:name="gr21" style:family="graphic" style:parent-style-name="objectwithoutfill">
      <style:graphic-properties draw:marker-end="Arrowheads_20_382" draw:marker-end-width="0.3cm" draw:fill="solid" draw:textarea-horizontal-align="right" draw:textarea-vertical-align="top" fo:padding-top="0.5cm" fo:padding-left="0.1cm" fo:padding-right="0.5cm" loext:decorative="false"/>
      <style:paragraph-properties style:writing-mode="lr-tb"/>
    </style:style>
    <style:style style:name="gr22"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155cm" fo:min-width="2.061cm" fo:padding-top="0.35cm" fo:padding-bottom="0.145cm" fo:padding-left="0.27cm" fo:padding-right="0.27cm" style:writing-mode="lr-tb" loext:decorative="false"/>
      <style:paragraph-properties style:writing-mode="lr-tb"/>
    </style:style>
    <style:style style:name="gr23" style:family="graphic">
      <style:graphic-properties loext:decorative="false"/>
    </style:style>
    <style:style style:name="gr24" style:family="graphic" style:parent-style-name="objectwithoutfill">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5" style:family="graphic" style:parent-style-name="standard">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6" style:family="graphic" style:parent-style-name="standard">
      <style:graphic-properties draw:stroke="none" svg:stroke-color="#d86a50" draw:fill="solid" draw:fill-color="#ff5128" draw:opacity="75%" draw:textarea-vertical-align="middle" draw:shadow-opacity="75%" loext:decorative="false"/>
      <style:paragraph-properties style:writing-mode="lr-tb"/>
    </style:style>
    <style:style style:name="gr27" style:family="graphic" style:parent-style-name="objectwithoutfill">
      <style:graphic-properties draw:stroke="dash" draw:stroke-dash="Long_20_Dash" svg:stroke-width="0.05cm" svg:stroke-color="#d86a50" draw:marker-start-width="0.28cm" draw:marker-end="Arrowheads_20_383" draw:marker-end-width="0.38cm" draw:fill="solid" draw:textarea-vertical-align="middle" fo:padding-top="0.125cm" fo:padding-bottom="0.125cm" fo:padding-left="0.125cm" fo:padding-right="0.125cm" loext:decorative="false"/>
      <style:paragraph-properties style:writing-mode="lr-tb"/>
    </style:style>
    <style:style style:name="gr2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474cm" fo:min-width="1.081cm" fo:padding-top="0.145cm" fo:padding-bottom="0.145cm" fo:padding-left="0.27cm" fo:padding-right="0.27cm" style:writing-mode="lr-tb" loext:decorative="false"/>
      <style:paragraph-properties style:writing-mode="lr-tb"/>
    </style:style>
    <style:style style:name="gr29"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style>
    <style:style style:name="gr30" style:family="graphic" style:parent-style-name="standard">
      <style:graphic-properties draw:stroke="none" draw:fill="solid" draw:fill-color="#d86a50" draw:textarea-horizontal-align="justify" draw:textarea-vertical-align="middle" draw:auto-grow-height="false" fo:min-height="0cm" fo:min-width="0cm" loext:decorative="false"/>
    </style:style>
    <style:style style:name="gr31" style:family="graphic">
      <style:graphic-properties style:writing-mode="lr-tb" loext:decorative="false"/>
    </style:style>
    <style:style style:name="gr32" style:family="graphic" style:parent-style-name="objectwithoutfill">
      <style:graphic-properties draw:stroke="dash" draw:stroke-dash="Long_20_Dash" svg:stroke-width="0.1cm" svg:stroke-color="#223450" draw:marker-start-width="0.35cm" draw:marker-end-width="0.35cm" svg:stroke-opacity="75%" draw:fill="solid" draw:fill-color="#aaafc9" draw:opacity="75%" draw:textarea-vertical-align="middle" fo:padding-top="0.15cm" fo:padding-bottom="0.15cm" fo:padding-left="0.15cm" fo:padding-right="0.15cm" draw:shadow-opacity="75%" loext:decorative="false"/>
      <style:paragraph-properties style:writing-mode="lr-tb"/>
    </style:style>
    <style:style style:name="gr33" style:family="graphic" style:parent-style-name="standard">
      <style:graphic-properties draw:stroke="none" draw:fill="none" fo:min-height="0.396cm" loext:decorative="false"/>
      <style:paragraph-properties style:writing-mode="lr-tb"/>
    </style:style>
    <style:style style:name="gr34" style:family="graphic" style:parent-style-name="standard">
      <style:graphic-properties draw:fill="solid" draw:fill-color="#f6f5f8" draw:textarea-horizontal-align="justify" draw:textarea-vertical-align="middle" draw:auto-grow-height="false" fo:min-height="0.436cm" fo:min-width="0.131cm" style:writing-mode="lr-tb" loext:decorative="false"/>
      <style:paragraph-properties style:writing-mode="lr-tb"/>
    </style:style>
    <style:style style:name="gr35" style:family="graphic" style:parent-style-name="standard">
      <style:graphic-properties draw:fill="solid" draw:fill-color="#ff5128" draw:textarea-horizontal-align="justify" draw:textarea-vertical-align="middle" draw:auto-grow-height="false" fo:min-height="0.436cm" fo:min-width="0.131cm" style:writing-mode="lr-tb" loext:decorative="false"/>
      <style:paragraph-properties style:writing-mode="lr-tb"/>
    </style:style>
    <style:style style:name="gr36"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style>
    <style:style style:name="gr37" style:family="graphic" style:parent-style-name="standard">
      <style:graphic-properties draw:fill="solid" draw:fill-color="#e8995a" draw:textarea-vertical-align="middle" loext:decorative="false"/>
      <style:paragraph-properties style:writing-mode="lr-tb"/>
    </style:style>
    <style:style style:name="gr38" style:family="graphic" style:parent-style-name="standard">
      <style:graphic-properties draw:fill="solid" draw:fill-color="#f7d375" draw:textarea-vertical-align="middle" loext:decorative="false"/>
      <style:paragraph-properties style:writing-mode="lr-tb"/>
    </style:style>
    <style:style style:name="gr39" style:family="graphic" style:parent-style-name="standard">
      <style:graphic-properties draw:fill="solid" draw:fill-color="#f7d375" draw:textarea-horizontal-align="center" draw:textarea-vertical-align="middle" loext:decorative="false"/>
      <style:paragraph-properties style:writing-mode="lr-tb"/>
    </style:style>
    <style:style style:name="gr40" style:family="graphic" style:parent-style-name="standard">
      <style:graphic-properties draw:fill="solid" draw:fill-color="#f45f74" draw:textarea-vertical-align="middle" loext:decorative="false"/>
      <style:paragraph-properties style:writing-mode="lr-tb"/>
    </style:style>
    <style:style style:name="gr41" style:family="graphic" style:parent-style-name="standard">
      <style:graphic-properties draw:textarea-vertical-align="middle" loext:decorative="false"/>
      <style:paragraph-properties style:writing-mode="lr-tb"/>
    </style:style>
    <style:style style:name="gr42" style:family="graphic" style:parent-style-name="objectwithoutfill">
      <style:graphic-properties draw:marker-end="Arrowheads_20_34" draw:marker-end-width="0.3cm" draw:fill="solid" draw:textarea-vertical-align="middle" loext:decorative="false"/>
    </style:style>
    <style:style style:name="gr43" style:family="graphic" style:parent-style-name="objectwithoutfill">
      <style:graphic-properties draw:marker-end="Arrowheads_20_35" draw:marker-end-width="0.3cm" draw:fill="solid" draw:textarea-vertical-align="middle" loext:decorative="false"/>
    </style:style>
    <style:style style:name="gr44" style:family="graphic" style:parent-style-name="objectwithoutfill">
      <style:graphic-properties draw:marker-end="Arrowheads_20_37" draw:marker-end-width="0.3cm" draw:fill="solid" draw:textarea-vertical-align="middle" loext:decorative="false"/>
    </style:style>
    <style:style style:name="gr45" style:family="graphic" style:parent-style-name="objectwithoutfill">
      <style:graphic-properties draw:marker-end="Arrowheads_20_38" draw:marker-end-width="0.3cm" draw:fill="solid" draw:textarea-vertical-align="middle" loext:decorative="false"/>
    </style:style>
    <style:style style:name="gr46" style:family="graphic" style:parent-style-name="objectwithoutfill">
      <style:graphic-properties draw:stroke="dash" draw:stroke-dash="Long_20_Dash" svg:stroke-color="#000000" draw:marker-end="Arrowheads_20_25" draw:marker-end-width="0.3cm" draw:fill="solid" draw:textarea-vertical-align="middle" loext:decorative="false"/>
    </style:style>
    <style:style style:name="gr47" style:family="graphic" style:parent-style-name="standard">
      <style:graphic-properties draw:fill="solid" draw:fill-color="#ff8ca1" draw:textarea-horizontal-align="justify" draw:textarea-vertical-align="middle" draw:auto-grow-height="true" fo:min-height="0cm" fo:min-width="0cm" loext:decorative="false"/>
    </style:style>
    <style:style style:name="gr48" style:family="graphic" style:parent-style-name="standard">
      <style:graphic-properties draw:fill="solid" draw:fill-color="#98c127" draw:textarea-horizontal-align="justify" draw:textarea-vertical-align="middle" draw:auto-grow-height="true" fo:min-height="0cm" fo:min-width="0cm" loext:decorative="false"/>
    </style:style>
    <style:style style:name="gr49" style:family="graphic" style:parent-style-name="standard">
      <style:graphic-properties draw:fill="solid" draw:fill-color="#ffb255" draw:textarea-horizontal-align="justify" draw:textarea-vertical-align="middle" draw:auto-grow-height="true" fo:min-height="0cm" fo:min-width="0cm" loext:decorative="false"/>
    </style:style>
    <style:style style:name="gr50" style:family="graphic" style:parent-style-name="standard">
      <style:graphic-properties draw:fill-color="#f45f74" draw:textarea-horizontal-align="justify" draw:textarea-vertical-align="middle" draw:auto-grow-height="true" fo:min-height="0cm" fo:min-width="0cm" loext:decorative="false"/>
    </style:style>
    <style:style style:name="gr51" style:family="graphic" style:parent-style-name="standard">
      <style:graphic-properties draw:fill-color="#ffcd8e" draw:textarea-horizontal-align="justify" draw:textarea-vertical-align="middle" draw:auto-grow-height="true" fo:min-height="0cm" fo:min-width="0cm"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0.475cm" fo:min-width="2.275cm" loext:decorative="false"/>
      <style:paragraph-properties style:writing-mode="lr-tb"/>
    </style:style>
    <style:style style:name="gr53" style:family="graphic" style:parent-style-name="objectwithoutfill">
      <style:graphic-properties draw:stroke="dash" draw:stroke-dash="Long_20_Dash_20__28_Rounded_29_" draw:marker-end="Arrowheads_20_11" draw:marker-end-width="0.3cm" svg:stroke-linecap="round" draw:fill="solid" draw:textarea-vertical-align="middle" loext:decorative="false"/>
    </style:style>
    <style:style style:name="gr54" style:family="graphic" style:parent-style-name="standard">
      <style:graphic-properties draw:stroke="none" svg:stroke-color="#000000" draw:fill="none" draw:fill-color="#ffffff" draw:textarea-horizontal-align="left" draw:auto-grow-height="true" draw:auto-grow-width="true" fo:min-height="0.475cm" fo:min-width="4.028cm" loext:decorative="false"/>
      <style:paragraph-properties style:writing-mode="lr-tb"/>
    </style:style>
    <style:style style:name="gr55" style:family="graphic" style:parent-style-name="objectwithoutfill">
      <style:graphic-properties draw:stroke="dash" draw:stroke-dash="Long_20_Dash_20__28_Rounded_29_" draw:marker-end="Arrowheads_20_12" draw:marker-end-width="0.3cm" svg:stroke-linecap="round" draw:fill="solid" draw:textarea-vertical-align="middle" loext:decorative="false"/>
    </style:style>
    <style:style style:name="gr56" style:family="graphic" style:parent-style-name="standard">
      <style:graphic-properties draw:fill-color="#00b0be" draw:textarea-horizontal-align="justify" draw:textarea-vertical-align="middle" draw:auto-grow-height="true" fo:min-height="0cm" fo:min-width="0cm" loext:decorative="false"/>
    </style:style>
    <style:style style:name="gr57" style:family="graphic" style:parent-style-name="standard">
      <style:graphic-properties draw:stroke="none" svg:stroke-color="#000000" draw:fill="none" draw:fill-color="#ffffff" draw:textarea-horizontal-align="left" draw:auto-grow-height="true" draw:auto-grow-width="true" fo:min-height="0.475cm" fo:min-width="4.35cm" loext:decorative="false"/>
      <style:paragraph-properties style:writing-mode="lr-tb"/>
    </style:style>
    <style:style style:name="gr58" style:family="graphic" style:parent-style-name="objectwithoutfill">
      <style:graphic-properties draw:stroke="dash" draw:stroke-dash="Long_20_Dash" draw:marker-end="Arrowheads_20_14" draw:marker-end-width="0.3cm" draw:fill="solid" draw:textarea-vertical-align="middle" loext:decorative="false"/>
    </style:style>
    <style:style style:name="gr59" style:family="graphic" style:parent-style-name="standard">
      <style:graphic-properties draw:stroke="solid" svg:stroke-width="0.05cm" svg:stroke-color="#000000" draw:marker-start-width="0.28cm" draw:marker-end-width="0.28cm" draw:fill="none" draw:textarea-vertical-align="middle" draw:auto-grow-height="false" fo:min-height="2.988cm" fo:min-width="0cm" fo:padding-top="0.15cm" fo:padding-bottom="0.15cm" fo:padding-left="0.275cm" fo:padding-right="0.275cm" fo:wrap-option="wrap" loext:decorative="false"/>
    </style:style>
    <style:style style:name="gr60" style:family="graphic" style:parent-style-name="standard">
      <style:graphic-properties draw:stroke="none" svg:stroke-color="#000000" draw:fill="none" draw:fill-color="#ffffff" draw:textarea-horizontal-align="left" draw:auto-grow-height="true" draw:auto-grow-width="true" fo:min-height="1.423cm" fo:min-width="3.753cm" loext:decorative="false"/>
      <style:paragraph-properties style:writing-mode="lr-tb"/>
    </style:style>
    <style:style style:name="gr61" style:family="graphic" style:parent-style-name="objectwithoutfill">
      <style:graphic-properties draw:stroke="dash" draw:stroke-dash="Long_20_Dash" draw:marker-end="Arrowheads_20_15" draw:marker-end-width="0.3cm" draw:fill="solid" draw:textarea-vertical-align="middle"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0.949cm" fo:min-width="2.927cm" loext:decorative="false"/>
      <style:paragraph-properties style:writing-mode="lr-tb"/>
    </style:style>
    <style:style style:name="gr6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64" style:family="graphic" style:parent-style-name="standard">
      <style:graphic-properties draw:fill="solid" draw:fill-color="#8fd7d7" draw:textarea-horizontal-align="justify" draw:textarea-vertical-align="middle" draw:auto-grow-height="true" fo:min-height="0cm" fo:min-width="0cm" style:writing-mode="lr-tb" loext:decorative="false"/>
      <style:paragraph-properties style:writing-mode="lr-tb"/>
    </style:style>
    <style:style style:name="gr65" style:family="graphic" style:parent-style-name="objectwithoutfill">
      <style:graphic-properties draw:marker-end="Arrowheads_20_16" draw:marker-end-width="0.3cm" draw:fill="solid" draw:textarea-vertical-align="middle" loext:decorative="false"/>
    </style:style>
    <style:style style:name="gr66" style:family="graphic" style:parent-style-name="objectwithoutfill">
      <style:graphic-properties draw:marker-end="Arrowheads_20_17" draw:marker-end-width="0.3cm" draw:fill="solid" draw:textarea-vertical-align="middle" loext:decorative="false"/>
    </style:style>
    <style:style style:name="gr67" style:family="graphic" style:parent-style-name="objectwithoutfill">
      <style:graphic-properties draw:marker-end="Arrowheads_20_18" draw:marker-end-width="0.3cm" draw:fill="solid" draw:textarea-vertical-align="middle" loext:decorative="false"/>
    </style:style>
    <style:style style:name="gr68" style:family="graphic" style:parent-style-name="objectwithoutfill">
      <style:graphic-properties draw:marker-end="Arrowheads_20_19" draw:marker-end-width="0.3cm" draw:fill="solid" draw:textarea-vertical-align="middle" loext:decorative="false"/>
    </style:style>
    <style:style style:name="gr69" style:family="graphic" style:parent-style-name="objectwithoutfill">
      <style:graphic-properties draw:marker-end="Arrowheads_20_20" draw:marker-end-width="0.3cm" draw:fill="solid" draw:textarea-vertical-align="middle" loext:decorative="false"/>
    </style:style>
    <style:style style:name="gr70" style:family="graphic" style:parent-style-name="objectwithoutfill">
      <style:graphic-properties draw:marker-end="Arrowheads_20_21" draw:marker-end-width="0.3cm" draw:fill="solid" draw:textarea-vertical-align="middle" loext:decorative="false"/>
    </style:style>
    <style:style style:name="gr71" style:family="graphic" style:parent-style-name="objectwithoutfill">
      <style:graphic-properties draw:marker-end="Arrowheads_20_22" draw:marker-end-width="0.3cm" draw:fill="solid" draw:textarea-vertical-align="middle" loext:decorative="false"/>
    </style:style>
    <style:style style:name="gr72" style:family="graphic" style:parent-style-name="objectwithoutfill">
      <style:graphic-properties draw:marker-end="Arrowheads_20_23" draw:marker-end-width="0.3cm" draw:fill="solid" draw:textarea-vertical-align="middle" loext:decorative="false"/>
    </style:style>
    <style:style style:name="gr73" style:family="graphic" style:parent-style-name="standard">
      <style:graphic-properties draw:stroke="none" svg:stroke-color="#000000" draw:fill="none" draw:fill-color="#ffffff" draw:textarea-horizontal-align="left" draw:auto-grow-height="true" draw:auto-grow-width="true" fo:min-height="0.949cm" fo:min-width="3.842cm" loext:decorative="false"/>
      <style:paragraph-properties style:writing-mode="lr-tb"/>
    </style:style>
    <style:style style:name="gr74" style:family="graphic" style:parent-style-name="objectwithoutfill">
      <style:graphic-properties draw:stroke="dash" draw:stroke-dash="Long_20_Dash" draw:marker-end="Arrowheads_20_24" draw:marker-end-width="0.3cm" draw:fill="solid" draw:textarea-vertical-align="middle" loext:decorative="false"/>
    </style:style>
    <style:style style:name="gr75"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6" style:family="graphic" style:parent-style-name="objectwithoutfill">
      <style:graphic-properties draw:marker-end="Arrowheads_20_191" draw:marker-end-width="0.3cm" draw:fill="solid" draw:textarea-vertical-align="middle" loext:decorative="false"/>
    </style:style>
    <style:style style:name="gr7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8" style:family="graphic" style:parent-style-name="objectwithoutfill">
      <style:graphic-properties draw:marker-end="Arrowheads_20_192" draw:marker-end-width="0.3cm" draw:fill="solid" draw:textarea-vertical-align="middle" loext:decorative="false"/>
    </style:style>
    <style:style style:name="gr79" style:family="graphic" style:parent-style-name="standard">
      <style:graphic-properties draw:fill="solid" draw:fill-color="#8fd7d7" draw:textarea-vertical-align="middle" loext:decorative="false"/>
      <style:paragraph-properties style:writing-mode="lr-tb"/>
    </style:style>
    <style:style style:name="gr80" style:family="graphic" style:parent-style-name="standard">
      <style:graphic-properties draw:stroke="none" svg:stroke-color="#c9211e" draw:fill="solid" draw:fill-color="#8fd7d7" draw:textarea-horizontal-align="justify" draw:textarea-vertical-align="middle" draw:auto-grow-height="false" fo:min-height="3.498cm" fo:min-width="3.814cm" style:writing-mode="lr-tb" loext:decorative="false"/>
      <style:paragraph-properties style:writing-mode="lr-tb"/>
    </style:style>
    <style:style style:name="gr81" style:family="graphic" style:parent-style-name="standard">
      <style:graphic-properties draw:stroke="solid" svg:stroke-color="#c9211e" draw:fill="solid" draw:fill-color="#ff8ca1" draw:textarea-horizontal-align="justify" draw:textarea-vertical-align="middle" draw:auto-grow-height="false" fo:min-height="0.74cm" fo:min-width="1.34cm" style:writing-mode="lr-tb" loext:decorative="false"/>
      <style:paragraph-properties style:writing-mode="lr-tb"/>
    </style:style>
    <style:style style:name="gr82" style:family="graphic" style:parent-style-name="objectwithoutfill">
      <style:graphic-properties draw:marker-end="Arrowheads_20_43" draw:marker-end-width="0.3cm" draw:fill="solid" draw:textarea-vertical-align="middle" loext:decorative="false"/>
      <style:paragraph-properties style:writing-mode="lr-tb"/>
    </style:style>
    <style:style style:name="gr83" style:family="graphic" style:parent-style-name="objectwithoutfill">
      <style:graphic-properties draw:marker-end="Arrowheads_20_44" draw:marker-end-width="0.3cm" draw:fill="solid" draw:textarea-vertical-align="middle" loext:decorative="false"/>
      <style:paragraph-properties style:writing-mode="lr-tb"/>
    </style:style>
    <style:style style:name="gr84" style:family="graphic" style:parent-style-name="standard" style:list-style-name="L1">
      <style:graphic-properties draw:fill="solid" draw:fill-color="#ff8ca1" draw:textarea-horizontal-align="justify" draw:textarea-vertical-align="middle" draw:auto-grow-height="false" fo:min-height="0.475cm" fo:min-width="1.678cm" style:writing-mode="lr-tb" loext:decorative="false"/>
      <style:paragraph-properties style:writing-mode="lr-tb"/>
    </style:style>
    <style:style style:name="gr85" style:family="graphic" style:parent-style-name="objectwithoutfill">
      <style:graphic-properties draw:marker-end="Arrowheads_20_26" draw:marker-end-width="0.3cm" draw:fill="solid" draw:textarea-vertical-align="middle" loext:decorative="false"/>
    </style:style>
    <style:style style:name="gr86" style:family="graphic" style:parent-style-name="objectwithoutfill">
      <style:graphic-properties draw:marker-end="Arrowheads_20_27" draw:marker-end-width="0.3cm" draw:fill="solid" draw:textarea-vertical-align="middle" loext:decorative="false"/>
    </style:style>
    <style:style style:name="gr87" style:family="graphic" style:parent-style-name="objectwithoutfill">
      <style:graphic-properties draw:marker-end="Arrowheads_20_28" draw:marker-end-width="0.3cm" draw:fill="solid" draw:textarea-vertical-align="middle" loext:decorative="false"/>
    </style:style>
    <style:style style:name="gr88" style:family="graphic" style:parent-style-name="objectwithoutfill">
      <style:graphic-properties draw:marker-end="Arrowheads_20_29" draw:marker-end-width="0.3cm" draw:fill="solid" draw:textarea-vertical-align="middle" loext:decorative="false"/>
    </style:style>
    <style:style style:name="gr89" style:family="graphic" style:parent-style-name="objectwithoutfill">
      <style:graphic-properties draw:marker-end="Arrowheads_20_30" draw:marker-end-width="0.3cm" draw:fill="solid" draw:textarea-vertical-align="middle" loext:decorative="false"/>
    </style:style>
    <style:style style:name="gr90" style:family="graphic" style:parent-style-name="objectwithoutfill">
      <style:graphic-properties draw:marker-end="Arrowheads_20_31" draw:marker-end-width="0.3cm" draw:fill="solid" draw:textarea-vertical-align="middle" loext:decorative="false"/>
    </style:style>
    <style:style style:name="gr91" style:family="graphic" style:parent-style-name="objectwithoutfill">
      <style:graphic-properties draw:marker-end="Arrowheads_20_32" draw:marker-end-width="0.3cm" draw:fill="solid" draw:textarea-vertical-align="middle" loext:decorative="false"/>
    </style:style>
    <style:style style:name="gr92" style:family="graphic" style:parent-style-name="objectwithoutfill">
      <style:graphic-properties draw:marker-end="Arrowheads_20_33" draw:marker-end-width="0.3cm" draw:fill="solid" draw:textarea-vertical-align="middle" loext:decorative="false"/>
    </style:style>
    <style:style style:name="gr93" style:family="graphic" style:parent-style-name="objectwithoutfill">
      <style:graphic-properties draw:marker-end="Arrowheads_20_36" draw:marker-end-width="0.3cm" draw:fill="solid" draw:textarea-vertical-align="middle" loext:decorative="false"/>
    </style:style>
    <style:style style:name="gr94" style:family="graphic" style:parent-style-name="objectwithoutfill">
      <style:graphic-properties draw:marker-end="Arrowheads_20_39" draw:marker-end-width="0.3cm" draw:fill="solid" draw:textarea-vertical-align="middle" loext:decorative="false"/>
    </style:style>
    <style:style style:name="gr95" style:family="graphic" style:parent-style-name="objectwithoutfill">
      <style:graphic-properties draw:marker-end="Arrowheads_20_40" draw:marker-end-width="0.3cm" draw:fill="solid" draw:textarea-vertical-align="middle" loext:decorative="false"/>
    </style:style>
    <style:style style:name="gr96" style:family="graphic" style:parent-style-name="objectwithoutfill">
      <style:graphic-properties draw:marker-end="Arrowheads_20_41" draw:marker-end-width="0.3cm" draw:fill="solid" draw:textarea-vertical-align="middle" loext:decorative="false"/>
    </style:style>
    <style:style style:name="gr97" style:family="graphic" style:parent-style-name="objectwithoutfill">
      <style:graphic-properties draw:marker-end="Arrowheads_20_50" draw:marker-end-width="0.3cm" draw:fill="solid" draw:textarea-vertical-align="middle" loext:decorative="false"/>
    </style:style>
    <style:style style:name="gr98" style:family="graphic" style:parent-style-name="objectwithoutfill">
      <style:graphic-properties draw:marker-end="Arrowheads_20_51" draw:marker-end-width="0.3cm" draw:fill="solid" draw:textarea-vertical-align="middle" loext:decorative="false"/>
    </style:style>
    <style:style style:name="gr99" style:family="graphic" style:parent-style-name="objectwithoutfill">
      <style:graphic-properties draw:marker-end="Arrowheads_20_52" draw:marker-end-width="0.3cm" draw:fill="solid" draw:textarea-vertical-align="middle" loext:decorative="false"/>
    </style:style>
    <style:style style:name="gr100" style:family="graphic" style:parent-style-name="objectwithoutfill">
      <style:graphic-properties draw:marker-end="Arrowheads_20_53" draw:marker-end-width="0.3cm" draw:fill="solid" draw:textarea-vertical-align="middle" loext:decorative="false"/>
    </style:style>
    <style:style style:name="gr101" style:family="graphic" style:parent-style-name="objectwithoutfill">
      <style:graphic-properties draw:marker-end="Arrowheads_20_54" draw:marker-end-width="0.3cm" draw:fill="solid" draw:textarea-vertical-align="middle" loext:decorative="false"/>
    </style:style>
    <style:style style:name="gr102" style:family="graphic" style:parent-style-name="objectwithoutfill">
      <style:graphic-properties draw:marker-end="Arrowheads_20_55" draw:marker-end-width="0.3cm" draw:fill="solid" draw:textarea-vertical-align="middle" loext:decorative="false"/>
    </style:style>
    <style:style style:name="gr103" style:family="graphic" style:parent-style-name="objectwithoutfill">
      <style:graphic-properties draw:marker-end="Arrowheads_20_56" draw:marker-end-width="0.3cm" draw:fill="solid" draw:textarea-vertical-align="middle" loext:decorative="false"/>
    </style:style>
    <style:style style:name="gr104" style:family="graphic" style:parent-style-name="objectwithoutfill">
      <style:graphic-properties draw:marker-end="Arrowheads_20_57" draw:marker-end-width="0.3cm" draw:fill="solid" draw:textarea-vertical-align="middle" loext:decorative="false"/>
    </style:style>
    <style:style style:name="gr105" style:family="graphic" style:parent-style-name="standard">
      <style:graphic-properties draw:stroke="solid" svg:stroke-color="#b2b2b2" draw:fill="solid" draw:fill-color="#ffffff" draw:textarea-horizontal-align="justify" draw:textarea-vertical-align="middle" draw:auto-grow-height="false" fo:min-height="1.539cm" fo:min-width="2.101cm" style:writing-mode="lr-tb" loext:decorative="false"/>
      <style:paragraph-properties style:writing-mode="lr-tb"/>
    </style:style>
    <style:style style:name="gr106" style:family="graphic" style:parent-style-name="standard">
      <style:graphic-properties draw:stroke="solid" svg:stroke-color="#b2b2b2" draw:fill="solid" draw:fill-color="#ffffff" draw:textarea-horizontal-align="justify" draw:textarea-vertical-align="middle" draw:auto-grow-height="false" fo:min-height="1.295cm" fo:min-width="2.501cm" style:writing-mode="lr-tb" loext:decorative="false"/>
      <style:paragraph-properties style:writing-mode="lr-tb"/>
    </style:style>
    <style:style style:name="gr107" style:family="graphic" style:parent-style-name="standard">
      <style:graphic-properties draw:stroke="solid" svg:stroke-color="#b2b2b2" draw:fill="solid" draw:fill-color="#ffffff" draw:textarea-horizontal-align="justify" draw:textarea-vertical-align="middle" draw:auto-grow-height="false" fo:min-height="0.888cm" fo:min-width="2.101cm" style:writing-mode="lr-tb" loext:decorative="false"/>
      <style:paragraph-properties style:writing-mode="lr-tb"/>
    </style:style>
    <style:style style:name="gr108" style:family="graphic" style:parent-style-name="objectwithoutfill">
      <style:graphic-properties draw:marker-end="Arrowheads_20_65" draw:marker-end-width="0.3cm" draw:fill="solid" draw:textarea-vertical-align="middle" loext:decorative="false"/>
    </style:style>
    <style:style style:name="gr109" style:family="graphic" style:parent-style-name="standard" style:list-style-name="L1">
      <style:graphic-properties draw:fill="solid" draw:fill-color="#f45f74" draw:textarea-horizontal-align="justify" draw:textarea-vertical-align="middle" draw:auto-grow-height="false" fo:min-height="1.094cm" fo:min-width="2.188cm" style:writing-mode="lr-tb" loext:decorative="false"/>
      <style:paragraph-properties style:writing-mode="lr-tb"/>
    </style:style>
    <style:style style:name="gr110" style:family="graphic" style:parent-style-name="objectwithoutfill">
      <style:graphic-properties draw:marker-end="Arrowheads_20_76" draw:marker-end-width="0.3cm" draw:fill="solid" draw:textarea-vertical-align="middle" loext:decorative="false"/>
    </style:style>
    <style:style style:name="gr111" style:family="graphic" style:parent-style-name="objectwithoutfill">
      <style:graphic-properties draw:marker-end="Arrowheads_20_77" draw:marker-end-width="0.3cm" draw:fill="solid" draw:textarea-vertical-align="middle" loext:decorative="false"/>
    </style:style>
    <style:style style:name="gr112" style:family="graphic" style:parent-style-name="objectwithoutfill">
      <style:graphic-properties draw:marker-end="Arrowheads_20_78" draw:marker-end-width="0.3cm" draw:fill="solid" draw:textarea-vertical-align="middle" loext:decorative="false"/>
    </style:style>
    <style:style style:name="gr113" style:family="graphic" style:parent-style-name="objectwithoutfill">
      <style:graphic-properties draw:marker-end="Arrowheads_20_79" draw:marker-end-width="0.3cm" draw:fill="solid" draw:textarea-vertical-align="middle" loext:decorative="false"/>
    </style:style>
    <style:style style:name="gr114" style:family="graphic" style:parent-style-name="objectwithoutfill">
      <style:graphic-properties draw:marker-end="Arrowheads_20_80" draw:marker-end-width="0.3cm" draw:fill="solid" draw:textarea-vertical-align="middle" loext:decorative="false"/>
    </style:style>
    <style:style style:name="gr115" style:family="graphic" style:parent-style-name="objectwithoutfill">
      <style:graphic-properties draw:marker-end="Arrowheads_20_82" draw:marker-end-width="0.3cm" draw:fill="solid" draw:textarea-vertical-align="middle" loext:decorative="false"/>
    </style:style>
    <style:style style:name="gr116" style:family="graphic" style:parent-style-name="standard">
      <style:graphic-properties draw:fill-color="#bdd373" draw:textarea-horizontal-align="justify" draw:textarea-vertical-align="middle" draw:auto-grow-height="true" fo:min-height="0cm" fo:min-width="0cm" style:writing-mode="lr-tb" loext:decorative="false"/>
      <style:paragraph-properties style:writing-mode="lr-tb"/>
    </style:style>
    <style:style style:name="gr117"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8"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9" style:family="graphic" style:parent-style-name="standard">
      <style:graphic-properties draw:fill="solid" draw:fill-color="#ffb255" draw:textarea-horizontal-align="justify" draw:textarea-vertical-align="middle" draw:auto-grow-height="false" fo:min-height="1.11cm" fo:min-width="1.564cm" style:writing-mode="lr-tb" loext:decorative="false"/>
      <style:paragraph-properties style:writing-mode="lr-tb"/>
    </style:style>
    <style:style style:name="gr120" style:family="graphic" style:parent-style-name="objectwithoutfill">
      <style:graphic-properties draw:marker-end="Arrowheads_20_84" draw:marker-end-width="0.3cm" draw:fill="solid" draw:textarea-vertical-align="middle" loext:decorative="false"/>
    </style:style>
    <style:style style:name="gr121" style:family="graphic" style:parent-style-name="objectwithoutfill">
      <style:graphic-properties draw:marker-end="Arrowheads_20_85" draw:marker-end-width="0.3cm" draw:fill="solid" draw:textarea-vertical-align="middle" loext:decorative="false"/>
      <style:paragraph-properties style:writing-mode="lr-tb"/>
    </style:style>
    <style:style style:name="gr122" style:family="graphic" style:parent-style-name="objectwithoutfill">
      <style:graphic-properties draw:marker-end="Arrowheads_20_86" draw:marker-end-width="0.3cm" draw:fill="solid" draw:textarea-vertical-align="middle" loext:decorative="false"/>
    </style:style>
    <style:style style:name="gr123" style:family="graphic" style:parent-style-name="objectwithoutfill">
      <style:graphic-properties draw:marker-end="Arrowheads_20_87" draw:marker-end-width="0.3cm" draw:fill="solid" draw:textarea-vertical-align="middle" loext:decorative="false"/>
    </style:style>
    <style:style style:name="gr124" style:family="graphic" style:parent-style-name="objectwithoutfill">
      <style:graphic-properties draw:marker-end="Arrowheads_20_93" draw:marker-end-width="0.3cm" draw:fill="solid" draw:textarea-vertical-align="middle" loext:decorative="false"/>
    </style:style>
    <style:style style:name="gr125" style:family="graphic" style:parent-style-name="objectwithoutfill">
      <style:graphic-properties draw:marker-end="Arrowheads_20_96" draw:marker-end-width="0.3cm" draw:fill="solid" draw:textarea-vertical-align="middle" loext:decorative="false"/>
    </style:style>
    <style:style style:name="gr126" style:family="graphic" style:parent-style-name="objectwithoutfill">
      <style:graphic-properties draw:marker-end="Arrowheads_20_97" draw:marker-end-width="0.3cm" draw:fill="solid" draw:textarea-vertical-align="middle" loext:decorative="false"/>
    </style:style>
    <style:style style:name="gr127" style:family="graphic" style:parent-style-name="objectwithoutfill">
      <style:graphic-properties draw:marker-end="Arrowheads_20_98" draw:marker-end-width="0.3cm" draw:fill="solid" draw:textarea-vertical-align="middle" loext:decorative="false"/>
    </style:style>
    <style:style style:name="gr128" style:family="graphic" style:parent-style-name="objectwithoutfill">
      <style:graphic-properties draw:marker-end="Arrowheads_20_104" draw:marker-end-width="0.3cm" draw:fill="solid" draw:textarea-vertical-align="middle" loext:decorative="false"/>
    </style:style>
    <style:style style:name="gr129" style:family="graphic" style:parent-style-name="objectwithoutfill">
      <style:graphic-properties draw:marker-end="Arrowheads_20_107" draw:marker-end-width="0.3cm" draw:fill="solid" draw:textarea-vertical-align="middle" loext:decorative="false"/>
    </style:style>
    <style:style style:name="gr130" style:family="graphic" style:parent-style-name="objectwithoutfill">
      <style:graphic-properties draw:marker-end="Arrowheads_20_110" draw:marker-end-width="0.3cm" draw:fill="solid" draw:textarea-vertical-align="middle" loext:decorative="false"/>
    </style:style>
    <style:style style:name="gr131" style:family="graphic" style:parent-style-name="objectwithoutfill">
      <style:graphic-properties draw:marker-end="Arrowheads_20_111" draw:marker-end-width="0.3cm" draw:fill="solid" draw:textarea-vertical-align="middle" loext:decorative="false"/>
    </style:style>
    <style:style style:name="gr132" style:family="graphic" style:parent-style-name="objectwithoutfill">
      <style:graphic-properties draw:marker-end="Arrowheads_20_112" draw:marker-end-width="0.3cm" draw:fill="solid" draw:textarea-vertical-align="middle" loext:decorative="false"/>
    </style:style>
    <style:style style:name="gr133" style:family="graphic" style:parent-style-name="objectwithoutfill">
      <style:graphic-properties draw:marker-end="Arrowheads_20_113" draw:marker-end-width="0.3cm" draw:fill="solid" draw:textarea-vertical-align="middle" loext:decorative="false"/>
    </style:style>
    <style:style style:name="gr134" style:family="graphic" style:parent-style-name="objectwithoutfill">
      <style:graphic-properties draw:marker-end="Arrowheads_20_115" draw:marker-end-width="0.3cm" draw:fill="solid" draw:textarea-vertical-align="middle" loext:decorative="false"/>
    </style:style>
    <style:style style:name="gr1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6" style:family="graphic" style:parent-style-name="objectwithoutfill">
      <style:graphic-properties draw:marker-end="Arrowheads_20_116" draw:marker-end-width="0.3cm" draw:fill="solid" draw:textarea-horizontal-align="left" draw:textarea-vertical-align="middle" loext:decorative="false"/>
      <style:paragraph-properties style:writing-mode="lr-tb"/>
    </style:style>
    <style:style style:name="gr137" style:family="graphic" style:parent-style-name="standard">
      <style:graphic-properties draw:stroke="solid" svg:stroke-color="#b2b2b2" draw:fill="solid" draw:fill-color="#ffffff" draw:textarea-horizontal-align="justify" draw:textarea-vertical-align="middle" draw:auto-grow-height="false" fo:min-height="1.221cm" fo:min-width="3.036cm" style:writing-mode="lr-tb" loext:decorative="false"/>
      <style:paragraph-properties style:writing-mode="lr-tb"/>
    </style:style>
    <style:style style:name="gr138" style:family="graphic" style:parent-style-name="objectwithoutfill">
      <style:graphic-properties draw:marker-end="Arrowheads_20_121" draw:marker-end-width="0.3cm" draw:fill="solid" draw:textarea-vertical-align="middle" loext:decorative="false"/>
    </style:style>
    <style:style style:name="gr13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0"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1"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2" style:family="graphic" style:parent-style-name="objectwithoutfill">
      <style:graphic-properties draw:marker-end="Arrowheads_20_122" draw:marker-end-width="0.3cm" draw:fill="solid" draw:textarea-vertical-align="middle" loext:decorative="false"/>
    </style:style>
    <style:style style:name="gr143" style:family="graphic" style:parent-style-name="objectwithoutfill">
      <style:graphic-properties draw:marker-end="Arrowheads_20_123" draw:marker-end-width="0.3cm" draw:fill="solid" draw:textarea-vertical-align="middle" loext:decorative="false"/>
    </style:style>
    <style:style style:name="gr144"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45" style:family="graphic" style:parent-style-name="objectwithoutfill">
      <style:graphic-properties draw:marker-end="Arrowheads_20_126" draw:marker-end-width="0.3cm" draw:fill="solid" draw:textarea-vertical-align="middle" loext:decorative="false"/>
    </style:style>
    <style:style style:name="gr146" style:family="graphic" style:parent-style-name="objectwithoutfill">
      <style:graphic-properties draw:marker-end="Arrowheads_20_127" draw:marker-end-width="0.3cm" draw:fill="solid" draw:textarea-vertical-align="middle" loext:decorative="false"/>
    </style:style>
    <style:style style:name="gr147" style:family="graphic" style:parent-style-name="objectwithoutfill">
      <style:graphic-properties draw:marker-end="Arrowheads_20_128" draw:marker-end-width="0.3cm" draw:fill="solid" draw:textarea-vertical-align="middle" loext:decorative="false"/>
    </style:style>
    <style:style style:name="gr148" style:family="graphic" style:parent-style-name="objectwithoutfill">
      <style:graphic-properties draw:marker-end="Arrowheads_20_129" draw:marker-end-width="0.3cm" draw:fill="solid" draw:textarea-vertical-align="middle" loext:decorative="false"/>
    </style:style>
    <style:style style:name="gr149" style:family="graphic" style:parent-style-name="objectwithoutfill">
      <style:graphic-properties draw:marker-end="Arrowheads_20_130" draw:marker-end-width="0.3cm" draw:fill="solid" draw:textarea-vertical-align="middle" loext:decorative="false"/>
    </style:style>
    <style:style style:name="gr150" style:family="graphic" style:parent-style-name="objectwithoutfill">
      <style:graphic-properties draw:stroke="dash" draw:stroke-dash="Long_20_Dash" svg:stroke-color="#000000" draw:marker-end="Arrowheads_20_25" draw:marker-end-width="0.3cm" draw:fill="solid" draw:textarea-horizontal-align="center" draw:textarea-vertical-align="middle" fo:padding-left="0.15cm" fo:padding-right="0.15cm" loext:decorative="false"/>
      <style:paragraph-properties style:writing-mode="lr-tb"/>
    </style:style>
    <style:style style:name="gr151" style:family="graphic" style:parent-style-name="objectwithoutfill">
      <style:graphic-properties draw:stroke="dash" draw:stroke-dash="Long_20_Dash" svg:stroke-color="#000000" draw:marker-end="Arrowheads_20_25" draw:marker-end-width="0.3cm" draw:fill="solid" draw:textarea-vertical-align="middle" loext:decorative="false"/>
      <style:paragraph-properties style:writing-mode="lr-tb"/>
    </style:style>
    <style:style style:name="gr152" style:family="graphic" style:parent-style-name="objectwithoutfill">
      <style:graphic-properties draw:marker-end="Arrowheads_20_131" draw:marker-end-width="0.3cm" draw:fill="solid" draw:textarea-vertical-align="middle" loext:decorative="false"/>
    </style:style>
    <style:style style:name="gr15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54" style:family="graphic" style:parent-style-name="objectwithoutfill">
      <style:graphic-properties draw:marker-end="Arrowheads_20_132" draw:marker-end-width="0.3cm" draw:fill="solid" draw:textarea-vertical-align="middle" loext:decorative="false"/>
    </style:style>
    <style:style style:name="gr155" style:family="graphic" style:parent-style-name="objectwithoutfill">
      <style:graphic-properties draw:marker-end="Arrowheads_20_133" draw:marker-end-width="0.3cm" draw:fill="solid" draw:textarea-vertical-align="middle" loext:decorative="false"/>
    </style:style>
    <style:style style:name="gr156" style:family="graphic" style:parent-style-name="objectwithoutfill">
      <style:graphic-properties draw:marker-end="Arrowheads_20_134" draw:marker-end-width="0.3cm" draw:fill="solid" draw:textarea-vertical-align="middle" loext:decorative="false"/>
    </style:style>
    <style:style style:name="gr157" style:family="graphic" style:parent-style-name="objectwithoutfill">
      <style:graphic-properties draw:marker-end="Arrowheads_20_135" draw:marker-end-width="0.3cm" draw:fill="solid" draw:textarea-vertical-align="middle" loext:decorative="false"/>
    </style:style>
    <style:style style:name="gr158" style:family="graphic" style:parent-style-name="objectwithoutfill">
      <style:graphic-properties draw:marker-end="Arrowheads_20_136" draw:marker-end-width="0.3cm" draw:fill="solid" draw:textarea-vertical-align="middle" loext:decorative="false"/>
    </style:style>
    <style:style style:name="gr15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60" style:family="graphic" style:parent-style-name="objectwithoutfill">
      <style:graphic-properties draw:marker-end="Arrowheads_20_137" draw:marker-end-width="0.3cm" draw:fill="solid" draw:textarea-vertical-align="middle" loext:decorative="false"/>
    </style:style>
    <style:style style:name="gr161" style:family="graphic" style:parent-style-name="objectwithoutfill">
      <style:graphic-properties draw:marker-end="Arrowheads_20_138" draw:marker-end-width="0.3cm" draw:fill="solid" draw:textarea-vertical-align="middle" loext:decorative="false"/>
    </style:style>
    <style:style style:name="gr162" style:family="graphic" style:parent-style-name="objectwithoutfill">
      <style:graphic-properties draw:marker-end="Arrowheads_20_139" draw:marker-end-width="0.3cm" draw:fill="solid" draw:textarea-vertical-align="middle" loext:decorative="false"/>
    </style:style>
    <style:style style:name="gr16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64" style:family="graphic" style:parent-style-name="objectwithoutfill">
      <style:graphic-properties draw:marker-end="Arrowheads_20_140" draw:marker-end-width="0.3cm" draw:fill="solid" draw:textarea-vertical-align="middle" loext:decorative="false"/>
    </style:style>
    <style:style style:name="gr165" style:family="graphic" style:parent-style-name="objectwithoutfill">
      <style:graphic-properties draw:marker-end="Arrowheads_20_141" draw:marker-end-width="0.3cm" draw:fill="solid" draw:textarea-vertical-align="middle" loext:decorative="false"/>
      <style:paragraph-properties style:writing-mode="lr-tb"/>
    </style:style>
    <style:style style:name="gr166" style:family="graphic" style:parent-style-name="objectwithoutfill">
      <style:graphic-properties draw:marker-end="Arrowheads_20_142" draw:marker-end-width="0.3cm" draw:fill="solid" draw:textarea-vertical-align="middle" loext:decorative="false"/>
      <style:paragraph-properties style:writing-mode="lr-tb"/>
    </style:style>
    <style:style style:name="gr167" style:family="graphic" style:parent-style-name="objectwithoutfill">
      <style:graphic-properties draw:marker-end="Arrowheads_20_143" draw:marker-end-width="0.3cm" draw:fill="solid" draw:textarea-vertical-align="middle" loext:decorative="false"/>
      <style:paragraph-properties style:writing-mode="lr-tb"/>
    </style:style>
    <style:style style:name="gr168" style:family="graphic" style:parent-style-name="objectwithoutfill">
      <style:graphic-properties draw:stroke="dash" draw:stroke-dash="Long_20_Dash" svg:stroke-color="#000000" draw:marker-end="Arrowheads_20_25" draw:marker-end-width="0.3cm" draw:fill="solid" draw:textarea-horizontal-align="center" draw:textarea-vertical-align="top" fo:padding-left="0.15cm" fo:padding-right="0.15cm" loext:decorative="false"/>
      <style:paragraph-properties style:writing-mode="lr-tb"/>
    </style:style>
    <style:style style:name="gr169" style:family="graphic" style:parent-style-name="standard">
      <style:graphic-properties draw:textarea-horizontal-align="left" draw:textarea-vertical-align="top" loext:decorative="false"/>
      <style:paragraph-properties style:writing-mode="lr-tb"/>
    </style:style>
    <style:style style:name="gr170" style:family="graphic" style:parent-style-name="standard">
      <style:graphic-properties draw:stroke="solid" svg:stroke-color="#158466" draw:textarea-horizontal-align="left" draw:textarea-vertical-align="top" loext:decorative="false"/>
      <style:paragraph-properties style:writing-mode="lr-tb"/>
    </style:style>
    <style:style style:name="gr171" style:family="graphic" style:parent-style-name="standard" style:list-style-name="L1">
      <style:graphic-properties draw:stroke="solid" svg:stroke-color="#158466" draw:fill="solid" draw:fill-color="#00b0be" draw:textarea-horizontal-align="center" draw:textarea-vertical-align="middle" loext:decorative="false"/>
      <style:paragraph-properties style:writing-mode="lr-tb"/>
    </style:style>
    <style:style style:name="gr172"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3" style:family="graphic" style:parent-style-name="standard" style:list-style-name="L1">
      <style:graphic-properties draw:fill="solid" draw:fill-color="#f45f74" draw:textarea-horizontal-align="justify" draw:textarea-vertical-align="middle" draw:auto-grow-height="false" fo:min-height="0.638cm" fo:min-width="0.378cm" style:writing-mode="lr-tb" loext:decorative="false"/>
      <style:paragraph-properties style:writing-mode="lr-tb"/>
    </style:style>
    <style:style style:name="gr174" style:family="graphic" style:parent-style-name="objectwithoutfill">
      <style:graphic-properties draw:marker-end="Arrowheads_20_146" draw:marker-end-width="0.3cm" draw:fill="solid" draw:textarea-vertical-align="middle" loext:decorative="false"/>
    </style:style>
    <style:style style:name="gr17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7" style:family="graphic" style:parent-style-name="objectwithoutfill">
      <style:graphic-properties draw:marker-end="Arrowheads_20_147" draw:marker-end-width="0.3cm" draw:fill="solid" draw:textarea-vertical-align="middle" loext:decorative="false"/>
    </style:style>
    <style:style style:name="gr178" style:family="graphic" style:parent-style-name="objectwithoutfill">
      <style:graphic-properties draw:marker-end="Arrowheads_20_149" draw:marker-end-width="0.3cm" draw:fill="solid" draw:textarea-vertical-align="middle" loext:decorative="false"/>
    </style:style>
    <style:style style:name="gr17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0"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1"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2" style:family="graphic" style:parent-style-name="objectwithoutfill">
      <style:graphic-properties draw:marker-end="Arrowheads_20_150" draw:marker-end-width="0.3cm" draw:fill="solid" draw:textarea-vertical-align="middle" loext:decorative="false"/>
    </style:style>
    <style:style style:name="gr183"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4" style:family="graphic" style:parent-style-name="standard" style:list-style-name="L1">
      <style:graphic-properties draw:fill="solid" draw:fill-color="#f45f74" draw:textarea-horizontal-align="justify" draw:textarea-vertical-align="middle" draw:auto-grow-height="false" fo:min-height="0.638cm" fo:min-width="1.501cm" style:writing-mode="lr-tb" loext:decorative="false"/>
      <style:paragraph-properties style:writing-mode="lr-tb"/>
    </style:style>
    <style:style style:name="gr18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7"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8"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90" style:family="graphic" style:parent-style-name="standard">
      <style:graphic-properties draw:fill="solid" draw:fill-color="#98c127" draw:textarea-horizontal-align="justify" draw:textarea-vertical-align="middle" draw:auto-grow-height="false" fo:min-height="0.915cm" fo:min-width="0.843cm" loext:decorative="false"/>
    </style:style>
    <style:style style:name="gr191" style:family="graphic" style:parent-style-name="standard">
      <style:graphic-properties draw:stroke="none" svg:stroke-color="#000000" draw:fill="none" draw:fill-color="#ffffff" draw:textarea-horizontal-align="left" draw:auto-grow-height="true" draw:auto-grow-width="true" fo:min-height="0.949cm" fo:min-width="8.113cm" loext:decorative="false"/>
      <style:paragraph-properties style:writing-mode="lr-tb"/>
    </style:style>
    <style:style style:name="gr192" style:family="graphic" style:parent-style-name="objectwithoutfill">
      <style:graphic-properties draw:marker-end="Arrowheads_20_151" draw:marker-end-width="0.3cm" draw:fill="solid" draw:textarea-vertical-align="middle" loext:decorative="false"/>
    </style:style>
    <style:style style:name="gr193" style:family="graphic" style:parent-style-name="objectwithoutfill">
      <style:graphic-properties draw:marker-end="Arrowheads_20_152" draw:marker-end-width="0.3cm" draw:fill="solid" draw:textarea-vertical-align="middle" loext:decorative="false"/>
    </style:style>
    <style:style style:name="gr194" style:family="graphic" style:parent-style-name="objectwithoutfill">
      <style:graphic-properties draw:marker-end="Arrowheads_20_153" draw:marker-end-width="0.3cm" draw:fill="solid" draw:textarea-vertical-align="middle" loext:decorative="false"/>
    </style:style>
    <style:style style:name="gr195" style:family="graphic" style:parent-style-name="objectwithoutfill">
      <style:graphic-properties draw:marker-end="Arrowheads_20_163" draw:marker-end-width="0.3cm" draw:fill="solid" draw:textarea-vertical-align="middle" loext:decorative="false"/>
    </style:style>
    <style:style style:name="gr196" style:family="graphic" style:parent-style-name="objectwithoutfill">
      <style:graphic-properties draw:marker-end="Arrowheads_20_164" draw:marker-end-width="0.3cm" draw:fill="solid" draw:textarea-vertical-align="middle" loext:decorative="false"/>
    </style:style>
    <style:style style:name="gr197" style:family="graphic" style:parent-style-name="objectwithoutfill">
      <style:graphic-properties draw:marker-end="Arrowheads_20_165" draw:marker-end-width="0.3cm" draw:fill="solid" draw:textarea-vertical-align="middle" loext:decorative="false"/>
    </style:style>
    <style:style style:name="gr198" style:family="graphic" style:parent-style-name="objectwithoutfill">
      <style:graphic-properties draw:marker-end="Arrowheads_20_169" draw:marker-end-width="0.3cm" draw:fill="solid" draw:textarea-vertical-align="middle" loext:decorative="false"/>
    </style:style>
    <style:style style:name="gr199" style:family="graphic" style:parent-style-name="objectwithoutfill">
      <style:graphic-properties draw:marker-end="Arrowheads_20_170" draw:marker-end-width="0.3cm" draw:fill="solid" draw:textarea-vertical-align="middle" loext:decorative="false"/>
    </style:style>
    <style:style style:name="gr200" style:family="graphic" style:parent-style-name="objectwithoutfill">
      <style:graphic-properties draw:marker-end="Arrowheads_20_171" draw:marker-end-width="0.3cm" draw:fill="solid" draw:textarea-vertical-align="middle" loext:decorative="false"/>
    </style:style>
    <style:style style:name="gr201" style:family="graphic" style:parent-style-name="objectwithoutfill">
      <style:graphic-properties draw:marker-end="Arrowheads_20_172" draw:marker-end-width="0.3cm" draw:fill="solid" draw:textarea-vertical-align="middle" loext:decorative="false"/>
    </style:style>
    <style:style style:name="gr202" style:family="graphic" style:parent-style-name="standard">
      <style:graphic-properties draw:fill="solid" draw:fill-color="#ffb255" draw:textarea-horizontal-align="left" draw:textarea-vertical-align="top" loext:decorative="false"/>
      <style:paragraph-properties style:writing-mode="lr-tb"/>
    </style:style>
    <style:style style:name="gr203" style:family="graphic" style:parent-style-name="objectwithoutfill">
      <style:graphic-properties draw:marker-end="Arrowheads_20_173" draw:marker-end-width="0.3cm" draw:fill="solid" draw:textarea-vertical-align="middle" loext:decorative="false"/>
    </style:style>
    <style:style style:name="gr204" style:family="graphic" style:parent-style-name="objectwithoutfill">
      <style:graphic-properties draw:marker-end="Arrowheads_20_174" draw:marker-end-width="0.3cm" draw:fill="solid" draw:textarea-vertical-align="middle" loext:decorative="false"/>
    </style:style>
    <style:style style:name="gr205" style:family="graphic" style:parent-style-name="objectwithoutfill">
      <style:graphic-properties draw:marker-end="Arrowheads_20_175" draw:marker-end-width="0.3cm" draw:fill="solid" draw:textarea-vertical-align="middle" loext:decorative="false"/>
    </style:style>
    <style:style style:name="gr206" style:family="graphic" style:parent-style-name="objectwithoutfill">
      <style:graphic-properties draw:marker-end="Arrowheads_20_176" draw:marker-end-width="0.3cm" draw:fill="solid" draw:textarea-vertical-align="middle" loext:decorative="false"/>
    </style:style>
    <style:style style:name="gr207" style:family="graphic" style:parent-style-name="standard">
      <style:graphic-properties draw:fill="solid" draw:fill-color="#98c127" draw:textarea-vertical-align="middle" loext:decorative="false"/>
      <style:paragraph-properties style:writing-mode="lr-tb"/>
    </style:style>
    <style:style style:name="gr208" style:family="graphic" style:parent-style-name="objectwithoutfill">
      <style:graphic-properties draw:marker-end="Arrowheads_20_177" draw:marker-end-width="0.3cm" draw:fill="solid" draw:textarea-vertical-align="middle" loext:decorative="false"/>
    </style:style>
    <style:style style:name="gr209" style:family="graphic" style:parent-style-name="objectwithoutfill">
      <style:graphic-properties draw:marker-end="Arrowheads_20_178" draw:marker-end-width="0.3cm" draw:fill="solid" draw:textarea-vertical-align="middle" loext:decorative="false"/>
    </style:style>
    <style:style style:name="gr210" style:family="graphic" style:parent-style-name="standard">
      <style:graphic-properties draw:fill="solid" draw:fill-color="#ffb255" draw:textarea-horizontal-align="justify" draw:textarea-vertical-align="middle" draw:auto-grow-height="false" fo:min-height="2.386cm" fo:min-width="2.662cm" style:writing-mode="lr-tb" loext:decorative="false"/>
      <style:paragraph-properties style:writing-mode="lr-tb"/>
    </style:style>
    <style:style style:name="gr211" style:family="graphic" style:parent-style-name="objectwithoutfill">
      <style:graphic-properties draw:marker-end="Arrowheads_20_180" draw:marker-end-width="0.3cm" draw:fill="solid" draw:textarea-vertical-align="middle" loext:decorative="false"/>
    </style:style>
    <style:style style:name="gr212" style:family="graphic" style:parent-style-name="objectwithoutfill">
      <style:graphic-properties draw:marker-end="Arrowheads_20_182" draw:marker-end-width="0.3cm" draw:fill="solid" draw:textarea-vertical-align="middle" loext:decorative="false"/>
    </style:style>
    <style:style style:name="gr213" style:family="graphic" style:parent-style-name="standard">
      <style:graphic-properties draw:textarea-horizontal-align="justify" draw:textarea-vertical-align="middle" draw:auto-grow-height="false" fo:min-height="0.617cm" fo:min-width="0.367cm" style:writing-mode="lr-tb" loext:decorative="false"/>
      <style:paragraph-properties style:writing-mode="lr-tb"/>
    </style:style>
    <style:style style:name="gr214" style:family="graphic" style:parent-style-name="objectwithoutfill">
      <style:graphic-properties draw:marker-end="Arrowheads_20_183" draw:marker-end-width="0.3cm" draw:fill="solid" draw:textarea-vertical-align="middle" loext:decorative="false"/>
    </style:style>
    <style:style style:name="gr215" style:family="graphic" style:parent-style-name="objectwithoutfill">
      <style:graphic-properties draw:marker-end="Arrowheads_20_184" draw:marker-end-width="0.3cm" draw:fill="solid" draw:textarea-vertical-align="middle" loext:decorative="false"/>
    </style:style>
    <style:style style:name="gr216" style:family="graphic" style:parent-style-name="objectwithoutfill">
      <style:graphic-properties draw:marker-end="Arrowheads_20_185" draw:marker-end-width="0.3cm" draw:fill="solid" draw:textarea-vertical-align="middle" loext:decorative="false"/>
    </style:style>
    <style:style style:name="gr217" style:family="graphic" style:parent-style-name="objectwithoutfill">
      <style:graphic-properties draw:marker-end="Arrowheads_20_186" draw:marker-end-width="0.3cm" draw:fill="solid" draw:textarea-vertical-align="middle" loext:decorative="false"/>
      <style:paragraph-properties style:writing-mode="lr-tb"/>
    </style:style>
    <style:style style:name="gr218" style:family="graphic" style:parent-style-name="objectwithoutfill">
      <style:graphic-properties draw:marker-end="Arrowheads_20_187" draw:marker-end-width="0.3cm" draw:fill="solid" draw:textarea-vertical-align="middle" loext:decorative="false"/>
    </style:style>
    <style:style style:name="gr219" style:family="graphic" style:parent-style-name="objectwithoutfill">
      <style:graphic-properties draw:marker-end="Arrowheads_20_188" draw:marker-end-width="0.3cm" draw:fill="solid" draw:textarea-vertical-align="middle" loext:decorative="false"/>
    </style:style>
    <style:style style:name="gr220" style:family="graphic" style:parent-style-name="objectwithoutfill">
      <style:graphic-properties draw:marker-end="Arrowheads_20_189" draw:marker-end-width="0.3cm" draw:fill="solid" draw:textarea-vertical-align="middle" loext:decorative="false"/>
    </style:style>
    <style:style style:name="gr221" style:family="graphic" style:parent-style-name="objectwithoutfill">
      <style:graphic-properties draw:marker-end="Arrowheads_20_190" draw:marker-end-width="0.3cm" draw:fill="solid" draw:textarea-vertical-align="middle" loext:decorative="false"/>
    </style:style>
    <style:style style:name="gr222"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4" style:family="graphic" style:parent-style-name="objectwithoutfill">
      <style:graphic-properties draw:marker-end="Arrowheads_20_193" draw:marker-end-width="0.3cm" draw:fill="solid" draw:textarea-vertical-align="middle" loext:decorative="false"/>
    </style:style>
    <style:style style:name="gr225" style:family="graphic" style:parent-style-name="objectwithoutfill">
      <style:graphic-properties draw:marker-end="Arrowheads_20_194" draw:marker-end-width="0.3cm" draw:fill="solid" draw:textarea-vertical-align="middle" loext:decorative="false"/>
    </style:style>
    <style:style style:name="gr226" style:family="graphic" style:parent-style-name="objectwithoutfill">
      <style:graphic-properties draw:marker-end="Arrowheads_20_195" draw:marker-end-width="0.3cm" draw:fill="solid" draw:textarea-vertical-align="middle" loext:decorative="false"/>
    </style:style>
    <style:style style:name="gr22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8" style:family="graphic" style:parent-style-name="objectwithoutfill">
      <style:graphic-properties draw:marker-end="Arrowheads_20_196" draw:marker-end-width="0.3cm" draw:fill="solid" draw:textarea-vertical-align="middle" loext:decorative="false"/>
    </style:style>
    <style:style style:name="gr229" style:family="graphic" style:parent-style-name="objectwithoutfill">
      <style:graphic-properties draw:marker-end="Arrowheads_20_197" draw:marker-end-width="0.3cm" draw:fill="solid" draw:textarea-vertical-align="middle" loext:decorative="false"/>
    </style:style>
    <style:style style:name="gr230" style:family="graphic" style:parent-style-name="objectwithoutfill">
      <style:graphic-properties draw:marker-end="Arrowheads_20_198" draw:marker-end-width="0.3cm" draw:fill="solid" draw:textarea-vertical-align="middle" loext:decorative="false"/>
    </style:style>
    <style:style style:name="gr231" style:family="graphic" style:parent-style-name="objectwithoutfill">
      <style:graphic-properties draw:marker-end="Arrowheads_20_199" draw:marker-end-width="0.3cm" draw:fill="solid" draw:textarea-vertical-align="middle" loext:decorative="false"/>
    </style:style>
    <style:style style:name="gr232" style:family="graphic" style:parent-style-name="objectwithoutfill">
      <style:graphic-properties draw:marker-end="Arrowheads_20_200" draw:marker-end-width="0.3cm" draw:fill="solid" draw:textarea-vertical-align="middle" loext:decorative="false"/>
    </style:style>
    <style:style style:name="gr233" style:family="graphic" style:parent-style-name="objectwithoutfill">
      <style:graphic-properties draw:marker-end="Arrowheads_20_201" draw:marker-end-width="0.3cm" draw:fill="solid" draw:textarea-vertical-align="middle" loext:decorative="false"/>
    </style:style>
    <style:style style:name="gr234" style:family="graphic" style:parent-style-name="objectwithoutfill">
      <style:graphic-properties draw:marker-end="Arrowheads_20_202" draw:marker-end-width="0.3cm" draw:fill="solid" draw:textarea-vertical-align="middle" loext:decorative="false"/>
    </style:style>
    <style:style style:name="gr235" style:family="graphic" style:parent-style-name="objectwithoutfill">
      <style:graphic-properties draw:marker-end="Arrowheads_20_204" draw:marker-end-width="0.3cm" draw:fill="solid" draw:textarea-vertical-align="middle" loext:decorative="false"/>
    </style:style>
    <style:style style:name="gr236" style:family="graphic" style:parent-style-name="objectwithoutfill">
      <style:graphic-properties draw:marker-end="Arrowheads_20_205" draw:marker-end-width="0.3cm" draw:fill="solid" draw:textarea-vertical-align="middle" loext:decorative="false"/>
    </style:style>
    <style:style style:name="gr237" style:family="graphic" style:parent-style-name="objectwithoutfill">
      <style:graphic-properties draw:marker-end="Arrowheads_20_206" draw:marker-end-width="0.3cm" draw:fill="solid" draw:textarea-vertical-align="middle" loext:decorative="false"/>
    </style:style>
    <style:style style:name="gr238" style:family="graphic" style:parent-style-name="objectwithoutfill">
      <style:graphic-properties draw:marker-end="Arrowheads_20_207" draw:marker-end-width="0.3cm" draw:fill="solid" draw:textarea-vertical-align="middle" loext:decorative="false"/>
    </style:style>
    <style:style style:name="gr239" style:family="graphic" style:parent-style-name="objectwithoutfill">
      <style:graphic-properties draw:marker-end="Arrowheads_20_208" draw:marker-end-width="0.3cm" draw:fill="solid" draw:textarea-vertical-align="middle" loext:decorative="false"/>
    </style:style>
    <style:style style:name="gr240" style:family="graphic" style:parent-style-name="objectwithoutfill">
      <style:graphic-properties draw:marker-end="Arrowheads_20_209" draw:marker-end-width="0.3cm" draw:fill="solid" draw:textarea-vertical-align="middle" loext:decorative="false"/>
    </style:style>
    <style:style style:name="gr241" style:family="graphic" style:parent-style-name="standard" style:list-style-name="L1">
      <style:graphic-properties draw:fill="solid" draw:fill-color="#f45f74" draw:textarea-horizontal-align="justify" draw:textarea-vertical-align="middle" draw:auto-grow-height="false" fo:min-height="1.722cm" fo:min-width="2.399cm" style:writing-mode="lr-tb" loext:decorative="false"/>
      <style:paragraph-properties style:writing-mode="lr-tb"/>
    </style:style>
    <style:style style:name="gr242" style:family="graphic" style:parent-style-name="objectwithoutfill">
      <style:graphic-properties draw:marker-end="Arrowheads_20_210" draw:marker-end-width="0.3cm" draw:fill="solid" draw:textarea-vertical-align="middle" loext:decorative="false"/>
    </style:style>
    <style:style style:name="gr243" style:family="graphic" style:parent-style-name="objectwithoutfill">
      <style:graphic-properties draw:marker-end="Arrowheads_20_211" draw:marker-end-width="0.3cm" draw:fill="solid" draw:textarea-vertical-align="middle" loext:decorative="false"/>
    </style:style>
    <style:style style:name="gr244" style:family="graphic" style:parent-style-name="objectwithoutfill">
      <style:graphic-properties draw:marker-end="Arrowheads_20_212" draw:marker-end-width="0.3cm" draw:fill="solid" draw:textarea-vertical-align="middle" loext:decorative="false"/>
    </style:style>
    <style:style style:name="gr245" style:family="graphic" style:parent-style-name="objectwithoutfill">
      <style:graphic-properties draw:marker-end="Arrowheads_20_213" draw:marker-end-width="0.3cm" draw:fill="solid" draw:textarea-vertical-align="middle" loext:decorative="false"/>
    </style:style>
    <style:style style:name="gr246" style:family="graphic" style:parent-style-name="objectwithoutfill">
      <style:graphic-properties draw:marker-end="Arrowheads_20_214" draw:marker-end-width="0.3cm" draw:fill="solid" draw:textarea-vertical-align="middle" loext:decorative="false"/>
    </style:style>
    <style:style style:name="gr247" style:family="graphic" style:parent-style-name="objectwithoutfill">
      <style:graphic-properties draw:marker-end="Arrowheads_20_220" draw:marker-end-width="0.3cm" draw:fill="solid" draw:textarea-vertical-align="middle" loext:decorative="false"/>
    </style:style>
    <style:style style:name="gr248" style:family="graphic" style:parent-style-name="objectwithoutfill">
      <style:graphic-properties draw:marker-end="Arrowheads_20_221" draw:marker-end-width="0.3cm" draw:fill="solid" draw:textarea-vertical-align="middle" loext:decorative="false"/>
    </style:style>
    <style:style style:name="gr249" style:family="graphic" style:parent-style-name="objectwithoutfill">
      <style:graphic-properties draw:marker-end="Arrowheads_20_222" draw:marker-end-width="0.3cm" draw:fill="solid" draw:textarea-vertical-align="middle" loext:decorative="false"/>
    </style:style>
    <style:style style:name="gr250" style:family="graphic" style:parent-style-name="standard">
      <style:graphic-properties draw:stroke="solid" svg:stroke-color="#b2b2b2" draw:fill="solid" draw:fill-color="#ffffff" draw:textarea-horizontal-align="justify" draw:textarea-vertical-align="middle" draw:auto-grow-height="false" fo:min-height="1.353cm" fo:min-width="2.101cm" style:writing-mode="lr-tb" loext:decorative="false"/>
      <style:paragraph-properties style:writing-mode="lr-tb"/>
    </style:style>
    <style:style style:name="gr251" style:family="graphic" style:parent-style-name="objectwithoutfill">
      <style:graphic-properties draw:stroke="dash" draw:stroke-dash="Long_20_Dash" draw:marker-end="Arrowheads_20_223" draw:marker-end-width="0.3cm" draw:fill="solid" draw:textarea-vertical-align="middle" loext:decorative="false"/>
    </style:style>
    <style:style style:name="gr252" style:family="graphic" style:parent-style-name="standard">
      <style:graphic-properties draw:stroke="solid" svg:stroke-color="#b2b2b2" draw:fill="solid" draw:fill-color="#ffffff" draw:textarea-horizontal-align="justify" draw:textarea-vertical-align="middle" draw:auto-grow-height="false" fo:min-height="1.943cm" fo:min-width="2.938cm" style:writing-mode="lr-tb" loext:decorative="false"/>
      <style:paragraph-properties style:writing-mode="lr-tb"/>
    </style:style>
    <style:style style:name="gr253" style:family="graphic" style:parent-style-name="objectwithoutfill">
      <style:graphic-properties draw:marker-end="Arrowheads_20_224" draw:marker-end-width="0.3cm" draw:fill="solid" draw:textarea-vertical-align="middle" loext:decorative="false"/>
    </style:style>
    <style:style style:name="gr254" style:family="graphic" style:parent-style-name="standard">
      <style:graphic-properties draw:fill="solid" draw:fill-color="#ff8ca1" draw:textarea-vertical-align="middle" loext:decorative="false"/>
      <style:paragraph-properties style:writing-mode="lr-tb"/>
    </style:style>
    <style:style style:name="gr255" style:family="graphic" style:parent-style-name="standard">
      <style:graphic-properties svg:stroke-color="#6390c2" draw:fill="solid" draw:fill-color="#b4d2ea" draw:textarea-vertical-align="middle" loext:decorative="false"/>
      <style:paragraph-properties style:writing-mode="lr-tb"/>
    </style:style>
    <style:style style:name="gr256" style:family="graphic" style:parent-style-name="standard">
      <style:graphic-properties draw:stroke="solid" svg:stroke-color="#b2b2b2" draw:fill="solid" draw:fill-color="#ffffff" draw:textarea-horizontal-align="justify" draw:textarea-vertical-align="middle" draw:auto-grow-height="false" fo:min-height="0.626cm" fo:min-width="1.444cm" style:writing-mode="lr-tb" loext:decorative="false"/>
      <style:paragraph-properties style:writing-mode="lr-tb"/>
    </style:style>
    <style:style style:name="gr257" style:family="graphic" style:parent-style-name="objectwithoutfill">
      <style:graphic-properties draw:marker-end="Arrowheads_20_118" draw:marker-end-width="0.3cm" draw:fill="solid" draw:textarea-vertical-align="middle" loext:decorative="false"/>
    </style:style>
    <style:style style:name="gr258" style:family="graphic" style:parent-style-name="objectwithoutfill">
      <style:graphic-properties draw:marker-end="Arrowheads_20_119" draw:marker-end-width="0.3cm" draw:fill="solid" draw:textarea-vertical-align="middle" loext:decorative="false"/>
    </style:style>
    <style:style style:name="gr259" style:family="graphic" style:parent-style-name="objectwithoutfill">
      <style:graphic-properties draw:marker-end="Arrowheads_20_120" draw:marker-end-width="0.3cm" draw:fill="solid" draw:textarea-vertical-align="middle" loext:decorative="false"/>
    </style:style>
    <style:style style:name="gr260" style:family="graphic" style:parent-style-name="objectwithoutfill">
      <style:graphic-properties draw:marker-end="Arrowheads_20_155" draw:marker-end-width="0.3cm" draw:fill="solid" draw:textarea-vertical-align="middle" loext:decorative="false"/>
    </style:style>
    <style:style style:name="gr261" style:family="graphic" style:parent-style-name="objectwithoutfill">
      <style:graphic-properties draw:marker-end="Arrowheads_20_156" draw:marker-end-width="0.3cm" draw:fill="solid" draw:textarea-vertical-align="middle" loext:decorative="false"/>
    </style:style>
    <style:style style:name="gr262" style:family="graphic" style:parent-style-name="objectwithoutfill">
      <style:graphic-properties draw:marker-end="Arrowheads_20_157" draw:marker-end-width="0.3cm" draw:fill="solid" draw:textarea-vertical-align="middle" loext:decorative="false"/>
    </style:style>
    <style:style style:name="gr263" style:family="graphic" style:parent-style-name="objectwithoutfill">
      <style:graphic-properties draw:marker-end="Arrowheads_20_158" draw:marker-end-width="0.3cm" draw:fill="solid" draw:textarea-vertical-align="middle" loext:decorative="false"/>
    </style:style>
    <style:style style:name="gr264" style:family="graphic" style:parent-style-name="objectwithoutfill">
      <style:graphic-properties draw:marker-end="Arrowheads_20_159" draw:marker-end-width="0.3cm" draw:fill="solid" draw:textarea-vertical-align="middle" loext:decorative="false"/>
    </style:style>
    <style:style style:name="gr265" style:family="graphic" style:parent-style-name="objectwithoutfill">
      <style:graphic-properties draw:marker-end="Arrowheads_20_160" draw:marker-end-width="0.3cm" draw:fill="solid" draw:textarea-vertical-align="middle" loext:decorative="false"/>
    </style:style>
    <style:style style:name="gr266" style:family="graphic" style:parent-style-name="standard">
      <style:graphic-properties draw:stroke="solid" svg:stroke-color="#b2b2b2" draw:fill="solid" draw:fill-color="#ffffff" draw:textarea-horizontal-align="justify" draw:textarea-vertical-align="middle" draw:auto-grow-height="true" fo:min-height="0cm" fo:min-width="0cm" fo:padding-top="0.33cm" fo:wrap-option="wrap" style:writing-mode="lr-tb" loext:decorative="false"/>
      <style:paragraph-properties style:writing-mode="lr-tb"/>
    </style:style>
    <style:style style:name="gr267" style:family="graphic" style:parent-style-name="standard">
      <style:graphic-properties draw:stroke="solid" svg:stroke-color="#b2b2b2" draw:fill="solid" draw:fill-color="#ffffff" draw:textarea-horizontal-align="justify" draw:textarea-vertical-align="middle" draw:auto-grow-height="false" fo:min-height="1.27cm" fo:min-width="2.538cm" style:writing-mode="lr-tb" loext:decorative="false"/>
      <style:paragraph-properties style:writing-mode="lr-tb"/>
    </style:style>
    <style:style style:name="gr268" style:family="graphic" style:parent-style-name="objectwithoutfill">
      <style:graphic-properties draw:marker-end="Arrowheads_20_225" draw:marker-end-width="0.3cm" draw:fill="solid" draw:textarea-vertical-align="middle" loext:decorative="false"/>
    </style:style>
    <style:style style:name="gr269" style:family="graphic" style:parent-style-name="objectwithoutfill">
      <style:graphic-properties draw:marker-end="Arrowheads_20_228" draw:marker-end-width="0.3cm" draw:fill="solid" draw:textarea-vertical-align="middle" loext:decorative="false"/>
    </style:style>
    <style:style style:name="gr270" style:family="graphic" style:parent-style-name="objectwithoutfill">
      <style:graphic-properties draw:marker-end="Arrowheads_20_229" draw:marker-end-width="0.3cm" draw:fill="solid" draw:textarea-vertical-align="middle" loext:decorative="false"/>
    </style:style>
    <style:style style:name="gr271" style:family="graphic" style:parent-style-name="objectwithoutfill">
      <style:graphic-properties draw:marker-end="Arrowheads_20_230" draw:marker-end-width="0.3cm" draw:fill="solid" draw:textarea-vertical-align="middle" loext:decorative="false"/>
    </style:style>
    <style:style style:name="gr272" style:family="graphic" style:parent-style-name="objectwithoutfill">
      <style:graphic-properties draw:marker-end="Arrowheads_20_231" draw:marker-end-width="0.3cm" draw:fill="solid" draw:textarea-vertical-align="middle" loext:decorative="false"/>
    </style:style>
    <style:style style:name="gr273" style:family="graphic" style:parent-style-name="standard">
      <style:graphic-properties draw:stroke="solid" svg:stroke-color="#b2b2b2" draw:fill="solid" draw:fill-color="#ffffff" draw:textarea-horizontal-align="justify" draw:textarea-vertical-align="middle" draw:auto-grow-height="false" fo:min-height="1.509cm" fo:min-width="2.692cm" style:writing-mode="lr-tb" loext:decorative="false"/>
      <style:paragraph-properties style:writing-mode="lr-tb"/>
    </style:style>
    <style:style style:name="gr274" style:family="graphic" style:parent-style-name="objectwithoutfill">
      <style:graphic-properties draw:marker-end="Arrowheads_20_233" draw:marker-end-width="0.3cm" draw:fill="solid" draw:textarea-vertical-align="middle" loext:decorative="false"/>
    </style:style>
    <style:style style:name="gr275" style:family="graphic" style:parent-style-name="standard">
      <style:graphic-properties draw:stroke="solid" svg:stroke-color="#b2b2b2" draw:fill="solid" draw:fill-color="#ffffff" draw:textarea-horizontal-align="justify" draw:textarea-vertical-align="middle" draw:auto-grow-height="false" fo:min-height="0.982cm" fo:min-width="1.97cm" style:writing-mode="lr-tb" loext:decorative="false"/>
      <style:paragraph-properties style:writing-mode="lr-tb"/>
    </style:style>
    <style:style style:name="gr276" style:family="graphic" style:parent-style-name="standard">
      <style:graphic-properties draw:textarea-horizontal-align="center" draw:textarea-vertical-align="middle" loext:decorative="false"/>
      <style:paragraph-properties style:writing-mode="lr-tb"/>
    </style:style>
    <style:style style:name="gr277" style:family="graphic" style:parent-style-name="objectwithoutfill">
      <style:graphic-properties draw:marker-end="Arrowheads_20_234" draw:marker-end-width="0.3cm" draw:fill="solid" draw:textarea-vertical-align="middle" loext:decorative="false"/>
    </style:style>
    <style:style style:name="gr278" style:family="graphic" style:parent-style-name="objectwithoutfill">
      <style:graphic-properties draw:marker-end="Arrowheads_20_235" draw:marker-end-width="0.3cm" draw:fill="solid" draw:textarea-vertical-align="middle" loext:decorative="false"/>
    </style:style>
    <style:style style:name="gr279" style:family="graphic" style:parent-style-name="standard">
      <style:graphic-properties draw:stroke="solid" svg:stroke-color="#b2b2b2" draw:fill="solid" draw:fill-color="#ffffff" draw:textarea-horizontal-align="justify" draw:textarea-vertical-align="middle" draw:auto-grow-height="false" fo:min-height="1.214cm" fo:min-width="3.66cm" style:writing-mode="lr-tb" loext:decorative="false"/>
      <style:paragraph-properties style:writing-mode="lr-tb"/>
    </style:style>
    <style:style style:name="gr280" style:family="graphic" style:parent-style-name="standard">
      <style:graphic-properties svg:stroke-color="#70ae61" draw:fill="solid" draw:fill-color="#accda1" draw:textarea-vertical-align="middle" loext:decorative="false"/>
      <style:paragraph-properties style:writing-mode="lr-tb"/>
    </style:style>
    <style:style style:name="gr281" style:family="graphic" style:parent-style-name="objectwithoutfill">
      <style:graphic-properties draw:marker-end="Arrowheads_20_237" draw:marker-end-width="0.3cm" draw:fill="solid" draw:textarea-vertical-align="middle" loext:decorative="false"/>
    </style:style>
    <style:style style:name="gr282" style:family="graphic" style:parent-style-name="objectwithoutfill">
      <style:graphic-properties draw:marker-end="Arrowheads_20_238" draw:marker-end-width="0.3cm" draw:fill="solid" draw:textarea-vertical-align="middle" loext:decorative="false"/>
    </style:style>
    <style:style style:name="gr283" style:family="graphic" style:parent-style-name="standard">
      <style:graphic-properties draw:stroke="solid" svg:stroke-color="#b2b2b2" draw:fill="solid" draw:fill-color="#ffffff" draw:textarea-horizontal-align="justify" draw:textarea-vertical-align="middle" draw:auto-grow-height="false" fo:min-height="0.87cm" fo:min-width="2.692cm" style:writing-mode="lr-tb" loext:decorative="false"/>
      <style:paragraph-properties style:writing-mode="lr-tb"/>
    </style:style>
    <style:style style:name="gr284" style:family="graphic" style:parent-style-name="objectwithoutfill">
      <style:graphic-properties draw:stroke="dash" draw:stroke-dash="Long_20_Dash" draw:marker-end="Arrowheads_20_243" draw:marker-end-width="0.3cm" draw:fill="solid" draw:textarea-vertical-align="middle" loext:decorative="false"/>
    </style:style>
    <style:style style:name="gr285" style:family="graphic" style:parent-style-name="objectwithoutfill">
      <style:graphic-properties draw:marker-end="Arrowheads_20_245" draw:marker-end-width="0.3cm" draw:fill="solid" draw:textarea-vertical-align="middle" loext:decorative="false"/>
    </style:style>
    <style:style style:name="gr286" style:family="graphic" style:parent-style-name="objectwithoutfill">
      <style:graphic-properties draw:marker-end="Arrowheads_20_246" draw:marker-end-width="0.3cm" draw:fill="solid" draw:textarea-vertical-align="middle" loext:decorative="false"/>
    </style:style>
    <style:style style:name="gr287" style:family="graphic" style:parent-style-name="objectwithoutfill">
      <style:graphic-properties draw:marker-end="Arrowheads_20_11" draw:marker-end-width="0.3cm" draw:fill="solid" draw:textarea-vertical-align="middle" loext:decorative="false"/>
    </style:style>
    <style:style style:name="gr288" style:family="graphic" style:parent-style-name="objectwithoutfill">
      <style:graphic-properties draw:marker-end="Arrowheads_20_12" draw:marker-end-width="0.3cm" draw:fill="solid" draw:textarea-vertical-align="middle" loext:decorative="false"/>
    </style:style>
    <style:style style:name="gr289" style:family="graphic" style:parent-style-name="objectwithoutfill">
      <style:graphic-properties draw:marker-end="Arrowheads_20_13" draw:marker-end-width="0.3cm" draw:fill="solid" draw:textarea-vertical-align="middle" loext:decorative="false"/>
    </style:style>
    <style:style style:name="gr290" style:family="graphic" style:parent-style-name="objectwithoutfill">
      <style:graphic-properties draw:marker-end="Arrowheads_20_14" draw:marker-end-width="0.3cm" draw:fill="solid" draw:textarea-vertical-align="middle" loext:decorative="false"/>
    </style:style>
    <style:style style:name="gr291" style:family="graphic" style:parent-style-name="objectwithoutfill">
      <style:graphic-properties draw:marker-end="Arrowheads_20_15" draw:marker-end-width="0.3cm" draw:fill="solid" draw:textarea-vertical-align="middle" loext:decorative="false"/>
    </style:style>
    <style:style style:name="gr292" style:family="graphic" style:parent-style-name="standard">
      <style:graphic-properties draw:fill="solid" draw:fill-color="#ffb255" draw:textarea-vertical-align="middle" loext:decorative="false"/>
      <style:paragraph-properties style:writing-mode="lr-tb"/>
    </style:style>
    <style:style style:name="gr293" style:family="graphic" style:parent-style-name="objectwithoutfill">
      <style:graphic-properties draw:marker-end="Arrow" draw:marker-end-width="0.3cm" draw:fill="solid" draw:textarea-vertical-align="middle" loext:decorative="false"/>
    </style:style>
    <style:style style:name="gr294" style:family="graphic" style:parent-style-name="objectwithoutfill">
      <style:graphic-properties draw:marker-end="Arrowheads_20_61" draw:marker-end-width="0.3cm" draw:fill="solid" draw:textarea-vertical-align="middle" loext:decorative="false"/>
    </style:style>
    <style:style style:name="gr295" style:family="graphic" style:parent-style-name="objectwithoutfill">
      <style:graphic-properties draw:marker-end="Arrowheads_20_62" draw:marker-end-width="0.3cm" draw:fill="solid" draw:textarea-vertical-align="middle" loext:decorative="false"/>
    </style:style>
    <style:style style:name="gr296" style:family="graphic" style:parent-style-name="objectwithoutfill">
      <style:graphic-properties draw:marker-end="Arrowheads_20_67" draw:marker-end-width="0.3cm" draw:fill="solid" draw:textarea-vertical-align="middle" loext:decorative="false"/>
    </style:style>
    <style:style style:name="gr297" style:family="graphic" style:parent-style-name="objectwithoutfill">
      <style:graphic-properties draw:marker-end="Arrowheads_20_68" draw:marker-end-width="0.3cm" draw:fill="solid" draw:textarea-vertical-align="middle" loext:decorative="false"/>
    </style:style>
    <style:style style:name="gr298" style:family="graphic" style:parent-style-name="objectwithoutfill">
      <style:graphic-properties draw:marker-end="Arrowheads_20_69" draw:marker-end-width="0.3cm" draw:fill="solid" draw:textarea-vertical-align="middle" loext:decorative="false"/>
    </style:style>
    <style:style style:name="gr299" style:family="graphic" style:parent-style-name="objectwithoutfill">
      <style:graphic-properties draw:marker-end="Arrowheads_20_70" draw:marker-end-width="0.3cm" draw:fill="solid" draw:textarea-vertical-align="middle" loext:decorative="false"/>
    </style:style>
    <style:style style:name="gr300" style:family="graphic" style:parent-style-name="objectwithoutfill">
      <style:graphic-properties draw:marker-end="Arrowheads_20_71" draw:marker-end-width="0.3cm" draw:fill="solid" draw:textarea-vertical-align="middle" loext:decorative="false"/>
    </style:style>
    <style:style style:name="gr301" style:family="graphic" style:parent-style-name="objectwithoutfill">
      <style:graphic-properties draw:marker-end="Arrowheads_20_100" draw:marker-end-width="0.3cm" draw:fill="solid" draw:textarea-vertical-align="middle" loext:decorative="false"/>
    </style:style>
    <style:style style:name="gr302" style:family="graphic" style:parent-style-name="objectwithoutfill">
      <style:graphic-properties draw:marker-end="Arrowheads_20_101" draw:marker-end-width="0.3cm" draw:fill="solid" draw:textarea-vertical-align="middle" loext:decorative="false"/>
    </style:style>
    <style:style style:name="gr303" style:family="graphic" style:parent-style-name="objectwithoutfill">
      <style:graphic-properties draw:marker-end="Arrowheads_20_215" draw:marker-end-width="0.3cm" draw:fill="solid" draw:textarea-vertical-align="middle" loext:decorative="false"/>
    </style:style>
    <style:style style:name="gr304" style:family="graphic" style:parent-style-name="standard">
      <style:graphic-properties svg:stroke-color="#6390c2" draw:fill="solid" draw:fill-color="#b4d2ea" draw:textarea-horizontal-align="justify" draw:textarea-vertical-align="middle" loext:decorative="false"/>
      <style:paragraph-properties style:writing-mode="lr-tb"/>
    </style:style>
    <style:style style:name="gr305" style:family="graphic" style:parent-style-name="objectwithoutfill">
      <style:graphic-properties draw:marker-end="Arrowheads_20_216" draw:marker-end-width="0.3cm" draw:fill="solid" draw:textarea-vertical-align="middle" loext:decorative="false"/>
    </style:style>
    <style:style style:name="gr306" style:family="graphic" style:parent-style-name="objectwithoutfill">
      <style:graphic-properties draw:marker-end="Arrowheads_20_217" draw:marker-end-width="0.3cm" draw:fill="solid" draw:textarea-vertical-align="middle" loext:decorative="false"/>
    </style:style>
    <style:style style:name="gr307" style:family="graphic" style:parent-style-name="objectwithoutfill">
      <style:graphic-properties draw:marker-end="Arrowheads_20_218" draw:marker-end-width="0.3cm" draw:fill="solid" draw:textarea-vertical-align="middle" loext:decorative="false"/>
    </style:style>
    <style:style style:name="gr308" style:family="graphic" style:parent-style-name="objectwithoutfill">
      <style:graphic-properties draw:marker-end="Arrowheads_20_219" draw:marker-end-width="0.3cm" draw:fill="solid" draw:textarea-vertical-align="middle" loext:decorative="false"/>
    </style:style>
    <style:style style:name="gr309" style:family="graphic" style:parent-style-name="objectwithoutfill">
      <style:graphic-properties draw:marker-end="Arrowheads_20_239" draw:marker-end-width="0.3cm" draw:fill="solid" draw:fill-color="#8fd7d7" draw:textarea-vertical-align="middle" loext:decorative="false"/>
    </style:style>
    <style:style style:name="gr310" style:family="graphic" style:parent-style-name="objectwithoutfill">
      <style:graphic-properties draw:marker-end="Arrowheads_20_240" draw:marker-end-width="0.3cm" draw:fill="solid" draw:fill-color="#8fd7d7" draw:textarea-vertical-align="middle" loext:decorative="false"/>
    </style:style>
    <style:style style:name="gr311" style:family="graphic" style:parent-style-name="objectwithoutfill">
      <style:graphic-properties draw:marker-end="Arrowheads_20_241" draw:marker-end-width="0.3cm" draw:fill="solid" draw:fill-color="#8fd7d7" draw:textarea-vertical-align="middle" loext:decorative="false"/>
    </style:style>
    <style:style style:name="gr312" style:family="graphic" style:parent-style-name="objectwithoutfill">
      <style:graphic-properties draw:marker-end="Arrowheads_20_242" draw:marker-end-width="0.3cm" draw:fill="solid" draw:fill-color="#8fd7d7" draw:textarea-vertical-align="middle" loext:decorative="false"/>
    </style:style>
    <style:style style:name="gr313" style:family="graphic" style:parent-style-name="objectwithoutfill">
      <style:graphic-properties draw:marker-end="Arrowheads_20_247" draw:marker-end-width="0.3cm" draw:fill="solid" draw:textarea-vertical-align="middle" loext:decorative="false"/>
    </style:style>
    <style:style style:name="gr314" style:family="graphic" style:parent-style-name="objectwithoutfill">
      <style:graphic-properties draw:marker-end="Arrowheads_20_248" draw:marker-end-width="0.3cm" draw:fill="solid" draw:textarea-vertical-align="middle" loext:decorative="false"/>
    </style:style>
    <style:style style:name="gr315" style:family="graphic" style:parent-style-name="objectwithoutfill">
      <style:graphic-properties draw:marker-end="Arrowheads_20_249" draw:marker-end-width="0.3cm" draw:fill="solid" draw:textarea-vertical-align="middle" loext:decorative="false"/>
    </style:style>
    <style:style style:name="gr316" style:family="graphic" style:parent-style-name="objectwithoutfill">
      <style:graphic-properties draw:marker-end="Arrowheads_20_251" draw:marker-end-width="0.3cm" draw:fill="solid" draw:textarea-vertical-align="middle" loext:decorative="false"/>
    </style:style>
    <style:style style:name="gr317" style:family="graphic" style:parent-style-name="standard">
      <style:graphic-properties draw:stroke="solid" svg:stroke-color="#b2b2b2" draw:fill="solid" draw:fill-color="#ffffff" draw:textarea-horizontal-align="justify" draw:textarea-vertical-align="middle" draw:auto-grow-height="false" fo:min-height="1.214cm" fo:min-width="2.472cm" style:writing-mode="lr-tb" loext:decorative="false"/>
      <style:paragraph-properties style:writing-mode="lr-tb"/>
    </style:style>
    <style:style style:name="gr318" style:family="graphic" style:parent-style-name="objectwithoutfill">
      <style:graphic-properties draw:marker-end="Arrowheads_20_253" draw:marker-end-width="0.3cm" draw:fill="solid" draw:textarea-vertical-align="middle" loext:decorative="false"/>
    </style:style>
    <style:style style:name="gr319" style:family="graphic" style:parent-style-name="objectwithoutfill">
      <style:graphic-properties draw:marker-end="Arrowheads_20_254" draw:marker-end-width="0.3cm" draw:fill="solid" draw:textarea-vertical-align="middle" loext:decorative="false"/>
    </style:style>
    <style:style style:name="gr320" style:family="graphic" style:parent-style-name="objectwithoutfill">
      <style:graphic-properties draw:marker-end="Arrowheads_20_255" draw:marker-end-width="0.3cm" draw:fill="solid" draw:textarea-vertical-align="middle" loext:decorative="false"/>
    </style:style>
    <style:style style:name="gr321" style:family="graphic" style:parent-style-name="objectwithoutfill">
      <style:graphic-properties draw:marker-end="Arrowheads_20_256" draw:marker-end-width="0.3cm" draw:fill="solid" draw:textarea-vertical-align="middle" loext:decorative="false"/>
    </style:style>
    <style:style style:name="gr322" style:family="graphic" style:parent-style-name="objectwithoutfill">
      <style:graphic-properties draw:marker-end="Arrowheads_20_257" draw:marker-end-width="0.3cm" draw:fill="solid" draw:textarea-vertical-align="middle" loext:decorative="false"/>
    </style:style>
    <style:style style:name="gr323" style:family="graphic" style:parent-style-name="objectwithoutfill">
      <style:graphic-properties draw:marker-end="Arrowheads_20_258" draw:marker-end-width="0.3cm" draw:fill="solid" draw:textarea-vertical-align="middle" loext:decorative="false"/>
    </style:style>
    <style:style style:name="gr324" style:family="graphic" style:parent-style-name="objectwithoutfill">
      <style:graphic-properties draw:marker-end="Arrowheads_20_259" draw:marker-end-width="0.3cm" draw:fill="solid" draw:textarea-vertical-align="middle" loext:decorative="false"/>
    </style:style>
    <style:style style:name="gr325" style:family="graphic" style:parent-style-name="objectwithoutfill">
      <style:graphic-properties draw:marker-end="Arrowheads_20_260" draw:marker-end-width="0.3cm" draw:fill="solid" draw:textarea-vertical-align="middle" loext:decorative="false"/>
    </style:style>
    <style:style style:name="gr326" style:family="graphic" style:parent-style-name="objectwithoutfill">
      <style:graphic-properties draw:marker-end="Arrowheads_20_261" draw:marker-end-width="0.3cm" draw:fill="solid" draw:textarea-vertical-align="middle" loext:decorative="false"/>
    </style:style>
    <style:style style:name="gr327" style:family="graphic" style:parent-style-name="objectwithoutfill">
      <style:graphic-properties draw:marker-end="Arrowheads_20_262" draw:marker-end-width="0.3cm" draw:fill="solid" draw:textarea-vertical-align="middle" loext:decorative="false"/>
    </style:style>
    <style:style style:name="gr3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29" style:family="graphic" style:parent-style-name="objectwithoutfill">
      <style:graphic-properties svg:stroke-width="0.025cm" svg:stroke-color="#000000" draw:marker-start-width="0.266cm" draw:marker-end="Arrow" draw:marker-end-width="0.367cm" draw:fill="none" draw:textarea-vertical-align="middle" fo:padding-top="0.137cm" fo:padding-bottom="0.137cm" fo:padding-left="0.262cm" fo:padding-right="0.262cm" loext:decorative="false"/>
    </style:style>
    <style:style style:name="gr330" style:family="graphic" style:parent-style-name="standard" style:list-style-name="L1">
      <style:graphic-properties svg:stroke-color="#00a933" draw:fill="solid" draw:fill-color="#dde8cb" draw:textarea-horizontal-align="justify" draw:textarea-vertical-align="middle" draw:auto-grow-height="false" fo:min-height="7.72cm" fo:min-width="2.633cm" style:writing-mode="lr-tb" loext:decorative="false"/>
      <style:paragraph-properties style:writing-mode="lr-tb"/>
    </style:style>
    <style:style style:name="gr331" style:family="graphic" style:parent-style-name="standard">
      <style:graphic-properties draw:stroke="none" svg:stroke-color="#000000" draw:fill="none" draw:fill-color="#ffffff" draw:textarea-horizontal-align="left" draw:auto-grow-height="true" draw:auto-grow-width="true" fo:min-height="2.889cm" fo:min-width="4.219cm" loext:decorative="false"/>
      <style:paragraph-properties style:writing-mode="lr-tb"/>
    </style:style>
    <style:style style:name="gr332" style:family="graphic" style:parent-style-name="standard">
      <style:graphic-properties draw:fill="solid" draw:fill-color="#00aaad" draw:textarea-horizontal-align="justify" draw:textarea-vertical-align="middle" draw:auto-grow-height="false" fo:min-height="0.04cm" fo:min-width="0cm" loext:decorative="false"/>
    </style:style>
    <style:style style:name="gr333" style:family="graphic" style:parent-style-name="standard">
      <style:graphic-properties draw:fill="solid" draw:fill-color="#00aaad" draw:textarea-horizontal-align="justify" draw:textarea-vertical-align="middle" draw:auto-grow-height="false" fo:min-height="0.041cm" fo:min-width="0cm" loext:decorative="false"/>
    </style:style>
    <style:style style:name="gr334" style:family="graphic" style:parent-style-name="standard">
      <style:graphic-properties svg:stroke-color="#00a933" draw:fill="solid" draw:fill-color="#dde8cb" draw:textarea-horizontal-align="justify" draw:textarea-vertical-align="middle" draw:auto-grow-height="false" fo:min-height="8.834cm" fo:min-width="2.636cm" loext:decorative="false"/>
    </style:style>
    <style:style style:name="gr335" style:family="graphic" style:parent-style-name="standard">
      <style:graphic-properties draw:stroke="none" draw:fill="none" fo:min-height="1.447cm" loext:decorative="false"/>
      <style:paragraph-properties style:writing-mode="lr-tb"/>
    </style:style>
    <style:style style:name="gr336" style:family="graphic" style:parent-style-name="standard">
      <style:graphic-properties draw:stroke="none" draw:fill="none" fo:min-height="1.446cm" loext:decorative="false"/>
      <style:paragraph-properties style:writing-mode="lr-tb"/>
    </style:style>
    <style:style style:name="gr337" style:family="graphic" style:parent-style-name="standard">
      <style:graphic-properties svg:stroke-color="#00a933" draw:fill="solid" draw:fill-color="#dde8cb" draw:textarea-horizontal-align="justify" draw:textarea-vertical-align="middle" draw:auto-grow-height="false" fo:min-height="8.834cm" fo:min-width="6.082cm" loext:decorative="false"/>
    </style:style>
    <style:style style:name="gr338" style:family="graphic" style:parent-style-name="standard">
      <style:graphic-properties svg:stroke-color="#00a933" draw:fill="solid" draw:fill-color="#b3cac7" draw:textarea-horizontal-align="justify" draw:textarea-vertical-align="middle" draw:auto-grow-height="false" fo:min-height="3.656cm" fo:min-width="4.388cm" loext:decorative="false"/>
    </style:style>
    <style:style style:name="gr339" style:family="graphic" style:parent-style-name="standard">
      <style:graphic-properties svg:stroke-color="#00a933" draw:fill="solid" draw:fill-color="#b3cac7" draw:textarea-horizontal-align="justify" draw:textarea-vertical-align="middle" draw:auto-grow-height="false" fo:min-height="3.607cm" fo:min-width="4.418cm" loext:decorative="false"/>
    </style:style>
    <style:style style:name="gr340" style:family="graphic" style:parent-style-name="objectwithoutfill">
      <style:graphic-properties draw:marker-end="Arrow" draw:marker-end-width="0.3cm" draw:fill="none" draw:textarea-vertical-align="middle" loext:decorative="false"/>
    </style:style>
    <style:style style:name="gr341" style:family="graphic" style:parent-style-name="standard">
      <style:graphic-properties draw:stroke="none" draw:fill="none" fo:min-height="2.167cm" loext:decorative="false"/>
      <style:paragraph-properties style:writing-mode="lr-tb"/>
    </style:style>
    <style:style style:name="gr342" style:family="graphic" style:parent-style-name="standard">
      <style:graphic-properties svg:stroke-width="0.1cm" draw:marker-start-width="0.35cm" draw:marker-end-width="0.35cm" draw:fill="none" draw:textarea-vertical-align="middle" draw:auto-grow-height="false" fo:min-height="7.799cm" fo:min-width="0cm" fo:padding-top="0.175cm" fo:padding-bottom="0.175cm" fo:padding-left="0.3cm" fo:padding-right="0.3cm" loext:decorative="false"/>
    </style:style>
    <style:style style:name="gr343" style:family="graphic" style:parent-style-name="objectwithoutfill">
      <style:graphic-properties svg:stroke-width="0.025cm" svg:stroke-color="#000000" draw:marker-start-width="0.266cm" draw:marker-end="Arrow" draw:marker-end-width="0.217cm" draw:fill="none" draw:textarea-vertical-align="middle" fo:padding-top="0.137cm" fo:padding-bottom="0.137cm" fo:padding-left="0.262cm" fo:padding-right="0.262cm" loext:decorative="false"/>
    </style:style>
    <style:style style:name="gr344" style:family="graphic" style:parent-style-name="standard">
      <style:graphic-properties draw:stroke="dash" draw:stroke-dash="Long_20_Dash" svg:stroke-width="0.051cm" draw:marker-start-width="0.279cm" draw:marker-end-width="0.279cm" fo:padding-top="0.15cm" fo:padding-bottom="0.15cm" fo:padding-left="0.275cm" fo:padding-right="0.275cm" loext:decorative="false"/>
    </style:style>
    <style:style style:name="gr345" style:family="graphic" style:parent-style-name="standard">
      <style:graphic-properties draw:stroke="none" draw:fill="none" fo:min-height="1.343cm" loext:decorative="false"/>
      <style:paragraph-properties style:writing-mode="lr-tb"/>
    </style:style>
    <style:style style:name="gr346" style:family="graphic" style:parent-style-name="standard">
      <style:graphic-properties draw:stroke="none" draw:fill="none" fo:min-height="1.918cm" loext:decorative="false"/>
      <style:paragraph-properties style:writing-mode="lr-tb"/>
    </style:style>
    <style:style style:name="gr347"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2.302cm" fo:min-width="2.424cm" fo:padding-top="0.151cm" fo:padding-bottom="0.151cm" fo:padding-left="0.276cm" fo:padding-right="0.276cm" fo:wrap-option="no-wrap" loext:decorative="false"/>
    </style:style>
    <style:style style:name="gr348" style:family="graphic" style:parent-style-name="standard">
      <style:graphic-properties draw:stroke="none" svg:stroke-color="#3465a4" draw:fill="solid" draw:fill-color="#00a65d" draw:textarea-horizontal-align="justify" draw:textarea-vertical-align="middle" draw:auto-grow-height="false" fo:min-height="0cm" fo:min-width="0cm" loext:decorative="false"/>
    </style:style>
    <style:style style:name="gr349" style:family="graphic" style:parent-style-name="standard">
      <style:graphic-properties draw:stroke="none" svg:stroke-color="#3465a4" draw:fill="solid" draw:fill-color="#0066b3" draw:textarea-horizontal-align="justify" draw:textarea-vertical-align="middle" draw:auto-grow-height="false" fo:min-height="0cm" fo:min-width="0cm" loext:decorative="false"/>
    </style:style>
    <style:style style:name="gr350"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3.718cm" fo:min-width="3.833cm" fo:padding-top="0.15cm" fo:padding-bottom="0.15cm" fo:padding-left="0.275cm" fo:padding-right="0.275cm" loext:decorative="false"/>
    </style:style>
    <style:style style:name="gr351"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6.461cm" fo:min-width="6.604cm" fo:padding-top="0.15cm" fo:padding-bottom="0.15cm" fo:padding-left="0.275cm" fo:padding-right="0.275cm" loext:decorative="false"/>
    </style:style>
    <style:style style:name="gr352"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072cm" fo:padding-top="0.137cm" fo:padding-bottom="0.137cm" fo:padding-left="0.262cm" fo:padding-right="0.262cm" loext:decorative="false"/>
    </style:style>
    <style:style style:name="gr353"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cm" fo:padding-top="0.137cm" fo:padding-bottom="0.137cm" fo:padding-left="0.262cm" fo:padding-right="0.262cm" loext:decorative="false"/>
    </style:style>
    <style:style style:name="gr354" style:family="graphic" style:parent-style-name="standard">
      <style:graphic-properties svg:stroke-width="0.025cm" svg:stroke-color="#2b511a" draw:marker-start-width="0.266cm" draw:marker-end-width="0.266cm" draw:fill="solid" draw:fill-color="#28a127" draw:textarea-horizontal-align="justify" draw:textarea-vertical-align="middle" draw:auto-grow-height="false" fo:min-height="0cm" fo:min-width="0.072cm" fo:padding-top="0.137cm" fo:padding-bottom="0.137cm" fo:padding-left="0.262cm" fo:padding-right="0.262cm" loext:decorative="false"/>
    </style:style>
    <style:style style:name="gr355" style:family="graphic" style:parent-style-name="standard">
      <style:graphic-properties svg:stroke-width="0.025cm" svg:stroke-color="#395511" draw:marker-start-width="0.266cm" draw:marker-end-width="0.266cm" draw:fill="solid" draw:fill-color="#28a127" draw:textarea-horizontal-align="justify" draw:textarea-vertical-align="middle" draw:auto-grow-height="false" fo:min-height="0cm" fo:min-width="0cm" fo:padding-top="0.137cm" fo:padding-bottom="0.137cm" fo:padding-left="0.262cm" fo:padding-right="0.262cm" loext:decorative="false"/>
    </style:style>
    <style:style style:name="gr356" style:family="graphic" style:parent-style-name="standard">
      <style:graphic-properties svg:stroke-width="0.025cm" draw:marker-start-width="0.266cm" draw:marker-end-width="0.266cm" draw:fill="solid" draw:fill-color="#bcaed5" draw:opacity="50%" draw:textarea-horizontal-align="justify" draw:textarea-vertical-align="middle" draw:auto-grow-height="false" fo:min-height="4.591cm" fo:min-width="7.857cm" fo:padding-top="0.137cm" fo:padding-bottom="0.137cm" fo:padding-left="0.262cm" fo:padding-right="0.262cm" draw:shadow-opacity="50%" loext:decorative="false"/>
    </style:style>
    <style:style style:name="gr357" style:family="graphic" style:parent-style-name="standard">
      <style:graphic-properties svg:stroke-width="0.025cm" draw:marker-start-width="0.266cm" draw:marker-end-width="0.266cm" draw:fill="solid" draw:fill-color="#bce4e5" draw:opacity="50%" draw:textarea-horizontal-align="justify" draw:textarea-vertical-align="middle" draw:auto-grow-height="false" fo:min-height="4.424cm" fo:min-width="7.831cm" fo:padding-top="0.137cm" fo:padding-bottom="0.137cm" fo:padding-left="0.262cm" fo:padding-right="0.262cm" draw:shadow-opacity="50%" loext:decorative="false"/>
    </style:style>
    <style:style style:name="gr358"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6cm" fo:min-width="0.195cm" fo:padding-top="0.137cm" fo:padding-bottom="0.137cm" fo:padding-left="0.262cm" fo:padding-right="0.262cm" loext:decorative="false"/>
    </style:style>
    <style:style style:name="gr359"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5cm" fo:padding-top="0.137cm" fo:padding-bottom="0.137cm" fo:padding-left="0.262cm" fo:padding-right="0.262cm" loext:decorative="false"/>
    </style:style>
    <style:style style:name="gr360" style:family="graphic" style:parent-style-name="objectwithoutfill">
      <style:graphic-properties svg:stroke-width="0.025cm" svg:stroke-color="#000000" draw:marker-start-width="0.266cm" draw:marker-end="Arrow" draw:marker-end-width="0.266cm" draw:fill="none" draw:textarea-vertical-align="middle" fo:padding-top="0.137cm" fo:padding-bottom="0.137cm" fo:padding-left="0.262cm" fo:padding-right="0.262cm" loext:decorative="false"/>
    </style:style>
    <style:style style:name="gr361"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6cm" fo:padding-top="0.137cm" fo:padding-bottom="0.137cm" fo:padding-left="0.262cm" fo:padding-right="0.262cm" loext:decorative="false"/>
    </style:style>
    <style:style style:name="gr362"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7cm" fo:min-width="0.196cm" fo:padding-top="0.137cm" fo:padding-bottom="0.137cm" fo:padding-left="0.262cm" fo:padding-right="0.262cm" loext:decorative="false"/>
    </style:style>
    <style:style style:name="gr363" style:family="graphic" style:parent-style-name="standard">
      <style:graphic-properties draw:stroke="none" svg:stroke-width="0.044cm" draw:stroke-linejoin="miter" draw:fill="solid" draw:fill-color="#000000" loext:decorative="false"/>
    </style:style>
    <style:style style:name="gr364"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6cm" fo:padding-top="0.137cm" fo:padding-bottom="0.137cm" fo:padding-left="0.262cm" fo:padding-right="0.262cm" loext:decorative="false"/>
    </style:style>
    <style:style style:name="gr365"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5cm" fo:padding-top="0.137cm" fo:padding-bottom="0.137cm" fo:padding-left="0.262cm" fo:padding-right="0.262cm" loext:decorative="false"/>
    </style:style>
    <style:style style:name="gr366" style:family="graphic" style:parent-style-name="objectwithoutfill">
      <style:graphic-properties svg:stroke-width="0.025cm" svg:stroke-color="#000000" draw:marker-start-width="0.266cm" draw:marker-end="Arrow" draw:marker-end-width="0.316cm" draw:fill="none" draw:textarea-vertical-align="middle" fo:padding-top="0.137cm" fo:padding-bottom="0.137cm" fo:padding-left="0.262cm" fo:padding-right="0.262cm" loext:decorative="false"/>
    </style:style>
    <style:style style:name="gr367" style:family="graphic" style:parent-style-name="standard">
      <style:graphic-properties draw:stroke="none" svg:stroke-color="#000000" draw:fill="none" draw:fill-color="#ffffff" draw:textarea-horizontal-align="left" draw:auto-grow-height="true" draw:auto-grow-width="true" fo:min-height="0.846cm" fo:min-width="2.43cm" loext:decorative="false"/>
      <style:paragraph-properties style:writing-mode="lr-tb"/>
    </style:style>
    <style:style style:name="gr368"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354cm" fo:min-width="3.626cm" fo:padding-top="0.151cm" fo:padding-bottom="0.151cm" fo:padding-left="0.276cm" fo:padding-right="0.276cm" fo:wrap-option="no-wrap" loext:decorative="false"/>
    </style:style>
    <style:style style:name="gr369"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341cm" fo:min-width="5.603cm" fo:padding-top="0.15cm" fo:padding-bottom="0.15cm" fo:padding-left="0.275cm" fo:padding-right="0.275cm" loext:decorative="false"/>
    </style:style>
    <style:style style:name="gr370"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9.192cm" fo:min-width="9.493cm" fo:padding-top="0.15cm" fo:padding-bottom="0.15cm" fo:padding-left="0.275cm" fo:padding-right="0.275cm" loext:decorative="false"/>
    </style:style>
    <style:style style:name="gr371"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296cm" fo:min-width="3.563cm" fo:padding-top="0.151cm" fo:padding-bottom="0.151cm" fo:padding-left="0.276cm" fo:padding-right="0.276cm" fo:wrap-option="no-wrap" loext:decorative="false"/>
    </style:style>
    <style:style style:name="gr372"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385cm" fo:padding-top="0.15cm" fo:padding-bottom="0.15cm" fo:padding-left="0.275cm" fo:padding-right="0.275cm" loext:decorative="false"/>
    </style:style>
    <style:style style:name="gr373"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132cm" fo:min-width="5.377cm" fo:padding-top="0.15cm" fo:padding-bottom="0.15cm" fo:padding-left="0.275cm" fo:padding-right="0.275cm" loext:decorative="false"/>
    </style:style>
    <style:style style:name="gr374"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8.841cm" fo:min-width="9.12cm" fo:padding-top="0.15cm" fo:padding-bottom="0.15cm" fo:padding-left="0.275cm" fo:padding-right="0.275cm" loext:decorative="false"/>
    </style:style>
    <style:style style:name="gr375"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452cm" fo:padding-top="0.15cm" fo:padding-bottom="0.15cm" fo:padding-left="0.275cm" fo:padding-right="0.275cm" loext:decorative="false"/>
    </style:style>
    <style:style style:name="gr376" style:family="graphic" style:parent-style-name="standard">
      <style:graphic-properties draw:fill="solid" draw:fill-color="#e8995a" draw:textarea-vertical-align="middle" loext:decorative="false"/>
    </style:style>
    <style:style style:name="gr377" style:family="graphic" style:parent-style-name="standard">
      <style:graphic-properties draw:fill="solid" draw:fill-color="#c7bcda" draw:textarea-vertical-align="middle" loext:decorative="false"/>
      <style:paragraph-properties style:writing-mode="lr-tb"/>
    </style:style>
    <style:style style:name="gr378" style:family="graphic" style:parent-style-name="standard">
      <style:graphic-properties draw:fill="solid" draw:fill-color="#f9dc8c" draw:textarea-vertical-align="middle" loext:decorative="false"/>
      <style:paragraph-properties style:writing-mode="lr-tb"/>
    </style:style>
    <style:style style:name="gr379" style:family="graphic" style:parent-style-name="objectwithoutfill">
      <style:graphic-properties draw:marker-end="Arrowheads_20_167" draw:marker-end-width="0.3cm" draw:fill="solid" draw:textarea-vertical-align="middle" loext:decorative="false"/>
    </style:style>
    <style:style style:name="gr380" style:family="graphic" style:parent-style-name="objectwithoutfill">
      <style:graphic-properties draw:marker-end="Arrowheads_20_168" draw:marker-end-width="0.3cm" draw:fill="solid" draw:textarea-vertical-align="middle" loext:decorative="false"/>
    </style:style>
    <style:style style:name="gr381" style:family="graphic" style:parent-style-name="objectwithoutfill">
      <style:graphic-properties draw:marker-end="Arrowheads_20_264" draw:marker-end-width="0.3cm" draw:fill="solid" draw:textarea-vertical-align="middle" loext:decorative="false"/>
    </style:style>
    <style:style style:name="gr382" style:family="graphic" style:parent-style-name="objectwithoutfill">
      <style:graphic-properties draw:marker-end="Arrowheads_20_265" draw:marker-end-width="0.3cm" draw:fill="solid" draw:textarea-vertical-align="middle" loext:decorative="false"/>
    </style:style>
    <style:style style:name="gr383" style:family="graphic" style:parent-style-name="objectwithoutfill">
      <style:graphic-properties draw:marker-end="Arrowheads_20_266" draw:marker-end-width="0.3cm" draw:fill="solid" draw:textarea-vertical-align="middle" loext:decorative="false"/>
    </style:style>
    <style:style style:name="gr384" style:family="graphic" style:parent-style-name="standard">
      <style:graphic-properties draw:stroke="solid" svg:stroke-color="#b2b2b2" draw:fill="solid" draw:fill-color="#ffffff" draw:textarea-horizontal-align="justify" draw:textarea-vertical-align="middle" draw:auto-grow-height="false" fo:min-height="1.28cm" fo:min-width="3.396cm" style:writing-mode="lr-tb" loext:decorative="false"/>
      <style:paragraph-properties style:writing-mode="lr-tb"/>
    </style:style>
    <style:style style:name="gr385" style:family="graphic" style:parent-style-name="objectwithoutfill">
      <style:graphic-properties draw:marker-end="Arrowheads_20_268" draw:marker-end-width="0.3cm" draw:fill="solid" draw:textarea-vertical-align="middle" loext:decorative="false"/>
    </style:style>
    <style:style style:name="gr386" style:family="graphic" style:parent-style-name="objectwithoutfill">
      <style:graphic-properties draw:marker-end="Arrowheads_20_269" draw:marker-end-width="0.3cm" draw:fill="solid" draw:textarea-vertical-align="middle" loext:decorative="false"/>
    </style:style>
    <style:style style:name="gr387" style:family="graphic" style:parent-style-name="standard">
      <style:graphic-properties draw:stroke="none" svg:stroke-color="#000000" draw:fill="none" draw:fill-color="#ffffff" draw:textarea-horizontal-align="left" draw:auto-grow-height="true" draw:auto-grow-width="true" fo:min-height="1.423cm" fo:min-width="0.121cm" loext:decorative="false"/>
      <style:paragraph-properties style:writing-mode="lr-tb"/>
    </style:style>
    <style:style style:name="gr388" style:family="graphic" style:parent-style-name="standard">
      <style:graphic-properties draw:fill="solid" draw:fill-color="#d86a50" draw:textarea-vertical-align="middle" loext:decorative="false"/>
      <style:paragraph-properties style:writing-mode="lr-tb"/>
    </style:style>
    <style:style style:name="gr389"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390" style:family="graphic" style:parent-style-name="standard">
      <style:graphic-properties draw:fill="solid" draw:fill-color="#b4d2ea" draw:textarea-vertical-align="middle" loext:decorative="false"/>
    </style:style>
    <style:style style:name="gr391" style:family="graphic" style:parent-style-name="standard">
      <style:graphic-properties draw:fill="solid" draw:fill-color="#f6f5f8" draw:textarea-vertical-align="middle" loext:decorative="false"/>
      <style:paragraph-properties style:writing-mode="lr-tb"/>
    </style:style>
    <style:style style:name="gr392" style:family="graphic" style:parent-style-name="standard" style:list-style-name="L1">
      <style:graphic-properties draw:fill="solid" draw:fill-color="#f6f5f8" draw:textarea-vertical-align="middle" loext:decorative="false"/>
      <style:paragraph-properties style:writing-mode="lr-tb"/>
    </style:style>
    <style:style style:name="gr393" style:family="graphic" style:parent-style-name="standard" style:list-style-name="L1">
      <style:graphic-properties draw:fill="solid" draw:fill-color="#f6f5f8" draw:textarea-vertical-align="middle" loext:decorative="false"/>
      <style:paragraph-properties style:writing-mode="lr-tb"/>
    </style:style>
    <style:style style:name="gr394" style:family="graphic" style:parent-style-name="objectwithoutfill">
      <style:graphic-properties draw:marker-end="Arrowheads_20_279" draw:marker-end-width="0.3cm" draw:fill="solid" draw:textarea-vertical-align="middle" loext:decorative="false"/>
    </style:style>
    <style:style style:name="gr395" style:family="graphic" style:parent-style-name="objectwithoutfill">
      <style:graphic-properties draw:marker-end="Arrowheads_20_280" draw:marker-end-width="0.3cm" draw:fill="solid" draw:textarea-vertical-align="middle" loext:decorative="false"/>
    </style:style>
    <style:style style:name="gr396" style:family="graphic" style:parent-style-name="objectwithoutfill">
      <style:graphic-properties draw:marker-end="Arrowheads_20_281" draw:marker-end-width="0.3cm" draw:fill="solid" draw:textarea-vertical-align="middle" loext:decorative="false"/>
    </style:style>
    <style:style style:name="gr397" style:family="graphic" style:parent-style-name="objectwithoutfill">
      <style:graphic-properties draw:marker-end="Arrowheads_20_282" draw:marker-end-width="0.3cm" draw:fill="solid" draw:textarea-vertical-align="middle" loext:decorative="false"/>
    </style:style>
    <style:style style:name="gr398" style:family="graphic" style:parent-style-name="objectwithoutfill">
      <style:graphic-properties draw:marker-end="Arrowheads_20_283" draw:marker-end-width="0.3cm" draw:fill="solid" draw:textarea-vertical-align="middle" loext:decorative="false"/>
    </style:style>
    <style:style style:name="gr399" style:family="graphic" style:parent-style-name="objectwithoutfill">
      <style:graphic-properties draw:marker-end="Arrowheads_20_284" draw:marker-end-width="0.3cm" draw:fill="solid" draw:textarea-vertical-align="middle" loext:decorative="false"/>
    </style:style>
    <style:style style:name="gr400" style:family="graphic" style:parent-style-name="objectwithoutfill">
      <style:graphic-properties draw:marker-end="Arrowheads_20_272" draw:marker-end-width="0.3cm" draw:fill="solid" draw:textarea-vertical-align="middle" loext:decorative="false"/>
    </style:style>
    <style:style style:name="gr401" style:family="graphic" style:parent-style-name="objectwithoutfill">
      <style:graphic-properties draw:marker-end="Arrowheads_20_273" draw:marker-end-width="0.3cm" draw:fill="solid" draw:textarea-vertical-align="middle" loext:decorative="false"/>
    </style:style>
    <style:style style:name="gr402" style:family="graphic" style:parent-style-name="objectwithoutfill">
      <style:graphic-properties draw:marker-end="Arrowheads_20_274" draw:marker-end-width="0.3cm" draw:fill="solid" draw:textarea-vertical-align="middle" loext:decorative="false"/>
    </style:style>
    <style:style style:name="gr403" style:family="graphic" style:parent-style-name="objectwithoutfill">
      <style:graphic-properties draw:marker-end="Arrowheads_20_275" draw:marker-end-width="0.3cm" draw:fill="solid" draw:textarea-vertical-align="middle" loext:decorative="false"/>
    </style:style>
    <style:style style:name="gr404" style:family="graphic" style:parent-style-name="objectwithoutfill">
      <style:graphic-properties draw:marker-end="Arrowheads_20_276" draw:marker-end-width="0.3cm" draw:fill="solid" draw:textarea-vertical-align="middle" loext:decorative="false"/>
    </style:style>
    <style:style style:name="gr405" style:family="graphic" style:parent-style-name="objectwithoutfill">
      <style:graphic-properties draw:marker-end="Arrowheads_20_285" draw:marker-end-width="0.3cm" draw:fill="solid" draw:textarea-vertical-align="middle" loext:decorative="false"/>
    </style:style>
    <style:style style:name="gr406" style:family="graphic" style:parent-style-name="objectwithoutfill">
      <style:graphic-properties draw:marker-end="Arrowheads_20_286" draw:marker-end-width="0.3cm" draw:fill="solid" draw:textarea-vertical-align="middle" loext:decorative="false"/>
    </style:style>
    <style:style style:name="gr407" style:family="graphic" style:parent-style-name="standard">
      <style:graphic-properties draw:fill="solid" draw:fill-color="#f9dc8c" draw:textarea-vertical-align="middle" loext:decorative="false"/>
    </style:style>
    <style:style style:name="gr408" style:family="graphic" style:parent-style-name="standard">
      <style:graphic-properties draw:fill="solid" draw:fill-color="#70ae61" draw:textarea-vertical-align="middle" loext:decorative="false"/>
      <style:paragraph-properties style:writing-mode="lr-tb"/>
    </style:style>
    <style:style style:name="gr409" style:family="graphic" style:parent-style-name="objectwithoutfill">
      <style:graphic-properties draw:marker-end="Arrowheads_20_288" draw:marker-end-width="0.3cm" draw:fill="solid" draw:textarea-vertical-align="middle" loext:decorative="false"/>
    </style:style>
    <style:style style:name="gr410" style:family="graphic" style:parent-style-name="standard">
      <style:graphic-properties draw:fill="solid" draw:fill-color="#9b592e" draw:textarea-vertical-align="middle" loext:decorative="false"/>
      <style:paragraph-properties style:writing-mode="lr-tb"/>
    </style:style>
    <style:style style:name="gr411" style:family="graphic" style:parent-style-name="standard">
      <style:graphic-properties draw:stroke="solid" svg:stroke-width="0.05cm" svg:stroke-color="#000000" draw:marker-start-width="0.28cm" draw:marker-end-width="0.28cm" draw:fill="none" draw:textarea-vertical-align="middle" draw:auto-grow-height="false" fo:min-height="3.557cm" fo:min-width="0cm" fo:padding-top="0.15cm" fo:padding-bottom="0.15cm" fo:padding-left="0.275cm" fo:padding-right="0.275cm" fo:wrap-option="wrap" loext:decorative="false"/>
    </style:style>
    <style:style style:name="gr412" style:family="graphic" style:parent-style-name="standard">
      <style:graphic-properties draw:stroke="none" svg:stroke-color="#000000" draw:fill="none" draw:fill-color="#ffffff" draw:textarea-horizontal-align="left" draw:auto-grow-height="true" draw:auto-grow-width="true" fo:min-height="0.475cm" fo:min-width="0.806cm" loext:decorative="false"/>
      <style:paragraph-properties style:writing-mode="lr-tb"/>
    </style:style>
    <style:style style:name="gr413" style:family="graphic" style:parent-style-name="standard">
      <style:graphic-properties draw:stroke="none" svg:stroke-color="#000000" draw:fill="none" draw:fill-color="#ffffff" draw:textarea-horizontal-align="left" draw:auto-grow-height="true" draw:auto-grow-width="true" fo:min-height="0.475cm" fo:min-width="0.899cm" loext:decorative="false"/>
      <style:paragraph-properties style:writing-mode="lr-tb"/>
    </style:style>
    <style:style style:name="gr414" style:family="graphic" style:parent-style-name="standard">
      <style:graphic-properties draw:fill="solid" draw:fill-color="#6390c2" draw:textarea-horizontal-align="justify" draw:textarea-vertical-align="middle" draw:auto-grow-height="false" fo:min-height="0.184cm" fo:min-width="0.019cm" loext:decorative="false"/>
    </style:style>
    <style:style style:name="gr415" style:family="graphic" style:parent-style-name="objectwithoutfill">
      <style:graphic-properties draw:marker-end="Arrowheads_20_289" draw:marker-end-width="0.3cm" draw:fill="solid" draw:textarea-vertical-align="middle" loext:decorative="false"/>
    </style:style>
    <style:style style:name="gr416" style:family="graphic" style:parent-style-name="objectwithoutfill">
      <style:graphic-properties draw:marker-end="Arrowheads_20_290" draw:marker-end-width="0.3cm" draw:fill="solid" draw:textarea-vertical-align="middle" loext:decorative="false"/>
    </style:style>
    <style:style style:name="gr417" style:family="graphic" style:parent-style-name="objectwithoutfill">
      <style:graphic-properties draw:marker-end="Arrowheads_20_291" draw:marker-end-width="0.3cm" draw:fill="solid" draw:textarea-vertical-align="middle" loext:decorative="false"/>
    </style:style>
    <style:style style:name="gr418" style:family="graphic" style:parent-style-name="objectwithoutfill">
      <style:graphic-properties draw:marker-end="Arrowheads_20_292" draw:marker-end-width="0.3cm" draw:fill="solid" draw:textarea-vertical-align="middle" loext:decorative="false"/>
    </style:style>
    <style:style style:name="gr419" style:family="graphic" style:parent-style-name="objectwithoutfill">
      <style:graphic-properties draw:marker-end="Arrowheads_20_293" draw:marker-end-width="0.3cm" draw:fill="solid" draw:textarea-vertical-align="middle" loext:decorative="false"/>
    </style:style>
    <style:style style:name="gr420" style:family="graphic" style:parent-style-name="objectwithoutfill">
      <style:graphic-properties draw:marker-end="Arrowheads_20_294" draw:marker-end-width="0.3cm" draw:fill="solid" draw:textarea-vertical-align="middle" loext:decorative="false"/>
    </style:style>
    <style:style style:name="gr421" style:family="graphic" style:parent-style-name="objectwithoutfill">
      <style:graphic-properties draw:marker-end="Arrowheads_20_296" draw:marker-end-width="0.3cm" draw:fill="solid" draw:textarea-vertical-align="middle" loext:decorative="false"/>
    </style:style>
    <style:style style:name="gr422" style:family="graphic" style:parent-style-name="objectwithoutfill">
      <style:graphic-properties draw:marker-end="Arrowheads_20_300" draw:marker-end-width="0.3cm" draw:fill="solid" draw:textarea-vertical-align="middle" loext:decorative="false"/>
    </style:style>
    <style:style style:name="gr423" style:family="graphic" style:parent-style-name="objectwithoutfill">
      <style:graphic-properties draw:marker-end="Arrowheads_20_301" draw:marker-end-width="0.3cm" draw:fill="solid" draw:textarea-vertical-align="middle" loext:decorative="false"/>
    </style:style>
    <style:style style:name="gr424" style:family="graphic" style:parent-style-name="objectwithoutfill">
      <style:graphic-properties draw:marker-end="Arrowheads_20_302" draw:marker-end-width="0.3cm" draw:fill="solid" draw:textarea-vertical-align="middle" loext:decorative="false"/>
    </style:style>
    <style:style style:name="gr425" style:family="graphic" style:parent-style-name="objectwithoutfill">
      <style:graphic-properties draw:marker-end="Arrowheads_20_305" draw:marker-end-width="0.3cm" draw:fill="solid" draw:textarea-vertical-align="middle" loext:decorative="false"/>
    </style:style>
    <style:style style:name="gr426" style:family="graphic" style:parent-style-name="objectwithoutfill">
      <style:graphic-properties draw:marker-end="Arrowheads_20_306" draw:marker-end-width="0.3cm" draw:fill="solid" draw:textarea-vertical-align="middle" loext:decorative="false"/>
      <style:paragraph-properties style:writing-mode="lr-tb"/>
    </style:style>
    <style:style style:name="gr427" style:family="graphic" style:parent-style-name="objectwithoutfill">
      <style:graphic-properties draw:marker-end="Arrowheads_20_307" draw:marker-end-width="0.3cm" draw:fill="solid" draw:textarea-vertical-align="middle" loext:decorative="false"/>
    </style:style>
    <style:style style:name="gr428" style:family="graphic" style:parent-style-name="objectwithoutfill">
      <style:graphic-properties draw:marker-end="Arrowheads_20_308" draw:marker-end-width="0.3cm" draw:fill="solid" draw:textarea-vertical-align="middle" loext:decorative="false"/>
    </style:style>
    <style:style style:name="gr429" style:family="graphic" style:parent-style-name="objectwithoutfill">
      <style:graphic-properties draw:marker-end="Arrowheads_20_314" draw:marker-end-width="0.3cm" draw:fill="solid" draw:textarea-vertical-align="middle" loext:decorative="false"/>
    </style:style>
    <style:style style:name="gr430" style:family="graphic" style:parent-style-name="objectwithoutfill">
      <style:graphic-properties draw:marker-end="Arrowheads_20_315" draw:marker-end-width="0.3cm" draw:fill="solid" draw:textarea-vertical-align="middle" loext:decorative="false"/>
    </style:style>
    <style:style style:name="gr431" style:family="graphic" style:parent-style-name="objectwithoutfill">
      <style:graphic-properties draw:marker-end="Arrowheads_20_295" draw:marker-end-width="0.3cm" draw:fill="solid" draw:textarea-vertical-align="middle" loext:decorative="false"/>
    </style:style>
    <style:style style:name="gr432" style:family="graphic" style:parent-style-name="standard">
      <style:graphic-properties draw:fill="solid" draw:fill-color="#b4d2ea" draw:textarea-vertical-align="middle" loext:decorative="false"/>
      <style:paragraph-properties style:writing-mode="lr-tb"/>
    </style:style>
    <style:style style:name="gr433" style:family="graphic" style:parent-style-name="standard">
      <style:graphic-properties svg:stroke-color="#00b0be" draw:fill="solid" draw:fill-color="#b4d2ea" draw:textarea-vertical-align="middle" loext:decorative="false"/>
      <style:paragraph-properties style:writing-mode="lr-tb"/>
    </style:style>
    <style:style style:name="gr434" style:family="graphic" style:parent-style-name="objectwithoutfill">
      <style:graphic-properties svg:stroke-color="#d86a50" draw:marker-end="Arrowheads_20_339" draw:marker-end-width="0.3cm" draw:fill="solid" draw:textarea-vertical-align="middle" loext:decorative="false"/>
    </style:style>
    <style:style style:name="gr435" style:family="graphic" style:parent-style-name="objectwithoutfill">
      <style:graphic-properties svg:stroke-color="#d86a50" draw:marker-end="Arrowheads_20_340" draw:marker-end-width="0.3cm" draw:fill="solid" draw:textarea-vertical-align="middle" loext:decorative="false"/>
    </style:style>
    <style:style style:name="gr436" style:family="graphic" style:parent-style-name="objectwithoutfill">
      <style:graphic-properties svg:stroke-color="#d86a50" draw:marker-end="Arrowheads_20_341" draw:marker-end-width="0.3cm" draw:fill="solid" draw:textarea-vertical-align="middle" loext:decorative="false"/>
    </style:style>
    <style:style style:name="gr437" style:family="graphic" style:parent-style-name="objectwithoutfill">
      <style:graphic-properties draw:marker-end="Arrowheads_20_342" draw:marker-end-width="0.3cm" draw:fill="solid" draw:textarea-vertical-align="middle" loext:decorative="false"/>
    </style:style>
    <style:style style:name="gr438" style:family="graphic" style:parent-style-name="objectwithoutfill">
      <style:graphic-properties draw:marker-end="Arrowheads_20_348" draw:marker-end-width="0.3cm" draw:fill="solid" draw:textarea-vertical-align="middle" loext:decorative="false"/>
    </style:style>
    <style:style style:name="gr439" style:family="graphic" style:parent-style-name="objectwithoutfill">
      <style:graphic-properties draw:marker-end="Arrowheads_20_349" draw:marker-end-width="0.3cm" draw:fill="solid" draw:textarea-vertical-align="middle" loext:decorative="false"/>
    </style:style>
    <style:style style:name="gr440" style:family="graphic" style:parent-style-name="objectwithoutfill">
      <style:graphic-properties draw:marker-end="Arrowheads_20_350" draw:marker-end-width="0.3cm" draw:fill="solid" draw:textarea-vertical-align="middle" loext:decorative="false"/>
    </style:style>
    <style:style style:name="gr441" style:family="graphic" style:parent-style-name="standard">
      <style:graphic-properties draw:stroke="solid" svg:stroke-color="#345d95" draw:fill="solid" draw:fill-color="#6390c2" draw:textarea-vertical-align="middle" loext:decorative="false"/>
      <style:paragraph-properties style:writing-mode="lr-tb"/>
    </style:style>
    <style:style style:name="gr442" style:family="graphic" style:parent-style-name="standard">
      <style:graphic-properties draw:stroke="solid" svg:stroke-color="#d86a50" draw:fill="solid" draw:fill-color="#9b592e" draw:textarea-vertical-align="middle" loext:decorative="false"/>
      <style:paragraph-properties style:writing-mode="lr-tb"/>
    </style:style>
    <style:style style:name="gr443" style:family="graphic" style:parent-style-name="objectwithoutfill">
      <style:graphic-properties draw:marker-end="Arrowheads_20_351" draw:marker-end-width="0.3cm" draw:fill="solid" draw:textarea-vertical-align="middle" loext:decorative="false"/>
    </style:style>
    <style:style style:name="gr444" style:family="graphic" style:parent-style-name="objectwithoutfill">
      <style:graphic-properties draw:marker-end="Arrowheads_20_352" draw:marker-end-width="0.3cm" draw:fill="solid" draw:textarea-vertical-align="middle" loext:decorative="false"/>
    </style:style>
    <style:style style:name="gr445" style:family="graphic" style:parent-style-name="objectwithoutfill">
      <style:graphic-properties draw:marker-end="Arrowheads_20_353" draw:marker-end-width="0.3cm" draw:fill="solid" draw:textarea-vertical-align="middle" loext:decorative="false"/>
    </style:style>
    <style:style style:name="gr446" style:family="graphic" style:parent-style-name="objectwithoutfill">
      <style:graphic-properties draw:marker-end="Arrowheads_20_354" draw:marker-end-width="0.3cm" draw:fill="solid" draw:textarea-vertical-align="middle" loext:decorative="false"/>
    </style:style>
    <style:style style:name="gr447" style:family="graphic" style:parent-style-name="objectwithoutfill">
      <style:graphic-properties draw:marker-end="Arrowheads_20_355" draw:marker-end-width="0.3cm" draw:fill="solid" draw:textarea-vertical-align="middle" loext:decorative="false"/>
    </style:style>
    <style:style style:name="gr448" style:family="graphic" style:parent-style-name="objectwithoutfill">
      <style:graphic-properties draw:marker-end="Arrowheads_20_356" draw:marker-end-width="0.3cm" draw:fill="solid" draw:textarea-vertical-align="middle" loext:decorative="false"/>
    </style:style>
    <style:style style:name="gr449" style:family="graphic" style:parent-style-name="objectwithoutfill">
      <style:graphic-properties draw:marker-end="Arrowheads_20_357" draw:marker-end-width="0.3cm" draw:fill="solid" draw:textarea-vertical-align="middle" loext:decorative="false"/>
    </style:style>
    <style:style style:name="gr450" style:family="graphic" style:parent-style-name="standard">
      <style:graphic-properties draw:stroke="none" svg:stroke-color="#000000" draw:fill="none" draw:fill-color="#ffffff" draw:textarea-horizontal-align="left" draw:auto-grow-height="true" draw:auto-grow-width="true" fo:min-height="1.971cm" fo:min-width="9.239cm" loext:decorative="false"/>
      <style:paragraph-properties style:writing-mode="lr-tb"/>
    </style:style>
    <style:style style:name="gr451" style:family="graphic" style:parent-style-name="objectwithoutfill">
      <style:graphic-properties draw:marker-end="Arrowheads_20_377" draw:marker-end-width="0.3cm" draw:fill="solid" draw:textarea-vertical-align="middle" loext:decorative="false"/>
    </style:style>
    <style:style style:name="gr452" style:family="graphic" style:parent-style-name="objectwithoutfill">
      <style:graphic-properties draw:marker-end="Arrowheads_20_378" draw:marker-end-width="0.3cm" draw:fill="solid" draw:textarea-vertical-align="middle" loext:decorative="false"/>
    </style:style>
    <style:style style:name="gr453" style:family="graphic" style:parent-style-name="objectwithoutfill">
      <style:graphic-properties draw:marker-end="Arrowheads_20_379" draw:marker-end-width="0.3cm" draw:fill="solid" draw:textarea-vertical-align="middle" loext:decorative="false"/>
    </style:style>
    <style:style style:name="gr454" style:family="graphic" style:parent-style-name="objectwithoutfill">
      <style:graphic-properties draw:marker-end="Arrowheads_20_380" draw:marker-end-width="0.3cm" draw:fill="solid" draw:textarea-vertical-align="middle" loext:decorative="false"/>
    </style:style>
    <style:style style:name="gr455" style:family="graphic" style:parent-style-name="objectwithoutfill">
      <style:graphic-properties draw:marker-end="Arrowheads_20_381" draw:marker-end-width="0.3cm" draw:fill="solid" draw:textarea-vertical-align="middle" loext:decorative="false"/>
    </style:style>
    <style:style style:name="gr456" style:family="graphic" style:parent-style-name="objectwithoutfill">
      <style:graphic-properties draw:stroke="dash" draw:stroke-dash="Long_20_Dash" svg:stroke-width="0.1cm" svg:stroke-color="#aaafc9" draw:marker-start-width="0.35cm" draw:marker-end-width="0.35cm" svg:stroke-opacity="100%" draw:fill="solid" draw:fill-color="#c7bcda" draw:opacity="100%" draw:textarea-vertical-align="middle" fo:padding-top="0.15cm" fo:padding-bottom="0.15cm" fo:padding-left="0.15cm" fo:padding-right="0.15cm" draw:shadow-opacity="100%" loext:decorative="false"/>
      <style:paragraph-properties style:writing-mode="lr-tb"/>
    </style:style>
    <style:style style:name="gr457" style:family="graphic" style:parent-style-name="objectwithoutfill">
      <style:graphic-properties draw:stroke="dash" draw:stroke-dash="Long_20_Dash" svg:stroke-width="0.03cm" svg:stroke-color="#ffb255" draw:marker-start-width="0.25cm" draw:marker-end-width="0.25cm" draw:fill="solid" draw:fill-color="#f9dc8c" draw:opacity="25%" draw:textarea-vertical-align="middle" fo:padding-top="0.115cm" fo:padding-bottom="0.115cm" fo:padding-left="0.115cm" fo:padding-right="0.115cm" draw:shadow-opacity="25%" loext:decorative="false"/>
    </style:style>
    <style:style style:name="gr458" style:family="graphic" style:parent-style-name="standard" style:list-style-name="L1">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59" style:family="graphic" style:parent-style-name="objectwithoutfill">
      <style:graphic-properties draw:stroke="dash" draw:stroke-dash="Long_20_Dash" svg:stroke-width="0.05cm" svg:stroke-color="#d86a50" draw:marker-start="Arrowheads_20_389"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460" style:family="graphic" style:parent-style-name="standard">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61" style:family="graphic" style:parent-style-name="objectwithoutfill">
      <style:graphic-properties draw:stroke="dash" draw:stroke-dash="Long_20_Dash" svg:stroke-width="0.05cm" svg:stroke-color="#d86a50" draw:marker-start="Arrowheads_20_390"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2" style:family="graphic" style:parent-style-name="objectwithoutfill">
      <style:graphic-properties draw:stroke="dash" draw:stroke-dash="Long_20_Dash" svg:stroke-width="0.05cm" svg:stroke-color="#d86a50" draw:marker-start="Arrowheads_20_391"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3" style:family="graphic" style:parent-style-name="standard">
      <style:graphic-properties draw:stroke="solid" svg:stroke-width="0.05cm" svg:stroke-color="#000000" draw:marker-start-width="0.28cm" draw:marker-end-width="0.28cm" draw:fill="none" draw:textarea-vertical-align="middle" draw:auto-grow-height="false" fo:min-height="4.565cm" fo:min-width="0cm" fo:padding-top="0.15cm" fo:padding-bottom="0.15cm" fo:padding-left="0.275cm" fo:padding-right="0.275cm" fo:wrap-option="wrap" loext:decorative="false"/>
    </style:style>
    <style:style style:name="gr464" style:family="graphic" style:parent-style-name="standard">
      <style:graphic-properties draw:stroke="none" svg:stroke-color="#000000" draw:fill="none" draw:fill-color="#ffffff" draw:textarea-horizontal-align="center" draw:auto-grow-height="true" draw:auto-grow-width="true" fo:min-height="0.949cm" fo:min-width="2.049cm" loext:decorative="false"/>
      <style:paragraph-properties style:writing-mode="lr-tb"/>
    </style:style>
    <style:style style:name="gr465" style:family="graphic" style:parent-style-name="objectwithoutfill">
      <style:graphic-properties draw:stroke="dash" draw:stroke-dash="Long_20_Dash" svg:stroke-width="0.05cm" svg:stroke-color="#d86a50" draw:marker-start="Arrowheads_20_392"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66" style:family="graphic" style:parent-style-name="standard" style:list-style-name="L1">
      <style:graphic-properties draw:stroke="none" draw:fill="solid" draw:fill-color="#ff5128" draw:textarea-vertical-align="middle" draw:auto-grow-height="false" fo:min-height="1.735cm" fo:min-width="1.881cm" fo:wrap-option="wrap" style:writing-mode="lr-tb" loext:decorative="false"/>
      <style:paragraph-properties style:writing-mode="lr-tb"/>
    </style:style>
    <style:style style:name="gr467" style:family="graphic" style:parent-style-name="standard">
      <style:graphic-properties draw:stroke="dash" draw:stroke-dash="Long_20_Dash" svg:stroke-width="0.05cm" draw:marker-start-width="0.28cm" draw:marker-end-width="0.28cm" draw:textarea-vertical-align="middle" fo:padding-top="0.15cm" fo:padding-bottom="0.15cm" fo:padding-left="0.275cm" fo:padding-right="0.275cm" loext:decorative="false"/>
      <style:paragraph-properties style:writing-mode="lr-tb"/>
    </style:style>
    <style:style style:name="gr468" style:family="graphic" style:parent-style-name="objectwithoutfill">
      <style:graphic-properties draw:stroke="dash" draw:stroke-dash="Long_20_Dash" svg:stroke-width="0.05cm" svg:stroke-color="#d86a50" draw:marker-start="Arrowheads_20_393" draw:marker-start-width="0.28cm" draw:marker-end="" draw:marker-end-width="0.22cm" draw:fill="solid" draw:textarea-vertical-align="middle" fo:padding-top="0.125cm" fo:padding-bottom="0.125cm" fo:padding-left="0.125cm" fo:padding-right="0.125cm" loext:decorative="false"/>
    </style:style>
    <style:style style:name="gr469" style:family="graphic" style:parent-style-name="objectwithoutfill">
      <style:graphic-properties draw:stroke="dash" draw:stroke-dash="Long_20_Dash" svg:stroke-width="0.05cm" svg:stroke-color="#d86a50" draw:marker-start="Arrowheads_20_394" draw:marker-start-width="0.28cm" draw:marker-end="" draw:marker-end-width="0.22cm" draw:fill="solid" draw:textarea-vertical-align="middle" fo:padding-top="0.125cm" fo:padding-bottom="0.125cm" fo:padding-left="0.125cm" fo:padding-right="0.125cm" loext:decorative="false"/>
    </style:style>
    <style:style style:name="gr470" style:family="graphic" style:parent-style-name="objectwithoutfill">
      <style:graphic-properties draw:stroke="dash" draw:stroke-dash="Long_20_Dash" svg:stroke-width="0.05cm" svg:stroke-color="#d86a50" draw:marker-start="Arrowheads_20_395" draw:marker-start-width="0.28cm" draw:marker-end="" draw:marker-end-width="0.22cm" draw:fill="solid" draw:textarea-vertical-align="middle" fo:padding-top="0.125cm" fo:padding-bottom="0.125cm" fo:padding-left="0.125cm" fo:padding-right="0.125cm" loext:decorative="false"/>
    </style:style>
    <style:style style:name="gr471" style:family="graphic" style:parent-style-name="standard">
      <style:graphic-properties draw:stroke="solid" svg:stroke-width="0.05cm" svg:stroke-color="#000000" draw:marker-start-width="0.28cm" draw:marker-end-width="0.28cm" draw:fill="none" draw:textarea-vertical-align="middle" draw:auto-grow-height="false" fo:min-height="0.837cm" fo:min-width="0cm" fo:padding-top="0.15cm" fo:padding-bottom="0.15cm" fo:padding-left="0.275cm" fo:padding-right="0.275cm" fo:wrap-option="wrap" loext:decorative="false"/>
    </style:style>
    <style:style style:name="gr472" style:family="graphic" style:parent-style-name="standard">
      <style:graphic-properties draw:stroke="none" svg:stroke-color="#000000" draw:fill="none" draw:fill-color="#ffffff" draw:textarea-horizontal-align="left" draw:auto-grow-height="true" draw:auto-grow-width="true" fo:min-height="0.319cm" fo:min-width="1.132cm" loext:decorative="false"/>
      <style:paragraph-properties style:writing-mode="lr-tb"/>
    </style:style>
    <style:style style:name="gr473" style:family="graphic" style:parent-style-name="objectwithoutfill">
      <style:graphic-properties draw:stroke="dash" draw:stroke-dash="Long_20_Dash" svg:stroke-width="0.05cm" svg:stroke-color="#00b0be" draw:marker-start-width="0.28cm" draw:marker-end="Arrowheads_20_388" draw:marker-end-width="0.38cm" draw:fill="solid" draw:textarea-vertical-align="middle" fo:padding-top="0.125cm" fo:padding-bottom="0.125cm" fo:padding-left="0.125cm" fo:padding-right="0.125cm" loext:decorative="false"/>
    </style:style>
    <style:style style:name="gr474" style:family="graphic" style:parent-style-name="standard">
      <style:graphic-properties draw:stroke="none" svg:stroke-color="#000000" draw:fill="none" draw:fill-color="#ffffff" draw:textarea-horizontal-align="left" draw:auto-grow-height="true" draw:auto-grow-width="true" fo:min-height="0.949cm" fo:min-width="2.763cm" loext:decorative="false"/>
      <style:paragraph-properties style:writing-mode="lr-tb"/>
    </style:style>
    <style:style style:name="gr475" style:family="graphic" style:parent-style-name="objectwithoutfill">
      <style:graphic-properties draw:stroke="dash" draw:stroke-dash="Long_20_Dash" svg:stroke-width="0.04cm" svg:stroke-color="#6390c2" draw:marker-start-width="0.26cm" draw:marker-end-width="0.26cm" draw:fill="solid" draw:fill-color="#8fd7d7" draw:opacity="50%" draw:textarea-vertical-align="middle" fo:padding-top="0.12cm" fo:padding-bottom="0.12cm" fo:padding-left="0.12cm" fo:padding-right="0.12cm" draw:shadow-opacity="50%" loext:decorative="false"/>
    </style:style>
    <style:style style:name="gr476" style:family="graphic" style:parent-style-name="standard">
      <style:graphic-properties draw:stroke="none" svg:stroke-color="#000000" draw:fill="none" draw:fill-color="#ffffff" draw:textarea-horizontal-align="center" draw:auto-grow-height="true" draw:auto-grow-width="true" fo:min-height="1.111cm" fo:min-width="2.763cm" loext:decorative="false"/>
      <style:paragraph-properties style:writing-mode="lr-tb"/>
    </style:style>
    <style:style style:name="gr477" style:family="graphic" style:parent-style-name="objectwithoutfill">
      <style:graphic-properties draw:stroke="dash" draw:stroke-dash="Long_20_Dash" svg:stroke-width="0.05cm" svg:stroke-color="#00b0be" draw:marker-start="Arrowheads_20_397" draw:marker-start-width="0.28cm" draw:marker-end="" draw:marker-end-width="0.38cm" draw:fill="solid" draw:textarea-vertical-align="middle" fo:padding-top="0.125cm" fo:padding-bottom="0.125cm" fo:padding-left="0.125cm" fo:padding-right="0.125cm" loext:decorative="false"/>
    </style:style>
    <style:style style:name="gr478" style:family="graphic" style:parent-style-name="objectwithoutfill">
      <style:graphic-properties draw:marker-end="Arrowheads_20_398" draw:marker-end-width="0.3cm" draw:fill="solid" draw:textarea-vertical-align="middle" loext:decorative="false"/>
    </style:style>
    <style:style style:name="gr479" style:family="graphic" style:parent-style-name="standard">
      <style:graphic-properties draw:stroke="none" draw:fill="solid" draw:fill-color="#b4d2ea" draw:textarea-horizontal-align="justify" draw:textarea-vertical-align="middle" draw:auto-grow-height="false" fo:min-height="1.702cm" fo:min-width="15.817cm" loext:decorative="false"/>
    </style:style>
    <style:style style:name="gr480" style:family="graphic" style:parent-style-name="standard">
      <style:graphic-properties draw:stroke="none" svg:stroke-color="#000000" draw:fill="none" draw:fill-color="#ffffff" draw:textarea-horizontal-align="left" draw:auto-grow-height="true" draw:auto-grow-width="true" fo:min-height="1.183cm" fo:min-width="1.466cm" loext:decorative="false"/>
      <style:paragraph-properties style:writing-mode="lr-tb"/>
    </style:style>
    <style:style style:name="gr481" style:family="graphic" style:parent-style-name="standard">
      <style:graphic-properties draw:textarea-horizontal-align="justify" draw:textarea-vertical-align="middle" draw:auto-grow-height="false" fo:min-height="0.436cm" fo:min-width="2.442cm" style:writing-mode="lr-tb" loext:decorative="false"/>
      <style:paragraph-properties style:writing-mode="lr-tb"/>
    </style:style>
    <style:style style:name="gr482" style:family="graphic" style:parent-style-name="standard">
      <style:graphic-properties draw:stroke="none" svg:stroke-color="#000000" draw:fill="none" draw:fill-color="#ffffff" draw:textarea-horizontal-align="left" draw:auto-grow-height="true" draw:auto-grow-width="true" fo:min-height="0.475cm" fo:min-width="0.249cm" loext:decorative="false"/>
      <style:paragraph-properties style:writing-mode="lr-tb"/>
    </style:style>
    <style:style style:name="gr483" style:family="graphic" style:parent-style-name="standard">
      <style:graphic-properties draw:stroke="none" svg:stroke-color="#000000" draw:fill="none" draw:fill-color="#ffffff" draw:textarea-horizontal-align="left" draw:auto-grow-height="true" draw:auto-grow-width="true" fo:min-height="0.789cm" fo:min-width="1.349cm" loext:decorative="false"/>
      <style:paragraph-properties style:writing-mode="lr-tb"/>
    </style:style>
    <style:style style:name="gr484" style:family="graphic" style:parent-style-name="standard">
      <style:graphic-properties draw:stroke="none" draw:fill="none" fo:min-height="0.32cm" loext:decorative="false"/>
      <style:paragraph-properties style:writing-mode="lr-tb"/>
    </style:style>
    <style:style style:name="gr485" style:family="graphic" style:parent-style-name="standard">
      <style:graphic-properties svg:stroke-color="#5c86b9"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486" style:family="graphic" style:parent-style-name="standard">
      <style:graphic-properties draw:fill="solid" draw:fill-color="#f6f5f8" draw:textarea-horizontal-align="justify" draw:textarea-vertical-align="middle" draw:auto-grow-height="false" fo:min-height="0.129cm" fo:min-width="0cm" style:writing-mode="lr-tb" loext:decorative="false"/>
      <style:paragraph-properties style:writing-mode="lr-tb"/>
    </style:style>
    <style:style style:name="gr487" style:family="graphic" style:parent-style-name="standard">
      <style:graphic-properties draw:fill="solid" draw:fill-color="#ff5128" draw:textarea-horizontal-align="justify" draw:textarea-vertical-align="middle" draw:auto-grow-height="false" fo:min-height="0.129cm" fo:min-width="0cm" style:writing-mode="lr-tb" loext:decorative="false"/>
      <style:paragraph-properties style:writing-mode="lr-tb"/>
    </style:style>
    <style:style style:name="gr488" style:family="graphic" style:parent-style-name="objectwithoutfill">
      <style:graphic-properties draw:stroke="dash" draw:stroke-dash="Long_20_Dash" svg:stroke-width="0.03cm" svg:stroke-color="#d86a50" draw:marker-start-width="0.25cm" draw:marker-end="Arrowheads_20_401" draw:marker-end-width="0.15cm" draw:fill="solid" draw:textarea-vertical-align="middle" fo:padding-top="0.115cm" fo:padding-bottom="0.115cm" fo:padding-left="0.115cm" fo:padding-right="0.115cm" loext:decorative="false"/>
    </style:style>
    <style:style style:name="gr489" style:family="graphic" style:parent-style-name="objectwithoutfill">
      <style:graphic-properties draw:stroke="dash" draw:stroke-dash="Dot_20__28_Rounded_29_" svg:stroke-width="0.05cm" svg:stroke-color="#d86a50" draw:marker-start="" draw:marker-start-width="0.28cm" draw:marker-end="" draw:marker-end-width="0.22cm" svg:stroke-linecap="round" draw:fill="solid" draw:textarea-vertical-align="middle" fo:padding-top="0.125cm" fo:padding-bottom="0.125cm" fo:padding-left="0.125cm" fo:padding-right="0.125cm" loext:decorative="false"/>
    </style:style>
    <style:style style:name="gr490" style:family="graphic" style:parent-style-name="standard">
      <style:graphic-properties draw:stroke="none" draw:fill="none" draw:textarea-horizontal-align="center" fo:min-height="1.273cm" loext:decorative="false"/>
      <style:paragraph-properties style:writing-mode="lr-tb"/>
    </style:style>
    <style:style style:name="gr491" style:family="graphic" style:parent-style-name="standard">
      <style:graphic-properties svg:stroke-color="#e8995a"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492" style:family="graphic" style:parent-style-name="standard">
      <style:graphic-properties svg:stroke-color="#e8995a" draw:fill="solid" draw:fill-color="#ffe0d9" draw:textarea-horizontal-align="justify" draw:textarea-vertical-align="middle" draw:auto-grow-height="false" fo:min-height="0.394cm" fo:min-width="0.985cm" style:writing-mode="lr-tb" loext:decorative="false"/>
      <style:paragraph-properties style:writing-mode="lr-tb"/>
    </style:style>
    <style:style style:name="gr493" style:family="graphic" style:parent-style-name="standard" style:list-style-name="L1">
      <style:graphic-properties draw:stroke="none" draw:fill="solid" draw:fill-color="#70ae61" draw:textarea-vertical-align="middle" draw:auto-grow-height="false" fo:min-height="1.455cm" fo:min-width="1.511cm" fo:wrap-option="wrap" style:writing-mode="lr-tb" loext:decorative="false"/>
      <style:paragraph-properties style:writing-mode="lr-tb"/>
    </style:style>
    <style:style style:name="gr494" style:family="graphic" style:parent-style-name="standard">
      <style:graphic-properties draw:stroke="none" svg:stroke-color="#000000" draw:fill="none" draw:fill-color="#ffffff" draw:textarea-horizontal-align="center" draw:auto-grow-height="true" draw:auto-grow-width="true" fo:min-height="0.908cm" fo:min-width="3.243cm" loext:decorative="false"/>
      <style:paragraph-properties style:writing-mode="lr-tb"/>
    </style:style>
    <style:style style:name="gr495" style:family="graphic" style:parent-style-name="standard">
      <style:graphic-properties draw:stroke="none" draw:fill="none" fo:min-height="0.637cm" loext:decorative="false"/>
      <style:paragraph-properties style:writing-mode="lr-tb"/>
    </style:style>
    <style:style style:name="gr496" style:family="graphic" style:parent-style-name="standard">
      <style:graphic-properties draw:stroke="dash" draw:stroke-dash="Long_20_Dash" svg:stroke-width="0.05cm" svg:stroke-color="#70ae61" draw:marker-start-width="0.28cm" draw:marker-end-width="0.28cm" draw:fill="solid" draw:fill-color="#70ae61" draw:textarea-vertical-align="middle" fo:padding-top="0.15cm" fo:padding-bottom="0.15cm" fo:padding-left="0.275cm" fo:padding-right="0.275cm" loext:decorative="false"/>
      <style:paragraph-properties style:writing-mode="lr-tb"/>
    </style:style>
    <style:style style:name="gr497" style:family="graphic" style:parent-style-name="objectwithoutfill" style:list-style-name="L1">
      <style:graphic-properties draw:stroke="dash" draw:stroke-dash="Long_20_Dash" svg:stroke-width="0.1cm" svg:stroke-color="#d86a50" draw:marker-start-width="0.35cm" draw:marker-end-width="0.35cm" svg:stroke-opacity="50%" draw:fill="solid" draw:fill-color="#f2ffd9" draw:opacity="75%" draw:textarea-horizontal-align="justify" draw:textarea-vertical-align="middle" fo:padding-top="0.15cm" fo:padding-bottom="0.15cm" fo:padding-left="0.15cm" fo:padding-right="0.15cm" draw:shadow-opacity="75%" loext:decorative="false"/>
    </style:style>
    <style:style style:name="gr498"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499"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500"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501" style:family="graphic" style:parent-style-name="standard">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02" style:family="graphic" style:parent-style-name="standard">
      <style:graphic-properties draw:stroke="none" draw:fill="solid" draw:fill-color="#6390c2" draw:textarea-horizontal-align="justify" draw:textarea-vertical-align="middle" draw:auto-grow-height="false" fo:min-height="0.436cm" fo:min-width="0.131cm" style:writing-mode="lr-tb" loext:decorative="false"/>
      <style:paragraph-properties style:writing-mode="lr-tb"/>
    </style:style>
    <style:style style:name="gr503" style:family="graphic" style:parent-style-name="objectwithoutfill">
      <style:graphic-properties draw:marker-end="" draw:marker-end-width="0.1cm" draw:fill="solid" draw:textarea-vertical-align="middle" loext:decorative="false"/>
    </style:style>
    <style:style style:name="gr504" style:family="graphic" style:parent-style-name="standard">
      <style:graphic-properties draw:stroke="none" svg:stroke-color="#000000" draw:fill="none" draw:fill-color="#ffffff" draw:textarea-horizontal-align="left" draw:auto-grow-height="true" draw:auto-grow-width="true" fo:min-height="0.475cm" fo:min-width="2.403cm" loext:decorative="false"/>
      <style:paragraph-properties style:writing-mode="lr-tb"/>
    </style:style>
    <style:style style:name="gr505" style:family="graphic" style:parent-style-name="objectwithoutfill">
      <style:graphic-properties draw:marker-start="Arrow_20_short" draw:marker-end="" draw:marker-end-width="0.2cm" draw:fill="solid" draw:textarea-vertical-align="middle" loext:decorative="false"/>
    </style:style>
    <style:style style:name="gr506" style:family="graphic" style:parent-style-name="objectwithoutfill">
      <style:graphic-properties draw:marker-start="" draw:marker-end="Arrow_20_short" draw:marker-end-width="0.2cm" draw:fill="solid" draw:textarea-vertical-align="middle" loext:decorative="false"/>
    </style:style>
    <style:style style:name="gr507" style:family="graphic" style:parent-style-name="standard">
      <style:graphic-properties draw:stroke="none" svg:stroke-color="#000000" draw:fill="none" draw:fill-color="#ffffff" draw:textarea-horizontal-align="left" draw:auto-grow-height="true" draw:auto-grow-width="true" fo:min-height="0.475cm" fo:min-width="1.72cm" loext:decorative="false"/>
      <style:paragraph-properties style:writing-mode="lr-tb"/>
    </style:style>
    <style:style style:name="gr508" style:family="graphic" style:parent-style-name="standard">
      <style:graphic-properties draw:stroke="none" draw:fill="solid" draw:fill-color="#70ae61" draw:textarea-horizontal-align="justify" draw:textarea-vertical-align="middle" draw:auto-grow-height="false" fo:min-height="0.772cm" fo:min-width="0.522cm" draw:shadow="hidden" loext:decorative="false"/>
    </style:style>
    <style:style style:name="gr509" style:family="graphic" style:parent-style-name="standard">
      <style:graphic-properties draw:stroke="none" svg:stroke-color="#000000" draw:fill="none" draw:fill-color="#ffffff" draw:textarea-horizontal-align="left" draw:auto-grow-height="true" draw:auto-grow-width="true" fo:min-height="0.319cm" fo:min-width="1.027cm" loext:decorative="false"/>
      <style:paragraph-properties style:writing-mode="lr-tb"/>
    </style:style>
    <style:style style:name="gr510" style:family="graphic" style:parent-style-name="standard">
      <style:graphic-properties draw:stroke="none" draw:fill="solid" draw:fill-color="#6390c2" draw:textarea-horizontal-align="justify" draw:textarea-vertical-align="middle" draw:auto-grow-height="false" fo:min-height="0.772cm" fo:min-width="0.522cm" draw:shadow="hidden" loext:decorative="false"/>
    </style:style>
    <style:style style:name="gr511" style:family="graphic" style:parent-style-name="standard">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2" style:family="graphic" style:parent-style-name="standard">
      <style:graphic-properties draw:stroke="none" draw:fill="solid" draw:fill-color="#6390c2" draw:textarea-horizontal-align="justify" draw:textarea-vertical-align="middle" draw:auto-grow-height="false" fo:min-height="0.782cm" fo:min-width="0.448cm" style:writing-mode="lr-tb" loext:decorative="false"/>
      <style:paragraph-properties style:writing-mode="lr-tb"/>
    </style:style>
    <style:style style:name="gr513"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4"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515" style:family="graphic" style:parent-style-name="standard">
      <style:graphic-properties draw:stroke="none" svg:stroke-color="#000000" draw:fill="none" draw:fill-color="#ffffff" draw:textarea-horizontal-align="left" draw:auto-grow-height="true" draw:auto-grow-width="false" fo:min-height="2.845cm" fo:min-width="0cm" loext:decorative="false"/>
      <style:paragraph-properties style:writing-mode="lr-tb"/>
    </style:style>
    <style:style style:name="gr516" style:family="graphic" style:parent-style-name="standard">
      <style:graphic-properties draw:stroke="none" draw:fill="solid" draw:fill-color="#6390c2" draw:textarea-horizontal-align="justify" draw:textarea-vertical-align="middle" draw:auto-grow-height="false" fo:min-height="0.783cm" fo:min-width="0.448cm" style:writing-mode="lr-tb" loext:decorative="false"/>
      <style:paragraph-properties style:writing-mode="lr-tb"/>
    </style:style>
    <style:style style:name="gr517" style:family="graphic" style:parent-style-name="standard">
      <style:graphic-properties draw:fill="none" draw:textarea-vertical-align="middle" draw:auto-grow-height="false" fo:min-height="5.322cm" fo:min-width="0cm" fo:wrap-option="wrap" loext:decorative="false"/>
    </style:style>
    <style:style style:name="gr518" style:family="graphic" style:parent-style-name="standard">
      <style:graphic-properties draw:stroke="none" svg:stroke-color="#000000" draw:fill="none" draw:fill-color="#ffffff" draw:textarea-horizontal-align="left" draw:auto-grow-height="true" draw:auto-grow-width="true" fo:min-height="1.423cm" fo:min-width="1.39cm" loext:decorative="false"/>
      <style:paragraph-properties style:writing-mode="lr-tb"/>
    </style:style>
    <style:style style:name="gr519" style:family="graphic" style:parent-style-name="standard">
      <style:graphic-properties draw:fill="none" draw:textarea-vertical-align="middle" draw:auto-grow-height="false" fo:min-height="8.775cm" fo:min-width="0.065cm" fo:wrap-option="wrap" loext:decorative="false"/>
    </style:style>
    <style:style style:name="gr520" style:family="graphic" style:parent-style-name="standard">
      <style:graphic-properties draw:stroke="none" svg:stroke-color="#000000" draw:fill="none" draw:fill-color="#ffffff" draw:textarea-horizontal-align="left" draw:auto-grow-height="true" draw:auto-grow-width="true" fo:min-height="3.691cm" fo:min-width="4.336cm" loext:decorative="false"/>
      <style:paragraph-properties style:writing-mode="lr-tb"/>
    </style:style>
    <style:style style:name="gr521" style:family="graphic" style:parent-style-name="Object_20_with_20_no_20_fill_20_and_20_no_20_line">
      <style:graphic-properties draw:textarea-horizontal-align="center" draw:textarea-vertical-align="middle" draw:ole-draw-aspect="1" style:protect="size" loext:decorative="false"/>
    </style:style>
    <style:style style:name="gr522"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3"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4"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5" style:family="graphic" style:parent-style-name="standard">
      <style:graphic-properties draw:stroke="none" draw:fill="solid" draw:fill-color="#808080" draw:opacity="75%" draw:textarea-horizontal-align="justify" draw:textarea-vertical-align="middle" draw:auto-grow-height="true" fo:min-height="0cm" fo:min-width="0cm" draw:shadow-opacity="75%" style:writing-mode="lr-tb" loext:decorative="false"/>
      <style:paragraph-properties style:writing-mode="lr-tb"/>
    </style:style>
    <style:style style:name="gr526" style:family="graphic" style:parent-style-name="objectwithoutfill">
      <style:graphic-properties draw:marker-end="Arrowheads_20_418" draw:marker-end-width="0.3cm" draw:fill="solid" draw:textarea-vertical-align="middle" loext:decorative="false"/>
    </style:style>
    <style:style style:name="gr527"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91cm" fo:min-width="1.346cm" fo:padding-top="0.35cm" fo:padding-bottom="0.145cm" fo:padding-left="0.27cm" fo:padding-right="0.27cm" style:writing-mode="lr-tb" loext:decorative="false"/>
      <style:paragraph-properties style:writing-mode="lr-tb"/>
    </style:style>
    <style:style style:name="gr52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48cm" fo:min-width="1.345cm" fo:padding-top="0.35cm" fo:padding-bottom="0.145cm" fo:padding-left="0.27cm" fo:padding-right="0.27cm" style:writing-mode="lr-tb" loext:decorative="false"/>
      <style:paragraph-properties style:writing-mode="lr-tb"/>
    </style:style>
    <style:style style:name="gr529" style:family="graphic" style:parent-style-name="standard">
      <style:graphic-properties draw:stroke="none" draw:fill="none" draw:textarea-horizontal-align="center" fo:min-height="1.971cm" loext:decorative="false"/>
      <style:paragraph-properties style:writing-mode="lr-tb"/>
    </style:style>
    <style:style style:name="gr530" style:family="graphic" style:parent-style-name="standard">
      <style:graphic-properties draw:textarea-horizontal-align="justify" draw:textarea-vertical-align="middle" draw:auto-grow-height="false" fo:min-height="3.285cm" fo:min-width="2.618cm" loext:decorative="false"/>
    </style:style>
    <style:style style:name="gr531" style:family="graphic" style:parent-style-name="standard">
      <style:graphic-properties draw:stroke="none" draw:fill="solid" draw:fill-color="#345d95" draw:textarea-vertical-align="middle" draw:auto-grow-height="false" fo:min-height="0cm" fo:min-width="0cm" loext:decorative="false"/>
    </style:style>
    <style:style style:name="gr532" style:family="graphic" style:parent-style-name="standard">
      <style:graphic-properties draw:stroke="none" svg:stroke-color="#000000" draw:fill="none" draw:fill-color="#ffffff" draw:textarea-horizontal-align="left" draw:auto-grow-height="true" draw:auto-grow-width="true" fo:min-height="0.319cm" fo:min-width="0.601cm" loext:decorative="false"/>
      <style:paragraph-properties style:writing-mode="lr-tb"/>
    </style:style>
    <style:style style:name="gr533" style:family="graphic" style:parent-style-name="standard">
      <style:graphic-properties draw:stroke="none" draw:fill="solid" draw:fill-color="#b4d2ea" draw:textarea-vertical-align="middle" draw:auto-grow-height="false" fo:min-height="0cm" fo:min-width="0cm" loext:decorative="false"/>
    </style:style>
    <style:style style:name="gr534" style:family="graphic" style:parent-style-name="standard">
      <style:graphic-properties draw:stroke="none" svg:stroke-color="#000000" draw:fill="none" draw:fill-color="#ffffff" draw:textarea-horizontal-align="left" draw:auto-grow-height="true" draw:auto-grow-width="true" fo:min-height="0.319cm" fo:min-width="0.837cm" loext:decorative="false"/>
      <style:paragraph-properties style:writing-mode="lr-tb"/>
    </style:style>
    <style:style style:name="gr535" style:family="graphic" style:parent-style-name="standard">
      <style:graphic-properties draw:stroke="none" svg:stroke-color="#000000" draw:fill="none" draw:fill-color="#ffffff" draw:textarea-horizontal-align="left" draw:auto-grow-height="true" draw:auto-grow-width="true" fo:min-height="0.319cm" fo:min-width="1.547cm" loext:decorative="false"/>
      <style:paragraph-properties style:writing-mode="lr-tb"/>
    </style:style>
    <style:style style:name="gr536"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553cm" fo:min-width="0.62cm" fo:padding-top="0.135cm" fo:padding-bottom="0.135cm" fo:padding-left="0.26cm" fo:padding-right="0.26cm" loext:decorative="false"/>
    </style:style>
    <style:style style:name="gr537"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74cm" fo:min-width="0.878cm" fo:padding-top="0.135cm" fo:padding-bottom="0.135cm" fo:padding-left="0.26cm" fo:padding-right="0.26cm" loext:decorative="false"/>
    </style:style>
    <style:style style:name="gr538"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893cm" fo:min-width="1.092cm" fo:padding-top="0.135cm" fo:padding-bottom="0.135cm" fo:padding-left="0.26cm" fo:padding-right="0.26cm" loext:decorative="false"/>
    </style:style>
    <style:style style:name="gr539"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44cm" fo:min-width="0.462cm" fo:padding-top="0.135cm" fo:padding-bottom="0.135cm" fo:padding-left="0.26cm" fo:padding-right="0.26cm" loext:decorative="false"/>
    </style:style>
    <style:style style:name="gr540" style:family="graphic" style:parent-style-name="objectwithoutfill">
      <style:graphic-properties draw:marker-end="Arrowheads_20_419" draw:marker-end-width="0.2cm" draw:fill="solid" draw:textarea-vertical-align="middle" loext:decorative="false"/>
    </style:style>
    <style:style style:name="gr541" style:family="graphic" style:parent-style-name="standard">
      <style:graphic-properties draw:stroke="none" svg:stroke-color="#000000" draw:fill="none" draw:fill-color="#ffffff" draw:textarea-horizontal-align="center" draw:auto-grow-height="true" draw:auto-grow-width="true" fo:min-height="0.955cm" fo:min-width="1.973cm" loext:decorative="false"/>
      <style:paragraph-properties style:writing-mode="lr-tb"/>
    </style:style>
    <style:style style:name="gr542" style:family="graphic" style:parent-style-name="standard">
      <style:graphic-properties draw:stroke="none" svg:stroke-color="#000000" draw:fill="none" draw:fill-color="#ffffff" draw:textarea-horizontal-align="left" draw:auto-grow-height="true" draw:auto-grow-width="true" fo:min-height="0.955cm" fo:min-width="3.076cm" loext:decorative="false"/>
      <style:paragraph-properties style:writing-mode="lr-tb"/>
    </style:style>
    <style:style style:name="gr543" style:family="graphic" style:parent-style-name="standard">
      <style:graphic-properties draw:stroke="none" svg:stroke-color="#000000" draw:fill="none" draw:fill-color="#ffffff" draw:textarea-horizontal-align="left" draw:auto-grow-height="true" draw:auto-grow-width="true" fo:min-height="0.319cm" fo:min-width="1.626cm" loext:decorative="false"/>
      <style:paragraph-properties style:writing-mode="lr-tb"/>
    </style:style>
    <style:style style:name="gr544" style:family="graphic" style:parent-style-name="standard" style:list-style-name="L1">
      <style:graphic-properties draw:stroke="none" draw:fill="none" fo:min-height="0.48cm" loext:decorative="false"/>
      <style:paragraph-properties style:writing-mode="lr-tb"/>
    </style:style>
    <style:style style:name="gr545" style:family="graphic" style:parent-style-name="standard" style:list-style-name="L1">
      <style:graphic-properties draw:stroke="none" draw:fill="none" fo:min-height="0.48cm" loext:decorative="false"/>
      <style:paragraph-properties style:writing-mode="lr-tb"/>
    </style:style>
    <style:style style:name="gr546" style:family="graphic" style:parent-style-name="standard">
      <style:graphic-properties draw:stroke="none" svg:stroke-color="#000000" draw:fill="none" draw:fill-color="#ffffff" draw:textarea-horizontal-align="left" draw:auto-grow-height="true" draw:auto-grow-width="true" fo:min-height="0.637cm" fo:min-width="1.846cm" loext:decorative="false"/>
      <style:paragraph-properties style:writing-mode="lr-tb"/>
    </style:style>
    <style:style style:name="gr547" style:family="graphic" style:parent-style-name="standard">
      <style:graphic-properties draw:marker-start="Arrow" draw:marker-start-width="0.05cm" draw:marker-end="Arrow" draw:marker-end-width="0.05cm" draw:textarea-vertical-align="middle" loext:decorative="false"/>
    </style:style>
    <style:style style:name="gr548" style:family="graphic" style:parent-style-name="standard">
      <style:graphic-properties draw:stroke="none" svg:stroke-color="#000000" draw:fill="none" draw:fill-color="#ffffff" draw:textarea-horizontal-align="left" draw:auto-grow-height="true" draw:auto-grow-width="true" fo:min-height="0.319cm" fo:min-width="0.197cm" loext:decorative="false"/>
      <style:paragraph-properties style:writing-mode="lr-tb"/>
    </style:style>
    <style:style style:name="gr549" style:family="graphic" style:parent-style-name="objectwithoutfill">
      <style:graphic-properties draw:marker-end="Arrow" draw:marker-end-width="0.2cm" draw:fill="solid" draw:textarea-vertical-align="middle" loext:decorative="false"/>
    </style:style>
    <style:style style:name="gr550" style:family="graphic" style:parent-style-name="standard">
      <style:graphic-properties draw:stroke="none" svg:stroke-color="#000000" draw:fill="none" draw:fill-color="#ffffff" draw:textarea-horizontal-align="left" draw:auto-grow-height="true" draw:auto-grow-width="true" fo:min-height="0.637cm" fo:min-width="1.095cm" loext:decorative="false"/>
      <style:paragraph-properties style:writing-mode="lr-tb"/>
    </style:style>
    <style:style style:name="gr551" style:family="graphic" style:parent-style-name="standard">
      <style:graphic-properties draw:stroke="none" svg:stroke-color="#000000" draw:fill="none" draw:fill-color="#ffffff" draw:textarea-horizontal-align="center" draw:auto-grow-height="true" draw:auto-grow-width="true" fo:min-height="0.789cm" fo:min-width="4.59cm" loext:decorative="false"/>
      <style:paragraph-properties style:writing-mode="lr-tb"/>
    </style:style>
    <style:style style:name="gr552" style:family="graphic" style:parent-style-name="standard">
      <style:graphic-properties draw:marker-end="Arrowheads_20_420" draw:textarea-vertical-align="middle" loext:decorative="false"/>
    </style:style>
    <style:style style:name="gr553" style:family="graphic" style:parent-style-name="objectwithoutfill">
      <style:graphic-properties svg:stroke-color="#d86a50" draw:marker-start="" draw:marker-start-width="0.2cm" draw:marker-end="Arrowheads_20_421" draw:marker-end-width="0.2cm" draw:fill="solid" draw:textarea-vertical-align="middle" loext:decorative="false"/>
    </style:style>
    <style:style style:name="gr554" style:family="graphic" style:parent-style-name="standard">
      <style:graphic-properties draw:stroke="none" svg:stroke-color="#000000" draw:fill="none" draw:fill-color="#ffffff" draw:textarea-horizontal-align="left" draw:auto-grow-height="true" draw:auto-grow-width="true" fo:min-height="0.319cm" fo:min-width="0.617cm" loext:decorative="false"/>
      <style:paragraph-properties style:writing-mode="lr-tb"/>
    </style:style>
    <style:style style:name="gr555" style:family="graphic" style:parent-style-name="standard">
      <style:graphic-properties draw:stroke="none" svg:stroke-color="#000000" draw:fill="none" draw:fill-color="#ffffff" draw:textarea-horizontal-align="left" draw:auto-grow-height="true" draw:auto-grow-width="true" fo:min-height="0.319cm" fo:min-width="0.791cm" loext:decorative="false"/>
      <style:paragraph-properties style:writing-mode="lr-tb"/>
    </style:style>
    <style:style style:name="gr556" style:family="graphic" style:parent-style-name="standard">
      <style:graphic-properties draw:stroke="none" svg:stroke-color="#000000" draw:fill="none" draw:fill-color="#ffffff" draw:textarea-horizontal-align="left" draw:auto-grow-height="true" draw:auto-grow-width="true" fo:min-height="0.319cm" fo:min-width="1.248cm" loext:decorative="false"/>
      <style:paragraph-properties style:writing-mode="lr-tb"/>
    </style:style>
    <style:style style:name="gr557" style:family="graphic" style:parent-style-name="objectwithoutfill">
      <style:graphic-properties draw:stroke="dash" draw:stroke-dash="Long_20_Dash" svg:stroke-width="0.04cm" svg:stroke-color="#00b0be" draw:marker-start-width="0.26cm" draw:marker-end="Arrow" draw:marker-end-width="0.36cm" draw:fill="solid" draw:textarea-vertical-align="middle" fo:padding-top="0.12cm" fo:padding-bottom="0.12cm" fo:padding-left="0.12cm" fo:padding-right="0.12cm" loext:decorative="false"/>
    </style:style>
    <style:style style:name="gr558" style:family="graphic" style:parent-style-name="standard">
      <style:graphic-properties draw:stroke="none" svg:stroke-color="#000000" draw:fill="none" draw:fill-color="#ffffff" draw:textarea-horizontal-align="center" draw:auto-grow-height="true" draw:auto-grow-width="true" fo:min-height="1.765cm" fo:min-width="4.384cm" loext:decorative="false"/>
      <style:paragraph-properties style:writing-mode="lr-tb"/>
    </style:style>
    <style:style style:name="gr559" style:family="graphic" style:parent-style-name="objectwithoutfill">
      <style:graphic-properties draw:stroke="dash" draw:stroke-dash="Long_20_Dash" svg:stroke-width="0.04cm" svg:stroke-color="#00b0be" draw:marker-start="Arrow" draw:marker-start-width="0.36cm" draw:marker-end="" draw:marker-end-width="0.36cm" draw:fill="solid" draw:textarea-vertical-align="middle" fo:padding-top="0.12cm" fo:padding-bottom="0.12cm" fo:padding-left="0.12cm" fo:padding-right="0.12cm" loext:decorative="false"/>
    </style:style>
    <style:style style:name="gr560" style:family="graphic" style:parent-style-name="standard">
      <style:graphic-properties draw:stroke="none" svg:stroke-color="#000000" draw:fill="none" draw:fill-color="#ffffff" draw:textarea-horizontal-align="left" draw:auto-grow-height="true" draw:auto-grow-width="true" fo:min-height="0.788cm" fo:min-width="5.088cm" loext:decorative="false"/>
      <style:paragraph-properties style:writing-mode="lr-tb"/>
    </style:style>
    <style:style style:name="gr561" style:family="graphic" style:parent-style-name="standard">
      <style:graphic-properties draw:stroke="none" svg:stroke-color="#000000" draw:fill="none" draw:fill-color="#ffffff" draw:textarea-horizontal-align="center" draw:auto-grow-height="true" draw:auto-grow-width="true" fo:min-height="1.765cm" fo:min-width="4.56cm" loext:decorative="false"/>
      <style:paragraph-properties style:writing-mode="lr-tb"/>
    </style:style>
    <style:style style:name="gr562" style:family="graphic" style:parent-style-name="standard" style:list-style-name="L1">
      <style:graphic-properties draw:stroke="none" draw:fill="solid" draw:fill-color="#70ae61" draw:textarea-vertical-align="middle" draw:auto-grow-height="false" fo:min-height="1.455cm" fo:min-width="1.698cm" fo:wrap-option="wrap" style:writing-mode="lr-tb" loext:decorative="false"/>
      <style:paragraph-properties style:writing-mode="lr-tb"/>
    </style:style>
    <style:style style:name="gr563" style:family="graphic" style:parent-style-name="standard">
      <style:graphic-properties draw:stroke="none" draw:fill="none" draw:textarea-horizontal-align="center" fo:min-height="1.183cm" loext:decorative="false"/>
      <style:paragraph-properties style:writing-mode="lr-tb"/>
    </style:style>
    <style:style style:name="gr564" style:family="graphic" style:parent-style-name="standard">
      <style:graphic-properties draw:fill="solid" draw:fill-color="#ff5128" draw:textarea-horizontal-align="justify" draw:textarea-vertical-align="middle" draw:auto-grow-height="false" fo:min-height="0.245cm" fo:min-width="0cm" style:writing-mode="lr-tb" loext:decorative="false"/>
      <style:paragraph-properties style:writing-mode="lr-tb"/>
    </style:style>
    <style:style style:name="gr565" style:family="graphic" style:parent-style-name="objectwithoutfill">
      <style:graphic-properties draw:marker-end="Arrow" draw:marker-end-width="0.1cm" draw:fill="solid" draw:textarea-vertical-align="middle" loext:decorative="false"/>
    </style:style>
    <style:style style:name="gr566" style:family="graphic" style:parent-style-name="standard">
      <style:graphic-properties draw:stroke="none" svg:stroke-color="#000000" draw:fill="none" draw:fill-color="#ffffff" draw:textarea-horizontal-align="left" draw:auto-grow-height="true" draw:auto-grow-width="true" fo:min-height="0.395cm" fo:min-width="3.458cm" loext:decorative="false"/>
      <style:paragraph-properties style:writing-mode="lr-tb"/>
    </style:style>
    <style:style style:name="gr567" style:family="graphic" style:parent-style-name="standard">
      <style:graphic-properties draw:fill="solid" draw:fill-color="#f6f5f8" draw:textarea-horizontal-align="justify" draw:textarea-vertical-align="middle" draw:auto-grow-height="false" fo:min-height="0.38cm" fo:min-width="0.915cm" style:writing-mode="lr-tb" loext:decorative="false"/>
      <style:paragraph-properties style:writing-mode="lr-tb"/>
    </style:style>
    <style:style style:name="gr568" style:family="graphic" style:parent-style-name="standard">
      <style:graphic-properties draw:fill="solid" draw:fill-color="#e8995a" draw:textarea-horizontal-align="justify" draw:textarea-vertical-align="middle" draw:auto-grow-height="false" fo:min-height="0.436cm" fo:min-width="0.131cm" style:writing-mode="lr-tb" loext:decorative="false"/>
      <style:paragraph-properties style:writing-mode="lr-tb"/>
    </style:style>
    <style:style style:name="gr569" style:family="graphic" style:parent-style-name="standard">
      <style:graphic-properties draw:fill="solid" draw:fill-color="#ff5128" draw:textarea-horizontal-align="justify" draw:textarea-vertical-align="middle" draw:auto-grow-height="false" fo:min-height="0.245cm" fo:min-width="0.093cm" style:writing-mode="lr-tb" loext:decorative="false"/>
      <style:paragraph-properties style:writing-mode="lr-tb"/>
    </style:style>
    <style:style style:name="gr570" style:family="graphic" style:parent-style-name="standard">
      <style:graphic-properties draw:fill="solid" draw:fill-color="#ff5128" draw:textarea-horizontal-align="justify" draw:textarea-vertical-align="middle" draw:auto-grow-height="false" fo:min-height="0.245cm" fo:min-width="0.079cm" style:writing-mode="lr-tb" loext:decorative="false"/>
      <style:paragraph-properties style:writing-mode="lr-tb"/>
    </style:style>
    <style:style style:name="gr571" style:family="graphic" style:parent-style-name="objectwithoutfill">
      <style:graphic-properties draw:marker-end="Arrow" draw:marker-end-width="0.1cm" draw:fill="solid" draw:textarea-vertical-align="bottom" loext:decorative="false"/>
    </style:style>
    <style:style style:name="gr572" style:family="graphic" style:parent-style-name="standard">
      <style:graphic-properties draw:fill="solid" draw:fill-color="#f6f5f8" draw:textarea-horizontal-align="justify" draw:textarea-vertical-align="middle" draw:auto-grow-height="false" fo:min-height="0.287cm" fo:min-width="0.615cm" style:writing-mode="lr-tb" loext:decorative="false"/>
      <style:paragraph-properties style:writing-mode="lr-tb"/>
    </style:style>
    <style:style style:name="gr573" style:family="graphic" style:parent-style-name="Arrow_20_Line" style:list-style-name="L1">
      <style:graphic-properties draw:textarea-vertical-align="middle" draw:line-distance="0.14cm" loext:decorative="false"/>
      <style:paragraph-properties style:writing-mode="lr-tb"/>
    </style:style>
    <style:style style:name="gr574" style:family="graphic" style:parent-style-name="standard">
      <style:graphic-properties draw:stroke="none" draw:fill="solid" draw:fill-color="#222222" draw:textarea-horizontal-align="left" draw:textarea-vertical-align="middle" draw:auto-grow-width="true" fo:min-height="0.739cm" fo:min-width="2.67cm" fo:padding-top="0cm" fo:padding-bottom="0cm" fo:padding-left="0cm" fo:padding-right="0cm" draw:shadow="hidden" loext:decorative="false"/>
    </style:style>
    <style:style style:name="gr575" style:family="graphic" style:parent-style-name="standard">
      <style:graphic-properties draw:stroke="none" draw:fill="solid" draw:fill-color="#222222" draw:textarea-horizontal-align="left" draw:textarea-vertical-align="middle" draw:auto-grow-width="true" fo:min-height="0.606cm" fo:min-width="0.712cm" fo:padding-top="0cm" fo:padding-bottom="0cm" fo:padding-left="0cm" fo:padding-right="0cm" draw:shadow="hidden" loext:decorative="false"/>
    </style:style>
    <style:style style:name="gr576" style:family="graphic" style:parent-style-name="standard">
      <style:graphic-properties draw:stroke="solid" draw:stroke-dash="Dash_20_Dot_20_4" svg:stroke-width="0.106cm" svg:stroke-color="#333333" draw:stroke-linejoin="round" svg:stroke-linecap="round" draw:textarea-horizontal-align="center" draw:textarea-vertical-align="middle" fo:padding-top="0.178cm" fo:padding-bottom="0.178cm" fo:padding-left="0.303cm" fo:padding-right="0.303cm" loext:decorative="false"/>
    </style:style>
    <style:style style:name="gr577" style:family="graphic" style:parent-style-name="standard">
      <style:graphic-properties draw:stroke="dash" draw:stroke-dash="Dash_20_Dot_20_4" svg:stroke-width="0cm" svg:stroke-color="#333333" draw:stroke-linejoin="none" svg:stroke-linecap="round" draw:fill="solid" draw:fill-color="#333333" draw:textarea-horizontal-align="center" draw:textarea-vertical-align="middle" loext:decorative="false"/>
    </style:style>
    <style:style style:name="gr578" style:family="graphic" style:parent-style-name="standard">
      <style:graphic-properties draw:stroke="dash" draw:stroke-dash="Dash_20_Dot_20_4" svg:stroke-width="0cm" svg:stroke-color="#333333" draw:stroke-linejoin="none" svg:stroke-linecap="round" draw:fill="solid" draw:fill-color="#ffffff" draw:textarea-horizontal-align="center" draw:textarea-vertical-align="middle" loext:decorative="false"/>
    </style:style>
    <style:style style:name="gr579" style:family="graphic" style:parent-style-name="standard">
      <style:graphic-properties draw:stroke="solid" draw:stroke-dash="Dash_20_Dot_20_4" svg:stroke-width="0.106cm" svg:stroke-color="#333333" draw:stroke-linejoin="miter" svg:stroke-linecap="butt" draw:fill="none" draw:fill-color="#ffffff" draw:textarea-horizontal-align="center" draw:textarea-vertical-align="middle" fo:padding-top="0.178cm" fo:padding-bottom="0.178cm" fo:padding-left="0.303cm" fo:padding-right="0.303cm" loext:decorative="false"/>
    </style:style>
    <style:style style:name="gr580" style:family="graphic" style:parent-style-name="standard">
      <style:graphic-properties draw:stroke="none" draw:fill="solid" draw:fill-color="#222222" draw:textarea-horizontal-align="left" draw:textarea-vertical-align="middle" draw:auto-grow-width="true" fo:min-height="0.739cm" fo:min-width="0.395cm" fo:padding-top="0cm" fo:padding-bottom="0cm" fo:padding-left="0cm" fo:padding-right="0cm" draw:shadow="hidden" loext:decorative="false"/>
    </style:style>
    <style:style style:name="gr581" style:family="graphic" style:parent-style-name="standard">
      <style:graphic-properties draw:stroke="none" draw:fill="solid" draw:fill-color="#222222" draw:textarea-horizontal-align="left" draw:textarea-vertical-align="middle" draw:auto-grow-width="true" fo:min-height="0.739cm" fo:min-width="2.935cm" fo:padding-top="0cm" fo:padding-bottom="0cm" fo:padding-left="0cm" fo:padding-right="0cm" draw:shadow="hidden" loext:decorative="false"/>
    </style:style>
    <style:style style:name="gr582" style:family="graphic" style:parent-style-name="standard">
      <style:graphic-properties draw:stroke="none" draw:fill="solid" draw:fill-color="#222222" draw:textarea-horizontal-align="left" draw:textarea-vertical-align="middle" draw:auto-grow-width="true" fo:min-height="0.739cm" fo:min-width="1.48cm" fo:padding-top="0cm" fo:padding-bottom="0cm" fo:padding-left="0cm" fo:padding-right="0cm" draw:shadow="hidden" loext:decorative="false"/>
    </style:style>
    <style:style style:name="gr583" style:family="graphic" style:parent-style-name="standard">
      <style:graphic-properties draw:stroke="none" draw:fill="solid" draw:fill-color="#222222" draw:textarea-horizontal-align="left" draw:textarea-vertical-align="middle" draw:auto-grow-width="true" fo:min-height="0.606cm" fo:min-width="0.845cm" fo:padding-top="0cm" fo:padding-bottom="0cm" fo:padding-left="0cm" fo:padding-right="0cm" draw:shadow="hidden" loext:decorative="false"/>
    </style:style>
    <style:style style:name="gr584" style:family="graphic" style:parent-style-name="standard">
      <style:graphic-properties draw:stroke="dash" draw:stroke-dash="Dash_20_Dot_20_4" svg:stroke-width="0cm" svg:stroke-color="#333333" draw:stroke-linejoin="none" svg:stroke-linecap="round" draw:fill="solid" draw:fill-color="#cfe8fa" draw:textarea-horizontal-align="center" draw:textarea-vertical-align="middle" loext:decorative="false"/>
    </style:style>
    <style:style style:name="gr585" style:family="graphic" style:parent-style-name="standard">
      <style:graphic-properties draw:stroke="solid" draw:stroke-dash="Dash_20_Dot_20_4" svg:stroke-width="0.106cm" svg:stroke-color="#456a96" draw:stroke-linejoin="miter" svg:stroke-linecap="butt" draw:fill="none" draw:fill-color="#cfe8fa" draw:textarea-horizontal-align="center" draw:textarea-vertical-align="middle" fo:padding-top="0.178cm" fo:padding-bottom="0.178cm" fo:padding-left="0.303cm" fo:padding-right="0.303cm" loext:decorative="false"/>
    </style:style>
    <style:style style:name="gr586" style:family="graphic" style:parent-style-name="standard">
      <style:graphic-properties draw:stroke="none" draw:fill="solid" draw:fill-color="#222222" draw:textarea-horizontal-align="left" draw:textarea-vertical-align="middle" draw:auto-grow-width="true" fo:min-height="0.818cm" fo:min-width="3.199cm" fo:padding-top="0cm" fo:padding-bottom="0cm" fo:padding-left="0cm" fo:padding-right="0cm" draw:shadow="hidden" loext:decorative="false"/>
    </style:style>
    <style:style style:name="gr587" style:family="graphic" style:parent-style-name="standard">
      <style:graphic-properties draw:stroke="none" draw:fill="solid" draw:fill-color="#222222" draw:textarea-horizontal-align="left" draw:textarea-vertical-align="middle" draw:auto-grow-width="true" fo:min-height="0.739cm" fo:min-width="2.855cm" fo:padding-top="0cm" fo:padding-bottom="0cm" fo:padding-left="0cm" fo:padding-right="0cm" draw:shadow="hidden" loext:decorative="false"/>
    </style:style>
    <style:style style:name="gr588" style:family="graphic" style:parent-style-name="standard">
      <style:graphic-properties draw:stroke="none" draw:fill="solid" draw:fill-color="#222222" draw:textarea-horizontal-align="left" draw:textarea-vertical-align="middle" draw:auto-grow-width="true" fo:min-height="0.739cm" fo:min-width="1.982cm" fo:padding-top="0cm" fo:padding-bottom="0cm" fo:padding-left="0cm" fo:padding-right="0cm" draw:shadow="hidden" loext:decorative="false"/>
    </style:style>
    <style:style style:name="gr589" style:family="graphic" style:parent-style-name="standard">
      <style:graphic-properties draw:stroke="dash" draw:stroke-dash="Dash_20_Dot_20_4" svg:stroke-width="0cm" svg:stroke-color="#333333" draw:stroke-linejoin="none" svg:stroke-linecap="round" draw:fill="solid" draw:fill-color="#bfe3bd" draw:textarea-horizontal-align="center" draw:textarea-vertical-align="middle" loext:decorative="false"/>
    </style:style>
    <style:style style:name="gr590" style:family="graphic" style:parent-style-name="standard">
      <style:graphic-properties draw:stroke="solid" draw:stroke-dash="Dash_20_Dot_20_4" svg:stroke-width="0.106cm" svg:stroke-color="#4a7c4c" draw:stroke-linejoin="miter" svg:stroke-linecap="butt" draw:fill="none" draw:fill-color="#bfe3bd" draw:textarea-horizontal-align="center" draw:textarea-vertical-align="middle" fo:padding-top="0.178cm" fo:padding-bottom="0.178cm" fo:padding-left="0.303cm" fo:padding-right="0.303cm" loext:decorative="false"/>
    </style:style>
    <style:style style:name="gr591" style:family="graphic" style:parent-style-name="standard">
      <style:graphic-properties draw:stroke="none" draw:fill="solid" draw:fill-color="#222222" draw:textarea-horizontal-align="left" draw:textarea-vertical-align="middle" draw:auto-grow-width="true" fo:min-height="0.818cm" fo:min-width="2.75cm" fo:padding-top="0cm" fo:padding-bottom="0cm" fo:padding-left="0cm" fo:padding-right="0cm" draw:shadow="hidden" loext:decorative="false"/>
    </style:style>
    <style:style style:name="gr592" style:family="graphic" style:parent-style-name="standard">
      <style:graphic-properties draw:stroke="none" draw:fill="solid" draw:fill-color="#222222" draw:textarea-horizontal-align="left" draw:textarea-vertical-align="middle" draw:auto-grow-width="true" fo:min-height="0.739cm" fo:min-width="2.194cm" fo:padding-top="0cm" fo:padding-bottom="0cm" fo:padding-left="0cm" fo:padding-right="0cm" draw:shadow="hidden" loext:decorative="false"/>
    </style:style>
    <style:style style:name="gr593" style:family="graphic" style:parent-style-name="standard">
      <style:graphic-properties draw:stroke="none" draw:fill="solid" draw:fill-color="#222222" draw:textarea-horizontal-align="left" draw:textarea-vertical-align="middle" draw:auto-grow-width="true" fo:min-height="0.606cm" fo:min-width="0.315cm" fo:padding-top="0cm" fo:padding-bottom="0cm" fo:padding-left="0cm" fo:padding-right="0cm" draw:shadow="hidden" loext:decorative="false"/>
    </style:style>
    <style:style style:name="gr594" style:family="graphic" style:parent-style-name="standard">
      <style:graphic-properties draw:stroke="none" draw:fill="solid" draw:fill-color="#222222" draw:textarea-horizontal-align="left" draw:textarea-vertical-align="middle" draw:auto-grow-width="true" fo:min-height="0.448cm" fo:min-width="0.21cm" fo:padding-top="0cm" fo:padding-bottom="0cm" fo:padding-left="0cm" fo:padding-right="0cm" draw:shadow="hidden" loext:decorative="false"/>
    </style:style>
    <style:style style:name="gr595" style:family="graphic" style:parent-style-name="standard">
      <style:graphic-properties draw:stroke="none" draw:fill="solid" draw:fill-color="#222222" draw:textarea-horizontal-align="left" draw:textarea-vertical-align="middle" draw:auto-grow-width="true" fo:min-height="0.606cm" fo:min-width="0.527cm" fo:padding-top="0cm" fo:padding-bottom="0cm" fo:padding-left="0cm" fo:padding-right="0cm" draw:shadow="hidden" loext:decorative="false"/>
    </style:style>
    <style:style style:name="gr596" style:family="graphic" style:parent-style-name="standard">
      <style:graphic-properties draw:stroke="none" draw:fill="solid" draw:fill-color="#222222" draw:textarea-horizontal-align="left" draw:textarea-vertical-align="middle" draw:auto-grow-width="true" fo:min-height="0.739cm" fo:min-width="3.517cm" fo:padding-top="0cm" fo:padding-bottom="0cm" fo:padding-left="0cm" fo:padding-right="0cm" draw:shadow="hidden" loext:decorative="false"/>
    </style:style>
    <style:style style:name="gr597" style:family="graphic" style:parent-style-name="standard">
      <style:graphic-properties draw:stroke="solid" draw:stroke-dash="Dash_20_Dot_20_4" svg:stroke-width="0.132cm" svg:stroke-color="#d36b42" draw:stroke-linejoin="round" svg:stroke-linecap="round" draw:textarea-horizontal-align="center" draw:textarea-vertical-align="middle" fo:padding-top="0.191cm" fo:padding-bottom="0.191cm" fo:padding-left="0.316cm" fo:padding-right="0.316cm" loext:decorative="false"/>
    </style:style>
    <style:style style:name="gr598" style:family="graphic" style:parent-style-name="standard">
      <style:graphic-properties draw:stroke="dash" draw:stroke-dash="Dash_20_Dot_20_4" svg:stroke-width="0cm" svg:stroke-color="#d36b42" draw:stroke-linejoin="none" svg:stroke-linecap="round" draw:fill="solid" draw:fill-color="#d36b42" draw:textarea-horizontal-align="center" draw:textarea-vertical-align="middle" loext:decorative="false"/>
    </style:style>
    <style:style style:name="gr599" style:family="graphic" style:parent-style-name="standard">
      <style:graphic-properties draw:stroke="dash" draw:stroke-dash="Dash_20_Dot_20_4" svg:stroke-width="0cm" svg:stroke-color="#d36b42" draw:stroke-linejoin="none" svg:stroke-linecap="round" draw:fill="solid" draw:fill-color="#f7d682" draw:textarea-horizontal-align="center" draw:textarea-vertical-align="middle" loext:decorative="false"/>
    </style:style>
    <style:style style:name="gr600" style:family="graphic" style:parent-style-name="standard">
      <style:graphic-properties draw:stroke="solid" draw:stroke-dash="Dash_20_Dot_20_4" svg:stroke-width="0.106cm" svg:stroke-color="#a37325" draw:stroke-linejoin="miter" svg:stroke-linecap="butt" draw:fill="none" draw:fill-color="#f7d682" draw:textarea-horizontal-align="center" draw:textarea-vertical-align="middle" fo:padding-top="0.178cm" fo:padding-bottom="0.178cm" fo:padding-left="0.303cm" fo:padding-right="0.303cm" loext:decorative="false"/>
    </style:style>
    <style:style style:name="gr601" style:family="graphic" style:parent-style-name="standard">
      <style:graphic-properties draw:stroke="none" draw:fill="solid" draw:fill-color="#222222" draw:textarea-horizontal-align="left" draw:textarea-vertical-align="middle" draw:auto-grow-width="true" fo:min-height="0.606cm" fo:min-width="0.792cm" fo:padding-top="0cm" fo:padding-bottom="0cm" fo:padding-left="0cm" fo:padding-right="0cm" draw:shadow="hidden" loext:decorative="false"/>
    </style:style>
    <style:style style:name="gr602" style:family="graphic" style:parent-style-name="standard">
      <style:graphic-properties draw:stroke="dash" draw:stroke-dash="Dash_20_Dot_20_4" svg:stroke-width="0cm" svg:stroke-color="#333333" draw:stroke-linejoin="none" svg:stroke-linecap="round" draw:fill="solid" draw:fill-color="#d6cce4" draw:textarea-horizontal-align="center" draw:textarea-vertical-align="middle" loext:decorative="false"/>
    </style:style>
    <style:style style:name="gr603" style:family="graphic" style:parent-style-name="standard">
      <style:graphic-properties draw:stroke="solid" draw:stroke-dash="Dash_20_Dot_20_4" svg:stroke-width="0.106cm" svg:stroke-color="#536b9d" draw:stroke-linejoin="miter" svg:stroke-linecap="butt" draw:fill="none" draw:fill-color="#d6cce4" draw:textarea-horizontal-align="center" draw:textarea-vertical-align="middle" fo:padding-top="0.178cm" fo:padding-bottom="0.178cm" fo:padding-left="0.303cm" fo:padding-right="0.303cm" loext:decorative="false"/>
    </style:style>
    <style:style style:name="gr604" style:family="graphic" style:parent-style-name="standard">
      <style:graphic-properties draw:stroke="none" draw:fill="solid" draw:fill-color="#222222" draw:textarea-horizontal-align="left" draw:textarea-vertical-align="middle" draw:auto-grow-width="true" fo:min-height="0.818cm" fo:min-width="2.353cm" fo:padding-top="0cm" fo:padding-bottom="0cm" fo:padding-left="0cm" fo:padding-right="0cm" draw:shadow="hidden" loext:decorative="false"/>
    </style:style>
    <style:style style:name="gr605" style:family="graphic" style:parent-style-name="standard">
      <style:graphic-properties draw:stroke="none" draw:fill="solid" draw:fill-color="#222222" draw:textarea-horizontal-align="left" draw:textarea-vertical-align="middle" draw:auto-grow-width="true" fo:min-height="0.739cm" fo:min-width="5.104cm" fo:padding-top="0cm" fo:padding-bottom="0cm" fo:padding-left="0cm" fo:padding-right="0cm" draw:shadow="hidden" loext:decorative="false"/>
    </style:style>
    <style:style style:name="gr606" style:family="graphic" style:parent-style-name="standard">
      <style:graphic-properties draw:stroke="none" draw:fill="solid" draw:fill-color="#222222" draw:textarea-horizontal-align="left" draw:textarea-vertical-align="middle" draw:auto-grow-width="true" fo:min-height="0.606cm" fo:min-width="0.289cm" fo:padding-top="0cm" fo:padding-bottom="0cm" fo:padding-left="0cm" fo:padding-right="0cm" draw:shadow="hidden" loext:decorative="false"/>
    </style:style>
    <style:style style:name="gr607" style:family="graphic" style:parent-style-name="standard">
      <style:graphic-properties draw:stroke="none" draw:fill="solid" draw:fill-color="#222222" draw:textarea-horizontal-align="left" draw:textarea-vertical-align="middle" draw:auto-grow-width="true" fo:min-height="0.448cm" fo:min-width="0.315cm" fo:padding-top="0cm" fo:padding-bottom="0cm" fo:padding-left="0cm" fo:padding-right="0cm" draw:shadow="hidden" loext:decorative="false"/>
    </style:style>
    <style:style style:name="gr608" style:family="graphic" style:parent-style-name="standard">
      <style:graphic-properties draw:stroke="none" svg:stroke-color="#000000" draw:fill="none" draw:fill-color="#ffffff" draw:textarea-horizontal-align="left" draw:auto-grow-height="true" draw:auto-grow-width="true" fo:min-height="0.712cm" fo:min-width="1.696cm" loext:decorative="false"/>
      <style:paragraph-properties style:writing-mode="lr-tb"/>
    </style:style>
    <style:style style:name="gr609" style:family="graphic" style:parent-style-name="standard">
      <style:graphic-properties draw:fill="none" draw:textarea-vertical-align="middle" draw:auto-grow-height="false" fo:min-height="1.481cm" fo:min-width="0cm" fo:wrap-option="wrap" loext:decorative="false"/>
    </style:style>
    <style:style style:name="gr610" style:family="graphic" style:parent-style-name="standard">
      <style:graphic-properties draw:stroke="none" svg:stroke-color="#000000" draw:fill="none" draw:fill-color="#ffffff" draw:textarea-horizontal-align="center" draw:auto-grow-height="true" draw:auto-grow-width="true" fo:min-height="2.646cm" fo:min-width="4.144cm" loext:decorative="false"/>
      <style:paragraph-properties style:writing-mode="lr-tb"/>
    </style:style>
    <style:style style:name="gr611" style:family="graphic" style:parent-style-name="standard">
      <style:graphic-properties draw:fill="none" draw:textarea-vertical-align="middle" draw:auto-grow-height="false" fo:min-height="1.095cm" fo:min-width="0cm" fo:wrap-option="wrap" loext:decorative="false"/>
    </style:style>
    <style:style style:name="gr612" style:family="graphic" style:parent-style-name="objectwithoutfill">
      <style:graphic-properties draw:marker-end="Arrowheads_20_399" draw:marker-end-width="0.1cm" draw:fill="solid" draw:textarea-vertical-align="middle" loext:decorative="false"/>
    </style:style>
    <style:style style:name="gr613" style:family="graphic" style:parent-style-name="objectwithoutfill">
      <style:graphic-properties draw:marker-end="Arrowheads_20_400" draw:marker-end-width="0.1cm" draw:fill="solid" draw:textarea-vertical-align="middle" loext:decorative="false"/>
    </style:style>
    <style:style style:name="gr614" style:family="graphic" style:parent-style-name="standard">
      <style:graphic-properties draw:stroke="none" svg:stroke-color="#000000" draw:fill="none" draw:fill-color="#ffffff" draw:textarea-horizontal-align="left" draw:auto-grow-height="true" draw:auto-grow-width="true" fo:min-height="0.949cm" fo:min-width="4.369cm" loext:decorative="false"/>
      <style:paragraph-properties style:writing-mode="lr-tb"/>
    </style:style>
    <style:style style:name="gr615"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877cm" fo:min-width="2.033cm" fo:padding-top="0.55cm" fo:padding-bottom="0.25cm" fo:padding-left="0.27cm" fo:padding-right="0.27cm" style:writing-mode="lr-tb" loext:decorative="false"/>
      <style:paragraph-properties style:writing-mode="lr-tb"/>
    </style:style>
    <style:style style:name="gr616" style:family="graphic" style:parent-style-name="standard">
      <style:graphic-properties draw:textarea-horizontal-align="justify" draw:textarea-vertical-align="middle" draw:auto-grow-height="false" fo:min-height="0.436cm" fo:min-width="1.392cm" style:writing-mode="lr-tb" loext:decorative="false"/>
      <style:paragraph-properties style:writing-mode="lr-tb"/>
    </style:style>
    <style:style style:name="gr617" style:family="graphic" style:parent-style-name="standard">
      <style:graphic-properties svg:stroke-width="0.05cm" svg:stroke-color="#aaafc9" draw:marker-start-width="0.28cm" draw:marker-end-width="0.28cm" draw:fill="solid" draw:fill-color="#accda1" loext:fill-use-slide-background="false" draw:opacity="50%" draw:textarea-vertical-align="middle" fo:padding-top="0.15cm" fo:padding-bottom="0.15cm" fo:padding-left="0.275cm" fo:padding-right="0.275cm" draw:shadow-opacity="50%" loext:decorative="false"/>
    </style:style>
    <style:style style:name="gr618" style:family="graphic" style:parent-style-name="standard">
      <style:graphic-properties svg:stroke-width="0.05cm" svg:stroke-color="#aaafc9" draw:marker-start-width="0.28cm" draw:marker-end-width="0.28cm" draw:fill="solid" draw:fill-color="#b4d2ea" loext:fill-use-slide-background="false" draw:opacity="50%" draw:textarea-vertical-align="middle" fo:padding-top="0.15cm" fo:padding-bottom="0.15cm" fo:padding-left="0.275cm" fo:padding-right="0.275cm" draw:shadow-opacity="50%" loext:decorative="false"/>
    </style:style>
    <style:style style:name="gr619" style:family="graphic" style:parent-style-name="standard">
      <style:graphic-properties draw:stroke="none" svg:stroke-color="#000000" draw:fill="none" draw:fill-color="#ffffff" draw:textarea-horizontal-align="center" draw:auto-grow-height="true" draw:auto-grow-width="true" fo:min-height="1.575cm" fo:min-width="8.291cm" loext:decorative="false"/>
      <style:paragraph-properties style:writing-mode="lr-tb"/>
    </style:style>
    <style:style style:name="gr620" style:family="graphic" style:parent-style-name="objectwithoutfill">
      <style:graphic-properties draw:marker-start="Arrow" draw:marker-start-width="0.15cm" draw:marker-end="Arrow" draw:marker-end-width="0.15cm" draw:fill="solid" draw:textarea-vertical-align="middle" loext:decorative="false"/>
    </style:style>
    <style:style style:name="gr621" style:family="graphic" style:parent-style-name="objectwithoutfill">
      <style:graphic-properties draw:marker-start="" draw:marker-start-width="0.15cm" draw:marker-end="Arrow" draw:marker-end-width="0.15cm" draw:fill="solid" draw:textarea-vertical-align="middle" loext:decorative="false"/>
    </style:style>
    <style:style style:name="gr622" style:family="graphic" style:parent-style-name="standard">
      <style:graphic-properties draw:stroke="none" svg:stroke-color="#000000" draw:fill="none" draw:fill-color="#ffffff" draw:textarea-horizontal-align="left" draw:auto-grow-height="true" draw:auto-grow-width="true" fo:min-height="0.395cm" fo:min-width="3.537cm" loext:decorative="false"/>
      <style:paragraph-properties style:writing-mode="lr-tb"/>
    </style:style>
    <style:style style:name="gr623" style:family="graphic" style:parent-style-name="standard">
      <style:graphic-properties draw:stroke="none" svg:stroke-color="#000000" draw:fill="none" draw:fill-color="#ffffff" draw:textarea-horizontal-align="left" draw:auto-grow-height="true" draw:auto-grow-width="true" fo:min-height="0.395cm" fo:min-width="0.764cm" loext:decorative="false"/>
      <style:paragraph-properties style:writing-mode="lr-tb"/>
    </style:style>
    <style:style style:name="gr624" style:family="graphic" style:parent-style-name="standard">
      <style:graphic-properties draw:stroke="none" svg:stroke-color="#000000" draw:fill="none" draw:fill-color="#ffffff" draw:textarea-horizontal-align="left" draw:auto-grow-height="true" draw:auto-grow-width="true" fo:min-height="0.395cm" fo:min-width="0.979cm" loext:decorative="false"/>
      <style:paragraph-properties style:writing-mode="lr-tb"/>
    </style:style>
    <style:style style:name="gr625"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073cm" fo:min-width="3.09cm" fo:padding-top="0.65cm" fo:padding-bottom="0.25cm" fo:padding-left="0.27cm" fo:padding-right="0.27cm" style:writing-mode="lr-tb" loext:decorative="false"/>
      <style:paragraph-properties style:writing-mode="lr-tb"/>
    </style:style>
    <style:style style:name="gr626" style:family="graphic" style:parent-style-name="standard">
      <style:graphic-properties draw:stroke="none" svg:stroke-color="#000000" draw:fill="none" draw:fill-color="#ffffff" draw:textarea-horizontal-align="center" draw:auto-grow-height="true" draw:auto-grow-width="true" fo:min-height="0.637cm" fo:min-width="1.169cm" loext:decorative="false"/>
      <style:paragraph-properties style:writing-mode="lr-tb"/>
    </style:style>
    <style:style style:name="gr627" style:family="graphic" style:parent-style-name="standard">
      <style:graphic-properties draw:stroke="none" svg:stroke-color="#000000" draw:fill="none" draw:fill-color="#ffffff" draw:textarea-horizontal-align="left" draw:auto-grow-height="true" draw:auto-grow-width="false" fo:min-height="0.789cm" fo:min-width="0cm" loext:decorative="false"/>
      <style:paragraph-properties style:writing-mode="lr-tb"/>
    </style:style>
    <style:style style:name="gr628" style:family="graphic" style:parent-style-name="standard">
      <style:graphic-properties draw:stroke="none" svg:stroke-color="#000000" draw:fill="none" draw:fill-color="#ffffff" draw:textarea-horizontal-align="left" draw:auto-grow-height="true" draw:auto-grow-width="false" fo:min-height="0.395cm" fo:min-width="0cm" loext:decorative="false"/>
      <style:paragraph-properties style:writing-mode="lr-tb"/>
    </style:style>
    <style:style style:name="gr629" style:family="graphic" style:parent-style-name="standard">
      <style:graphic-properties draw:stroke="none" svg:stroke-color="#000000" draw:fill="none" draw:fill-color="#ffffff" draw:textarea-horizontal-align="left" draw:auto-grow-height="true" draw:auto-grow-width="true" fo:min-height="0.319cm" fo:min-width="1.232cm" loext:decorative="false"/>
      <style:paragraph-properties style:writing-mode="lr-tb"/>
    </style:style>
    <style:style style:name="gr630" style:family="graphic" style:parent-style-name="standard">
      <style:graphic-properties draw:stroke="none" svg:stroke-color="#000000" draw:fill="none" draw:fill-color="#ffffff" draw:textarea-horizontal-align="left" draw:auto-grow-height="true" draw:auto-grow-width="true" fo:min-height="0.661cm" fo:min-width="2.296cm" loext:decorative="false"/>
      <style:paragraph-properties style:writing-mode="lr-tb"/>
    </style:style>
    <style:style style:name="gr631"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paragraph-properties style:writing-mode="lr-tb"/>
    </style:style>
    <style:style style:name="gr632"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bottom" fo:padding-top="0.145cm" fo:padding-bottom="0.145cm" fo:padding-left="0.27cm" fo:padding-right="0.27cm" loext:decorative="false"/>
      <style:paragraph-properties style:writing-mode="lr-tb"/>
    </style:style>
    <style:style style:name="gr633" style:family="graphic" style:parent-style-name="objectwithoutfill">
      <style:graphic-properties draw:marker-end="Arrowheads_20_309" draw:marker-end-width="0.3cm" draw:fill="solid" draw:textarea-vertical-align="middle" loext:decorative="false"/>
    </style:style>
    <style:style style:name="gr634" style:family="graphic" style:parent-style-name="objectwithoutfill">
      <style:graphic-properties draw:marker-end="Arrowheads_20_310" draw:marker-end-width="0.3cm" draw:fill="solid" draw:textarea-vertical-align="middle" loext:decorative="false"/>
    </style:style>
    <style:style style:name="gr635" style:family="graphic" style:parent-style-name="objectwithoutfill">
      <style:graphic-properties draw:marker-end="Arrowheads_20_311" draw:marker-end-width="0.3cm" draw:fill="solid" draw:textarea-vertical-align="middle" loext:decorative="false"/>
    </style:style>
    <style:style style:name="gr636" style:family="graphic" style:parent-style-name="objectwithoutfill">
      <style:graphic-properties draw:marker-end="Arrowheads_20_312" draw:marker-end-width="0.3cm" draw:fill="solid" draw:textarea-vertical-align="middle" loext:decorative="false"/>
    </style:style>
    <style:style style:name="gr637" style:family="graphic" style:parent-style-name="objectwithoutfill">
      <style:graphic-properties draw:marker-end="Arrowheads_20_313" draw:marker-end-width="0.3cm" draw:fill="solid" draw:textarea-vertical-align="middle" loext:decorative="false"/>
    </style:style>
    <style:style style:name="gr638" style:family="graphic" style:parent-style-name="standard">
      <style:graphic-properties draw:stroke="solid" svg:stroke-color="#b2b2b2" draw:fill="solid" draw:fill-color="#ffffff" draw:textarea-horizontal-align="justify" draw:textarea-vertical-align="middle" draw:auto-grow-height="false" fo:min-height="2.218cm" fo:min-width="4.061cm" style:writing-mode="lr-tb" loext:decorative="false"/>
      <style:paragraph-properties style:writing-mode="lr-tb"/>
    </style:style>
    <style:style style:name="gr639" style:family="graphic" style:parent-style-name="objectwithoutfill">
      <style:graphic-properties draw:marker-end="Arrowheads_20_331" draw:marker-end-width="0.3cm" draw:fill="solid" draw:textarea-vertical-align="middle" loext:decorative="false"/>
      <style:paragraph-properties style:writing-mode="lr-tb"/>
    </style:style>
    <style:style style:name="gr640" style:family="graphic" style:parent-style-name="objectwithoutfill">
      <style:graphic-properties draw:stroke="dash" draw:stroke-dash="Long_20_Dash" svg:stroke-width="0.05cm" svg:stroke-color="#6390c2" draw:marker-start-width="0.28cm" draw:marker-end="Arrowheads_20_388" draw:marker-end-width="0.38cm" draw:fill="solid" draw:textarea-vertical-align="middle" fo:padding-top="0.125cm" fo:padding-bottom="0.125cm" fo:padding-left="0.125cm" fo:padding-right="0.125cm" loext:decorative="false"/>
    </style:style>
    <style:style style:name="gr641"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42" style:family="graphic" style:parent-style-name="standard">
      <style:graphic-properties draw:stroke="solid" draw:stroke-dash="Dash_20_Dot_20_4" svg:stroke-width="0.095cm" svg:stroke-color="#263238" draw:stroke-linejoin="round" svg:stroke-linecap="round" draw:textarea-horizontal-align="center" draw:textarea-vertical-align="middle" fo:padding-top="0.172cm" fo:padding-bottom="0.172cm" fo:padding-left="0.297cm" fo:padding-right="0.297cm" loext:decorative="false"/>
    </style:style>
    <style:style style:name="gr643" style:family="graphic" style:parent-style-name="standard">
      <style:graphic-properties draw:stroke="dash" draw:stroke-dash="Dash_20_Dot_20_4" svg:stroke-width="0cm" svg:stroke-color="#263238" draw:stroke-linejoin="none" svg:stroke-linecap="round" draw:fill="solid" draw:fill-color="#f4b183" draw:textarea-horizontal-align="center" draw:textarea-vertical-align="middle" loext:decorative="false"/>
    </style:style>
    <style:style style:name="gr644" style:family="graphic" style:parent-style-name="standard">
      <style:graphic-properties draw:stroke="solid" draw:stroke-dash="Dash_20_Dot_20_4" svg:stroke-width="0.095cm" svg:stroke-color="#263238" draw:stroke-linejoin="miter" svg:stroke-linecap="butt" draw:fill="none" draw:fill-color="#f4b183" draw:textarea-horizontal-align="center" draw:textarea-vertical-align="middle" fo:padding-top="0.172cm" fo:padding-bottom="0.172cm" fo:padding-left="0.297cm" fo:padding-right="0.297cm" loext:decorative="false"/>
    </style:style>
    <style:style style:name="gr645" style:family="graphic" style:parent-style-name="standard">
      <style:graphic-properties draw:stroke="dash" draw:stroke-dash="Dash_20_Dot_20_4" svg:stroke-width="0cm" svg:stroke-color="#263238" draw:stroke-linejoin="none" svg:stroke-linecap="butt" draw:fill="solid" draw:fill-color="#c96b5f" draw:textarea-horizontal-align="center" draw:textarea-vertical-align="middle" loext:decorative="false"/>
    </style:style>
    <style:style style:name="gr646" style:family="graphic" style:parent-style-name="standard">
      <style:graphic-properties draw:stroke="solid" draw:stroke-dash="Dash_20_Dot_20_4" svg:stroke-width="0.076cm" svg:stroke-color="#263238" draw:stroke-linejoin="miter" svg:stroke-linecap="butt" draw:fill="none" draw:fill-color="#c96b5f" draw:textarea-horizontal-align="center" draw:textarea-vertical-align="middle" fo:padding-top="0.163cm" fo:padding-bottom="0.163cm" fo:padding-left="0.288cm" fo:padding-right="0.288cm" loext:decorative="false"/>
    </style:style>
    <style:style style:name="gr647" style:family="graphic" style:parent-style-name="standard">
      <style:graphic-properties draw:stroke="dash" draw:stroke-dash="Dash_20_Dot_20_4" svg:stroke-width="0cm" svg:stroke-color="#263238" draw:stroke-linejoin="none" svg:stroke-linecap="butt" draw:fill="solid" draw:fill-color="#7f3f3f" draw:textarea-horizontal-align="center" draw:textarea-vertical-align="middle" loext:decorative="false"/>
    </style:style>
    <style:style style:name="gr648" style:family="graphic" style:parent-style-name="standard">
      <style:graphic-properties draw:stroke="dash" draw:stroke-dash="Dash_20_Dot_20_4" svg:stroke-width="0cm" svg:stroke-color="#263238" draw:stroke-linejoin="none" svg:stroke-linecap="round" draw:fill="solid" draw:fill-color="#a8dadc" draw:textarea-horizontal-align="center" draw:textarea-vertical-align="middle" loext:decorative="false"/>
    </style:style>
    <style:style style:name="gr649" style:family="graphic" style:parent-style-name="standard">
      <style:graphic-properties draw:stroke="solid" draw:stroke-dash="Dash_20_Dot_20_4" svg:stroke-width="0.076cm" svg:stroke-color="#263238" draw:stroke-linejoin="miter" svg:stroke-linecap="butt" draw:fill="none" draw:fill-color="#a8dadc" draw:textarea-horizontal-align="center" draw:textarea-vertical-align="middle" fo:padding-top="0.163cm" fo:padding-bottom="0.163cm" fo:padding-left="0.288cm" fo:padding-right="0.288cm" loext:decorative="false"/>
    </style:style>
    <style:style style:name="gr650" style:family="graphic" style:parent-style-name="standard">
      <style:graphic-properties draw:stroke="dash" draw:stroke-dash="Dash_20_Dot_20_4" svg:stroke-width="0cm" svg:stroke-color="#263238" draw:stroke-linejoin="none" svg:stroke-linecap="butt" draw:fill="solid" draw:fill-color="#a8dadc" draw:textarea-horizontal-align="center" draw:textarea-vertical-align="middle" loext:decorative="false"/>
    </style:style>
    <style:style style:name="gr651" style:family="graphic" style:parent-style-name="standard">
      <style:graphic-properties draw:stroke="solid" draw:stroke-dash="Dash_20_Dot_20_4" svg:stroke-width="0.057cm" svg:stroke-color="#263238" draw:stroke-linejoin="round" svg:stroke-linecap="round" draw:textarea-horizontal-align="center" draw:textarea-vertical-align="middle" fo:padding-top="0.153cm" fo:padding-bottom="0.153cm" fo:padding-left="0.278cm" fo:padding-right="0.278cm" loext:decorative="false"/>
    </style:style>
    <style:style style:name="gr652" style:family="graphic" style:parent-style-name="standard">
      <style:graphic-properties draw:stroke="dash" draw:stroke-dash="Dash_20_Dot_20_4" svg:stroke-width="0cm" svg:stroke-color="#263238" draw:stroke-linejoin="none" svg:stroke-linecap="round" draw:fill="solid" draw:fill-color="#263238" draw:textarea-horizontal-align="center" draw:textarea-vertical-align="middle" loext:decorative="false"/>
    </style:style>
    <style:style style:name="gr653" style:family="graphic" style:parent-style-name="standard">
      <style:graphic-properties draw:stroke="none" draw:fill="none" draw:fill-color="#ffffff" draw:textarea-horizontal-align="left" draw:auto-grow-width="true" fo:min-height="0.484cm" fo:min-width="1.85cm" fo:padding-top="0cm" fo:padding-bottom="0cm" fo:padding-left="0cm" fo:padding-right="0cm" loext:decorative="false"/>
      <style:paragraph-properties style:writing-mode="lr-tb"/>
    </style:style>
    <style:style style:name="gr654" style:family="graphic" style:parent-style-name="standard">
      <style:graphic-properties draw:stroke="none" draw:fill="none" draw:fill-color="#ffffff" draw:textarea-horizontal-align="left" draw:auto-grow-width="true" fo:min-height="0.484cm" fo:min-width="3.194cm" fo:padding-top="0cm" fo:padding-bottom="0cm" fo:padding-left="0cm" fo:padding-right="0cm" loext:decorative="false"/>
      <style:paragraph-properties style:writing-mode="lr-tb"/>
    </style:style>
    <style:style style:name="gr655" style:family="graphic" style:parent-style-name="standard">
      <style:graphic-properties draw:stroke="none" draw:fill="none" draw:fill-color="#ffffff" draw:textarea-horizontal-align="left" draw:auto-grow-width="true" fo:min-height="0.389cm" fo:min-width="1.287cm" fo:padding-top="0cm" fo:padding-bottom="0cm" fo:padding-left="0cm" fo:padding-right="0cm" loext:decorative="false"/>
      <style:paragraph-properties style:writing-mode="lr-tb"/>
    </style:style>
    <style:style style:name="gr656" style:family="graphic" style:parent-style-name="standard">
      <style:graphic-properties draw:stroke="none" draw:fill="none" draw:fill-color="#ffffff" draw:textarea-horizontal-align="left" draw:auto-grow-width="true" fo:min-height="0.484cm" fo:min-width="2.306cm" fo:padding-top="0cm" fo:padding-bottom="0cm" fo:padding-left="0cm" fo:padding-right="0cm" loext:decorative="false"/>
      <style:paragraph-properties style:writing-mode="lr-tb"/>
    </style:style>
    <style:style style:name="gr657" style:family="graphic" style:parent-style-name="standard">
      <style:graphic-properties draw:stroke="none" draw:fill="none" draw:fill-color="#ffffff" draw:textarea-horizontal-align="left" draw:auto-grow-width="true" fo:min-height="0.484cm" fo:min-width="2.666cm" fo:padding-top="0cm" fo:padding-bottom="0cm" fo:padding-left="0cm" fo:padding-right="0cm" loext:decorative="false"/>
      <style:paragraph-properties style:writing-mode="lr-tb"/>
    </style:style>
    <style:style style:name="gr658" style:family="graphic" style:parent-style-name="standard">
      <style:graphic-properties draw:stroke="none" draw:fill="none" draw:fill-color="#ffffff" draw:textarea-horizontal-align="left" draw:auto-grow-width="true" fo:min-height="0.389cm" fo:min-width="2.477cm" fo:padding-top="0cm" fo:padding-bottom="0cm" fo:padding-left="0cm" fo:padding-right="0cm" loext:decorative="false"/>
      <style:paragraph-properties style:writing-mode="lr-tb"/>
    </style:style>
    <style:style style:name="gr659" style:family="graphic" style:parent-style-name="standard">
      <style:graphic-properties draw:stroke="none" draw:fill="none" draw:fill-color="#ffffff" draw:textarea-horizontal-align="left" draw:auto-grow-width="true" fo:min-height="0.484cm" fo:min-width="2.858cm" fo:padding-top="0cm" fo:padding-bottom="0cm" fo:padding-left="0cm" fo:padding-right="0cm" loext:decorative="false"/>
      <style:paragraph-properties style:writing-mode="lr-tb"/>
    </style:style>
    <style:style style:name="gr660" style:family="graphic" style:parent-style-name="standard">
      <style:graphic-properties draw:stroke="none" draw:fill="none" draw:fill-color="#ffffff" draw:textarea-horizontal-align="left" draw:auto-grow-width="true" fo:min-height="0.389cm" fo:min-width="4.155cm" fo:padding-top="0cm" fo:padding-bottom="0cm" fo:padding-left="0cm" fo:padding-right="0cm" loext:decorative="false"/>
      <style:paragraph-properties style:writing-mode="lr-tb"/>
    </style:style>
    <style:style style:name="gr661" style:family="graphic" style:parent-style-name="standard" style:list-style-name="L1">
      <style:graphic-properties draw:stroke="none" draw:fill="solid" draw:fill-color="#ff5128" draw:textarea-vertical-align="middle" draw:auto-grow-height="false" fo:min-height="3.044cm" fo:min-width="3.452cm" fo:wrap-option="wrap" style:writing-mode="lr-tb" loext:decorative="false"/>
      <style:paragraph-properties style:writing-mode="lr-tb"/>
    </style:style>
    <style:style style:name="gr662" style:family="graphic" style:parent-style-name="standard">
      <style:graphic-properties svg:stroke-color="#e8995a" draw:fill="solid" draw:fill-color="#ffe0d9" draw:textarea-horizontal-align="justify" draw:textarea-vertical-align="middle" draw:auto-grow-height="false" fo:min-height="0.636cm" fo:min-width="1.343cm" style:writing-mode="lr-tb" loext:decorative="false"/>
      <style:paragraph-properties style:writing-mode="lr-tb"/>
    </style:style>
    <style:style style:name="gr663" style:family="graphic" style:parent-style-name="standard">
      <style:graphic-properties draw:stroke="none" svg:stroke-color="#000000" draw:fill="none" draw:fill-color="#ffffff" draw:textarea-horizontal-align="left" draw:auto-grow-height="true" draw:auto-grow-width="true" fo:min-height="0.949cm" fo:min-width="3.155cm" loext:decorative="false"/>
      <style:paragraph-properties style:writing-mode="lr-tb"/>
    </style:style>
    <style:style style:name="gr664" style:family="graphic" style:parent-style-name="standard">
      <style:graphic-properties draw:fill="solid" draw:fill-color="#f45f74" draw:textarea-horizontal-align="justify" draw:textarea-vertical-align="middle" draw:auto-grow-height="false" fo:min-height="1.333cm" fo:min-width="2.273cm" style:writing-mode="lr-tb" loext:decorative="false"/>
      <style:paragraph-properties style:writing-mode="lr-tb"/>
    </style:style>
    <style:style style:name="gr665" style:family="graphic" style:parent-style-name="standard">
      <style:graphic-properties draw:stroke="solid" svg:stroke-color="#b2b2b2" draw:fill="solid" draw:fill-color="#ffffff" draw:textarea-horizontal-align="justify" draw:textarea-vertical-align="middle" draw:auto-grow-height="false" fo:min-height="1.258cm" fo:min-width="1.976cm" style:writing-mode="lr-tb" loext:decorative="false"/>
      <style:paragraph-properties style:writing-mode="lr-tb"/>
    </style:style>
    <style:style style:name="gr666" style:family="graphic" style:parent-style-name="standard" style:list-style-name="L1">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667" style:family="graphic" style:parent-style-name="objectwithoutfill">
      <style:graphic-properties draw:stroke="dash" draw:stroke-dash="Long_20_Dash" svg:stroke-width="0.05cm" svg:stroke-color="#d86a50" draw:marker-start="Arrowheads_20_389" draw:marker-start-width="0.28cm" draw:marker-end="" draw:marker-end-width="0.22cm" draw:fill="solid" draw:textarea-vertical-align="middle" fo:padding-top="0.125cm" fo:padding-bottom="0.125cm" fo:padding-left="0.125cm" fo:padding-right="0.125cm" loext:decorative="false"/>
    </style:style>
    <style:style style:name="gr668" style:family="graphic" style:parent-style-name="objectwithoutfill">
      <style:graphic-properties draw:stroke="dash" draw:stroke-dash="Long_20_Dash" svg:stroke-width="0.05cm" svg:stroke-color="#d86a50" draw:marker-start="Arrowheads_20_391" draw:marker-start-width="0.28cm" draw:marker-end="" draw:marker-end-width="0.22cm" draw:fill="solid" draw:textarea-horizontal-align="center" draw:textarea-vertical-align="middle" fo:padding-top="0.125cm" fo:padding-bottom="0.125cm" fo:padding-left="0.125cm" fo:padding-right="0.125cm" loext:decorative="false"/>
    </style:style>
    <style:style style:name="gr669" style:family="graphic" style:parent-style-name="objectwithoutfill">
      <style:graphic-properties draw:stroke="dash" draw:stroke-dash="Long_20_Dash" svg:stroke-width="0.05cm" svg:stroke-color="#d86a50" draw:marker-start="Arrowheads_20_392" draw:marker-start-width="0.28cm" draw:marker-end="" draw:marker-end-width="0.22cm" draw:fill="solid" draw:textarea-horizontal-align="center" draw:textarea-vertical-align="middle" fo:padding-top="0.125cm" fo:padding-bottom="0.125cm" fo:padding-left="0.125cm" fo:padding-right="0.125cm" loext:decorative="false"/>
    </style:style>
    <style:style style:name="gr670" style:family="graphic" style:parent-style-name="standard" style:list-style-name="L1">
      <style:graphic-properties draw:stroke="none" draw:fill="solid" draw:fill-color="#ff5128" draw:textarea-vertical-align="middle" draw:auto-grow-height="false" fo:min-height="1.735cm" fo:min-width="1.881cm" fo:wrap-option="wrap" style:writing-mode="lr-tb" loext:decorative="false"/>
      <style:paragraph-properties style:writing-mode="lr-tb"/>
    </style:style>
    <style:style style:name="gr671" style:family="graphic" style:parent-style-name="objectwithoutfill" style:list-style-name="L1">
      <style:graphic-properties draw:stroke="dash" draw:stroke-dash="Long_20_Dash" svg:stroke-width="0.1cm" svg:stroke-color="#d86a50" draw:marker-start-width="0.35cm" draw:marker-end-width="0.35cm" svg:stroke-opacity="50%" draw:fill="solid" draw:fill-color="#f2ffd9" draw:opacity="75%" draw:textarea-horizontal-align="justify" draw:textarea-vertical-align="middle" fo:padding-top="0.15cm" fo:padding-bottom="0.15cm" fo:padding-left="0.15cm" fo:padding-right="0.15cm" draw:shadow-opacity="75%" loext:decorative="false"/>
    </style:style>
    <style:style style:name="gr672"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73"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74"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777cm" fo:min-width="2.033cm" fo:padding-top="0.55cm" fo:padding-bottom="0.25cm" fo:padding-left="0.27cm" fo:padding-right="0.27cm" style:writing-mode="lr-tb" loext:decorative="false"/>
      <style:paragraph-properties style:writing-mode="lr-tb"/>
    </style:style>
    <style:style style:name="gr675" style:family="graphic" style:parent-style-name="standard">
      <style:graphic-properties draw:textarea-horizontal-align="justify" draw:textarea-vertical-align="middle" draw:auto-grow-height="false" fo:min-height="0.775cm" fo:min-width="1.392cm" style:writing-mode="lr-tb" loext:decorative="false"/>
      <style:paragraph-properties style:writing-mode="lr-tb"/>
    </style:style>
    <style:style style:name="gr676"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317cm" fo:min-width="3.09cm" fo:padding-top="0.65cm" fo:padding-bottom="0.25cm" fo:padding-left="0.27cm" fo:padding-right="0.27cm" style:writing-mode="lr-tb" loext:decorative="false"/>
      <style:paragraph-properties style:writing-mode="lr-tb"/>
    </style:style>
    <style:style style:name="gr677" style:family="graphic" style:parent-style-name="standard">
      <style:graphic-properties draw:stroke="none" svg:stroke-color="#000000" draw:fill="none" draw:fill-color="#ffffff" draw:textarea-horizontal-align="left" draw:auto-grow-height="true" draw:auto-grow-width="false" fo:min-height="0.405cm" fo:min-width="0cm" loext:decorative="false"/>
      <style:paragraph-properties style:writing-mode="lr-tb"/>
    </style:style>
    <style:style style:name="gr67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566cm" fo:min-width="1.606cm" fo:padding-top="0.55cm" fo:padding-bottom="0.25cm" fo:padding-left="0.27cm" fo:padding-right="0.27cm" style:writing-mode="lr-tb" loext:decorative="false"/>
      <style:paragraph-properties style:writing-mode="lr-tb"/>
    </style:style>
    <style:style style:name="gr679" style:family="graphic" style:parent-style-name="standard">
      <style:graphic-properties draw:stroke="none" svg:stroke-color="#000000" draw:fill="none" draw:fill-color="#ffffff" draw:textarea-horizontal-align="left" draw:auto-grow-height="true" draw:auto-grow-width="true" fo:min-height="0.395cm" fo:min-width="0.842cm" loext:decorative="false"/>
      <style:paragraph-properties style:writing-mode="lr-tb"/>
    </style:style>
    <style:style style:name="gr680" style:family="graphic" style:parent-style-name="standard">
      <style:graphic-properties draw:stroke="none" draw:fill="solid" draw:fill-color="#6390c2" draw:textarea-horizontal-align="justify" draw:textarea-vertical-align="middle" draw:auto-grow-height="false" fo:min-height="0.772cm" fo:min-width="0.522cm" draw:shadow="hidden" loext:decorative="false"/>
      <style:paragraph-properties style:writing-mode="lr-tb"/>
    </style:style>
    <style:style style:name="gr681" style:family="graphic" style:parent-style-name="standard">
      <style:graphic-properties draw:stroke="none" draw:fill="none" fo:min-height="0.345cm" loext:decorative="false"/>
      <style:paragraph-properties style:writing-mode="lr-tb"/>
    </style:style>
    <style:style style:name="gr682"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683"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684" style:family="graphic" style:parent-style-name="standard">
      <style:graphic-properties draw:stroke="none" draw:fill="solid" draw:fill-color="#70ae61" draw:textarea-horizontal-align="justify" draw:textarea-vertical-align="middle" draw:auto-grow-height="false" fo:min-height="0.783cm" fo:min-width="0.448cm" style:writing-mode="lr-tb" loext:decorative="false"/>
      <style:paragraph-properties style:writing-mode="lr-tb"/>
    </style:style>
    <style:style style:name="gr685"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686" style:family="graphic" style:parent-style-name="standard" style:list-style-name="L1">
      <style:graphic-properties draw:stroke="none" draw:fill="solid" draw:fill-color="#70ae61" draw:textarea-horizontal-align="justify" draw:textarea-vertical-align="middle" draw:auto-grow-height="false" fo:min-height="0.782cm" fo:min-width="0.448cm" style:writing-mode="lr-tb" loext:decorative="false"/>
      <style:paragraph-properties style:writing-mode="lr-tb"/>
    </style:style>
    <style:style style:name="gr687" style:family="graphic" style:parent-style-name="standard" style:list-style-name="L1">
      <style:graphic-properties draw:stroke="none" draw:fill="solid" draw:fill-color="#70ae61" draw:textarea-horizontal-align="justify" draw:textarea-vertical-align="middle" draw:auto-grow-height="false" fo:min-height="0.783cm" fo:min-width="0.448cm" style:writing-mode="lr-tb" loext:decorative="false"/>
      <style:paragraph-properties style:writing-mode="lr-tb"/>
    </style:style>
    <style:style style:name="gr688" style:family="graphic" style:parent-style-name="standard">
      <style:graphic-properties draw:fill="none" draw:textarea-vertical-align="middle" draw:auto-grow-height="false" fo:min-height="4.992cm" fo:min-width="0cm" fo:wrap-option="wrap" loext:decorative="false"/>
    </style:style>
    <style:style style:name="gr689" style:family="graphic" style:parent-style-name="standard">
      <style:graphic-properties draw:stroke="none" svg:stroke-color="#000000" draw:fill="none" draw:fill-color="#ffffff" draw:textarea-horizontal-align="left" draw:auto-grow-height="true" draw:auto-grow-width="true" fo:min-height="1.423cm" fo:min-width="1.078cm" loext:decorative="false"/>
      <style:paragraph-properties style:writing-mode="lr-tb"/>
    </style:style>
    <style:style style:name="gr690" style:family="graphic" style:parent-style-name="standard">
      <style:graphic-properties draw:stroke="none" svg:stroke-color="#000000" draw:fill="none" draw:fill-color="#ffffff" draw:textarea-horizontal-align="left" draw:auto-grow-height="true" draw:auto-grow-width="true" fo:min-height="0.788cm" fo:min-width="1.73cm" loext:decorative="false"/>
      <style:paragraph-properties style:writing-mode="lr-tb"/>
    </style:style>
    <style:style style:name="gr691" style:family="graphic" style:parent-style-name="standard">
      <style:graphic-properties draw:stroke="none" svg:stroke-color="#000000" draw:fill="none" draw:fill-color="#ffffff" draw:textarea-horizontal-align="left" draw:auto-grow-height="true" draw:auto-grow-width="true" fo:min-height="0.788cm" fo:min-width="1.495cm" loext:decorative="false"/>
      <style:paragraph-properties style:writing-mode="lr-tb"/>
    </style:style>
    <style:style style:name="gr692" style:family="graphic" style:parent-style-name="standard">
      <style:graphic-properties draw:stroke="none" svg:stroke-color="#000000" draw:fill="none" draw:fill-color="#ffffff" draw:textarea-horizontal-align="left" draw:auto-grow-height="true" draw:auto-grow-width="true" fo:min-height="0.475cm" fo:min-width="9.261cm" loext:decorative="false"/>
      <style:paragraph-properties style:writing-mode="lr-tb"/>
    </style:style>
    <style:style style:name="gr693" style:family="graphic" style:parent-style-name="standard">
      <style:graphic-properties draw:stroke="none" svg:stroke-color="#000000" draw:fill="none" draw:fill-color="#ffffff" draw:textarea-horizontal-align="left" draw:auto-grow-height="true" draw:auto-grow-width="true" fo:min-height="0.949cm" fo:min-width="11.743cm" loext:decorative="false"/>
      <style:paragraph-properties style:writing-mode="lr-tb"/>
    </style:style>
    <style:style style:name="P1" style:family="paragraph">
      <loext:graphic-properties draw:fill="solid" draw:fill-color="#b4d2ea" draw:opacity="50%"/>
      <style:paragraph-properties fo:margin-left="0cm" fo:margin-right="0cm" fo:margin-top="0cm" fo:margin-bottom="0cm" fo:line-height="100%" fo:text-align="center" fo:text-indent="0cm"/>
      <style:text-properties fo:color="#345d95" loext:opacity="100%" fo:font-weight="bold" style:font-weight-asian="bold" style:font-weight-complex="bold"/>
    </style:style>
    <style:style style:name="P2" style:family="paragraph">
      <loext:graphic-properties draw:fill="solid" draw:fill-color="#ffe0d9" draw:opacity="75%"/>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solid" draw:fill-color="#f7d375"/>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5" style:family="paragraph">
      <style:paragraph-properties fo:text-align="center"/>
    </style:style>
    <style:style style:name="P6" style:family="paragraph">
      <loext:graphic-properties draw:fill="solid" draw:fill-color="#e8995a"/>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7" style:family="paragraph">
      <loext:graphic-properties draw:fill="solid"/>
      <style:paragraph-properties fo:text-align="center"/>
      <style:text-properties fo:font-size="8pt" style:font-size-asian="8pt" style:font-size-complex="8pt"/>
    </style:style>
    <style:style style:name="P8" style:family="paragraph">
      <style:paragraph-properties fo:margin-left="0cm" fo:margin-right="0cm" fo:text-align="center" fo:text-indent="0cm"/>
    </style:style>
    <style:style style:name="P9" style:family="paragraph">
      <loext:graphic-properties draw:fill="solid" draw:fill-color="#accda1"/>
      <style:paragraph-properties fo:margin-left="0cm" fo:margin-right="0cm" fo:text-align="center" fo:text-indent="0cm"/>
      <style:text-properties fo:color="#000000" loext:opacity="100%" style:font-name="Liberation Sans" fo:font-size="10pt" fo:language="en" fo:country="US" fo:font-weight="normal" style:letter-kerning="true" fo:background-color="transparent" style:font-name-asian="Noto Sans CJK SC" style:font-size-asian="10pt" style:font-weight-asian="normal" style:font-name-complex="Lohit Devanagari" style:font-size-complex="10pt" style:font-weight-complex="normal"/>
    </style:style>
    <style:style style:name="P10" style:family="paragraph">
      <loext:graphic-properties draw:fill="solid"/>
      <style:paragraph-properties fo:margin-left="0cm" fo:margin-right="0cm" fo:margin-top="0cm" fo:margin-bottom="0cm" fo:line-height="100%" fo:text-align="center" fo:text-indent="0cm"/>
      <style:text-properties fo:color="#000000" loext:opacity="100%" fo:font-size="8pt" style:font-size-asian="8pt" style:font-size-complex="8pt"/>
    </style:style>
    <style:style style:name="P11" style:family="paragraph">
      <loext:graphic-properties draw:fill="none"/>
    </style:style>
    <style:style style:name="P12" style:family="paragraph">
      <loext:graphic-properties draw:fill="solid"/>
      <style:paragraph-properties fo:margin-left="0cm" fo:margin-right="0cm" fo:margin-top="0cm" fo:margin-bottom="0cm" fo:line-height="100%" fo:text-align="center" fo:text-indent="0cm"/>
    </style:style>
    <style:style style:name="P13" style:family="paragraph">
      <loext:graphic-properties draw:fill="none" draw:fill-color="#ffffff"/>
      <style:paragraph-properties fo:margin-left="0cm" fo:margin-right="0cm" fo:margin-top="0cm" fo:margin-bottom="0cm" fo:line-height="100%" fo:text-align="center" fo:text-indent="0cm"/>
      <style:text-properties fo:color="#d86a50" loext:opacity="100%" fo:font-size="16pt" style:font-size-asian="16pt" style:font-size-complex="16pt"/>
    </style:style>
    <style:style style:name="P14" style:family="paragraph">
      <loext:graphic-properties draw:fill="none" draw:fill-color="#ffffff"/>
      <style:text-properties fo:font-size="16pt" style:font-size-asian="16pt" style:font-size-complex="16pt"/>
    </style:style>
    <style:style style:name="P15" style:family="paragraph">
      <loext:graphic-properties draw:fill="solid"/>
      <style:paragraph-properties fo:text-align="center"/>
    </style:style>
    <style:style style:name="P16" style:family="paragraph">
      <loext:graphic-properties draw:fill="none" draw:fill-color="#ffffff"/>
      <style:text-properties fo:font-size="8pt" style:font-size-asian="8pt" style:font-size-complex="8pt"/>
    </style:style>
    <style:style style:name="P17" style:family="paragraph">
      <style:paragraph-properties fo:margin-left="0cm" fo:margin-right="0cm" fo:margin-top="0cm" fo:margin-bottom="0cm" fo:line-height="100%" fo:text-align="center" fo:text-indent="0cm"/>
      <style:text-properties fo:font-size="8pt" style:font-size-asian="8pt" style:font-size-complex="8pt"/>
    </style:style>
    <style:style style:name="P18" style:family="paragraph">
      <loext:graphic-properties draw:fill="solid" draw:fill-color="#f6f5f8"/>
      <style:paragraph-properties fo:margin-left="0cm" fo:margin-right="0cm" fo:margin-top="0cm" fo:margin-bottom="0cm" fo:line-height="100%" fo:text-align="center" fo:text-indent="0cm" style:writing-mode="lr-tb"/>
      <style:text-properties fo:font-size="8pt" style:font-size-asian="8pt" style:font-size-complex="8pt"/>
    </style:style>
    <style:style style:name="P19" style:family="paragraph">
      <style:paragraph-properties fo:text-align="center"/>
      <style:text-properties fo:font-size="8pt" style:font-size-asian="8pt" style:font-size-complex="8pt"/>
    </style:style>
    <style:style style:name="P20" style:family="paragraph">
      <loext:graphic-properties draw:fill="solid" draw:fill-color="#f6f5f8"/>
      <style:paragraph-properties fo:text-align="center" style:writing-mode="lr-tb"/>
      <style:text-properties fo:font-size="8pt" style:font-size-asian="8pt" style:font-size-complex="8pt"/>
    </style:style>
    <style:style style:name="P21" style:family="paragraph">
      <loext:graphic-properties draw:fill="solid" draw:fill-color="#f9dc8c" draw:opacity="25%"/>
      <style:paragraph-properties fo:text-align="center"/>
    </style:style>
    <style:style style:name="P22" style:family="paragraph">
      <loext:graphic-properties draw:fill="solid" draw:fill-color="#ff5128" draw:opacity="75%"/>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23" style:family="paragraph">
      <loext:graphic-properties draw:fill="solid" draw:fill-color="#d86a50"/>
      <style:paragraph-properties fo:text-align="center"/>
    </style:style>
    <style:style style:name="P24" style:family="paragraph">
      <loext:graphic-properties draw:fill="solid" draw:fill-color="#aaafc9" draw:opacity="75%"/>
      <style:paragraph-properties fo:text-align="center"/>
      <style:text-properties fo:color="#ffffff" loext:opacity="100%" fo:font-weight="bold" style:font-weight-asian="bold" style:font-weight-complex="bold"/>
    </style:style>
    <style:style style:name="P25" style:family="paragraph">
      <style:paragraph-properties fo:text-align="center"/>
      <style:text-properties fo:font-size="10pt" style:font-size-asian="10pt" style:font-size-complex="10pt"/>
    </style:style>
    <style:style style:name="P26" style:family="paragraph">
      <loext:graphic-properties draw:fill="solid" draw:fill-color="#f6f5f8"/>
      <style:paragraph-properties fo:text-align="center" style:writing-mode="lr-tb"/>
      <style:text-properties fo:font-size="10pt" style:font-size-asian="10pt" style:font-size-complex="10pt"/>
    </style:style>
    <style:style style:name="P27" style:family="paragraph">
      <loext:graphic-properties draw:fill="solid" draw:fill-color="#ff5128"/>
      <style:paragraph-properties fo:text-align="center" style:writing-mode="lr-tb"/>
      <style:text-properties fo:font-size="10pt" style:font-size-asian="10pt" style:font-size-complex="10pt"/>
    </style:style>
    <style:style style:name="P28" style:family="paragraph">
      <loext:graphic-properties draw:fill="solid" draw:fill-color="#e8995a"/>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29" style:family="paragraph">
      <loext:graphic-properties draw:fill="solid" draw:fill-color="#f7d375"/>
      <style:paragraph-properties fo:text-align="center"/>
      <style:text-properties fo:color="#000000" loext:opacity="100%" fo:font-size="10pt" fo:font-weight="normal" fo:background-color="#000000" style:font-size-asian="10pt" style:font-weight-asian="normal" style:font-size-complex="10pt" style:font-weight-complex="normal"/>
    </style:style>
    <style:style style:name="P30" style:family="paragraph">
      <style:paragraph-properties fo:text-align="center" style:text-autospace="none"/>
    </style:style>
    <style:style style:name="P31" style:family="paragraph">
      <loext:graphic-properties draw:fill="solid" draw:fill-color="#f7d375"/>
      <style:paragraph-properties fo:text-align="center" style:text-autospace="none"/>
      <style:text-properties fo:color="#000000" loext:opacity="100%" fo:font-size="10pt" fo:font-weight="normal" fo:background-color="#ffffff" style:font-size-asian="10pt" style:font-weight-asian="normal" style:font-size-complex="10pt" style:font-weight-complex="normal"/>
    </style:style>
    <style:style style:name="P32" style:family="paragraph">
      <loext:graphic-properties draw:fill="solid" draw:fill-color="#f45f74"/>
      <style:paragraph-properties fo:text-align="center"/>
    </style:style>
    <style:style style:name="P33" style:family="paragraph">
      <loext:graphic-properties draw:fill="solid" draw:fill-color="#ff8ca1"/>
      <style:paragraph-properties fo:text-align="center"/>
    </style:style>
    <style:style style:name="P34" style:family="paragraph">
      <loext:graphic-properties draw:fill="solid" draw:fill-color="#98c127"/>
      <style:paragraph-properties fo:text-align="center"/>
    </style:style>
    <style:style style:name="P35" style:family="paragraph">
      <loext:graphic-properties draw:fill="solid" draw:fill-color="#ffb255"/>
      <style:paragraph-properties fo:text-align="center"/>
    </style:style>
    <style:style style:name="P36" style:family="paragraph">
      <loext:graphic-properties draw:fill-color="#f45f74"/>
      <style:paragraph-properties fo:text-align="center"/>
    </style:style>
    <style:style style:name="P37" style:family="paragraph">
      <loext:graphic-properties draw:fill-color="#ffcd8e"/>
      <style:paragraph-properties fo:text-align="center"/>
    </style:style>
    <style:style style:name="P38" style:family="paragraph">
      <loext:graphic-properties draw:fill="none" draw:fill-color="#ffffff"/>
    </style:style>
    <style:style style:name="P39" style:family="paragraph">
      <loext:graphic-properties draw:fill="none" draw:fill-color="#ffffff"/>
      <style:text-properties fo:font-weight="bold" style:font-weight-asian="bold" style:font-weight-complex="bold"/>
    </style:style>
    <style:style style:name="P40" style:family="paragraph">
      <loext:graphic-properties draw:fill-color="#00b0be"/>
      <style:paragraph-properties fo:text-align="center"/>
    </style:style>
    <style:style style:name="P41" style:family="paragraph">
      <loext:graphic-properties draw:fill="none"/>
      <style:paragraph-properties fo:text-align="center"/>
    </style:style>
    <style:style style:name="P42" style:family="paragraph">
      <style:paragraph-properties fo:margin-left="0cm" fo:margin-right="0cm"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3" style:family="paragraph">
      <loext:graphic-properties draw:fill="solid" draw:fill-color="#f45f74"/>
      <style:paragraph-properties fo:margin-left="0cm" fo:margin-right="0cm"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4" style:family="paragraph">
      <style:paragraph-properties fo:text-align="center"/>
      <style:text-properties fo:font-size="18pt" fo:font-weight="normal" style:font-size-asian="12pt" style:font-weight-asian="normal" style:font-size-complex="18pt" style:font-weight-complex="normal"/>
    </style:style>
    <style:style style:name="P45" style:family="paragraph">
      <loext:graphic-properties draw:fill="solid" draw:fill-color="#8fd7d7"/>
      <style:paragraph-properties fo:text-align="center" style:writing-mode="lr-tb"/>
      <style:text-properties fo:font-size="18pt" fo:font-weight="normal" style:font-size-asian="12pt" style:font-weight-asian="normal" style:font-size-complex="18pt" style:font-weight-complex="normal"/>
    </style:style>
    <style:style style:name="P46" style:family="paragraph">
      <loext:graphic-properties draw:fill="solid" draw:fill-color="#8fd7d7"/>
      <style:paragraph-properties fo:text-align="center"/>
    </style:style>
    <style:style style:name="P47" style:family="paragraph">
      <loext:graphic-properties draw:fill="solid" draw:fill-color="#8fd7d7"/>
      <style:paragraph-properties fo:text-align="center" style:writing-mode="lr-tb"/>
    </style:style>
    <style:style style:name="P48" style:family="paragraph">
      <loext:graphic-properties draw:fill="solid" draw:fill-color="#ff8ca1"/>
      <style:paragraph-properties fo:text-align="center" style:writing-mode="lr-tb"/>
    </style:style>
    <style:style style:name="P49" style:family="paragraph">
      <style:paragraph-properties fo:margin-left="0cm" fo:margin-right="0cm" fo:text-align="center" fo:text-indent="0cm"/>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0" style:family="paragraph">
      <loext:graphic-properties draw:fill="solid" draw:fill-color="#ff8ca1"/>
      <style:paragraph-properties fo:margin-left="0cm" fo:margin-right="0cm" fo:text-align="center" fo:text-indent="0cm" style:writing-mode="lr-tb"/>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1" style:family="paragraph">
      <loext:graphic-properties draw:fill="solid" draw:fill-color="#8fd7d7"/>
      <style:paragraph-properties fo:text-align="center"/>
      <style:text-properties fo:font-size="12pt" fo:font-weight="normal" style:font-size-asian="12pt" style:font-weight-asian="normal" style:font-size-complex="12pt" style:font-weight-complex="normal"/>
    </style:style>
    <style:style style:name="P52" style:family="paragraph">
      <loext:graphic-properties draw:fill="solid" draw:fill-color="#ffffff"/>
      <style:paragraph-properties fo:text-align="center" style:writing-mode="lr-tb"/>
    </style:style>
    <style:style style:name="P53" style:family="paragraph">
      <loext:graphic-properties draw:fill-color="#bdd373"/>
      <style:paragraph-properties fo:text-align="center" style:writing-mode="lr-tb"/>
    </style:style>
    <style:style style:name="P54" style:family="paragraph">
      <style:paragraph-properties fo:margin-left="0cm" fo:margin-right="0cm" fo:margin-top="0cm" fo:margin-bottom="0cm" fo:line-height="100%" fo:text-align="center" fo:text-indent="0cm"/>
      <style:text-properties fo:color="#ffffff" loext:opacity="100%"/>
    </style:style>
    <style:style style:name="P55" style:family="paragraph">
      <loext:graphic-properties draw:fill-color="#98c127"/>
      <style:paragraph-properties fo:margin-left="0cm" fo:margin-right="0cm" fo:margin-top="0cm" fo:margin-bottom="0cm" fo:line-height="100%" fo:text-align="center" fo:text-indent="0cm" style:writing-mode="lr-tb"/>
      <style:text-properties fo:color="#ffffff" loext:opacity="100%"/>
    </style:style>
    <style:style style:name="P56" style:family="paragraph">
      <loext:graphic-properties draw:fill="solid" draw:fill-color="#ffb255"/>
      <style:paragraph-properties fo:text-align="center" style:writing-mode="lr-tb"/>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solid"/>
      <style:paragraph-properties fo:margin-left="0cm" fo:margin-right="0cm" fo:margin-top="0cm" fo:margin-bottom="0cm" fo:line-height="100%" fo:text-align="start" fo:text-indent="0cm"/>
    </style:style>
    <style:style style:name="P59" style:family="paragraph">
      <loext:graphic-properties draw:fill="solid" draw:fill-color="#ffffff"/>
      <style:paragraph-properties fo:margin-left="0cm" fo:margin-right="0cm" fo:margin-top="0cm" fo:margin-bottom="0cm" fo:line-height="100%" fo:text-align="center" fo:text-indent="0cm" style:writing-mode="lr-tb"/>
    </style:style>
    <style:style style:name="P60" style:family="paragraph">
      <style:paragraph-properties fo:margin-left="0cm" fo:margin-right="0cm" fo:margin-top="0cm" fo:margin-bottom="0cm" fo:line-height="100%"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1" style:family="paragraph">
      <loext:graphic-properties draw:fill="solid"/>
      <style:paragraph-properties fo:text-align="center"/>
      <style:text-properties fo:font-weight="normal" style:font-weight-asian="normal" style:font-weight-complex="normal"/>
    </style:style>
    <style:style style:name="P62" style:family="paragraph">
      <loext:graphic-properties draw:fill="solid" draw:fill-color="#00b0be"/>
      <style:paragraph-properties fo:margin-left="0cm" fo:margin-right="0cm" fo:text-align="center" fo:text-indent="0cm"/>
      <style:text-properties style:font-name="Liberation Sans" fo:font-size="12pt" fo:language="en" fo:country="US" style:letter-kerning="true" style:font-name-asian="Noto Sans CJK SC" style:font-size-asian="18pt" style:font-name-complex="Lohit Devanagari" style:font-size-complex="12pt"/>
    </style:style>
    <style:style style:name="P63" style:family="paragraph">
      <loext:graphic-properties draw:fill="solid" draw:fill-color="#f45f74"/>
      <style:paragraph-properties fo:text-align="center"/>
      <style:text-properties fo:font-weight="bold" style:font-weight-asian="bold" style:font-weight-complex="bold"/>
    </style:style>
    <style:style style:name="P64" style:family="paragraph">
      <style:paragraph-properties fo:text-align="center" style:writing-mode="lr-tb"/>
    </style:style>
    <style:style style:name="P65" style:family="paragraph">
      <loext:graphic-properties draw:fill="solid" draw:fill-color="#f45f74"/>
      <style:paragraph-properties fo:margin-left="0cm" fo:margin-right="0cm" fo:margin-top="0cm" fo:margin-bottom="0cm" fo:line-height="100%"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6" style:family="paragraph">
      <style:paragraph-properties style:text-autospace="none"/>
    </style:style>
    <style:style style:name="P67" style:family="paragraph">
      <loext:graphic-properties draw:fill="solid" draw:fill-color="#b4d2ea"/>
      <style:paragraph-properties fo:text-align="center"/>
      <style:text-properties fo:color="#000000" loext:opacity="100%"/>
    </style:style>
    <style:style style:name="P68" style:family="paragraph">
      <loext:graphic-properties draw:fill="solid" draw:fill-color="#ffffff"/>
      <style:paragraph-properties fo:margin-left="0cm" fo:margin-right="0cm" fo:margin-top="0cm" fo:margin-bottom="0cm" fo:line-height="100%" fo:text-align="center" fo:text-indent="0cm" style:writing-mode="lr-tb"/>
      <style:text-properties fo:font-size="8pt" style:font-size-asian="8pt" style:font-size-complex="8pt"/>
    </style:style>
    <style:style style:name="P69" style:family="paragraph">
      <style:paragraph-properties fo:margin-top="0.42cm" fo:margin-bottom="0.35cm" fo:text-align="center"/>
    </style:style>
    <style:style style:name="P70" style:family="paragraph">
      <loext:graphic-properties draw:fill="solid" draw:fill-color="#ffffff"/>
      <style:paragraph-properties fo:margin-top="0.42cm" fo:margin-bottom="0.35cm" fo:text-align="center" style:writing-mode="lr-tb"/>
    </style:style>
    <style:style style:name="P71" style:family="paragraph">
      <loext:graphic-properties draw:fill="solid" draw:fill-color="#b4d2ea"/>
      <style:paragraph-properties fo:margin-left="0cm" fo:margin-right="0cm" fo:margin-top="0.42cm" fo:margin-bottom="0.35cm" fo:line-height="100%" fo:text-align="center" fo:text-indent="0cm"/>
      <style:text-properties fo:color="#000000" loext:opacity="100%"/>
    </style:style>
    <style:style style:name="P72" style:family="paragraph">
      <loext:graphic-properties draw:fill="solid" draw:fill-color="#accda1"/>
      <style:paragraph-properties fo:text-align="center"/>
    </style:style>
    <style:style style:name="P73" style:family="paragraph">
      <loext:graphic-properties draw:fill="solid" draw:fill-color="#b4d2ea"/>
      <style:paragraph-properties fo:margin-left="0cm" fo:margin-right="0cm" fo:text-align="center" fo:text-indent="0cm"/>
      <style:text-properties fo:color="#000000" loext:opacity="100%"/>
    </style:style>
    <style:style style:name="P74" style:family="paragraph">
      <style:paragraph-properties fo:margin-left="0cm" fo:margin-right="0cm" fo:text-align="center" fo:text-indent="0cm" style:text-autospace="ideograph-alpha"/>
    </style:style>
    <style:style style:name="P75" style:family="paragraph">
      <loext:graphic-properties draw:fill="solid" draw:fill-color="#b4d2ea"/>
      <style:paragraph-properties fo:text-align="center" style:text-autospace="none"/>
      <style:text-properties fo:color="#000000" loext:opacity="100%"/>
    </style:style>
    <style:style style:name="P76" style:family="paragraph">
      <style:paragraph-properties fo:margin-left="0cm" fo:margin-right="0cm" fo:margin-top="0cm" fo:margin-bottom="0cm" fo:text-align="center" fo:text-indent="0cm"/>
    </style:style>
    <style:style style:name="P77" style:family="paragraph">
      <loext:graphic-properties draw:fill="solid" draw:fill-color="#b4d2ea"/>
      <style:paragraph-properties fo:margin-top="0.42cm" fo:margin-bottom="0.35cm" fo:text-align="center"/>
      <style:text-properties fo:color="#000000" loext:opacity="100%"/>
    </style:style>
    <style:style style:name="P78" style:family="paragraph">
      <style:paragraph-properties fo:margin-left="0cm" fo:margin-right="0cm" fo:margin-top="0.42cm" fo:margin-bottom="0.35cm" fo:text-align="center" fo:text-indent="0cm"/>
    </style:style>
    <style:style style:name="P79" style:family="paragraph">
      <loext:graphic-properties draw:fill="none"/>
      <style:paragraph-properties fo:text-align="center"/>
      <style:text-properties fo:font-size="18pt"/>
    </style:style>
    <style:style style:name="P80" style:family="paragraph">
      <loext:graphic-properties draw:fill="solid" draw:fill-color="#dde8cb"/>
      <style:paragraph-properties fo:margin-left="0cm" fo:margin-right="0cm" fo:margin-top="0cm" fo:margin-bottom="0cm" fo:line-height="100%" fo:text-align="center" fo:text-indent="0cm" style:writing-mode="lr-tb"/>
      <style:text-properties fo:font-size="18pt"/>
    </style:style>
    <style:style style:name="P81" style:family="paragraph">
      <loext:graphic-properties draw:fill="none" draw:fill-color="#ffffff"/>
      <style:paragraph-properties fo:margin-left="0cm" fo:margin-right="0cm" fo:margin-top="0cm" fo:margin-bottom="0cm" fo:line-height="100%" fo:text-align="center" fo:text-indent="0cm"/>
      <style:text-properties fo:font-size="18pt" fo:font-weight="normal" style:font-size-asian="18pt" style:font-weight-asian="normal" style:font-size-complex="18pt" style:font-weight-complex="normal"/>
    </style:style>
    <style:style style:name="P82" style:family="paragraph">
      <loext:graphic-properties draw:fill="solid" draw:fill-color="#00aaad"/>
      <style:paragraph-properties fo:text-align="center"/>
      <style:text-properties fo:font-size="18pt"/>
    </style:style>
    <style:style style:name="P83" style:family="paragraph">
      <loext:graphic-properties draw:fill="solid" draw:fill-color="#dde8cb"/>
      <style:paragraph-properties fo:text-align="center"/>
      <style:text-properties fo:font-size="18pt"/>
    </style:style>
    <style:style style:name="P84" style:family="paragraph">
      <loext:graphic-properties draw:fill="none"/>
      <style:paragraph-properties fo:text-align="center"/>
      <style:text-properties fo:font-size="18pt" style:font-size-asian="18pt" style:font-size-complex="18pt"/>
    </style:style>
    <style:style style:name="P85" style:family="paragraph">
      <loext:graphic-properties draw:fill="solid" draw:fill-color="#b3cac7"/>
      <style:paragraph-properties fo:text-align="center"/>
      <style:text-properties fo:font-size="18pt"/>
    </style:style>
    <style:style style:name="P86" style:family="paragraph">
      <loext:graphic-properties draw:fill="none"/>
      <style:paragraph-properties fo:text-align="center"/>
      <style:text-properties fo:font-size="18pt" fo:font-weight="bold" style:font-size-asian="18pt" style:font-weight-asian="bold" style:font-size-complex="18pt" style:font-weight-complex="bold"/>
    </style:style>
    <style:style style:name="P87" style:family="paragraph">
      <style:paragraph-properties fo:text-align="center"/>
      <style:text-properties fo:font-size="18pt"/>
    </style:style>
    <style:style style:name="P88" style:family="paragraph">
      <loext:graphic-properties draw:fill="none"/>
      <style:text-properties fo:font-size="18pt" style:font-size-asian="18pt" style:font-size-complex="18pt"/>
    </style:style>
    <style:style style:name="P89" style:family="paragraph">
      <loext:graphic-properties draw:fill="none"/>
      <style:text-properties fo:font-size="12pt" fo:font-weight="bold" style:font-size-asian="12pt" style:font-weight-asian="bold" style:font-size-complex="12pt" style:font-weight-complex="bold"/>
    </style:style>
    <style:style style:name="P90" style:family="paragraph">
      <loext:graphic-properties draw:fill="solid" draw:fill-color="#fffcdf"/>
    </style:style>
    <style:style style:name="P91" style:family="paragraph">
      <loext:graphic-properties draw:fill="solid" draw:fill-color="#00a65d"/>
      <style:paragraph-properties fo:text-align="center"/>
    </style:style>
    <style:style style:name="P92" style:family="paragraph">
      <loext:graphic-properties draw:fill="solid" draw:fill-color="#0066b3"/>
      <style:paragraph-properties fo:text-align="center"/>
    </style:style>
    <style:style style:name="P93" style:family="paragraph">
      <loext:graphic-properties draw:fill="solid" draw:fill-color="#28a127"/>
      <style:paragraph-properties fo:text-align="center"/>
    </style:style>
    <style:style style:name="P94" style:family="paragraph">
      <loext:graphic-properties draw:fill="solid" draw:fill-color="#bcaed5" draw:opacity="50%"/>
      <style:paragraph-properties fo:text-align="center"/>
    </style:style>
    <style:style style:name="P95" style:family="paragraph">
      <loext:graphic-properties draw:fill="solid" draw:fill-color="#bce4e5" draw:opacity="50%"/>
      <style:paragraph-properties fo:text-align="center"/>
    </style:style>
    <style:style style:name="P96" style:family="paragraph">
      <loext:graphic-properties draw:fill="solid" draw:fill-color="#bee3d3"/>
      <style:paragraph-properties fo:text-align="center"/>
      <style:text-properties fo:font-weight="bold" style:font-weight-asian="bold" style:font-weight-complex="bold"/>
    </style:style>
    <style:style style:name="P97" style:family="paragraph">
      <loext:graphic-properties draw:fill="none"/>
      <style:paragraph-properties fo:text-align="center"/>
      <style:text-properties fo:font-weight="normal"/>
    </style:style>
    <style:style style:name="P98" style:family="paragraph">
      <loext:graphic-properties draw:fill="solid" draw:fill-color="#000000"/>
    </style:style>
    <style:style style:name="P99" style:family="paragraph">
      <style:paragraph-properties style:writing-mode="lr-tb"/>
    </style:style>
    <style:style style:name="P100" style:family="paragraph">
      <loext:graphic-properties draw:fill="none" draw:fill-color="#ffffff"/>
      <style:text-properties fo:color="#00a65d" loext:opacity="100%" fo:font-size="16pt" fo:font-weight="bold" style:font-size-asian="16pt" style:font-weight-asian="bold" style:font-size-complex="16pt" style:font-weight-complex="bold"/>
    </style:style>
    <style:style style:name="P101" style:family="paragraph">
      <loext:graphic-properties draw:fill="none" draw:fill-color="#ffffff"/>
      <style:text-properties fo:color="#aa55a1" loext:opacity="100%" fo:font-size="16pt" fo:font-weight="bold" style:font-size-asian="16pt" style:font-weight-asian="bold" style:font-size-complex="16pt" style:font-weight-complex="bold"/>
    </style:style>
    <style:style style:name="P102" style:family="paragraph">
      <loext:graphic-properties draw:fill="hatch" draw:fill-color="#ffffff" draw:fill-hatch-name="Hatching_20_7" draw:fill-hatch-solid="true"/>
      <style:paragraph-properties fo:text-align="center"/>
    </style:style>
    <style:style style:name="P103" style:family="paragraph">
      <loext:graphic-properties draw:fill="solid" draw:fill-color="#e8995a"/>
      <style:paragraph-properties fo:text-align="center"/>
    </style:style>
    <style:style style:name="P104" style:family="paragraph">
      <loext:graphic-properties draw:fill="solid" draw:fill-color="#c7bcda"/>
      <style:paragraph-properties fo:text-align="center"/>
    </style:style>
    <style:style style:name="P105" style:family="paragraph">
      <loext:graphic-properties draw:fill="solid" draw:fill-color="#f9dc8c"/>
      <style:paragraph-properties fo:text-align="center"/>
    </style:style>
    <style:style style:name="P106" style:family="paragraph">
      <loext:graphic-properties draw:fill="solid" draw:fill-color="#b4d2ea"/>
      <style:paragraph-properties fo:text-align="center"/>
    </style:style>
    <style:style style:name="P107" style:family="paragraph">
      <loext:graphic-properties draw:fill="solid" draw:fill-color="#f6f5f8"/>
      <style:paragraph-properties fo:text-align="center"/>
    </style:style>
    <style:style style:name="P108" style:family="paragraph">
      <loext:graphic-properties draw:fill="solid" draw:fill-color="#f6f5f8"/>
      <style:paragraph-properties fo:margin-left="0cm" fo:margin-right="0cm" fo:margin-top="0cm" fo:margin-bottom="0cm" fo:line-height="100%" fo:text-align="center" fo:text-indent="0cm"/>
    </style:style>
    <style:style style:name="P109" style:family="paragraph">
      <loext:graphic-properties draw:fill="solid" draw:fill-color="#70ae61"/>
      <style:paragraph-properties fo:text-align="center"/>
      <style:text-properties fo:color="#ffffff" loext:opacity="100%" fo:font-weight="normal" style:font-weight-asian="normal" style:font-weight-complex="normal"/>
    </style:style>
    <style:style style:name="P110" style:family="paragraph">
      <loext:graphic-properties draw:fill="solid" draw:fill-color="#9b592e"/>
      <style:paragraph-properties fo:text-align="center"/>
      <style:text-properties fo:font-weight="normal" style:font-weight-asian="normal" style:font-weight-complex="normal"/>
    </style:style>
    <style:style style:name="P111" style:family="paragraph">
      <loext:graphic-properties draw:fill="solid" draw:fill-color="#d86a50"/>
      <style:paragraph-properties fo:text-align="center"/>
      <style:text-properties fo:font-weight="bold" fo:background-color="#ffffff" style:font-weight-asian="bold" style:font-weight-complex="bold"/>
    </style:style>
    <style:style style:name="P112" style:family="paragraph">
      <loext:graphic-properties draw:fill="solid" draw:fill-color="#70ae61"/>
      <style:paragraph-properties fo:text-align="center"/>
      <style:text-properties fo:color="#ffffff" loext:opacity="100%" fo:font-weight="normal" fo:background-color="#ffffff" style:font-weight-asian="normal" style:font-weight-complex="normal"/>
    </style:style>
    <style:style style:name="P113" style:family="paragraph">
      <loext:graphic-properties draw:fill="solid" draw:fill-color="#6390c2"/>
      <style:paragraph-properties fo:text-align="center"/>
    </style:style>
    <style:style style:name="P114" style:family="paragraph">
      <loext:graphic-properties draw:fill="solid" draw:fill-color="#ffffff"/>
      <style:paragraph-properties fo:text-align="center" style:writing-mode="lr-tb"/>
      <style:text-properties fo:font-size="8pt" style:font-size-asian="8pt" style:font-size-complex="8pt"/>
    </style:style>
    <style:style style:name="P115" style:family="paragraph">
      <loext:graphic-properties draw:fill="solid" draw:fill-color="#70ae61"/>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6" style:family="paragraph">
      <loext:graphic-properties draw:fill="solid" draw:fill-color="#e8995a"/>
      <style:paragraph-properties fo:text-align="center"/>
      <style:text-properties fo:color="#000000" loext:opacity="100%" fo:font-size="10pt" fo:font-weight="normal" fo:background-color="transparent" style:font-size-asian="10pt" style:font-weight-asian="normal" style:font-size-complex="10pt" style:font-weight-complex="normal"/>
    </style:style>
    <style:style style:name="P117" style:family="paragraph">
      <loext:graphic-properties draw:fill="solid" draw:fill-color="#6390c2"/>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8" style:family="paragraph">
      <loext:graphic-properties draw:fill="solid" draw:fill-color="#9b592e"/>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9" style:family="paragraph">
      <style:paragraph-properties fo:text-align="start"/>
    </style:style>
    <style:style style:name="P120" style:family="paragraph">
      <loext:graphic-properties draw:fill="none" draw:fill-color="#ffffff"/>
      <style:paragraph-properties fo:text-align="start"/>
      <style:text-properties fo:font-size="10pt" style:font-size-asian="10pt" style:font-size-complex="10pt"/>
    </style:style>
    <style:style style:name="P121" style:family="paragraph">
      <loext:graphic-properties draw:fill="solid" draw:fill-color="#c7bcda" draw:opacity="100%"/>
      <style:paragraph-properties fo:text-align="center"/>
    </style:style>
    <style:style style:name="P122" style:family="paragraph">
      <style:paragraph-properties fo:margin-left="0cm" fo:margin-right="0cm" fo:text-align="center" fo:text-indent="0cm"/>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3" style:family="paragraph">
      <loext:graphic-properties draw:fill-color="#ff5128" draw:opacity="75%"/>
      <style:paragraph-properties fo:margin-left="0cm" fo:margin-right="0cm" fo:text-align="center" fo:text-indent="0cm" style:writing-mode="lr-tb"/>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4" style:family="paragraph">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125" style:family="paragraph">
      <loext:graphic-properties draw:fill-color="#ff5128" draw:opacity="75%"/>
      <style:paragraph-properties fo:text-align="center" style:writing-mode="lr-tb"/>
      <style:text-properties fo:color="#ffffff" loext:opacity="100%" fo:font-size="10pt" fo:font-weight="bold" fo:background-color="#ffffff" style:font-size-asian="10pt" style:font-weight-asian="bold" style:font-size-complex="10pt" style:font-weight-complex="bold"/>
    </style:style>
    <style:style style:name="P126" style:family="paragraph">
      <loext:graphic-properties draw:fill="none" draw:fill-color="#ffffff"/>
      <style:paragraph-properties fo:text-align="center"/>
    </style:style>
    <style:style style:name="P127" style:family="paragraph">
      <style:paragraph-properties fo:margin-left="0cm" fo:margin-right="0cm" fo:margin-top="0.42cm" fo:margin-bottom="0.35cm" fo:line-height="100%" fo:text-align="center" fo:text-indent="0cm"/>
    </style:style>
    <style:style style:name="P128" style:family="paragraph">
      <loext:graphic-properties draw:fill="solid" draw:fill-color="#ff5128"/>
      <style:paragraph-properties fo:margin-left="0cm" fo:margin-right="0cm" fo:margin-top="0cm" fo:margin-bottom="0cm" fo:line-height="100%" fo:text-align="center" fo:text-indent="0cm" style:writing-mode="lr-tb"/>
    </style:style>
    <style:style style:name="P129" style:family="paragraph">
      <loext:graphic-properties draw:fill="none" draw:fill-color="#ffffff"/>
      <style:text-properties fo:color="#00b0be" loext:opacity="100%" fo:font-weight="bold" style:font-weight-asian="bold" style:font-weight-complex="bold"/>
    </style:style>
    <style:style style:name="P130" style:family="paragraph">
      <loext:graphic-properties draw:fill="solid" draw:fill-color="#8fd7d7" draw:opacity="50%"/>
      <style:paragraph-properties fo:text-align="center"/>
    </style:style>
    <style:style style:name="P131" style:family="paragraph">
      <loext:graphic-properties draw:fill="none" draw:fill-color="#ffffff"/>
      <style:paragraph-properties fo:text-align="center"/>
      <style:text-properties fo:color="#6390c2" loext:opacity="100%" fo:font-weight="bold" style:font-weight-asian="bold" style:font-weight-complex="bold"/>
    </style:style>
    <style:style style:name="P132" style:family="paragraph">
      <style:paragraph-properties fo:margin-top="0.42cm" fo:margin-bottom="0.35cm"/>
    </style:style>
    <style:style style:name="P133" style:family="paragraph">
      <style:paragraph-properties fo:text-align="center" style:writing-mode="lr-tb"/>
      <style:text-properties fo:font-size="10pt" style:font-size-asian="10pt" style:font-size-complex="10pt"/>
    </style:style>
    <style:style style:name="P134" style:family="paragraph">
      <loext:graphic-properties draw:fill="solid" draw:fill-color="#ffe0d9"/>
      <style:paragraph-properties fo:text-align="center" style:writing-mode="lr-tb"/>
      <style:text-properties fo:font-size="8pt" style:font-size-asian="8pt" style:font-size-complex="8pt"/>
    </style:style>
    <style:style style:name="P135" style:family="paragraph">
      <loext:graphic-properties draw:fill="solid" draw:fill-color="#ff5128"/>
      <style:paragraph-properties fo:text-align="center" style:writing-mode="lr-tb"/>
      <style:text-properties fo:font-size="8pt" style:font-size-asian="8pt" style:font-size-complex="8pt"/>
    </style:style>
    <style:style style:name="P136" style:family="paragraph">
      <style:paragraph-properties fo:margin-left="0cm" fo:margin-right="0cm" fo:margin-top="0.42cm" fo:margin-bottom="0.35cm" fo:line-height="100%" fo:text-align="center" fo:text-indent="0cm"/>
      <style:text-properties fo:font-size="10pt" style:font-size-asian="10pt" style:font-size-complex="10pt"/>
    </style:style>
    <style:style style:name="P137" style:family="paragraph">
      <loext:graphic-properties draw:fill="solid" draw:fill-color="#70ae61"/>
      <style:paragraph-properties fo:margin-left="0cm" fo:margin-right="0cm" fo:margin-top="0.42cm" fo:margin-bottom="0.35cm" fo:line-height="100%" fo:text-align="center" fo:text-indent="0cm" style:writing-mode="lr-tb"/>
      <style:text-properties fo:font-size="10pt" style:font-size-asian="10pt" style:font-size-complex="10pt"/>
    </style:style>
    <style:style style:name="P138" style:family="paragraph">
      <loext:graphic-properties draw:fill="none" draw:fill-color="#ffffff"/>
      <style:paragraph-properties fo:margin-top="0.42cm" fo:margin-bottom="0.35cm" fo:text-align="center"/>
      <style:text-properties fo:font-size="10pt" style:font-size-asian="10pt" style:font-size-complex="10pt"/>
    </style:style>
    <style:style style:name="P139" style:family="paragraph">
      <loext:graphic-properties draw:fill="solid" draw:fill-color="#70ae61"/>
      <style:paragraph-properties fo:text-align="center"/>
      <style:text-properties fo:color="#ffffff" loext:opacity="100%" fo:font-size="12pt" fo:font-weight="bold" style:font-size-asian="12pt" style:font-weight-asian="bold" style:font-size-complex="12pt" style:font-weight-complex="bold"/>
    </style:style>
    <style:style style:name="P140" style:family="paragraph">
      <loext:graphic-properties draw:fill="solid" draw:fill-color="#f2ffd9" draw:opacity="75%"/>
      <style:paragraph-properties fo:margin-left="0cm" fo:margin-right="0cm" fo:margin-top="0cm" fo:margin-bottom="0cm" fo:line-height="100%" fo:text-align="center" fo:text-indent="0cm"/>
      <style:text-properties style:use-window-font-color="true" loext:opacity="0%" fo:font-weight="normal" style:font-weight-asian="normal" style:font-weight-complex="normal"/>
    </style:style>
    <style:style style:name="P141" style:family="paragraph">
      <style:paragraph-properties fo:text-align="center"/>
      <style:text-properties fo:color="#ffffff" loext:opacity="100%" fo:font-size="10pt" style:font-size-asian="10pt" style:font-size-complex="10pt"/>
    </style:style>
    <style:style style:name="P142" style:family="paragraph">
      <loext:graphic-properties draw:fill="solid" draw:fill-color="#70ae61"/>
      <style:paragraph-properties fo:text-align="center" style:writing-mode="lr-tb"/>
      <style:text-properties fo:color="#ffffff" loext:opacity="100%" fo:font-size="10pt" style:font-size-asian="10pt" style:font-size-complex="10pt"/>
    </style:style>
    <style:style style:name="P143" style:family="paragraph">
      <loext:graphic-properties draw:fill="solid" draw:fill-color="#6390c2"/>
      <style:paragraph-properties fo:text-align="center" style:writing-mode="lr-tb"/>
      <style:text-properties fo:font-size="10pt" style:font-size-asian="10pt" style:font-size-complex="10pt"/>
    </style:style>
    <style:style style:name="P144" style:family="paragraph">
      <style:paragraph-properties fo:margin-left="0cm" fo:margin-right="0cm" fo:text-align="center" fo:text-indent="0cm"/>
      <style:text-properties fo:color="#ffffff" loext:opacity="100%" fo:font-size="10pt" style:font-size-asian="10pt" style:font-size-complex="10pt"/>
    </style:style>
    <style:style style:name="P145" style:family="paragraph">
      <loext:graphic-properties draw:fill="solid" draw:fill-color="#70ae61"/>
      <style:paragraph-properties fo:text-align="center"/>
      <style:text-properties fo:color="#ffffff" loext:opacity="100%" fo:font-size="8pt" style:font-size-asian="8pt" style:font-size-complex="8pt"/>
    </style:style>
    <style:style style:name="P146" style:family="paragraph">
      <loext:graphic-properties draw:fill="none" draw:fill-color="#ffffff"/>
      <style:text-properties fo:color="#ffffff" loext:opacity="100%" fo:font-size="8pt" style:font-size-asian="8pt" style:font-size-complex="8pt"/>
    </style:style>
    <style:style style:name="P147" style:family="paragraph">
      <style:paragraph-properties fo:text-align="center"/>
      <style:text-properties fo:color="#ffffff" loext:opacity="100%" fo:font-size="12pt" fo:font-weight="bold" style:font-size-asian="12pt" style:font-weight-asian="bold" style:font-size-complex="12pt" style:font-weight-complex="bold"/>
    </style:style>
    <style:style style:name="P148" style:family="paragraph">
      <loext:graphic-properties draw:fill="solid" draw:fill-color="#70ae61"/>
      <style:paragraph-properties fo:text-align="center" style:writing-mode="lr-tb"/>
      <style:text-properties fo:color="#ffffff" loext:opacity="100%" fo:font-size="12pt" fo:font-weight="bold" style:font-size-asian="12pt" style:font-weight-asian="bold" style:font-size-complex="12pt" style:font-weight-complex="bold"/>
    </style:style>
    <style:style style:name="P149" style:family="paragraph">
      <style:paragraph-properties fo:margin-left="0cm" fo:margin-right="0cm" fo:margin-top="0cm" fo:margin-bottom="0cm" fo:line-height="100%" fo:text-align="center" fo:text-indent="0cm"/>
      <style:text-properties fo:color="#ffffff" loext:opacity="100%" fo:font-size="10pt" fo:font-weight="bold" style:font-size-asian="10pt" style:font-weight-asian="bold" style:font-size-complex="10pt" style:font-weight-complex="bold"/>
    </style:style>
    <style:style style:name="P150" style:family="paragraph">
      <loext:graphic-properties draw:fill="solid" draw:fill-color="#70ae61"/>
      <style:paragraph-properties fo:text-align="center" style:writing-mode="lr-tb"/>
      <style:text-properties fo:color="#ffffff" loext:opacity="100%" fo:font-size="10pt" fo:font-weight="bold" style:font-size-asian="10pt" style:font-weight-asian="bold" style:font-size-complex="10pt" style:font-weight-complex="bold"/>
    </style:style>
    <style:style style:name="P151" style:family="paragraph">
      <style:paragraph-properties fo:margin-top="0.42cm" fo:margin-bottom="0.35cm" fo:text-align="center"/>
      <style:text-properties fo:font-size="14pt" fo:font-weight="bold" style:font-size-asian="14pt" style:font-weight-asian="bold" style:font-size-complex="14pt" style:font-weight-complex="bold"/>
    </style:style>
    <style:style style:name="P152" style:family="paragraph">
      <loext:graphic-properties draw:fill="solid" draw:fill-color="#6390c2"/>
      <style:paragraph-properties fo:margin-top="0.42cm" fo:margin-bottom="0.35cm" fo:text-align="center" style:writing-mode="lr-tb"/>
      <style:text-properties fo:font-size="14pt" fo:font-weight="bold" style:font-size-asian="14pt" style:font-weight-asian="bold" style:font-size-complex="14pt" style:font-weight-complex="bold"/>
    </style:style>
    <style:style style:name="P153" style:family="paragraph">
      <style:paragraph-properties fo:margin-left="0cm" fo:margin-right="0cm" fo:margin-top="0cm" fo:margin-bottom="0cm" fo:line-height="100%" fo:text-align="center" fo:text-indent="0cm"/>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P154"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P155" style:family="paragraph">
      <style:paragraph-properties fo:margin-top="0.42cm" fo:margin-bottom="0.35cm" fo:text-align="center"/>
      <style:text-properties fo:font-size="10pt" style:font-size-asian="10pt" style:font-size-complex="10pt"/>
    </style:style>
    <style:style style:name="P156" style:family="paragraph">
      <loext:graphic-properties draw:fill="solid" draw:fill-color="#6390c2"/>
      <style:paragraph-properties fo:margin-top="0.42cm" fo:margin-bottom="0.35cm" fo:text-align="center" style:writing-mode="lr-tb"/>
      <style:text-properties fo:font-size="10pt" style:font-size-asian="10pt" style:font-size-complex="10pt"/>
    </style:style>
    <style:style style:name="P157" style:family="paragraph">
      <style:paragraph-properties fo:margin-left="0cm" fo:margin-right="0cm" fo:text-align="center" fo:text-indent="0cm"/>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58"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59" style:family="paragraph">
      <loext:graphic-properties draw:fill="solid" draw:fill-color="#808080" draw:opacity="75%"/>
      <style:paragraph-properties fo:text-align="center" style:writing-mode="lr-tb"/>
      <style:text-properties fo:color="#ffffff" loext:opacity="100%" fo:font-size="10pt" fo:font-weight="bold" fo:background-color="#ffffff" style:font-size-asian="10pt" style:font-weight-asian="bold" style:font-size-complex="10pt" style:font-weight-complex="bold"/>
    </style:style>
    <style:style style:name="P160" style:family="paragraph">
      <style:paragraph-properties fo:margin-top="0.42cm" fo:margin-bottom="0.35cm" fo:text-align="center"/>
      <style:text-properties fo:font-size="8pt" style:font-size-asian="8pt" style:font-size-complex="8pt"/>
    </style:style>
    <style:style style:name="P161" style:family="paragraph">
      <loext:graphic-properties draw:fill="solid" draw:fill-color="#f6f5f8"/>
      <style:paragraph-properties fo:margin-top="0.42cm" fo:margin-bottom="0.35cm" fo:text-align="center" style:writing-mode="lr-tb"/>
      <style:text-properties fo:font-size="8pt" style:font-size-asian="8pt" style:font-size-complex="8pt"/>
    </style:style>
    <style:style style:name="P162" style:family="paragraph">
      <loext:graphic-properties draw:fill="solid" draw:fill-color="#345d95"/>
      <style:paragraph-properties fo:text-align="center"/>
    </style:style>
    <style:style style:name="P163" style:family="paragraph">
      <loext:graphic-properties draw:fill="none" draw:fill-color="#ffffff"/>
      <style:paragraph-properties fo:text-align="center"/>
      <style:text-properties fo:font-size="8pt" style:font-size-asian="8pt" style:font-size-complex="8pt"/>
    </style:style>
    <style:style style:name="P164" style:family="paragraph">
      <loext:graphic-properties draw:fill="none" draw:fill-color="#ffffff"/>
      <style:text-properties fo:color="#f45f74" loext:opacity="100%" fo:font-size="8pt" style:font-size-asian="8pt" style:font-size-complex="8pt"/>
    </style:style>
    <style:style style:name="P165" style:family="paragraph">
      <style:paragraph-properties fo:margin-left="0cm" fo:margin-right="0cm" fo:margin-top="0.42cm" fo:margin-bottom="0.35cm" fo:line-height="100%" fo:text-indent="0cm"/>
    </style:style>
    <style:style style:name="P166" style:family="paragraph">
      <loext:graphic-properties draw:fill="none"/>
      <style:paragraph-properties fo:margin-left="0cm" fo:margin-right="0cm" fo:margin-top="0.42cm" fo:margin-bottom="0.35cm" fo:line-height="100%" fo:text-indent="0cm"/>
      <style:text-properties fo:font-size="8pt" style:font-size-asian="8pt" style:font-size-complex="8pt"/>
    </style:style>
    <style:style style:name="P167" style:family="paragraph">
      <loext:graphic-properties draw:fill="none" draw:fill-color="#ffffff"/>
      <style:paragraph-properties fo:text-align="center"/>
      <style:text-properties fo:font-size="10pt" fo:font-weight="bold" style:font-size-asian="10pt" style:font-weight-asian="bold" style:font-size-complex="10pt" style:font-weight-complex="bold"/>
    </style:style>
    <style:style style:name="P168" style:family="paragraph">
      <loext:graphic-properties draw:fill="none" draw:fill-color="#ffffff"/>
      <style:paragraph-properties fo:text-align="center"/>
      <style:text-properties fo:color="#00b0be" loext:opacity="100%" fo:font-size="15pt" fo:font-weight="bold" fo:background-color="transparent" style:font-size-asian="15pt" style:font-weight-asian="bold" style:font-size-complex="15pt" style:font-weight-complex="bold"/>
    </style:style>
    <style:style style:name="P169" style:family="paragraph">
      <loext:graphic-properties draw:fill="none" draw:fill-color="#ffffff"/>
      <style:text-properties fo:color="#00b0be" loext:opacity="100%" fo:font-size="15pt" fo:font-weight="bold" fo:background-color="transparent" style:font-size-asian="15pt" style:font-weight-asian="bold" style:font-size-complex="15pt" style:font-weight-complex="bold"/>
    </style:style>
    <style:style style:name="P170" style:family="paragraph">
      <loext:graphic-properties draw:fill="none" draw:fill-color="#ffffff"/>
      <style:text-properties fo:font-size="10pt" fo:font-weight="bold" style:font-size-asian="10pt" style:font-weight-asian="bold" style:font-size-complex="10pt" style:font-weight-complex="bold"/>
    </style:style>
    <style:style style:name="P171" style:family="paragraph">
      <loext:graphic-properties draw:fill="solid" draw:fill-color="#e8995a"/>
      <style:paragraph-properties fo:text-align="center" style:writing-mode="lr-tb"/>
      <style:text-properties fo:font-size="10pt" style:font-size-asian="10pt" style:font-size-complex="10pt"/>
    </style:style>
    <style:style style:name="P17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74"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8.7000007629395pt" fo:font-style="normal" fo:text-shadow="none" style:text-underline-style="none" fo:font-weight="normal" style:text-underline-mode="continuous" style:text-overline-mode="continuous" style:text-line-through-mode="continuous" style:font-name-asian="Arial" style:font-size-asian="18.7000007629395pt" style:font-name-complex="Arial" style:font-size-complex="18.7000007629395pt" style:text-scale="100%" style:text-overline-style="none" style:text-overline-color="font-color"/>
    </style:style>
    <style:style style:name="P175"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5.8000001907349pt" fo:font-style="italic" fo:text-shadow="none" style:text-underline-style="none" fo:font-weight="normal" style:text-underline-mode="continuous" style:text-overline-mode="continuous" style:text-line-through-mode="continuous" style:font-name-asian="Arial" style:font-size-asian="15.8000001907349pt" style:font-name-complex="Arial" style:font-size-complex="15.8000001907349pt" style:text-scale="100%" style:text-overline-style="none" style:text-overline-color="font-color"/>
    </style:style>
    <style:style style:name="P176" style:family="paragraph">
      <loext:graphic-properties draw:fill="solid" draw:fill-color="#333333"/>
      <style:paragraph-properties fo:text-align="center"/>
    </style:style>
    <style:style style:name="P177" style:family="paragraph">
      <loext:graphic-properties draw:fill="solid" draw:fill-color="#ffffff"/>
      <style:paragraph-properties fo:text-align="center"/>
    </style:style>
    <style:style style:name="P178" style:family="paragraph">
      <loext:graphic-properties draw:fill="solid" draw:fill-color="#cfe8fa"/>
      <style:paragraph-properties fo:text-align="center"/>
    </style:style>
    <style:style style:name="P179" style:family="paragraph">
      <loext:graphic-properties draw:fill="none" draw:fill-color="#cfe8fa"/>
      <style:paragraph-properties fo:text-align="center"/>
    </style:style>
    <style:style style:name="P180"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21pt" fo:font-style="normal" fo:text-shadow="none" style:text-underline-style="none" fo:font-weight="normal" style:text-underline-mode="continuous" style:text-overline-mode="continuous" style:text-line-through-mode="continuous" style:font-name-asian="Arial" style:font-size-asian="21pt" style:font-name-complex="Arial" style:font-size-complex="21pt" style:text-scale="100%" style:text-overline-style="none" style:text-overline-color="font-color"/>
    </style:style>
    <style:style style:name="P181" style:family="paragraph">
      <loext:graphic-properties draw:fill="solid" draw:fill-color="#bfe3bd"/>
      <style:paragraph-properties fo:text-align="center"/>
    </style:style>
    <style:style style:name="P182" style:family="paragraph">
      <loext:graphic-properties draw:fill="none" draw:fill-color="#bfe3bd"/>
      <style:paragraph-properties fo:text-align="center"/>
    </style:style>
    <style:style style:name="P183" style:family="paragraph">
      <loext:graphic-properties draw:fill="solid" draw:fill-color="#222222"/>
      <style:paragraph-properties fo:text-align="center"/>
      <style:text-properties fo:color="#222222" loext:opacity="100%" style:text-outline="false" style:text-line-through-style="none" style:text-line-through-type="none" style:font-name="Arial" fo:font-size="11.3000001907349pt" fo:font-style="italic" fo:text-shadow="none" style:text-underline-style="none" fo:font-weight="normal" style:text-underline-mode="continuous" style:text-overline-mode="continuous" style:text-line-through-mode="continuous" style:font-name-asian="Arial" style:font-size-asian="11.3000001907349pt" style:font-name-complex="Arial" style:font-size-complex="11.3000001907349pt" style:text-scale="100%" style:text-overline-style="none" style:text-overline-color="font-color"/>
    </style:style>
    <style:style style:name="P184" style:family="paragraph">
      <loext:graphic-properties draw:fill="solid" draw:fill-color="#d36b42"/>
      <style:paragraph-properties fo:text-align="center"/>
    </style:style>
    <style:style style:name="P185" style:family="paragraph">
      <loext:graphic-properties draw:fill="solid" draw:fill-color="#f7d682"/>
      <style:paragraph-properties fo:text-align="center"/>
    </style:style>
    <style:style style:name="P186" style:family="paragraph">
      <loext:graphic-properties draw:fill="none" draw:fill-color="#f7d682"/>
      <style:paragraph-properties fo:text-align="center"/>
    </style:style>
    <style:style style:name="P187" style:family="paragraph">
      <loext:graphic-properties draw:fill="solid" draw:fill-color="#d6cce4"/>
      <style:paragraph-properties fo:text-align="center"/>
    </style:style>
    <style:style style:name="P188" style:family="paragraph">
      <loext:graphic-properties draw:fill="none" draw:fill-color="#d6cce4"/>
      <style:paragraph-properties fo:text-align="center"/>
    </style:style>
    <style:style style:name="P189" style:family="paragraph">
      <loext:graphic-properties draw:fill="none" draw:fill-color="#ffffff"/>
      <style:text-properties fo:font-size="18pt" style:font-size-asian="18pt" style:font-size-complex="18pt"/>
    </style:style>
    <style:style style:name="P190" style:family="paragraph">
      <loext:graphic-properties draw:fill="solid" draw:fill-color="#accda1" draw:opacity="50%"/>
      <style:paragraph-properties fo:text-align="center"/>
    </style:style>
    <style:style style:name="P191" style:family="paragraph">
      <loext:graphic-properties draw:fill="solid" draw:fill-color="#b4d2ea" draw:opacity="50%"/>
      <style:paragraph-properties fo:text-align="center"/>
    </style:style>
    <style:style style:name="P192" style:family="paragraph">
      <loext:graphic-properties draw:fill="none" draw:fill-color="#ffffff"/>
      <style:paragraph-properties fo:text-align="center"/>
      <style:text-properties fo:color="#00b0be" loext:opacity="100%" fo:font-size="20pt" fo:font-weight="bold" fo:background-color="transparent" style:font-size-asian="20pt" style:font-weight-asian="bold" style:font-size-complex="20pt" style:font-weight-complex="bold"/>
    </style:style>
    <style:style style:name="P193" style:family="paragraph">
      <loext:graphic-properties draw:fill="none" draw:fill-color="#ffffff"/>
      <style:text-properties fo:font-size="10pt" style:font-size-asian="10pt" style:font-size-complex="10pt"/>
    </style:style>
    <style:style style:name="P194" style:family="paragraph">
      <loext:graphic-properties draw:fill="none" draw:fill-color="#ffffff"/>
      <style:paragraph-properties fo:text-align="center"/>
      <style:text-properties fo:color="#ffffff" loext:opacity="100%" fo:font-size="8pt" style:font-size-asian="8pt" style:font-size-complex="8pt"/>
    </style:style>
    <style:style style:name="P195" style:family="paragraph">
      <loext:graphic-properties draw:fill="none" draw:fill-color="#ffffff"/>
      <style:text-properties fo:color="#ffffff" loext:opacity="100%" fo:font-size="8pt" fo:font-weight="bold" style:font-size-asian="8pt" style:font-weight-asian="bold" style:font-size-complex="8pt" style:font-weight-complex="bold"/>
    </style:style>
    <style:style style:name="P196" style:family="paragraph">
      <loext:graphic-properties draw:fill="none"/>
      <style:text-properties fo:font-weight="bold" style:font-weight-asian="bold" style:font-weight-complex="bold"/>
    </style:style>
    <style:style style:name="P197" style:family="paragraph">
      <loext:graphic-properties draw:fill="none" draw:fill-color="#ffffff"/>
      <style:paragraph-properties fo:margin-left="0cm" fo:margin-right="0cm" fo:margin-top="0cm" fo:margin-bottom="0cm" fo:line-height="100%" fo:text-align="center" fo:text-indent="0cm"/>
      <style:text-properties fo:color="#bb63c2" loext:opacity="100%" fo:font-size="16pt" fo:background-color="#6390c2" style:font-size-asian="16pt" style:font-size-complex="16pt"/>
    </style:style>
    <style:style style:name="P198" style:family="paragraph">
      <loext:graphic-properties draw:fill="solid" draw:fill-color="#f4b183"/>
      <style:paragraph-properties fo:text-align="center"/>
    </style:style>
    <style:style style:name="P199" style:family="paragraph">
      <loext:graphic-properties draw:fill="none" draw:fill-color="#f4b183"/>
      <style:paragraph-properties fo:text-align="center"/>
    </style:style>
    <style:style style:name="P200" style:family="paragraph">
      <loext:graphic-properties draw:fill="solid" draw:fill-color="#c96b5f"/>
      <style:paragraph-properties fo:text-align="center"/>
    </style:style>
    <style:style style:name="P201" style:family="paragraph">
      <loext:graphic-properties draw:fill="none" draw:fill-color="#c96b5f"/>
      <style:paragraph-properties fo:text-align="center"/>
    </style:style>
    <style:style style:name="P202" style:family="paragraph">
      <loext:graphic-properties draw:fill="solid" draw:fill-color="#7f3f3f"/>
      <style:paragraph-properties fo:text-align="center"/>
    </style:style>
    <style:style style:name="P203" style:family="paragraph">
      <loext:graphic-properties draw:fill="solid" draw:fill-color="#a8dadc"/>
      <style:paragraph-properties fo:text-align="center"/>
    </style:style>
    <style:style style:name="P204" style:family="paragraph">
      <loext:graphic-properties draw:fill="none" draw:fill-color="#a8dadc"/>
      <style:paragraph-properties fo:text-align="center"/>
    </style:style>
    <style:style style:name="P205" style:family="paragraph">
      <loext:graphic-properties draw:fill="solid" draw:fill-color="#263238"/>
      <style:paragraph-properties fo:text-align="center"/>
    </style:style>
    <style:style style:name="P206" style:family="paragraph">
      <loext:graphic-properties draw:fill="none" draw:fill-color="#ffffff"/>
      <style:text-properties fo:color="#263238" loext:opacity="100%" style:text-outline="false" style:text-line-through-style="none" style:text-line-through-type="none" style:font-name="Arial" fo:font-size="12.1999998092651pt" fo:font-style="normal" fo:text-shadow="none" style:text-underline-style="none" fo:font-weight="normal" style:text-underline-mode="continuous" style:text-overline-mode="continuous" style:text-line-through-mode="continuous" style:font-name-asian="Arial" style:font-size-asian="12.1999998092651pt" style:font-name-complex="Arial" style:font-size-complex="12.1999998092651pt" style:text-scale="100%" style:text-overline-style="none" style:text-overline-color="font-color"/>
    </style:style>
    <style:style style:name="P207" style:family="paragraph">
      <loext:graphic-properties draw:fill="none" draw:fill-color="#ffffff"/>
      <style:text-properties fo:color="#ffffff" loext:opacity="100%" style:text-outline="false" style:text-line-through-style="none" style:text-line-through-type="none" style:font-name="Arial" fo:font-size="9.39999961853027pt" fo:font-style="normal" fo:text-shadow="none" style:text-underline-style="none" fo:font-weight="bold" style:text-underline-mode="continuous" style:text-overline-mode="continuous" style:text-line-through-mode="continuous" style:font-name-asian="Arial" style:font-size-asian="9.39999961853027pt" style:font-weight-asian="bold" style:font-name-complex="Arial" style:font-size-complex="9.39999961853027pt" style:font-weight-complex="bold" style:text-scale="100%" style:text-overline-style="none" style:text-overline-color="font-color"/>
    </style:style>
    <style:style style:name="P208" style:family="paragraph">
      <loext:graphic-properties draw:fill="none" draw:fill-color="#ffffff"/>
      <style:text-properties fo:color="#263238" loext:opacity="100%" style:text-outline="false" style:text-line-through-style="none" style:text-line-through-type="none" style:font-name="Arial" fo:font-size="9.39999961853027pt" fo:font-style="normal" fo:text-shadow="none" style:text-underline-style="none" fo:font-weight="normal" style:text-underline-mode="continuous" style:text-overline-mode="continuous" style:text-line-through-mode="continuous" style:font-name-asian="Arial" style:font-size-asian="9.39999961853027pt" style:font-name-complex="Arial" style:font-size-complex="9.39999961853027pt" style:text-scale="100%" style:text-overline-style="none" style:text-overline-color="font-color"/>
    </style:style>
    <style:style style:name="P209" style:family="paragraph">
      <loext:graphic-properties draw:fill="solid" draw:fill-color="#ff5128"/>
      <style:paragraph-properties fo:margin-left="0cm" fo:margin-right="0cm" fo:margin-top="0.42cm" fo:margin-bottom="0.35cm" fo:line-height="100%" fo:text-align="center" fo:text-indent="0cm" style:writing-mode="lr-tb"/>
    </style:style>
    <style:style style:name="P210" style:family="paragraph">
      <loext:graphic-properties draw:fill="solid" draw:fill-color="#f45f74"/>
      <style:paragraph-properties fo:text-align="center" style:writing-mode="lr-tb"/>
    </style:style>
    <style:style style:name="P211" style:family="paragraph">
      <loext:graphic-properties draw:fill="solid" draw:fill-color="#6390c2"/>
      <style:paragraph-properties fo:text-align="center"/>
      <style:text-properties style:use-window-font-color="true" loext:opacity="0%" fo:font-size="12pt" style:font-size-asian="18pt" style:font-size-complex="12pt"/>
    </style:style>
    <style:style style:name="P212" style:family="paragraph">
      <loext:graphic-properties draw:fill="none" draw:fill-color="#ffffff"/>
      <style:text-properties fo:color="#00b0be" loext:opacity="100%" fo:font-size="10pt" fo:font-weight="bold" style:font-size-asian="10pt" style:font-weight-asian="bold" style:font-size-complex="10pt" style:font-weight-complex="bold"/>
    </style:style>
    <style:style style:name="P213" style:family="paragraph">
      <style:paragraph-properties fo:margin-left="0cm" fo:margin-right="0cm" fo:margin-top="0cm" fo:margin-bottom="0cm" fo:line-height="100%" fo:text-indent="0cm"/>
      <style:text-properties fo:font-weight="bold" style:font-weight-asian="bold" style:font-weight-complex="bold"/>
    </style:style>
    <style:style style:name="P214" style:family="paragraph">
      <style:paragraph-properties fo:text-align="center"/>
      <style:text-properties fo:color="#ffffff" loext:opacity="100%" fo:font-size="10pt" fo:font-weight="bold" style:font-size-asian="10pt" style:font-weight-asian="bold" style:font-size-complex="10pt" style:font-weight-complex="bold"/>
    </style:style>
    <style:style style:name="P215" style:family="paragraph">
      <style:paragraph-properties fo:margin-left="0cm" fo:margin-right="0cm" fo:text-align="center" fo:text-indent="0cm"/>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P216" style:family="paragraph">
      <loext:graphic-properties draw:fill="none" draw:fill-color="#ffffff"/>
      <style:text-properties fo:font-size="20pt" fo:font-weight="bold" style:font-size-asian="20pt" style:font-weight-asian="bold" style:font-size-complex="20pt" style:font-weight-complex="bold"/>
    </style:style>
    <style:style style:name="P217" style:family="paragraph">
      <loext:graphic-properties draw:fill="none" draw:fill-color="#ffffff"/>
      <style:text-properties fo:font-size="20pt" style:font-size-asian="20pt" style:font-size-complex="20pt"/>
    </style:style>
    <style:style style:name="P218" style:family="paragraph">
      <style:paragraph-properties fo:margin-left="0cm" fo:margin-right="0cm" fo:margin-top="0cm" fo:margin-bottom="0cm" fo:line-height="100%" fo:text-indent="0cm"/>
    </style:style>
    <style:style style:name="T1" style:family="text">
      <style:text-properties fo:font-variant="normal" fo:text-transform="none" fo:color="#000000" loext:opacity="100%" style:text-outline="false" style:text-line-through-style="none" style:text-line-through-type="none" style:font-name="Liberation Sans" fo:font-size="10pt"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 style:family="text">
      <style:text-properties fo:color="#000000" loext:opacity="100%" fo:font-size="10pt" fo:font-weight="normal" style:font-size-asian="10pt" style:font-weight-asian="normal" style:font-size-complex="10pt" style:font-weight-complex="normal"/>
    </style:style>
    <style:style style:name="T3" style:family="text">
      <style:text-properties fo:color="#ffffff" loext:opacity="100%" fo:font-size="10pt" fo:font-weight="bold" style:font-size-asian="10pt" style:font-weight-asian="bold" style:font-size-complex="10pt" style:font-weight-complex="bold"/>
    </style:style>
    <style:style style:name="T4" style:family="text">
      <style:text-properties fo:font-size="8pt" style:font-size-asian="8pt" style:font-size-complex="8pt"/>
    </style:style>
    <style:style style:name="T5" style:family="text">
      <style:text-properties fo:color="#000000" loext:opacity="100%" style:font-name="Liberation Sans" fo:font-size="10pt" fo:language="en" fo:country="US" style:letter-kerning="true" fo:background-color="transparent" style:font-name-asian="Noto Sans CJK SC" style:font-size-asian="10pt" style:font-name-complex="Lohit Devanagari" style:font-size-complex="10pt"/>
    </style:style>
    <style:style style:name="T6" style:family="text">
      <style:text-properties fo:color="#000000" loext:opacity="100%" fo:font-size="8pt" fo:font-weight="normal" style:font-size-asian="8pt" style:font-weight-asian="normal" style:font-size-complex="8pt" style:font-weight-complex="normal"/>
    </style:style>
    <style:style style:name="T7" style:family="text">
      <style:text-properties fo:color="#d86a50" loext:opacity="100%" fo:font-size="16pt" fo:font-weight="bold" style:font-size-asian="16pt" style:font-weight-asian="bold" style:font-size-complex="16pt" style:font-weight-complex="bold"/>
    </style:style>
    <style:style style:name="T8" style:family="text">
      <style:text-properties fo:color="#345d95" loext:opacity="100%" fo:font-size="16pt" fo:font-weight="bold" style:font-size-asian="16pt" style:font-weight-asian="bold" style:font-size-complex="16pt" style:font-weight-complex="bold"/>
    </style:style>
    <style:style style:name="T9" style:family="text">
      <style:text-properties style:use-window-font-color="true" loext:opacity="0%" style:font-name="Liberation Sans" fo:font-size="8pt" fo:language="en" fo:country="US" style:letter-kerning="true" fo:background-color="transparent" style:font-name-asian="Noto Sans CJK SC" style:font-size-asian="8pt" style:font-name-complex="Lohit Devanagari" style:font-size-complex="8pt"/>
    </style:style>
    <style:style style:name="T10" style:family="text">
      <style:text-properties fo:font-variant="normal" fo:text-transform="none" style:use-window-font-color="true" loext:opacity="0%" style:text-outline="false" style:text-line-through-style="none" style:text-line-through-type="none" style:font-name="Liberation Sans" fo:font-size="8pt" fo:language="en" fo:country="US"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1" style:family="text">
      <style:text-properties fo:color="#ffffff" loext:opacity="100%" fo:font-weight="bold" style:font-weight-asian="bold" style:font-weight-complex="bold"/>
    </style:style>
    <style:style style:name="T12" style:family="text">
      <style:text-properties fo:font-size="10pt" style:font-size-asian="10pt" style:font-size-complex="10pt"/>
    </style:style>
    <style:style style:name="T13" style:family="text">
      <style:text-properties style:text-position="sub 58%" fo:font-size="10pt" style:font-size-asian="10pt" style:font-size-complex="10pt"/>
    </style:style>
    <style:style style:name="T14" style:family="text">
      <style:text-properties style:text-position="super 58%" fo:font-size="10pt" style:font-size-asian="10pt" style:font-size-complex="10pt"/>
    </style:style>
    <style:style style:name="T15" style:family="text">
      <style:text-properties fo:font-variant="normal" fo:text-transform="none" fo:color="#000000"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font-name="JetBrains Mono" fo:font-size="10pt" fo:language="en" fo:country="US" fo:font-style="normal" fo:text-shadow="none" style:text-underline-style="none" fo:font-weight="normal" style:letter-kerning="true" style:font-name-asian="JetBrains Mono" style:font-size-asian="10pt" style:font-style-asian="normal" style:font-weight-asian="normal" style:font-name-complex="JetBrains Mono" style:font-size-complex="10pt" style:font-style-complex="normal" style:font-weight-complex="normal" style:text-emphasize="none" style:font-relief="none" style:text-overline-style="none" style:text-overline-color="font-color"/>
    </style:style>
    <style:style style:name="T17" style:family="text">
      <style:text-properties fo:font-weight="bold" style:font-weight-asian="bold" style:font-weight-complex="bold"/>
    </style:style>
    <style:style style:name="T18" style:family="text">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style:text-position="33% 58%" fo:font-size="12pt" fo:font-weight="normal" style:font-size-asian="12pt" style:font-weight-asian="normal" style:font-size-complex="12pt" style:font-weight-complex="normal"/>
    </style:style>
    <style:style style:name="T21" style:family="text">
      <style:text-properties fo:language="en" fo:country="US"/>
    </style:style>
    <style:style style:name="T22" style:family="text">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23" style:family="text">
      <style:text-properties style:font-name="Liberation Sans" fo:font-size="12pt" fo:language="en" fo:country="US" fo:font-weight="normal" style:letter-kerning="true" style:font-name-asian="Noto Sans CJK SC" style:font-size-asian="12pt" style:font-weight-asian="normal" style:font-name-complex="Lohit Devanagari" style:font-size-complex="12pt" style:font-weight-complex="normal"/>
    </style:style>
    <style:style style:name="T24" style:family="text">
      <style:text-properties fo:font-variant="normal" fo:text-transform="none" fo:color="#080808"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5" style:family="text">
      <style:text-properties fo:color="#ffffff" loext:opacity="100%" style:font-name="Liberation Sans" fo:font-size="12pt" fo:language="en" fo:country="US" style:letter-kerning="true" style:font-name-asian="Noto Sans CJK SC" style:font-size-asian="18pt" style:font-name-complex="Lohit Devanagari" style:font-size-complex="12pt"/>
    </style:style>
    <style:style style:name="T26" style:family="text">
      <style:text-properties fo:font-weight="normal" style:font-weight-asian="normal" style:font-weight-complex="normal"/>
    </style:style>
    <style:style style:name="T27" style:family="text">
      <style:text-properties style:font-name="Liberation Sans" fo:font-size="12pt" fo:language="en" fo:country="US" style:letter-kerning="true" style:font-name-asian="Noto Sans CJK SC" style:font-size-asian="18pt" style:font-name-complex="Lohit Devanagari" style:font-size-complex="12pt"/>
    </style:style>
    <style:style style:name="T28" style:family="text">
      <style:text-properties fo:font-variant="normal" fo:text-transform="none" fo:color="#080808"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29" style:family="text">
      <style:text-properties fo:color="#000000" loext:opacity="100%" style:font-name="Liberation Sans" fo:font-size="12pt" fo:language="en" fo:country="US" style:letter-kerning="true" style:font-name-asian="Noto Sans CJK SC" style:font-size-asian="18pt" style:font-name-complex="Lohit Devanagari" style:font-size-complex="12pt"/>
    </style:style>
    <style:style style:name="T30" style:family="text">
      <style:text-properties fo:font-size="18pt" fo:text-shadow="none" fo:font-weight="normal" style:font-size-asian="18pt" style:font-weight-asian="normal" style:font-size-complex="18pt" style:font-weight-complex="normal"/>
    </style:style>
    <style:style style:name="T31" style:family="text">
      <style:text-properties fo:font-size="18pt" fo:text-shadow="none" fo:font-weight="bold" style:font-size-asian="18pt" style:font-weight-asian="bold" style:font-size-complex="18pt" style:font-weight-complex="bold"/>
    </style:style>
    <style:style style:name="T32" style:family="text">
      <style:text-properties style:font-name="Calibri" fo:font-size="12pt" fo:font-weight="bold" style:font-size-asian="12pt" style:font-weight-asian="bold" style:font-size-complex="12pt" style:font-weight-complex="bold"/>
    </style:style>
    <style:style style:name="T33" style:family="text">
      <style:text-properties fo:color="#00a65d" loext:opacity="100%" fo:font-size="16pt" fo:font-weight="bold" style:font-size-asian="16pt" style:font-weight-asian="bold" style:font-size-complex="16pt" style:font-weight-complex="bold"/>
    </style:style>
    <style:style style:name="T34" style:family="text">
      <style:text-properties fo:color="#aa55a1" loext:opacity="100%" fo:font-size="16pt" fo:font-weight="bold" style:font-size-asian="16pt" style:font-weight-asian="bold" style:font-size-complex="16pt" style:font-weight-complex="bold"/>
    </style:style>
    <style:style style:name="T35" style:family="text">
      <style:text-properties fo:color="#ffffff" loext:opacity="100%" fo:font-weight="normal" style:font-weight-asian="normal" style:font-weight-complex="normal"/>
    </style:style>
    <style:style style:name="T36" style:family="text">
      <style:text-properties fo:color="#ffffff" loext:opacity="100%" fo:font-size="10pt" fo:font-weight="normal" style:font-size-asian="10pt" style:font-weight-asian="normal" style:font-size-complex="10pt" style:font-weight-complex="normal"/>
    </style:style>
    <style:style style:name="T37" style:family="text">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T38" style:family="text">
      <style:text-properties fo:color="#ffffff" loext:opacity="100%" fo:font-size="10pt" fo:font-weight="bold" fo:background-color="#ffffff" style:font-size-asian="10pt" style:font-weight-asian="bold" style:font-size-complex="10pt" style:font-weight-complex="bold"/>
    </style:style>
    <style:style style:name="T39" style:family="text">
      <style:text-properties fo:color="#00b0be" loext:opacity="100%" fo:font-weight="bold" style:font-weight-asian="bold" style:font-weight-complex="bold"/>
    </style:style>
    <style:style style:name="T40" style:family="text">
      <style:text-properties fo:color="#6390c2" loext:opacity="100%" fo:font-weight="bold" style:font-weight-asian="bold" style:font-weight-complex="bold"/>
    </style:style>
    <style:style style:name="T41" style:family="text">
      <style:text-properties fo:color="#6390c2" loext:opacity="100%" fo:font-size="8pt" fo:font-weight="bold" style:font-size-asian="8pt" style:font-weight-asian="bold" style:font-size-complex="8pt" style:font-weight-complex="bold"/>
    </style:style>
    <style:style style:name="T42" style:family="text">
      <style:text-properties style:text-position="sub 58%" fo:font-size="8pt" style:font-size-asian="8pt" style:font-size-complex="8pt"/>
    </style:style>
    <style:style style:name="T43" style:family="text">
      <style:text-properties style:text-position="super 58%" fo:font-size="8pt" style:font-size-asian="8pt" style:font-size-complex="8pt"/>
    </style:style>
    <style:style style:name="T44" style:family="text">
      <style:text-properties style:text-position="0% 100%" fo:font-size="8pt" style:font-size-asian="8pt" style:font-size-complex="8pt"/>
    </style:style>
    <style:style style:name="T45" style:family="text">
      <style:text-properties fo:color="#ffffff" loext:opacity="100%" fo:font-size="9pt" fo:font-weight="bold" style:font-size-asian="9pt" style:font-weight-asian="bold" style:font-size-complex="9pt" style:font-weight-complex="bold"/>
    </style:style>
    <style:style style:name="T46" style:family="text">
      <style:text-properties fo:color="#ffffff" loext:opacity="100%" fo:font-size="12pt" fo:font-weight="bold" style:font-size-asian="12pt" style:font-weight-asian="bold" style:font-size-complex="12pt" style:font-weight-complex="bold"/>
    </style:style>
    <style:style style:name="T47" style:family="text">
      <style:text-properties fo:color="#ffffff" loext:opacity="100%" fo:font-size="10pt" style:font-size-asian="10pt" style:font-size-complex="10pt"/>
    </style:style>
    <style:style style:name="T48" style:family="text">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T49" style:family="text">
      <style:text-properties fo:color="#ffffff" loext:opacity="100%" fo:font-size="8pt" style:font-size-asian="8pt" style:font-size-complex="8pt"/>
    </style:style>
    <style:style style:name="T50" style:family="text">
      <style:text-properties fo:color="#ffffff" loext:opacity="100%" style:text-position="sub 58%" fo:font-size="12pt" fo:font-weight="bold" style:font-size-asian="12pt" style:font-weight-asian="bold" style:font-size-complex="12pt" style:font-weight-complex="bold"/>
    </style:style>
    <style:style style:name="T51" style:family="text">
      <style:text-properties fo:font-size="14pt" fo:font-weight="bold" style:font-size-asian="14pt" style:font-weight-asian="bold" style:font-size-complex="14pt" style:font-weight-complex="bold"/>
    </style:style>
    <style:style style:name="T52" style:family="text">
      <style:text-properties fo:color="#ffffff" loext:opacity="100%" style:font-name="Liberation Sans" fo:font-size="12pt" fo:language="en" fo:country="US" fo:font-weight="bold" style:letter-kerning="true" style:font-name-asian="Noto Sans CJK SC" style:font-size-asian="12pt" style:font-weight-asian="bold" style:font-name-complex="Lohit Devanagari" style:font-size-complex="12pt" style:font-weight-complex="bold"/>
    </style:style>
    <style:style style:name="T53" style:family="text">
      <style:text-properties fo:color="#ffffff" loext:opacity="100%" style:text-position="sub 58%" style:font-name="Liberation Sans" fo:font-size="12pt" fo:language="en" fo:country="US" fo:font-weight="bold" style:letter-kerning="true" style:font-name-asian="Noto Sans CJK SC" style:font-size-asian="12pt" style:font-weight-asian="bold" style:font-name-complex="Lohit Devanagari" style:font-size-complex="12pt" style:font-weight-complex="bold"/>
    </style:style>
    <style:style style:name="T54" style:family="text">
      <style:text-properties fo:color="#f45f74" loext:opacity="100%" fo:font-size="8pt" style:font-size-asian="8pt" style:font-size-complex="8pt"/>
    </style:style>
    <style:style style:name="T55" style:family="text">
      <style:text-properties fo:font-size="10pt" fo:font-weight="bold" style:font-size-asian="10pt" style:font-weight-asian="bold" style:font-size-complex="10pt" style:font-weight-complex="bold"/>
    </style:style>
    <style:style style:name="T56" style:family="text">
      <style:text-properties fo:color="#00b0be" loext:opacity="100%" fo:font-size="15pt" fo:font-weight="bold" fo:background-color="transparent" style:font-size-asian="15pt" style:font-weight-asian="bold" style:font-size-complex="15pt" style:font-weight-complex="bold"/>
    </style:style>
    <style:style style:name="T57" style:family="text">
      <style:text-properties fo:font-size="10pt" fo:font-weight="normal" style:font-size-asian="10pt" style:font-weight-asian="normal" style:font-size-complex="10pt" style:font-weight-complex="normal"/>
    </style:style>
    <style:style style:name="T58" style:family="text">
      <style:text-properties fo:font-variant="normal" fo:text-transform="none" style:use-window-font-color="true" loext:opacity="0%" style:text-outline="false" style:text-line-through-style="none" style:text-line-through-type="none" fo:font-size="10pt"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59" style:family="text">
      <style:text-properties fo:font-size="18pt" style:font-size-asian="18pt" style:font-size-complex="18pt"/>
    </style:style>
    <style:style style:name="T60" style:family="text">
      <style:text-properties fo:font-variant="normal" fo:text-transform="none" fo:color="#000000" loext:opacity="100%" style:text-outline="false" style:text-line-through-style="none" style:text-line-through-type="none" style:font-name="JetBrains Mono" fo:font-size="13pt" fo:language="en" fo:country="US" fo:font-style="normal" fo:text-shadow="none" style:text-underline-style="none" fo:font-weight="normal" style:letter-kerning="true" style:font-name-asian="JetBrains Mono" style:font-size-asian="13pt" style:font-style-asian="normal" style:font-weight-asian="normal" style:font-name-complex="JetBrains Mono" style:font-size-complex="13pt" style:font-style-complex="normal" style:font-weight-complex="normal" style:text-emphasize="none" style:font-relief="none" style:text-overline-style="none" style:text-overline-color="font-color"/>
    </style:style>
    <style:style style:name="T61" style:family="text">
      <style:text-properties style:text-position="sub 58%"/>
    </style:style>
    <style:style style:name="T62" style:family="text">
      <style:text-properties style:text-position="super 58%"/>
    </style:style>
    <style:style style:name="T63" style:family="text">
      <style:text-properties fo:color="#00b0be" loext:opacity="100%" fo:font-size="20pt" fo:font-weight="bold" fo:background-color="transparent" style:font-size-asian="20pt" style:font-weight-asian="bold" style:font-size-complex="20pt" style:font-weight-complex="bold"/>
    </style:style>
    <style:style style:name="T64" style:family="text">
      <style:text-properties fo:color="#ffffff" loext:opacity="100%" fo:font-size="8pt" fo:font-weight="bold" style:font-size-asian="8pt" style:font-weight-asian="bold" style:font-size-complex="8pt" style:font-weight-complex="bold"/>
    </style:style>
    <style:style style:name="T65" style:family="text">
      <style:text-properties fo:font-variant="normal" fo:text-transform="none" fo:color="#000000" loext:opacity="100%" style:text-outline="false" style:text-line-through-style="none" style:text-line-through-type="none" style:font-name="JetBrains Mono" fo:font-size="8pt" fo:language="en" fo:country="US" fo:font-style="normal" fo:text-shadow="none" style:text-underline-style="none" fo:font-weight="normal" style:letter-kerning="true" style:font-name-asian="JetBrains Mono" style:font-size-asian="8pt" style:font-style-asian="normal" style:font-weight-asian="normal" style:font-name-complex="JetBrains Mono" style:font-size-complex="8pt" style:font-style-complex="normal" style:font-weight-complex="normal" style:text-emphasize="none" style:font-relief="none" style:text-overline-style="none" style:text-overline-color="font-color"/>
    </style:style>
    <style:style style:name="T66" style:family="text">
      <style:text-properties fo:font-size="8pt" fo:font-weight="bold" style:font-size-asian="8pt" style:font-weight-asian="bold" style:font-size-complex="8pt" style:font-weight-complex="bold"/>
    </style:style>
    <style:style style:name="T67" style:family="text">
      <style:text-properties fo:font-size="8pt" fo:font-weight="normal" style:font-size-asian="8pt" style:font-weight-asian="normal" style:font-size-complex="8pt" style:font-weight-complex="normal"/>
    </style:style>
    <style:style style:name="T68" style:family="text">
      <style:text-properties fo:color="#bb63c2" loext:opacity="100%" fo:font-size="16pt" fo:font-weight="bold" style:font-size-asian="16pt" style:font-weight-asian="bold" style:font-size-complex="16pt" style:font-weight-complex="bold"/>
    </style:style>
    <style:style style:name="T69" style:family="text">
      <style:text-properties fo:color="#263238" loext:opacity="100%" style:text-outline="false" style:text-line-through-style="none" style:text-line-through-type="none" style:font-name="Arial" fo:font-size="12.1999998092651pt" fo:font-style="normal" fo:text-shadow="none" style:text-underline-style="none" fo:font-weight="normal" style:text-underline-mode="continuous" style:text-overline-mode="continuous" style:text-line-through-mode="continuous" style:font-name-asian="Arial" style:font-size-asian="12.1999998092651pt" style:font-name-complex="Arial" style:font-size-complex="12.1999998092651pt" style:text-scale="100%" style:text-overline-style="none" style:text-overline-color="font-color"/>
    </style:style>
    <style:style style:name="T70" style:family="text">
      <style:text-properties fo:color="#ffffff" loext:opacity="100%" style:text-outline="false" style:text-line-through-style="none" style:text-line-through-type="none" style:font-name="Arial" fo:font-size="9.39999961853027pt" fo:font-style="normal" fo:text-shadow="none" style:text-underline-style="none" fo:font-weight="bold" style:text-underline-mode="continuous" style:text-overline-mode="continuous" style:text-line-through-mode="continuous" style:font-name-asian="Arial" style:font-size-asian="9.39999961853027pt" style:font-weight-asian="bold" style:font-name-complex="Arial" style:font-size-complex="9.39999961853027pt" style:font-weight-complex="bold" style:text-scale="100%" style:text-overline-style="none" style:text-overline-color="font-color"/>
    </style:style>
    <style:style style:name="T71" style:family="text">
      <style:text-properties fo:color="#263238" loext:opacity="100%" style:text-outline="false" style:text-line-through-style="none" style:text-line-through-type="none" style:font-name="Arial" fo:font-size="9.39999961853027pt" fo:font-style="normal" fo:text-shadow="none" style:text-underline-style="none" fo:font-weight="normal" style:text-underline-mode="continuous" style:text-overline-mode="continuous" style:text-line-through-mode="continuous" style:font-name-asian="Arial" style:font-size-asian="9.39999961853027pt" style:font-name-complex="Arial" style:font-size-complex="9.39999961853027pt" style:text-scale="100%" style:text-overline-style="none" style:text-overline-color="font-color"/>
    </style:style>
    <style:style style:name="T72" style:family="text">
      <style:text-properties style:text-position="sub 58%" fo:font-size="10pt" fo:font-weight="bold" style:font-size-asian="10pt" style:font-weight-asian="bold" style:font-size-complex="10pt" style:font-weight-complex="bold"/>
    </style:style>
    <style:style style:name="T73" style:family="text">
      <style:text-properties fo:color="#00b0be" loext:opacity="100%" fo:font-size="10pt" fo:font-weight="bold" style:font-size-asian="10pt" style:font-weight-asian="bold" style:font-size-complex="10pt" style:font-weight-complex="bold"/>
    </style:style>
    <style:style style:name="T74" style:family="text">
      <style:text-properties fo:color="#ffffff" loext:opacity="100%" style:font-name="Liberation Sans" fo:font-size="10pt" fo:language="en" fo:country="US" fo:font-weight="bold" style:letter-kerning="true" style:font-name-asian="Noto Sans CJK SC" style:font-size-asian="10pt" style:font-weight-asian="bold" style:font-name-complex="Lohit Devanagari" style:font-size-complex="10pt" style:font-weight-complex="bold"/>
    </style:style>
    <style:style style:name="T75" style:family="text">
      <style:text-properties fo:font-size="20pt" fo:font-weight="bold" style:font-size-asian="20pt" style:font-weight-asian="bold" style:font-size-complex="20pt" style:font-weight-complex="bold"/>
    </style:style>
    <style:style style:name="T76" style:family="text">
      <style:text-properties fo:font-size="20pt" style:font-size-asian="20pt" style:font-size-complex="20pt"/>
    </style:style>
    <style:style style:name="T77" style:family="text">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6.524cm" svg:height="19.439cm" svg:x="-35.801cm" svg:y="16.682cm" svg:viewBox="0 0 26525 19440" svg:d="M744 3436c870-1773 3654-2538 5884-3040 1589-356 3293-343 4963-390 1134-32 2228 68 3311 218 962 132 1901 334 2822 563 858 211 2307 521 2453 1274 123 633 250 1076 1058 1532 642 363 919 896 1699 971 824 79 1745 105 2330 521 539 384 908 917 980 1476 82 648 252 1301 244 1953-8 591 236 1312-426 1824-613 472-862 1103-1168 1694-259 505-408 1041-613 1561-179 459-90 926-120 1391-34 503 97 1021-65 1518-169 534-269 1208-1041 1476-1397 489-2962 715-4473 999-755 140-1504 311-2269 435-890 143-1676-292-2453-523-801-237-1586-531-2451-650-742-103-1517-107-2269 42-875 171-1768 412-2694 348-739-51-1494 190-2084-478-454-512-1252-840-1717-1346-585-635-1106-1316-1473-2039-274-539-700-1045-859-1606-218-783-88-1598-244-2389-105-533-21-1073-59-1606-80-1092 341-2146 552-3212 133-689 182-2517 182-2517z">
          <text:p/>
        </draw:path>
        <draw:path draw:style-name="gr2" draw:text-style-name="P2" draw:layer="layout" svg:width="19.326cm" svg:height="11.316cm" svg:x="-32.028cm" svg:y="21.839cm" svg:viewBox="0 0 19327 11317" svg:d="M5039 264c216 42 432-41 648-50 224-10 428-61 649-68 206-8 412-14 616-17 195-3 390-9 584 0 226 10 412-90 649-85 304 7 605 7 908-34 232-30 466 15 697 34 217 17 431 63 633 170 172 91 380 53 551 186 170 132 363 230 584 270 284 51 531 230 812 305 193 52 385 116 583 152 225 41 454 74 681 101 215 27 690 122 859 264 248 210 585 33 962 97 320 54 367 240 674 312 196 47 472 128 673 145 253 22 228 144 481 130 205-11 400 42 601 51 218 9 425 88 631 152 237 75 447 261 552 491 87 190 250 349 244 575-6 209 21 416 16 626-8 355-140 696-163 1049-15 241-256 325-438 389-192 67-380 157-470 407-89 249-114 482-194 727-62 185-103 439 48 592 165 165 279 366 374 576 89 197 80 415 80 626-1 263-55 533-194 761-162 264-158 611-438 812-210 151-246 449-487 575-298 157-639 50-957 136-347 93-716 109-1070 203-341 89-664 231-1006 304-519 110-1059 79-1589 84-677 8-1367 25-2027-135-446-108-977-105-1378-406-197-147-467-154-666-305-200-151-502-41-616-355-61-171-60-349-81-525-28-246-232-434-454-489-203-51-387-178-600-187-195-9-388 74-584 51-296-35-580 62-876 67-460 8-898 108-1378 18-259-49-445-194-665-306-278-140-446-441-682-642-204-175-343-398-502-610-184-245-481-275-730-371-229-88-389-277-535-457-154-191-265-421-438-592-234-231-268-530-486-796-122-149-74-382-114-575-46-226 66-399 163-558 109-182 211-370 259-575 54-231 134-455 211-678 69-200 159-394 194-608 33-206 30-410 98-610 67-203 175-419 405-474 200-47 403-43 600-85 211-44 427-77 633-33 453 98 749-220 1102-388 201-96 363-254 552-373 174-110 364-146 552-186 59 0 119 0 178 0 59 39 118 78 178 118 10 17 22 34 32 51z">
          <text:p/>
        </draw:path>
        <draw:rect draw:style-name="gr3" draw:text-style-name="P4" xml:id="id6" draw:id="id6" draw:layer="layout" svg:width="1.824cm" svg:height="0.871cm" svg:x="-29.911cm" svg:y="24.588cm">
          <text:p text:style-name="P3"><text:span text:style-name="T1">Sensors</text:span><text:span text:style-name="T1"><text:line-break/></text:span><text:span text:style-name="T1">(receptors)</text:span></text:p>
        </draw:rect>
        <draw:rect draw:style-name="gr3" draw:text-style-name="P4" xml:id="id2" draw:id="id2" draw:layer="layout" svg:width="2.162cm" svg:height="0.775cm" svg:x="-20.89cm" svg:y="23.295cm">
          <text:p text:style-name="P5"><text:span text:style-name="T2">Perception</text:span></text:p>
        </draw:rect>
        <draw:rect draw:style-name="gr4" draw:text-style-name="P6" xml:id="id1" draw:id="id1" draw:layer="layout" svg:width="1.692cm" svg:height="0.915cm" svg:x="-16.897cm" svg:y="26.98cm">
          <text:p text:style-name="P5"><text:span text:style-name="T3">planner</text:span></text:p>
        </draw:rect>
        <draw:connector draw:style-name="gr5" draw:text-style-name="P7" draw:layer="layout" draw:type="curve" svg:x1="-16.897cm" svg:y1="27.437cm" svg:x2="-19.809cm" svg:y2="24.07cm" draw:start-shape="id1" draw:start-glue-point="3" draw:end-shape="id2" draw:end-glue-point="2" svg:d="M-16897 27437c-1942 0-2912-1122-2912-3367" svg:viewBox="0 0 2913 3368">
          <text:p text:style-name="P5"><text:span text:style-name="T4"><text:s/></text:span></text:p>
        </draw:connector>
        <draw:rect draw:style-name="gr6" draw:text-style-name="P9" xml:id="id3" draw:id="id3" draw:layer="layout" svg:width="2.442cm" svg:height="1.472cm" svg:x="-24.555cm" svg:y="26.699cm">
          <text:p text:style-name="P8"><text:span text:style-name="T5">Long term</text:span><text:span text:style-name="T5"><text:line-break/></text:span><text:span text:style-name="T5">Memory</text:span><text:span text:style-name="T5"><text:line-break/></text:span><text:span text:style-name="T5">(I.e episodic)</text:span></text:p>
        </draw:rect>
        <draw:connector draw:style-name="gr7" draw:text-style-name="P7" draw:layer="layout" draw:type="curve" svg:x1="-22.113cm" svg:y1="27.435cm" svg:x2="-16.897cm" svg:y2="27.437cm" draw:start-shape="id3" draw:start-glue-point="1" draw:end-shape="id1" draw:end-glue-point="3" svg:d="M-22113 27435c3913 0 1306 2 5216 2" svg:viewBox="0 0 5217 3">
          <text:p/>
        </draw:connector>
        <draw:connector draw:style-name="gr8" draw:text-style-name="P7" draw:layer="layout" draw:type="curve" svg:x1="-22.062cm" svg:y1="30.464cm" svg:x2="-26.845cm" svg:y2="29.402cm" draw:start-shape="id4" draw:start-glue-point="3" draw:end-shape="id5" draw:end-glue-point="1" svg:d="M-22062 30464c-3586 0-1195-1062-4783-1062" svg:viewBox="0 0 4784 1063">
          <text:p/>
        </draw:connector>
        <draw:connector draw:style-name="gr9" draw:text-style-name="P10" draw:layer="layout" draw:type="curve" svg:x1="-16.051cm" svg:y1="27.895cm" svg:x2="-19.9cm" svg:y2="30.464cm" draw:start-shape="id1" draw:start-glue-point="2" draw:end-shape="id4" draw:end-glue-point="1" svg:d="M-16051 27895c0 1713-1283 2569-3849 2569" svg:viewBox="0 0 3850 2570">
          <text:p/>
        </draw:connector>
        <draw:rect draw:style-name="gr3" draw:text-style-name="P4" xml:id="id4" draw:id="id4" draw:layer="layout" svg:width="2.162cm" svg:height="0.775cm" svg:x="-22.062cm" svg:y="30.077cm">
          <text:p text:style-name="P5"><text:span text:style-name="T2">controller</text:span></text:p>
        </draw:rect>
        <draw:rect draw:style-name="gr3" draw:text-style-name="P4" xml:id="id5" draw:id="id5" draw:layer="layout" svg:width="2.015cm" svg:height="0.775cm" svg:x="-28.86cm" svg:y="29.015cm">
          <text:p text:style-name="P5"><text:span text:style-name="T2">actuator</text:span></text:p>
        </draw:rect>
        <draw:frame draw:style-name="gr10" draw:text-style-name="P11" draw:layer="layout" svg:width="2.247cm" svg:height="1.205cm" svg:x="-18.559cm" svg:y="28.652cm">
          <draw:text-box>
            <text:p><text:span text:style-name="T6">gives plan</text:span><text:span text:style-name="T6"><text:line-break/></text:span><text:span text:style-name="T6">(one action/goal)</text:span></text:p>
          </draw:text-box>
        </draw:frame>
        <draw:connector draw:style-name="gr11" draw:text-style-name="P12" draw:layer="layout" draw:type="curve" svg:x1="-28.86cm" svg:y1="29.402cm" svg:x2="-28.999cm" svg:y2="25.459cm" draw:start-shape="id5" draw:start-glue-point="3" draw:end-shape="id6" draw:end-glue-point="2" svg:d="M-28860 29402c-751 0-626-1083-473-1402s334 126 334-2541" svg:viewBox="0 0 590 3944">
          <text:p text:style-name="P3"><text:span text:style-name="T2">Control</text:span><text:span text:style-name="T2"><text:line-break/></text:span><text:span text:style-name="T2">input</text:span></text:p>
        </draw:connector>
        <draw:frame draw:style-name="gr12" draw:text-style-name="P13" draw:layer="layout" svg:width="3.475cm" svg:height="0.878cm" svg:x="-26.337cm" svg:y="22.285cm">
          <draw:text-box>
            <text:p text:style-name="P3"><text:span text:style-name="T7">Leader</text:span></text:p>
          </draw:text-box>
        </draw:frame>
        <draw:frame draw:style-name="gr13" draw:text-style-name="P14" draw:layer="layout" svg:width="3.881cm" svg:height="0.878cm" svg:x="-33.66cm" svg:y="19.568cm">
          <draw:text-box>
            <text:p text:style-name="P3"><text:span text:style-name="T8">environment</text:span></text:p>
          </draw:text-box>
        </draw:frame>
        <draw:connector draw:style-name="gr14" draw:text-style-name="P15" draw:layer="layout" draw:type="curve" svg:x1="-28.087cm" svg:y1="25.023cm" svg:x2="-20.89cm" svg:y2="23.682cm" draw:start-shape="id6" draw:start-glue-point="1" draw:end-shape="id2" draw:end-glue-point="3" svg:d="M-28087 25023c5398 0 1800-1341 7197-1341" svg:viewBox="0 0 7198 1342">
          <text:p/>
        </draw:connector>
        <draw:frame draw:style-name="gr10" draw:text-style-name="P11" draw:layer="layout" svg:width="2.149cm" svg:height="1.205cm" svg:x="-24.848cm" svg:y="24.186cm">
          <draw:text-box>
            <text:p><text:span text:style-name="T4">state/Feedback</text:span><text:span text:style-name="T4"><text:line-break/></text:span><text:span text:style-name="T4">observation</text:span></text:p>
          </draw:text-box>
        </draw:frame>
        <draw:frame draw:style-name="gr15" draw:text-style-name="P11" draw:layer="layout" svg:width="1.495cm" svg:height="0.888cm" svg:x="-25.659cm" svg:y="29.801cm">
          <draw:text-box>
            <text:p><text:span text:style-name="T4">Control </text:span><text:span text:style-name="T4"><text:line-break/></text:span><text:span text:style-name="T4">signal</text:span></text:p>
          </draw:text-box>
        </draw:frame>
        <draw:frame draw:style-name="gr16" draw:text-style-name="P11" draw:layer="layout" svg:width="2.535cm" svg:height="1.206cm" svg:x="-21.817cm" svg:y="27.421cm">
          <draw:text-box>
            <text:p><text:span text:style-name="T9">Default life time </text:span><text:span text:style-name="T9"><text:line-break/></text:span><text:span text:style-name="T9">goal and action</text:span><text:span text:style-name="T9"><text:line-break/></text:span><text:span text:style-name="T9">tree</text:span></text:p>
          </draw:text-box>
        </draw:frame>
        <draw:connector draw:style-name="gr17" draw:text-style-name="P15" draw:layer="layout" draw:type="curve" svg:x1="-15.205cm" svg:y1="27.437cm" svg:x2="-19.9cm" svg:y2="30.464cm" draw:start-shape="id1" draw:start-glue-point="1" draw:end-shape="id4" draw:end-glue-point="1" svg:d="M-15205 27437c751 0 3099 3027-4695 3027" svg:viewBox="0 0 5618 3028">
          <text:p/>
        </draw:connector>
        <draw:frame draw:style-name="gr18" draw:text-style-name="P16" draw:layer="layout" svg:width="1.653cm" svg:height="0.569cm" svg:x="-16.032cm" svg:y="29.843cm">
          <draw:text-box>
            <text:p><text:span text:style-name="T4">feedback</text:span></text:p>
          </draw:text-box>
        </draw:frame>
        <draw:custom-shape draw:name="comment box 10" draw:style-name="gr19" draw:text-style-name="P18" xml:id="id7" draw:id="id7" draw:layer="layout" svg:width="3.288cm" svg:height="2.349cm" svg:x="-18.652cm" svg:y="19.8cm">
          <text:p text:style-name="P17"><text:span text:style-name="T10">Converting </text:span><text:span text:style-name="T10"><text:line-break/></text:span><text:span text:style-name="T10">action potential/ group</text:span><text:span text:style-name="T10"><text:line-break/></text:span><text:span text:style-name="T10">to Trace or </text:span><text:span text:style-name="T4">concept</text:span><text:span text:style-name="T4"><text:line-break/></text:span><text:span text:style-name="T4">/clustering hierarchy</text:span><text:span text:style-name="T4"><text:line-break/></text:span><text:span text:style-name="T4">formation</text:span><text:span text:style-name="T4"><text:line-break/></text:span><text:span text:style-name="T4">(event/objec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9.809cm" svg:y1="23.295cm" svg:x2="-17.008cm" svg:y2="22.149cm" draw:start-shape="id2" draw:start-glue-point="0" draw:end-shape="id7" draw:end-glue-point="6" svg:d="M-19809 23295c0-844 2801-272 2801-1146" svg:viewBox="0 0 2802 1147">
          <text:p/>
        </draw:connector>
        <draw:connector draw:style-name="gr21" draw:text-style-name="P7" draw:layer="layout" draw:type="curve" svg:x1="-18.728cm" svg:y1="23.682cm" svg:x2="-16.051cm" svg:y2="26.98cm" draw:start-shape="id2" draw:start-glue-point="1" draw:end-shape="id1" draw:end-glue-point="0" svg:d="M-18728 23682c1785 0 2677 1099 2677 3298" svg:viewBox="0 0 2678 3299">
          <text:p text:style-name="P5"><text:span text:style-name="T4">2.concept</text:span><text:span text:style-name="T4"><text:line-break/></text:span><text:span text:style-name="T4">(language </text:span><text:span text:style-name="T4"><text:line-break/></text:span><text:span text:style-name="T4">components)</text:span></text:p>
        </draw:connector>
        <draw:custom-shape draw:name="comment box 11" draw:style-name="gr22" draw:text-style-name="P20" xml:id="id8" draw:id="id8" draw:layer="layout" svg:width="2.6cm" svg:height="1.777cm" svg:x="-13.534cm" svg:y="22.49cm">
          <text:p text:style-name="P19"><text:span text:style-name="T4">Converting</text:span><text:span text:style-name="T4"><text:line-break/></text:span><text:span text:style-name="T4">goal composite</text:span><text:span text:style-name="T4"><text:line-break/></text:span><text:span text:style-name="T4">to action/set poin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6.051cm" svg:y1="26.98cm" svg:x2="-12.234cm" svg:y2="24.267cm" draw:start-shape="id1" draw:start-glue-point="0" draw:end-shape="id8" draw:end-glue-point="6" svg:d="M-16051 26980c0-2020 3817-664 3817-2713" svg:viewBox="0 0 3818 2714">
          <text:p/>
        </draw:connector>
        <draw:g draw:style-name="gr23">
          <draw:path draw:style-name="gr24" draw:text-style-name="P21" draw:layer="layout" svg:width="6.657cm" svg:height="8.127cm" svg:x="-31.963cm" svg:y="22.861cm" svg:viewBox="0 0 6658 8128" svg:d="M5353 8084l-3-50c-100 7-200 16-299 24l4 50c-134 11-268 20-403 20v-50c-99 0-199-4-300-16l-6 49c-47-5-95-12-143-21-93-18-177-47-257-83l21-46c-92-41-178-92-265-142l-24 44c-50-29-101-57-153-83-70-36-134-81-194-133l32-38c-74-64-142-139-209-214l-38 33c-87-99-172-201-269-287l33-37c-5-4-9-8-14-12-72-62-137-130-197-202l-38 32c-86-103-164-212-243-322l41-29c-22-29-43-59-65-88-41-54-86-97-136-133l-29 40c-105-76-227-117-349-155l15-48c-79-24-157-47-231-75-18-7-36-15-53-23l-21 45c-128-60-236-151-331-252l36-34c-59-62-113-129-166-194-9-11-19-23-28-35l-39 30c-81-106-152-221-228-331l41-29c-56-81-115-158-184-227-2-1-3-3-5-5l-36 35c-104-105-170-222-230-344l45-22c-43-89-83-179-133-269l-44 24c-34-61-73-123-122-182-21-26-38-54-51-84-13-29-23-60-30-91l49-11c-21-93-20-198-27-299l-50 4c-3-40-7-79-15-116-8-40-12-78-12-114 0-66 11-127 30-185l48 16c31-97 84-184 135-267l-43-26c4-6 7-12 11-18 64-107 125-215 175-329l45 20c34-78 62-158 82-241 3-14 7-29 10-44l-48-12c32-131 73-259 116-387l47 16c28-84 57-167 86-250 4-11 8-22 12-33l-47-17c44-125 95-247 134-375l48 15c19-65 36-131 47-199 5-31 9-63 13-94l-50-6c17-135 25-269 53-401l49 10c9-39 19-79 33-118 18-55 39-111 65-165l-45-22c31-65 70-126 116-179 25-27 51-52 80-74 30-22 62-41 97-56l20 46c22-10 46-18 72-24 73-18 147-28 221-36l-6-50c126-14 251-22 375-48 6-1 11-2 17-4l10 49c99-20 198-37 297-45l-4-50c38-3 76-5 114-5 74 0 147 7 219 22 26 5 51 10 75 12l-6 50c93 11 179 4 260-14 20 5 40 11 59 16l14-48c54 16 108 31 162 47 72 22 148 46 223 74l-17 47c94 35 187 76 271 127v-1l26-42c64 38 122 81 173 130 51 50 94 106 125 170l-45 22c20 41 34 85 42 132 8 52 15 105 22 159l50-6c16 126 34 258 80 379l-47 18c35 91 85 177 161 251l35-36c25 24 53 47 85 69 75 51 155 94 239 129l-20 46c92 39 187 70 285 94l12-49c106 26 214 44 322 57 21 2 43 5 66 7l-6 50c99 10 200 20 299 34l7-50c142 21 279 51 399 107l-21 45c57 27 110 60 158 100 28 25 56 51 82 78l36-35c98 101 177 219 232 344l-45 20c40 92 66 188 77 285 0 2 0 3 0 4l50-5c14 131 34 263 52 395l-49 6c13 100 26 199 34 298l50-3c5 67 8 134 8 201 0 7 0 14 0 21 0 4 0 8 0 13 0 53 3 108 7 165l-50 3c6 99 12 201 2 300l50 5c-7 69-22 137-48 201-28 66-68 129-125 187l-36-36c-5 6-10 11-16 16-71 65-129 137-179 213l42 27c-72 110-127 228-178 348l-46-20c-32 76-62 152-94 226-7 17-14 34-21 51l46 19c-48 122-87 248-125 375l-47-15c-29 96-57 192-87 288l47 15c-1 5-3 10-5 15-37 115-43 232-43 350 0 4 0 9 0 14h-50c1 91 4 182-1 272-1 10-1 19-1 28l50 2c-1 19-1 38-1 57 0 113 9 227 9 340v1h-50c0 96-7 191-32 284-1 5-2 9-3 13l48 12c-32 126-60 266-116 392l-46-21c-29 67-67 129-119 182-26 2-52 3-78 5zM3184 133l14-48-14 48c71 21 145 45 220 73l-18 47c-73-28-147-51-216-72-54-16-108-31-162-47l14-48c54 16 108 31 162 47z">
            <text:p/>
          </draw:path>
          <draw:path draw:style-name="gr25" draw:text-style-name="P21" draw:layer="layout" svg:width="6.704cm" svg:height="8.177cm" svg:x="-31.985cm" svg:y="22.837cm" svg:viewBox="0 0 6705 8178" svg:d="M5400 8107l-25 2-25 1-1-25c-42 3-83 7-125 10l-2-25-2-25c50-4 100-8 150-11 1 0 1 0 2 0 4 0 9 1 12 3 4 2 7 5 10 9 1 4 3 7 3 11zM5048 8085l25-2 25-2 4 49c0 1 0 2 0 2 0 5-1 9-3 13-3 4-6 7-10 9-3 2-6 3-10 3-50 4-100 8-150 11l-2-25-1-24c41-3 83-6 124-9zM4778 8151v25c-34 1-69 2-104 2-5 0-9-1-13-4-4-2-7-5-9-9s-3-8-3-12v-25c-8 0-15-1-22-1v-25l1-25c13 1 26 1 38 1 3 0 5 0 8 0 4 0 8 1 12 3s7 5 9 9 4 8 4 13h-25 25v25c26-1 52-1 78-2zM4478 8096l-2 25c-27-2-53-4-80-7l-3 25c0 3-1 7-3 10s-5 7-9 9-8 3-13 3c-1 0-2 0-3 0-15-2-30-4-46-6l4-25 3-25c7 1 14 2 20 3l3-24 25 2-25-2c1-4 2-7 3-10 3-4 6-7 10-9 3-2 8-4 12-4 1 0 2 1 3 1 34 4 68 7 102 9zM4175 8104l-6 24c-68-17-132-39-193-66l10-23 10-23c58 26 119 47 185 63zM3916 7951l-11 22c-60-31-118-64-176-97l12-22 13-22c57 33 115 66 174 96zM3629 7848l-12 22c-26-15-53-29-81-43-1-1-1-1-1-1-4-2-7-5-9-9-3-4-4-8-4-13 0-4 1-8 3-11l22 11-11 23c-33-17-65-36-95-56l14-21 14-21c29 20 58 37 89 53 29 14 56 29 84 44zM3386 7672l-19-16-19-17 2-3c-36-33-71-68-105-104l18-17 18-17c39 41 79 81 121 117 2 2 4 4 5 6 2 4 4 8 4 13 0 4-2 8-4 12-1 2-2 3-3 4l-18-16 18 16zM3144 7414l16 19 17 19-22 19c-1 1-3 2-4 3-4 2-8 3-12 3-5 0-9-1-13-3-2-1-4-3-6-5-38-43-75-86-113-128l18-17 19-17c33 36 65 73 97 110zM2922 7216l-17 17c-18-16-35-33-53-48-2-2-4-4-5-6-2-4-3-9-3-13s1-9 3-12c1-2 2-3 3-4l16-19c-13-12-26-23-39-35l17-19 17-18c14 13 29 26 44 39l-17 19-16 19c-2-2-4-3-6-5l17-19 5 5 17-19c4 4 9 8 13 12 2 1 4 4 5 6 2 4 4 8 4 12 0 5-2 9-4 13-1 1-2 3-3 4l-16 19c12 11 24 22 35 34zM2739 6970l-19 17c-10-12-21-25-32-37l-19 16c-1 1-2 2-3 3-4 2-9 3-13 3s-9-1-12-3-5-4-7-6c-17-20-33-40-49-60l19-16 20-15c11 13 21 27 32 40l19-16c1-1 3-2 4-3 4-2 8-3 12-3 5 0 9 1 13 3 2 2 5 4 7 6 15 18 31 36 47 54zM2514 6768l-20 15c-35-48-69-96-104-143-1-1-1-2-1-2-3-4-4-8-4-13 0-4 1-9 4-12 1-3 4-6 6-8l20-14 14 20 1-1c35 48 69 96 104 143zM2377 6496l-20 16c-36-47-77-85-122-117l1-2-20-14 14-19c2-3 5-6 8-7 3-2 8-4 12-4s9 2 13 4c0 0 1 1 2 1 48 35 92 76 132 127zM2115 6351l-11 23c-59-30-120-52-183-72l8-24 8-24c64 21 128 45 189 75zM1848 6200l-7 24c-65-20-130-40-191-63l9-24 9-23c60 23 124 43 188 62zM1546 6141l-11 22c-61-32-118-71-170-114l16-20 16-19c50 41 103 78 161 109zM1271 5928l-18 17c-7-7-14-14-20-21-2-1-3-3-4-4-2-4-3-9-3-13s1-9 3-12c1-3 3-4 5-6l18-17c-22-24-44-49-65-74l19-16 19-16c26 30 53 60 80 89 2 2 3 3 4 5 2 4 3 8 3 13 0 4-1 8-3 12-1 2-3 4-5 6l-17-18 17 18-18 17c1 1 2 1 3 2zM1111 5666l-20 16c-1-1-1-2-2-3l-20 15c-1 1-2 1-3 2-4 2-8 3-12 3-5 0-9-1-13-3-3-2-5-4-7-7-25-32-49-65-72-99l21-14 20-15c18 27 37 53 55 78l20-15 15 20-15-20c1-1 2-1 3-2 4-2 8-3 12-3 5 0 9 1 13 3 3 2 5 4 7 7 6 7 12 15 17 22zM899 5451l-21 14c-24-37-48-73-72-109-1 0-1-1-1-1-3-4-4-8-4-13 0-4 1-8 4-12 1-3 4-6 7-8l41-29 3 5 21-14c4 5 7 10 11 16l1 1c2 4 3 8 3 13 0 4-1 9-3 12-2 4-4 6-7 8l-21 15c20 29 39 58 59 88zM766 5178l-19 16c-22-27-45-52-69-77l-18 18c-2 1-3 2-5 3-4 3-8 4-13 4-4 0-8-1-12-4-2-1-4-2-5-4-5-4-9-9-14-14l18-17-4-4 35-35c2-2 3-3 5-4 4-2 8-3 13-3 4 0 9 1 12 3 2 1 4 3 6 4 2 2 3 4 5 5 30 30 58 61 84 93zM535 4987l-21 14c-39-56-72-115-103-175l22-11 23-12c29 59 61 115 99 170zM434 4703l-22 11c-28-59-56-119-88-179l23-12 22-11c31 60 59 121 88 180zM254 4460l-21 13c-28-45-58-90-94-134l19-16-19 16 19-16-19 16c-8-9-15-18-21-28l21-14 20-14c6 8 12 17 19 25 37 45 69 92 98 139zM56 4166c-1-4-2-8-3-12-1-2-1-4-1-6 0-4 1-8 4-12 2-4 5-7 9-9 2-1 4-2 7-3l25-6c-7-37-11-76-14-116l25-1 25-2c3 46 8 90 17 133 1 2 1 3 1 5 0 5-1 9-3 13-3 4-6 7-10 9-2 1-4 2-6 3h-1l-48 11-3-13zM99 3814c4 0 8 1 12 3s7 6 9 9c2 4 3 7 4 11 0 4 0 8 0 12l-25 2 1 13-49 3c-1 1-2 1-2 1-5 0-9-2-13-4s-7-5-9-9c-2-3-3-7-3-11-3-38-7-76-15-112l25-5-25 5v-1l25-5-25 5c-1-7-3-14-4-21l25-4 25-4c1 6 2 13 3 19l-24 5 24-5c7 31 11 63 14 95l25-2c0 0 1 0 2 0zM25 3556l-25-2c5-46 15-91 28-134 1-1 2-3 3-4 2-4 5-7 9-10 4-2 8-3 12-3 3 0 5 1 8 1l48 16-2 6 2-6-2 6 23 8c-2 6-4 11-5 17-1 2-2 3-3 5-2 4-5 7-9 9-3 2-8 3-12 3-3 0-5 0-8-1l-23-7c-9 32-16 65-19 99zM168 3290l-22-12c18-32 36-63 55-93l-22-13c-3-3-6-6-8-9-3-4-4-8-4-13 0-4 1-8 4-12v-1c3-5 6-10 10-15l21 13 3-6 43 26c4 2 6 5 9 9 2 4 3 8 3 12 0 5-1 9-3 13-1 0-1 0-1 0-22 37-45 74-66 113zM277 3005l-22-12c33-58 63-117 90-177l23 11 23 10c-28 61-59 121-92 180zM452 2754l-23-9c21-54 38-110 52-168 1-6 3-13 4-20l25 6 24 6c-2 6-3 13-5 20-14 59-32 117-54 174zM481 2577l24 6zM486 2454l-24-7c17-64 37-129 57-192l24 7 23 8c-20 63-39 126-56 190zM595 2170l8-23 8-24 3 1c16-46 32-92 48-138l24 8 23 8c-18 54-37 108-55 162-1 1-2 3-2 4-3 4-6 7-10 10-3 2-8 3-12 3-3 0-5-1-8-1zM716 1841l-9 24-8 24-27-10c-1-1-3-1-4-2-4-2-7-5-9-9s-3-8-3-13c0-2 0-5 1-8 19-54 40-107 60-161l23 9 24 9c-17 45-35 91-51 136zM791 1554l-23-8c8-24 16-48 23-72 0-2 1-4 2-5 2-4 5-7 9-9 4-3 8-4 13-4 2 0 5 1 7 1l24 7c4-15 8-30 12-46l25 7 24 6c-6 24-13 48-21 72 0 2-1 4-2 5-2 4-5 7-9 9-4 3-8 4-12 4-3 0-5-1-8-1l-24-8c-5 17-10 33-16 50zM913 1278l-25-4c3-17 5-33 7-50l-25-3c-3 0-6-1-9-3-4-2-7-5-9-9s-3-8-3-13c0-1 0-2 0-3 3-24 5-48 8-73l25 3 25 3c-2 16-4 32-6 48l25 3c3 1 7 2 10 4s7 5 9 9 3 8 3 12c0 1 0 2 0 3-3 26-7 51-10 77zM898 974l-25-3c7-61 16-121 29-181 1-2 2-5 3-7 2-4 5-7 9-9s8-4 13-4c1 0 3 1 5 1l18 4-5 24 6 2c-13 58-21 117-28 176zM1007 691l-24-8c0-1 1-2 1-3l24 8-24-8c19-57 40-114 67-168l5 3 11-23 17 8-11 23 11-23c0 1 1 1 2 1 3 2 6 6 9 9 2 4 3 9 3 13s-1 7-2 11c-26 52-47 107-65 161 0 2 0 3-1 4zM1086 398l-20-14c18-28 38-54 60-79 24-27 51-52 80-74l15 20 15 19c-27 21-51 43-73 68-20 23-39 48-56 73zM1311 232l23-10-3-7c24-11 49-19 76-26 36-8 71-15 107-21l4 25 4 25c-34 5-69 12-104 20-23 5-46 13-67 22-3 2-7 2-10 2-5 0-9-1-13-3-3-2-7-5-9-9 0-1-1-2-1-3l23-10-23 10zM1605 147l-1-16c-1-1-1-2-1-3 0-5 2-9 4-13s5-7 9-9c3-2 6-3 10-3 60-7 121-12 182-19l3 25 2 25c-60 6-121 12-182 19l-1-9zM1959 88l-4-24c14-3 29-6 43-9l5 25-5-25 5 25-5-25c6-1 11-2 17-3 2-1 4-1 5-1 5 0 9 1 13 4 4 2 7 5 9 9 1 2 2 5 3 7l5 25c20-4 41-8 62-12l4 24 5 25c-29 5-57 11-86 17-1 0-3 0-5 0-4 0-8-1-12-3s-7-6-9-9-3-5-3-8l-5-24c-13 2-25 5-37 7zM2298 30c0-5 1-9 3-13s5-7 9-9c3-2 7-3 11-3 29-3 59-4 89-5v25l1 25c-21 0-41 1-61 3l2 24-25 2 25-2c0 1 0 2 0 2 0 5-1 9-4 13-2 4-5 7-9 9-3 2-7 3-10 3-21 2-41 4-61 6l-3-24-3-25c12-2 25-3 38-4l-2-25c0-1 0-2 0-2zM5626 1967l-24-3-25-4 6-42c1-4 2-7 3-9 2-4 5-7 9-10 4-2 8-3 13-3 1 0 2 0 3 0 53 8 106 17 157 28l-6 25-5 24c-42-9-85-17-128-23zM5907 1988l8-24c35 12 69 26 102 41 1 0 2 1 2 1 4 2 7 6 10 9 2 4 3 8 3 13 0 3-1 7-2 10l-11 23c5 3 11 6 16 9l-11 22-12 22c-12-6-24-12-37-18 0 0-1-1-2-1-3-2-7-6-9-9-2-4-3-8-3-13 0-3 1-7 2-10l11-23c-25-10-50-20-75-28zM6147 2176l17-19c21 19 42 38 62 58l18-17c2-2 4-3 5-4 4-2 8-3 13-3 4 0 8 1 12 3 2 1 4 2 6 4 10 10 19 21 29 32l-19 16-18 17c-4-4-7-8-11-12l-18 17-17-18 17 18c-1 2-3 3-5 4-3 2-8 3-12 3-5 0-9-1-13-3-2-1-4-3-5-4-25-26-50-50-77-73zM6384 2364l20-15c40 56 74 116 103 177l-23 10-23 11c-27-59-60-115-98-169zM6584 2937l25-3c8 66 17 132 27 198l-25 3-25 4c-9-67-18-133-26-199zM6636 3536l25-2c0 0 1 0 2 0 4 0 8 1 12 4 4 2 7 5 9 9 2 3 3 7 4 10 4 59 7 118 8 177l-25 1h-25c-1-58-4-116-8-174zM6703 3960c0 4-1 8-4 12-2 4-5 7-9 9-3 2-7 3-11 4l-25 1c1 17 2 33 3 50l-25 2-25 1c-1-25-3-50-4-75v-1c0-5 1-9 3-13s6-7 9-9c4-2 7-3 11-3l25-2c-1-17-2-33-3-50l25-1 25-2c2 25 3 50 5 75 0 1 0 1 0 2zM2661 22c25 6 49 10 73 12 3 1 7 2 10 3 4 3 7 6 9 10 2 3 3 8 3 12 0 1 0 2 0 3l-3 26-25-3-25-3 1-1c-18-3-35-6-53-10-31-7-62-12-94-15l3-25 3-25c33 4 66 9 98 16zM6476 2649l24-8c23 64 39 131 48 199l-25 3-25 3c-8-64-24-127-45-189zM6599 3237l4 25h1c8 58 15 116 22 175l-25 2-25 3c-6-58-14-116-22-174 0-1 0-2 0-3 0-4 1-9 3-12 2-4 6-7 9-10 3-1 6-2 9-3zM4969 1834l5-24c65 14 130 26 195 35l-3 25-4 24c-66-9-133-21-198-35zM5282 1891l25 3 25 2-2 18c43 5 87 9 131 14l-2 25-3 25c-52-6-105-11-156-17-4 0-7-1-10-3-4-2-7-5-9-9s-4-8-4-13c0 0 0-1 0-2zM6693 4246c3 2 7 5 9 9s3 8 3 13c0 0 0 1 0 2-3 26-6 51-11 76l-25-4-24-5c3-16 5-31 7-47l-24-3 2-25-2 25c-4 0-7-1-10-3-4-2-7-5-9-9-3-4-4-8-4-13 0 0 0-1 0-2 3-24 4-49 5-73h25l25 1c0 18-1 35-3 52l26 3c3 0 7 1 10 3zM2852 113l-1-25c44-2 87-9 129-18 2 0 4-1 5-1 3 0 5 1 7 1 20 6 39 11 59 17 23 6 47 13 70 20l-7 24-7 24c2 0 3 1 5 1l-7 24-7 24c-25-7-50-14-74-21-2-1-4-1-6-2-4-3-7-6-9-10-2-3-4-8-4-12 0-2 1-5 1-7l7-24c-9-3-19-5-28-8-43 9-87 16-132 18zM3066 123c-2 4-6 7-9 10-4 2-8 3-13 3-2 0-4 0-7-1-8-2-16-5-24-7l7-24c1-2 1-4 3-6 2-3 5-7 9-9 3-2 8-3 12-3 2 0 5 0 7 1l-6 20 24 7-1 4-24-7 24 7c0 2-1 4-2 5zM3158 92l7-24c21 6 41 12 62 18 2 1 4 2 6 3 3 2 7 5 9 9 2 3 3 8 3 12 0 3 0 5-1 7l-7 24c20 6 39 12 59 19h1 1 1-1c-1 0-1 0-1 0h-1c-20-7-39-13-59-19l-7 24-24-7-24-7 7-24 7-24c1-2 1-4 2-5 3-4 6-7 10-10 3-2 8-3 12-3 3 0 5 0 7 1 42 13 86 26 130 41l-8 23-8 24c-11-3-21-7-32-10l-8 23-7 24c33 11 66 22 100 34l2-6 7 3c-1-4-2-8-2-12 0-3 0-6 1-8l24 8 8-23c64 23 127 50 187 80l-12 22-11 23c-51-26-104-49-158-69l-8 23c-1 1-1 3-2 4-2 4-5 7-9 9s-8 3-13 3c-3 0-6 0-8-1-54-20-107-38-159-54l8-24 7-24c-19-6-38-11-57-17-2-1-4-1-6-2-3-2-7-6-9-9-2-4-3-9-3-13 0-2 0-5 1-7l7-24c-13-4-26-8-38-11zM3215 127l-2 7c8 2 16 5 24 7l-7 24-24-7-24-7 24 7 7-24 7-24-5 17-2 7c-8-2-16-5-24-7l7-24 24 7 7-24-7 24zM3702 302v-1c2-3 5-6 9-8 3-3 8-4 12-4 5 0 9 1 13 4 60 36 116 76 164 121l-17 19-17 18c-46-43-99-81-156-115l13-21zM3981 546l21-14c16 23 29 47 42 72 1 3 2 7 2 11s-1 8-3 12-6 7-9 9c-1 1-2 1-2 1l-23 11c6 15 12 31 17 46l-24 8-24 7c-7-21-15-42-24-62-2-3-3-7-3-11s1-8 3-12c3-4 6-7 10-9l1-1 11 22-11-22 22-11c-8-15-17-29-26-43zM4030 849l24-3c3 18 5 36 8 54l24-3c1 0 3 0 4 0 4 0 8 1 12 3s7 5 9 9c2 3 3 6 3 9 3 24 6 47 10 70l-25 3-25 4c-2-15-4-30-6-45l-25 3c-1 0-2 0-3 0-4 0-9-1-12-3-4-2-7-6-10-9-1-3-2-6-3-10-3-26-7-52-10-78zM4124 1139l24-5c12 54 26 107 46 158 1 3 1 6 1 9 0 4-1 9-3 12-2 4-5 7-9 9-1 1-3 2-4 2l-30 12-8-24-9-23 6-3c-16-46-28-94-38-142zM4180 1437l22-12c23 38 50 74 82 109l4-5 18 17 18 18-22 23c-2 1-3 3-5 4-4 2-8 3-13 3-4 0-9-1-12-3-2-1-4-2-5-4-44-42-79-88-108-137zM4422 1615l14-21c55 36 112 67 172 95l-11 23-10 22c-62-28-121-61-178-98zM4670 1797l9-24c61 24 124 44 187 62l-6 24-7 24c-65-18-130-39-192-63zM6625 4484l23 11c-27 60-65 118-117 171l-18-17-18-17c48-50 82-102 107-158zM6406 4684l18 17c-45 48-85 100-121 153l-21-14-21-14c38-55 79-109 127-159zM6271 4953l22 12c-33 58-62 117-89 177l-23-11-23-10c28-61 58-122 91-181zM6105 5181l-10 23 23 10c-27 61-52 123-77 184l-23-10-23-10c25-61 50-122 76-184 1-1 1-2 2-3 2-3 5-7 9-9s8-3 12-3 7 1 10 2zM6034 5476h1c1 1 2 1 3 2 4 2 7 5 9 9s3 8 3 12c0 3 0 7-1 10-25 61-47 123-67 186l-24-8-24-8c21-63 43-127 68-189l23 9zM5914 5830l24 7c-5 15-9 30-13 44-1 2-2 4-3 6-2 4-5 7-9 9s-8 3-12 3c-3 0-5 0-8-1l-23-7c-8 25-15 51-23 76l-24-7-24-7c10-33 20-67 30-100 0-2 1-4 2-5 2-4 5-7 9-10 4-2 8-3 13-3 2 0 4 0 7 1l24 7c2-6 4-13 6-20zM5780 6103l24 8c-3 7-5 13-7 20l24 8c2 0 3 1 5 2 4 2 7 5 9 9s3 8 3 13c0 2 0 5-1 7-2 5-3 10-5 15-9 28-16 55-21 83l-25-5-24-5c5-26 12-53 20-79l-24-8c-2 0-3-1-5-2-4-2-7-5-9-9s-3-8-3-13c0-2 0-5 1-7 5-15 9-30 14-44zM5768 6412l25 1c-2 38-3 76-3 114 0 5 0 10 0 15 0 4-1 9-3 12-2 4-5 7-9 10-4 2-8 3-12 3h-50v-5h-25c-1-7-1-13-1-20 0-4 2-9 4-12 2-4 5-7 9-10 4-2 8-3 12-3h25c1-36 1-71 3-107zM5717 6712h25c0 34-1 69-3 103 0 1 0 2 0 3l25 1c4 0 8 1 11 3 4 2 7 5 9 9s4 8 4 13v1c-1 6-1 13-1 19h-25v5l-50-2c-4 0-8-1-12-3-4-3-7-6-9-9-2-4-3-9-3-13v-1c0-9 0-19 1-28 2-34 3-68 3-101zM5764 7013h25c3 66 6 133 7 200h-25l-25 1c-1-67-4-133-7-200zM5720 7313l25 1c-3 69-11 136-28 203l-24-6-24-6c15-64 23-128 26-193zM5717 7621l24 6c-16 63-31 129-51 194l-24-7-24-7c19-64 35-129 50-192zM5617 7914l-11 23-10 23-11-5c-21 43-46 84-76 122l-19-15-20-16c32-41 58-86 80-134 0-1 0-2 1-2 2-4 5-7 9-10 4-2 8-3 12-3s7 1 11 2l-10 23 10-23z">
            <text:p/>
          </draw:path>
        </draw:g>
        <draw:rect draw:style-name="gr26" draw:text-style-name="P22" xml:id="id9" draw:id="id9" draw:layer="layout" svg:width="1.859cm" svg:height="0.972cm" svg:x="-32.924cm" svg:y="25.895cm">
          <text:p text:style-name="P5"><text:span text:style-name="T3">stimuli</text:span></text:p>
        </draw:rect>
        <draw:connector draw:style-name="gr27" draw:text-style-name="P7" draw:layer="layout" draw:type="curve" svg:x1="-29.911cm" svg:y1="25.023cm" svg:x2="-31.065cm" svg:y2="26.381cm" draw:start-shape="id6" draw:start-glue-point="3" draw:end-shape="id9" draw:end-glue-point="1" svg:d="M-29911 25023c-865 0-289 1358-1154 1358" svg:viewBox="0 0 1155 1359">
          <text:p text:style-name="P5"><text:span text:style-name="T4">senses</text:span></text:p>
        </draw:connector>
        <draw:custom-shape draw:name="comment box 12" draw:style-name="gr28" draw:text-style-name="P20" xml:id="id11" draw:id="id11" draw:layer="layout" svg:width="1.62cm" svg:height="0.939cm" svg:x="-25.25cm" svg:y="33.335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23.073cm" svg:y1="31.194cm" svg:x2="-24.44cm" svg:y2="33.335cm" draw:start-shape="id10" draw:start-glue-point="8" draw:end-shape="id11" draw:end-glue-point="4" svg:d="M-23073 31194c0 1590-1367 520-1367 2141" svg:viewBox="0 0 1368 2142">
          <text:p/>
        </draw:connector>
        <draw:custom-shape draw:style-name="gr30" draw:text-style-name="P23" xml:id="id10" draw:id="id10" draw:layer="layout" svg:width="0.217cm" svg:height="0.217cm" svg:x="-23.182cm" svg:y="30.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30" draw:text-style-name="P23" xml:id="id12" draw:id="id12" draw:layer="layout" svg:width="0.217cm" svg:height="0.217cm" svg:x="-27.181cm" svg:y="30.3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5cm" svg:x2="-27.518cm" svg:y2="32.338cm" draw:start-shape="id12" draw:start-glue-point="8" draw:end-shape="id13" draw:end-glue-point="4" svg:d="M-27072 30595c0 1291-446 420-446 1743" svg:viewBox="0 0 447 1744">
            <text:p/>
          </draw:connector>
          <draw:custom-shape draw:name="comment box 13" draw:style-name="gr28" draw:text-style-name="P20" xml:id="id13" draw:id="id13" draw:layer="layout" svg:width="1.62cm" svg:height="0.939cm" svg:x="-28.328cm" svg:y="32.338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g draw:style-name="gr31">
          <draw:custom-shape draw:style-name="gr30" draw:text-style-name="P23" xml:id="id14" draw:id="id14" draw:layer="layout" svg:width="0.217cm" svg:height="0.217cm" svg:x="-27.181cm" svg:y="30.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6cm" svg:x2="-27.518cm" svg:y2="32.339cm" draw:start-shape="id14" draw:start-glue-point="8" draw:end-shape="id15" draw:end-glue-point="4" svg:d="M-27072 30596c0 1291-446 420-446 1743" svg:viewBox="0 0 447 1744">
            <text:p/>
          </draw:connector>
          <draw:custom-shape draw:name="comment box 13" draw:style-name="gr28" draw:text-style-name="P20" xml:id="id15" draw:id="id15" draw:layer="layout" svg:width="1.62cm" svg:height="0.939cm" svg:x="-28.328cm" svg:y="32.339cm">
            <text:p text:style-name="P19"><text:span text:style-name="T4">body</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path draw:style-name="gr32" draw:text-style-name="P24" draw:layer="layout" svg:width="2.789cm" svg:height="1.443cm" svg:x="-35.255cm" svg:y="28.349cm" svg:viewBox="0 0 2790 1444" svg:d="M727 34c32 5 63-6 94-7 32-1 62-7 94-8 29-1 59-2 89-3 28 0 56-1 84 0 32 2 59-11 94-10 43 1 87 1 131-5 33-4 67 2 100 5 32 2 62 8 92 21 24 12 54 7 79 24s53 29 84 34c41 7 77 30 118 39 28 7 55 15 84 20 32 5 65 9 98 13 31 3 100 15 124 33 36 27 85 5 139 13 46 7 53 30 97 40 29 6 68 16 97 18 37 3 33 18 70 17 29-2 58 5 87 6 31 1 61 11 91 20 34 9 64 33 79 62 13 24 37 45 36 74-1 26 3 53 2 79-1 46-20 89-24 134-2 31-37 42-63 50-28 8-55 20-68 52s-16 61-28 93c-9 23-15 56 7 75 24 21 41 47 54 74 13 25 12 53 12 80 0 33-8 68-28 97-24 33-23 78-63 103-31 20-36 58-71 74-43 20-92 6-138 17-50 12-103 14-154 26-50 11-96 29-146 39-74 14-152 10-229 10-98 1-197 4-293-17-64-14-141-13-198-52-29-18-68-19-97-39-29-19-72-5-89-45-8-22-8-44-11-67-4-31-34-55-66-62-29-7-56-23-86-24-29-1-56 9-85 6-42-4-83 8-126 9-67 1-130 14-199 2-37-6-64-25-96-39-40-18-64-56-99-82-29-22-49-51-72-78-27-31-69-35-105-47-33-11-57-35-78-58-22-25-38-54-63-76-34-29-39-67-70-101-18-19-11-49-16-74-7-29 9-51 23-71 16-23 31-47 37-73 8-30 20-58 31-87 10-25 23-50 28-77s4-53 14-78c10-26 25-54 59-61 28-6 58-5 86-10 31-6 62-10 92-5 65 13 108-28 159-49 29-12 52-33 79-48 25-14 53-18 80-24 8 0 17 0 26 0 8 5 17 10 25 16 2 2 4 4 5 6z">
          <text:p text:style-name="P5"><text:span text:style-name="T11">Follower</text:span></text:p>
        </draw:path>
        <draw:path draw:style-name="gr2" draw:text-style-name="P2" draw:layer="layout" svg:width="31.019cm" svg:height="9.451cm" svg:x="-46.366cm" svg:y="38.047cm" svg:viewBox="0 0 31020 9452" svg:d="M8213 246c346 39 689-38 1035-47 358-9 683-57 1036-64 329-6 657-12 982-15 312-3 623-9 933 0 360 10 658-84 1036-79 485 7 966 7 1449-31 370-29 743 13 1112 31 347 15 688 58 1011 158 273 85 606 50 880 173 271 122 579 214 932 251 454 48 847 215 1296 284 307 49 614 108 930 141 359 38 725 70 1087 94 343 25 1101 114 1372 246 394 196 933 31 1535 90 511 50 586 224 1076 290 312 44 753 119 1074 136 404 20 364 133 768 121 328-11 638 39 959 46 348 9 678 82 1007 142 378 70 714 243 881 457 139 177 399 325 391 535-11 194 32 387 24 582-13 331-223 648-260 976-24 225-409 303-700 362-305 63-466 239-609 471-141 232-134 495-262 724-98 171-843 1303-1229 1420-474 146-932 142-1439 223-554 86-952 246-1517 334-545 83-996 434-1543 501-829 102-1816 358-2662 362-1081 8-2431 228-3485 78-712-100-1481 409-2122 129-314-136-675 64-992-77-320-140-1138-208-1171-372-46-229-371-403-727-455-323-47-616-165-956-174-312-8-619 70-933 48-472-33-925 58-1398 63-734 6-1432 100-2199 16-414-46-710-180-1061-285-444-130-777 55-1154-131-325-163-821 320-1074 123-294-228-1125-242-1522-331-365-82-493-915-726-1083-246-177-463-460-739-619-374-215 1-475-346-723-195-138-119-698-184-878-73-209 307-780 462-928 173-169 313-55 390-245 86-216 214-423 337-631 109-186 254-367 310-566 53-192-178-643-68-829 106-189 347-517 715-567 319-44 770-427 1085-466 336-41 593 37 922 78 724 92 1176-50 1739-207 321-89 716 276 1018 165 277-102 580-136 882-173 93 0 188 0 282 0 95 36 190 72 285 110 17 16 35 31 51 47z">
          <text:p/>
        </draw:path>
        <draw:frame draw:style-name="gr33" draw:text-style-name="P11" draw:layer="layout" svg:width="0.947cm" svg:height="0.646cm" svg:x="-49.835cm" svg:y="71.468cm">
          <draw:text-box>
            <text:p><text:span text:style-name="T12">W</text:span><text:span text:style-name="T13">0</text:span></text:p>
          </draw:text-box>
        </draw:frame>
        <draw:frame draw:style-name="gr33" draw:text-style-name="P11" draw:layer="layout" svg:width="0.947cm" svg:height="0.646cm" svg:x="-49.834cm" svg:y="71.468cm">
          <draw:text-box>
            <text:p><text:span text:style-name="T12">W</text:span><text:span text:style-name="T13">0</text:span></text:p>
          </draw:text-box>
        </draw:frame>
        <draw:frame draw:style-name="gr33" draw:text-style-name="P11" draw:layer="layout" svg:width="0.947cm" svg:height="0.646cm" svg:x="-43.918cm" svg:y="71.468cm">
          <draw:text-box>
            <text:p><text:span text:style-name="T12">W</text:span><text:span text:style-name="T13">p</text:span></text:p>
          </draw:text-box>
        </draw:frame>
        <draw:frame draw:style-name="gr33" draw:text-style-name="P11" draw:layer="layout" svg:width="0.947cm" svg:height="0.646cm" svg:x="-37.916cm" svg:y="71.46cm">
          <draw:text-box>
            <text:p><text:span text:style-name="T12">W</text:span><text:span text:style-name="T13">p</text:span></text:p>
          </draw:text-box>
        </draw:frame>
        <draw:custom-shape draw:style-name="gr34" draw:text-style-name="P26" xml:id="id17" draw:id="id17" draw:layer="layout" svg:width="0.891cm" svg:height="0.97cm" svg:x="-49.899cm" svg:y="74.579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16" draw:id="id16" draw:layer="layout" svg:width="0.891cm" svg:height="0.97cm" svg:x="-47.898cm" svg:y="74.579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5.064cm" svg:x2="-49.008cm" svg:y2="75.064cm" draw:start-shape="id16" draw:start-glue-point="6" draw:end-shape="id17" draw:end-glue-point="10" svg:d="M-47898 75064h-1110" svg:viewBox="0 0 1111 1">
          <text:p/>
        </draw:connector>
        <draw:rect draw:style-name="gr37" draw:text-style-name="P28" xml:id="id345" draw:id="id345" draw:layer="layout" svg:width="2.714cm" svg:height="1.059cm" svg:x="-27.874cm" svg:y="14.393cm">
          <text:p text:style-name="P5"><text:span text:style-name="T2">Suprise</text:span><text:span text:style-name="T2"><text:line-break/></text:span><text:span text:style-name="T2">reduction</text:span></text:p>
        </draw:rect>
        <draw:rect draw:style-name="gr38" draw:text-style-name="P4" xml:id="id346" draw:id="id346" draw:layer="layout" svg:width="3.125cm" svg:height="1.728cm" svg:x="-31.444cm" svg:y="14.393cm">
          <text:p><text:span text:style-name="T15">Autopoiesis</text:span><text:span text:style-name="T2"><text:line-break/></text:span><text:span text:style-name="T2">(whole self or</text:span><text:span text:style-name="T2"><text:line-break/></text:span><text:span text:style-name="T2">part reproduction)</text:span></text:p>
        </draw:rect>
        <draw:rect draw:style-name="gr38" draw:text-style-name="P4" xml:id="id385" draw:id="id385" draw:layer="layout" svg:width="2.714cm" svg:height="1.756cm" svg:x="-24.51cm" svg:y="14.393cm">
          <text:p text:style-name="P5"><text:span text:style-name="T2">Homeostatis</text:span><text:span text:style-name="T2"><text:line-break/></text:span><text:span text:style-name="T2">keeping</text:span></text:p>
        </draw:rect>
        <draw:rect draw:style-name="gr38" draw:text-style-name="P29" xml:id="id347" draw:id="id347" draw:layer="layout" svg:width="2.714cm" svg:height="1.895cm" svg:x="-21.147cm" svg:y="14.393cm">
          <text:p text:style-name="P5"><text:span text:style-name="T2">Epistemic </text:span><text:span text:style-name="T2"><text:line-break/></text:span><text:span text:style-name="T2">foraging</text:span></text:p>
        </draw:rect>
        <draw:rect draw:style-name="gr39" draw:text-style-name="P31" xml:id="id348" draw:id="id348" draw:layer="layout" svg:width="2.714cm" svg:height="1.895cm" svg:x="-17.784cm" svg:y="14.393cm">
          <text:p text:style-name="P30"><text:span text:style-name="T16">Allostasis</text:span><text:span text:style-name="T16"><text:line-break/></text:span><text:span text:style-name="T16">(energy</text:span><text:span text:style-name="T16"><text:line-break/></text:span><text:span text:style-name="T16">adjustmnt)</text:span></text:p>
        </draw:rect>
        <draw:rect draw:name="goal kinds" draw:style-name="gr40" draw:text-style-name="P32" xml:id="id23" draw:id="id23" draw:layer="layout" svg:width="1.9cm" svg:height="0.9cm" svg:x="-51.816cm" svg:y="1.848cm">
          <text:p text:style-name="P5">Goal</text:p>
        </draw:rect>
        <draw:rect draw:style-name="gr41" draw:text-style-name="P5" xml:id="id19" draw:id="id19" draw:layer="layout" svg:width="1.9cm" svg:height="0.9cm" svg:x="-61.295cm" svg:y="7.361cm">
          <text:p text:style-name="P5">Episodic</text:p>
        </draw:rect>
        <draw:rect draw:style-name="gr41" draw:text-style-name="P5" xml:id="id20" draw:id="id20" draw:layer="layout" svg:width="2cm" svg:height="1.1cm" svg:x="-59.22cm" svg:y="9.546cm">
          <text:p text:style-name="P5">Where</text:p>
        </draw:rect>
        <draw:connector draw:style-name="gr42" draw:text-style-name="P15" draw:layer="layout" draw:type="curve" svg:x1="-50.777cm" svg:y1="4.425cm" svg:x2="-60.345cm" svg:y2="7.361cm" draw:start-shape="id18" draw:start-glue-point="2" draw:end-shape="id19" draw:end-glue-point="0" svg:d="M-50777 4425c0 2202-9568 734-9568 2936" svg:viewBox="0 0 9569 2937">
          <text:p/>
        </draw:connector>
        <draw:connector draw:style-name="gr43" draw:text-style-name="P15" draw:layer="layout" draw:type="curve" svg:x1="-60.345cm" svg:y1="8.261cm" svg:x2="-58.22cm" svg:y2="9.546cm" draw:start-shape="id19" draw:start-glue-point="2" draw:end-shape="id20" draw:end-glue-point="0" svg:d="M-60345 8261c0 964 2125 322 2125 1285" svg:viewBox="0 0 2126 1286">
          <text:p/>
        </draw:connector>
        <draw:rect draw:style-name="gr41" draw:text-style-name="P5" xml:id="id22" draw:id="id22" draw:layer="layout" svg:width="2.1cm" svg:height="1cm" svg:x="-51.02cm" svg:y="9.172cm">
          <text:p text:style-name="P5">What</text:p>
        </draw:rect>
        <draw:rect draw:style-name="gr41" draw:text-style-name="P5" xml:id="id21" draw:id="id21" draw:layer="layout" svg:width="1.9cm" svg:height="0.9cm" svg:x="-51.12cm" svg:y="7.172cm">
          <text:p text:style-name="P5">Semantic</text:p>
        </draw:rect>
        <draw:connector draw:style-name="gr44" draw:text-style-name="P15" draw:layer="layout" draw:type="curve" svg:x1="-50.777cm" svg:y1="4.425cm" svg:x2="-50.17cm" svg:y2="7.172cm" draw:start-shape="id18" draw:start-glue-point="2" draw:end-shape="id21" draw:end-glue-point="0" svg:d="M-50777 4425c0 2061 607 688 607 2747" svg:viewBox="0 0 608 2748">
          <text:p/>
        </draw:connector>
        <draw:connector draw:style-name="gr45" draw:text-style-name="P15" draw:layer="layout" draw:type="curve" svg:x1="-50.17cm" svg:y1="8.072cm" svg:x2="-49.97cm" svg:y2="9.172cm" draw:start-shape="id21" draw:start-glue-point="2" draw:end-shape="id22" draw:end-glue-point="0" svg:d="M-50170 8072c0 825 200 275 200 1100" svg:viewBox="0 0 201 1101">
          <text:p/>
        </draw:connector>
        <draw:connector draw:style-name="gr46" draw:text-style-name="P15" draw:layer="layout" draw:type="curve" svg:x1="-50.866cm" svg:y1="1.848cm" svg:x2="-48.416cm" svg:y2="-0.352cm" draw:start-shape="id23" draw:start-glue-point="0" draw:end-shape="id24" draw:end-glue-point="6" svg:d="M-50866 1848c0-1650 2450-550 2450-2200" svg:viewBox="0 0 2451 2201">
          <text:p/>
        </draw:connector>
        <draw:g draw:style-name="gr31">
          <draw:custom-shape draw:style-name="gr47" draw:text-style-name="P33" xml:id="id34" draw:id="id34" draw:layer="layout" svg:width="9.501cm" svg:height="5.099cm" svg:x="214.155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xml:id="id32" draw:id="id32" draw:layer="layout" svg:width="8.301cm" svg:height="4.599cm" svg:x="215.155cm" svg:y="10.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5" xml:id="id30" draw:id="id30" draw:layer="layout" svg:width="7.3cm" svg:height="4.1cm" svg:x="215.955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6" xml:id="id26" draw:id="id26" draw:layer="layout" svg:width="5.5cm" svg:height="3.4cm" svg:x="217.355cm" svg:y="1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7" xml:id="id25" draw:id="id25" draw:layer="layout" svg:width="3.803cm" svg:height="2.181cm" svg:x="218.452cm" svg:y="11.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38" draw:layer="layout" svg:width="2.775cm" svg:height="0.725cm" svg:x="220.855cm" svg:y="9.323cm">
            <draw:text-box>
              <text:p>Trace group</text:p>
            </draw:text-box>
          </draw:frame>
          <draw:connector draw:style-name="gr53" draw:text-style-name="P15" draw:layer="layout" draw:type="curve" svg:x1="220.354cm" svg:y1="11.842cm" svg:x2="221.912cm" svg:y2="10.548cm" draw:start-shape="id25" draw:start-glue-point="4" svg:d="M220354 11842c0-1347 1558-700 1558-1294" svg:viewBox="0 0 1559 1295">
            <text:p/>
          </draw:connector>
          <draw:frame draw:style-name="gr54" draw:text-style-name="P39" xml:id="id27" draw:id="id27" draw:layer="layout" svg:width="4.528cm" svg:height="0.725cm" svg:x="212.155cm" svg:y="8.398cm">
            <draw:text-box>
              <text:p><text:span text:style-name="T17">Memory component</text:span></text:p>
            </draw:text-box>
          </draw:frame>
          <draw:connector draw:style-name="gr55" draw:text-style-name="P15" draw:layer="layout" draw:type="curve" svg:x1="220.105cm" svg:y1="11.223cm" svg:x2="214.419cm" svg:y2="9.123cm" draw:start-shape="id26" draw:start-glue-point="4" draw:end-shape="id27" svg:d="M220105 11223c0-1575-5686-525-5686-2100" svg:viewBox="0 0 5687 2101">
            <text:p/>
          </draw:connector>
          <draw:custom-shape draw:style-name="gr56" draw:text-style-name="P40" draw:layer="layout" svg:width="0.428cm" svg:height="0.391cm" svg:x="218.6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0.577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8cm" svg:height="0.391cm" svg:x="221.0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1.573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38" xml:id="id29" draw:id="id29" draw:layer="layout" svg:width="4.85cm" svg:height="0.725cm" svg:x="221.755cm" svg:y="16.023cm">
            <draw:text-box>
              <text:p>Traces ordered by time</text:p>
            </draw:text-box>
          </draw:frame>
          <draw:connector draw:style-name="gr58" draw:text-style-name="P15" draw:layer="layout" draw:type="curve" svg:x1="220.409cm" svg:y1="13.464cm" svg:x2="221.755cm" svg:y2="16.385cm" draw:start-shape="id28" draw:start-glue-point="6" draw:end-shape="id29" draw:end-glue-point="3" svg:d="M220409 13464c0 1948 448 2921 1346 2921" svg:viewBox="0 0 1347 2922">
            <text:p/>
          </draw:connector>
          <draw:custom-shape draw:style-name="gr59" draw:text-style-name="P41" xml:id="id28" draw:id="id28" draw:layer="layout" svg:width="0.336cm" svg:height="3.468cm" draw:transform="rotate (-1.5707963267949) translate (222.143cm 13.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0" draw:text-style-name="P38" xml:id="id31" draw:id="id31" draw:layer="layout" svg:width="4.253cm" svg:height="1.673cm" svg:x="216.455cm" svg:y="17.123cm">
            <draw:text-box>
              <text:p>Storaged<text:line-break/>memory component</text:p>
            </draw:text-box>
          </draw:frame>
          <draw:connector draw:style-name="gr61" draw:text-style-name="P15" draw:layer="layout" draw:type="curve" svg:x1="219.605cm" svg:y1="15.023cm" svg:x2="218.581cm" svg:y2="17.123cm" draw:start-shape="id30" draw:start-glue-point="8" draw:end-shape="id31" draw:end-glue-point="0" svg:d="M219605 15023c0 1576-1024 527-1024 2100" svg:viewBox="0 0 1025 2101">
            <text:p/>
          </draw:connector>
          <draw:frame draw:style-name="gr60" draw:text-style-name="P38" xml:id="id33" draw:id="id33" draw:layer="layout" svg:width="4.253cm" svg:height="1.673cm" svg:x="209.855cm" svg:y="13.323cm">
            <draw:text-box>
              <text:p>Segregateable<text:line-break/>memory component</text:p>
            </draw:text-box>
          </draw:frame>
          <draw:connector draw:style-name="gr61" draw:text-style-name="P15" draw:layer="layout" draw:type="curve" svg:x1="215.155cm" svg:y1="13.024cm" svg:x2="214.108cm" svg:y2="14.159cm" draw:start-shape="id32" draw:start-glue-point="6" draw:end-shape="id33" draw:end-glue-point="1" svg:d="M215155 13024c-786 0-263 1135-1047 1135" svg:viewBox="0 0 1048 1136">
            <text:p/>
          </draw:connector>
          <draw:connector draw:style-name="gr61" draw:text-style-name="P15" draw:layer="layout" draw:type="curve" svg:x1="218.906cm" svg:y1="15.623cm" svg:x2="211.541cm" svg:y2="17.323cm" draw:start-shape="id34" draw:start-glue-point="8" draw:end-shape="id35" svg:d="M218906 15623c0 1276-7365 427-7365 1700" svg:viewBox="0 0 7366 1701">
            <text:p/>
          </draw:connector>
          <draw:frame draw:style-name="gr62" draw:text-style-name="P38" xml:id="id35" draw:id="id35" draw:layer="layout" svg:width="3.427cm" svg:height="1.199cm" svg:x="209.828cm" svg:y="17.323cm">
            <draw:text-box>
              <text:p>Timed memory <text:line-break/>component</text:p>
            </draw:text-box>
          </draw:frame>
        </draw:g>
        <draw:g draw:style-name="gr31">
          <draw:custom-shape draw:style-name="gr63" draw:text-style-name="P43" xml:id="id37" draw:id="id37" draw:layer="layout" svg:width="3.471cm" svg:height="1.027cm" svg:x="240.112cm" svg:y="12.447cm">
            <text:p text:style-name="P42"><text:span text:style-name="T18">kinemat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36" draw:id="id36" draw:layer="layout" svg:width="2.008cm" svg:height="1.025cm" svg:x="236.71cm" svg:y="14.982cm">
            <text:p text:style-name="P44"><text:span text:style-name="T19">po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15" draw:layer="layout" draw:type="curve" svg:x1="237.714cm" svg:y1="14.982cm" svg:x2="241.848cm" svg:y2="13.474cm" draw:start-shape="id36" draw:start-glue-point="4" draw:end-shape="id37" draw:end-glue-point="8" svg:d="M237714 14982c0-1131 4134-377 4134-1508" svg:viewBox="0 0 4135 1509">
            <text:p/>
          </draw:connector>
          <draw:custom-shape draw:style-name="gr64" draw:text-style-name="P45" xml:id="id38" draw:id="id38" draw:layer="layout" svg:width="2.331cm" svg:height="1.025cm" svg:x="245.051cm" svg:y="14.982cm">
            <text:p text:style-name="P44"><text:span text:style-name="T19">twist</text:span><text:span text:style-name="T20">(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5" draw:layer="layout" draw:type="curve" svg:x1="246.217cm" svg:y1="14.982cm" svg:x2="241.847cm" svg:y2="13.474cm" draw:start-shape="id38" draw:start-glue-point="4" draw:end-shape="id37" svg:d="M246217 14982c0-1131-4370-377-4370-1508" svg:viewBox="0 0 4371 1509">
            <text:p/>
          </draw:connector>
          <draw:custom-shape draw:style-name="gr64" draw:text-style-name="P45" xml:id="id39" draw:id="id39" draw:layer="layout" svg:width="2.773cm" svg:height="1.025cm" svg:x="234.618cm" svg:y="17.182cm">
            <text:p text:style-name="P44"><text:span text:style-name="T19">posi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0" draw:id="id40" draw:layer="layout" svg:width="3.505cm" svg:height="1.025cm" svg:x="237.756cm" svg:y="17.157cm">
            <text:p text:style-name="P44"><text:span text:style-name="T19">orient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15" draw:layer="layout" draw:type="curve" svg:x1="236.005cm" svg:y1="17.182cm" svg:x2="237.714cm" svg:y2="16.007cm" draw:start-shape="id39" draw:start-glue-point="4" draw:end-shape="id36" draw:end-glue-point="8" svg:d="M236005 17182c0-882 1709-295 1709-1175" svg:viewBox="0 0 1710 1176">
            <text:p/>
          </draw:connector>
          <draw:connector draw:style-name="gr68" draw:text-style-name="P15" draw:layer="layout" draw:type="curve" svg:x1="239.509cm" svg:y1="17.157cm" svg:x2="237.714cm" svg:y2="16.007cm" draw:start-shape="id40" draw:start-glue-point="4" draw:end-shape="id36" draw:end-glue-point="8" svg:d="M239509 17157c0-862-1795-288-1795-1150" svg:viewBox="0 0 1796 1151">
            <text:p/>
          </draw:connector>
          <draw:custom-shape draw:style-name="gr64" draw:text-style-name="P45" xml:id="id41" draw:id="id41" draw:layer="layout" svg:width="2.173cm" svg:height="1.025cm" svg:x="243.624cm" svg:y="17.182cm">
            <text:p text:style-name="P44"><text:span text:style-name="T19">li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2" draw:id="id42" draw:layer="layout" svg:width="2.706cm" svg:height="1.025cm" svg:x="246.862cm" svg:y="17.157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9" draw:text-style-name="P15" draw:layer="layout" draw:type="curve" svg:x1="244.711cm" svg:y1="17.182cm" svg:x2="246.217cm" svg:y2="16.007cm" draw:start-shape="id41" draw:start-glue-point="4" draw:end-shape="id38" draw:end-glue-point="8" svg:d="M244711 17182c0-882 1506-295 1506-1175" svg:viewBox="0 0 1507 1176">
            <text:p/>
          </draw:connector>
          <draw:connector draw:style-name="gr70" draw:text-style-name="P15" draw:layer="layout" draw:type="curve" svg:x1="248.215cm" svg:y1="17.157cm" svg:x2="246.217cm" svg:y2="16.007cm" draw:start-shape="id42" draw:start-glue-point="4" draw:end-shape="id38" draw:end-glue-point="8" svg:d="M248215 17157c0-862-1998-288-1998-1150" svg:viewBox="0 0 1999 1151">
            <text:p/>
          </draw:connector>
          <draw:custom-shape draw:style-name="gr64" draw:text-style-name="P45" xml:id="id43" draw:id="id43" draw:layer="layout" svg:width="3.539cm" svg:height="1.027cm" svg:x="236.021cm" svg:y="20.056cm">
            <text:p text:style-name="P44"><text:span text:style-name="T19">quatern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4" draw:id="id44" draw:layer="layout" svg:width="2.706cm" svg:height="1.025cm" svg:x="240.231cm" svg:y="19.932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5" draw:layer="layout" draw:type="curve" svg:x1="237.791cm" svg:y1="20.056cm" svg:x2="239.509cm" svg:y2="18.182cm" draw:start-shape="id43" draw:start-glue-point="4" draw:end-shape="id40" draw:end-glue-point="8" svg:d="M237791 20056c0-1405 1718-469 1718-1874" svg:viewBox="0 0 1719 1875">
            <text:p/>
          </draw:connector>
          <draw:connector draw:style-name="gr72" draw:text-style-name="P15" draw:layer="layout" draw:type="curve" svg:x1="241.584cm" svg:y1="19.932cm" svg:x2="239.509cm" svg:y2="18.182cm" draw:start-shape="id44" draw:start-glue-point="4" draw:end-shape="id40" draw:end-glue-point="8" svg:d="M241584 19932c0-1312-2075-438-2075-1750" svg:viewBox="0 0 2076 1751">
            <text:p/>
          </draw:connector>
          <draw:frame draw:style-name="gr73" draw:text-style-name="P38" xml:id="id45" draw:id="id45" draw:layer="layout" svg:width="4.342cm" svg:height="1.199cm" svg:x="249.055cm" svg:y="12.56cm">
            <draw:text-box>
              <text:p>From first <text:span text:style-name="T21">derivative</text:span> </text:p>
            </draw:text-box>
          </draw:frame>
          <draw:connector draw:style-name="gr74" draw:text-style-name="P15" draw:layer="layout" draw:type="curve" svg:x1="247.382cm" svg:y1="15.495cm" svg:x2="249.055cm" svg:y2="13.159cm" draw:start-shape="id38" draw:start-glue-point="10" draw:end-shape="id45" draw:end-glue-point="3" svg:d="M247382 15495c1255 0 419-2336 1673-2336" svg:viewBox="0 0 1674 2337">
            <text:p/>
          </draw:connector>
          <draw:custom-shape draw:style-name="gr75" draw:text-style-name="P43" xml:id="id46" draw:id="id46" draw:layer="layout" svg:width="1.94cm" svg:height="1.027cm" svg:x="240.863cm" svg:y="10.665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6" draw:text-style-name="P15" draw:layer="layout" draw:type="curve" svg:x1="241.833cm" svg:y1="11.692cm" svg:x2="241.848cm" svg:y2="12.447cm" draw:start-shape="id46" draw:start-glue-point="8" draw:end-shape="id37" draw:end-glue-point="4" svg:d="M241833 11692c0 565 15 188 15 755" svg:viewBox="0 0 16 756">
            <text:p/>
          </draw:connector>
          <draw:custom-shape draw:style-name="gr77" draw:text-style-name="P43" xml:id="id47" draw:id="id47" draw:layer="layout" svg:width="2.14cm" svg:height="1.027cm" svg:x="240.765cm" svg:y="9.023cm">
            <text:p text:style-name="P42"><text:span text:style-name="T18">tr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8" draw:text-style-name="P15" draw:layer="layout" draw:type="curve" svg:x1="241.835cm" svg:y1="10.05cm" svg:x2="241.833cm" svg:y2="10.665cm" draw:start-shape="id47" draw:start-glue-point="8" draw:end-shape="id46" draw:end-glue-point="4" svg:d="M241835 10050c0 460-2 153-2 615" svg:viewBox="0 0 3 616">
            <text:p/>
          </draw:connector>
          <draw:custom-shape draw:style-name="gr64" draw:text-style-name="P45" draw:layer="layout" svg:width="2.706cm" svg:height="1.025cm" svg:x="246.862cm" svg:y="17.158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rect draw:style-name="gr79" draw:text-style-name="P46" xml:id="id66" draw:id="id66" draw:layer="layout" svg:width="5.1cm" svg:height="1.6cm" svg:x="236.134cm" svg:y="60.835cm">
          <text:p text:style-name="P5">Sensori-motor <text:line-break/>learning by teleportation</text:p>
        </draw:rect>
        <draw:custom-shape draw:style-name="gr80" draw:text-style-name="P47" xml:id="id49" draw:id="id49" draw:layer="layout" svg:width="6.1cm" svg:height="5.3cm" svg:x="210.103cm" svg:y="51.425cm">
          <text:p text:style-name="P5">Environm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8" xml:id="id48" draw:id="id48" draw:layer="layout" svg:width="2.6cm" svg:height="1.4cm" svg:x="203.403cm" svg:y="53.125cm">
          <text:p text:style-name="P5">Agen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15" draw:layer="layout" draw:type="curve" svg:x1="205.623cm" svg:y1="53.33cm" svg:x2="210.996cm" svg:y2="52.201cm" draw:start-shape="id48" draw:start-glue-point="11" draw:end-shape="id49" draw:end-glue-point="5" svg:d="M205623 53330c0-3607 5373-3043 5373-1129" svg:viewBox="0 0 5374 2641">
          <text:p text:style-name="P5">action</text:p>
        </draw:connector>
        <draw:connector draw:style-name="gr83" draw:text-style-name="P15" draw:layer="layout" draw:type="curve" draw:line-skew="0.154cm" svg:x1="210.996cm" svg:y1="55.949cm" svg:x2="205.623cm" svg:y2="54.32cm" draw:start-shape="id49" draw:start-glue-point="7" draw:end-shape="id48" draw:end-glue-point="9" svg:d="M210996 55949c0 2146-5373 2961-5373-1629" svg:viewBox="0 0 5374 3351">
          <text:p text:style-name="P5">perception</text:p>
        </draw:connector>
        <draw:custom-shape draw:style-name="gr84" draw:text-style-name="P50" xml:id="id61" draw:id="id61" draw:layer="layout" svg:width="3.08cm" svg:height="1.025cm" svg:x="246.534cm" svg:y="52.435cm">
          <text:p text:style-name="P49"><text:span text:style-name="T22">roadm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79" draw:text-style-name="P51" xml:id="id51" draw:id="id51" draw:layer="layout" svg:width="2.232cm" svg:height="0.919cm" svg:x="233.734cm" svg:y="67.516cm">
          <text:p text:style-name="P8"><text:span text:style-name="T23">transformer</text:span></text:p>
        </draw:rect>
        <draw:connector draw:style-name="gr85" draw:text-style-name="P15" draw:layer="layout" draw:type="curve" svg:x1="237.684cm" svg:y1="65.135cm" svg:x2="234.85cm" svg:y2="67.516cm" draw:start-shape="id50" draw:start-glue-point="2" draw:end-shape="id51" draw:end-glue-point="0" svg:d="M237684 65135c0 1786-2834 596-2834 2381" svg:viewBox="0 0 2835 2382">
          <text:p/>
        </draw:connector>
        <draw:connector draw:style-name="gr86" draw:text-style-name="P15" draw:layer="layout" draw:type="curve" svg:x1="234.85cm" svg:y1="68.435cm" svg:x2="234.868cm" svg:y2="69.416cm" draw:start-shape="id51" draw:start-glue-point="2" draw:end-shape="id52" draw:end-glue-point="0" svg:d="M234850 68435c0 736 18 246 18 981" svg:viewBox="0 0 19 982">
          <text:p/>
        </draw:connector>
        <draw:rect draw:style-name="gr79" draw:text-style-name="P51" xml:id="id52" draw:id="id52" draw:layer="layout" svg:width="3.532cm" svg:height="0.919cm" svg:x="233.102cm" svg:y="69.416cm">
          <text:p text:style-name="P8"><text:span text:style-name="T23">improvements</text:span></text:p>
        </draw:rect>
        <draw:rect draw:style-name="gr79" draw:text-style-name="P51" xml:id="id60" draw:id="id60" draw:layer="layout" svg:width="4.8cm" svg:height="1.3cm" svg:x="244.234cm" svg:y="64.91cm">
          <text:p text:style-name="P8"><text:span text:style-name="T23">Human in </text:span><text:span text:style-name="T23">loop</text:span><text:span text:style-name="T23"><text:line-break/></text:span><text:span text:style-name="T23">sensory-</text:span><text:span text:style-name="T23">motor </text:span><text:span text:style-name="T23">learning</text:span></text:p>
        </draw:rect>
        <draw:rect draw:style-name="gr79" draw:text-style-name="P51" xml:id="id59" draw:id="id59" draw:layer="layout" svg:width="4.3cm" svg:height="1.425cm" svg:x="245.934cm" svg:y="54.81cm">
          <text:p text:style-name="P30"><text:span text:style-name="T24">Homeostasis in MRS</text:span></text:p>
        </draw:rect>
        <draw:rect draw:style-name="gr79" draw:text-style-name="P51" xml:id="id58" draw:id="id58" draw:layer="layout" svg:width="4cm" svg:height="1.119cm" svg:x="246.634cm" svg:y="61.435cm">
          <text:p text:style-name="P30"><text:span text:style-name="T24">Homeostasis in one</text:span><text:span text:style-name="T24"><text:line-break/></text:span><text:span text:style-name="T24">robot </text:span></text:p>
        </draw:rect>
        <draw:rect draw:style-name="gr41" draw:text-style-name="P5" xml:id="id57" draw:id="id57" draw:layer="layout" svg:width="3.8cm" svg:height="1.1cm" svg:x="252.034cm" svg:y="59.535cm">
          <text:p text:style-name="P5">Human given goals</text:p>
        </draw:rect>
        <draw:rect draw:style-name="gr41" draw:text-style-name="P5" xml:id="id53" draw:id="id53" draw:layer="layout" svg:width="3.8cm" svg:height="1.5cm" svg:x="254.434cm" svg:y="66.31cm">
          <text:p text:style-name="P5">Wear and tear</text:p>
        </draw:rect>
        <draw:rect draw:style-name="gr41" draw:text-style-name="P5" xml:id="id54" draw:id="id54" draw:layer="layout" svg:width="3.6cm" svg:height="1.4cm" svg:x="254.934cm" svg:y="68.71cm">
          <text:p text:style-name="P5">energy</text:p>
        </draw:rect>
        <draw:rect draw:style-name="gr41" draw:text-style-name="P5" xml:id="id55" draw:id="id55" draw:layer="layout" svg:width="3.6cm" svg:height="1.4cm" svg:x="253.634cm" svg:y="71.51cm">
          <text:p text:style-name="P5">Body</text:p>
        </draw:rect>
        <draw:connector draw:style-name="gr87" draw:text-style-name="P15" draw:layer="layout" draw:type="curve" svg:x1="256.334cm" svg:y1="67.81cm" svg:x2="256.734cm" svg:y2="68.71cm" draw:start-shape="id53" draw:start-glue-point="2" draw:end-shape="id54" draw:end-glue-point="0" svg:d="M256334 67810c0 675 400 225 400 900" svg:viewBox="0 0 401 901">
          <text:p/>
        </draw:connector>
        <draw:connector draw:style-name="gr88" draw:text-style-name="P15" draw:layer="layout" draw:type="curve" svg:x1="256.734cm" svg:y1="70.11cm" svg:x2="255.434cm" svg:y2="71.51cm" draw:start-shape="id54" draw:start-glue-point="2" draw:end-shape="id55" draw:end-glue-point="0" svg:d="M256734 70110c0 1050-1300 350-1300 1400" svg:viewBox="0 0 1301 1401">
          <text:p/>
        </draw:connector>
        <draw:rect draw:style-name="gr41" draw:text-style-name="P5" xml:id="id56" draw:id="id56" draw:layer="layout" svg:width="3cm" svg:height="1.3cm" svg:x="258.034cm" svg:y="71.61cm">
          <text:p text:style-name="P5">mind</text:p>
        </draw:rect>
        <draw:connector draw:style-name="gr89" draw:text-style-name="P15" draw:layer="layout" draw:type="curve" svg:x1="256.734cm" svg:y1="70.11cm" svg:x2="259.534cm" svg:y2="71.61cm" draw:start-shape="id54" draw:start-glue-point="2" draw:end-shape="id56" svg:d="M256734 70110c0 1125 2800 375 2800 1500" svg:viewBox="0 0 2801 1501">
          <text:p/>
        </draw:connector>
        <draw:connector draw:style-name="gr90" draw:text-style-name="P15" draw:layer="layout" draw:type="curve" svg:x1="252.034cm" svg:y1="60.085cm" svg:x2="250.634cm" svg:y2="61.994cm" draw:start-shape="id57" draw:start-glue-point="3" draw:end-shape="id58" draw:end-glue-point="1" svg:d="M252034 60085c-1050 0-350 1909-1400 1909" svg:viewBox="0 0 1401 1910">
          <text:p/>
        </draw:connector>
        <draw:connector draw:style-name="gr91" draw:text-style-name="P15" draw:layer="layout" draw:type="curve" svg:x1="248.634cm" svg:y1="62.554cm" svg:x2="256.334cm" svg:y2="66.31cm" draw:start-shape="id58" draw:start-glue-point="2" draw:end-shape="id53" draw:end-glue-point="0" svg:d="M248634 62554c0 2817 7700 939 7700 3756" svg:viewBox="0 0 7701 3757">
          <text:p/>
        </draw:connector>
        <draw:connector draw:style-name="gr92" draw:text-style-name="P15" draw:layer="layout" draw:type="curve" svg:x1="248.084cm" svg:y1="56.235cm" svg:x2="248.634cm" svg:y2="61.435cm" draw:start-shape="id59" draw:start-glue-point="2" draw:end-shape="id58" svg:d="M248084 56235c0 3900 550 1300 550 5200" svg:viewBox="0 0 551 5201">
          <text:p/>
        </draw:connector>
        <draw:connector draw:style-name="gr43" draw:text-style-name="P15" draw:layer="layout" draw:type="curve" svg:x1="248.634cm" svg:y1="62.554cm" svg:x2="246.634cm" svg:y2="64.91cm" draw:start-shape="id58" draw:end-shape="id60" svg:d="M248634 62554c0 1767-2000 589-2000 2356" svg:viewBox="0 0 2001 2357">
          <text:p/>
        </draw:connector>
        <draw:connector draw:style-name="gr93" draw:text-style-name="P15" draw:layer="layout" draw:type="curve" svg:x1="248.074cm" svg:y1="53.46cm" svg:x2="248.084cm" svg:y2="54.81cm" draw:start-shape="id61" draw:start-glue-point="8" draw:end-shape="id59" draw:end-glue-point="0" svg:d="M248074 53460c0 1012 10 338 10 1350" svg:viewBox="0 0 11 1351">
          <text:p/>
        </draw:connector>
        <draw:rect draw:style-name="gr41" draw:text-style-name="P5" xml:id="id62" draw:id="id62" draw:layer="layout" svg:width="2.6cm" svg:height="1.3cm" svg:x="239.134cm" svg:y="57.735cm">
          <text:p text:style-name="P5">Reducing<text:line-break/>suprise</text:p>
        </draw:rect>
        <draw:connector draw:style-name="gr44" draw:text-style-name="P15" draw:layer="layout" draw:type="curve" svg:x1="248.084cm" svg:y1="56.235cm" svg:x2="240.434cm" svg:y2="57.735cm" draw:start-shape="id59" draw:start-glue-point="2" draw:end-shape="id62" draw:end-glue-point="0" svg:d="M248084 56235c0 1125-7650 375-7650 1500" svg:viewBox="0 0 7651 1501">
          <text:p/>
        </draw:connector>
        <draw:rect draw:style-name="gr41" draw:text-style-name="P5" xml:id="id63" draw:id="id63" draw:layer="layout" svg:width="2.2cm" svg:height="1cm" svg:x="230.534cm" svg:y="71.835cm">
          <text:p text:style-name="P5">clustering</text:p>
        </draw:rect>
        <draw:connector draw:style-name="gr45" draw:text-style-name="P15" draw:layer="layout" draw:type="curve" svg:x1="234.868cm" svg:y1="70.335cm" svg:x2="231.634cm" svg:y2="71.835cm" draw:start-shape="id52" draw:start-glue-point="2" draw:end-shape="id63" draw:end-glue-point="0" svg:d="M234868 70335c0 1125-3234 375-3234 1500" svg:viewBox="0 0 3235 1501">
          <text:p/>
        </draw:connector>
        <draw:rect draw:style-name="gr41" draw:text-style-name="P5" xml:id="id64" draw:id="id64" draw:layer="layout" svg:width="3cm" svg:height="1.1cm" svg:x="229.534cm" svg:y="74.635cm">
          <text:p text:style-name="P5">Clustering<text:line-break/>to find periods</text:p>
        </draw:rect>
        <draw:connector draw:style-name="gr94" draw:text-style-name="P15" draw:layer="layout" draw:type="curve" svg:x1="231.634cm" svg:y1="72.835cm" svg:x2="231.034cm" svg:y2="74.635cm" draw:start-shape="id63" draw:end-shape="id64" draw:end-glue-point="0" svg:d="M231634 72835c0 1350-600 450-600 1800" svg:viewBox="0 0 601 1801">
          <text:p/>
        </draw:connector>
        <draw:rect draw:style-name="gr41" draw:text-style-name="P5" xml:id="id65" draw:id="id65" draw:layer="layout" svg:width="4cm" svg:height="1.8cm" svg:x="229.034cm" svg:y="77.035cm">
          <text:p text:style-name="P5">Clustering to find<text:line-break/>similar shapes in <text:line-break/>each period</text:p>
        </draw:rect>
        <draw:connector draw:style-name="gr95" draw:text-style-name="P15" draw:layer="layout" draw:type="curve" svg:x1="231.034cm" svg:y1="75.735cm" svg:x2="231.034cm" svg:y2="77.035cm" draw:start-shape="id64" draw:start-glue-point="2" draw:end-shape="id65" draw:end-glue-point="0" svg:d="M231034 75735v1300" svg:viewBox="0 0 1 1301">
          <text:p/>
        </draw:connector>
        <draw:rect draw:style-name="gr41" draw:text-style-name="P5" xml:id="id50" draw:id="id50" draw:layer="layout" svg:width="2.7cm" svg:height="1.3cm" svg:x="236.334cm" svg:y="63.835cm">
          <text:p text:style-name="P5">Forcasting<text:line-break/>model</text:p>
        </draw:rect>
        <draw:connector draw:style-name="gr96" draw:text-style-name="P15" draw:layer="layout" draw:type="curve" svg:x1="238.684cm" svg:y1="62.435cm" svg:x2="237.684cm" svg:y2="63.835cm" draw:start-shape="id66" draw:start-glue-point="2" draw:end-shape="id50" draw:end-glue-point="0" svg:d="M238684 62435c0 1050-1000 350-1000 1400" svg:viewBox="0 0 1001 1401">
          <text:p/>
        </draw:connector>
        <draw:connector draw:style-name="gr97" draw:text-style-name="P15" draw:layer="layout" draw:type="curve" svg:x1="240.434cm" svg:y1="59.035cm" svg:x2="238.684cm" svg:y2="60.835cm" draw:start-shape="id62" draw:start-glue-point="2" draw:end-shape="id66" draw:end-glue-point="0" svg:d="M240434 59035c0 1350-1750 450-1750 1800" svg:viewBox="0 0 1751 1801">
          <text:p/>
        </draw:connector>
        <draw:rect draw:style-name="gr41" draw:text-style-name="P5" xml:id="id67" draw:id="id67" draw:layer="layout" svg:width="3.3cm" svg:height="1.2cm" svg:x="233.234cm" svg:y="71.835cm">
          <text:p text:style-name="P5">Adding time to <text:line-break/>transformer</text:p>
        </draw:rect>
        <draw:connector draw:style-name="gr98" draw:text-style-name="P15" draw:layer="layout" draw:type="curve" svg:x1="234.868cm" svg:y1="70.335cm" svg:x2="234.884cm" svg:y2="71.835cm" draw:start-shape="id52" draw:start-glue-point="2" draw:end-shape="id67" draw:end-glue-point="0" svg:d="M234868 70335c0 1125 16 375 16 1500" svg:viewBox="0 0 17 1501">
          <text:p/>
        </draw:connector>
        <draw:rect draw:style-name="gr41" draw:text-style-name="P5" xml:id="id68" draw:id="id68" draw:layer="layout" svg:width="3.4cm" svg:height="1.1cm" svg:x="237.334cm" svg:y="71.835cm">
          <text:p text:style-name="P5">Add probability <text:line-break/>to transformer</text:p>
        </draw:rect>
        <draw:rect draw:style-name="gr41" draw:text-style-name="P5" xml:id="id69" draw:id="id69" draw:layer="layout" svg:width="3.7cm" svg:height="1.7cm" svg:x="239.734cm" svg:y="74.435cm">
          <text:p text:style-name="P5">Use prediction <text:line-break/>probability <text:line-break/>in KF</text:p>
        </draw:rect>
        <draw:connector draw:style-name="gr99" draw:text-style-name="P15" draw:layer="layout" draw:type="curve" svg:x1="234.868cm" svg:y1="70.335cm" svg:x2="239.034cm" svg:y2="71.835cm" draw:start-shape="id52" draw:start-glue-point="2" draw:end-shape="id68" draw:end-glue-point="0" svg:d="M234868 70335c0 1125 4166 375 4166 1500" svg:viewBox="0 0 4167 1501">
          <text:p/>
        </draw:connector>
        <draw:connector draw:style-name="gr100" draw:text-style-name="P15" draw:layer="layout" draw:type="curve" svg:x1="239.034cm" svg:y1="72.935cm" svg:x2="241.584cm" svg:y2="74.435cm" draw:start-shape="id68" draw:start-glue-point="2" draw:end-shape="id69" draw:end-glue-point="0" svg:d="M239034 72935c0 1125 2550 375 2550 1500" svg:viewBox="0 0 2551 1501">
          <text:p/>
        </draw:connector>
        <draw:rect draw:style-name="gr41" draw:text-style-name="P5" xml:id="id70" draw:id="id70" draw:layer="layout" svg:width="3.1cm" svg:height="1.5cm" svg:x="219.434cm" svg:y="71.235cm">
          <text:p text:style-name="P5">Saving<text:line-break/>the model in <text:line-break/>memory</text:p>
        </draw:rect>
        <draw:connector draw:style-name="gr101" draw:text-style-name="P15" draw:layer="layout" draw:type="curve" svg:x1="234.85cm" svg:y1="68.435cm" svg:x2="220.984cm" svg:y2="71.235cm" draw:start-shape="id51" draw:start-glue-point="2" draw:end-shape="id70" draw:end-glue-point="0" svg:d="M234850 68435c0 2100-13866 700-13866 2800" svg:viewBox="0 0 13867 2801">
          <text:p/>
        </draw:connector>
        <draw:rect draw:style-name="gr41" draw:text-style-name="P5" xml:id="id71" draw:id="id71" draw:layer="layout" svg:width="2.9cm" svg:height="1.1cm" svg:x="223.134cm" svg:y="76.335cm">
          <text:p text:style-name="P5">Learned<text:line-break/>parameters</text:p>
        </draw:rect>
        <draw:connector draw:style-name="gr102" draw:text-style-name="P15" draw:layer="layout" draw:type="curve" svg:x1="220.984cm" svg:y1="72.735cm" svg:x2="224.584cm" svg:y2="76.335cm" draw:start-shape="id70" draw:start-glue-point="2" draw:end-shape="id71" draw:end-glue-point="0" svg:d="M220984 72735c0 2700 3600 900 3600 3600" svg:viewBox="0 0 3601 3601">
          <text:p/>
        </draw:connector>
        <draw:rect draw:style-name="gr41" draw:text-style-name="P5" xml:id="id72" draw:id="id72" draw:layer="layout" svg:width="3.1cm" svg:height="1.2cm" svg:x="215.834cm" svg:y="76.235cm">
          <text:p text:style-name="P5">Transformer<text:line-break/>architecture</text:p>
        </draw:rect>
        <draw:connector draw:style-name="gr103" draw:text-style-name="P15" draw:layer="layout" draw:type="curve" svg:x1="220.984cm" svg:y1="72.735cm" svg:x2="217.384cm" svg:y2="76.235cm" draw:start-shape="id70" draw:start-glue-point="2" draw:end-shape="id72" draw:end-glue-point="0" svg:d="M220984 72735c0 2625-3600 875-3600 3500" svg:viewBox="0 0 3601 3501">
          <text:p/>
        </draw:connector>
        <draw:rect draw:style-name="gr41" draw:text-style-name="P5" xml:id="id73" draw:id="id73" draw:layer="layout" svg:width="2.9cm" svg:height="1.1cm" svg:x="219.634cm" svg:y="76.335cm">
          <text:p text:style-name="P5">Trainig<text:line-break/>config</text:p>
        </draw:rect>
        <draw:connector draw:style-name="gr104" draw:text-style-name="P15" draw:layer="layout" draw:type="curve" svg:x1="220.984cm" svg:y1="72.735cm" svg:x2="221.084cm" svg:y2="76.335cm" draw:start-shape="id70" draw:start-glue-point="2" draw:end-shape="id73" draw:end-glue-point="0" svg:d="M220984 72735c0 2700 100 900 100 3600" svg:viewBox="0 0 101 3601">
          <text:p/>
        </draw:connector>
        <draw:custom-shape draw:style-name="gr105" draw:text-style-name="P52" xml:id="id75" draw:id="id75" draw:layer="layout" svg:width="2.6cm" svg:height="2.2cm" svg:x="223.434cm" svg:y="71.035cm">
          <text:p text:style-name="P5">In normal<text:line-break/>episode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1.084cm" svg:y1="76.335cm" svg:x2="215.434cm" svg:y2="74.335cm" draw:start-shape="id73" draw:start-glue-point="0" draw:end-shape="id74" draw:end-glue-point="6" svg:d="M221084 76335c0-1498-5650-499-5650-2000" svg:viewBox="0 0 5651 2001">
          <text:p/>
        </draw:connector>
        <draw:custom-shape draw:style-name="gr106" draw:text-style-name="P52" xml:id="id74" draw:id="id74" draw:layer="layout" svg:width="3cm" svg:height="1.9cm" svg:x="213.934cm" svg:y="72.435cm">
          <text:p text:style-name="P5">In semantic<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4.584cm" svg:y1="76.335cm" svg:x2="224.734cm" svg:y2="73.235cm" draw:start-shape="id71" draw:start-glue-point="0" draw:end-shape="id75" draw:end-glue-point="6" svg:d="M224584 76335c0-2323 150-774 150-3100" svg:viewBox="0 0 151 3101">
          <text:p/>
        </draw:connector>
        <draw:connector draw:style-name="gr46" draw:text-style-name="P15" draw:layer="layout" draw:type="curve" svg:x1="217.384cm" svg:y1="76.235cm" svg:x2="215.434cm" svg:y2="74.335cm" draw:start-shape="id72" draw:start-glue-point="0" draw:end-shape="id74" draw:end-glue-point="6" svg:d="M217384 76235c0-1423-1950-474-1950-1900" svg:viewBox="0 0 1951 1901">
          <text:p/>
        </draw:connector>
        <draw:custom-shape draw:style-name="gr107" draw:text-style-name="P52" xml:id="id24" draw:id="id24" draw:layer="layout" svg:width="2.6cm" svg:height="1.4cm" svg:x="-49.716cm" svg:y="-1.752cm">
          <text:p text:style-name="P3">This from <text:line-break/>Google gpt</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76" draw:id="id76" draw:layer="layout" svg:width="6.5cm" svg:height="1.7cm" svg:x="228.234cm" svg:y="80.735cm">
          <text:p text:style-name="P5">Particle filter<text:line-break/>for finding where the system <text:line-break/>is in the cluster</text:p>
        </draw:rect>
        <draw:connector draw:style-name="gr108" draw:text-style-name="P15" draw:layer="layout" draw:type="curve" svg:x1="231.034cm" svg:y1="78.835cm" svg:x2="231.484cm" svg:y2="80.735cm" draw:start-shape="id65" draw:start-glue-point="2" draw:end-shape="id76" svg:d="M231034 78835c0 1425 450 475 450 1900" svg:viewBox="0 0 451 1901">
          <text:p/>
        </draw:connector>
        <draw:rect draw:name="suprise_reduction" draw:style-name="gr41" draw:text-style-name="P5" xml:id="id93" draw:id="id93" draw:layer="layout" svg:width="5.133cm" svg:height="2.101cm" svg:x="-95.885cm" svg:y="153.488cm">
          <text:p text:style-name="P5">Automatic<text:line-break/>Suprise <text:line-break/>reduction<text:line-break/>goal attachment</text:p>
        </draw:rect>
        <draw:custom-shape draw:name="robot_creation" draw:style-name="gr109" draw:text-style-name="P43" xml:id="id105" draw:id="id105" draw:layer="layout" svg:width="3.8cm" svg:height="1.9cm" svg:x="-95.246cm" svg:y="149.453cm">
          <text:p text:style-name="P42"><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77" draw:id="id77" draw:layer="layout" svg:width="2.4cm" svg:height="1.2cm" svg:x="-94.537cm" svg:y="159.389cm">
          <text:p text:style-name="P5">remember</text:p>
        </draw:rect>
        <draw:rect draw:style-name="gr41" draw:text-style-name="P5" xml:id="id78" draw:id="id78" draw:layer="layout" svg:width="2.4cm" svg:height="1.2cm" svg:x="-94.537cm" svg:y="161.289cm">
          <text:p text:style-name="P5">episode</text:p>
        </draw:rect>
        <draw:rect draw:style-name="gr41" draw:text-style-name="P5" xml:id="id79" draw:id="id79" draw:layer="layout" svg:width="2.4cm" svg:height="1.2cm" svg:x="-94.537cm" svg:y="163.789cm">
          <text:p text:style-name="P5">Feature<text:line-break/>segregation</text:p>
        </draw:rect>
        <draw:connector draw:style-name="gr110" draw:text-style-name="P15" draw:layer="layout" draw:type="curve" svg:x1="-93.337cm" svg:y1="160.589cm" svg:x2="-93.337cm" svg:y2="161.289cm" draw:start-shape="id77" draw:start-glue-point="2" draw:end-shape="id78" draw:end-glue-point="0" svg:d="M-93337 160589v700" svg:viewBox="0 0 1 701">
          <text:p/>
        </draw:connector>
        <draw:connector draw:style-name="gr111" draw:text-style-name="P15" draw:layer="layout" draw:type="curve" svg:x1="-93.337cm" svg:y1="162.489cm" svg:x2="-93.337cm" svg:y2="163.789cm" draw:start-shape="id78" draw:start-glue-point="2" draw:end-shape="id79" draw:end-glue-point="0" svg:d="M-93337 162489v1300" svg:viewBox="0 0 1 1301">
          <text:p/>
        </draw:connector>
        <draw:connector draw:style-name="gr112" draw:text-style-name="P15" draw:layer="layout" draw:type="curve" svg:x1="-93.337cm" svg:y1="164.489cm" svg:x2="-93.305cm" svg:y2="166.487cm" draw:end-shape="id80" draw:end-glue-point="5" svg:d="M-93337 164489c0 1123 32 125 32 1998" svg:viewBox="0 0 33 1999">
          <text:p/>
        </draw:connector>
        <draw:rect draw:style-name="gr41" draw:text-style-name="P5" xml:id="id83" draw:id="id83" draw:layer="layout" svg:width="4.115cm" svg:height="1.424cm" svg:x="-95.326cm" svg:y="169.089cm">
          <text:p text:style-name="P5">Feature <text:line-break/>slice<text:line-break/>(remove time stamp)</text:p>
        </draw:rect>
        <draw:rect draw:style-name="gr41" draw:text-style-name="P5" xml:id="id84" draw:id="id84" draw:layer="layout" svg:width="2.4cm" svg:height="1.2cm" svg:x="-94.437cm" svg:y="172.589cm">
          <text:p text:style-name="P5">Period<text:line-break/>segregation</text:p>
        </draw:rect>
        <draw:connector draw:style-name="gr113" draw:text-style-name="P15" draw:layer="layout" draw:type="curve" svg:x1="-93.569cm" svg:y1="176.487cm" svg:x2="-93.562cm" svg:y2="177.928cm" draw:start-shape="id81" draw:start-glue-point="7" draw:end-shape="id82" svg:d="M-93569 176487c0 1081 7 361 7 1441" svg:viewBox="0 0 8 1442">
          <text:p/>
        </draw:connector>
        <draw:rect draw:style-name="gr41" draw:text-style-name="P5" xml:id="id85" draw:id="id85" draw:layer="layout" svg:width="2.9cm" svg:height="2.321cm" svg:x="-94.937cm" svg:y="181.389cm">
          <text:p text:style-name="P5">Multiple (kfold) <text:line-break/>train_test<text:line-break/>transformer<text:line-break/>validation</text:p>
        </draw:rect>
        <draw:connector draw:style-name="gr114" draw:text-style-name="P15" draw:layer="layout" draw:type="curve" svg:x1="-93.305cm" svg:y1="167.687cm" svg:x2="-93.268cm" svg:y2="169.089cm" draw:start-shape="id80" draw:start-glue-point="8" draw:end-shape="id83" draw:end-glue-point="0" svg:d="M-93305 167687c0 1053 37 352 37 1402" svg:viewBox="0 0 38 1403">
          <text:p/>
        </draw:connector>
        <draw:connector draw:style-name="gr115" draw:text-style-name="P15" draw:layer="layout" draw:type="curve" svg:x1="-93.237cm" svg:y1="173.789cm" svg:x2="-93.244cm" svg:y2="175.287cm" draw:start-shape="id84" draw:start-glue-point="2" draw:end-shape="id81" draw:end-glue-point="5" svg:d="M-93237 173789c0 1123-7 375-7 1498" svg:viewBox="0 0 8 1499">
          <text:p/>
        </draw:connector>
        <draw:custom-shape draw:style-name="gr116" draw:text-style-name="P53" draw:layer="layout" svg:width="3.183cm" svg:height="1.2cm" svg:x="-94.837cm" svg:y="175.287cm">
          <text:p text:style-name="P3">Sample<text:line-break/>periods</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7" draw:text-style-name="P55" xml:id="id81" draw:id="id81" draw:layer="layout" svg:width="3.183cm" svg:height="1.2cm" svg:x="-94.836cm" svg:y="175.287cm">
          <text:p text:style-name="P54"><text:span text:style-name="T25">Sample</text:span><text:span text:style-name="T25"><text:line-break/></text:span><text:span text:style-name="T25">period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8" draw:text-style-name="P55" xml:id="id80" draw:id="id80" draw:layer="layout" svg:width="4.536cm" svg:height="1.2cm" svg:x="-95.573cm" svg:y="166.487cm">
          <text:p text:style-name="P54"><text:span text:style-name="T25">GPS/LIDAR</text:span><text:span text:style-name="T25"><text:line-break/></text:span><text:span text:style-name="T25">seperated</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9" draw:text-style-name="P56" xml:id="id86" draw:id="id86" draw:layer="layout" svg:width="4.126cm" svg:height="2.72cm" svg:x="-95.537cm" svg:y="184.489cm">
          <text:p text:style-name="P5">Passes<text:line-break/>the ML validation<text:line-break/>criteria?</text:p>
          <draw:enhanced-geometry svg:viewBox="0 0 21600 21600" draw:glue-points="10800 0 0 10800 10800 21600 21600 10800" draw:text-areas="5400 5400 16200 16200" draw:type="diamond" draw:enhanced-path="M 10800 0 L 21600 10800 10800 21600 0 10800 10800 0 Z N"/>
        </draw:custom-shape>
        <draw:connector draw:style-name="gr120" draw:text-style-name="P15" draw:layer="layout" draw:type="curve" svg:x1="-93.487cm" svg:y1="183.71cm" svg:x2="-93.474cm" svg:y2="184.489cm" draw:start-shape="id85" draw:start-glue-point="2" draw:end-shape="id86" draw:end-glue-point="4" svg:d="M-93487 183710c0 585 13 196 13 779" svg:viewBox="0 0 14 780">
          <text:p/>
        </draw:connector>
        <draw:rect draw:style-name="gr41" draw:text-style-name="P5" xml:id="id87" draw:id="id87" draw:layer="layout" svg:width="4.5cm" svg:height="2.3cm" svg:x="-90.354cm" svg:y="187.509cm">
          <text:p text:style-name="P5">Memorize<text:line-break/>transformer<text:line-break/>learned parameters<text:line-break/>(weights)</text:p>
        </draw:rect>
        <draw:connector draw:style-name="gr121" draw:text-style-name="P15" draw:layer="layout" svg:x1="-91.411cm" svg:y1="185.849cm" svg:x2="-88.104cm" svg:y2="187.509cm" draw:start-shape="id86" draw:start-glue-point="7" draw:end-shape="id87" draw:end-glue-point="0" svg:d="M-91411 185849h3307v1660" svg:viewBox="0 0 3308 1661">
          <text:p text:style-name="P5">yes</text:p>
        </draw:connector>
        <draw:connector draw:style-name="gr122" draw:text-style-name="P15" draw:layer="layout" draw:type="curve" svg:x1="-88.288cm" svg:y1="181.221cm" svg:x2="-92.037cm" svg:y2="182.549cm" draw:start-shape="id88" draw:start-glue-point="6" draw:end-shape="id85" draw:end-glue-point="1" svg:d="M-88288 181221c-2811 0-937 1328-3749 1328" svg:viewBox="0 0 3750 1329">
          <text:p/>
        </draw:connector>
        <draw:connector draw:style-name="gr123" draw:text-style-name="P15" draw:layer="layout" draw:type="curve" svg:x1="-88.421cm" svg:y1="183.678cm" svg:x2="-92.037cm" svg:y2="182.549cm" draw:start-shape="id89" draw:start-glue-point="6" draw:end-shape="id85" draw:end-glue-point="1" svg:d="M-88421 183678c-2710 0-903-1129-3616-1129" svg:viewBox="0 0 3617 1130">
          <text:p/>
        </draw:connector>
        <draw:rect draw:style-name="gr41" draw:text-style-name="P5" xml:id="id90" draw:id="id90" draw:layer="layout" svg:width="3.262cm" svg:height="1.2cm" svg:x="-100.003cm" svg:y="172.069cm">
          <text:p text:style-name="P5">Clustering and<text:line-break/>sorting by time</text:p>
        </draw:rect>
        <draw:connector draw:style-name="gr124" draw:text-style-name="P15" draw:layer="layout" draw:line-skew="-0.275cm" svg:x1="-93.269cm" svg:y1="170.213cm" svg:x2="-98.372cm" svg:y2="172.069cm" draw:end-shape="id90" draw:end-glue-point="0" svg:d="M-93269 170213v403h-5103v1453" svg:viewBox="0 0 5104 1857">
          <text:p/>
        </draw:connector>
        <draw:connector draw:style-name="gr125" draw:text-style-name="P15" draw:layer="layout" svg:x1="-93.268cm" svg:y1="170.513cm" svg:x2="-93.237cm" svg:y2="172.589cm" draw:start-shape="id83" draw:start-glue-point="2" draw:end-shape="id84" draw:end-glue-point="0" svg:d="M-93268 170513v1038h31v1038" svg:viewBox="0 0 32 2077">
          <text:p/>
        </draw:connector>
        <draw:rect draw:style-name="gr40" draw:text-style-name="P32" xml:id="id18" draw:id="id18" draw:layer="layout" svg:width="1.9cm" svg:height="0.9cm" svg:x="-51.727cm" svg:y="3.525cm">
          <text:p text:style-name="P5">Kinds</text:p>
        </draw:rect>
        <draw:connector draw:style-name="gr126" draw:text-style-name="P15" draw:layer="layout" draw:type="curve" svg:x1="-50.866cm" svg:y1="2.748cm" svg:x2="-50.777cm" svg:y2="3.525cm" draw:start-shape="id23" draw:start-glue-point="2" draw:end-shape="id18" draw:end-glue-point="0" svg:d="M-50866 2748c0 583 89 195 89 777" svg:viewBox="0 0 90 778">
          <text:p/>
        </draw:connector>
        <draw:rect draw:style-name="gr41" draw:text-style-name="P5" xml:id="id92" draw:id="id92" draw:layer="layout" svg:width="1.9cm" svg:height="0.9cm" svg:x="-42.756cm" svg:y="11.353cm">
          <text:p text:style-name="P5">Suprise <text:line-break/>reduction</text:p>
        </draw:rect>
        <draw:connector draw:style-name="gr127" draw:text-style-name="P15" draw:layer="layout" draw:type="curve" svg:x1="-45.442cm" svg:y1="8.983cm" svg:x2="-41.806cm" svg:y2="11.353cm" draw:start-shape="id91" draw:end-shape="id92" draw:end-glue-point="0" svg:d="M-45442 8983c0 1777 3636 593 3636 2370" svg:viewBox="0 0 3637 2371">
          <text:p/>
        </draw:connector>
        <draw:rect draw:name="suprise_reduction 1" draw:style-name="gr41" draw:text-style-name="P5" xml:id="id94" draw:id="id94" draw:layer="layout" svg:width="3.95cm" svg:height="2.262cm" svg:x="-95.315cm" svg:y="156.289cm">
          <text:p text:style-name="P5">teleportation<text:line-break/>sensory-motor<text:line-break/>recording</text:p>
        </draw:rect>
        <draw:connector draw:style-name="gr128" draw:text-style-name="P15" draw:layer="layout" svg:x1="-93.318cm" svg:y1="155.589cm" svg:x2="-93.34cm" svg:y2="156.289cm" draw:start-shape="id93" draw:start-glue-point="2" draw:end-shape="id94" draw:end-glue-point="0" svg:d="M-93318 155589v350h-22v350" svg:viewBox="0 0 23 701">
          <text:p/>
        </draw:connector>
        <draw:connector draw:style-name="gr129" draw:text-style-name="P15" draw:layer="layout" svg:x1="-93.34cm" svg:y1="158.551cm" svg:x2="-93.337cm" svg:y2="159.389cm" draw:start-shape="id94" draw:start-glue-point="2" draw:end-shape="id77" draw:end-glue-point="0" svg:d="M-93340 158551v419h3v419" svg:viewBox="0 0 4 839">
          <text:p/>
        </draw:connector>
        <draw:rect draw:style-name="gr41" draw:text-style-name="P5" xml:id="id95" draw:id="id95" draw:layer="layout" svg:width="2.642cm" svg:height="1.44cm" svg:x="-107.117cm" svg:y="151.379cm">
          <text:p text:style-name="P5">Online<text:line-break/>testing</text:p>
        </draw:rect>
        <draw:rect draw:style-name="gr41" draw:text-style-name="P5" xml:id="id96" draw:id="id96" draw:layer="layout" svg:width="4.345cm" svg:height="1.743cm" svg:x="-107.969cm" svg:y="154.245cm">
          <text:p text:style-name="P5">Forcasting <text:line-break/>model selection<text:line-break/>based on observation</text:p>
        </draw:rect>
        <draw:connector draw:style-name="gr130" draw:text-style-name="P15" draw:layer="layout" svg:x1="-105.796cm" svg:y1="152.819cm" svg:x2="-105.796cm" svg:y2="154.245cm" draw:start-shape="id95" draw:start-glue-point="2" draw:end-shape="id96" draw:end-glue-point="0" svg:d="M-105796 152819v1426" svg:viewBox="0 0 1 1427">
          <text:p/>
        </draw:connector>
        <draw:rect draw:style-name="gr41" draw:text-style-name="P5" xml:id="id98" draw:id="id98" draw:layer="layout" svg:width="3.005cm" svg:height="1.782cm" svg:x="-41.528cm" svg:y="7.278cm">
          <text:p text:style-name="P5">Human<text:line-break/>given<text:line-break/>goals</text:p>
        </draw:rect>
        <draw:connector draw:style-name="gr131" draw:text-style-name="P15" draw:layer="layout" draw:type="curve" svg:x1="-43.688cm" svg:y1="6.365cm" svg:x2="-40.025cm" svg:y2="7.278cm" draw:start-shape="id97" draw:start-glue-point="2" draw:end-shape="id98" draw:end-glue-point="0" svg:d="M-43688 6365c0 251 415 501 830 501 414 0 829-22 829-45 0-22 501-44 1002-44s1002 251 1002 501" svg:viewBox="0 0 3664 914">
          <text:p/>
        </draw:connector>
        <draw:rect draw:name="goal kinds 1" draw:style-name="gr40" draw:text-style-name="P32" xml:id="id99" draw:id="id99" draw:layer="layout" svg:width="1.9cm" svg:height="0.9cm" svg:x="-70.163cm" svg:y="-2.892cm">
          <text:p text:style-name="P5">Action</text:p>
        </draw:rect>
        <draw:rect draw:style-name="gr40" draw:text-style-name="P32" xml:id="id100" draw:id="id100" draw:layer="layout" svg:width="1.9cm" svg:height="0.9cm" svg:x="-70.13cm" svg:y="-0.729cm">
          <text:p text:style-name="P5">Kinds</text:p>
        </draw:rect>
        <draw:connector draw:style-name="gr132" draw:text-style-name="P15" draw:layer="layout" draw:type="curve" svg:x1="-69.213cm" svg:y1="-1.992cm" svg:x2="-69.18cm" svg:y2="-0.729cm" draw:start-shape="id99" draw:start-glue-point="2" draw:end-shape="id100" draw:end-glue-point="0" svg:d="M-69213-1992c0 948 33 317 33 1263" svg:viewBox="0 0 34 1264">
          <text:p/>
        </draw:connector>
        <draw:rect draw:style-name="gr41" draw:text-style-name="P5" xml:id="id101" draw:id="id101" draw:layer="layout" svg:width="2cm" svg:height="1.342cm" svg:x="-72.832cm" svg:y="2.674cm">
          <text:p text:style-name="P5">Suprise<text:line-break/>reducing</text:p>
        </draw:rect>
        <draw:connector draw:style-name="gr133" draw:text-style-name="P15" draw:layer="layout" draw:type="curve" svg:x1="-69.18cm" svg:y1="0.171cm" svg:x2="-71.832cm" svg:y2="2.674cm" draw:start-shape="id100" draw:start-glue-point="2" draw:end-shape="id101" draw:end-glue-point="0" svg:d="M-69180 171c0 1878-2652 627-2652 2503" svg:viewBox="0 0 2653 2504">
          <text:p/>
        </draw:connector>
        <draw:rect draw:style-name="gr41" draw:text-style-name="P5" xml:id="id102" draw:id="id102" draw:layer="layout" svg:width="2cm" svg:height="1.1cm" svg:x="-63.616cm" svg:y="9.465cm">
          <text:p text:style-name="P5">when</text:p>
        </draw:rect>
        <draw:connector draw:style-name="gr134" draw:text-style-name="P15" draw:layer="layout" draw:type="curve" svg:x1="-60.345cm" svg:y1="8.261cm" svg:x2="-62.616cm" svg:y2="9.465cm" draw:start-shape="id19" draw:start-glue-point="2" draw:end-shape="id102" draw:end-glue-point="0" svg:d="M-60345 8261c0 903-2271 301-2271 1204" svg:viewBox="0 0 2272 1205">
          <text:p/>
        </draw:connector>
        <draw:frame draw:style-name="gr135" draw:text-style-name="P41" draw:layer="layout" svg:width="18.411cm" svg:height="15.342cm" svg:x="-76.62cm" svg:y="138.858cm">
          <draw:image xlink:href="Pictures/10000000000002B80000024480E99178.png" xlink:type="simple" xlink:show="embed" xlink:actuate="onLoad" draw:mime-type="image/png">
            <text:p/>
          </draw:image>
        </draw:frame>
        <draw:connector draw:style-name="gr136" draw:text-style-name="P58" draw:layer="layout" draw:line-skew="0cm -5.756cm -0.296cm" svg:x1="-93.337cm" svg:y1="164.989cm" svg:x2="-93.337cm" svg:y2="163.789cm" draw:start-shape="id79" draw:start-glue-point="2" draw:end-shape="id79" draw:end-glue-point="0" svg:d="M-93337 164989v501h-4055v-2498h4055v797" svg:viewBox="0 0 4056 2499">
          <text:p text:style-name="P57"><text:span text:style-name="T12">Repeat </text:span><text:span text:style-name="T12"><text:line-break/></text:span><text:span text:style-name="T12">for all </text:span><text:span text:style-name="T12"><text:line-break/></text:span><text:span text:style-name="T12">sensors</text:span><text:span text:style-name="T12"><text:line-break/></text:span><text:span text:style-name="T12">and </text:span><text:span text:style-name="T12"><text:line-break/></text:span><text:span text:style-name="T12">fusions</text:span><text:span text:style-name="T12"><text:line-break/></text:span><text:span text:style-name="T12">etc</text:span></text:p>
        </draw:connector>
        <draw:custom-shape draw:style-name="gr137" draw:text-style-name="P59" xml:id="id103" draw:id="id103" draw:layer="layout" svg:width="3.535cm" svg:height="1.809cm" svg:x="-89.957cm" svg:y="171.295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92.037cm" svg:y1="173.189cm" svg:x2="-89.957cm" svg:y2="172.2cm" draw:start-shape="id84" draw:start-glue-point="1" draw:end-shape="id103" draw:end-glue-point="5" svg:d="M-92037 173189c1561 0 522-989 2080-989" svg:viewBox="0 0 2081 990">
          <text:p/>
        </draw:connector>
        <draw:connector draw:style-name="gr138" draw:text-style-name="P15" draw:layer="layout" svg:x1="-85.854cm" svg:y1="188.659cm" svg:x2="-84.127cm" svg:y2="188.647cm" draw:start-shape="id87" draw:start-glue-point="1" draw:end-shape="id104" draw:end-glue-point="6" svg:d="M-85854 188659h864v-12h863" svg:viewBox="0 0 1728 13">
          <text:p/>
        </draw:connector>
        <draw:custom-shape draw:style-name="gr139" draw:text-style-name="P55" xml:id="id104" draw:id="id104" draw:layer="layout" svg:width="1.938cm" svg:height="1.375cm" svg:x="-84.127cm" svg:y="187.959cm">
          <text:p text:style-name="P54"><text:span text:style-name="T25">weight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0" draw:text-style-name="P55" xml:id="id88" draw:id="id88" draw:layer="layout" svg:width="2.715cm" svg:height="2.273cm" svg:x="-88.288cm" svg:y="180.084cm">
          <text:p text:style-name="P54"><text:span text:style-name="T25">transformer</text:span></text:p>
          <text:p text:style-name="P54"><text:span text:style-name="T25">architectur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1" draw:text-style-name="P55" xml:id="id89" draw:id="id89" draw:layer="layout" svg:width="3.264cm" svg:height="2.273cm" svg:x="-88.421cm" svg:y="182.541cm">
          <text:p text:style-name="P54"><text:span text:style-name="T25">transformer</text:span></text:p>
          <text:p text:style-name="P54"><text:span text:style-name="T25">Training config</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41" draw:text-style-name="P5" xml:id="id82" draw:id="id82" draw:layer="layout" svg:width="3.615cm" svg:height="2.321cm" svg:x="-95.37cm" svg:y="177.928cm">
          <text:p text:style-name="P5">Decide train test<text:line-break/>parameters<text:line-break/>according to<text:line-break/>previous anomalies<text:line-break/>and action gains</text:p>
        </draw:rect>
        <draw:connector draw:style-name="gr142" draw:text-style-name="P15" draw:layer="layout" draw:type="curve" svg:x1="-93.562cm" svg:y1="180.249cm" svg:x2="-93.487cm" svg:y2="181.389cm" draw:start-shape="id82" draw:start-glue-point="2" draw:end-shape="id85" draw:end-glue-point="0" svg:d="M-93562 180249c0 873 75 303 75 1140" svg:viewBox="0 0 76 1141">
          <text:p/>
        </draw:connector>
        <draw:connector draw:style-name="gr143" draw:text-style-name="P15" draw:layer="layout" svg:x1="-93.346cm" svg:y1="151.353cm" svg:x2="-93.318cm" svg:y2="153.488cm" draw:start-shape="id105" draw:start-glue-point="8" draw:end-shape="id93" draw:end-glue-point="0" svg:d="M-93346 151353v1068h28v1067" svg:viewBox="0 0 29 2136">
          <text:p/>
        </draw:connector>
        <draw:custom-shape draw:name="robot_creation 1" draw:style-name="gr144" draw:text-style-name="P43" xml:id="id106" draw:id="id106" draw:layer="layout" svg:width="3.046cm" svg:height="1.306cm" svg:x="-51.141cm" svg:y="165.032cm">
          <text:p text:style-name="P42"><text:span text:style-name="T18">Actio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07" draw:id="id107" draw:layer="layout" svg:width="3.149cm" svg:height="1.191cm" svg:x="-52.095cm" svg:y="172.299cm">
          <text:p text:style-name="P5">Suprise<text:line-break/>reduction</text:p>
        </draw:rect>
        <draw:rect draw:style-name="gr41" draw:text-style-name="P5" xml:id="id108" draw:id="id108" draw:layer="layout" svg:width="2.807cm" svg:height="1.694cm" svg:x="-35.397cm" svg:y="175.871cm">
          <text:p text:style-name="P5">Building<text:line-break/>forecasting<text:line-break/>models</text:p>
        </draw:rect>
        <draw:connector draw:style-name="gr145" draw:text-style-name="P15" draw:layer="layout" draw:type="curve" svg:x1="-49.618cm" svg:y1="166.338cm" svg:x2="-50.52cm" svg:y2="172.299cm" draw:start-shape="id106" draw:start-glue-point="8" draw:end-shape="id107" svg:d="M-49618 166338c0 4471-902 1491-902 5961" svg:viewBox="0 0 903 5962">
          <text:p/>
        </draw:connector>
        <draw:connector draw:style-name="gr146" draw:text-style-name="P15" draw:layer="layout" draw:type="curve" svg:x1="-50.52cm" svg:y1="173.49cm" svg:x2="-33.993cm" svg:y2="175.871cm" draw:start-shape="id107" draw:start-glue-point="2" draw:end-shape="id108" draw:end-glue-point="0" svg:d="M-50520 173490c0 1786 16527 596 16527 2381" svg:viewBox="0 0 16528 2382">
          <text:p/>
        </draw:connector>
        <draw:rect draw:style-name="gr41" draw:text-style-name="P5" xml:id="id109" draw:id="id109" draw:layer="layout" svg:width="3.149cm" svg:height="1.595cm" svg:x="-44.076cm" svg:y="170.023cm">
          <text:p text:style-name="P5">Teleportation <text:line-break/>sensory-motor<text:line-break/>recording </text:p>
        </draw:rect>
        <draw:connector draw:style-name="gr147" draw:text-style-name="P15" draw:layer="layout" draw:type="curve" svg:x1="-49.618cm" svg:y1="166.338cm" svg:x2="-42.501cm" svg:y2="170.023cm" draw:start-shape="id106" draw:start-glue-point="8" draw:end-shape="id109" draw:end-glue-point="0" svg:d="M-49618 166338c0 2764 7117 922 7117 3685" svg:viewBox="0 0 7118 3686">
          <text:p/>
        </draw:connector>
        <draw:rect draw:style-name="gr41" draw:text-style-name="P5" xml:id="id110" draw:id="id110" draw:layer="layout" svg:width="4.6cm" svg:height="1.191cm" svg:x="-60.265cm" svg:y="171.587cm">
          <text:p text:style-name="P5">Goto ([x,y,z], tol=0.5)</text:p>
        </draw:rect>
        <draw:connector draw:style-name="gr148" draw:text-style-name="P15" draw:layer="layout" draw:type="curve" svg:x1="-49.618cm" svg:y1="166.338cm" svg:x2="-57.965cm" svg:y2="171.587cm" draw:start-shape="id106" draw:start-glue-point="8" draw:end-shape="id110" draw:end-glue-point="0" svg:d="M-49618 166338c0 3937-8347 1313-8347 5249" svg:viewBox="0 0 8348 5250">
          <text:p/>
        </draw:connector>
        <draw:rect draw:style-name="gr41" draw:text-style-name="P5" xml:id="id111" draw:id="id111" draw:layer="layout" svg:width="3.907cm" svg:height="2.195cm" svg:x="-63.281cm" svg:y="179.526cm">
          <text:p text:style-name="P5">Choosing the<text:line-break/>best matching <text:line-break/>forcasting<text:line-break/>model</text:p>
        </draw:rect>
        <draw:connector draw:style-name="gr149" draw:text-style-name="P15" draw:layer="layout" draw:type="curve" svg:x1="-50.52cm" svg:y1="173.49cm" svg:x2="-61.327cm" svg:y2="179.526cm" draw:start-shape="id107" draw:start-glue-point="2" draw:end-shape="id111" draw:end-glue-point="0" svg:d="M-50520 173490c0 4527-10807 1509-10807 6036" svg:viewBox="0 0 10808 6037">
          <text:p/>
        </draw:connector>
        <draw:connector draw:style-name="gr150" draw:text-style-name="P15" draw:layer="layout" draw:type="curve" svg:x1="-57.965cm" svg:y1="172.778cm" svg:x2="-61.327cm" svg:y2="179.526cm" draw:start-shape="id110" draw:start-glue-point="2" draw:end-shape="id111" draw:end-glue-point="0" svg:d="M-57965 172778c0 5061-3362 1687-3362 6748" svg:viewBox="0 0 3363 6749">
          <text:p text:style-name="P5">Live streaming<text:line-break/>sensory data</text:p>
        </draw:connector>
        <draw:connector draw:style-name="gr151" draw:text-style-name="P15" draw:layer="layout" draw:type="curve" svg:x1="-42.501cm" svg:y1="171.618cm" svg:x2="-33.993cm" svg:y2="175.871cm" draw:start-shape="id109" draw:start-glue-point="2" draw:end-shape="id108" draw:end-glue-point="0" svg:d="M-42501 171618c0 3190 8508 1064 8508 4253" svg:viewBox="0 0 8509 4254">
          <text:p text:style-name="P5">Memorizing<text:line-break/>the demonstrated <text:line-break/>solution</text:p>
        </draw:connector>
        <draw:rect draw:style-name="gr41" draw:text-style-name="P5" xml:id="id112" draw:id="id112" draw:layer="layout" svg:width="3.095cm" svg:height="1.217cm" svg:x="-35.103cm" svg:y="170.227cm">
          <text:p text:style-name="P5">Sesnory-motor<text:line-break/>babbling</text:p>
        </draw:rect>
        <draw:connector draw:style-name="gr152" draw:text-style-name="P15" draw:layer="layout" draw:type="curve" svg:x1="-49.618cm" svg:y1="166.338cm" svg:x2="-33.555cm" svg:y2="170.227cm" draw:start-shape="id106" draw:start-glue-point="8" draw:end-shape="id112" draw:end-glue-point="0" svg:d="M-49618 166338c0 2917 16063 973 16063 3889" svg:viewBox="0 0 16064 3890">
          <text:p/>
        </draw:connector>
        <draw:connector draw:style-name="gr151" draw:text-style-name="P15" draw:layer="layout" draw:type="curve" svg:x1="-33.555cm" svg:y1="171.444cm" svg:x2="-33.993cm" svg:y2="175.871cm" draw:start-shape="id112" draw:start-glue-point="2" draw:end-shape="id108" draw:end-glue-point="0" svg:d="M-33555 171444c0 3321-438 1108-438 4427" svg:viewBox="0 0 439 4428">
          <text:p text:style-name="P5">Memorizing<text:line-break/>the found solution</text:p>
        </draw:connector>
        <draw:g draw:style-name="gr31">
          <draw:custom-shape draw:name="robot_creation 2" draw:style-name="gr153" draw:text-style-name="P43" xml:id="id113" draw:id="id113" draw:layer="layout" svg:width="3.046cm" svg:height="1.306cm" svg:x="-51.646cm" svg:y="142.957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18" draw:id="id118" draw:layer="layout" svg:width="2.54cm" svg:height="1.191cm" svg:x="-46.381cm" svg:y="148.038cm">
            <text:p text:style-name="P5">Goal<text:line-break/>gain</text:p>
          </draw:rect>
          <draw:rect draw:style-name="gr41" draw:text-style-name="P5" xml:id="id114" draw:id="id114" draw:layer="layout" svg:width="2.54cm" svg:height="1.191cm" svg:x="-51.328cm" svg:y="146.026cm">
            <text:p text:style-name="P5">feedback</text:p>
          </draw:rect>
          <draw:rect draw:style-name="gr41" draw:text-style-name="P5" xml:id="id115" draw:id="id115" draw:layer="layout" svg:width="2.54cm" svg:height="1.191cm" svg:x="-54.848cm" svg:y="148.355cm">
            <text:p text:style-name="P5">Resource<text:line-break/>gain</text:p>
          </draw:rect>
          <draw:rect draw:style-name="gr41" draw:text-style-name="P5" xml:id="id116" draw:id="id116" draw:layer="layout" svg:width="2.54cm" svg:height="1.191cm" svg:x="-56.461cm" svg:y="150.896cm">
            <text:p text:style-name="P5">Energy</text:p>
          </draw:rect>
          <draw:rect draw:style-name="gr41" draw:text-style-name="P5" xml:id="id117" draw:id="id117" draw:layer="layout" svg:width="2.54cm" svg:height="1.191cm" svg:x="-51.382cm" svg:y="150.656cm">
            <text:p text:style-name="P5">erosion</text:p>
          </draw:rect>
          <draw:connector draw:style-name="gr154" draw:text-style-name="P15" draw:layer="layout" draw:type="curve" svg:x1="-50.123cm" svg:y1="144.263cm" svg:x2="-50.058cm" svg:y2="146.026cm" draw:start-shape="id113" draw:start-glue-point="8" draw:end-shape="id114" draw:end-glue-point="0" svg:d="M-50123 144263c0 1323 65 442 65 1763" svg:viewBox="0 0 66 1764">
            <text:p/>
          </draw:connector>
          <draw:connector draw:style-name="gr155" draw:text-style-name="P15" draw:layer="layout" draw:type="curve" svg:x1="-50.058cm" svg:y1="147.217cm" svg:x2="-53.578cm" svg:y2="148.355cm" draw:start-shape="id114" draw:start-glue-point="2" draw:end-shape="id115" draw:end-glue-point="0" svg:d="M-50058 147217c0 853-3520 285-3520 1138" svg:viewBox="0 0 3521 1139">
            <text:p/>
          </draw:connector>
          <draw:connector draw:style-name="gr156" draw:text-style-name="P15" draw:layer="layout" draw:type="curve" svg:x1="-53.578cm" svg:y1="149.546cm" svg:x2="-55.191cm" svg:y2="150.896cm" draw:start-shape="id115" draw:end-shape="id116" draw:end-glue-point="0" svg:d="M-53578 149546c0 1012-1613 338-1613 1350" svg:viewBox="0 0 1614 1351">
            <text:p/>
          </draw:connector>
          <draw:connector draw:style-name="gr157" draw:text-style-name="P15" draw:layer="layout" draw:type="curve" svg:x1="-53.578cm" svg:y1="149.546cm" svg:x2="-50.112cm" svg:y2="150.656cm" draw:start-shape="id115" draw:start-glue-point="2" draw:end-shape="id117" draw:end-glue-point="0" svg:d="M-53578 149546c0 832 3466 278 3466 1110" svg:viewBox="0 0 3467 1111">
            <text:p/>
          </draw:connector>
          <draw:connector draw:style-name="gr158" draw:text-style-name="P15" draw:layer="layout" draw:type="curve" svg:x1="-50.058cm" svg:y1="147.217cm" svg:x2="-45.111cm" svg:y2="148.038cm" draw:start-shape="id114" draw:start-glue-point="2" draw:end-shape="id118" draw:end-glue-point="0" svg:d="M-50058 147217c0 251 619 501 1237 501 619 0 1237-45 1237-91 0-45 618-90 1237-90 618 0 1236 251 1236 501" svg:viewBox="0 0 4948 822">
            <text:p/>
          </draw:connector>
        </draw:g>
        <draw:custom-shape draw:style-name="gr159" draw:text-style-name="P55" xml:id="id124" draw:id="id124" draw:layer="layout" svg:width="2.574cm" svg:height="2.273cm" svg:x="-49.077cm" svg:y="187.521cm">
          <text:p text:style-name="P54"><text:span text:style-name="T25">forecasting</text:span><text:span text:style-name="T25"><text:line-break/></text:span><text:span text:style-name="T25">model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60" draw:text-style-name="P15" draw:layer="layout" draw:type="curve" svg:x1="-59.374cm" svg:y1="180.623cm" svg:x2="-49.352cm" svg:y2="180.464cm" draw:start-shape="id111" draw:start-glue-point="1" draw:end-shape="id119" draw:end-glue-point="5" svg:d="M-59374 180623c7518 0 2507-159 10022-159" svg:viewBox="0 0 10023 160">
          <text:p/>
        </draw:connector>
        <draw:rect draw:style-name="gr41" draw:text-style-name="P5" xml:id="id121" draw:id="id121" draw:layer="layout" svg:width="4.472cm" svg:height="2.831cm" svg:x="-40.218cm" svg:y="200.694cm">
          <text:p text:style-name="P5">Building<text:line-break/>new forcasting </text:p>
          <text:p text:style-name="P5">models</text:p>
        </draw:rect>
        <draw:connector draw:style-name="gr161" draw:text-style-name="P15" draw:layer="layout" draw:type="curve" svg:x1="-33.993cm" svg:y1="177.565cm" svg:x2="-29.121cm" svg:y2="181.101cm" draw:start-shape="id108" draw:start-glue-point="2" draw:end-shape="id120" draw:end-glue-point="0" svg:d="M-33993 177565c0 2652 4872 884 4872 3536" svg:viewBox="0 0 4873 3537">
          <text:p/>
        </draw:connector>
        <draw:connector draw:style-name="gr162" draw:text-style-name="P15" draw:layer="layout" draw:type="curve" svg:x1="-40.218cm" svg:y1="202.109cm" svg:x2="-28.273cm" svg:y2="192.45cm" draw:start-shape="id121" draw:start-glue-point="3" draw:end-shape="id122" draw:end-glue-point="6" svg:d="M-40218 202109c-751 0-626-2768 2548-3637s9397 162 9397-6022" svg:viewBox="0 0 12327 9660">
          <text:p/>
        </draw:connector>
        <draw:custom-shape draw:name="robot_creation 3" draw:style-name="gr163" draw:text-style-name="P43" xml:id="id123" draw:id="id123" draw:layer="layout" svg:width="3.046cm" svg:height="1.306cm" svg:x="-51.123cm" svg:y="161.804cm">
          <text:p text:style-name="P60"><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4" draw:text-style-name="P15" draw:layer="layout" draw:type="curve" svg:x1="-49.6cm" svg:y1="163.11cm" svg:x2="-49.618cm" svg:y2="165.032cm" draw:start-shape="id123" draw:start-glue-point="8" draw:end-shape="id106" draw:end-glue-point="4" svg:d="M-49600 163110c0 1443-18 482-18 1922" svg:viewBox="0 0 19 1923">
          <text:p/>
        </draw:connector>
        <draw:custom-shape draw:style-name="gr119" draw:text-style-name="P56" xml:id="id119" draw:id="id119" draw:layer="layout" svg:width="4.126cm" svg:height="2.72cm" svg:x="-49.352cm" svg:y="179.104cm">
          <text:p text:style-name="P5">Below<text:line-break/>the <text:line-break/>tolerance?</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text-style-name="P15" draw:layer="layout" draw:type="curve" svg:x1="-47.79cm" svg:y1="187.521cm" svg:x2="-59.374cm" svg:y2="180.623cm" draw:start-shape="id124" draw:start-glue-point="5" draw:end-shape="id111" draw:end-glue-point="1" svg:d="M-47790 187521c0-4599-3861-6898-11584-6898" svg:viewBox="0 0 11585 6899">
          <text:p text:style-name="P5">Best model</text:p>
        </draw:connector>
        <draw:connector draw:style-name="gr166" draw:text-style-name="P15" draw:layer="layout" draw:type="curve" svg:x1="-61.327cm" svg:y1="181.721cm" svg:x2="-49.077cm" svg:y2="188.658cm" draw:start-shape="id111" draw:start-glue-point="2" draw:end-shape="id124" draw:end-glue-point="6" svg:d="M-61327 181721c0 4625 4083 6937 12250 6937" svg:viewBox="0 0 12251 6938">
          <text:p text:style-name="P5">Find<text:line-break/>best model</text:p>
        </draw:connector>
        <draw:connector draw:style-name="gr167" draw:text-style-name="P61" draw:layer="layout" draw:type="curve" svg:x1="-45.226cm" svg:y1="180.464cm" svg:x2="-42.501cm" svg:y2="171.618cm" draw:start-shape="id119" draw:start-glue-point="7" draw:end-shape="id109" draw:end-glue-point="2" svg:d="M-45226 180464c1817 0 2725-2948 2725-8846" svg:viewBox="0 0 2726 8847">
          <text:p text:style-name="P5"><text:span text:style-name="T26">No:</text:span><text:span text:style-name="T26"><text:line-break/></text:span><text:span text:style-name="T26">call human </text:span><text:span text:style-name="T26"><text:line-break/></text:span><text:span text:style-name="T26">assistance</text:span></text:p>
          <text:p text:style-name="P5"><text:span text:style-name="T26"/></text:p>
        </draw:connector>
        <draw:connector draw:style-name="gr168" draw:text-style-name="P15" draw:layer="layout" draw:type="curve" svg:x1="-47.289cm" svg:y1="181.824cm" svg:x2="-47.79cm" svg:y2="187.521cm" draw:start-shape="id119" draw:start-glue-point="6" draw:end-shape="id124" draw:end-glue-point="5" svg:d="M-47289 181824c0 4273-501 1425-501 5697" svg:viewBox="0 0 502 5698">
          <text:p text:style-name="P5">Yes:<text:line-break/>update<text:line-break/>model</text:p>
        </draw:connector>
        <draw:g draw:style-name="gr31">
          <draw:rect draw:style-name="gr169" draw:text-style-name="P5" draw:layer="layout" svg:width="8.229cm" svg:height="4.656cm" svg:x="-99.563cm" svg:y="132.224cm">
            <text:p text:style-name="P5">mind</text:p>
          </draw:rect>
          <draw:rect draw:style-name="gr170" draw:text-style-name="P5" draw:layer="layout" svg:width="6.759cm" svg:height="3.431cm" svg:x="-98.806cm" svg:y="133.07cm">
            <text:p text:style-name="P5">thinking</text:p>
          </draw:rect>
          <draw:rect draw:style-name="gr170" draw:text-style-name="P5" draw:layer="layout" svg:width="4.825cm" svg:height="2.346cm" svg:x="-97.403cm" svg:y="133.916cm">
            <text:p text:style-name="P8"><text:span text:style-name="T27">Decision </text:span><text:span text:style-name="T27">making</text:span></text:p>
          </draw:rect>
          <draw:rect draw:style-name="gr171" draw:text-style-name="P62" draw:layer="layout" svg:width="2.296cm" svg:height="1.076cm" svg:x="-95.376cm" svg:y="134.922cm">
            <text:p text:style-name="P8"><text:span text:style-name="T27">planning</text:span></text:p>
          </draw:rect>
          <draw:custom-shape draw:name="robot_creation 5" draw:style-name="gr172" draw:text-style-name="P43" xml:id="id126" draw:id="id126" draw:layer="layout" svg:width="0.869cm" svg:height="0.887cm" svg:x="-106.23cm" svg:y="134.1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7" draw:style-name="gr173" draw:text-style-name="P43" xml:id="id125" draw:id="id125" draw:layer="layout" svg:width="1.24cm" svg:height="1.256cm" svg:x="-105.224cm" svg:y="131.876cm">
            <text:p text:style-name="P42"><text:span text:style-name="T18">Goal</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104.604cm" svg:y1="133.132cm" svg:x2="-105.795cm" svg:y2="134.151cm" draw:start-shape="id125" draw:start-glue-point="8" draw:end-shape="id126" draw:end-glue-point="4" svg:d="M-104604 133132c0 765-1191 256-1191 1019" svg:viewBox="0 0 1192 1020">
            <text:p/>
          </draw:connector>
          <draw:custom-shape draw:name="robot_creation 4" draw:style-name="gr175" draw:text-style-name="P43" xml:id="id127" draw:id="id127" draw:layer="layout" svg:width="0.869cm" svg:height="0.887cm" svg:x="-107.18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6" draw:style-name="gr176" draw:text-style-name="P43" xml:id="id128" draw:id="id128" draw:layer="layout" svg:width="0.869cm" svg:height="0.887cm" svg:x="-105.17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5.795cm" svg:y1="135.038cm" svg:x2="-106.746cm" svg:y2="136.207cm" draw:start-shape="id126" draw:start-glue-point="8" draw:end-shape="id127" draw:end-glue-point="4" svg:d="M-105795 135038c0 876-951 292-951 1169" svg:viewBox="0 0 952 1170">
            <text:p/>
          </draw:connector>
          <draw:connector draw:style-name="gr178" draw:text-style-name="P15" draw:layer="layout" draw:type="curve" svg:x1="-105.795cm" svg:y1="135.038cm" svg:x2="-104.736cm" svg:y2="136.207cm" draw:start-shape="id126" draw:start-glue-point="8" draw:end-shape="id128" draw:end-glue-point="4" svg:d="M-105795 135038c0 876 1059 292 1059 1169" svg:viewBox="0 0 1060 1170">
            <text:p/>
          </draw:connector>
          <draw:custom-shape draw:name="robot_creation 8" draw:style-name="gr179" draw:text-style-name="P43" xml:id="id129" draw:id="id129" draw:layer="layout" svg:width="0.869cm" svg:height="0.887cm" svg:x="-102.974cm" svg:y="134.23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9" draw:style-name="gr180" draw:text-style-name="P43" xml:id="id130" draw:id="id130" draw:layer="layout" svg:width="0.869cm" svg:height="0.887cm" svg:x="-103.92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0" draw:style-name="gr181" draw:text-style-name="P43" xml:id="id131" draw:id="id131" draw:layer="layout" svg:width="0.869cm" svg:height="0.887cm" svg:x="-101.91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2.539cm" svg:y1="135.117cm" svg:x2="-103.49cm" svg:y2="136.207cm" draw:start-shape="id129" draw:start-glue-point="8" draw:end-shape="id130" draw:end-glue-point="4" svg:d="M-102539 135117c0 817-951 273-951 1090" svg:viewBox="0 0 952 1091">
            <text:p/>
          </draw:connector>
          <draw:connector draw:style-name="gr178" draw:text-style-name="P15" draw:layer="layout" draw:type="curve" svg:x1="-102.539cm" svg:y1="135.117cm" svg:x2="-101.48cm" svg:y2="136.207cm" draw:start-shape="id129" draw:start-glue-point="8" draw:end-shape="id131" draw:end-glue-point="4" svg:d="M-102539 135117c0 817 1059 273 1059 1090" svg:viewBox="0 0 1060 1091">
            <text:p/>
          </draw:connector>
          <draw:connector draw:style-name="gr182" draw:text-style-name="P15" draw:layer="layout" draw:type="curve" svg:x1="-104.604cm" svg:y1="133.132cm" svg:x2="-102.539cm" svg:y2="134.23cm" draw:start-shape="id125" draw:start-glue-point="8" draw:end-shape="id129" draw:end-glue-point="4" svg:d="M-104604 133132c0 823 2065 275 2065 1098" svg:viewBox="0 0 2066 1099">
            <text:p/>
          </draw:connector>
          <draw:custom-shape draw:name="robot_creation 11" draw:style-name="gr183" draw:text-style-name="P43" xml:id="id133" draw:id="id133" draw:layer="layout" svg:width="0.869cm" svg:height="0.887cm" svg:x="-88.752cm" svg:y="133.872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2" draw:style-name="gr184" draw:text-style-name="P43" xml:id="id132" draw:id="id132" draw:layer="layout" svg:width="2.829cm" svg:height="1.256cm" svg:x="-88.288cm" svg:y="131.57cm">
            <text:p text:style-name="P42"><text:span text:style-name="T18">Action-Pla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86.874cm" svg:y1="132.826cm" svg:x2="-88.317cm" svg:y2="133.872cm" draw:start-shape="id132" draw:start-glue-point="8" draw:end-shape="id133" draw:end-glue-point="4" svg:d="M-86874 132826c0 784-1443 262-1443 1046" svg:viewBox="0 0 1444 1047">
            <text:p/>
          </draw:connector>
          <draw:custom-shape draw:name="robot_creation 13" draw:style-name="gr185" draw:text-style-name="P43" xml:id="id134" draw:id="id134" draw:layer="layout" svg:width="0.869cm" svg:height="0.887cm" svg:x="-89.70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4" draw:style-name="gr186" draw:text-style-name="P43" xml:id="id135" draw:id="id135" draw:layer="layout" svg:width="0.869cm" svg:height="0.887cm" svg:x="-87.69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8.317cm" svg:y1="134.759cm" svg:x2="-89.268cm" svg:y2="135.928cm" draw:start-shape="id133" draw:start-glue-point="8" draw:end-shape="id134" draw:end-glue-point="4" svg:d="M-88317 134759c0 876-951 292-951 1169" svg:viewBox="0 0 952 1170">
            <text:p/>
          </draw:connector>
          <draw:connector draw:style-name="gr178" draw:text-style-name="P15" draw:layer="layout" draw:type="curve" svg:x1="-88.317cm" svg:y1="134.759cm" svg:x2="-87.258cm" svg:y2="135.928cm" draw:start-shape="id133" draw:start-glue-point="8" draw:end-shape="id135" draw:end-glue-point="4" svg:d="M-88317 134759c0 876 1059 292 1059 1169" svg:viewBox="0 0 1060 1170">
            <text:p/>
          </draw:connector>
          <draw:custom-shape draw:name="robot_creation 15" draw:style-name="gr187" draw:text-style-name="P43" xml:id="id136" draw:id="id136" draw:layer="layout" svg:width="0.869cm" svg:height="0.887cm" svg:x="-85.496cm" svg:y="133.9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6" draw:style-name="gr188" draw:text-style-name="P43" xml:id="id137" draw:id="id137" draw:layer="layout" svg:width="0.869cm" svg:height="0.887cm" svg:x="-86.44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7" draw:style-name="gr189" draw:text-style-name="P43" xml:id="id138" draw:id="id138" draw:layer="layout" svg:width="0.869cm" svg:height="0.887cm" svg:x="-84.43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5.061cm" svg:y1="134.838cm" svg:x2="-86.012cm" svg:y2="135.928cm" draw:start-shape="id136" draw:start-glue-point="8" draw:end-shape="id137" draw:end-glue-point="4" svg:d="M-85061 134838c0 817-951 273-951 1090" svg:viewBox="0 0 952 1091">
            <text:p/>
          </draw:connector>
          <draw:connector draw:style-name="gr178" draw:text-style-name="P15" draw:layer="layout" draw:type="curve" svg:x1="-85.061cm" svg:y1="134.838cm" svg:x2="-84.002cm" svg:y2="135.928cm" draw:start-shape="id136" draw:start-glue-point="8" draw:end-shape="id138" draw:end-glue-point="4" svg:d="M-85061 134838c0 817 1059 273 1059 1090" svg:viewBox="0 0 1060 1091">
            <text:p/>
          </draw:connector>
          <draw:connector draw:style-name="gr182" draw:text-style-name="P15" draw:layer="layout" draw:type="curve" svg:x1="-86.874cm" svg:y1="132.826cm" svg:x2="-85.061cm" svg:y2="133.951cm" draw:start-shape="id132" draw:start-glue-point="8" draw:end-shape="id136" draw:end-glue-point="4" svg:d="M-86874 132826c0 844 1813 282 1813 1125" svg:viewBox="0 0 1814 1126">
            <text:p/>
          </draw:connector>
          <draw:custom-shape draw:style-name="gr190" draw:text-style-name="P34" draw:layer="layout" svg:width="1.534cm" svg:height="2.329cm" svg:x="-101.379cm" svg:y="133.4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90" draw:text-style-name="P34" draw:layer="layout" svg:width="1.534cm" svg:height="2.329cm" svg:x="-91.005cm" svg:y="133.4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91" draw:text-style-name="P38" draw:layer="layout" svg:width="8.613cm" svg:height="1.199cm" svg:x="-99.986cm" svg:y="130.442cm">
            <draw:text-box>
              <text:p>You give a set of goals <text:line-break/>to planner and it gives you a tree of actions</text:p>
            </draw:text-box>
          </draw:frame>
        </draw:g>
        <draw:rect draw:style-name="gr41" draw:text-style-name="P5" xml:id="id139" draw:id="id139" draw:layer="layout" svg:width="3.096cm" svg:height="1.402cm" svg:x="-75.404cm" svg:y="5.603cm">
          <text:p text:style-name="P5">Teleportating</text:p>
          <text:p text:style-name="P5"><text:line-break/>control</text:p>
        </draw:rect>
        <draw:rect draw:style-name="gr41" draw:text-style-name="P5" xml:id="id140" draw:id="id140" draw:layer="layout" svg:width="3.096cm" svg:height="1.402cm" svg:x="-70.695cm" svg:y="5.711cm">
          <text:p text:style-name="P5">Segregating</text:p>
          <text:p text:style-name="P5"/>
        </draw:rect>
        <draw:connector draw:style-name="gr192" draw:text-style-name="P15" draw:layer="layout" draw:type="curve" svg:x1="-71.832cm" svg:y1="4.016cm" svg:x2="-73.856cm" svg:y2="5.603cm" draw:start-shape="id101" draw:start-glue-point="2" draw:end-shape="id139" draw:end-glue-point="0" svg:d="M-71832 4016c0 1191-2024 398-2024 1587" svg:viewBox="0 0 2025 1588">
          <text:p/>
        </draw:connector>
        <draw:connector draw:style-name="gr193" draw:text-style-name="P15" draw:layer="layout" draw:type="curve" svg:x1="-71.832cm" svg:y1="4.016cm" svg:x2="-69.147cm" svg:y2="5.711cm" draw:start-shape="id101" draw:start-glue-point="2" draw:end-shape="id140" draw:end-glue-point="0" svg:d="M-71832 4016c0 1272 2685 425 2685 1695" svg:viewBox="0 0 2686 1696">
          <text:p/>
        </draw:connector>
        <draw:rect draw:style-name="gr41" draw:text-style-name="P5" xml:id="id141" draw:id="id141" draw:layer="layout" svg:width="3.096cm" svg:height="1.402cm" svg:x="-69.609cm" svg:y="9.202cm">
          <text:p text:style-name="P5">clustering</text:p>
        </draw:rect>
        <draw:connector draw:style-name="gr194" draw:text-style-name="P15" draw:layer="layout" draw:type="curve" svg:x1="-69.147cm" svg:y1="7.113cm" svg:x2="-68.061cm" svg:y2="9.202cm" draw:start-shape="id140" draw:start-glue-point="2" draw:end-shape="id141" draw:end-glue-point="0" svg:d="M-69147 7113c0 1567 1086 523 1086 2089" svg:viewBox="0 0 1087 2090">
          <text:p/>
        </draw:connector>
        <draw:rect draw:style-name="gr41" draw:text-style-name="P5" draw:layer="layout" svg:width="4.5cm" svg:height="2.3cm" svg:x="-100.963cm" svg:y="187.535cm">
          <text:p text:style-name="P5">Apply improvement<text:line-break/>methods</text:p>
        </draw:rect>
        <draw:g draw:style-name="gr23">
          <draw:rect draw:style-name="gr41" draw:text-style-name="P5" xml:id="id143" draw:id="id143" draw:layer="layout" svg:width="2.79cm" svg:height="0.955cm" svg:x="-83.289cm" svg:y="0.562cm">
            <text:p text:style-name="P5">Continual <text:line-break/>learning</text:p>
          </draw:rect>
          <draw:rect draw:style-name="gr41" draw:text-style-name="P5" xml:id="id142" draw:id="id142" draw:layer="layout" svg:width="2.79cm" svg:height="1.677cm" svg:x="-87.607cm" svg:y="-0.148cm">
            <text:p text:style-name="P5">Already<text:line-break/>learned<text:line-break/>parameters</text:p>
          </draw:rect>
          <draw:rect draw:style-name="gr41" draw:text-style-name="P5" xml:id="id144" draw:id="id144" draw:layer="layout" svg:width="3.031cm" svg:height="1.395cm" svg:x="-87.343cm" svg:y="2.258cm">
            <text:p text:style-name="P5">New <text:line-break/>observation <text:line-break/>series</text:p>
          </draw:rect>
          <draw:connector draw:style-name="gr195" draw:text-style-name="P15" draw:layer="layout" draw:type="curve" svg:x1="-84.817cm" svg:y1="0.69cm" svg:x2="-83.289cm" svg:y2="1.039cm" draw:start-shape="id142" draw:start-glue-point="1" draw:end-shape="id143" svg:d="M-84817 690c1147 0 384 349 1528 349" svg:viewBox="0 0 1529 350">
            <text:p/>
          </draw:connector>
          <draw:connector draw:style-name="gr196" draw:text-style-name="P15" draw:layer="layout" draw:type="curve" svg:x1="-84.312cm" svg:y1="2.955cm" svg:x2="-83.289cm" svg:y2="1.039cm" draw:start-shape="id144" draw:start-glue-point="1" draw:end-shape="id143" draw:end-glue-point="3" svg:d="M-84312 2955c768 0 257-1916 1023-1916" svg:viewBox="0 0 1024 1917">
            <text:p/>
          </draw:connector>
          <draw:rect draw:style-name="gr40" draw:text-style-name="P63" xml:id="id145" draw:id="id145" draw:layer="layout" svg:width="2.79cm" svg:height="0.955cm" svg:x="-83.289cm" svg:y="0.563cm">
            <text:p text:style-name="P5"><text:span text:style-name="T17">Continual </text:span><text:span text:style-name="T17"><text:line-break/></text:span><text:span text:style-name="T17">learning</text:span></text:p>
          </draw:rect>
          <draw:rect draw:style-name="gr41" draw:text-style-name="P5" xml:id="id146" draw:id="id146" draw:layer="layout" svg:width="2.79cm" svg:height="0.955cm" svg:x="-79.128cm" svg:y="0.516cm">
            <text:p text:style-name="P5">New learned<text:line-break/>parameters</text:p>
          </draw:rect>
          <draw:connector draw:style-name="gr197" draw:text-style-name="P15" draw:layer="layout" draw:type="curve" svg:x1="-80.499cm" svg:y1="1.04cm" svg:x2="-79.128cm" svg:y2="0.993cm" draw:start-shape="id145" draw:start-glue-point="1" draw:end-shape="id146" draw:end-glue-point="3" svg:d="M-80499 1040c1029 0 344-47 1371-47" svg:viewBox="0 0 1372 48">
            <text:p/>
          </draw:connector>
        </draw:g>
        <draw:g draw:style-name="gr23">
          <draw:rect draw:style-name="gr41" draw:text-style-name="P5" xml:id="id147" draw:id="id147" draw:layer="layout" svg:width="3.223cm" svg:height="1.323cm" svg:x="209.041cm" svg:y="96.381cm">
            <text:p text:style-name="P5">predictor</text:p>
          </draw:rect>
          <draw:rect draw:style-name="gr40" draw:text-style-name="P63" xml:id="id148" draw:id="id148" draw:layer="layout" svg:width="3.223cm" svg:height="1.323cm" svg:x="208.97cm" svg:y="93.739cm">
            <text:p text:style-name="P5"><text:span text:style-name="T17">Prediction</text:span><text:span text:style-name="T17"><text:line-break/></text:span><text:span text:style-name="T17">sequence</text:span></text:p>
          </draw:rect>
          <draw:connector draw:style-name="gr198" draw:text-style-name="P15" draw:layer="layout" draw:type="curve" svg:x1="210.652cm" svg:y1="96.381cm" svg:x2="210.581cm" svg:y2="95.062cm" draw:start-shape="id147" draw:start-glue-point="0" draw:end-shape="id148" draw:end-glue-point="2" svg:d="M210652 96381c0-988-71-329-71-1319" svg:viewBox="0 0 72 1320">
            <text:p/>
          </draw:connector>
          <draw:rect draw:style-name="gr41" draw:text-style-name="P5" xml:id="id149" draw:id="id149" draw:layer="layout" svg:width="3.223cm" svg:height="1.323cm" svg:x="204.571cm" svg:y="96.382cm">
            <text:p text:style-name="P5">Input sequence</text:p>
          </draw:rect>
          <draw:connector draw:style-name="gr199" draw:text-style-name="P15" draw:layer="layout" draw:type="curve" svg:x1="207.794cm" svg:y1="97.043cm" svg:x2="209.041cm" svg:y2="97.042cm" draw:start-shape="id149" draw:start-glue-point="1" draw:end-shape="id147" draw:end-glue-point="3" svg:d="M207794 97043c936 0 313-1 1247-1" svg:viewBox="0 0 1248 2">
            <text:p/>
          </draw:connector>
          <draw:rect draw:style-name="gr41" draw:text-style-name="P5" xml:id="id150" draw:id="id150" draw:layer="layout" svg:width="3.223cm" svg:height="1.323cm" svg:x="209.124cm" svg:y="101.542cm">
            <text:p text:style-name="P5">trainer</text:p>
          </draw:rect>
          <draw:connector draw:style-name="gr200" draw:text-style-name="P15" draw:layer="layout" draw:type="curve" svg:x1="210.735cm" svg:y1="101.542cm" svg:x2="210.663cm" svg:y2="100.235cm" draw:start-shape="id150" draw:start-glue-point="0" draw:end-shape="id151" draw:end-glue-point="2" svg:d="M210735 101542c0-979-72-326-72-1307" svg:viewBox="0 0 73 1308">
            <text:p/>
          </draw:connector>
          <draw:rect draw:style-name="gr41" draw:text-style-name="P5" xml:id="id151" draw:id="id151" draw:layer="layout" svg:width="3.223cm" svg:height="1.323cm" svg:x="209.052cm" svg:y="98.912cm">
            <text:p text:style-name="P5">Learned<text:line-break/>parameters</text:p>
          </draw:rect>
          <draw:connector draw:style-name="gr201" draw:text-style-name="P15" draw:layer="layout" draw:type="curve" svg:x1="210.663cm" svg:y1="98.912cm" svg:x2="210.652cm" svg:y2="97.704cm" draw:start-shape="id151" draw:start-glue-point="0" draw:end-shape="id147" draw:end-glue-point="2" svg:d="M210663 98912c0-906-11-302-11-1208" svg:viewBox="0 0 12 1209">
            <text:p/>
          </draw:connector>
          <draw:rect draw:style-name="gr202" draw:text-style-name="P35" draw:layer="layout" svg:width="9.213cm" svg:height="2.958cm" svg:x="208.873cm" svg:y="104.296cm">
            <text:p text:style-name="P5">architecture</text:p>
          </draw:rect>
          <draw:rect draw:style-name="gr41" draw:text-style-name="P5" xml:id="id152" draw:id="id152" draw:layer="layout" svg:width="3.223cm" svg:height="1.323cm" svg:x="209.999cm" svg:y="105.114cm">
            <text:p text:style-name="P5">Training<text:line-break/>architecture</text:p>
          </draw:rect>
          <draw:rect draw:style-name="gr41" draw:text-style-name="P5" xml:id="id153" draw:id="id153" draw:layer="layout" svg:width="3.223cm" svg:height="1.323cm" svg:x="214.048cm" svg:y="105.114cm">
            <text:p text:style-name="P5">model<text:line-break/>architecture</text:p>
          </draw:rect>
          <draw:connector draw:style-name="gr203" draw:text-style-name="P15" draw:layer="layout" draw:type="curve" svg:x1="211.61cm" svg:y1="105.114cm" svg:x2="210.735cm" svg:y2="102.865cm" draw:start-shape="id152" draw:start-glue-point="0" draw:end-shape="id150" draw:end-glue-point="2" svg:d="M211610 105114c0-1686-875-562-875-2249" svg:viewBox="0 0 876 2250">
            <text:p/>
          </draw:connector>
          <draw:connector draw:style-name="gr204" draw:text-style-name="P15" draw:layer="layout" draw:type="curve" svg:x1="215.659cm" svg:y1="105.114cm" svg:x2="210.735cm" svg:y2="102.865cm" draw:start-shape="id153" draw:start-glue-point="0" draw:end-shape="id150" svg:d="M215659 105114c0-1686-4924-562-4924-2249" svg:viewBox="0 0 4925 2250">
            <text:p/>
          </draw:connector>
          <draw:rect draw:style-name="gr41" draw:text-style-name="P5" xml:id="id155" draw:id="id155" draw:layer="layout" svg:width="3.223cm" svg:height="1.612cm" svg:x="206.491cm" svg:y="108.061cm">
            <text:p text:style-name="P5">Sliding<text:line-break/>windows<text:line-break/>generator</text:p>
          </draw:rect>
          <draw:rect draw:style-name="gr41" draw:text-style-name="P5" xml:id="id154" draw:id="id154" draw:layer="layout" svg:width="3.223cm" svg:height="1.323cm" svg:x="209.833cm" svg:y="111.357cm">
            <text:p text:style-name="P5">Sliding<text:line-break/>window</text:p>
          </draw:rect>
          <draw:connector draw:style-name="gr205" draw:text-style-name="P15" draw:layer="layout" draw:type="curve" svg:x1="211.444cm" svg:y1="111.357cm" svg:x2="208.102cm" svg:y2="109.673cm" draw:start-shape="id154" draw:start-glue-point="0" draw:end-shape="id155" draw:end-glue-point="2" svg:d="M211444 111357c0-1263-3342-421-3342-1684" svg:viewBox="0 0 3343 1685">
            <text:p/>
          </draw:connector>
          <draw:connector draw:style-name="gr206" draw:text-style-name="P15" draw:layer="layout" draw:type="curve" svg:x1="211.444cm" svg:y1="111.357cm" svg:x2="211.61cm" svg:y2="106.437cm" draw:start-shape="id154" draw:start-glue-point="0" svg:d="M211444 111357c0-4065 166-1605 166-4920" svg:viewBox="0 0 167 4921">
            <text:p/>
          </draw:connector>
          <draw:rect draw:style-name="gr207" draw:text-style-name="P34" xml:id="id156" draw:id="id156" draw:layer="layout" svg:width="3.223cm" svg:height="1.323cm" svg:x="204.807cm" svg:y="105.163cm">
            <text:p text:style-name="P5">Input-output<text:line-break/>pairs</text:p>
          </draw:rect>
          <draw:connector draw:style-name="gr208" draw:text-style-name="P15" draw:layer="layout" draw:type="curve" svg:x1="208.102cm" svg:y1="108.061cm" svg:x2="206.418cm" svg:y2="106.486cm" draw:start-shape="id155" draw:start-glue-point="0" draw:end-shape="id156" draw:end-glue-point="2" svg:d="M208102 108061c0-1180-1684-393-1684-1575" svg:viewBox="0 0 1685 1576">
            <text:p/>
          </draw:connector>
          <draw:connector draw:style-name="gr209" draw:text-style-name="P15" draw:layer="layout" draw:type="curve" svg:x1="206.418cm" svg:y1="105.163cm" svg:x2="210.735cm" svg:y2="102.865cm" draw:start-shape="id156" draw:start-glue-point="0" draw:end-shape="id150" draw:end-glue-point="2" svg:d="M206418 105163c0-1723 4317-575 4317-2298" svg:viewBox="0 0 4318 2299">
            <text:p/>
          </draw:connector>
        </draw:g>
        <draw:custom-shape draw:style-name="gr210" draw:text-style-name="P56" xml:id="id122" draw:id="id122" draw:layer="layout" svg:width="6.322cm" svg:height="5.27cm" svg:x="-31.434cm" svg:y="187.18cm">
          <text:p text:style-name="P5">validate model <text:line-break/>against<text:line-break/>itself<text:line-break/>considering<text:line-break/>improvment-action<text:line-break/>costs.<text:line-break/>accepted?</text:p>
          <draw:enhanced-geometry svg:viewBox="0 0 21600 21600" draw:glue-points="10800 0 0 10800 10800 21600 21600 10800" draw:text-areas="5400 5400 16200 16200" draw:type="diamond" draw:enhanced-path="M 10800 0 L 21600 10800 10800 21600 0 10800 10800 0 Z N"/>
        </draw:custom-shape>
        <draw:rect draw:style-name="gr41" draw:text-style-name="P5" xml:id="id157" draw:id="id157" draw:layer="layout" svg:width="2.757cm" svg:height="1.058cm" svg:x="-30.154cm" svg:y="200.485cm">
          <text:p text:style-name="P5">clustering</text:p>
        </draw:rect>
        <draw:connector draw:style-name="gr211" draw:text-style-name="P15" draw:layer="layout" draw:type="curve" svg:x1="-30.154cm" svg:y1="201.014cm" svg:x2="-35.746cm" svg:y2="202.109cm" draw:start-shape="id157" draw:start-glue-point="3" draw:end-shape="id121" draw:end-glue-point="1" svg:d="M-30154 201014c-4192 0-1397 1095-5592 1095" svg:viewBox="0 0 5593 1096">
          <text:p/>
        </draw:connector>
        <draw:rect draw:style-name="gr41" draw:text-style-name="P5" xml:id="id159" draw:id="id159" draw:layer="layout" svg:width="3.592cm" svg:height="2.004cm" svg:x="-30.455cm" svg:y="205.336cm">
          <text:p text:style-name="P5">Grid search<text:line-break/>model <text:line-break/>architecture</text:p>
        </draw:rect>
        <draw:connector draw:style-name="gr212" draw:text-style-name="P15" draw:layer="layout" draw:type="curve" svg:x1="-24.442cm" svg:y1="196.948cm" svg:x2="-28.775cm" svg:y2="200.485cm" draw:start-shape="id158" draw:start-glue-point="8" draw:end-shape="id157" svg:d="M-24442 196948c0 2653-4333 885-4333 3537" svg:viewBox="0 0 4334 3538">
          <text:p/>
        </draw:connector>
        <draw:custom-shape draw:style-name="gr213" draw:text-style-name="P64" xml:id="id158" draw:id="id158" draw:layer="layout" svg:width="1.225cm" svg:height="1.225cm" svg:x="-25.055cm" svg:y="195.723cm">
          <text:p text:style-name="P5">N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4" draw:text-style-name="P15" draw:layer="layout" draw:type="curve" svg:x1="-25.112cm" svg:y1="189.815cm" svg:x2="-24.442cm" svg:y2="195.723cm" draw:start-shape="id122" draw:start-glue-point="7" draw:end-shape="id158" draw:end-glue-point="4" svg:d="M-25112 189815c447 0 670 1969 670 5908" svg:viewBox="0 0 671 5909">
          <text:p/>
        </draw:connector>
        <draw:connector draw:style-name="gr215" draw:text-style-name="P15" draw:layer="layout" draw:type="curve" svg:x1="-24.442cm" svg:y1="196.948cm" svg:x2="-26.863cm" svg:y2="206.338cm" draw:start-shape="id158" draw:start-glue-point="8" draw:end-shape="id159" draw:end-glue-point="1" svg:d="M-24442 196948c0 6260-807 9390-2421 9390" svg:viewBox="0 0 2422 9391">
          <text:p/>
        </draw:connector>
        <draw:connector draw:style-name="gr216" draw:text-style-name="P15" draw:layer="layout" draw:type="curve" svg:x1="-30.455cm" svg:y1="206.338cm" svg:x2="-35.746cm" svg:y2="202.109cm" draw:start-shape="id159" draw:start-glue-point="3" draw:end-shape="id121" draw:end-glue-point="1" svg:d="M-30455 206338c-3967 0-1322-4229-5291-4229" svg:viewBox="0 0 5292 4230">
          <text:p/>
        </draw:connector>
        <draw:connector draw:style-name="gr217" draw:text-style-name="P15" draw:layer="layout" draw:type="curve" svg:x1="-31.434cm" svg:y1="189.815cm" svg:x2="-46.503cm" svg:y2="188.658cm" draw:start-shape="id122" draw:start-glue-point="5" draw:end-shape="id124" draw:end-glue-point="8" svg:d="M-31434 189815c-11299 0-3765-1157-15069-1157" svg:viewBox="0 0 15070 1158">
          <text:p text:style-name="P5">yes</text:p>
        </draw:connector>
        <draw:connector draw:style-name="gr218" draw:text-style-name="P15" draw:layer="layout" draw:type="curve" svg:x1="-24.442cm" svg:y1="196.948cm" svg:x2="-27.239cm" svg:y2="203.431cm" draw:start-shape="id158" draw:start-glue-point="8" draw:end-shape="id160" draw:end-glue-point="1" svg:d="M-24442 196948c0 4322-932 6483-2797 6483" svg:viewBox="0 0 2798 6484">
          <text:p/>
        </draw:connector>
        <draw:connector draw:style-name="gr219" draw:text-style-name="P15" draw:layer="layout" draw:type="curve" svg:x1="-29.996cm" svg:y1="203.431cm" svg:x2="-35.746cm" svg:y2="202.109cm" draw:start-shape="id160" draw:start-glue-point="3" draw:end-shape="id121" draw:end-glue-point="1" svg:d="M-29996 203431c-4311 0-1436-1322-5750-1322" svg:viewBox="0 0 5751 1323">
          <text:p/>
        </draw:connector>
        <draw:rect draw:style-name="gr41" draw:text-style-name="P5" xml:id="id120" draw:id="id120" draw:layer="layout" svg:width="3.621cm" svg:height="1.476cm" svg:x="-30.932cm" svg:y="181.101cm">
          <text:p text:style-name="P5">Break to <text:line-break/>periods</text:p>
        </draw:rect>
        <draw:rect draw:style-name="gr41" draw:text-style-name="P5" xml:id="id161" draw:id="id161" draw:layer="layout" svg:width="3.621cm" svg:height="1.476cm" svg:x="-30.708cm" svg:y="183.635cm">
          <text:p text:style-name="P5">Sample and<text:line-break/>train-test from<text:line-break/>periods</text:p>
        </draw:rect>
        <draw:connector draw:style-name="gr220" draw:text-style-name="P15" draw:layer="layout" draw:type="curve" svg:x1="-29.121cm" svg:y1="182.577cm" svg:x2="-28.897cm" svg:y2="183.635cm" draw:start-shape="id120" draw:start-glue-point="2" draw:end-shape="id161" draw:end-glue-point="0" svg:d="M-29121 182577c0 793 224 265 224 1058" svg:viewBox="0 0 225 1059">
          <text:p/>
        </draw:connector>
        <draw:rect draw:style-name="gr41" draw:text-style-name="P5" xml:id="id160" draw:id="id160" draw:layer="layout" svg:width="2.757cm" svg:height="1.058cm" svg:x="-29.996cm" svg:y="202.902cm">
          <text:p text:style-name="P5">KF</text:p>
        </draw:rect>
        <draw:connector draw:style-name="gr221" draw:text-style-name="P15" draw:layer="layout" draw:type="curve" svg:x1="-28.897cm" svg:y1="185.111cm" svg:x2="-28.273cm" svg:y2="187.18cm" draw:start-shape="id161" draw:start-glue-point="2" draw:end-shape="id122" draw:end-glue-point="4" svg:d="M-28897 185111c0 1552 624 518 624 2069" svg:viewBox="0 0 625 2070">
          <text:p/>
        </draw:connector>
        <draw:custom-shape draw:style-name="gr137" draw:text-style-name="P59" xml:id="id162" draw:id="id162" draw:layer="layout" svg:width="3.535cm" svg:height="1.809cm" svg:x="-23.616cm" svg:y="179.14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7.311cm" svg:y1="181.839cm" svg:x2="-23.616cm" svg:y2="180.045cm" draw:start-shape="id120" draw:start-glue-point="1" draw:end-shape="id162" draw:end-glue-point="5" svg:d="M-27311 181839c2772 0 925-1794 3695-1794" svg:viewBox="0 0 3696 1795">
          <text:p/>
        </draw:connector>
        <draw:custom-shape draw:style-name="gr222" draw:text-style-name="P43" xml:id="id163" draw:id="id163" draw:layer="layout" svg:width="4.169cm" svg:height="1.027cm" svg:x="235.447cm" svg:y="24.312cm">
          <text:p text:style-name="P42"><text:span text:style-name="T18">trace_gro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65" draw:id="id165" draw:layer="layout" svg:width="2.831cm" svg:height="1.032cm" svg:x="241.634cm" svg:y="28.838cm">
          <text:p text:style-name="P5">sequence</text:p>
        </draw:rect>
        <draw:custom-shape draw:style-name="gr223" draw:text-style-name="P43" xml:id="id164" draw:id="id164" draw:layer="layout" svg:width="1.94cm" svg:height="1.027cm" svg:x="241.654cm" svg:y="26.299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4" draw:text-style-name="P15" draw:layer="layout" draw:type="curve" svg:x1="237.532cm" svg:y1="25.339cm" svg:x2="242.624cm" svg:y2="26.299cm" draw:start-shape="id163" draw:start-glue-point="8" draw:end-shape="id164" draw:end-glue-point="4" svg:d="M237532 25339c0 251 776 501 1552 501 775 0 1551-11 1551-22 0-10 497-21 995-21 497 0 994 251 994 502" svg:viewBox="0 0 5093 961">
          <text:p/>
        </draw:connector>
        <draw:connector draw:style-name="gr225" draw:text-style-name="P15" draw:layer="layout" draw:type="curve" svg:x1="242.624cm" svg:y1="27.326cm" svg:x2="243.049cm" svg:y2="28.838cm" draw:start-shape="id164" draw:start-glue-point="8" draw:end-shape="id165" draw:end-glue-point="0" svg:d="M242624 27326c0 1134 425 378 425 1512" svg:viewBox="0 0 426 1513">
          <text:p/>
        </draw:connector>
        <draw:rect draw:style-name="gr41" draw:text-style-name="P5" xml:id="id166" draw:id="id166" draw:layer="layout" svg:width="2.831cm" svg:height="1.032cm" svg:x="241.687cm" svg:y="31.351cm">
          <text:p text:style-name="P5">Multimodal</text:p>
        </draw:rect>
        <draw:connector draw:style-name="gr226" draw:text-style-name="P15" draw:layer="layout" draw:type="curve" svg:x1="243.049cm" svg:y1="29.87cm" svg:x2="243.102cm" svg:y2="31.351cm" draw:start-shape="id165" draw:start-glue-point="2" draw:end-shape="id166" draw:end-glue-point="0" svg:d="M243049 29870c0 1111 53 371 53 1481" svg:viewBox="0 0 54 1482">
          <text:p/>
        </draw:connector>
        <draw:custom-shape draw:style-name="gr227" draw:text-style-name="P43" xml:id="id167" draw:id="id167" draw:layer="layout" svg:width="2.473cm" svg:height="1.027cm" svg:x="232.342cm" svg:y="26.485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15" draw:layer="layout" draw:type="curve" svg:x1="237.532cm" svg:y1="25.339cm" svg:x2="233.579cm" svg:y2="26.485cm" draw:start-shape="id163" draw:start-glue-point="8" draw:end-shape="id167" draw:end-glue-point="4" svg:d="M237532 25339c0 859-3953 287-3953 1146" svg:viewBox="0 0 3954 1147">
          <text:p/>
        </draw:connector>
        <draw:rect draw:style-name="gr41" draw:text-style-name="P5" xml:id="id168" draw:id="id168" draw:layer="layout" svg:width="2.831cm" svg:height="1.032cm" svg:x="229.623cm" svg:y="29.076cm">
          <text:p text:style-name="P5">Segragating</text:p>
        </draw:rect>
        <draw:connector draw:style-name="gr229" draw:text-style-name="P15" draw:layer="layout" draw:type="curve" svg:x1="233.579cm" svg:y1="27.512cm" svg:x2="231.038cm" svg:y2="29.076cm" draw:start-shape="id167" draw:start-glue-point="8" draw:end-shape="id168" draw:end-glue-point="0" svg:d="M233579 27512c0 1173-2541 391-2541 1564" svg:viewBox="0 0 2542 1565">
          <text:p/>
        </draw:connector>
        <draw:connector draw:style-name="gr230" draw:text-style-name="P15" draw:layer="layout" draw:type="curve" svg:x1="-28.775cm" svg:y1="201.543cm" svg:x2="-28.617cm" svg:y2="202.902cm" draw:start-shape="id157" draw:start-glue-point="2" draw:end-shape="id160" draw:end-glue-point="0" svg:d="M-28775 201543c0 1020 158 341 158 1359" svg:viewBox="0 0 159 1360">
          <text:p/>
        </draw:connector>
        <draw:connector draw:style-name="gr231" draw:text-style-name="P15" draw:layer="layout" draw:type="curve" svg:x1="-28.617cm" svg:y1="203.96cm" svg:x2="-28.659cm" svg:y2="205.336cm" draw:start-shape="id160" draw:start-glue-point="2" draw:end-shape="id159" draw:end-glue-point="0" svg:d="M-28617 203960c0 1032-42 344-42 1376" svg:viewBox="0 0 43 1377">
          <text:p/>
        </draw:connector>
        <draw:rect draw:style-name="gr41" draw:text-style-name="P5" xml:id="id169" draw:id="id169" draw:layer="layout" svg:width="2.757cm" svg:height="1.058cm" svg:x="-34.276cm" svg:y="199.096cm">
          <text:p text:style-name="P5">PF</text:p>
        </draw:rect>
        <draw:connector draw:style-name="gr232" draw:text-style-name="P15" draw:layer="layout" draw:type="curve" svg:x1="-30.154cm" svg:y1="201.014cm" svg:x2="-31.519cm" svg:y2="199.625cm" draw:start-shape="id157" draw:start-glue-point="3" draw:end-shape="id169" draw:end-glue-point="1" svg:d="M-30154 201014c-1023 0-341-1389-1365-1389" svg:viewBox="0 0 1366 1390">
          <text:p/>
        </draw:connector>
        <draw:connector draw:style-name="gr233" draw:text-style-name="P15" draw:layer="layout" draw:type="curve" svg:x1="-34.276cm" svg:y1="199.625cm" svg:x2="-35.746cm" svg:y2="202.109cm" draw:start-shape="id169" draw:start-glue-point="3" draw:end-shape="id121" draw:end-glue-point="1" svg:d="M-34276 199625c-1101 0-366 2484-1470 2484" svg:viewBox="0 0 1471 2485">
          <text:p/>
        </draw:connector>
        <draw:rect draw:style-name="gr41" draw:text-style-name="P5" xml:id="id170" draw:id="id170" draw:layer="layout" svg:width="2.831cm" svg:height="1.032cm" svg:x="229.866cm" svg:y="31.127cm">
          <text:p text:style-name="P5">kind</text:p>
        </draw:rect>
        <draw:rect draw:style-name="gr41" draw:text-style-name="P5" xml:id="id173" draw:id="id173" draw:layer="layout" svg:width="2.831cm" svg:height="1.032cm" svg:x="232.3cm" svg:y="35.625cm">
          <text:p text:style-name="P5">Auto <text:line-break/>correlation</text:p>
        </draw:rect>
        <draw:rect draw:style-name="gr41" draw:text-style-name="P5" xml:id="id172" draw:id="id172" draw:layer="layout" svg:width="2.831cm" svg:height="1.032cm" svg:x="228.363cm" svg:y="35.625cm">
          <text:p text:style-name="P5">clustering</text:p>
        </draw:rect>
        <draw:rect draw:style-name="gr41" draw:text-style-name="P5" xml:id="id171" draw:id="id171" draw:layer="layout" svg:width="2.602cm" svg:height="0.948cm" svg:x="231.458cm" svg:y="33.205cm">
          <text:p text:style-name="P5">length</text:p>
        </draw:rect>
        <draw:connector draw:style-name="gr234" draw:text-style-name="P15" draw:layer="layout" draw:type="curve" svg:x1="231.281cm" svg:y1="32.159cm" svg:x2="232.759cm" svg:y2="33.205cm" draw:start-shape="id170" draw:start-glue-point="2" draw:end-shape="id171" svg:d="M231281 32159c0 784 1478 262 1478 1046" svg:viewBox="0 0 1479 1047">
          <text:p/>
        </draw:connector>
        <draw:connector draw:style-name="gr235" draw:text-style-name="P15" draw:layer="layout" draw:type="curve" svg:x1="232.759cm" svg:y1="34.153cm" svg:x2="229.778cm" svg:y2="35.625cm" draw:start-shape="id171" draw:start-glue-point="2" draw:end-shape="id172" svg:d="M232759 34153c0 1104-2981 368-2981 1472" svg:viewBox="0 0 2982 1473">
          <text:p/>
        </draw:connector>
        <draw:connector draw:style-name="gr236" draw:text-style-name="P15" draw:layer="layout" draw:type="curve" svg:x1="232.759cm" svg:y1="34.153cm" svg:x2="233.715cm" svg:y2="35.625cm" draw:start-shape="id171" draw:start-glue-point="2" draw:end-shape="id173" draw:end-glue-point="0" svg:d="M232759 34153c0 1104 956 368 956 1472" svg:viewBox="0 0 957 1473">
          <text:p/>
        </draw:connector>
        <draw:connector draw:style-name="gr237" draw:text-style-name="P15" draw:layer="layout" draw:type="curve" svg:x1="231.038cm" svg:y1="30.108cm" svg:x2="231.281cm" svg:y2="31.127cm" draw:start-shape="id168" draw:start-glue-point="2" draw:end-shape="id170" draw:end-glue-point="0" svg:d="M231038 30108c0 765 243 256 243 1019" svg:viewBox="0 0 244 1020">
          <text:p/>
        </draw:connector>
        <draw:rect draw:style-name="gr41" draw:text-style-name="P5" xml:id="id174" draw:id="id174" draw:layer="layout" svg:width="2.602cm" svg:height="0.948cm" svg:x="224.004cm" svg:y="33.293cm">
          <text:p text:style-name="P5">feature</text:p>
        </draw:rect>
        <draw:connector draw:style-name="gr238" draw:text-style-name="P15" draw:layer="layout" draw:type="curve" svg:x1="231.281cm" svg:y1="32.159cm" svg:x2="225.305cm" svg:y2="33.293cm" draw:start-shape="id170" draw:start-glue-point="2" draw:end-shape="id174" draw:end-glue-point="0" svg:d="M231281 32159c0 850-5976 284-5976 1134" svg:viewBox="0 0 5977 1135">
          <text:p/>
        </draw:connector>
        <draw:rect draw:style-name="gr41" draw:text-style-name="P5" xml:id="id175" draw:id="id175" draw:layer="layout" svg:width="2.831cm" svg:height="1.032cm" svg:x="236.236cm" svg:y="35.625cm">
          <text:p text:style-name="P5">sampling</text:p>
        </draw:rect>
        <draw:connector draw:style-name="gr239" draw:text-style-name="P15" draw:layer="layout" draw:type="curve" svg:x1="232.759cm" svg:y1="34.153cm" svg:x2="237.651cm" svg:y2="35.625cm" draw:start-shape="id171" draw:start-glue-point="2" draw:end-shape="id175" svg:d="M232759 34153c0 1104 4892 368 4892 1472" svg:viewBox="0 0 4893 1473">
          <text:p/>
        </draw:connector>
        <draw:rect draw:style-name="gr41" draw:text-style-name="P5" xml:id="id176" draw:id="id176" draw:layer="layout" svg:width="2.602cm" svg:height="0.948cm" svg:x="222.395cm" svg:y="35.564cm">
          <text:p text:style-name="P5">ros_segrgator</text:p>
        </draw:rect>
        <draw:connector draw:style-name="gr240" draw:text-style-name="P15" draw:layer="layout" draw:type="curve" svg:x1="225.305cm" svg:y1="34.241cm" svg:x2="223.696cm" svg:y2="35.564cm" draw:start-shape="id174" draw:start-glue-point="2" draw:end-shape="id176" draw:end-glue-point="0" svg:d="M225305 34241c0 993-1609 332-1609 1323" svg:viewBox="0 0 1610 1324">
          <text:p/>
        </draw:connector>
        <draw:g draw:style-name="gr31">
          <draw:custom-shape draw:name="robot_creation 18" draw:style-name="gr241" draw:text-style-name="P65" xml:id="id181" draw:id="id181" draw:layer="layout" svg:width="4.099cm" svg:height="2.788cm" svg:x="-30.027cm" svg:y="154.007cm">
            <text:p text:style-name="P60"><text:span text:style-name="T18">Teleportation </text:span><text:span text:style-name="T18"><text:line-break/></text:span><text:span text:style-name="T18">sensory-motor</text:span><text:span text:style-name="T18"><text:line-break/></text:span><text:span text:style-name="T18">recording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1" draw:text-style-name="P5" xml:id="id177" draw:id="id177" draw:layer="layout" svg:width="3.598cm" svg:height="1.693cm" svg:x="-40.428cm" svg:y="159.618cm">
            <text:p text:style-name="P5">world</text:p>
          </draw:rect>
          <draw:rect draw:style-name="gr41" draw:text-style-name="P5" xml:id="id180" draw:id="id180" draw:layer="layout" svg:width="4.374cm" svg:height="2.362cm" svg:x="-23cm" svg:y="160.713cm">
            <text:p text:style-name="P5">Remembering<text:line-break/>and running <text:line-break/>learned action<text:line-break/>sequences<text:line-break/>for each part</text:p>
          </draw:rect>
          <draw:rect draw:style-name="gr41" draw:text-style-name="P5" xml:id="id179" draw:id="id179" draw:layer="layout" svg:width="3.598cm" svg:height="2.68cm" svg:x="-29.244cm" svg:y="161.7cm">
            <text:p text:style-name="P5">World <text:line-break/>perception<text:line-break/>(ex: occupancy <text:line-break/>grid map)</text:p>
          </draw:rect>
          <draw:rect draw:style-name="gr41" draw:text-style-name="P5" xml:id="id178" draw:id="id178" draw:layer="layout" svg:width="3.598cm" svg:height="1.693cm" svg:x="-34.748cm" svg:y="161.701cm">
            <text:p text:style-name="P5">robot</text:p>
          </draw:rect>
          <draw:connector draw:style-name="gr242" draw:text-style-name="P15" draw:layer="layout" draw:type="curve" svg:x1="-36.83cm" svg:y1="160.464cm" svg:x2="-34.748cm" svg:y2="162.547cm" draw:start-shape="id177" draw:start-glue-point="1" draw:end-shape="id178" draw:end-glue-point="3" svg:d="M-36830 160464c1563 0 522 2083 2082 2083" svg:viewBox="0 0 2083 2084">
            <text:p/>
          </draw:connector>
          <draw:connector draw:style-name="gr243" draw:text-style-name="P15" draw:layer="layout" draw:type="curve" svg:x1="-31.15cm" svg:y1="162.547cm" svg:x2="-29.244cm" svg:y2="163.04cm" draw:start-shape="id178" draw:start-glue-point="1" draw:end-shape="id179" draw:end-glue-point="3" svg:d="M-31150 162547c1431 0 478 493 1906 493" svg:viewBox="0 0 1907 494">
            <text:p/>
          </draw:connector>
          <draw:connector draw:style-name="gr244" draw:text-style-name="P15" draw:layer="layout" draw:type="curve" svg:x1="-25.646cm" svg:y1="163.04cm" svg:x2="-23cm" svg:y2="161.894cm" draw:start-shape="id179" draw:start-glue-point="1" draw:end-shape="id180" draw:end-glue-point="3" svg:d="M-25646 163040c1986 0 663-1146 2646-1146" svg:viewBox="0 0 2647 1147">
            <text:p/>
          </draw:connector>
          <draw:connector draw:style-name="gr245" draw:text-style-name="P15" draw:layer="layout" draw:type="curve" svg:x1="-27.977cm" svg:y1="156.795cm" svg:x2="-38.629cm" svg:y2="159.618cm" draw:start-shape="id181" draw:start-glue-point="8" draw:end-shape="id177" svg:d="M-27977 156795c0 2118-10652 707-10652 2823" svg:viewBox="0 0 10653 2824">
            <text:p/>
          </draw:connector>
          <draw:connector draw:style-name="gr246" draw:text-style-name="P15" draw:layer="layout" draw:type="curve" svg:x1="-20.813cm" svg:y1="160.713cm" svg:x2="-25.928cm" svg:y2="155.401cm" draw:start-shape="id180" draw:start-glue-point="0" draw:end-shape="id181" draw:end-glue-point="10" svg:d="M-20813 160713c0-3542-1705-5312-5115-5312" svg:viewBox="0 0 5116 5313">
            <text:p/>
          </draw:connector>
        </draw:g>
        <draw:frame draw:style-name="gr135" draw:text-style-name="P41" draw:layer="layout" svg:width="18.834cm" svg:height="13.358cm" svg:x="-46.088cm" svg:y="120.218cm">
          <draw:image xlink:href="Pictures/10000000000002C8000001F99B6A82D1.png" xlink:type="simple" xlink:show="embed" xlink:actuate="onLoad" draw:mime-type="image/png">
            <text:p/>
          </draw:image>
        </draw:frame>
        <draw:rect draw:style-name="gr41" draw:text-style-name="P5" xml:id="id182" draw:id="id182" draw:layer="layout" svg:width="2.395cm" svg:height="1.058cm" svg:x="-48.891cm" svg:y="11.162cm">
          <text:p text:style-name="P66"><text:span text:style-name="T28">Epistemic</text:span><text:span text:style-name="T28"><text:line-break/></text:span><text:span text:style-name="T28">foraging</text:span></text:p>
        </draw:rect>
        <draw:connector draw:style-name="gr247" draw:text-style-name="P15" draw:layer="layout" draw:type="curve" svg:x1="-45.442cm" svg:y1="8.983cm" svg:x2="-47.693cm" svg:y2="11.162cm" draw:start-shape="id91" draw:start-glue-point="2" draw:end-shape="id182" draw:end-glue-point="0" svg:d="M-45442 8983c0 1635-2251 546-2251 2179" svg:viewBox="0 0 2252 2180">
          <text:p/>
        </draw:connector>
        <draw:rect draw:style-name="gr41" draw:text-style-name="P5" xml:id="id183" draw:id="id183" draw:layer="layout" svg:width="2.785cm" svg:height="1.086cm" svg:x="-46.329cm" svg:y="11.189cm">
          <text:p text:style-name="P66"><text:span text:style-name="T28">hom</text:span><text:span text:style-name="T28">eost</text:span><text:span text:style-name="T28">asis</text:span></text:p>
        </draw:rect>
        <draw:connector draw:style-name="gr248" draw:text-style-name="P15" draw:layer="layout" draw:type="curve" svg:x1="-45.442cm" svg:y1="8.983cm" svg:x2="-44.936cm" svg:y2="11.189cm" draw:start-shape="id91" draw:start-glue-point="2" draw:end-shape="id183" draw:end-glue-point="0" svg:d="M-45442 8983c0 1654 506 552 506 2206" svg:viewBox="0 0 507 2207">
          <text:p/>
        </draw:connector>
        <draw:rect draw:style-name="gr41" draw:text-style-name="P5" xml:id="id91" draw:id="id91" draw:layer="layout" svg:width="2.423cm" svg:height="1.002cm" svg:x="-46.654cm" svg:y="7.981cm">
          <text:p text:style-name="P5">Longterm<text:line-break/>level</text:p>
        </draw:rect>
        <draw:connector draw:style-name="gr249" draw:text-style-name="P15" draw:layer="layout" draw:type="curve" svg:x1="-50.777cm" svg:y1="4.425cm" svg:x2="-45.442cm" svg:y2="7.981cm" draw:start-shape="id18" draw:start-glue-point="2" draw:end-shape="id91" draw:end-glue-point="0" svg:d="M-50777 4425c0 2667 5335 889 5335 3556" svg:viewBox="0 0 5336 3557">
          <text:p/>
        </draw:connector>
        <draw:custom-shape draw:style-name="gr250" draw:text-style-name="P59" xml:id="id184" draw:id="id184" draw:layer="layout" svg:width="2.6cm" svg:height="1.972cm" svg:x="-55.259cm" svg:y="7.146cm">
          <text:p text:style-name="P3">Agentic<text:line-break/>might be <text:line-break/>related</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1.02cm" svg:y1="9.672cm" svg:x2="-53.959cm" svg:y2="9.118cm" draw:start-shape="id22" draw:start-glue-point="3" draw:end-shape="id184" draw:end-glue-point="6" svg:d="M-51020 9672c-1960 0-2939-184-2939-554" svg:viewBox="0 0 2940 555">
          <text:p/>
        </draw:connector>
        <draw:custom-shape draw:style-name="gr252" draw:text-style-name="P59" xml:id="id185" draw:id="id185" draw:layer="layout" svg:width="3.437cm" svg:height="2.697cm" svg:x="-57.962cm" svg:y="2.439cm">
          <text:p text:style-name="P3">Do so long that<text:line-break/>build semantic<text:line-break/>is close to<text:line-break/>given semantic</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3.959cm" svg:y1="7.146cm" svg:x2="-56.243cm" svg:y2="5.136cm" draw:start-shape="id184" draw:start-glue-point="4" draw:end-shape="id185" draw:end-glue-point="6" svg:d="M-53959 7146c0-1507-2284-503-2284-2010" svg:viewBox="0 0 2285 2011">
          <text:p/>
        </draw:connector>
        <draw:rect draw:style-name="gr41" draw:text-style-name="P5" xml:id="id97" draw:id="id97" draw:layer="layout" svg:width="2.312cm" svg:height="0.78cm" svg:x="-44.844cm" svg:y="5.585cm">
          <text:p text:style-name="P5">Short term</text:p>
        </draw:rect>
        <draw:connector draw:style-name="gr253" draw:text-style-name="P15" draw:layer="layout" draw:type="curve" svg:x1="-50.777cm" svg:y1="4.425cm" svg:x2="-43.688cm" svg:y2="5.585cm" draw:start-shape="id18" draw:start-glue-point="2" draw:end-shape="id97" draw:end-glue-point="0" svg:d="M-50777 4425c0 870 7089 290 7089 1160" svg:viewBox="0 0 7090 1161">
          <text:p/>
        </draw:connector>
        <draw:rect draw:style-name="gr40" draw:text-style-name="P63" xml:id="id186" draw:id="id186" draw:layer="layout" svg:width="2.304cm" svg:height="1cm" svg:x="118.45cm" svg:y="23.509cm">
          <text:p text:style-name="P5"><text:span text:style-name="T17">Robot</text:span></text:p>
        </draw:rect>
        <draw:connector draw:style-name="gr65" draw:text-style-name="P15" draw:layer="layout" draw:type="curve" svg:x1="119.602cm" svg:y1="24.509cm" svg:x2="110.471cm" svg:y2="26.075cm" draw:start-shape="id186" draw:start-glue-point="2" draw:end-shape="id187" draw:end-glue-point="0" svg:d="M119602 24509c0 1174-9131 392-9131 1566" svg:viewBox="0 0 9132 1567">
          <text:p/>
        </draw:connector>
        <draw:rect draw:style-name="gr254" draw:text-style-name="P33" xml:id="id188" draw:id="id188" draw:layer="layout" svg:width="1.6cm" svg:height="1cm" svg:x="132.65cm" svg:y="26.509cm">
          <text:p text:style-name="P5">body</text:p>
        </draw:rect>
        <draw:rect draw:style-name="gr255" draw:text-style-name="P67" xml:id="id189" draw:id="id189" draw:layer="layout" svg:width="2.8cm" svg:height="1.2cm" svg:x="130.937cm" svg:y="28.909cm">
          <text:p text:style-name="P8"><text:span text:style-name="T29">Limb</text:span><text:span text:style-name="T29"><text:line-break/></text:span><text:span text:style-name="T29">(actuator)</text:span></text:p>
        </draw:rect>
        <draw:connector draw:style-name="gr66" draw:text-style-name="P15" draw:layer="layout" draw:type="curve" svg:x1="119.602cm" svg:y1="24.509cm" svg:x2="133.45cm" svg:y2="26.509cm" draw:start-shape="id186" draw:start-glue-point="2" draw:end-shape="id188" draw:end-glue-point="0" svg:d="M119602 24509c0 1500 13848 500 13848 2000" svg:viewBox="0 0 13849 2001">
          <text:p/>
        </draw:connector>
        <draw:connector draw:style-name="gr67" draw:text-style-name="P15" draw:layer="layout" draw:type="curve" svg:x1="133.45cm" svg:y1="27.509cm" svg:x2="132.337cm" svg:y2="28.909cm" draw:start-shape="id188" draw:start-glue-point="2" draw:end-shape="id189" draw:end-glue-point="0" svg:d="M133450 27509c0 1050-1113 350-1113 1400" svg:viewBox="0 0 1114 1401">
          <text:p/>
        </draw:connector>
        <draw:rect draw:style-name="gr255" draw:text-style-name="P67" xml:id="id190" draw:id="id190" draw:layer="layout" svg:width="3.4cm" svg:height="1.2cm" svg:x="135.45cm" svg:y="28.909cm">
          <text:p text:style-name="P8"><text:span text:style-name="T29">nervous system</text:span></text:p>
        </draw:rect>
        <draw:connector draw:style-name="gr69" draw:text-style-name="P15" draw:layer="layout" draw:type="curve" svg:x1="133.45cm" svg:y1="27.509cm" svg:x2="137.15cm" svg:y2="28.909cm" draw:start-shape="id188" draw:start-glue-point="2" draw:end-shape="id190" draw:end-glue-point="0" svg:d="M133450 27509c0 1050 3700 350 3700 1400" svg:viewBox="0 0 3701 1401">
          <text:p/>
        </draw:connector>
        <draw:rect draw:style-name="gr41" draw:text-style-name="P5" xml:id="id192" draw:id="id192" draw:layer="layout" svg:width="3.9cm" svg:height="1.2cm" svg:x="128.748cm" svg:y="39.2cm">
          <text:p text:style-name="P5">Brain<text:line-break/>(CPU/FCU)</text:p>
        </draw:rect>
        <draw:connector draw:style-name="gr70" draw:text-style-name="P15" draw:layer="layout" draw:type="curve" svg:x1="137.038cm" svg:y1="36.644cm" svg:x2="130.698cm" svg:y2="39.2cm" draw:start-shape="id191" draw:start-glue-point="2" draw:end-shape="id192" draw:end-glue-point="0" svg:d="M137038 36644c0 1917-6340 639-6340 2556" svg:viewBox="0 0 6341 2557">
          <text:p/>
        </draw:connector>
        <draw:rect draw:style-name="gr41" draw:text-style-name="P5" xml:id="id194" draw:id="id194" draw:layer="layout" svg:width="3.339cm" svg:height="1.2cm" svg:x="135.327cm" svg:y="41.648cm">
          <text:p text:style-name="P5">Nerves<text:line-break/>(Circuit board)</text:p>
        </draw:rect>
        <draw:rect draw:style-name="gr41" draw:text-style-name="P5" xml:id="id195" draw:id="id195" draw:layer="layout" svg:width="3.9cm" svg:height="1.2cm" svg:x="139.131cm" svg:y="39.048cm">
          <text:p text:style-name="P5">Retinal<text:line-break/>(GPU)</text:p>
        </draw:rect>
        <draw:connector draw:style-name="gr71" draw:text-style-name="P15" draw:layer="layout" draw:type="curve" svg:x1="137.043cm" svg:y1="40.333cm" svg:x2="136.996cm" svg:y2="41.648cm" draw:start-shape="id193" draw:start-glue-point="2" draw:end-shape="id194" draw:end-glue-point="0" svg:d="M137043 40333c0 987-47 330-47 1315" svg:viewBox="0 0 48 1316">
          <text:p/>
        </draw:connector>
        <draw:connector draw:style-name="gr72" draw:text-style-name="P15" draw:layer="layout" draw:type="curve" svg:x1="137.038cm" svg:y1="36.644cm" svg:x2="141.081cm" svg:y2="39.048cm" draw:start-shape="id191" draw:start-glue-point="2" draw:end-shape="id195" draw:end-glue-point="0" svg:d="M137038 36644c0 1803 4043 601 4043 2404" svg:viewBox="0 0 4044 2405">
          <text:p/>
        </draw:connector>
        <draw:rect draw:style-name="gr254" draw:text-style-name="P33" xml:id="id187" draw:id="id187" draw:layer="layout" svg:width="2.978cm" svg:height="1cm" svg:x="108.982cm" svg:y="26.075cm">
          <text:p text:style-name="P5">Mind</text:p>
        </draw:rect>
        <draw:connector draw:style-name="gr85" draw:text-style-name="P15" draw:layer="layout" draw:type="curve" svg:x1="88.549cm" svg:y1="43.47cm" svg:x2="87.961cm" svg:y2="46.79cm" draw:start-shape="id196" draw:start-glue-point="2" draw:end-shape="id197" draw:end-glue-point="0" svg:d="M88549 43470c0 2490-588 830-588 3320" svg:viewBox="0 0 589 3321">
          <text:p/>
        </draw:connector>
        <draw:rect draw:style-name="gr255" draw:text-style-name="P67" xml:id="id201" draw:id="id201" draw:layer="layout" svg:width="2.4cm" svg:height="1cm" svg:x="83.626cm" svg:y="38.775cm">
          <text:p text:style-name="P8"><text:span text:style-name="T29">cognitive</text:span><text:span text:style-name="T29"><text:line-break/></text:span><text:span text:style-name="T29">processes</text:span></text:p>
        </draw:rect>
        <draw:connector draw:style-name="gr46" draw:text-style-name="P15" draw:layer="layout" draw:type="curve" svg:x1="137.15cm" svg:y1="28.909cm" svg:x2="138.778cm" svg:y2="27.556cm" draw:start-shape="id190" draw:start-glue-point="0" draw:end-shape="id198" draw:end-glue-point="6" svg:d="M137150 28909c0-1015 1628-339 1628-1353" svg:viewBox="0 0 1629 1354">
          <text:p/>
        </draw:connector>
        <draw:custom-shape draw:style-name="gr256" draw:text-style-name="P68" xml:id="id198" draw:id="id198" draw:layer="layout" svg:width="1.943cm" svg:height="0.975cm" svg:x="137.806cm" svg:y="26.581cm">
          <text:p text:style-name="P17"><text:span text:style-name="T4">From nervous</text:span><text:span text:style-name="T4"><text:line-break/></text:span><text:span text:style-name="T4">for dummie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197" draw:id="id197" draw:layer="layout" svg:width="2.79cm" svg:height="0.955cm" svg:x="86.566cm" svg:y="46.79cm">
          <text:p text:style-name="P5">Decision<text:line-break/>making</text:p>
        </draw:rect>
        <draw:rect draw:style-name="gr41" draw:text-style-name="P5" xml:id="id199" draw:id="id199" draw:layer="layout" svg:width="2.79cm" svg:height="0.955cm" svg:x="83.366cm" svg:y="46.782cm">
          <text:p text:style-name="P5">Planning</text:p>
        </draw:rect>
        <draw:connector draw:style-name="gr257" draw:text-style-name="P15" draw:layer="layout" draw:type="curve" svg:x1="88.549cm" svg:y1="43.47cm" svg:x2="84.761cm" svg:y2="46.782cm" draw:start-shape="id196" draw:start-glue-point="2" draw:end-shape="id199" draw:end-glue-point="0" svg:d="M88549 43470c0 2484-3788 828-3788 3312" svg:viewBox="0 0 3789 3313">
          <text:p/>
        </draw:connector>
        <draw:rect draw:style-name="gr41" draw:text-style-name="P5" xml:id="id200" draw:id="id200" draw:layer="layout" svg:width="2.79cm" svg:height="0.955cm" svg:x="89.668cm" svg:y="46.79cm">
          <text:p text:style-name="P5">Concept<text:line-break/>formation</text:p>
        </draw:rect>
        <draw:connector draw:style-name="gr258" draw:text-style-name="P15" draw:layer="layout" draw:type="curve" svg:x1="88.549cm" svg:y1="43.47cm" svg:x2="91.063cm" svg:y2="46.79cm" draw:start-shape="id196" draw:start-glue-point="2" draw:end-shape="id200" svg:d="M88549 43470c0 2490 2514 830 2514 3320" svg:viewBox="0 0 2515 3321">
          <text:p/>
        </draw:connector>
        <draw:rect draw:style-name="gr41" draw:text-style-name="P5" xml:id="id196" draw:id="id196" draw:layer="layout" svg:width="2.79cm" svg:height="0.955cm" svg:x="87.154cm" svg:y="42.515cm">
          <text:p text:style-name="P5">thinking</text:p>
        </draw:rect>
        <draw:connector draw:style-name="gr259" draw:text-style-name="P15" draw:layer="layout" draw:type="curve" svg:x1="84.826cm" svg:y1="39.775cm" svg:x2="88.549cm" svg:y2="42.515cm" draw:start-shape="id201" draw:start-glue-point="2" draw:end-shape="id196" draw:end-glue-point="0" svg:d="M84826 39775c0 2055 3723 685 3723 2740" svg:viewBox="0 0 3724 2741">
          <text:p/>
        </draw:connector>
        <draw:rect draw:style-name="gr41" draw:text-style-name="P5" xml:id="id207" draw:id="id207" draw:layer="layout" svg:width="2.79cm" svg:height="0.955cm" svg:x="83.872cm" svg:y="42.449cm">
          <text:p text:style-name="P5">learning</text:p>
        </draw:rect>
        <draw:rect draw:style-name="gr41" draw:text-style-name="P5" xml:id="id202" draw:id="id202" draw:layer="layout" svg:width="2.79cm" svg:height="0.955cm" svg:x="90.833cm" svg:y="42.515cm">
          <text:p text:style-name="P5">perception</text:p>
        </draw:rect>
        <draw:rect draw:style-name="gr41" draw:text-style-name="P5" xml:id="id204" draw:id="id204" draw:layer="layout" svg:width="2.79cm" svg:height="0.955cm" svg:x="95.192cm" svg:y="42.515cm">
          <text:p text:style-name="P5">attention</text:p>
        </draw:rect>
        <draw:connector draw:style-name="gr260" draw:text-style-name="P15" draw:layer="layout" draw:type="curve" svg:x1="84.826cm" svg:y1="39.775cm" svg:x2="92.228cm" svg:y2="42.515cm" draw:start-shape="id201" draw:start-glue-point="2" draw:end-shape="id202" draw:end-glue-point="0" svg:d="M84826 39775c0 2055 7402 685 7402 2740" svg:viewBox="0 0 7403 2741">
          <text:p/>
        </draw:connector>
        <draw:connector draw:style-name="gr261" draw:text-style-name="P15" draw:layer="layout" draw:type="curve" svg:x1="84.826cm" svg:y1="39.775cm" svg:x2="69.716cm" svg:y2="44.549cm" draw:start-shape="id201" draw:start-glue-point="2" draw:end-shape="id203" draw:end-glue-point="0" svg:d="M84826 39775c0 3580-15110 1194-15110 4774" svg:viewBox="0 0 15111 4775">
          <text:p/>
        </draw:connector>
        <draw:connector draw:style-name="gr262" draw:text-style-name="P15" draw:layer="layout" draw:type="curve" svg:x1="84.826cm" svg:y1="39.775cm" svg:x2="96.587cm" svg:y2="42.515cm" draw:start-shape="id201" draw:start-glue-point="2" draw:end-shape="id204" svg:d="M84826 39775c0 2055 11761 685 11761 2740" svg:viewBox="0 0 11762 2741">
          <text:p/>
        </draw:connector>
        <draw:rect draw:style-name="gr41" draw:text-style-name="P5" xml:id="id205" draw:id="id205" draw:layer="layout" svg:width="2.79cm" svg:height="0.955cm" svg:x="92.921cm" svg:y="46.79cm">
          <text:p text:style-name="P5">Problem<text:line-break/>solving</text:p>
        </draw:rect>
        <draw:rect draw:style-name="gr41" draw:text-style-name="P5" xml:id="id206" draw:id="id206" draw:layer="layout" svg:width="2.79cm" svg:height="0.955cm" svg:x="96.043cm" svg:y="46.79cm">
          <text:p text:style-name="P5">Reasoning</text:p>
        </draw:rect>
        <draw:connector draw:style-name="gr263" draw:text-style-name="P15" draw:layer="layout" draw:type="curve" svg:x1="88.549cm" svg:y1="43.47cm" svg:x2="94.316cm" svg:y2="46.79cm" draw:start-shape="id196" draw:start-glue-point="2" draw:end-shape="id205" svg:d="M88549 43470c0 2490 5767 830 5767 3320" svg:viewBox="0 0 5768 3321">
          <text:p/>
        </draw:connector>
        <draw:connector draw:style-name="gr264" draw:text-style-name="P15" draw:layer="layout" draw:type="curve" svg:x1="88.549cm" svg:y1="43.47cm" svg:x2="97.438cm" svg:y2="46.79cm" draw:start-shape="id196" draw:start-glue-point="2" draw:end-shape="id206" draw:end-glue-point="0" svg:d="M88549 43470c0 2490 8889 830 8889 3320" svg:viewBox="0 0 8890 3321">
          <text:p/>
        </draw:connector>
        <draw:connector draw:style-name="gr265" draw:text-style-name="P15" draw:layer="layout" draw:type="curve" svg:x1="84.826cm" svg:y1="39.775cm" svg:x2="85.267cm" svg:y2="42.449cm" draw:start-shape="id201" draw:start-glue-point="2" draw:end-shape="id207" draw:end-glue-point="0" svg:d="M84826 39775c0 2005 441 669 441 2674" svg:viewBox="0 0 442 2675">
          <text:p/>
        </draw:connector>
        <draw:connector draw:style-name="gr46" draw:text-style-name="P15" draw:layer="layout" draw:type="curve" svg:x1="85.267cm" svg:y1="42.449cm" svg:x2="81.639cm" svg:y2="39.866cm" draw:start-shape="id207" draw:start-glue-point="0" draw:end-shape="id208" draw:end-glue-point="7" svg:d="M85267 42449c0-1722-1209-2583-3628-2583" svg:viewBox="0 0 3629 2584">
          <text:p/>
        </draw:connector>
        <draw:custom-shape draw:name="comment box 4" draw:style-name="gr266" draw:text-style-name="P70" xml:id="id208" draw:id="id208" draw:layer="layout" svg:width="3.82cm" svg:height="3.055cm" svg:x="77.819cm" svg:y="38.338cm">
          <text:p text:style-name="P69"><text:span text:style-name="T12">Discovering optimized parameters for a thinking model such as the weights of a neural network</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267" draw:text-style-name="P68" xml:id="id209" draw:id="id209" draw:layer="layout" svg:width="3.037cm" svg:height="1.675cm" svg:x="135.499cm" svg:y="22.993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461.522153911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3.45cm" svg:y1="26.509cm" svg:x2="137.018cm" svg:y2="24.668cm" draw:start-shape="id188" draw:start-glue-point="0" draw:end-shape="id209" draw:end-glue-point="6" svg:d="M133450 26509c0-1380 3568-460 3568-1841" svg:viewBox="0 0 3569 1842">
          <text:p/>
        </draw:connector>
        <draw:custom-shape draw:name="comment box 5" draw:style-name="gr266" draw:text-style-name="P70" xml:id="id210" draw:id="id210" draw:layer="layout" svg:width="3.82cm" svg:height="2.201cm" svg:x="87.313cm" svg:y="38.476cm">
          <text:p text:style-name="P69"><text:span text:style-name="T12">Changing the </text:span><text:span text:style-name="T12"><text:line-break/></text:span><text:span text:style-name="T12">structure of the model, such as the</text:span><text:span text:style-name="T12"><text:line-break/></text:span><text:span text:style-name="T12">architecture of layers </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88.549cm" svg:y1="42.515cm" svg:x2="89.223cm" svg:y2="40.677cm" draw:start-shape="id196" draw:start-glue-point="0" draw:end-shape="id210" draw:end-glue-point="6" svg:d="M88549 42515c0-1378 674-460 674-1838" svg:viewBox="0 0 675 1839">
          <text:p/>
        </draw:connector>
        <draw:rect draw:style-name="gr255" draw:text-style-name="P67" xml:id="id212" draw:id="id212" draw:layer="layout" svg:width="2.4cm" svg:height="1.412cm" svg:x="105.792cm" svg:y="34.46cm">
          <text:p text:style-name="P8"><text:span text:style-name="T29">Meta</text:span><text:span text:style-name="T29"><text:line-break/></text:span><text:span text:style-name="T29">cognition</text:span></text:p>
        </draw:rect>
        <draw:rect draw:style-name="gr255" draw:text-style-name="P67" xml:id="id211" draw:id="id211" draw:layer="layout" svg:width="2.4cm" svg:height="1cm" svg:x="91.63cm" svg:y="35.148cm">
          <text:p text:style-name="P8"><text:span text:style-name="T29">Object</text:span><text:span text:style-name="T29"><text:line-break/></text:span><text:span text:style-name="T29">level</text:span></text:p>
        </draw:rect>
        <draw:connector draw:style-name="gr268" draw:text-style-name="P15" draw:layer="layout" draw:type="curve" svg:x1="92.83cm" svg:y1="36.148cm" svg:x2="84.826cm" svg:y2="38.775cm" draw:start-shape="id211" draw:start-glue-point="2" draw:end-shape="id201" draw:end-glue-point="0" svg:d="M92830 36148c0 1971-8004 658-8004 2627" svg:viewBox="0 0 8005 2628">
          <text:p/>
        </draw:connector>
        <draw:rect draw:style-name="gr255" draw:text-style-name="P71" xml:id="id213" draw:id="id213" draw:layer="layout" svg:width="2.885cm" svg:height="1cm" svg:x="101.415cm" svg:y="37.365cm">
          <text:p text:style-name="P3"><text:span text:style-name="T29">Self-</text:span><text:span text:style-name="T29"><text:line-break/></text:span><text:span text:style-name="T29">conscious</text:span><text:span text:style-name="T29">ness</text:span></text:p>
        </draw:rect>
        <draw:connector draw:style-name="gr269" draw:text-style-name="P15" draw:layer="layout" draw:type="curve" svg:x1="106.992cm" svg:y1="35.872cm" svg:x2="102.857cm" svg:y2="37.365cm" draw:start-shape="id212" draw:start-glue-point="2" draw:end-shape="id213" draw:end-glue-point="0" svg:d="M106992 35872c0 1120-4135 374-4135 1493" svg:viewBox="0 0 4136 1494">
          <text:p/>
        </draw:connector>
        <draw:rect draw:style-name="gr255" draw:text-style-name="P67" xml:id="id214" draw:id="id214" draw:layer="layout" svg:width="2.8cm" svg:height="1.2cm" svg:x="125.553cm" svg:y="28.971cm">
          <text:p text:style-name="P8"><text:span text:style-name="T29">Organ</text:span><text:span text:style-name="T29"><text:line-break/></text:span><text:span text:style-name="T29">(link)</text:span></text:p>
        </draw:rect>
        <draw:connector draw:style-name="gr270" draw:text-style-name="P15" draw:layer="layout" draw:type="curve" svg:x1="133.45cm" svg:y1="27.509cm" svg:x2="126.953cm" svg:y2="28.971cm" draw:start-shape="id188" draw:start-glue-point="2" draw:end-shape="id214" draw:end-glue-point="0" svg:d="M133450 27509c0 1096-6497 366-6497 1462" svg:viewBox="0 0 6498 1463">
          <text:p/>
        </draw:connector>
        <draw:rect draw:style-name="gr41" draw:text-style-name="P5" xml:id="id193" draw:id="id193" draw:layer="layout" svg:width="2.937cm" svg:height="1.219cm" svg:x="135.575cm" svg:y="39.114cm">
          <text:p text:style-name="P5">Spinal cord<text:line-break/>(Bus)</text:p>
        </draw:rect>
        <draw:connector draw:style-name="gr271" draw:text-style-name="P15" draw:layer="layout" draw:type="curve" svg:x1="137.038cm" svg:y1="36.644cm" svg:x2="137.043cm" svg:y2="39.114cm" draw:start-shape="id191" draw:start-glue-point="2" draw:end-shape="id193" draw:end-glue-point="0" svg:d="M137038 36644c0 1852 5 618 5 2470" svg:viewBox="0 0 6 2471">
          <text:p/>
        </draw:connector>
        <draw:rect draw:style-name="gr41" draw:text-style-name="P5" xml:id="id215" draw:id="id215" draw:layer="layout" svg:width="3.331cm" svg:height="1.431cm" svg:x="147.038cm" svg:y="36.861cm">
          <text:p text:style-name="P5">Peripheral<text:line-break/>nerves</text:p>
        </draw:rect>
        <draw:connector draw:style-name="gr272" draw:text-style-name="P15" draw:layer="layout" draw:type="curve" svg:x1="137.15cm" svg:y1="30.109cm" svg:x2="148.703cm" svg:y2="36.861cm" draw:start-shape="id190" draw:start-glue-point="2" draw:end-shape="id215" draw:end-glue-point="0" svg:d="M137150 30109c0 5064 11553 1688 11553 6752" svg:viewBox="0 0 11554 6753">
          <text:p/>
        </draw:connector>
        <draw:custom-shape draw:style-name="gr273" draw:text-style-name="P68" xml:id="id216" draw:id="id216" draw:layer="layout" svg:width="3.191cm" svg:height="1.93cm" svg:x="123.329cm" svg:y="25.67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26.953cm" svg:y1="28.971cm" svg:x2="124.925cm" svg:y2="27.6cm" draw:start-shape="id214" draw:start-glue-point="0" draw:end-shape="id216" draw:end-glue-point="6" svg:d="M126953 28971c0-1027-2028-342-2028-1371" svg:viewBox="0 0 2029 1372">
          <text:p/>
        </draw:connector>
        <draw:rect draw:style-name="gr41" draw:text-style-name="P5" xml:id="id191" draw:id="id191" draw:layer="layout" svg:width="3.9cm" svg:height="1.2cm" svg:x="135.088cm" svg:y="35.444cm">
          <text:p text:style-name="P5">Central nervous <text:line-break/>system</text:p>
        </draw:rect>
        <draw:connector draw:style-name="gr46" draw:text-style-name="P15" draw:layer="layout" draw:type="curve" svg:x1="141.081cm" svg:y1="39.048cm" svg:x2="142.648cm" svg:y2="38.017cm" draw:start-shape="id195" draw:start-glue-point="0" draw:end-shape="id217" draw:end-glue-point="6" svg:d="M141081 39048c0-772 1567-257 1567-1031" svg:viewBox="0 0 1568 1032">
          <text:p/>
        </draw:connector>
        <draw:connector draw:style-name="gr274" draw:text-style-name="P15" draw:layer="layout" draw:type="curve" svg:x1="137.15cm" svg:y1="30.109cm" svg:x2="137.038cm" svg:y2="35.444cm" draw:start-shape="id190" draw:start-glue-point="2" draw:end-shape="id191" draw:end-glue-point="0" svg:d="M137150 30109c0 4002-112 1335-112 5335" svg:viewBox="0 0 113 5336">
          <text:p/>
        </draw:connector>
        <draw:custom-shape draw:style-name="gr275" draw:text-style-name="P68" xml:id="id218" draw:id="id218" draw:layer="layout" svg:width="2.469cm" svg:height="1.357cm" svg:x="128.835cm" svg:y="26.132cm">
          <text:p text:style-name="P17"><text:span text:style-name="T4">To convert </text:span><text:span text:style-name="T4"><text:line-break/></text:span><text:span text:style-name="T4">control input to </text:span><text:span text:style-name="T4"><text:line-break/></text:span><text:span text:style-name="T4">movement</text:span></text:p>
          <draw:enhanced-geometry svg:viewBox="0 0 21600 21600" draw:mirror-horizontal="false" draw:mirror-vertical="false" draw:glue-points="10800 0 0 10800 10800 21600 21600 10800" draw:text-areas="0 0 21600 ?f11" draw:type="paper" draw:modifiers="19471.7850287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2.337cm" svg:y1="28.909cm" svg:x2="130.07cm" svg:y2="27.489cm" draw:start-shape="id189" draw:start-glue-point="0" draw:end-shape="id218" draw:end-glue-point="6" svg:d="M132337 28909c0-1065-2267-355-2267-1420" svg:viewBox="0 0 2268 1421">
          <text:p/>
        </draw:connector>
        <draw:rect draw:style-name="gr276" draw:text-style-name="P5" xml:id="id220" draw:id="id220" draw:layer="layout" svg:width="2.475cm" svg:height="0.752cm" svg:x="144.938cm" svg:y="42.835cm">
          <text:p text:style-name="P30"><text:span text:style-name="T28">Enteric</text:span></text:p>
        </draw:rect>
        <draw:connector draw:style-name="gr277" draw:text-style-name="P15" draw:layer="layout" draw:type="curve" svg:x1="146.179cm" svg:y1="41.453cm" svg:x2="146.175cm" svg:y2="42.835cm" draw:start-shape="id219" draw:start-glue-point="2" draw:end-shape="id220" svg:d="M146179 41453c0 1036-4 346-4 1382" svg:viewBox="0 0 5 1383">
          <text:p/>
        </draw:connector>
        <draw:rect draw:style-name="gr41" draw:text-style-name="P5" xml:id="id219" draw:id="id219" draw:layer="layout" svg:width="2.426cm" svg:height="1.051cm" svg:x="144.966cm" svg:y="40.402cm">
          <text:p text:style-name="P5">Automatic</text:p>
        </draw:rect>
        <draw:connector draw:style-name="gr278" draw:text-style-name="P15" draw:layer="layout" draw:type="curve" svg:x1="148.703cm" svg:y1="38.292cm" svg:x2="146.179cm" svg:y2="40.402cm" draw:start-shape="id215" draw:start-glue-point="2" draw:end-shape="id219" draw:end-glue-point="0" svg:d="M148703 38292c0 1582-2524 528-2524 2110" svg:viewBox="0 0 2525 2111">
          <text:p/>
        </draw:connector>
        <draw:custom-shape draw:style-name="gr279" draw:text-style-name="P68" xml:id="id217" draw:id="id217" draw:layer="layout" svg:width="4.159cm" svg:height="1.583cm" svg:x="140.568cm" svg:y="36.434cm">
          <text:p text:style-name="P17"><text:span text:style-name="T4">Sensors with cpus in</text:span><text:span text:style-name="T4"><text:line-break/></text:span><text:span text:style-name="T4">them that they </text:span><text:span text:style-name="T4"><text:line-break/></text:span><text:span text:style-name="T4">preprocessed data before</text:span><text:span text:style-name="T4"><text:line-break/></text:span><text:span text:style-name="T4">sending</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80" draw:text-style-name="P72" xml:id="id221" draw:id="id221" draw:layer="layout" svg:width="2.138cm" svg:height="1.014cm" svg:x="127.181cm" svg:y="31.128cm">
          <text:p text:style-name="P8"><text:span text:style-name="T27">Motor </text:span><text:span text:style-name="T27"><text:line-break/></text:span><text:span text:style-name="T27">neurons</text:span></text:p>
        </draw:rect>
        <draw:connector draw:style-name="gr281" draw:text-style-name="P15" draw:layer="layout" draw:type="curve" svg:x1="128.25cm" svg:y1="31.128cm" svg:x2="132.337cm" svg:y2="30.109cm" draw:start-shape="id221" draw:start-glue-point="0" draw:end-shape="id189" draw:end-glue-point="2" svg:d="M128250 31128c0-763 4087-254 4087-1019" svg:viewBox="0 0 4088 1020">
          <text:p/>
        </draw:connector>
        <draw:connector draw:style-name="gr282" draw:text-style-name="P15" draw:layer="layout" draw:type="curve" svg:x1="130.925cm" svg:y1="38.049cm" svg:x2="130.698cm" svg:y2="39.2cm" draw:start-shape="id222" draw:start-glue-point="2" draw:end-shape="id192" draw:end-glue-point="0" svg:d="M130925 38049c0 864-227 289-227 1151" svg:viewBox="0 0 228 1152">
          <text:p/>
        </draw:connector>
        <draw:rect draw:style-name="gr280" draw:text-style-name="P72" xml:id="id222" draw:id="id222" draw:layer="layout" svg:width="2.138cm" svg:height="1.014cm" svg:x="129.856cm" svg:y="37.035cm">
          <text:p text:style-name="P8"><text:span text:style-name="T27">projectio</text:span><text:span text:style-name="T27">n </text:span><text:span text:style-name="T27"><text:line-break/></text:span><text:span text:style-name="T27">neurons</text:span></text:p>
        </draw:rect>
        <draw:custom-shape draw:style-name="gr283" draw:text-style-name="P68" xml:id="id223" draw:id="id223" draw:layer="layout" svg:width="3.191cm" svg:height="1.228cm" svg:x="127.987cm" svg:y="34.701cm">
          <text:p text:style-name="P17"><text:span text:style-name="T4">Establish connection</text:span><text:span text:style-name="T4"><text:line-break/></text:span><text:span text:style-name="T4">between different parts</text:span><text:span text:style-name="T4"><text:line-break/></text:span><text:span text:style-name="T4">of brain</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84" draw:text-style-name="P15" draw:layer="layout" draw:type="curve" svg:x1="129.583cm" svg:y1="35.929cm" svg:x2="130.925cm" svg:y2="37.035cm" draw:start-shape="id223" draw:start-glue-point="6" draw:end-shape="id222" draw:end-glue-point="0" svg:d="M129583 35929c0 831 1342 278 1342 1106" svg:viewBox="0 0 1343 1107">
          <text:p/>
        </draw:connector>
        <draw:rect draw:style-name="gr255" draw:text-style-name="P67" xml:id="id224" draw:id="id224" draw:layer="layout" svg:width="3.056cm" svg:height="1cm" svg:x="95.087cm" svg:y="39.17cm">
          <text:p text:style-name="P8"><text:span text:style-name="T29">non-</text:span><text:span text:style-name="T29">cogniti</text:span><text:span text:style-name="T29">ve</text:span><text:span text:style-name="T29"><text:line-break/></text:span><text:span text:style-name="T29">proce</text:span><text:span text:style-name="T29">sses</text:span></text:p>
        </draw:rect>
        <draw:connector draw:style-name="gr285" draw:text-style-name="P15" draw:layer="layout" draw:type="curve" svg:x1="92.83cm" svg:y1="36.148cm" svg:x2="96.615cm" svg:y2="39.17cm" draw:start-shape="id211" draw:start-glue-point="2" draw:end-shape="id224" draw:end-glue-point="0" svg:d="M92830 36148c0 2266 3785 756 3785 3022" svg:viewBox="0 0 3786 3023">
          <text:p/>
        </draw:connector>
        <draw:rect draw:style-name="gr41" draw:text-style-name="P5" xml:id="id225" draw:id="id225" draw:layer="layout" svg:width="2.449cm" svg:height="1.254cm" svg:x="150.041cm" svg:y="40.2cm">
          <text:p text:style-name="P69"><text:span text:style-name="T12">Somatic</text:span><text:span text:style-name="T12"><text:line-break/></text:span><text:span text:style-name="T12">(voluntary)</text:span></text:p>
        </draw:rect>
        <draw:connector draw:style-name="gr286" draw:text-style-name="P15" draw:layer="layout" draw:type="curve" svg:x1="148.703cm" svg:y1="38.292cm" svg:x2="151.265cm" svg:y2="40.2cm" draw:start-shape="id215" draw:start-glue-point="2" draw:end-shape="id225" draw:end-glue-point="0" svg:d="M148703 38292c0 1431 2562 477 2562 1908" svg:viewBox="0 0 2563 1909">
          <text:p/>
        </draw:connector>
        <draw:rect draw:style-name="gr255" draw:text-style-name="P67" xml:id="id226" draw:id="id226" draw:layer="layout" svg:width="2.5cm" svg:height="1cm" svg:x="55.004cm" svg:y="51.128cm">
          <text:p text:style-name="P8"><text:span text:style-name="T29">explicit</text:span></text:p>
        </draw:rect>
        <draw:rect draw:style-name="gr255" draw:text-style-name="P67" xml:id="id227" draw:id="id227" draw:layer="layout" svg:width="2.3cm" svg:height="1cm" svg:x="45.104cm" svg:y="53.528cm">
          <text:p text:style-name="P8"><text:span text:style-name="T29">long term</text:span></text:p>
        </draw:rect>
        <draw:connector draw:style-name="gr287" draw:text-style-name="P15" draw:layer="layout" draw:type="curve" svg:x1="69.716cm" svg:y1="45.549cm" svg:x2="56.254cm" svg:y2="51.128cm" draw:start-shape="id203" draw:start-glue-point="2" draw:end-shape="id226" svg:d="M69716 45549c0 4185-13462 1396-13462 5579" svg:viewBox="0 0 13463 5580">
          <text:p/>
        </draw:connector>
        <draw:connector draw:style-name="gr288" draw:text-style-name="P15" draw:layer="layout" draw:type="curve" svg:x1="56.254cm" svg:y1="52.128cm" svg:x2="46.254cm" svg:y2="53.528cm" draw:start-shape="id226" draw:start-glue-point="2" draw:end-shape="id227" draw:end-glue-point="0" svg:d="M56254 52128c0 1050-10000 350-10000 1400" svg:viewBox="0 0 10001 1401">
          <text:p/>
        </draw:connector>
        <draw:rect draw:style-name="gr255" draw:text-style-name="P67" xml:id="id228" draw:id="id228" draw:layer="layout" svg:width="2.5cm" svg:height="1cm" svg:x="67.504cm" svg:y="52.628cm">
          <text:p text:style-name="P8"><text:span text:style-name="T29">implicit</text:span></text:p>
        </draw:rect>
        <draw:connector draw:style-name="gr289" draw:text-style-name="P15" draw:layer="layout" draw:type="curve" svg:x1="69.716cm" svg:y1="45.549cm" svg:x2="68.754cm" svg:y2="52.628cm" draw:start-shape="id203" draw:start-glue-point="2" draw:end-shape="id228" draw:end-glue-point="0" svg:d="M69716 45549c0 5310-962 1771-962 7079" svg:viewBox="0 0 963 7080">
          <text:p/>
        </draw:connector>
        <draw:rect draw:style-name="gr255" draw:text-style-name="P67" xml:id="id230" draw:id="id230" draw:layer="layout" svg:width="2.5cm" svg:height="1cm" svg:x="69.004cm" svg:y="55.028cm">
          <text:p text:style-name="P8"><text:span text:style-name="T29">Repeti</text:span><text:span text:style-name="T29">tion </text:span><text:span text:style-name="T29"><text:line-break/></text:span><text:span text:style-name="T29">primin</text:span><text:span text:style-name="T29">g</text:span></text:p>
        </draw:rect>
        <draw:rect draw:style-name="gr255" draw:text-style-name="P67" xml:id="id229" draw:id="id229" draw:layer="layout" svg:width="2.5cm" svg:height="1cm" svg:x="66.004cm" svg:y="55.028cm">
          <text:p text:style-name="P8"><text:span text:style-name="T29">skills</text:span></text:p>
        </draw:rect>
        <draw:connector draw:style-name="gr290" draw:text-style-name="P15" draw:layer="layout" draw:type="curve" svg:x1="68.754cm" svg:y1="53.628cm" svg:x2="67.254cm" svg:y2="55.028cm" draw:start-shape="id228" draw:start-glue-point="2" draw:end-shape="id229" draw:end-glue-point="0" svg:d="M68754 53628c0 1050-1500 350-1500 1400" svg:viewBox="0 0 1501 1401">
          <text:p/>
        </draw:connector>
        <draw:connector draw:style-name="gr291" draw:text-style-name="P15" draw:layer="layout" draw:type="curve" svg:x1="68.754cm" svg:y1="53.628cm" svg:x2="70.254cm" svg:y2="55.028cm" draw:start-shape="id228" draw:start-glue-point="2" draw:end-shape="id230" draw:end-glue-point="0" svg:d="M68754 53628c0 1050 1500 350 1500 1400" svg:viewBox="0 0 1501 1401">
          <text:p/>
        </draw:connector>
        <draw:rect draw:style-name="gr255" draw:text-style-name="P67" xml:id="id232" draw:id="id232" draw:layer="layout" svg:width="2.56cm" svg:height="1.113cm" svg:x="35.83cm" svg:y="57.001cm">
          <text:p text:style-name="P8"><text:span text:style-name="T29">episodic</text:span></text:p>
        </draw:rect>
        <draw:rect draw:style-name="gr255" draw:text-style-name="P67" xml:id="id231" draw:id="id231" draw:layer="layout" svg:width="2.3cm" svg:height="1cm" svg:x="45.104cm" svg:y="56.528cm">
          <text:p text:style-name="P8"><text:span text:style-name="T29">semant</text:span><text:span text:style-name="T29">ic</text:span></text:p>
        </draw:rect>
        <draw:connector draw:style-name="gr65" draw:text-style-name="P15" draw:layer="layout" draw:type="curve" svg:x1="46.254cm" svg:y1="54.528cm" svg:x2="46.254cm" svg:y2="56.528cm" draw:start-shape="id227" draw:start-glue-point="2" draw:end-shape="id231" draw:end-glue-point="0" svg:d="M46254 54528v2000" svg:viewBox="0 0 1 2001">
          <text:p/>
        </draw:connector>
        <draw:connector draw:style-name="gr66" draw:text-style-name="P15" draw:layer="layout" draw:type="curve" svg:x1="46.254cm" svg:y1="54.528cm" svg:x2="37.11cm" svg:y2="57.001cm" draw:start-shape="id227" draw:start-glue-point="2" draw:end-shape="id232" draw:end-glue-point="0" svg:d="M46254 54528c0 1855-9144 619-9144 2473" svg:viewBox="0 0 9145 2474">
          <text:p/>
        </draw:connector>
        <draw:rect draw:style-name="gr292" draw:text-style-name="P35" xml:id="id245" draw:id="id245" draw:layer="layout" svg:width="2.9cm" svg:height="1.6cm" svg:x="69.604cm" svg:y="59.828cm">
          <text:p text:style-name="P5">Sequence to<text:line-break/>sequence <text:line-break/>models</text:p>
        </draw:rect>
        <draw:connector draw:style-name="gr68" draw:text-style-name="P15" draw:layer="layout" draw:type="curve" svg:x1="70.254cm" svg:y1="56.028cm" svg:x2="71.054cm" svg:y2="57.828cm" draw:start-shape="id230" draw:start-glue-point="2" draw:end-shape="id233" draw:end-glue-point="0" svg:d="M70254 56028c0 1350 800 450 800 1800" svg:viewBox="0 0 801 1801">
          <text:p/>
        </draw:connector>
        <draw:rect draw:style-name="gr255" draw:text-style-name="P67" xml:id="id234" draw:id="id234" draw:layer="layout" svg:width="2.3cm" svg:height="1cm" svg:x="52.804cm" svg:y="56.528cm">
          <text:p text:style-name="P8"><text:span text:style-name="T29">item </text:span><text:span text:style-name="T29"><text:line-break/></text:span><text:span text:style-name="T29">memory</text:span></text:p>
        </draw:rect>
        <draw:connector draw:style-name="gr70" draw:text-style-name="P15" draw:layer="layout" draw:type="curve" svg:x1="46.254cm" svg:y1="54.528cm" svg:x2="53.954cm" svg:y2="56.528cm" draw:start-shape="id227" draw:start-glue-point="2" draw:end-shape="id234" draw:end-glue-point="0" svg:d="M46254 54528c0 1500 7700 500 7700 2000" svg:viewBox="0 0 7701 2001">
          <text:p/>
        </draw:connector>
        <draw:rect draw:style-name="gr255" draw:text-style-name="P67" xml:id="id235" draw:id="id235" draw:layer="layout" svg:width="2.3cm" svg:height="1cm" svg:x="52.804cm" svg:y="59.228cm">
          <text:p text:style-name="P8"><text:span text:style-name="T29">knowing</text:span></text:p>
        </draw:rect>
        <draw:connector draw:style-name="gr71" draw:text-style-name="P15" draw:layer="layout" draw:type="curve" svg:x1="53.954cm" svg:y1="57.528cm" svg:x2="53.954cm" svg:y2="59.228cm" draw:start-shape="id234" draw:start-glue-point="2" draw:end-shape="id235" svg:d="M53954 57528v1700" svg:viewBox="0 0 1 1701">
          <text:p/>
        </draw:connector>
        <draw:connector draw:style-name="gr72" draw:text-style-name="P15" draw:layer="layout" draw:type="curve" svg:x1="46.254cm" svg:y1="57.528cm" svg:x2="53.954cm" svg:y2="59.228cm" draw:start-shape="id231" draw:start-glue-point="2" draw:end-shape="id235" draw:end-glue-point="0" svg:d="M46254 57528c0 1275 7700 425 7700 1700" svg:viewBox="0 0 7701 1701">
          <text:p/>
        </draw:connector>
        <draw:rect draw:name="memory" draw:style-name="gr40" draw:text-style-name="P63" xml:id="id203" draw:id="id203" draw:layer="layout" svg:width="2.4cm" svg:height="1cm" svg:x="68.516cm" svg:y="44.549cm">
          <text:p text:style-name="P5"><text:span text:style-name="T17">memory</text:span></text:p>
        </draw:rect>
        <draw:rect draw:style-name="gr255" draw:text-style-name="P67" xml:id="id236" draw:id="id236" draw:layer="layout" svg:width="2.3cm" svg:height="1cm" svg:x="59.804cm" svg:y="53.528cm">
          <text:p text:style-name="P8"><text:span text:style-name="T29">Short</text:span><text:span text:style-name="T29"><text:line-break/></text:span><text:span text:style-name="T29">term</text:span></text:p>
        </draw:rect>
        <draw:connector draw:style-name="gr293" draw:text-style-name="P15" draw:layer="layout" draw:type="curve" svg:x1="56.254cm" svg:y1="52.128cm" svg:x2="60.954cm" svg:y2="53.528cm" draw:start-shape="id226" draw:start-glue-point="2" draw:end-shape="id236" draw:end-glue-point="0" svg:d="M56254 52128c0 1050 4700 350 4700 1400" svg:viewBox="0 0 4701 1401">
          <text:p/>
        </draw:connector>
        <draw:rect draw:style-name="gr255" draw:text-style-name="P67" xml:id="id237" draw:id="id237" draw:layer="layout" svg:width="2.3cm" svg:height="1cm" svg:x="52.804cm" svg:y="61.228cm">
          <text:p text:style-name="P8"><text:span text:style-name="T29">Familiari</text:span><text:span text:style-name="T29">ty</text:span></text:p>
        </draw:rect>
        <draw:connector draw:style-name="gr293" draw:text-style-name="P15" draw:layer="layout" draw:type="curve" svg:x1="53.954cm" svg:y1="60.228cm" svg:x2="53.954cm" svg:y2="61.228cm" draw:start-shape="id235" draw:start-glue-point="2" draw:end-shape="id237" draw:end-glue-point="0" svg:d="M53954 60228v1000" svg:viewBox="0 0 1 1001">
          <text:p/>
        </draw:connector>
        <draw:rect draw:style-name="gr292" draw:text-style-name="P35" xml:id="id239" draw:id="id239" draw:layer="layout" svg:width="2.3cm" svg:height="1cm" svg:x="24.504cm" svg:y="72.628cm">
          <text:p text:style-name="P5">Goal</text:p>
        </draw:rect>
        <draw:connector draw:style-name="gr69" draw:text-style-name="P15" draw:layer="layout" draw:type="curve" svg:x1="23.654cm" svg:y1="70.528cm" svg:x2="25.654cm" svg:y2="72.628cm" draw:start-shape="id238" draw:end-shape="id239" draw:end-glue-point="0" svg:d="M23654 70528c0 1575 2000 525 2000 2100" svg:viewBox="0 0 2001 2101">
          <text:p/>
        </draw:connector>
        <draw:rect draw:style-name="gr292" draw:text-style-name="P35" xml:id="id238" draw:id="id238" draw:layer="layout" svg:width="2.3cm" svg:height="1cm" svg:x="22.504cm" svg:y="69.528cm">
          <text:p text:style-name="P5">Normal<text:line-break/>scenario</text:p>
        </draw:rect>
        <draw:rect draw:style-name="gr292" draw:text-style-name="P35" xml:id="id260" draw:id="id260" draw:layer="layout" svg:width="2.3cm" svg:height="1cm" svg:x="27.314cm" svg:y="69.587cm">
          <text:p text:style-name="P5">follow<text:line-break/>scenario</text:p>
        </draw:rect>
        <draw:rect draw:style-name="gr292" draw:text-style-name="P35" xml:id="id240" draw:id="id240" draw:layer="layout" svg:width="2.3cm" svg:height="1cm" svg:x="31.504cm" svg:y="72.528cm">
          <text:p text:style-name="P5">sensors</text:p>
        </draw:rect>
        <draw:connector draw:style-name="gr92" draw:text-style-name="P15" draw:layer="layout" draw:type="curve" svg:x1="23.654cm" svg:y1="70.528cm" svg:x2="32.654cm" svg:y2="72.528cm" draw:start-shape="id238" draw:start-glue-point="2" draw:end-shape="id240" draw:end-glue-point="0" svg:d="M23654 70528c0 1500 9000 500 9000 2000" svg:viewBox="0 0 9001 2001">
          <text:p/>
        </draw:connector>
        <draw:rect draw:style-name="gr292" draw:text-style-name="P35" xml:id="id241" draw:id="id241" draw:layer="layout" svg:width="2.3cm" svg:height="1cm" svg:x="27.504cm" svg:y="74.728cm">
          <text:p text:style-name="P5">Lidar <text:line-break/>ranges</text:p>
        </draw:rect>
        <draw:connector draw:style-name="gr94" draw:text-style-name="P15" draw:layer="layout" draw:type="curve" svg:x1="32.654cm" svg:y1="73.528cm" svg:x2="28.654cm" svg:y2="74.728cm" draw:start-shape="id240" draw:start-glue-point="2" draw:end-shape="id241" svg:d="M32654 73528c0 900-4000 300-4000 1200" svg:viewBox="0 0 4001 1201">
          <text:p/>
        </draw:connector>
        <draw:rect draw:style-name="gr292" draw:text-style-name="P35" xml:id="id242" draw:id="id242" draw:layer="layout" svg:width="2.3cm" svg:height="1cm" svg:x="30.204cm" svg:y="74.728cm">
          <text:p text:style-name="P5">GPS</text:p>
        </draw:rect>
        <draw:connector draw:style-name="gr95" draw:text-style-name="P15" draw:layer="layout" draw:type="curve" svg:x1="32.654cm" svg:y1="73.528cm" svg:x2="31.354cm" svg:y2="74.728cm" draw:start-shape="id240" draw:start-glue-point="2" draw:end-shape="id242" svg:d="M32654 73528c0 900-1300 300-1300 1200" svg:viewBox="0 0 1301 1201">
          <text:p/>
        </draw:connector>
        <draw:rect draw:style-name="gr255" draw:text-style-name="P73" xml:id="id244" draw:id="id244" draw:layer="layout" svg:width="3.154cm" svg:height="1.57cm" svg:x="29.31cm" svg:y="63.161cm">
          <text:p text:style-name="P8"><text:span text:style-name="T29">Even</text:span><text:span text:style-name="T29">t</text:span><text:span text:style-name="T29"><text:line-break/></text:span><text:span text:style-name="T29">speci</text:span><text:span text:style-name="T29">fic</text:span><text:span text:style-name="T29"><text:line-break/></text:span><text:span text:style-name="T29">know</text:span><text:span text:style-name="T29">ledge</text:span></text:p>
        </draw:rect>
        <draw:connector draw:style-name="gr293" draw:text-style-name="P15" draw:layer="layout" draw:type="curve" svg:x1="34.472cm" svg:y1="61.781cm" svg:x2="30.887cm" svg:y2="63.161cm" draw:start-shape="id243" draw:start-glue-point="2" draw:end-shape="id244" draw:end-glue-point="0" svg:d="M34472 61781c0 1035-3585 345-3585 1380" svg:viewBox="0 0 3586 1381">
          <text:p/>
        </draw:connector>
        <draw:rect draw:style-name="gr292" draw:text-style-name="P35" xml:id="id248" draw:id="id248" draw:layer="layout" svg:width="2.3cm" svg:height="1cm" svg:x="29.634cm" svg:y="66.468cm">
          <text:p text:style-name="P5">oldest</text:p>
        </draw:rect>
        <draw:rect draw:style-name="gr292" draw:text-style-name="P35" xml:id="id233" draw:id="id233" draw:layer="layout" svg:width="2.3cm" svg:height="1cm" svg:x="69.904cm" svg:y="57.828cm">
          <text:p text:style-name="P5">Robotic lab</text:p>
        </draw:rect>
        <draw:connector draw:style-name="gr293" draw:text-style-name="P15" draw:layer="layout" draw:type="curve" svg:x1="71.054cm" svg:y1="58.828cm" svg:x2="71.054cm" svg:y2="59.828cm" draw:start-shape="id233" draw:start-glue-point="2" draw:end-shape="id245" draw:end-glue-point="0" svg:d="M71054 58828v1000" svg:viewBox="0 0 1 1001">
          <text:p/>
        </draw:connector>
        <draw:rect draw:style-name="gr292" draw:text-style-name="P35" xml:id="id246" draw:id="id246" draw:layer="layout" svg:width="2.9cm" svg:height="1.2cm" svg:x="67.004cm" svg:y="62.528cm">
          <text:p text:style-name="P5">Architecture</text:p>
        </draw:rect>
        <draw:rect draw:style-name="gr292" draw:text-style-name="P35" xml:id="id247" draw:id="id247" draw:layer="layout" svg:width="2.9cm" svg:height="1.2cm" svg:x="72.304cm" svg:y="62.528cm">
          <text:p text:style-name="P5">Training config</text:p>
        </draw:rect>
        <draw:connector draw:style-name="gr293" draw:text-style-name="P15" draw:layer="layout" draw:type="curve" svg:x1="71.054cm" svg:y1="61.428cm" svg:x2="68.454cm" svg:y2="62.528cm" draw:start-shape="id245" draw:start-glue-point="2" draw:end-shape="id246" svg:d="M71054 61428c0 825-2600 275-2600 1100" svg:viewBox="0 0 2601 1101">
          <text:p/>
        </draw:connector>
        <draw:connector draw:style-name="gr293" draw:text-style-name="P15" draw:layer="layout" draw:type="curve" svg:x1="71.054cm" svg:y1="61.428cm" svg:x2="73.754cm" svg:y2="62.528cm" draw:start-shape="id245" draw:start-glue-point="2" draw:end-shape="id247" draw:end-glue-point="0" svg:d="M71054 61428c0 825 2700 275 2700 1100" svg:viewBox="0 0 2701 1101">
          <text:p/>
        </draw:connector>
        <draw:connector draw:style-name="gr293" draw:text-style-name="P15" draw:layer="layout" draw:type="curve" svg:x1="30.784cm" svg:y1="67.468cm" svg:x2="23.654cm" svg:y2="69.528cm" draw:start-shape="id248" draw:start-glue-point="2" draw:end-shape="id238" draw:end-glue-point="0" svg:d="M30784 67468c0 1545-7130 515-7130 2060" svg:viewBox="0 0 7131 2061">
          <text:p/>
        </draw:connector>
        <draw:rect draw:style-name="gr292" draw:text-style-name="P35" xml:id="id249" draw:id="id249" draw:layer="layout" svg:width="2.3cm" svg:height="1cm" svg:x="21.804cm" svg:y="72.628cm">
          <text:p text:style-name="P5">Actions</text:p>
        </draw:rect>
        <draw:rect draw:style-name="gr292" draw:text-style-name="P35" xml:id="id250" draw:id="id250" draw:layer="layout" svg:width="2.3cm" svg:height="1cm" svg:x="19.004cm" svg:y="72.628cm">
          <text:p text:style-name="P5">Plans</text:p>
        </draw:rect>
        <draw:connector draw:style-name="gr294" draw:text-style-name="P15" draw:layer="layout" draw:type="curve" svg:x1="23.654cm" svg:y1="70.528cm" svg:x2="22.954cm" svg:y2="72.628cm" draw:start-shape="id238" draw:start-glue-point="2" draw:end-shape="id249" draw:end-glue-point="0" svg:d="M23654 70528c0 1575-700 525-700 2100" svg:viewBox="0 0 701 2101">
          <text:p/>
        </draw:connector>
        <draw:connector draw:style-name="gr295" draw:text-style-name="P15" draw:layer="layout" draw:type="curve" svg:x1="23.654cm" svg:y1="70.528cm" svg:x2="20.154cm" svg:y2="72.628cm" draw:start-shape="id238" draw:start-glue-point="2" draw:end-shape="id250" svg:d="M23654 70528c0 1575-3500 525-3500 2100" svg:viewBox="0 0 3501 2101">
          <text:p/>
        </draw:connector>
        <draw:rect draw:style-name="gr254" draw:text-style-name="P33" xml:id="id251" draw:id="id251" draw:layer="layout" svg:width="2.5cm" svg:height="1cm" svg:x="84.808cm" svg:y="53.174cm">
          <text:p text:style-name="P5">action</text:p>
        </draw:rect>
        <draw:connector draw:style-name="gr296" draw:text-style-name="P15" draw:layer="layout" draw:type="curve" svg:x1="69.716cm" svg:y1="45.549cm" svg:x2="86.058cm" svg:y2="53.174cm" draw:start-shape="id203" draw:start-glue-point="2" draw:end-shape="id251" draw:end-glue-point="0" svg:d="M69716 45549c0 5719 16342 1907 16342 7625" svg:viewBox="0 0 16343 7626">
          <text:p/>
        </draw:connector>
        <draw:rect draw:style-name="gr280" draw:text-style-name="P72" xml:id="id252" draw:id="id252" draw:layer="layout" svg:width="2.5cm" svg:height="1cm" svg:x="80.004cm" svg:y="57.328cm">
          <text:p text:style-name="P5">Segregarion</text:p>
        </draw:rect>
        <draw:rect draw:style-name="gr292" draw:text-style-name="P35" xml:id="id253" draw:id="id253" draw:layer="layout" svg:width="2.5cm" svg:height="1cm" svg:x="76.904cm" svg:y="60.528cm">
          <text:p text:style-name="P8"><text:span text:style-name="T27">Auto </text:span><text:span text:style-name="T27"><text:line-break/></text:span><text:span text:style-name="T27">correl</text:span><text:span text:style-name="T27">ation</text:span></text:p>
        </draw:rect>
        <draw:rect draw:style-name="gr292" draw:text-style-name="P35" xml:id="id254" draw:id="id254" draw:layer="layout" svg:width="2.5cm" svg:height="1cm" svg:x="79.871cm" svg:y="60.528cm">
          <text:p text:style-name="P8"><text:span text:style-name="T27">split</text:span></text:p>
        </draw:rect>
        <draw:rect draw:style-name="gr292" draw:text-style-name="P35" xml:id="id255" draw:id="id255" draw:layer="layout" svg:width="2.5cm" svg:height="1cm" svg:x="82.837cm" svg:y="60.528cm">
          <text:p text:style-name="P8"><text:span text:style-name="T27">clust</text:span><text:span text:style-name="T27">ering</text:span></text:p>
        </draw:rect>
        <draw:connector draw:style-name="gr297" draw:text-style-name="P15" draw:layer="layout" draw:type="curve" svg:x1="81.254cm" svg:y1="58.328cm" svg:x2="78.154cm" svg:y2="60.528cm" draw:start-shape="id252" draw:start-glue-point="2" draw:end-shape="id253" draw:end-glue-point="0" svg:d="M81254 58328c0 1650-3100 550-3100 2200" svg:viewBox="0 0 3101 2201">
          <text:p/>
        </draw:connector>
        <draw:connector draw:style-name="gr298" draw:text-style-name="P15" draw:layer="layout" draw:type="curve" svg:x1="81.254cm" svg:y1="58.328cm" svg:x2="81.121cm" svg:y2="60.528cm" draw:start-shape="id252" draw:start-glue-point="2" draw:end-shape="id254" draw:end-glue-point="0" svg:d="M81254 58328c0 1650-133 550-133 2200" svg:viewBox="0 0 134 2201">
          <text:p/>
        </draw:connector>
        <draw:connector draw:style-name="gr299" draw:text-style-name="P15" draw:layer="layout" draw:type="curve" svg:x1="81.254cm" svg:y1="58.328cm" svg:x2="84.087cm" svg:y2="60.528cm" draw:start-shape="id252" draw:start-glue-point="2" draw:end-shape="id255" svg:d="M81254 58328c0 1650 2833 550 2833 2200" svg:viewBox="0 0 2834 2201">
          <text:p/>
        </draw:connector>
        <draw:connector draw:style-name="gr300" draw:text-style-name="P15" draw:layer="layout" draw:type="curve" svg:x1="86.058cm" svg:y1="54.174cm" svg:x2="81.254cm" svg:y2="57.328cm" draw:start-shape="id251" draw:start-glue-point="2" draw:end-shape="id252" draw:end-glue-point="0" svg:d="M86058 54174c0 2365-4804 789-4804 3154" svg:viewBox="0 0 4805 3155">
          <text:p/>
        </draw:connector>
        <draw:rect draw:style-name="gr292" draw:text-style-name="P35" xml:id="id478" draw:id="id478" draw:layer="layout" svg:width="2.5cm" svg:height="1cm" svg:x="85.804cm" svg:y="60.528cm">
          <text:p text:style-name="P8"><text:span text:style-name="T27">Feature</text:span><text:span text:style-name="T27"><text:line-break/></text:span><text:span text:style-name="T27">slice</text:span></text:p>
        </draw:rect>
        <draw:rect draw:style-name="gr292" draw:text-style-name="P35" xml:id="id256" draw:id="id256" draw:layer="layout" svg:width="2.3cm" svg:height="1cm" svg:x="48.472cm" svg:y="59.941cm">
          <text:p text:style-name="P5">Goal<text:line-break/>types</text:p>
        </draw:rect>
        <draw:connector draw:style-name="gr301" draw:text-style-name="P15" draw:layer="layout" draw:type="curve" svg:x1="46.254cm" svg:y1="57.528cm" svg:x2="49.622cm" svg:y2="59.941cm" draw:start-shape="id231" draw:start-glue-point="2" draw:end-shape="id256" draw:end-glue-point="0" svg:d="M46254 57528c0 1810 3368 604 3368 2413" svg:viewBox="0 0 3369 2414">
          <text:p/>
        </draw:connector>
        <draw:rect draw:style-name="gr292" draw:text-style-name="P35" xml:id="id257" draw:id="id257" draw:layer="layout" svg:width="2.3cm" svg:height="1cm" svg:x="48.418cm" svg:y="61.675cm">
          <text:p text:style-name="P5">Suprise<text:line-break/>reduction</text:p>
        </draw:rect>
        <draw:connector draw:style-name="gr302" draw:text-style-name="P15" draw:layer="layout" draw:type="curve" svg:x1="49.622cm" svg:y1="60.941cm" svg:x2="49.568cm" svg:y2="61.675cm" draw:start-shape="id256" draw:start-glue-point="2" draw:end-shape="id257" draw:end-glue-point="0" svg:d="M49622 60941c0 550-54 184-54 734" svg:viewBox="0 0 55 735">
          <text:p/>
        </draw:connector>
        <draw:rect draw:style-name="gr255" draw:text-style-name="P67" xml:id="id258" draw:id="id258" draw:layer="layout" svg:width="3.154cm" svg:height="1.57cm" svg:x="36.695cm" svg:y="63.161cm">
          <text:p text:style-name="P8"><text:span text:style-name="T29">Gener</text:span><text:span text:style-name="T29">al </text:span><text:span text:style-name="T29">event</text:span><text:span text:style-name="T29">s</text:span></text:p>
        </draw:rect>
        <draw:connector draw:style-name="gr303" draw:text-style-name="P15" draw:layer="layout" draw:type="curve" svg:x1="34.472cm" svg:y1="61.781cm" svg:x2="38.272cm" svg:y2="63.161cm" draw:start-shape="id243" draw:start-glue-point="2" draw:end-shape="id258" draw:end-glue-point="0" svg:d="M34472 61781c0 1035 3800 345 3800 1380" svg:viewBox="0 0 3801 1381">
          <text:p/>
        </draw:connector>
        <draw:rect draw:style-name="gr304" draw:text-style-name="P75" xml:id="id259" draw:id="id259" draw:layer="layout" svg:width="3.154cm" svg:height="1.57cm" svg:x="33.003cm" svg:y="63.161cm">
          <text:p text:style-name="P74"><text:span text:style-name="T29">lifetime</text:span></text:p>
        </draw:rect>
        <draw:connector draw:style-name="gr305" draw:text-style-name="P15" draw:layer="layout" draw:type="curve" svg:x1="34.472cm" svg:y1="61.781cm" svg:x2="34.58cm" svg:y2="63.161cm" draw:start-shape="id243" draw:end-shape="id259" draw:end-glue-point="0" svg:d="M34472 61781c0 1035 108 345 108 1380" svg:viewBox="0 0 109 1381">
          <text:p/>
        </draw:connector>
        <draw:connector draw:style-name="gr306" draw:text-style-name="P15" draw:layer="layout" draw:type="curve" svg:x1="30.887cm" svg:y1="64.731cm" svg:x2="30.784cm" svg:y2="66.468cm" draw:start-shape="id244" draw:start-glue-point="2" draw:end-shape="id248" draw:end-glue-point="0" svg:d="M30887 64731c0 1303-103 435-103 1737" svg:viewBox="0 0 104 1738">
          <text:p/>
        </draw:connector>
        <draw:connector draw:style-name="gr307" draw:text-style-name="P15" draw:layer="layout" draw:type="curve" svg:x1="30.784cm" svg:y1="67.468cm" svg:x2="28.464cm" svg:y2="69.587cm" draw:start-shape="id248" draw:start-glue-point="2" draw:end-shape="id260" draw:end-glue-point="0" svg:d="M30784 67468c0 1590-2320 531-2320 2119" svg:viewBox="0 0 2321 2120">
          <text:p/>
        </draw:connector>
        <draw:rect draw:style-name="gr255" draw:text-style-name="P67" xml:id="id243" draw:id="id243" draw:layer="layout" svg:width="3.804cm" svg:height="1cm" svg:x="32.57cm" svg:y="60.781cm">
          <text:p text:style-name="P8"><text:span text:style-name="T29">Autobiographic</text:span></text:p>
        </draw:rect>
        <draw:connector draw:style-name="gr308" draw:text-style-name="P15" draw:layer="layout" draw:type="curve" svg:x1="37.11cm" svg:y1="58.114cm" svg:x2="34.472cm" svg:y2="60.781cm" draw:start-shape="id232" draw:end-shape="id243" draw:end-glue-point="0" svg:d="M37110 58114c0 2001-2638 668-2638 2667" svg:viewBox="0 0 2639 2668">
          <text:p/>
        </draw:connector>
        <draw:rect draw:style-name="gr292" draw:text-style-name="P35" xml:id="id261" draw:id="id261" draw:layer="layout" svg:width="2.138cm" svg:height="1.014cm" svg:x="119.674cm" svg:y="37.646cm">
          <text:p text:style-name="P5">neurons</text:p>
        </draw:rect>
        <draw:rect draw:style-name="gr255" draw:text-style-name="P67" xml:id="id264" draw:id="id264" draw:layer="layout" svg:width="2.411cm" svg:height="0.984cm" svg:x="123.657cm" svg:y="40.623cm">
          <text:p text:style-name="P8"><text:span text:style-name="T29">Sensory</text:span><text:span text:style-name="T29"><text:line-break/></text:span><text:span text:style-name="T29">neurons</text:span></text:p>
        </draw:rect>
        <draw:rect draw:style-name="gr255" draw:text-style-name="P67" xml:id="id263" draw:id="id263" draw:layer="layout" svg:width="2.138cm" svg:height="1.014cm" svg:x="121.158cm" svg:y="40.526cm">
          <text:p text:style-name="P8"><text:span text:style-name="T29">Motor </text:span><text:span text:style-name="T29"><text:line-break/></text:span><text:span text:style-name="T29">neurons</text:span></text:p>
        </draw:rect>
        <draw:rect draw:style-name="gr255" draw:text-style-name="P67" xml:id="id262" draw:id="id262" draw:layer="layout" svg:width="2.138cm" svg:height="1.014cm" svg:x="118.571cm" svg:y="40.55cm">
          <text:p text:style-name="P8"><text:span text:style-name="T29">projecti</text:span><text:span text:style-name="T29">on </text:span><text:span text:style-name="T29"><text:line-break/></text:span><text:span text:style-name="T29">neuron</text:span><text:span text:style-name="T29">s</text:span></text:p>
        </draw:rect>
        <draw:connector draw:style-name="gr309" draw:text-style-name="P46" draw:layer="layout" draw:type="curve" svg:x1="120.743cm" svg:y1="38.66cm" svg:x2="119.64cm" svg:y2="40.55cm" draw:start-shape="id261" draw:start-glue-point="2" draw:end-shape="id262" svg:d="M120743 38660c0 1417-1103 473-1103 1890" svg:viewBox="0 0 1104 1891">
          <text:p/>
        </draw:connector>
        <draw:connector draw:style-name="gr310" draw:text-style-name="P46" draw:layer="layout" draw:type="curve" svg:x1="120.743cm" svg:y1="38.66cm" svg:x2="122.227cm" svg:y2="40.526cm" draw:start-shape="id261" draw:start-glue-point="2" draw:end-shape="id263" draw:end-glue-point="0" svg:d="M120743 38660c0 1399 1484 467 1484 1866" svg:viewBox="0 0 1485 1867">
          <text:p/>
        </draw:connector>
        <draw:connector draw:style-name="gr311" draw:text-style-name="P46" draw:layer="layout" draw:type="curve" svg:x1="120.743cm" svg:y1="38.66cm" svg:x2="124.862cm" svg:y2="40.623cm" draw:start-shape="id261" draw:start-glue-point="2" draw:end-shape="id264" draw:end-glue-point="0" svg:d="M120743 38660c0 1473 4119 492 4119 1963" svg:viewBox="0 0 4120 1964">
          <text:p/>
        </draw:connector>
        <draw:rect draw:style-name="gr255" draw:text-style-name="P67" xml:id="id265" draw:id="id265" draw:layer="layout" svg:width="2.51cm" svg:height="1.014cm" svg:x="115.804cm" svg:y="40.53cm">
          <text:p text:style-name="P8"><text:span text:style-name="T29">Inter-neuron </text:span><text:span text:style-name="T29"><text:line-break/></text:span><text:span text:style-name="T29">neurons</text:span></text:p>
        </draw:rect>
        <draw:connector draw:style-name="gr312" draw:text-style-name="P46" draw:layer="layout" draw:type="curve" svg:x1="120.743cm" svg:y1="38.66cm" svg:x2="117.059cm" svg:y2="40.53cm" draw:start-shape="id261" draw:start-glue-point="2" draw:end-shape="id265" draw:end-glue-point="0" svg:d="M120743 38660c0 1402-3684 468-3684 1870" svg:viewBox="0 0 3685 1871">
          <text:p/>
        </draw:connector>
        <draw:rect draw:style-name="gr255" draw:text-style-name="P67" xml:id="id323" draw:id="id323" draw:layer="layout" svg:width="2.4cm" svg:height="1cm" svg:x="111.805cm" svg:y="32.625cm">
          <text:p text:style-name="P8"><text:span text:style-name="T29">awar</text:span><text:span text:style-name="T29">enes</text:span><text:span text:style-name="T29">s</text:span></text:p>
        </draw:rect>
        <draw:rect draw:style-name="gr255" draw:text-style-name="P77" xml:id="id267" draw:id="id267" draw:layer="layout" svg:width="2.962cm" svg:height="1cm" svg:x="111.461cm" svg:y="30.205cm">
          <text:p text:style-name="P76"><text:span text:style-name="T29">Consciousness</text:span></text:p>
        </draw:rect>
        <draw:connector draw:style-name="gr313" draw:text-style-name="P15" draw:layer="layout" draw:type="curve" svg:x1="115.171cm" svg:y1="28.951cm" svg:x2="112.942cm" svg:y2="30.205cm" draw:start-shape="id266" draw:start-glue-point="2" draw:end-shape="id267" draw:end-glue-point="0" svg:d="M115171 28951c0 314-557 627-1115 627-557 0-1114 314-1114 627" svg:viewBox="0 0 2230 1255">
          <text:p/>
        </draw:connector>
        <draw:rect draw:style-name="gr255" draw:text-style-name="P77" xml:id="id268" draw:id="id268" draw:layer="layout" svg:width="3.448cm" svg:height="1cm" svg:x="115.797cm" svg:y="30.671cm">
          <text:p text:style-name="P76"><text:span text:style-name="T29">unconscious</text:span><text:span text:style-name="T29">ness</text:span></text:p>
        </draw:rect>
        <draw:connector draw:style-name="gr314" draw:text-style-name="P15" draw:layer="layout" draw:type="curve" svg:x1="115.171cm" svg:y1="28.951cm" svg:x2="117.521cm" svg:y2="30.671cm" draw:start-shape="id266" draw:start-glue-point="2" draw:end-shape="id268" draw:end-glue-point="0" svg:d="M115171 28951c0 1290 2350 430 2350 1720" svg:viewBox="0 0 2351 1721">
          <text:p/>
        </draw:connector>
        <draw:rect draw:style-name="gr255" draw:text-style-name="P67" xml:id="id269" draw:id="id269" draw:layer="layout" svg:width="2.4cm" svg:height="1cm" svg:x="101.7cm" svg:y="39.065cm">
          <text:p text:style-name="P8"><text:span text:style-name="T29">Self-</text:span><text:span text:style-name="T29"><text:line-break/></text:span><text:span text:style-name="T29">awar</text:span><text:span text:style-name="T29">enes</text:span><text:span text:style-name="T29">s</text:span></text:p>
        </draw:rect>
        <draw:connector draw:style-name="gr315" draw:text-style-name="P15" draw:layer="layout" draw:type="curve" svg:x1="102.857cm" svg:y1="38.365cm" svg:x2="102.9cm" svg:y2="39.065cm" draw:start-shape="id213" draw:start-glue-point="2" draw:end-shape="id269" draw:end-glue-point="0" svg:d="M102857 38365c0 525 43 175 43 700" svg:viewBox="0 0 44 701">
          <text:p/>
        </draw:connector>
        <draw:rect draw:style-name="gr41" draw:text-style-name="P5" xml:id="id270" draw:id="id270" draw:layer="layout" svg:width="2.143cm" svg:height="1.085cm" svg:x="101.829cm" svg:y="40.952cm">
          <text:p text:style-name="P5">Body<text:line-break/>awareness</text:p>
        </draw:rect>
        <draw:connector draw:style-name="gr316" draw:text-style-name="P15" draw:layer="layout" draw:type="curve" svg:x1="102.9cm" svg:y1="40.065cm" svg:x2="102.9cm" svg:y2="40.952cm" draw:start-shape="id269" draw:start-glue-point="2" draw:end-shape="id270" draw:end-glue-point="0" svg:d="M102900 40065v887" svg:viewBox="0 0 1 888">
          <text:p/>
        </draw:connector>
        <draw:custom-shape draw:style-name="gr317" draw:text-style-name="P68" xml:id="id272" draw:id="id272" draw:layer="layout" svg:width="2.971cm" svg:height="1.583cm" svg:x="102.064cm" svg:y="34.5cm">
          <text:p text:style-name="P17"><text:span text:style-name="T4">The highest level of</text:span><text:span text:style-name="T4"><text:line-break/></text:span><text:span text:style-name="T4">self-awareness</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55" draw:text-style-name="P67" xml:id="id266" draw:id="id266" draw:layer="layout" svg:width="2.4cm" svg:height="1cm" svg:x="113.971cm" svg:y="27.951cm">
          <text:p text:style-name="P8"><text:span text:style-name="T29">Psyche</text:span></text:p>
        </draw:rect>
        <draw:connector draw:style-name="gr318" draw:text-style-name="P15" draw:layer="layout" draw:type="curve" svg:x1="110.471cm" svg:y1="27.075cm" svg:x2="115.171cm" svg:y2="27.951cm" draw:start-shape="id187" draw:start-glue-point="2" draw:end-shape="id266" draw:end-glue-point="0" svg:d="M110471 27075c0 251 624 501 1248 501 623 0 1247-32 1247-63 0-32 551-63 1103-63 551 0 1102 251 1102 501" svg:viewBox="0 0 4701 877">
          <text:p/>
        </draw:connector>
        <draw:rect draw:style-name="gr255" draw:text-style-name="P67" xml:id="id271" draw:id="id271" draw:layer="layout" svg:width="2.4cm" svg:height="1.412cm" svg:x="102.126cm" svg:y="29.926cm">
          <text:p text:style-name="P8"><text:span text:style-name="T29">Co</text:span><text:span text:style-name="T29">gni</text:span><text:span text:style-name="T29">tio</text:span><text:span text:style-name="T29">n</text:span></text:p>
        </draw:rect>
        <draw:connector draw:style-name="gr319" draw:text-style-name="P15" draw:layer="layout" draw:type="curve" svg:x1="103.326cm" svg:y1="31.338cm" svg:x2="106.992cm" svg:y2="34.46cm" draw:start-shape="id271" draw:start-glue-point="2" draw:end-shape="id212" draw:end-glue-point="0" svg:d="M103326 31338c0 2341 3666 781 3666 3122" svg:viewBox="0 0 3667 3123">
          <text:p/>
        </draw:connector>
        <draw:connector draw:style-name="gr320" draw:text-style-name="P15" draw:layer="layout" draw:type="curve" svg:x1="103.326cm" svg:y1="31.338cm" svg:x2="92.83cm" svg:y2="35.148cm" draw:start-shape="id271" draw:start-glue-point="2" draw:end-shape="id211" draw:end-glue-point="0" svg:d="M103326 31338c0 2857-10496 953-10496 3810" svg:viewBox="0 0 10497 3811">
          <text:p/>
        </draw:connector>
        <draw:connector draw:style-name="gr321" draw:text-style-name="P15" draw:layer="layout" draw:type="curve" svg:x1="110.471cm" svg:y1="27.075cm" svg:x2="103.326cm" svg:y2="29.926cm" draw:start-shape="id187" draw:start-glue-point="2" draw:end-shape="id271" draw:end-glue-point="0" svg:d="M110471 27075c0 2139-7145 714-7145 2851" svg:viewBox="0 0 7146 2852">
          <text:p/>
        </draw:connector>
        <draw:connector draw:style-name="gr284" draw:text-style-name="P15" draw:layer="layout" draw:type="curve" svg:x1="102.857cm" svg:y1="37.365cm" svg:x2="103.55cm" svg:y2="36.083cm" draw:start-shape="id213" draw:end-shape="id272" draw:end-glue-point="6" svg:d="M102857 37365c0-961 693-321 693-1282" svg:viewBox="0 0 694 1283">
          <text:p/>
        </draw:connector>
        <draw:rect draw:style-name="gr255" draw:text-style-name="P71" xml:id="id273" draw:id="id273" draw:layer="layout" svg:width="2.4cm" svg:height="1cm" svg:x="104.817cm" svg:y="37.308cm">
          <text:p text:style-name="P3"><text:span text:style-name="T29">Self-</text:span><text:span text:style-name="T29"><text:line-break/></text:span><text:span text:style-name="T29">monit</text:span><text:span text:style-name="T29">oring</text:span></text:p>
        </draw:rect>
        <draw:rect draw:style-name="gr255" draw:text-style-name="P77" xml:id="id274" draw:id="id274" draw:layer="layout" svg:width="2.4cm" svg:height="1cm" svg:x="107.733cm" svg:y="37.27cm">
          <text:p text:style-name="P78"><text:span text:style-name="T29">Self-</text:span><text:span text:style-name="T29"><text:line-break/></text:span><text:span text:style-name="T29">evaluation</text:span></text:p>
        </draw:rect>
        <draw:rect draw:style-name="gr255" draw:text-style-name="P71" xml:id="id275" draw:id="id275" draw:layer="layout" svg:width="2.4cm" svg:height="1cm" svg:x="110.65cm" svg:y="37.27cm">
          <text:p text:style-name="P3"><text:span text:style-name="T29">Sel</text:span><text:span text:style-name="T29">f-</text:span><text:span text:style-name="T29"><text:line-break/></text:span><text:span text:style-name="T29">reg</text:span><text:span text:style-name="T29">ula</text:span><text:span text:style-name="T29">tio</text:span><text:span text:style-name="T29">n</text:span></text:p>
        </draw:rect>
        <draw:connector draw:style-name="gr322" draw:text-style-name="P15" draw:layer="layout" draw:type="curve" svg:x1="106.992cm" svg:y1="35.872cm" svg:x2="106.017cm" svg:y2="37.308cm" draw:start-shape="id212" draw:start-glue-point="2" draw:end-shape="id273" draw:end-glue-point="0" svg:d="M106992 35872c0 1077-975 359-975 1436" svg:viewBox="0 0 976 1437">
          <text:p/>
        </draw:connector>
        <draw:connector draw:style-name="gr323" draw:text-style-name="P15" draw:layer="layout" draw:type="curve" svg:x1="106.992cm" svg:y1="35.872cm" svg:x2="108.933cm" svg:y2="37.27cm" draw:start-shape="id212" draw:start-glue-point="2" draw:end-shape="id274" draw:end-glue-point="0" svg:d="M106992 35872c0 1048 1941 350 1941 1398" svg:viewBox="0 0 1942 1399">
          <text:p/>
        </draw:connector>
        <draw:connector draw:style-name="gr324" draw:text-style-name="P15" draw:layer="layout" draw:type="curve" svg:x1="106.992cm" svg:y1="35.872cm" svg:x2="111.85cm" svg:y2="37.27cm" draw:start-shape="id212" draw:start-glue-point="2" draw:end-shape="id275" draw:end-glue-point="0" svg:d="M106992 35872c0 1048 4858 350 4858 1398" svg:viewBox="0 0 4859 1399">
          <text:p/>
        </draw:connector>
        <draw:connector draw:style-name="gr325" draw:text-style-name="P15" draw:layer="layout" draw:type="curve" svg:x1="122.751cm" svg:y1="35.691cm" svg:x2="120.743cm" svg:y2="37.646cm" draw:start-shape="id276" draw:start-glue-point="2" draw:end-shape="id261" draw:end-glue-point="0" svg:d="M122751 35691c0 1467-2008 490-2008 1955" svg:viewBox="0 0 2009 1956">
          <text:p/>
        </draw:connector>
        <draw:rect draw:style-name="gr292" draw:text-style-name="P35" xml:id="id277" draw:id="id277" draw:layer="layout" svg:width="2.138cm" svg:height="1.014cm" svg:x="123.702cm" svg:y="37.693cm">
          <text:p text:style-name="P5">Nerve</text:p>
        </draw:rect>
        <draw:connector draw:style-name="gr326" draw:text-style-name="P15" draw:layer="layout" draw:type="curve" svg:x1="122.751cm" svg:y1="35.691cm" svg:x2="124.771cm" svg:y2="37.693cm" draw:start-shape="id276" draw:start-glue-point="2" draw:end-shape="id277" draw:end-glue-point="0" svg:d="M122751 35691c0 1501 2020 501 2020 2002" svg:viewBox="0 0 2021 2003">
          <text:p/>
        </draw:connector>
        <draw:rect draw:style-name="gr254" draw:text-style-name="P33" xml:id="id276" draw:id="id276" draw:layer="layout" svg:width="2.411cm" svg:height="0.984cm" svg:x="121.546cm" svg:y="34.707cm">
          <text:p text:style-name="P5">shared</text:p>
        </draw:rect>
        <draw:connector draw:style-name="gr327" draw:text-style-name="P15" draw:layer="layout" draw:type="curve" svg:x1="137.15cm" svg:y1="30.109cm" svg:x2="122.751cm" svg:y2="34.707cm" draw:start-shape="id190" draw:start-glue-point="2" draw:end-shape="id276" draw:end-glue-point="0" svg:d="M137150 30109c0 3448-14399 1150-14399 4598" svg:viewBox="0 0 14400 4599">
          <text:p/>
        </draw:connector>
        <draw:g draw:style-name="gr31">
          <draw:frame draw:style-name="gr328" draw:text-style-name="P79" draw:layer="layout" svg:width="2.753cm" svg:height="1.947cm" svg:x="-103.881cm" svg:y="74.399cm">
            <draw:image xlink:href="Pictures/100000010000032000000236D36E8DB6.png" xlink:type="simple" xlink:show="embed" xlink:actuate="onLoad" draw:mime-type="image/png">
              <text:p/>
            </draw:image>
          </draw:frame>
          <draw:frame draw:style-name="gr328" draw:text-style-name="P79" draw:layer="layout" svg:width="2.753cm" svg:height="1.948cm" svg:x="-103.881cm" svg:y="67.807cm">
            <draw:image xlink:href="Pictures/100000010000032000000236D36E8DB6.png" xlink:type="simple" xlink:show="embed" xlink:actuate="onLoad" draw:mime-type="image/png">
              <text:p/>
            </draw:image>
          </draw:frame>
          <draw:connector draw:style-name="gr329" draw:text-style-name="P79" draw:layer="layout" draw:type="line" svg:x1="-101.046cm" svg:y1="68.701cm" svg:x2="-98.561cm" svg:y2="68.713cm" svg:d="M-101046 68701l2485 12" svg:viewBox="0 0 2486 13">
            <text:p/>
          </draw:connector>
          <draw:connector draw:style-name="gr329" draw:text-style-name="P79" draw:layer="layout" draw:type="line" svg:x1="-101.056cm" svg:y1="75.29cm" svg:x2="-98.571cm" svg:y2="75.3cm" svg:d="M-101056 75290l2485 10" svg:viewBox="0 0 2486 11">
            <text:p/>
          </draw:connector>
          <draw:custom-shape draw:style-name="gr330" draw:text-style-name="P80" xml:id="id278" draw:id="id278" draw:layer="layout" svg:width="3.133cm" svg:height="7.97cm" svg:x="-98.283cm" svg:y="67.982cm">
            <text:p/>
            <draw:enhanced-geometry svg:viewBox="0 0 21600 21600" draw:mirror-horizontal="false" draw:mirror-vertical="false" draw:type="rectangle" draw:enhanced-path="M 0 0 L 21600 0 21600 21600 0 21600 0 0 Z N"/>
          </draw:custom-shape>
          <draw:frame draw:style-name="gr331" draw:text-style-name="P81" draw:layer="layout" svg:width="4.719cm" svg:height="3.139cm" draw:transform="rotate (1.5707963267949) translate (-102.479cm 74.219cm)">
            <draw:text-box>
              <text:p text:style-name="P3"><text:span text:style-name="T30">Ext</text:span><text:span text:style-name="T30">ero</text:span><text:span text:style-name="T30">cep</text:span><text:span text:style-name="T30">tive </text:span></text:p>
              <text:p text:style-name="P3"><text:span text:style-name="T30">and </text:span></text:p>
              <text:p text:style-name="P3"><text:span text:style-name="T30">pro</text:span><text:span text:style-name="T30">prio</text:span><text:span text:style-name="T30">cep</text:span><text:span text:style-name="T30">tive </text:span></text:p>
              <text:p text:style-name="P3"><text:span text:style-name="T30">dat</text:span><text:span text:style-name="T30">a</text:span></text:p>
            </draw:text-box>
          </draw:frame>
          <draw:custom-shape draw:style-name="gr332" draw:text-style-name="P82" xml:id="id279" draw:id="id279" draw:layer="layout" svg:width="0.402cm" svg:height="0.41cm" svg:x="-93.325cm" svg:y="71.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9" draw:text-style-name="P79" draw:layer="layout" draw:type="line" svg:x1="-95.15cm" svg:y1="71.967cm" svg:x2="-93.325cm" svg:y2="72.02cm" draw:start-shape="id278" draw:start-glue-point="1" draw:end-shape="id279" draw:end-glue-point="6" svg:d="M-95150 71967l1825 53" svg:viewBox="0 0 1826 54">
            <text:p/>
          </draw:connector>
          <draw:custom-shape draw:style-name="gr332" draw:text-style-name="P82" xml:id="id280" draw:id="id280" draw:layer="layout" svg:width="0.403cm" svg:height="0.41cm" svg:x="-92.374cm" svg:y="69.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3" draw:text-style-name="P82" xml:id="id282" draw:id="id282" draw:layer="layout" svg:width="0.404cm" svg:height="0.411cm" svg:x="-92.38cm" svg:y="7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9" draw:text-style-name="P79" draw:layer="layout" draw:type="line" svg:x1="-92.923cm" svg:y1="72.02cm" svg:x2="-92.172cm" svg:y2="69.475cm" draw:start-shape="id279" draw:start-glue-point="10" draw:end-shape="id280" draw:end-glue-point="8" svg:d="M-92923 72020l751-2545" svg:viewBox="0 0 752 2546">
            <text:p/>
          </draw:connector>
          <draw:custom-shape draw:style-name="gr334" draw:text-style-name="P83" xml:id="id281" draw:id="id281" draw:layer="layout" svg:width="3.136cm" svg:height="9.084cm" draw:transform="rotate (1.5707963267949) translate (-89.265cm 68.383cm)">
            <text:p/>
            <draw:enhanced-geometry svg:viewBox="0 0 21600 21600" draw:mirror-horizontal="false" draw:mirror-vertical="false" draw:type="rectangle" draw:enhanced-path="M 0 0 L 21600 0 21600 21600 0 21600 0 0 Z N"/>
          </draw:custom-shape>
          <draw:frame draw:style-name="gr335" draw:text-style-name="P84" draw:layer="layout" svg:width="5.423cm" svg:height="1.697cm" svg:x="-87.435cm" svg:y="66.065cm">
            <draw:text-box>
              <text:p text:style-name="P5"><text:span text:style-name="T31">Clu</text:span><text:span text:style-name="T31">ste</text:span><text:span text:style-name="T31">rin</text:span><text:span text:style-name="T31">g </text:span></text:p>
              <text:p text:style-name="P5"><text:span text:style-name="T31">abs</text:span><text:span text:style-name="T31">tra</text:span><text:span text:style-name="T31">cti</text:span><text:span text:style-name="T31">on</text:span></text:p>
            </draw:text-box>
          </draw:frame>
          <draw:frame draw:style-name="gr336" draw:text-style-name="P84" draw:layer="layout" svg:width="3.515cm" svg:height="1.696cm" draw:transform="rotate (1.5707963267949) translate (-78.895cm 72.031cm)">
            <draw:text-box>
              <text:p text:style-name="P5"><text:span text:style-name="T31">Offl</text:span><text:span text:style-name="T31">ine </text:span></text:p>
              <text:p text:style-name="P5"><text:span text:style-name="T31">lea</text:span><text:span text:style-name="T31">rni</text:span><text:span text:style-name="T31">ng</text:span></text:p>
            </draw:text-box>
          </draw:frame>
          <draw:custom-shape draw:style-name="gr337" draw:text-style-name="P83" draw:layer="layout" svg:width="6.582cm" svg:height="9.084cm" draw:transform="rotate (1.5707963267949) translate (-89.265cm 75.297cm)">
            <text:p/>
            <draw:enhanced-geometry svg:viewBox="0 0 21600 21600" draw:mirror-horizontal="false" draw:mirror-vertical="false" draw:type="rectangle" draw:enhanced-path="M 0 0 L 21600 0 21600 21600 0 21600 0 0 Z N"/>
          </draw:custom-shape>
          <draw:custom-shape draw:style-name="gr334" draw:text-style-name="P83" xml:id="id283" draw:id="id283" draw:layer="layout" svg:width="3.136cm" svg:height="9.084cm" draw:transform="rotate (1.5707963267949) translate (-89.265cm 78.675cm)">
            <draw:glue-point draw:id="4" svg:x="-5cm" svg:y="3.517cm"/>
            <text:p/>
            <draw:enhanced-geometry svg:viewBox="0 0 21600 21600" draw:mirror-horizontal="false" draw:mirror-vertical="false" draw:type="rectangle" draw:enhanced-path="M 0 0 L 21600 0 21600 21600 0 21600 0 0 Z N"/>
          </draw:custom-shape>
          <draw:custom-shape draw:style-name="gr338" draw:text-style-name="P85" draw:layer="layout" svg:width="4.888cm" svg:height="3.906cm" draw:transform="rotate (1.5707963267949) translate (-88.839cm 74.406cm)">
            <text:p/>
            <draw:enhanced-geometry svg:viewBox="0 0 21600 21600" draw:mirror-horizontal="false" draw:mirror-vertical="false" draw:type="rectangle" draw:enhanced-path="M 0 0 L 21600 0 21600 21600 0 21600 0 0 Z N"/>
          </draw:custom-shape>
          <draw:custom-shape draw:style-name="gr339" draw:text-style-name="P85" draw:layer="layout" svg:width="4.918cm" svg:height="3.857cm" draw:transform="rotate (1.5707963267949) translate (-84.475cm 74.437cm)">
            <text:p/>
            <draw:enhanced-geometry svg:viewBox="0 0 21600 21600" draw:mirror-horizontal="false" draw:mirror-vertical="false" draw:type="rectangle" draw:enhanced-path="M 0 0 L 21600 0 21600 21600 0 21600 0 0 Z N"/>
          </draw:custom-shape>
          <draw:connector draw:style-name="gr340" draw:text-style-name="P79" draw:layer="layout" svg:x1="-92.172cm" svg:y1="69.065cm" svg:x2="-89.265cm" svg:y2="66.815cm" draw:start-shape="id280" draw:start-glue-point="4" draw:end-shape="id281" draw:end-glue-point="0" svg:d="M-92172 69065v-2250h2907" svg:viewBox="0 0 2908 2251">
            <text:p/>
          </draw:connector>
          <draw:connector draw:style-name="gr340" draw:text-style-name="P79" draw:layer="layout" svg:x1="-92.178cm" svg:y1="74.897cm" svg:x2="-89.265cm" svg:y2="77.107cm" draw:start-shape="id282" draw:start-glue-point="8" draw:end-shape="id283" draw:end-glue-point="0" svg:d="M-92178 74897v2210h2913" svg:viewBox="0 0 2914 2211">
            <text:p/>
          </draw:connector>
          <draw:frame draw:style-name="gr336" draw:text-style-name="P84" draw:layer="layout" svg:width="5.422cm" svg:height="1.696cm" svg:x="-87.433cm" svg:y="76.42cm">
            <draw:text-box>
              <text:p text:style-name="P5"><text:span text:style-name="T31">Ab</text:span><text:span text:style-name="T31">nor</text:span><text:span text:style-name="T31">mal</text:span><text:span text:style-name="T31">ity</text:span></text:p>
              <text:p text:style-name="P5"><text:span text:style-name="T31">det</text:span><text:span text:style-name="T31">ecti</text:span><text:span text:style-name="T31">on</text:span></text:p>
            </draw:text-box>
          </draw:frame>
          <draw:frame draw:style-name="gr341" draw:text-style-name="P84" draw:layer="layout" svg:width="4.203cm" svg:height="2.417cm" draw:transform="rotate (1.5707963267949) translate (-79.09cm 79.256cm)">
            <draw:text-box>
              <text:p text:style-name="P5"><text:span text:style-name="T31">Onl</text:span><text:span text:style-name="T31">ine</text:span></text:p>
              <text:p text:style-name="P5"><text:span text:style-name="T31">inf</text:span><text:span text:style-name="T31">ere</text:span><text:span text:style-name="T31">nce</text:span></text:p>
            </draw:text-box>
          </draw:frame>
          <draw:custom-shape draw:style-name="gr342" draw:text-style-name="P79" draw:layer="layout" svg:width="0.992cm" svg:height="8.597cm" svg:x="-79.946cm" svg:y="65.90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335" draw:text-style-name="P86" draw:layer="layout" svg:width="6.047cm" svg:height="1.697cm" draw:transform="rotate (1.5707963267949) translate (-87.207cm 75.046cm)">
            <draw:text-box>
              <text:p text:style-name="P5"><text:span text:style-name="T31">Pro</text:span><text:span text:style-name="T31">pri</text:span><text:span text:style-name="T31">oce</text:span><text:span text:style-name="T31">pti</text:span><text:span text:style-name="T31">ve </text:span><text:span text:style-name="T31">DB</text:span><text:span text:style-name="T31">N</text:span></text:p>
            </draw:text-box>
          </draw:frame>
          <draw:frame draw:style-name="gr336" draw:text-style-name="P86" draw:layer="layout" svg:width="6.047cm" svg:height="1.696cm" draw:transform="rotate (1.5707963267949) translate (-83.337cm 75.046cm)">
            <draw:text-box>
              <text:p text:style-name="P5"><text:span text:style-name="T31">Ext</text:span><text:span text:style-name="T31">ero</text:span><text:span text:style-name="T31">cep</text:span><text:span text:style-name="T31">tive </text:span></text:p>
              <text:p text:style-name="P5"><text:span text:style-name="T31">DB</text:span><text:span text:style-name="T31">N</text:span></text:p>
            </draw:text-box>
          </draw:frame>
          <draw:connector draw:style-name="gr343" draw:text-style-name="P79" draw:layer="layout" draw:type="line" svg:x1="-86.991cm" svg:y1="67.564cm" svg:x2="-86.96cm" svg:y2="69.289cm" svg:d="M-86991 67564l31 1725" svg:viewBox="0 0 32 1726">
            <text:p/>
          </draw:connector>
          <draw:connector draw:style-name="gr343" draw:text-style-name="P79" draw:layer="layout" draw:type="line" svg:x1="-82.745cm" svg:y1="67.553cm" svg:x2="-82.713cm" svg:y2="69.28cm" svg:d="M-82745 67553l32 1727" svg:viewBox="0 0 33 1728">
            <text:p/>
          </draw:connector>
          <draw:connector draw:style-name="gr343" draw:text-style-name="P79" draw:layer="layout" draw:type="line" svg:x1="-86.672cm" svg:y1="74.463cm" svg:x2="-86.641cm" svg:y2="76.188cm" svg:d="M-86672 74463l31 1725" svg:viewBox="0 0 32 1726">
            <text:p/>
          </draw:connector>
          <draw:connector draw:style-name="gr343" draw:text-style-name="P79" draw:layer="layout" draw:type="line" svg:x1="-82.424cm" svg:y1="74.453cm" svg:x2="-82.395cm" svg:y2="76.178cm" svg:d="M-82424 74453l29 1725" svg:viewBox="0 0 30 1726">
            <text:p/>
          </draw:connector>
          <draw:connector draw:style-name="gr344" draw:text-style-name="P87" draw:layer="layout" svg:x1="-89.265cm" svg:y1="78.209cm" svg:x2="-92.982cm" svg:y2="72.165cm" draw:start-shape="id283" draw:start-glue-point="4" draw:end-shape="id279" draw:end-glue-point="9" svg:d="M-89265 78209h-1828v-6044h-1889" svg:viewBox="0 0 3718 6045">
            <text:p/>
          </draw:connector>
          <draw:frame draw:style-name="gr345" draw:text-style-name="P88" draw:layer="layout" svg:width="4.985cm" svg:height="1.593cm" draw:transform="rotate (1.5707963267949) translate (-97.297cm 74.331cm)">
            <draw:text-box>
              <text:p><text:span text:style-name="T31">Pre</text:span><text:span text:style-name="T31">pro</text:span><text:span text:style-name="T31">ces</text:span><text:span text:style-name="T31">sin</text:span><text:span text:style-name="T31">g</text:span></text:p>
            </draw:text-box>
          </draw:frame>
          <draw:frame draw:style-name="gr346" draw:text-style-name="P89" draw:layer="layout" svg:width="3.073cm" svg:height="2.168cm" svg:x="-92.954cm" svg:y="71.578cm">
            <draw:text-box>
              <text:p><text:span text:style-name="T32">Creat</text:span><text:span text:style-name="T32">e/</text:span><text:span text:style-name="T32">updat</text:span><text:span text:style-name="T32">e</text:span><text:span text:style-name="T32"><text:line-break/></text:span><text:span text:style-name="T32">mode</text:span><text:span text:style-name="T32">ls</text:span></text:p>
            </draw:text-box>
          </draw:frame>
        </draw:g>
        <draw:g draw:style-name="gr31">
          <draw:custom-shape draw:style-name="gr347" draw:text-style-name="P90" draw:layer="layout" svg:width="8.554cm" svg:height="8.182cm" svg:x="-106.972cm" svg:y="79.403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185cm" svg:height="0.184cm" draw:transform="rotate (1.5707963267949) translate (-104.309cm 81.5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3cm" svg:height="0.184cm" draw:transform="rotate (1.5707963267949) translate (-104.309cm 80.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41" draw:layer="layout" svg:width="4.383cm" svg:height="4.018cm" svg:x="-104.91cm" svg:y="81.454cm">
            <text:p/>
            <draw:enhanced-geometry svg:viewBox="0 0 21600 21600" draw:mirror-horizontal="false" draw:mirror-vertical="false" draw:type="rectangle" draw:enhanced-path="M 0 0 L 21600 0 21600 21600 0 21600 0 0 Z N"/>
          </draw:custom-shape>
          <draw:custom-shape draw:style-name="gr351" draw:text-style-name="P41" draw:layer="layout" svg:width="7.154cm" svg:height="6.761cm" svg:x="-106.301cm" svg:y="80.09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255cm" svg:height="0.248cm" svg:x="-99.265cm" svg:y="83.496cm" svg:viewBox="0 0 256 249" draw:points="0,41 38,4 126,92 218,0 256,37 163,130 245,210 206,249 126,168 47,245 11,206 88,130">
                <draw:glue-point draw:id="4" svg:x="-0.04cm" svg:y="0.329cm"/>
                <text:p/>
              </draw:polygon>
              <draw:custom-shape draw:style-name="gr353" draw:text-style-name="P5" draw:layer="layout" svg:width="0.193cm" svg:height="0.192cm" svg:x="-99.359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5cm" svg:height="0.192cm" svg:x="-99.12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5cm" svg:height="0.194cm" svg:x="-99.12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193cm" svg:height="0.194cm" svg:x="-99.359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255cm" svg:height="0.248cm" svg:x="-100.65cm" svg:y="83.496cm" svg:viewBox="0 0 256 249" draw:points="0,41 38,4 126,92 218,0 256,37 163,130 245,210 206,249 126,168 47,245 11,206 88,130">
                <draw:glue-point draw:id="4" svg:x="-0.04cm" svg:y="0.329cm"/>
                <text:p/>
              </draw:polygon>
              <draw:custom-shape draw:style-name="gr355" draw:text-style-name="P93" draw:layer="layout" svg:width="0.194cm" svg:height="0.192cm" svg:x="-100.74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2cm" svg:x="-100.50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4cm" svg:x="-100.50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194cm" svg:height="0.194cm" svg:x="-100.74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183cm" svg:height="0.182cm" svg:x="-100.623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5cm" svg:height="0.182cm" svg:x="-99.238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182cm" svg:height="0.185cm" draw:transform="rotate (-3.14159265358979) translate (-104.818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4cm" svg:height="0.185cm" draw:transform="rotate (-3.14159265358979) translate (-106.202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184cm" svg:height="0.185cm" draw:transform="skewX (-0.00541052068118242) rotate (-1.57882484135407) translate (-101.471cm 85.3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184cm" svg:height="0.184cm" draw:transform="skewX (-0.00541052068118242) rotate (-1.57882484135407) translate (-101.483cm 86.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56" draw:text-style-name="P94" draw:layer="layout" svg:width="8.489cm" svg:height="4.973cm" svg:x="-116.847cm" svg:y="67.578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7" draw:text-style-name="P95" draw:layer="layout" svg:width="8.459cm" svg:height="4.802cm" svg:x="-116.847cm" svg:y="73.985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8" draw:text-style-name="P96" xml:id="id284" draw:id="id284" draw:layer="layout" svg:width="1.015cm" svg:height="0.904cm" svg:x="-115.863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85" draw:id="id285" draw:layer="layout" svg:width="1.015cm" svg:height="0.907cm" svg:x="-115.863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86" draw:id="id286" draw:layer="layout" svg:width="1.015cm" svg:height="0.907cm" svg:x="-115.863cm" svg:y="77.6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5.355cm" svg:y1="75.144cm" svg:x2="-115.355cm" svg:y2="75.931cm" draw:start-shape="id284" draw:start-glue-point="8" draw:end-shape="id285" draw:end-glue-point="0" svg:d="M-115355 75144v787" svg:viewBox="0 0 1 788">
            <text:p/>
          </draw:connector>
          <draw:connector draw:style-name="gr360" draw:text-style-name="P97" draw:layer="layout" draw:type="line" svg:x1="-115.355cm" svg:y1="76.838cm" svg:x2="-115.355cm" svg:y2="77.647cm" draw:start-shape="id285" draw:start-glue-point="8" draw:end-shape="id286" draw:end-glue-point="4" svg:d="M-115355 76838v809" svg:viewBox="0 0 1 810">
            <text:p/>
          </draw:connector>
          <draw:custom-shape draw:style-name="gr361" draw:text-style-name="P96" xml:id="id287" draw:id="id287" draw:layer="layout" svg:width="1.016cm" svg:height="0.907cm" svg:x="-110.871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96" xml:id="id288" draw:id="id288" draw:layer="layout" svg:width="1.016cm" svg:height="0.907cm" svg:x="-110.871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2" draw:text-style-name="P96" xml:id="id289" draw:id="id289" draw:layer="layout" svg:width="1.016cm" svg:height="0.905cm" svg:x="-110.871cm" svg:y="77.6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0.363cm" svg:y1="75.147cm" svg:x2="-110.363cm" svg:y2="75.931cm" draw:start-shape="id287" draw:start-glue-point="8" draw:end-shape="id288" draw:end-glue-point="0" svg:d="M-110363 75147v784" svg:viewBox="0 0 1 785">
            <text:p/>
          </draw:connector>
          <draw:connector draw:style-name="gr360" draw:text-style-name="P97" draw:layer="layout" draw:type="line" svg:x1="-110.363cm" svg:y1="76.838cm" svg:x2="-110.363cm" svg:y2="77.649cm" draw:start-shape="id288" draw:start-glue-point="8" draw:end-shape="id289" draw:end-glue-point="4" svg:d="M-110363 76838v811" svg:viewBox="0 0 1 812">
            <text:p/>
          </draw:connector>
          <draw:connector draw:style-name="gr360" draw:text-style-name="P97" draw:layer="layout" draw:type="line" svg:x1="-114.848cm" svg:y1="74.692cm" svg:x2="-110.871cm" svg:y2="74.694cm" draw:start-shape="id284" draw:start-glue-point="10" draw:end-shape="id287" draw:end-glue-point="6" svg:d="M-114848 74692l3977 2" svg:viewBox="0 0 3978 3">
            <text:p/>
          </draw:connector>
          <draw:connector draw:style-name="gr360" draw:text-style-name="P97" draw:layer="layout" draw:type="line" svg:x1="-114.848cm" svg:y1="76.385cm" svg:x2="-110.871cm" svg:y2="76.385cm" draw:start-shape="id285" draw:start-glue-point="10" draw:end-shape="id288" draw:end-glue-point="6" svg:d="M-114848 76385h3977" svg:viewBox="0 0 3978 1">
            <text:p/>
          </draw:connector>
          <draw:g draw:style-name="gr23">
            <svg:title>TexMaths</svg:title>
            <svg:desc>14§display§\lambda_{X^{1}S^{2}}§svg§600§FALSE§</svg:desc>
            <draw:path draw:style-name="gr363" draw:text-style-name="P98" draw:layer="layout" svg:width="0.164cm" svg:height="0.236cm" svg:x="-109.381cm" svg:y="75.275cm" svg:viewBox="0 0 165 237" svg:d="M101 135c15 35 30 86 37 94 5 8 8 8 17 8h8c2-1 2-3 2-4s0-2-1-4c-2-3-5-8-7-14l-69-191c-7-19-25-24-41-24-2 0-6 0-6 4 0 2 4 3 4 3 11 2 13 5 21 27l33 91-93 91c-3 4-6 7-6 11 0 6 5 10 10 10s8-3 11-8z">
              <text:p/>
            </draw:path>
            <draw:path draw:style-name="gr363" draw:text-style-name="P98" draw:layer="layout" svg:width="0.206cm" svg:height="0.159cm" svg:x="-109.192cm" svg:y="75.407cm" svg:viewBox="0 0 207 160" svg:d="M119 70l22-21c30-30 40-39 60-41 4 0 6 0 6-4 0-3-2-4-3-4-8 0-15 1-22 1-6 0-22-1-29-1 0 0-3 1-3 5 0 0 0 3 3 3s9 1 9 7c0 2-3 6-6 10-3 2-32 30-40 38l-25-46c0-1-1-2-1-2 0-2 5-6 12-7 2 0 6 0 6-5 0 0-1-3-5-3s-10 1-15 1c-6 0-10 0-15 0-4 0-10 0-15 0-3 0-8-1-12-1-1 0-5 0-5 5 0 3 4 3 7 3 14 0 15 3 17 7l34 66-14 12c-4 6-16 15-20 19-28 29-38 40-59 41-3 0-6 0-6 5 0 1 1 2 3 2 7 0 15-1 23-1 3 0 10 0 13 0 5 0 10 1 13 1 1 0 5 0 5-4 0-3-2-3-4-3s-8-1-8-7c0-4 4-6 10-12l46-47 29 56c1 2 1 3 1 3 0 1-4 6-12 7-2 0-5 0-5 5 0 0 0 2 4 2s11-1 16-1 10 0 15 0c4 0 10 0 14 0 3 0 9 1 13 1 1 0 5 0 5-5 0-2-4-2-8-2-14 0-14-3-16-8z">
              <text:p/>
            </draw:path>
            <draw:path draw:style-name="gr363" draw:text-style-name="P98" draw:layer="layout" svg:width="0.068cm" svg:height="0.11cm" svg:x="-108.942cm" svg:y="75.389cm" svg:viewBox="0 0 69 111" svg:d="M44 5c0-5-1-5-7-5-11 11-31 11-34 11h-3v7h3c4 0 14-1 24-4v83c0 5 0 8-17 8h-8v6c9 0 25 0 34 0s24 0 33 0v-6h-8c-17 0-17-3-17-8z">
              <text:p/>
            </draw:path>
            <draw:path draw:style-name="gr363" draw:text-style-name="P98" draw:layer="layout" svg:width="0.148cm" svg:height="0.169cm" svg:x="-108.818cm" svg:y="75.402cm" svg:viewBox="0 0 149 170" svg:d="M149 3c0-1-1-3-3-3s-2 0-5 3l-11 13c-9-11-24-16-38-16-34 0-62 27-62 55 0 2 1 13 7 20 8 10 18 12 32 15 6 2 18 4 20 5 8 2 22 7 22 26s-19 41-47 41c-19 0-45-9-45-34 0-3 1-7 2-12v-1c0-4-3-4-4-4-3 0-3 1-4 5l-12 47c0 1-1 2-1 5 0 0 1 2 3 2s2 0 5-4c3-3 8-10 11-13 13 15 31 17 44 17 37 0 66-30 66-59 0-10-5-19-10-24-8-9-12-10-42-18-5 0-14-1-14-3-6-3-17-8-17-21 0-18 22-38 46-38 25 0 37 14 37 38 0 2 0 7 0 10s2 3 3 3c4 0 4-1 5-5z">
              <text:p/>
            </draw:path>
            <draw:path draw:style-name="gr363" draw:text-style-name="P98" draw:layer="layout" svg:width="0.082cm" svg:height="0.11cm" svg:x="-108.644cm" svg:y="75.389cm" svg:viewBox="0 0 83 111" svg:d="M83 80h-6c-1 2-2 13-5 15-2 1-15 1-17 1h-34c11-9 24-18 34-25 14-10 28-20 28-38 0-21-20-33-44-33-23 0-39 13-39 30 0 8 7 9 10 9 5 0 10-2 10-9 0-6-5-9-10-10 5-8 15-13 26-13 16 0 30 10 30 26 0 15-9 25-22 36l-41 36c-3 1-3 1-3 2v4h78z">
              <text:p/>
            </draw:path>
          </draw:g>
          <draw:g draw:style-name="gr23">
            <svg:title>TexMaths</svg:title>
            <svg:desc>14§display§\pi_{SS}^{1}§svg§600§FALSE§</svg:desc>
            <draw:path draw:style-name="gr363" draw:text-style-name="P98" draw:layer="layout" svg:width="0.181cm" svg:height="0.147cm" svg:x="-113.295cm" svg:y="74.38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3" draw:text-style-name="P98" draw:layer="layout" svg:width="0.086cm" svg:height="0.155cm" svg:x="-113.076cm" svg:y="74.24cm" svg:viewBox="0 0 87 156" svg:d="M53 7c0-7-1-7-7-7-15 15-36 15-46 15v9c5 0 21 0 34-8v121c0 7 0 10-23 10h-9v9c4 0 34-2 42-2 7 0 37 2 43 2v-9h-10c-24 0-24-3-24-10z">
              <text:p/>
            </draw:path>
            <draw:path draw:style-name="gr363" draw:text-style-name="P98" draw:layer="layout" svg:width="0.148cm" svg:height="0.169cm" svg:x="-113.097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3" draw:text-style-name="P98" draw:layer="layout" svg:width="0.148cm" svg:height="0.169cm" svg:x="-112.919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1}§svg§600§FALSE§</svg:desc>
            <draw:path draw:style-name="gr363" draw:text-style-name="P98" draw:layer="layout" svg:width="0.18cm" svg:height="0.147cm" svg:x="-113.295cm" svg:y="76.114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3" draw:text-style-name="P98" draw:layer="layout" svg:width="0.085cm" svg:height="0.154cm" svg:x="-113.076cm" svg:y="75.967cm" svg:viewBox="0 0 86 155" svg:d="M53 7c0-7-1-7-7-7-15 15-36 15-46 15v9c5 0 21 0 34-8v120c0 8 0 11-23 11h-9v8c4 0 33-1 42-1 7 0 37 1 42 1v-8h-9c-24 0-24-3-24-11z">
              <text:p/>
            </draw:path>
            <draw:path draw:style-name="gr363" draw:text-style-name="P98" draw:layer="layout" svg:width="0.206cm" svg:height="0.159cm" svg:x="-113.102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3" draw:text-style-name="P98" draw:layer="layout" svg:width="0.206cm" svg:height="0.159cm" svg:x="-112.866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S_{t-1}^{1}§svg§600§FALSE§</svg:desc>
            <draw:path draw:style-name="gr363" draw:text-style-name="P98" draw:layer="layout" svg:width="0.198cm" svg:height="0.242cm" svg:x="-115.659cm" svg:y="74.539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3" draw:text-style-name="P98" draw:layer="layout" svg:width="0.086cm" svg:height="0.154cm" svg:x="-115.427cm" svg:y="74.481cm" svg:viewBox="0 0 87 155" svg:d="M53 7c0-7 0-7-7-7-15 15-36 15-46 15v9c5 0 21 0 34-8v120c0 8 0 11-23 11h-9v8c4 0 34-1 42-1 7 0 37 1 43 1v-8h-10c-24 0-24-3-24-11z">
              <text:p/>
            </draw:path>
            <draw:path draw:style-name="gr363" draw:text-style-name="P98" draw:layer="layout" svg:width="0.079cm" svg:height="0.148cm" svg:x="-115.462cm" svg:y="74.711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47cm" svg:y="74.792cm" svg:viewBox="0 0 159 12" svg:d="M150 12c3 0 9 0 9-6s-6-6-9-6h-141c-4 0-9 0-9 6s5 6 9 6z">
              <text:p/>
            </draw:path>
            <draw:path draw:style-name="gr363" draw:text-style-name="P98" draw:layer="layout" svg:width="0.086cm" svg:height="0.154cm" svg:x="-115.138cm" svg:y="74.701cm" svg:viewBox="0 0 87 155" svg:d="M53 7c0-7-1-7-7-7-15 15-36 15-46 15v9c5 0 21 0 34-8v120c0 8 0 11-23 11h-9v8c4 0 34-1 42-1 7 0 37 1 43 1v-8h-10c-24 0-24-3-24-11z">
              <text:p/>
            </draw:path>
          </draw:g>
          <draw:g draw:style-name="gr23">
            <svg:title>TexMaths</svg:title>
            <svg:desc>14§display§X_{t-1}^{1}§svg§600§FALSE§</svg:desc>
            <draw:path draw:style-name="gr363" draw:text-style-name="P98" draw:layer="layout" svg:width="0.276cm" svg:height="0.228cm" svg:x="-115.699cm" svg:y="76.242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3" draw:text-style-name="P98" draw:layer="layout" svg:width="0.086cm" svg:height="0.154cm" svg:x="-115.379cm" svg:y="76.178cm" svg:viewBox="0 0 87 155" svg:d="M53 7c0-7 0-7-7-7-15 15-36 15-46 15v9c5 0 21 0 34-8v120c0 8 0 11-23 11h-9v8c4 0 34-1 42-1 7 0 37 1 43 1v-8h-10c-24 0-24-3-24-11z">
              <text:p/>
            </draw:path>
            <draw:path draw:style-name="gr363" draw:text-style-name="P98" draw:layer="layout" svg:width="0.079cm" svg:height="0.148cm" svg:x="-115.422cm" svg:y="76.407cm" svg:viewBox="0 0 80 149" svg:d="M48 54h24c5 0 8 0 8-5 0-4-3-4-7-4h-23l9-34c0-1 1-3 1-4 0-4-3-7-9-7s-8 4-11 10c-1 5 2-5-8 35h-25c-4 0-7 0-7 6 0 3 3 3 7 3h23l-15 56c0 6-3 13-3 17 0 14 12 22 25 22 26 0 41-33 41-36 0-2-3-2-3-2-4 0-4 0-6 4-6 14-18 27-31 27-5 0-8-2-8-12 0-1 1-7 1-9z">
              <text:p/>
            </draw:path>
            <draw:path draw:style-name="gr363" draw:text-style-name="P98" draw:layer="layout" svg:width="0.158cm" svg:height="0.011cm" svg:x="-115.305cm" svg:y="76.489cm" svg:viewBox="0 0 159 12" svg:d="M150 12c3 0 9 0 9-6s-6-6-9-6h-141c-4 0-9 0-9 6s5 6 9 6z">
              <text:p/>
            </draw:path>
            <draw:path draw:style-name="gr363" draw:text-style-name="P98" draw:layer="layout" svg:width="0.086cm" svg:height="0.154cm" svg:x="-115.096cm" svg:y="76.398cm" svg:viewBox="0 0 87 155" svg:d="M53 7c0-7 0-7-7-7-15 15-36 15-46 15v9c5 0 21 0 34-8v120c0 8 0 11-23 11h-9v8c4 0 34-1 42-1 7 0 37 1 43 1v-8h-10c-24 0-24-3-24-11z">
              <text:p/>
            </draw:path>
          </draw:g>
          <draw:g draw:style-name="gr23">
            <svg:title>TexMaths</svg:title>
            <svg:desc>14§display§Z_{t-1}^{1}§svg§600§FALSE§</svg:desc>
            <draw:path draw:style-name="gr363" draw:text-style-name="P98" draw:layer="layout" svg:width="0.222cm" svg:height="0.228cm" svg:x="-115.669cm" svg:y="77.95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086cm" svg:height="0.154cm" svg:x="-115.41cm" svg:y="77.893cm" svg:viewBox="0 0 87 155" svg:d="M53 7c0-7-1-7-7-7-15 15-36 15-46 15v9c5 0 21 0 34-8v120c0 8 0 11-23 11h-9v8c4 0 34-1 42-1 7 0 37 1 43 1v-8h-10c-24 0-24-3-24-11z">
              <text:p/>
            </draw:path>
            <draw:path draw:style-name="gr363" draw:text-style-name="P98" draw:layer="layout" svg:width="0.079cm" svg:height="0.148cm" svg:x="-115.449cm" svg:y="78.12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34cm" svg:y="78.205cm" svg:viewBox="0 0 159 12" svg:d="M150 12c3 0 9 0 9-6s-6-6-9-6h-141c-4 0-9 0-9 6s5 6 9 6z">
              <text:p/>
            </draw:path>
            <draw:path draw:style-name="gr363" draw:text-style-name="P98" draw:layer="layout" svg:width="0.086cm" svg:height="0.154cm" svg:x="-115.125cm" svg:y="78.113cm" svg:viewBox="0 0 87 155" svg:d="M53 7c0-7 0-7-7-7-15 15-36 15-46 15v9c5 0 21 0 34-8v120c0 8 0 11-23 11h-9v8c4 0 34-1 42-1 7 0 37 1 43 1v-8h-10c-24 0-24-3-24-11z">
              <text:p/>
            </draw:path>
          </draw:g>
          <draw:g draw:style-name="gr23">
            <svg:title>TexMaths</svg:title>
            <svg:desc>14§display§S_{t}^{1}§svg§600§FALSE§</svg:desc>
            <draw:path draw:style-name="gr363" draw:text-style-name="P98" draw:layer="layout" svg:width="0.198cm" svg:height="0.242cm" svg:x="-110.501cm" svg:y="74.54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5-6z">
              <text:p/>
            </draw:path>
            <draw:path draw:style-name="gr363" draw:text-style-name="P98" draw:layer="layout" svg:width="0.085cm" svg:height="0.154cm" svg:x="-110.269cm" svg:y="74.483cm" svg:viewBox="0 0 86 155" svg:d="M53 7c0-7 0-7-7-7-15 15-36 15-46 15v9c5 0 21 0 34-8v120c0 8 0 11-23 11h-9v8c4 0 33-1 42-1 7 0 37 1 42 1v-8h-9c-24 0-24-3-24-11z">
              <text:p/>
            </draw:path>
            <draw:path draw:style-name="gr363" draw:text-style-name="P98" draw:layer="layout" svg:width="0.079cm" svg:height="0.148cm" svg:x="-110.304cm" svg:y="74.712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X_{t}^{1}§svg§600§FALSE§</svg:desc>
            <draw:path draw:style-name="gr363" draw:text-style-name="P98" draw:layer="layout" svg:width="0.275cm" svg:height="0.228cm" svg:x="-110.541cm" svg:y="76.242cm" svg:viewBox="0 0 276 229" svg:d="M153 91l-28-66c-2-4-2-4-2-5 0-2 6-8 20-9 4-1 6-1 6-7 0-4-3-4-4-4-14 0-28 1-43 1-8 0-29-1-37-1-2 0-6 0-6 7 0 4 4 4 8 4 20 0 22 3 25 10l39 94-71 76-3 4c-17 17-32 22-50 23-4 1-7 1-7 7 0 0 0 4 5 4 10 0 21-1 31-1 11 0 26 1 37 1 2 0 6 0 6-7 0-3-3-4-4-4-3 0-12-1-12-11 0-4 4-10 7-14l35-37 30-33 33 81c2 3 3 3 3 5s-7 8-19 9c-5 1-8 1-8 7 0 4 4 4 5 4 10 0 33-1 42-1s28 1 38 1c2 0 7 0 7-6 0-5-5-5-7-5-23 0-24-1-28-14-14-31-36-83-44-104 23-23 58-63 68-73 11-7 23-15 43-16 4-1 8-1 8-7 0-1 0-4-5-4-10 0-21 1-32 1-12 0-24-1-36-1-2 0-7 0-7 7 0 2 2 3 5 4 3 0 13 1 13 10 0 6-4 9-7 12z">
              <text:p/>
            </draw:path>
            <draw:path draw:style-name="gr363" draw:text-style-name="P98" draw:layer="layout" svg:width="0.085cm" svg:height="0.154cm" svg:x="-110.223cm" svg:y="76.178cm" svg:viewBox="0 0 86 155" svg:d="M53 7c0-7 0-7-7-7-15 15-36 15-46 15v9c5 0 21 0 34-8v120c0 8 0 11-23 11h-9v8c4 0 33-1 42-1 7 0 37 1 42 1v-8h-9c-24 0-24-3-24-11z">
              <text:p/>
            </draw:path>
            <draw:path draw:style-name="gr363" draw:text-style-name="P98" draw:layer="layout" svg:width="0.078cm" svg:height="0.148cm" svg:x="-110.265cm" svg:y="76.407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Z_{t}^{1}§svg§600§FALSE§</svg:desc>
            <draw:path draw:style-name="gr363" draw:text-style-name="P98" draw:layer="layout" svg:width="0.222cm" svg:height="0.228cm" svg:x="-110.509cm" svg:y="77.95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086cm" svg:height="0.154cm" svg:x="-110.252cm" svg:y="77.893cm" svg:viewBox="0 0 87 155" svg:d="M53 7c0-7-1-7-7-7-15 15-36 15-46 15v9c5 0 21 0 34-8v120c0 8 0 11-23 11h-9v8c4 0 34-1 42-1 7 0 37 1 43 1v-8h-10c-24 0-24-3-24-11z">
              <text:p/>
            </draw:path>
            <draw:path draw:style-name="gr363" draw:text-style-name="P98" draw:layer="layout" svg:width="0.079cm" svg:height="0.148cm" svg:x="-110.29cm" svg:y="78.123cm" svg:viewBox="0 0 80 149" svg:d="M48 54h24c5 0 8 0 8-5 0-4-3-4-7-4h-23l9-34c0-1 1-3 1-4 0-4-3-7-9-7s-8 4-11 10c-1 5 2-5-8 35h-25c-4 0-7 0-7 6 0 3 3 3 7 3h23l-15 56c0 6-3 13-3 17 0 14 12 22 25 22 26 0 41-33 41-36 0-2-3-2-3-2-4 0-4 0-6 4-6 14-18 27-31 27-5 0-8-2-8-12 0-1 1-7 1-9z">
              <text:p/>
            </draw:path>
          </draw:g>
          <draw:custom-shape draw:style-name="gr361" draw:text-style-name="P96" xml:id="id291" draw:id="id291" draw:layer="layout" svg:width="1.016cm" svg:height="0.907cm" svg:x="-115.867cm" svg:y="67.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4" draw:text-style-name="P96" xml:id="id290" draw:id="id290" draw:layer="layout" svg:width="1.016cm" svg:height="0.906cm" svg:x="-115.867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96" xml:id="id292" draw:id="id292" draw:layer="layout" svg:width="1.016cm" svg:height="0.909cm" svg:x="-115.867cm" svg:y="71.3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5.359cm" svg:y1="69.615cm" svg:x2="-115.359cm" svg:y2="68.829cm" draw:start-shape="id290" draw:start-glue-point="4" draw:end-shape="id291" draw:end-glue-point="8" svg:d="M-115359 69615v-786" svg:viewBox="0 0 1 787">
            <text:p/>
          </draw:connector>
          <draw:connector draw:style-name="gr360" draw:text-style-name="P97" draw:layer="layout" draw:type="line" svg:x1="-115.359cm" svg:y1="71.329cm" svg:x2="-115.359cm" svg:y2="70.521cm" draw:start-shape="id292" draw:start-glue-point="4" draw:end-shape="id290" draw:end-glue-point="8" svg:d="M-115359 71329v-808" svg:viewBox="0 0 1 809">
            <text:p/>
          </draw:connector>
          <draw:custom-shape draw:style-name="gr365" draw:text-style-name="P96" xml:id="id294" draw:id="id294" draw:layer="layout" svg:width="1.017cm" svg:height="0.906cm" svg:x="-110.875cm" svg:y="67.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6" xml:id="id293" draw:id="id293" draw:layer="layout" svg:width="1.017cm" svg:height="0.906cm" svg:x="-110.875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6" xml:id="id295" draw:id="id295" draw:layer="layout" svg:width="1.017cm" svg:height="0.906cm" svg:x="-110.875cm" svg:y="7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0.366cm" svg:y1="69.615cm" svg:x2="-110.366cm" svg:y2="68.829cm" draw:start-shape="id293" draw:start-glue-point="4" draw:end-shape="id294" draw:end-glue-point="8" svg:d="M-110366 69615v-786" svg:viewBox="0 0 1 787">
            <text:p/>
          </draw:connector>
          <draw:connector draw:style-name="gr360" draw:text-style-name="P97" draw:layer="layout" draw:type="line" svg:x1="-110.366cm" svg:y1="71.332cm" svg:x2="-110.366cm" svg:y2="70.521cm" draw:start-shape="id295" draw:start-glue-point="4" draw:end-shape="id293" draw:end-glue-point="8" svg:d="M-110366 71332v-811" svg:viewBox="0 0 1 812">
            <text:p/>
          </draw:connector>
          <draw:connector draw:style-name="gr360" draw:text-style-name="P97" draw:layer="layout" draw:type="line" svg:x1="-114.851cm" svg:y1="71.784cm" svg:x2="-110.875cm" svg:y2="71.785cm" draw:start-shape="id292" draw:start-glue-point="10" draw:end-shape="id295" draw:end-glue-point="6" svg:d="M-114851 71784l3976 1" svg:viewBox="0 0 3977 2">
            <text:p/>
          </draw:connector>
          <draw:connector draw:style-name="gr360" draw:text-style-name="P97" draw:layer="layout" draw:type="line" svg:x1="-114.851cm" svg:y1="70.068cm" svg:x2="-110.875cm" svg:y2="70.068cm" draw:start-shape="id290" draw:start-glue-point="10" draw:end-shape="id293" draw:end-glue-point="6" svg:d="M-114851 70068h3976" svg:viewBox="0 0 3977 1">
            <text:p/>
          </draw:connector>
          <draw:g draw:style-name="gr23">
            <svg:title>TexMaths</svg:title>
            <svg:desc>14§display§X_{t-1}^{2}§svg§600§FALSE§</svg:desc>
            <draw:path draw:style-name="gr363" draw:text-style-name="P98" draw:layer="layout" svg:width="0.276cm" svg:height="0.228cm" svg:x="-115.703cm" svg:y="69.925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3" draw:text-style-name="P98" draw:layer="layout" svg:width="0.103cm" svg:height="0.154cm" svg:x="-115.395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25cm" svg:y="70.089cm" svg:viewBox="0 0 80 149" svg:d="M48 54h24c5 0 8 0 8-5 0-4-3-4-7-4h-23l9-34c0-1 1-3 1-4 0-4-3-7-9-7s-8 4-11 10c-1 5 2-5-8 35h-25c-4 0-7 0-7 6 0 3 3 3 7 3h23l-15 56c0 6-3 13-3 17 0 14 12 22 25 22 26 0 41-33 41-36 0-2-3-2-3-2-4 0-4 0-6 4-6 14-18 27-31 27-5 0-8-2-8-12 0-1 1-7 1-9z">
              <text:p/>
            </draw:path>
            <draw:path draw:style-name="gr363" draw:text-style-name="P98" draw:layer="layout" svg:width="0.158cm" svg:height="0.011cm" svg:x="-115.31cm" svg:y="70.171cm" svg:viewBox="0 0 159 12" svg:d="M150 12c3 0 9 0 9-6s-6-6-9-6h-141c-4 0-9 0-9 6s5 6 9 6z">
              <text:p/>
            </draw:path>
            <draw:path draw:style-name="gr363" draw:text-style-name="P98" draw:layer="layout" svg:width="0.086cm" svg:height="0.154cm" svg:x="-115.101cm" svg:y="70.079cm" svg:viewBox="0 0 87 155" svg:d="M53 7c0-7 0-7-7-7-15 15-36 15-46 15v9c5 0 21 0 34-8v120c0 8 0 11-23 11h-9v8c4 0 34-1 42-1 7 0 37 1 43 1v-8h-10c-24 0-24-3-24-11z">
              <text:p/>
            </draw:path>
          </draw:g>
          <draw:g draw:style-name="gr23">
            <svg:title>TexMaths</svg:title>
            <svg:desc>14§display§Z_{t-1}^{2}§svg§600§FALSE§</svg:desc>
            <draw:path draw:style-name="gr363" draw:text-style-name="P98" draw:layer="layout" svg:width="0.222cm" svg:height="0.228cm" svg:x="-115.673cm" svg:y="68.24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103cm" svg:height="0.154cm" svg:x="-115.424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53cm" svg:y="68.41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37cm" svg:y="68.495cm" svg:viewBox="0 0 159 12" svg:d="M150 12c3 0 9 0 9-6s-6-6-9-6h-141c-4 0-9 0-9 6s5 6 9 6z">
              <text:p/>
            </draw:path>
            <draw:path draw:style-name="gr363" draw:text-style-name="P98" draw:layer="layout" svg:width="0.086cm" svg:height="0.154cm" svg:x="-115.128cm" svg:y="68.403cm" svg:viewBox="0 0 87 155" svg:d="M53 7c0-7 0-7-7-7-15 15-36 15-46 15v9c5 0 21 0 34-8v120c0 8 0 11-23 11h-9v8c4 0 34-1 42-1 7 0 37 1 43 1v-8h-10c-24 0-24-3-24-11z">
              <text:p/>
            </draw:path>
          </draw:g>
          <draw:g draw:style-name="gr23">
            <svg:title>TexMaths</svg:title>
            <svg:desc>14§display§X_{t}^{2}§svg§600§FALSE§</svg:desc>
            <draw:path draw:style-name="gr363" draw:text-style-name="P98" draw:layer="layout" svg:width="0.275cm" svg:height="0.228cm" svg:x="-110.545cm" svg:y="69.925cm" svg:viewBox="0 0 276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9 0 29 1 38 1 2 0 7 0 7-6 0-5-4-5-7-5-22 0-24-1-28-14-13-31-36-83-43-104 22-23 57-63 68-73 10-7 22-15 42-16 4-1 8-1 8-7 0-1 0-4-4-4-11 0-21 1-32 1-12 0-25-1-37-1-2 0-7 0-7 7 0 2 2 3 5 4 3 0 14 1 14 10 0 6-5 9-8 12z">
              <text:p/>
            </draw:path>
            <draw:path draw:style-name="gr363" draw:text-style-name="P98" draw:layer="layout" svg:width="0.103cm" svg:height="0.154cm" svg:x="-110.237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0.268cm" svg:y="70.089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Z_{t}^{2}§svg§600§FALSE§</svg:desc>
            <draw:path draw:style-name="gr363" draw:text-style-name="P98" draw:layer="layout" svg:width="0.222cm" svg:height="0.228cm" svg:x="-110.515cm" svg:y="68.248cm" svg:viewBox="0 0 223 229" svg:d="M222 8c0-1 1-3 1-5 0-3-2-3-8-3h-142c-8 0-9 0-10 7l-18 60c-1 2-1 3-1 4s0 4 3 4 4-2 4-3c13-39 31-61 83-61h55l-187 208-2 6c0 4 3 4 8 4h145c10 0 10 0 11-7l25-74c0-1 1-4 1-6 0-1-1-2-5-2-2 0-3 1-6 7-14 46-30 70-87 70h-58z">
              <text:p/>
            </draw:path>
            <draw:path draw:style-name="gr363" draw:text-style-name="P98" draw:layer="layout" svg:width="0.103cm" svg:height="0.154cm" svg:x="-110.266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0.295cm" svg:y="68.413cm" svg:viewBox="0 0 80 149" svg:d="M48 54h24c5 0 8 0 8-5 0-4-3-4-7-4h-23l9-34c0-1 0-3 0-4 0-4-2-7-8-7s-8 4-11 10c-1 5 2-5-8 35h-25c-4 0-7 0-7 6 0 3 3 3 7 3h23l-15 56c0 6-3 13-3 17 0 14 12 22 25 22 26 0 41-33 41-36 0-2-3-2-3-2-4 0-4 0-6 4-6 14-18 27-31 27-5 0-8-2-8-12 0-1 1-7 1-9z">
              <text:p/>
            </draw:path>
          </draw:g>
          <draw:custom-shape draw:style-name="gr364" draw:text-style-name="P96" xml:id="id296" draw:id="id296" draw:layer="layout" svg:width="1.016cm" svg:height="0.908cm" svg:x="-114.506cm" svg:y="72.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96" xml:id="id297" draw:id="id297" draw:layer="layout" svg:width="1.017cm" svg:height="0.907cm" svg:x="-112.228cm" svg:y="72.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0" draw:text-style-name="P97" draw:layer="layout" draw:type="line" svg:x1="-114.358cm" svg:y1="73.522cm" svg:x2="-115.355cm" svg:y2="74.24cm" draw:start-shape="id296" draw:start-glue-point="7" draw:end-shape="id284" draw:end-glue-point="4" svg:d="M-114358 73522l-997 718" svg:viewBox="0 0 998 719">
            <text:p/>
          </draw:connector>
          <draw:connector draw:style-name="gr360" draw:text-style-name="P97" draw:layer="layout" draw:type="line" svg:x1="-114.358cm" svg:y1="72.88cm" svg:x2="-115.359cm" svg:y2="72.238cm" draw:start-shape="id296" draw:start-glue-point="5" draw:end-shape="id292" draw:end-glue-point="8" svg:d="M-114358 72880l-1001-642" svg:viewBox="0 0 1002 643">
            <text:p/>
          </draw:connector>
          <draw:connector draw:style-name="gr360" draw:text-style-name="P97" draw:layer="layout" draw:type="line" svg:x1="-111.36cm" svg:y1="73.523cm" svg:x2="-110.723cm" svg:y2="74.372cm" draw:start-shape="id297" draw:start-glue-point="9" draw:end-shape="id287" draw:end-glue-point="5" svg:d="M-111360 73523l637 849" svg:viewBox="0 0 638 850">
            <text:p/>
          </draw:connector>
          <draw:connector draw:style-name="gr360" draw:text-style-name="P97" draw:layer="layout" draw:type="line" svg:x1="-111.36cm" svg:y1="72.88cm" svg:x2="-110.726cm" svg:y2="72.106cm" draw:start-shape="id297" draw:start-glue-point="11" draw:end-shape="id295" draw:end-glue-point="7" svg:d="M-111360 72880l634-774" svg:viewBox="0 0 635 775">
            <text:p/>
          </draw:connector>
          <draw:connector draw:style-name="gr360" draw:text-style-name="P97" draw:layer="layout" draw:type="line" svg:x1="-113.49cm" svg:y1="73.201cm" svg:x2="-112.228cm" svg:y2="73.202cm" draw:start-shape="id296" draw:start-glue-point="10" draw:end-shape="id297" draw:end-glue-point="6" svg:d="M-113490 73201l1262 1" svg:viewBox="0 0 1263 2">
            <text:p/>
          </draw:connector>
          <draw:g draw:style-name="gr23">
            <svg:title>TexMaths</svg:title>
            <svg:desc>14§display§D_{t-1}§svg§600§FALSE§</svg:desc>
            <draw:path draw:style-name="gr363" draw:text-style-name="P98" draw:layer="layout" svg:width="0.255cm" svg:height="0.228cm" svg:x="-114.302cm" svg:y="73.045cm" svg:viewBox="0 0 256 229" svg:d="M39 203c-2 13-3 15-30 15-5 0-9 0-9 7 0 4 3 4 9 4h112c69 0 135-70 135-144 0-48-29-85-79-85h-113c-6 0-9 0-9 6 0 5 3 5 9 5 5 0 11 0 15 1 5 0 8 1 8 4 0 1 0 3-3 7zM112 23c4-11 4-12 18-12h36c33 0 60 16 60 61 0 17-7 71-35 109-9 12-37 37-77 37h-38c-5 0-6 0-7 0-4 0-5-1-5-3s0-2 2-9z">
              <text:p/>
            </draw:path>
            <draw:path draw:style-name="gr363" draw:text-style-name="P98" draw:layer="layout" svg:width="0.079cm" svg:height="0.148cm" svg:x="-114.03cm" svg:y="73.178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3.913cm" svg:y="73.258cm" svg:viewBox="0 0 159 12" svg:d="M150 12c3 0 9 0 9-6s-6-6-9-6h-141c-4 0-9 0-9 6s5 6 9 6z">
              <text:p/>
            </draw:path>
            <draw:path draw:style-name="gr363" draw:text-style-name="P98" draw:layer="layout" svg:width="0.086cm" svg:height="0.154cm" svg:x="-113.704cm" svg:y="73.168cm" svg:viewBox="0 0 87 155" svg:d="M53 7c0-7-1-7-7-7-15 15-36 15-46 15v9c5 0 21 0 34-8v120c0 8 0 11-23 11h-9v8c4 0 34-1 42-1 7 0 37 1 43 1v-8h-10c-24 0-24-3-24-11z">
              <text:p/>
            </draw:path>
          </draw:g>
          <draw:g draw:style-name="gr23">
            <svg:title>TexMaths</svg:title>
            <svg:desc>14§display§D_{t}§svg§600§FALSE§</svg:desc>
            <draw:path draw:style-name="gr363" draw:text-style-name="P98" draw:layer="layout" svg:width="0.255cm" svg:height="0.228cm" svg:x="-111.927cm" svg:y="73.045cm" svg:viewBox="0 0 256 229" svg:d="M39 203c-2 13-3 15-30 15-5 0-9 0-9 7 0 4 3 4 9 4h112c69 0 135-70 135-144 0-48-30-85-79-85h-113c-6 0-9 0-9 6 0 5 3 5 9 5 5 0 11 0 15 1 5 0 7 1 7 4 0 1 0 3-2 7zM112 23c4-11 4-12 18-12h36c33 0 60 16 60 61 0 17-7 71-35 109-9 12-37 37-77 37h-38c-5 0-6 0-7 0-4 0-5-1-5-3s0-2 2-9z">
              <text:p/>
            </draw:path>
            <draw:path draw:style-name="gr363" draw:text-style-name="P98" draw:layer="layout" svg:width="0.078cm" svg:height="0.148cm" svg:x="-111.654cm" svg:y="73.178cm" svg:viewBox="0 0 79 149" svg:d="M47 54h25c5 0 7 0 7-5 0-4-2-4-6-4h-23l9-34c0-1 0-3 0-4 0-4-2-7-8-7s-8 4-11 10c-1 5 2-5-8 35h-25c-4 0-7 0-7 6 0 3 3 3 7 3h23l-15 56c0 6-3 13-3 17 0 14 12 22 25 22 26 0 41-33 41-36 0-2-3-2-3-2-4 0-4 0-6 4-6 14-18 27-31 27-5 0-8-2-8-12 0-1 1-7 1-9z">
              <text:p/>
            </draw:path>
          </draw:g>
          <draw:connector draw:style-name="gr366" draw:text-style-name="P41" draw:layer="layout" draw:type="curve" svg:x1="-109.858cm" svg:y1="71.785cm" svg:x2="-109.855cm" svg:y2="76.384cm" draw:start-shape="id295" draw:start-glue-point="10" draw:end-shape="id288" svg:d="M-109858 71785c775 0 774 4599 3 4599" svg:viewBox="0 0 582 4600">
            <text:p/>
          </draw:connector>
          <draw:connector draw:style-name="gr366" draw:text-style-name="P41" draw:layer="layout" draw:type="curve" svg:x1="-109.855cm" svg:y1="74.694cm" svg:x2="-109.858cm" svg:y2="70.068cm" draw:start-shape="id287" draw:start-glue-point="10" draw:end-shape="id293" draw:end-glue-point="10" svg:d="M-109855 74694c771 0 772-4626-3-4626" svg:viewBox="0 0 582 4627">
            <text:p/>
          </draw:connector>
          <draw:connector draw:style-name="gr366" draw:text-style-name="P41" draw:layer="layout" draw:type="curve" svg:x1="-115.867cm" svg:y1="71.784cm" svg:x2="-115.863cm" svg:y2="76.385cm" draw:start-shape="id292" draw:start-glue-point="6" draw:end-shape="id285" draw:end-glue-point="6" svg:d="M-115867 71784c-769 0-771 4601 4 4601" svg:viewBox="0 0 582 4602">
            <text:p/>
          </draw:connector>
          <draw:connector draw:style-name="gr366" draw:text-style-name="P41" draw:layer="layout" draw:type="curve" svg:x1="-115.863cm" svg:y1="74.692cm" svg:x2="-115.867cm" svg:y2="70.068cm" draw:start-shape="id284" draw:start-glue-point="6" draw:end-shape="id290" draw:end-glue-point="6" svg:d="M-115863 74692c-775 0-773-4624-4-4624" svg:viewBox="0 0 582 4625">
            <text:p/>
          </draw:connector>
          <draw:g draw:style-name="gr23">
            <svg:title>TexMaths</svg:title>
            <svg:desc>14§display§\pi_{SS}^{2}§svg§600§FALSE§</svg:desc>
            <draw:path draw:style-name="gr363" draw:text-style-name="P98" draw:layer="layout" svg:width="0.181cm" svg:height="0.147cm" svg:x="-113.295cm" svg:y="71.47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3" draw:text-style-name="P98" draw:layer="layout" svg:width="0.103cm" svg:height="0.155cm" svg:x="-113.086cm" svg:y="71.33cm" svg:viewBox="0 0 104 156" svg:d="M104 113h-8c-1 6-3 19-7 22-1 0-20 0-21 0h-44c24-21 33-27 46-38 18-15 34-28 34-52 0-28-25-45-55-45-29 0-49 21-49 42 0 13 10 14 12 14 6 0 14-5 14-13 0-4-2-12-14-12 6-17 22-23 33-23 24 0 36 19 36 37 0 21-13 37-22 46l-56 56c-3 2-3 3-3 9h97z">
              <text:p/>
            </draw:path>
            <draw:path draw:style-name="gr363" draw:text-style-name="P98" draw:layer="layout" svg:width="0.148cm" svg:height="0.169cm" svg:x="-113.097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3" draw:text-style-name="P98" draw:layer="layout" svg:width="0.148cm" svg:height="0.169cm" svg:x="-112.919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2}§svg§600§FALSE§</svg:desc>
            <draw:path draw:style-name="gr363" draw:text-style-name="P98" draw:layer="layout" svg:width="0.18cm" svg:height="0.147cm" svg:x="-113.295cm" svg:y="69.782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3" draw:text-style-name="P98" draw:layer="layout" svg:width="0.103cm" svg:height="0.154cm" svg:x="-113.086cm" svg:y="69.635cm" svg:viewBox="0 0 104 155" svg:d="M104 113h-8c-1 6-3 19-7 22-1 0-20 0-22 0h-43c24-21 33-27 46-38 18-15 34-28 34-52 0-28-25-45-55-45-29 0-49 21-49 42 0 12 10 14 12 14 6 0 14-5 14-13 0-4-2-12-14-12 6-17 22-23 33-23 24 0 36 19 36 37 0 21-14 37-22 46l-56 56c-3 2-3 2-3 8h97z">
              <text:p/>
            </draw:path>
            <draw:path draw:style-name="gr363" draw:text-style-name="P98" draw:layer="layout" svg:width="0.206cm" svg:height="0.159cm" svg:x="-113.102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3" draw:text-style-name="P98" draw:layer="layout" svg:width="0.206cm" svg:height="0.159cm" svg:x="-112.866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pi_{DD}§svg§600§FALSE§</svg:desc>
            <draw:path draw:style-name="gr363" draw:text-style-name="P98" draw:layer="layout" svg:width="0.181cm" svg:height="0.148cm" svg:x="-113.293cm" svg:y="72.895cm" svg:viewBox="0 0 182 149" svg:d="M80 20h38c-12 49-15 63-15 86 0 5 0 15 3 25 4 16 7 18 13 18s13-7 13-14c0-1 0-2-2-6-9-24-9-47-9-56 0-18 1-36 5-53h39c4 0 17 0 17-12 0-8-8-8-14-8h-112c-8 0-20 0-35 16-13 13-21 29-21 29 0 1 0 5 4 5 3 0 3-2 5-5 18-25 36-25 42-25h20c-11 40-28 80-44 111 0 5 0 6 0 9 0 6 4 9 9 9 9 0 12-9 15-23 6-15 6-15 10-33z">
              <text:p/>
            </draw:path>
            <draw:path draw:style-name="gr363" draw:text-style-name="P98" draw:layer="layout" svg:width="0.193cm" svg:height="0.16cm" svg:x="-113.096cm" svg:y="72.928cm" svg:viewBox="0 0 194 161" svg:d="M27 142c0 8-1 11-20 11-4 0-7 0-7 5 0 3 3 3 7 3h83c53 0 104-49 104-99 0-35-24-62-63-62h-86c-4 0-7 0-7 5 0 3 2 3 7 3s5 0 10 1c4 0 5 1 5 3 0 1 0 2-2 5zM81 16c1-7 1-8 11-8h30c27 0 49 13 49 45 0 6-3 47-27 73-9 11-28 27-57 27h-32c-8 0-8 0-8-3 0 0 0-1 1-6z">
              <text:p/>
            </draw:path>
            <draw:path draw:style-name="gr363" draw:text-style-name="P98" draw:layer="layout" svg:width="0.193cm" svg:height="0.16cm" svg:x="-112.869cm" svg:y="72.928cm" svg:viewBox="0 0 194 161" svg:d="M27 142c0 8-1 11-20 11-4 0-7 0-7 5 0 3 3 3 7 3h83c53 0 104-49 104-99 0-35-24-62-63-62h-86c-4 0-7 0-7 5 0 3 2 3 7 3s5 0 10 1c4 0 5 1 5 3 0 1 0 2-2 5zM81 16c1-7 1-8 11-8h30c27 0 49 13 49 45 0 6-3 47-27 73-9 11-28 27-57 27h-32c-8 0-8 0-8-3 0 0 0-1 1-6z">
              <text:p/>
            </draw:path>
          </draw:g>
          <draw:g draw:style-name="gr23">
            <svg:title>TexMaths</svg:title>
            <svg:desc>14§display§S_{t-1}^{2}§svg§600§FALSE§</svg:desc>
            <draw:path draw:style-name="gr363" draw:text-style-name="P98" draw:layer="layout" svg:width="0.198cm" svg:height="0.242cm" svg:x="-115.658cm" svg:y="71.623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3" draw:text-style-name="P98" draw:layer="layout" svg:width="0.103cm" svg:height="0.154cm" svg:x="-115.437cm" svg:y="71.564cm" svg:viewBox="0 0 104 155" svg:d="M104 113h-8c-1 5-3 19-7 22-1 0-20 0-21 0h-44c24-21 33-27 46-38 18-15 34-28 34-52 0-28-25-45-55-45-29 0-49 21-49 42 0 12 10 14 12 14 6 0 14-5 14-13 0-4-2-12-14-12 6-17 22-23 33-23 24 0 36 19 36 37 0 21-13 37-22 46l-56 56c-3 2-3 2-3 8h97z">
              <text:p/>
            </draw:path>
            <draw:path draw:style-name="gr363" draw:text-style-name="P98" draw:layer="layout" svg:width="0.079cm" svg:height="0.148cm" svg:x="-115.461cm" svg:y="71.793cm" svg:viewBox="0 0 80 149" svg:d="M48 54h24c5 0 8 0 8-5 0-4-3-4-7-4h-23l9-34c0-1 0-3 0-4 0-4-2-7-8-7s-8 4-11 10c-1 5 2-5-8 35h-25c-4 0-7 0-7 6 0 3 3 3 7 3h23l-15 56c0 6-3 13-3 17 0 14 12 22 25 22 26 0 41-33 41-36 0-2-3-2-3-2-4 0-4 0-6 4-6 14-18 27-31 27-5 0-8-2-8-12 0-1 1-7 1-9z">
              <text:p/>
            </draw:path>
            <draw:path draw:style-name="gr363" draw:text-style-name="P98" draw:layer="layout" svg:width="0.158cm" svg:height="0.011cm" svg:x="-115.345cm" svg:y="71.875cm" svg:viewBox="0 0 159 12" svg:d="M150 12c3 0 9 0 9-6s-6-6-9-6h-141c-4 0-9 0-9 6s5 6 9 6z">
              <text:p/>
            </draw:path>
            <draw:path draw:style-name="gr363" draw:text-style-name="P98" draw:layer="layout" svg:width="0.086cm" svg:height="0.154cm" svg:x="-115.136cm" svg:y="71.784cm" svg:viewBox="0 0 87 155" svg:d="M53 7c0-7-1-7-7-7-15 15-36 15-46 15v9c5 0 21 0 34-8v120c0 8 0 11-23 11h-9v8c4 0 34-1 42-1 7 0 37 1 43 1v-8h-10c-24 0-24-3-24-11z">
              <text:p/>
            </draw:path>
          </draw:g>
          <draw:g draw:style-name="gr23">
            <svg:title>TexMaths</svg:title>
            <svg:desc>14§display§S_{t}^{2}§svg§600§FALSE§</svg:desc>
            <draw:path draw:style-name="gr363" draw:text-style-name="P98" draw:layer="layout" svg:width="0.198cm" svg:height="0.242cm" svg:x="-110.5cm" svg:y="71.623cm" svg:viewBox="0 0 199 243" svg:d="M199 3c0 0-1-3-4-3-2 0-2 0-6 5l-16 20c-9-17-26-25-49-25-42 0-81 39-81 79 0 27 16 42 34 48l36 8c12 5 30 9 30 37 0 29-27 61-60 61-20 0-57-8-57-49 0-8 1-16 1-18 0-1 0-2 0-2 0-4-1-4-3-4-3 0-3 0-4 1-1 2-20 77-20 78 0 3 2 4 4 4 1 0 1 0 6-5l17-19c13 19 36 24 55 24 47 0 86-44 86-85 0-23-12-35-16-40-9-7-12-8-43-17-8-1-20-5-22-5-9-4-21-14-21-32 0-26 27-55 58-55 29 0 49 15 49 53 0 10-1 16-1 17 0 2 0 4 3 4s4-1 6-6z">
              <text:p/>
            </draw:path>
            <draw:path draw:style-name="gr363" draw:text-style-name="P98" draw:layer="layout" svg:width="0.103cm" svg:height="0.154cm" svg:x="-110.279cm" svg:y="71.567cm" svg:viewBox="0 0 104 155" svg:d="M104 113h-8c-1 5-3 19-7 22-1 0-20 0-22 0h-43c23-21 33-27 46-38 18-15 34-28 34-52 0-28-25-45-55-45-29 0-49 21-49 42 0 12 10 14 12 14 6 0 14-5 14-13 0-4-2-12-14-12 6-17 22-23 33-23 24 0 36 19 36 37 0 21-14 37-22 46l-56 56c-3 2-3 2-3 8h97z">
              <text:p/>
            </draw:path>
            <draw:path draw:style-name="gr363" draw:text-style-name="P98" draw:layer="layout" svg:width="0.078cm" svg:height="0.148cm" svg:x="-110.303cm" svg:y="71.796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lambda_{XS}^{1}§svg§600§FALSE§</svg:desc>
            <draw:path draw:style-name="gr363" draw:text-style-name="P98" draw:layer="layout" svg:width="0.164cm" svg:height="0.236cm" svg:x="-111.078cm" svg:y="75.337cm" svg:viewBox="0 0 165 237" svg:d="M101 135c15 35 30 86 37 94 5 8 8 8 17 8h8c2-1 2-3 2-4s0-2-1-4c-3-3-5-8-7-14l-69-191c-7-19-25-24-41-24-2 0-7 0-7 4 0 2 5 3 5 3 11 2 13 5 21 27l33 91-93 91c-3 4-6 7-6 11 0 6 5 10 10 10s8-3 11-8z">
              <text:p/>
            </draw:path>
            <draw:path draw:style-name="gr363" draw:text-style-name="P98" draw:layer="layout" svg:width="0.086cm" svg:height="0.155cm" svg:x="-110.874cm" svg:y="75.275cm" svg:viewBox="0 0 87 156" svg:d="M53 7c0-7 0-7-7-7-15 15-36 15-46 15v9c5 0 21 0 34-8v121c0 7 0 10-23 10h-9v9c4 0 34-2 42-2 7 0 37 2 43 2v-9h-10c-24 0-24-3-24-10z">
              <text:p/>
            </draw:path>
            <draw:path draw:style-name="gr363" draw:text-style-name="P98" draw:layer="layout" svg:width="0.206cm" svg:height="0.159cm" svg:x="-110.888cm" svg:y="75.492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3" draw:text-style-name="P98" draw:layer="layout" svg:width="0.148cm" svg:height="0.169cm" svg:x="-110.646cm" svg:y="75.487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S}^{2}§svg§600§FALSE§</svg:desc>
            <draw:path draw:style-name="gr363" draw:text-style-name="P98" draw:layer="layout" svg:width="0.164cm" svg:height="0.236cm" svg:x="-111.081cm" svg:y="70.853cm" svg:viewBox="0 0 165 237" svg:d="M101 135c15 35 30 86 37 94 5 8 8 8 17 8h8c2-1 2-3 2-4s0-2-1-4c-3-3-5-8-7-14l-69-191c-7-19-25-24-41-24-2 0-7 0-7 4 0 2 5 3 5 3 11 2 13 5 21 27l33 91-93 91c-3 4-6 7-6 11 0 6 5 10 10 10s8-3 11-8z">
              <text:p/>
            </draw:path>
            <draw:path draw:style-name="gr363" draw:text-style-name="P98" draw:layer="layout" svg:width="0.103cm" svg:height="0.155cm" svg:x="-110.888cm" svg:y="70.791cm" svg:viewBox="0 0 104 156" svg:d="M104 113h-8c-1 6-3 19-7 22-1 0-20 0-21 0h-44c24-21 33-27 46-38 18-15 34-28 34-52 0-28-25-45-55-45-29 0-49 21-49 42 0 13 10 14 12 14 6 0 14-5 14-13 0-4-2-12-14-12 6-17 22-23 33-23 24 0 36 19 36 37 0 21-13 37-22 46l-56 56c-3 2-3 3-3 9h97z">
              <text:p/>
            </draw:path>
            <draw:path draw:style-name="gr363" draw:text-style-name="P98" draw:layer="layout" svg:width="0.206cm" svg:height="0.159cm" svg:x="-110.892cm" svg:y="71.006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3" draw:text-style-name="P98" draw:layer="layout" svg:width="0.148cm" svg:height="0.169cm" svg:x="-110.649cm" svg:y="71.002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2}S^{1}}§svg§600§FALSE§</svg:desc>
            <draw:path draw:style-name="gr363" draw:text-style-name="P98" draw:layer="layout" svg:width="0.164cm" svg:height="0.236cm" svg:x="-109.378cm" svg:y="70.799cm" svg:viewBox="0 0 165 237" svg:d="M101 135c15 35 30 86 37 94 4 8 8 8 16 8h9c2-1 2-3 2-4s0-2-1-4c-3-3-5-8-7-14l-69-191c-7-19-25-24-41-24-2 0-7 0-7 4 0 2 5 3 5 3 11 2 13 5 21 27l33 91-93 91c-3 4-6 7-6 11 0 6 5 10 10 10s8-3 11-8z">
              <text:p/>
            </draw:path>
            <draw:path draw:style-name="gr363" draw:text-style-name="P98" draw:layer="layout" svg:width="0.206cm" svg:height="0.159cm" svg:x="-109.189cm" svg:y="70.93cm" svg:viewBox="0 0 207 160" svg:d="M119 70l22-21c30-30 39-39 60-41 4 0 6 0 6-4 0-3-2-4-3-4-8 0-15 1-22 1-6 0-22-1-29-1 0 0-3 1-3 5 0 0 0 3 3 3 2 0 8 1 8 7 0 2-2 6-6 10-2 2-32 30-39 38l-25-46c0-1-1-2-1-2 0-2 5-6 12-7 2 0 6 0 6-5 0 0-1-3-5-3s-10 1-15 1c-6 0-10 0-15 0-4 0-10 0-15 0-3 0-8-1-12-1-1 0-6 0-6 5 0 3 5 3 8 3 14 0 15 3 17 7l33 66-13 12c-4 6-16 15-20 19-28 29-38 40-59 41-3 0-6 0-6 5 0 1 1 2 3 2 7 0 15-1 23-1 3 0 9 0 13 0 5 0 10 1 13 1 1 0 5 0 5-4 0-3-2-3-4-3s-8-1-8-7c0-4 4-6 9-12l47-47 29 56c1 2 1 3 1 3 0 1-4 6-12 7-2 0-5 0-5 5 0 0 0 2 3 2 5 0 12-1 17-1s10 0 15 0c4 0 10 0 14 0 3 0 9 1 13 1 1 0 4 0 4-5 0-2-3-2-7-2-14 0-14-3-16-8z">
              <text:p/>
            </draw:path>
            <draw:path draw:style-name="gr363" draw:text-style-name="P98" draw:layer="layout" svg:width="0.082cm" svg:height="0.11cm" svg:x="-108.949cm" svg:y="70.912cm" svg:viewBox="0 0 83 111" svg:d="M83 80h-6c-1 2-2 13-5 15-2 1-15 1-18 1h-33c11-9 24-18 34-25 14-10 28-20 28-38 0-21-20-33-44-33-23 0-39 13-39 30 0 8 7 9 10 9 5 0 10-2 10-9 0-6-5-9-10-10 5-8 15-13 26-13 16 0 30 10 30 26 0 15-9 25-22 36l-41 36c-3 1-3 1-3 2v4h78z">
              <text:p/>
            </draw:path>
            <draw:path draw:style-name="gr363" draw:text-style-name="P98" draw:layer="layout" svg:width="0.148cm" svg:height="0.169cm" svg:x="-108.816cm" svg:y="70.926cm" svg:viewBox="0 0 149 170" svg:d="M149 3c0-1-1-3-3-3s-2 0-5 3l-11 13c-9-11-24-16-38-16-34 0-62 27-62 55 0 2 1 13 7 20 8 10 17 12 32 15 6 2 17 4 20 5 8 2 22 7 22 26s-19 41-47 41c-19 0-45-9-45-34 0-3 1-7 2-12v-1c0-4-3-4-4-4-3 0-3 1-4 5l-12 47c0 1-1 2-1 5 0 0 1 2 3 2s2 0 5-4c3-3 8-10 11-13 13 15 31 17 44 17 37 0 66-30 66-59 0-10-6-19-10-24-8-9-12-10-42-18-5 0-14-1-14-3-6-3-17-8-17-21 0-18 21-38 46-38s37 14 37 38c0 2 0 7 0 10s2 3 3 3c3 0 3-1 4-5z">
              <text:p/>
            </draw:path>
            <draw:path draw:style-name="gr363" draw:text-style-name="P98" draw:layer="layout" svg:width="0.068cm" svg:height="0.11cm" svg:x="-108.634cm" svg:y="70.912cm" svg:viewBox="0 0 69 111" svg:d="M44 5c0-5-1-5-7-5-11 11-31 11-34 11h-3v7h3c4 0 14-1 24-4v83c0 5 0 8-17 8h-8v6c9 0 25 0 33 0 10 0 24 0 34 0v-6h-8c-17 0-17-3-17-8z">
              <text:p/>
            </draw:path>
          </draw:g>
          <draw:frame draw:style-name="gr367" draw:text-style-name="P100" draw:layer="layout" svg:width="2.93cm" svg:height="1.096cm" draw:transform="rotate (1.5707963267949) translate (-108.336cm 77.328cm)">
            <draw:text-box>
              <text:p text:style-name="P99"><text:span text:style-name="T33">rob</text:span><text:span text:style-name="T33">ot 1</text:span></text:p>
            </draw:text-box>
          </draw:frame>
          <draw:frame draw:style-name="gr367" draw:text-style-name="P101" draw:layer="layout" svg:width="2.93cm" svg:height="1.096cm" draw:transform="rotate (1.5707963267949) translate (-108.291cm 70.891cm)">
            <draw:text-box>
              <text:p text:style-name="P99"><text:span text:style-name="T34">rob</text:span><text:span text:style-name="T34">ot 2</text:span></text:p>
            </draw:text-box>
          </draw:frame>
        </draw:g>
        <draw:frame draw:style-name="gr135" draw:text-style-name="P41" draw:layer="layout" svg:width="12.327cm" svg:height="11.85cm" svg:x="-116.896cm" svg:y="88.402cm">
          <draw:image xlink:href="Pictures/10000000000001D2000001C08A1E74B0.png" xlink:type="simple" xlink:show="embed" xlink:actuate="onLoad" draw:mime-type="image/png">
            <text:p/>
          </draw:image>
        </draw:frame>
        <draw:g draw:style-name="gr31">
          <draw:custom-shape draw:style-name="gr368" draw:text-style-name="P90" draw:layer="layout" svg:width="12.008cm" svg:height="11.486cm" svg:x="-103.797cm" svg:y="88.58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26cm" svg:height="0.259cm" draw:transform="rotate (1.5707963267949) translate (-100.059cm 91.5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7cm" svg:height="0.259cm" draw:transform="rotate (1.5707963267949) translate (-100.059cm 89.6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69" draw:text-style-name="P41" draw:layer="layout" svg:width="6.153cm" svg:height="5.641cm" svg:x="-100.902cm" svg:y="91.463cm">
            <text:p/>
            <draw:enhanced-geometry svg:viewBox="0 0 21600 21600" draw:mirror-horizontal="false" draw:mirror-vertical="false" draw:type="rectangle" draw:enhanced-path="M 0 0 L 21600 0 21600 21600 0 21600 0 0 Z N"/>
          </draw:custom-shape>
          <draw:custom-shape draw:style-name="gr370" draw:text-style-name="P41" draw:layer="layout" svg:width="10.043cm" svg:height="9.492cm" svg:x="-102.855cm" svg:y="89.55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358cm" svg:height="0.349cm" svg:x="-92.978cm" svg:y="94.33cm" svg:viewBox="0 0 359 350" draw:points="0,58 53,6 177,129 306,0 359,52 229,182 344,295 289,350 177,236 66,344 15,289 124,182">
                <draw:glue-point draw:id="4" svg:x="-0.04cm" svg:y="0.329cm"/>
                <text:p/>
              </draw:polygon>
              <draw:custom-shape draw:style-name="gr353" draw:text-style-name="P5" draw:layer="layout" svg:width="0.271cm" svg:height="0.27cm" svg:x="-93.11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3cm" svg:height="0.27cm" svg:x="-92.774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3cm" svg:height="0.272cm" svg:x="-92.774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1cm" svg:height="0.272cm" svg:x="-93.11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358cm" svg:height="0.349cm" svg:x="-94.922cm" svg:y="94.33cm" svg:viewBox="0 0 359 350" draw:points="0,58 53,6 177,129 306,0 359,52 229,182 344,295 289,350 177,236 66,344 15,289 124,182">
                <draw:glue-point draw:id="4" svg:x="-0.04cm" svg:y="0.329cm"/>
                <text:p/>
              </draw:polygon>
              <draw:custom-shape draw:style-name="gr355" draw:text-style-name="P93" draw:layer="layout" svg:width="0.272cm" svg:height="0.27cm" svg:x="-95.055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3cm" svg:height="0.27cm" svg:x="-94.719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3cm" svg:height="0.272cm" svg:x="-94.719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72cm" svg:height="0.272cm" svg:x="-95.055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257cm" svg:height="0.256cm" svg:x="-94.88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6cm" svg:height="0.256cm" svg:x="-92.9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6cm" svg:height="0.259cm" draw:transform="rotate (-3.14159265358979) translate (-100.773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8cm" svg:height="0.259cm" draw:transform="rotate (-3.14159265358979) translate (-102.716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9cm" svg:height="0.259cm" draw:transform="skewX (-0.00383972435438753) rotate (-1.57463605114929) translate (-96.075cm 96.9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9cm" svg:height="0.259cm" draw:transform="skewX (-0.00767944870877505) rotate (-1.57847577550367) translate (-96.091cm 98.9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71" draw:text-style-name="P90" draw:layer="layout" svg:width="11.823cm" svg:height="11.306cm" svg:x="-116.736cm" svg:y="88.711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8" draw:text-style-name="P91" draw:layer="layout" svg:width="0.255cm" svg:height="0.253cm" draw:transform="rotate (1.5707963267949) translate (-113.055cm 91.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4cm" svg:height="0.255cm" draw:transform="rotate (-3.14159265358979) translate (-116.119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5cm" svg:height="0.253cm" draw:transform="rotate (1.5707963267949) translate (-113.055cm 89.7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5cm" draw:transform="rotate (-3.14159265358979) translate (-113.706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72" draw:text-style-name="P102" draw:layer="layout" svg:width="0.935cm" svg:height="2.291cm" svg:x="-116.732cm" svg:y="93.218cm">
            <text:p/>
            <draw:enhanced-geometry svg:viewBox="0 0 21600 21600" draw:mirror-horizontal="false" draw:mirror-vertical="false" draw:type="rectangle" draw:enhanced-path="M 0 0 L 21600 0 21600 21600 0 21600 0 0 Z N"/>
          </draw:custom-shape>
          <draw:polygon draw:style-name="gr373" draw:text-style-name="P41" draw:layer="layout" svg:width="6.626cm" svg:height="5.551cm" svg:x="-114.456cm" svg:y="91.543cm" svg:viewBox="0 0 6627 5552" draw:points="567,5552 527,4131 31,4131 0,1499 556,1499 567,0 6627,0 6627,5552">
            <text:p/>
          </draw:polygon>
          <draw:polygon draw:style-name="gr374" draw:text-style-name="P41" draw:layer="layout" svg:width="9.94cm" svg:height="9.345cm" svg:x="-115.862cm" svg:y="89.664cm" svg:viewBox="0 0 9941 9346" draw:points="54,9346 0,5962 473,5948 527,3337 68,3325 54,0 9941,0 9941,9346">
            <text:p/>
          </draw:polygon>
          <draw:custom-shape draw:style-name="gr375" draw:text-style-name="P102" draw:layer="layout" svg:width="1.002cm" svg:height="2.291cm" svg:x="-113.886cm" svg:y="93.218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2" draw:text-style-name="P5" draw:layer="layout" svg:width="0.351cm" svg:height="0.343cm" svg:x="-115.521cm" svg:y="94.137cm" svg:viewBox="0 0 352 344" draw:points="0,57 53,6 173,129 301,0 352,51 225,179 337,291 287,344 173,230 67,337 15,287 121,179">
                <draw:glue-point draw:id="4" svg:x="-0.04cm" svg:y="0.329cm"/>
                <text:p/>
              </draw:polygon>
              <draw:custom-shape draw:style-name="gr353" draw:text-style-name="P5" draw:layer="layout" svg:width="0.27cm" svg:height="0.268cm" svg:x="-115.653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32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32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3" draw:text-style-name="P5" draw:layer="layout" svg:width="0.27cm" svg:height="0.268cm" svg:x="-115.653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4" draw:text-style-name="P93" draw:layer="layout" svg:width="0.351cm" svg:height="0.343cm" svg:x="-114.597cm" svg:y="94.137cm" svg:viewBox="0 0 352 344" draw:points="0,57 53,6 173,129 301,0 352,51 225,179 337,291 287,344 173,230 67,337 15,287 121,179">
                <draw:glue-point draw:id="4" svg:x="-0.04cm" svg:y="0.329cm"/>
                <text:p/>
              </draw:polygon>
              <draw:custom-shape draw:style-name="gr355" draw:text-style-name="P93" draw:layer="layout" svg:width="0.268cm" svg:height="0.268cm" svg:x="-114.72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39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39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93" draw:layer="layout" svg:width="0.268cm" svg:height="0.268cm" svg:x="-114.72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8" draw:text-style-name="P91" draw:layer="layout" svg:width="0.253cm" svg:height="0.253cm" svg:x="-107.961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svg:x="-106.046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4cm" svg:height="0.253cm" draw:transform="rotate (-3.14159265358979) translate (-113.79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draw:transform="rotate (-3.14159265358979) translate (-115.723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8" draw:text-style-name="P91" draw:layer="layout" svg:width="0.253cm" svg:height="0.253cm" draw:transform="skewX (-0.00401425727958696) rotate (-1.57481058407448) translate (-109.133cm 96.9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92" draw:layer="layout" svg:width="0.253cm" svg:height="0.253cm" draw:transform="skewX (-0.00401425727958696) rotate (-1.57481058407448) translate (-109.149cm 98.8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frame draw:style-name="gr135" draw:text-style-name="P41" draw:layer="layout" svg:width="16.533cm" svg:height="12.406cm" svg:x="60.243cm" svg:y="-14.131cm">
          <draw:image xlink:href="Pictures/1000000000000271000001D51A725A94.png" xlink:type="simple" xlink:show="embed" xlink:actuate="onLoad" draw:mime-type="image/png">
            <text:p/>
          </draw:image>
        </draw:frame>
        <draw:custom-shape draw:name="comment box 3" draw:style-name="gr107" draw:text-style-name="P52" xml:id="id298" draw:id="id298" draw:layer="layout" svg:width="2.6cm" svg:height="1.4cm" svg:x="30.735cm" svg:y="58.234cm">
          <text:p text:style-name="P5">In semantic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34.472cm" svg:y1="60.781cm" svg:x2="32.035cm" svg:y2="59.634cm" draw:start-shape="id243" draw:start-glue-point="0" draw:end-shape="id298" draw:end-glue-point="6" svg:d="M34472 60781c0-859-2437-286-2437-1147" svg:viewBox="0 0 2438 1148">
          <text:p/>
        </draw:connector>
        <draw:g draw:style-name="gr31">
          <draw:rect draw:style-name="gr376" draw:text-style-name="P103" draw:layer="layout" svg:width="3.611cm" svg:height="7.25cm" svg:x="236.382cm" svg:y="-9.872cm">
            <text:p/>
          </draw:rect>
          <draw:rect draw:style-name="gr377" draw:text-style-name="P104" xml:id="id299" draw:id="id299" draw:layer="layout" svg:width="3.01cm" svg:height="1.489cm" svg:x="211.272cm" svg:y="-7.578cm">
            <text:p text:style-name="P5">stimulus</text:p>
          </draw:rect>
          <draw:rect draw:style-name="gr378" draw:text-style-name="P105" xml:id="id307" draw:id="id307" draw:layer="layout" svg:width="3.01cm" svg:height="1.489cm" svg:x="236.645cm" svg:y="-9.278cm">
            <text:p text:style-name="P5">trace</text:p>
          </draw:rect>
          <draw:connector draw:style-name="gr379" draw:text-style-name="P15" draw:layer="layout" draw:type="curve" svg:x1="214.282cm" svg:y1="-6.833cm" svg:x2="215.346cm" svg:y2="-6.833cm" draw:start-shape="id299" draw:start-glue-point="1" draw:end-shape="id300" draw:end-glue-point="3" svg:d="M214282-6833h1064" svg:viewBox="0 0 1065 1">
            <text:p/>
          </draw:connector>
          <draw:connector draw:style-name="gr380" draw:text-style-name="P15" draw:layer="layout" draw:type="curve" svg:x1="235.58cm" svg:y1="-6.833cm" svg:x2="236.645cm" svg:y2="-6.832cm" draw:start-shape="id301" draw:start-glue-point="1" draw:end-shape="id302" draw:end-glue-point="3" svg:d="M235580-6833c799 0 267 1 1065 1" svg:viewBox="0 0 1066 2">
            <text:p/>
          </draw:connector>
          <draw:rect draw:style-name="gr377" draw:text-style-name="P104" xml:id="id301" draw:id="id301" draw:layer="layout" svg:width="3.01cm" svg:height="1.489cm" svg:x="232.57cm" svg:y="-7.578cm">
            <text:p text:style-name="P5">brain</text:p>
          </draw:rect>
          <draw:rect draw:style-name="gr377" draw:text-style-name="P104" xml:id="id303" draw:id="id303" draw:layer="layout" svg:width="3.01cm" svg:height="1.489cm" svg:x="207.197cm" svg:y="-7.578cm">
            <text:p text:style-name="P5">Inner style<text:line-break/>environment</text:p>
          </draw:rect>
          <draw:connector draw:style-name="gr381" draw:text-style-name="P15" draw:layer="layout" draw:type="curve" svg:x1="210.207cm" svg:y1="-6.833cm" svg:x2="211.272cm" svg:y2="-6.833cm" draw:start-shape="id303" draw:start-glue-point="1" draw:end-shape="id299" draw:end-glue-point="3" svg:d="M210207-6833h1065" svg:viewBox="0 0 1066 1">
            <text:p/>
          </draw:connector>
          <draw:rect draw:style-name="gr377" draw:text-style-name="P104" xml:id="id300" draw:id="id300" draw:layer="layout" svg:width="3.01cm" svg:height="1.489cm" svg:x="215.346cm" svg:y="-7.578cm">
            <text:p text:style-name="P5">Target<text:line-break/>robot<text:line-break/>(Self)</text:p>
          </draw:rect>
          <draw:connector draw:style-name="gr382" draw:text-style-name="P15" draw:layer="layout" draw:type="curve" svg:x1="218.356cm" svg:y1="-6.833cm" svg:x2="219.496cm" svg:y2="-6.833cm" draw:start-shape="id300" draw:start-glue-point="1" draw:end-shape="id304" draw:end-glue-point="3" svg:d="M218356-6833h1140" svg:viewBox="0 0 1141 1">
            <text:p/>
          </draw:connector>
          <draw:rect draw:style-name="gr377" draw:text-style-name="P104" xml:id="id304" draw:id="id304" draw:layer="layout" svg:width="3.01cm" svg:height="1.489cm" svg:x="219.496cm" svg:y="-7.578cm">
            <text:p text:style-name="P5">Neuron<text:line-break/>network</text:p>
          </draw:rect>
          <draw:connector draw:style-name="gr383" draw:text-style-name="P15" draw:layer="layout" draw:type="curve" svg:x1="226.892cm" svg:y1="-6.833cm" svg:x2="228.625cm" svg:y2="-6.833cm" draw:start-shape="id305" draw:start-glue-point="1" draw:end-shape="id306" draw:end-glue-point="3" svg:d="M226892-6833h1733" svg:viewBox="0 0 1734 1">
            <text:p/>
          </draw:connector>
          <draw:custom-shape draw:name="comment box 7" draw:style-name="gr384" draw:text-style-name="P52" xml:id="id308" draw:id="id308" draw:layer="layout" svg:width="3.895cm" svg:height="1.882cm" svg:x="238.43cm" svg:y="-13.304cm">
            <text:p text:style-name="P5">Labeled<text:line-break/>data point<text:line-break/>such as dictiona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9.655cm" svg:y1="-8.533cm" svg:x2="240.378cm" svg:y2="-11.422cm" draw:start-shape="id307" draw:start-glue-point="1" draw:end-shape="id308" draw:end-glue-point="6" svg:d="M239655-8533c482 0 723-963 723-2889" svg:viewBox="0 0 724 2890">
            <text:p/>
          </draw:connector>
          <draw:rect draw:style-name="gr377" draw:text-style-name="P104" xml:id="id306" draw:id="id306" draw:layer="layout" svg:width="3.01cm" svg:height="1.489cm" svg:x="228.625cm" svg:y="-7.578cm">
            <text:p text:style-name="P5">Neural<text:line-break/>coding</text:p>
          </draw:rect>
          <draw:connector draw:style-name="gr385" draw:text-style-name="P15" draw:layer="layout" draw:type="curve" svg:x1="231.635cm" svg:y1="-6.833cm" svg:x2="232.57cm" svg:y2="-6.833cm" draw:start-shape="id306" draw:start-glue-point="1" draw:end-shape="id301" draw:end-glue-point="3" svg:d="M231635-6833h935" svg:viewBox="0 0 936 1">
            <text:p/>
          </draw:connector>
          <draw:rect draw:style-name="gr377" draw:text-style-name="P104" xml:id="id305" draw:id="id305" draw:layer="layout" svg:width="3.01cm" svg:height="1.489cm" svg:x="223.882cm" svg:y="-7.578cm">
            <text:p text:style-name="P5">Action<text:line-break/>potential<text:line-break/>train</text:p>
          </draw:rect>
          <draw:connector draw:style-name="gr386" draw:text-style-name="P15" draw:layer="layout" draw:type="curve" svg:x1="222.506cm" svg:y1="-6.833cm" svg:x2="223.882cm" svg:y2="-6.833cm" draw:start-shape="id304" draw:start-glue-point="1" draw:end-shape="id305" draw:end-glue-point="3" svg:d="M222506-6833h1376" svg:viewBox="0 0 1377 1">
            <text:p/>
          </draw:connector>
          <draw:frame draw:style-name="gr135" draw:text-style-name="P41" draw:layer="layout" svg:width="10.682cm" svg:height="8.789cm" svg:x="244.044cm" svg:y="-20.169cm">
            <draw:image xlink:href="Pictures/100000000000021E000001BE5AAB2A78.png" xlink:type="simple" xlink:show="embed" xlink:actuate="onLoad" draw:mime-type="image/png">
              <text:p/>
            </draw:image>
          </draw:frame>
          <draw:rect draw:style-name="gr378" draw:text-style-name="P105" xml:id="id313" draw:id="id313" draw:layer="layout" svg:width="3.01cm" svg:height="1.489cm" svg:x="236.645cm" svg:y="-4.277cm">
            <text:p text:style-name="P5">trace</text:p>
          </draw:rect>
          <draw:rect draw:style-name="gr378" draw:text-style-name="P105" xml:id="id302" draw:id="id302" draw:layer="layout" svg:width="3.01cm" svg:height="1.489cm" svg:x="236.645cm" svg:y="-7.577cm">
            <text:p text:style-name="P5">trace</text:p>
          </draw:rect>
          <draw:frame draw:style-name="gr387" draw:text-style-name="P39" draw:layer="layout" svg:width="0.621cm" svg:height="1.673cm" svg:x="237.786cm" svg:y="-6.053cm">
            <draw:text-box>
              <text:p><text:span text:style-name="T17">.</text:span><text:span text:style-name="T17"><text:line-break/></text:span><text:span text:style-name="T17">.</text:span><text:span text:style-name="T17"><text:line-break/></text:span><text:span text:style-name="T17">.</text:span></text:p>
            </draw:text-box>
          </draw:frame>
          <draw:rect draw:style-name="gr388" draw:text-style-name="P23" xml:id="id309" draw:id="id309" draw:layer="layout" svg:width="3.01cm" svg:height="1.489cm" svg:x="241.467cm" svg:y="-7.032cm">
            <text:p text:style-name="P5">Episode</text:p>
          </draw:rect>
          <draw:frame draw:style-name="gr389" draw:text-style-name="P38" xml:id="id314" draw:id="id314" draw:layer="layout" svg:width="2.775cm" svg:height="0.725cm" svg:x="236.375cm" svg:y="-9.938cm">
            <draw:text-box>
              <text:p>Trace group</text:p>
            </draw:text-box>
          </draw:frame>
          <draw:rect draw:style-name="gr390" draw:text-style-name="P106" draw:layer="layout" svg:width="4.727cm" svg:height="7.25cm" svg:x="245.382cm" svg:y="-9.872cm">
            <text:p/>
          </draw:rect>
          <draw:rect draw:style-name="gr391" draw:text-style-name="P107" xml:id="id310" draw:id="id310" draw:layer="layout" svg:width="4.153cm" svg:height="1.489cm" svg:x="245.645cm" svg:y="-9.278cm">
            <text:p text:style-name="P5">Modality<text:line-break/>(ie times-ranges)</text:p>
          </draw:rect>
          <draw:rect draw:style-name="gr392" draw:text-style-name="P108" xml:id="id312" draw:id="id312" draw:layer="layout" svg:width="4.153cm" svg:height="1.489cm" svg:x="245.645cm" svg:y="-4.277cm">
            <text:p text:style-name="P3">Modality</text:p>
          </draw:rect>
          <draw:rect draw:style-name="gr393" draw:text-style-name="P108" xml:id="id311" draw:id="id311" draw:layer="layout" svg:width="4.153cm" svg:height="1.489cm" svg:x="245.645cm" svg:y="-7.577cm">
            <text:p text:style-name="P3">Modality<text:line-break/>(ie time-positions)</text:p>
          </draw:rect>
          <draw:frame draw:style-name="gr387" draw:text-style-name="P39" draw:layer="layout" svg:width="0.621cm" svg:height="1.673cm" svg:x="247.286cm" svg:y="-6.053cm">
            <draw:text-box>
              <text:p><text:span text:style-name="T17">.</text:span><text:span text:style-name="T17"><text:line-break/></text:span><text:span text:style-name="T17">.</text:span><text:span text:style-name="T17"><text:line-break/></text:span><text:span text:style-name="T17">.</text:span></text:p>
            </draw:text-box>
          </draw:frame>
          <draw:frame draw:style-name="gr389" draw:text-style-name="P38" draw:layer="layout" svg:width="2.775cm" svg:height="0.725cm" svg:x="245.375cm" svg:y="-9.938cm">
            <draw:text-box>
              <text:p>modalities</text:p>
            </draw:text-box>
          </draw:frame>
          <draw:connector draw:style-name="gr394" draw:text-style-name="P15" draw:layer="layout" draw:type="curve" svg:x1="244.477cm" svg:y1="-6.287cm" svg:x2="245.645cm" svg:y2="-8.533cm" draw:start-shape="id309" draw:start-glue-point="1" draw:end-shape="id310" draw:end-glue-point="3" svg:d="M244477-6287c876 0 292-2246 1168-2246" svg:viewBox="0 0 1169 2247">
            <text:p/>
          </draw:connector>
          <draw:connector draw:style-name="gr395" draw:text-style-name="P15" draw:layer="layout" draw:type="curve" svg:x1="244.477cm" svg:y1="-6.287cm" svg:x2="245.645cm" svg:y2="-6.832cm" draw:start-shape="id309" draw:start-glue-point="1" draw:end-shape="id311" svg:d="M244477-6287c876 0 292-545 1168-545" svg:viewBox="0 0 1169 546">
            <text:p/>
          </draw:connector>
          <draw:connector draw:style-name="gr396" draw:text-style-name="P15" draw:layer="layout" draw:type="curve" svg:x1="244.477cm" svg:y1="-6.287cm" svg:x2="245.645cm" svg:y2="-3.532cm" draw:start-shape="id309" draw:start-glue-point="1" draw:end-shape="id312" draw:end-glue-point="3" svg:d="M244477-6287c876 0 292 2755 1168 2755" svg:viewBox="0 0 1169 2756">
            <text:p/>
          </draw:connector>
          <draw:connector draw:style-name="gr397" draw:text-style-name="P15" draw:layer="layout" draw:type="curve" svg:x1="239.655cm" svg:y1="-8.533cm" svg:x2="241.467cm" svg:y2="-6.287cm" draw:start-shape="id307" draw:start-glue-point="1" draw:end-shape="id309" draw:end-glue-point="3" svg:d="M239655-8533c1359 0 453 2246 1812 2246" svg:viewBox="0 0 1813 2247">
            <text:p/>
          </draw:connector>
          <draw:connector draw:style-name="gr398" draw:text-style-name="P15" draw:layer="layout" draw:type="curve" svg:x1="239.655cm" svg:y1="-6.832cm" svg:x2="241.467cm" svg:y2="-6.287cm" draw:start-shape="id302" draw:start-glue-point="1" draw:end-shape="id309" draw:end-glue-point="3" svg:d="M239655-6832c1359 0 453 545 1812 545" svg:viewBox="0 0 1813 546">
            <text:p/>
          </draw:connector>
          <draw:connector draw:style-name="gr399" draw:text-style-name="P15" draw:layer="layout" draw:type="curve" svg:x1="239.655cm" svg:y1="-3.532cm" svg:x2="241.467cm" svg:y2="-6.287cm" draw:start-shape="id313" draw:start-glue-point="1" draw:end-shape="id309" draw:end-glue-point="3" svg:d="M239655-3532c1359 0 453-2755 1812-2755" svg:viewBox="0 0 1813 2756">
            <text:p/>
          </draw:connector>
          <draw:custom-shape draw:name="comment box 8" draw:style-name="gr384" draw:text-style-name="P52" xml:id="id315" draw:id="id315" draw:layer="layout" svg:width="3.895cm" svg:height="1.882cm" svg:x="232.675cm" svg:y="-13.766cm">
            <text:p text:style-name="P5">One nested label set<text:line-break/>but for each lable<text:line-break/>there might be a sequence of<text:line-break/>bumerical data</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7.762cm" svg:y1="-9.938cm" svg:x2="234.623cm" svg:y2="-11.884cm" draw:start-shape="id314" draw:end-shape="id315" draw:end-glue-point="6" svg:d="M237762-9938c0-1458-3139-485-3139-1946" svg:viewBox="0 0 3140 1947">
            <text:p/>
          </draw:connector>
        </draw:g>
        <draw:rect draw:style-name="gr41" draw:text-style-name="P5" xml:id="id316" draw:id="id316" draw:layer="layout" svg:width="3.01cm" svg:height="1.489cm" svg:x="258.162cm" svg:y="-7.1cm">
          <text:p text:style-name="P5">Episode</text:p>
        </draw:rect>
        <draw:rect draw:style-name="gr41" draw:text-style-name="P5" xml:id="id317" draw:id="id317" draw:layer="layout" svg:width="3.01cm" svg:height="1.489cm" svg:x="258.162cm" svg:y="-3.883cm">
          <text:p text:style-name="P5">parts</text:p>
        </draw:rect>
        <draw:rect draw:style-name="gr41" draw:text-style-name="P5" xml:id="id321" draw:id="id321" draw:layer="layout" svg:width="3.01cm" svg:height="1.489cm" svg:x="261.697cm" svg:y="3.118cm">
          <text:p text:style-name="P5">action</text:p>
        </draw:rect>
        <draw:rect draw:style-name="gr41" draw:text-style-name="P5" xml:id="id322" draw:id="id322" draw:layer="layout" svg:width="3.01cm" svg:height="1.489cm" svg:x="261.67cm" svg:y="5.897cm">
          <text:p text:style-name="P5">property</text:p>
        </draw:rect>
        <draw:rect draw:style-name="gr41" draw:text-style-name="P5" xml:id="id319" draw:id="id319" draw:layer="layout" svg:width="3.01cm" svg:height="1.489cm" svg:x="258.162cm" svg:y="0.338cm">
          <text:p text:style-name="P5">time</text:p>
        </draw:rect>
        <draw:rect draw:style-name="gr41" draw:text-style-name="P5" xml:id="id318" draw:id="id318" draw:layer="layout" svg:width="3.01cm" svg:height="1.489cm" svg:x="254.728cm" svg:y="0.338cm">
          <text:p text:style-name="P5">location</text:p>
        </draw:rect>
        <draw:connector draw:style-name="gr400" draw:text-style-name="P15" draw:layer="layout" draw:type="curve" svg:x1="259.667cm" svg:y1="-5.611cm" svg:x2="259.667cm" svg:y2="-3.883cm" draw:start-shape="id316" draw:start-glue-point="2" draw:end-shape="id317" draw:end-glue-point="0" svg:d="M259667-5611v1728" svg:viewBox="0 0 1 1729">
          <text:p/>
        </draw:connector>
        <draw:connector draw:style-name="gr401" draw:text-style-name="P15" draw:layer="layout" draw:type="curve" svg:x1="259.667cm" svg:y1="-2.394cm" svg:x2="256.233cm" svg:y2="0.338cm" draw:start-shape="id317" draw:start-glue-point="2" draw:end-shape="id318" draw:end-glue-point="0" svg:d="M259667-2394c0 2050-3434 685-3434 2732" svg:viewBox="0 0 3435 2733">
          <text:p/>
        </draw:connector>
        <draw:connector draw:style-name="gr402" draw:text-style-name="P15" draw:layer="layout" draw:type="curve" svg:x1="259.667cm" svg:y1="-2.394cm" svg:x2="259.667cm" svg:y2="0.338cm" draw:start-shape="id317" draw:start-glue-point="2" draw:end-shape="id319" draw:end-glue-point="0" svg:d="M259667-2394v2732" svg:viewBox="0 0 1 2733">
          <text:p/>
        </draw:connector>
        <draw:connector draw:style-name="gr403" draw:text-style-name="P15" draw:layer="layout" draw:type="curve" svg:x1="263.136cm" svg:y1="1.827cm" svg:x2="263.202cm" svg:y2="3.118cm" draw:start-shape="id320" draw:end-shape="id321" draw:end-glue-point="0" svg:d="M263136 1827c0 969 66 324 66 1291" svg:viewBox="0 0 67 1292">
          <text:p/>
        </draw:connector>
        <draw:connector draw:style-name="gr404" draw:text-style-name="P15" draw:layer="layout" draw:type="curve" svg:x1="263.202cm" svg:y1="4.607cm" svg:x2="263.175cm" svg:y2="5.897cm" draw:start-shape="id321" draw:start-glue-point="2" draw:end-shape="id322" draw:end-glue-point="0" svg:d="M263202 4607c0 967-27 323-27 1290" svg:viewBox="0 0 28 1291">
          <text:p/>
        </draw:connector>
        <draw:rect draw:style-name="gr41" draw:text-style-name="P5" xml:id="id320" draw:id="id320" draw:layer="layout" svg:width="3.01cm" svg:height="1.489cm" svg:x="261.631cm" svg:y="0.338cm">
          <text:p text:style-name="P5">event</text:p>
        </draw:rect>
        <draw:connector draw:style-name="gr405" draw:text-style-name="P15" draw:layer="layout" draw:type="curve" svg:x1="259.667cm" svg:y1="-2.394cm" svg:x2="263.136cm" svg:y2="0.338cm" draw:start-shape="id317" draw:start-glue-point="2" draw:end-shape="id320" draw:end-glue-point="0" svg:d="M259667-2394c0 2050 3469 685 3469 2732" svg:viewBox="0 0 3470 2733">
          <text:p/>
        </draw:connector>
        <draw:frame draw:style-name="gr135" draw:text-style-name="P41" draw:layer="layout" svg:width="18.729cm" svg:height="13.067cm" svg:x="208.651cm" svg:y="-22.576cm">
          <draw:image xlink:href="Pictures/10000000000002C4000001EEEA2707B2.png" xlink:type="simple" xlink:show="embed" xlink:actuate="onLoad" draw:mime-type="image/png">
            <text:p/>
          </draw:image>
        </draw:frame>
        <draw:connector draw:style-name="gr406" draw:text-style-name="P15" draw:layer="layout" draw:type="curve" svg:x1="112.942cm" svg:y1="31.205cm" svg:x2="113.005cm" svg:y2="32.625cm" draw:start-shape="id267" draw:start-glue-point="2" draw:end-shape="id323" svg:d="M112942 31205c0 1065 63 355 63 1420" svg:viewBox="0 0 64 1421">
          <text:p/>
        </draw:connector>
        <draw:frame draw:style-name="gr135" draw:text-style-name="P41" draw:layer="layout" svg:width="18.252cm" svg:height="25.316cm" svg:x="105.306cm" svg:y="-33.832cm">
          <draw:image xlink:href="Pictures/10000000000002B2000003BD26BB6070.png" xlink:type="simple" xlink:show="embed" xlink:actuate="onLoad" draw:mime-type="image/png">
            <text:p/>
          </draw:image>
        </draw:frame>
        <draw:rect draw:style-name="gr407" draw:text-style-name="P105" draw:layer="layout" svg:width="3.439cm" svg:height="4.472cm" svg:x="-55.906cm" svg:y="15.663cm">
          <text:p/>
        </draw:rect>
        <draw:rect draw:style-name="gr408" draw:text-style-name="P109" xml:id="id325" draw:id="id325" draw:layer="layout" svg:width="2.256cm" svg:height="1.003cm" svg:x="-55.314cm" svg:y="18.923cm">
          <text:p text:style-name="P5"><text:span text:style-name="T35">Suprise </text:span><text:span text:style-name="T35"><text:line-break/></text:span><text:span text:style-name="T35">Poise</text:span></text:p>
        </draw:rect>
        <draw:connector draw:style-name="gr409" draw:text-style-name="P15" draw:layer="layout" draw:type="curve" svg:x1="-54.186cm" svg:y1="17.186cm" svg:x2="-54.186cm" svg:y2="18.923cm" draw:start-shape="id324" draw:start-glue-point="2" draw:end-shape="id325" draw:end-glue-point="0" svg:d="M-54186 17186v1737" svg:viewBox="0 0 1 1738">
          <text:p/>
        </draw:connector>
        <draw:rect draw:style-name="gr410" draw:text-style-name="P110" xml:id="id324" draw:id="id324" draw:layer="layout" svg:width="2.726cm" svg:height="1.24cm" svg:x="-55.549cm" svg:y="15.946cm">
          <text:p text:style-name="P5"><text:span text:style-name="T26">composite</text:span><text:span text:style-name="T26"><text:line-break/></text:span><text:span text:style-name="T26">goal</text:span></text:p>
        </draw:rect>
        <draw:rect draw:style-name="gr388" draw:text-style-name="P111" draw:layer="layout" svg:width="2.256cm" svg:height="1.003cm" svg:x="-51.234cm" svg:y="17.569cm">
          <text:p text:style-name="P5"><text:span text:style-name="T17">Plan</text:span><text:span text:style-name="T17">ning</text:span></text:p>
        </draw:rect>
        <draw:rect draw:style-name="gr407" draw:text-style-name="P105" draw:layer="layout" svg:width="3.439cm" svg:height="4.472cm" svg:x="-47.912cm" svg:y="15.663cm">
          <text:p/>
        </draw:rect>
        <draw:rect draw:style-name="gr408" draw:text-style-name="P112" xml:id="id327" draw:id="id327" draw:layer="layout" svg:width="2.256cm" svg:height="1.003cm" svg:x="-47.32cm" svg:y="18.923cm">
          <text:p text:style-name="P5"><text:span text:style-name="T35">Supri</text:span><text:span text:style-name="T35">se </text:span><text:span text:style-name="T35"><text:line-break/></text:span><text:span text:style-name="T35">redu</text:span><text:span text:style-name="T35">ction</text:span></text:p>
        </draw:rect>
        <draw:connector draw:style-name="gr409" draw:text-style-name="P15" draw:layer="layout" draw:type="curve" svg:x1="-46.192cm" svg:y1="17.186cm" svg:x2="-46.192cm" svg:y2="18.923cm" draw:start-shape="id326" draw:start-glue-point="2" draw:end-shape="id327" draw:end-glue-point="0" svg:d="M-46192 17186v1737" svg:viewBox="0 0 1 1738">
          <text:p/>
        </draw:connector>
        <draw:rect draw:style-name="gr410" draw:text-style-name="P110" xml:id="id326" draw:id="id326" draw:layer="layout" svg:width="2.726cm" svg:height="1.24cm" svg:x="-47.555cm" svg:y="15.946cm">
          <text:p text:style-name="P5"><text:span text:style-name="T26">composite</text:span><text:span text:style-name="T26"><text:line-break/></text:span><text:span text:style-name="T26">action</text:span></text:p>
        </draw:rect>
        <draw:custom-shape draw:style-name="gr411" draw:text-style-name="P41" draw:layer="layout" svg:width="0.393cm" svg:height="4.069cm" svg:x="-44.19cm" svg:y="15.94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2" draw:text-style-name="P38" draw:layer="layout" svg:width="1.306cm" svg:height="0.725cm" svg:x="-43.754cm" svg:y="17.552cm">
          <draw:text-box>
            <text:p>plan</text:p>
          </draw:text-box>
        </draw:frame>
        <draw:custom-shape draw:style-name="gr411" draw:text-style-name="P41" draw:layer="layout" svg:width="0.393cm" svg:height="4.069cm" draw:transform="rotate (-3.14159265358979) translate (-56.276cm 19.9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3" draw:text-style-name="P38" draw:layer="layout" svg:width="1.399cm" svg:height="0.725cm" svg:x="-58.208cm" svg:y="17.564cm">
          <draw:text-box>
            <text:p>Goal</text:p>
          </draw:text-box>
        </draw:frame>
        <draw:custom-shape draw:style-name="gr414" draw:text-style-name="P113" draw:layer="layout" svg:width="0.593cm" svg:height="0.868cm" svg:x="-48.768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14" draw:text-style-name="P113" draw:layer="layout" svg:width="0.593cm" svg:height="0.868cm" svg:x="-52.167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name="comment box 9" draw:style-name="gr107" draw:text-style-name="P114" xml:id="id328" draw:id="id328" draw:layer="layout" svg:width="2.6cm" svg:height="1.4cm" svg:x="-53.024cm" svg:y="13.919cm">
          <text:p text:style-name="P19"><text:span text:style-name="T4">Keeping suprise</text:span><text:span text:style-name="T4"><text:line-break/></text:span><text:span text:style-name="T4">level below </text:span><text:span text:style-name="T4"><text:line-break/></text:span><text:span text:style-name="T4">threshol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53.058cm" svg:y1="19.424cm" svg:x2="-51.724cm" svg:y2="15.319cm" draw:start-shape="id325" draw:start-glue-point="1" draw:end-shape="id328" draw:end-glue-point="6" svg:d="M-53058 19424c890 0 1334-1368 1334-4105" svg:viewBox="0 0 1335 4106">
          <text:p/>
        </draw:connector>
        <draw:rect draw:style-name="gr408" draw:text-style-name="P115" xml:id="id329" draw:id="id329" draw:layer="layout" svg:width="2.714cm" svg:height="1.841cm" svg:x="-47.549cm" svg:y="23.785cm">
          <text:p text:style-name="P5"><text:span text:style-name="T36">Buil</text:span><text:span text:style-name="T36">din</text:span><text:span text:style-name="T36">g</text:span><text:span text:style-name="T36"><text:line-break/></text:span><text:span text:style-name="T36">fore</text:span><text:span text:style-name="T36">cast</text:span><text:span text:style-name="T36">ing </text:span><text:span text:style-name="T36"><text:line-break/></text:span><text:span text:style-name="T36">tran</text:span><text:span text:style-name="T36">sfor</text:span><text:span text:style-name="T36">mer</text:span><text:span text:style-name="T36"><text:line-break/></text:span><text:span text:style-name="T36">mo</text:span><text:span text:style-name="T36">dels </text:span></text:p>
        </draw:rect>
        <draw:connector draw:style-name="gr415" draw:text-style-name="P15" draw:layer="layout" draw:type="curve" svg:x1="-46.192cm" svg:y1="23.785cm" svg:x2="-46.192cm" svg:y2="22.771cm" draw:start-shape="id329" draw:start-glue-point="0" draw:end-shape="id330" draw:end-glue-point="2" svg:d="M-46192 23785v-1014" svg:viewBox="0 0 1 1015">
          <text:p/>
        </draw:connector>
        <draw:rect draw:style-name="gr408" draw:text-style-name="P115" xml:id="id330" draw:id="id330" draw:layer="layout" svg:width="2.714cm" svg:height="1.841cm" svg:x="-47.549cm" svg:y="20.93cm">
          <text:p text:style-name="P5"><text:span text:style-name="T36">Learning by </text:span><text:span text:style-name="T36"><text:line-break/></text:span><text:span text:style-name="T36">demonstration</text:span></text:p>
        </draw:rect>
        <draw:connector draw:style-name="gr416" draw:text-style-name="P15" draw:layer="layout" draw:type="curve" svg:x1="-46.192cm" svg:y1="20.93cm" svg:x2="-46.192cm" svg:y2="19.926cm" draw:start-shape="id330" draw:start-glue-point="0" draw:end-shape="id327" draw:end-glue-point="2" svg:d="M-46192 20930v-1004" svg:viewBox="0 0 1 1005">
          <text:p/>
        </draw:connector>
        <draw:rect draw:style-name="gr408" draw:text-style-name="P115" xml:id="id331" draw:id="id331" draw:layer="layout" svg:width="2.714cm" svg:height="1.841cm" svg:x="-47.549cm" svg:y="26.586cm">
          <text:p text:style-name="P5"><text:span text:style-name="T36">improvi</text:span><text:span text:style-name="T36">ng</text:span><text:span text:style-name="T36"><text:line-break/></text:span><text:span text:style-name="T36">forecas</text:span><text:span text:style-name="T36">ting </text:span><text:span text:style-name="T36"><text:line-break/></text:span><text:span text:style-name="T36">transfo</text:span><text:span text:style-name="T36">rmer</text:span><text:span text:style-name="T36"><text:line-break/></text:span><text:span text:style-name="T36">models </text:span></text:p>
        </draw:rect>
        <draw:rect draw:style-name="gr408" draw:text-style-name="P115" draw:layer="layout" svg:width="2.714cm" svg:height="1.841cm" svg:x="-49.606cm" svg:y="29.466cm">
          <text:p text:style-name="P5"><text:span text:style-name="T36">Clustering</text:span><text:span text:style-name="T36"><text:line-break/></text:span><text:span text:style-name="T36">then training</text:span><text:span text:style-name="T36"><text:line-break/></text:span><text:span text:style-name="T36">forecasting</text:span></text:p>
        </draw:rect>
        <draw:connector draw:style-name="gr417" draw:text-style-name="P15" draw:layer="layout" draw:type="curve" svg:x1="-46.192cm" svg:y1="26.586cm" svg:x2="-46.192cm" svg:y2="25.626cm" draw:start-shape="id331" draw:start-glue-point="0" draw:end-shape="id329" draw:end-glue-point="2" svg:d="M-46192 26586v-960" svg:viewBox="0 0 1 961">
          <text:p/>
        </draw:connector>
        <draw:connector draw:style-name="gr418" draw:text-style-name="P15" draw:layer="layout" draw:type="curve" svg:x1="-47.406cm" svg:y1="29.466cm" svg:x2="-46.192cm" svg:y2="28.427cm" draw:end-shape="id331" draw:end-glue-point="2" svg:d="M-47406 29466c0-403 1214 116 1214-1039" svg:viewBox="0 0 1215 1040">
          <text:p/>
        </draw:connector>
        <draw:rect draw:style-name="gr408" draw:text-style-name="P115" xml:id="id332" draw:id="id332" draw:layer="layout" svg:width="2.714cm" svg:height="1.841cm" svg:x="-45.835cm" svg:y="29.484cm">
          <text:p text:style-name="P5"><text:span text:style-name="T36">Using KF</text:span><text:span text:style-name="T36"><text:line-break/></text:span><text:span text:style-name="T36">in predictions</text:span></text:p>
        </draw:rect>
        <draw:connector draw:style-name="gr419" draw:text-style-name="P15" draw:layer="layout" draw:type="curve" svg:x1="-44.478cm" svg:y1="29.484cm" svg:x2="-46.192cm" svg:y2="28.427cm" draw:start-shape="id332" draw:start-glue-point="0" draw:end-shape="id331" draw:end-glue-point="2" svg:d="M-44478 29484c0-792-1714-264-1714-1057" svg:viewBox="0 0 1715 1058">
          <text:p/>
        </draw:connector>
        <draw:rect draw:name="goal kinds 2" draw:style-name="gr40" draw:text-style-name="P32" draw:layer="layout" svg:width="1.9cm" svg:height="0.9cm" svg:x="-51.816cm" svg:y="1.848cm">
          <text:p text:style-name="P5">Goal</text:p>
        </draw:rect>
        <draw:rect draw:name="goal kinds 3" draw:style-name="gr388" draw:text-style-name="P23" xml:id="id333" draw:id="id333" draw:layer="layout" svg:width="4.06cm" svg:height="1.64cm" svg:x="-25.434cm" svg:y="0.57cm">
          <text:p text:style-name="P5">Default biological <text:line-break/>goals</text:p>
        </draw:rect>
        <draw:connector draw:style-name="gr420" draw:text-style-name="P15" draw:layer="layout" draw:type="curve" svg:x1="-23.404cm" svg:y1="2.21cm" svg:x2="-30.212cm" svg:y2="4.909cm" draw:start-shape="id333" draw:start-glue-point="2" draw:end-shape="id334" svg:d="M-23404 2210c0 2025-6808 676-6808 2699" svg:viewBox="0 0 6809 2700">
          <text:p/>
        </draw:connector>
        <draw:connector draw:style-name="gr421" draw:text-style-name="P15" draw:layer="layout" draw:type="curve" svg:x1="-23.404cm" svg:y1="2.21cm" svg:x2="-25.726cm" svg:y2="4.925cm" draw:start-shape="id333" draw:start-glue-point="2" draw:end-shape="id335" svg:d="M-23404 2210c0 2037-2322 680-2322 2715" svg:viewBox="0 0 2323 2716">
          <text:p/>
        </draw:connector>
        <draw:rect draw:style-name="gr37" draw:text-style-name="P116" xml:id="id334" draw:id="id334" draw:layer="layout" svg:width="3.177cm" svg:height="1.897cm" svg:x="-31.801cm" svg:y="4.909cm">
          <text:p text:style-name="P8"><text:span text:style-name="T5">Surprise poise</text:span><text:span text:style-name="T5"><text:line-break/></text:span><text:span text:style-name="T5">(keeping surprise</text:span><text:span text:style-name="T5"><text:line-break/></text:span><text:span text:style-name="T5">below a tolerance)</text:span></text:p>
        </draw:rect>
        <draw:rect draw:style-name="gr38" draw:text-style-name="P4" xml:id="id335" draw:id="id335" draw:layer="layout" svg:width="3.67cm" svg:height="1.892cm" svg:x="-27.561cm" svg:y="4.925cm">
          <text:p text:style-name="P5"><text:span text:style-name="T2">Homeostasis</text:span><text:span text:style-name="T2"><text:line-break/></text:span><text:span text:style-name="T2">(keeping the physical</text:span><text:span text:style-name="T2"><text:line-break/></text:span><text:span text:style-name="T2">and chemical </text:span><text:span text:style-name="T2"><text:line-break/></text:span><text:span text:style-name="T2">conditions, balanced)</text:span></text:p>
        </draw:rect>
        <draw:rect draw:style-name="gr292" draw:text-style-name="P35" xml:id="id336" draw:id="id336" draw:layer="layout" svg:width="2.3cm" svg:height="1cm" svg:x="45.707cm" svg:y="59.941cm">
          <text:p text:style-name="P5">Action<text:line-break/>types</text:p>
        </draw:rect>
        <draw:connector draw:style-name="gr422" draw:text-style-name="P15" draw:layer="layout" draw:type="curve" svg:x1="46.254cm" svg:y1="57.528cm" svg:x2="46.857cm" svg:y2="59.941cm" draw:start-shape="id231" draw:start-glue-point="2" draw:end-shape="id336" draw:end-glue-point="0" svg:d="M46254 57528c0 1810 603 604 603 2413" svg:viewBox="0 0 604 2414">
          <text:p/>
        </draw:connector>
        <draw:rect draw:style-name="gr292" draw:text-style-name="P35" xml:id="id338" draw:id="id338" draw:layer="layout" svg:width="2.3cm" svg:height="1cm" svg:x="41.538cm" svg:y="59.541cm">
          <text:p text:style-name="P5">Plan</text:p>
        </draw:rect>
        <draw:rect draw:style-name="gr292" draw:text-style-name="P35" xml:id="id337" draw:id="id337" draw:layer="layout" svg:width="2.3cm" svg:height="1cm" svg:x="45.707cm" svg:y="61.675cm">
          <text:p text:style-name="P5">Suprise<text:line-break/>poise</text:p>
        </draw:rect>
        <draw:connector draw:style-name="gr423" draw:text-style-name="P15" draw:layer="layout" draw:type="curve" svg:x1="46.857cm" svg:y1="60.941cm" svg:x2="46.857cm" svg:y2="61.675cm" draw:start-shape="id336" draw:start-glue-point="2" draw:end-shape="id337" draw:end-glue-point="0" svg:d="M46857 60941v734" svg:viewBox="0 0 1 735">
          <text:p/>
        </draw:connector>
        <draw:connector draw:style-name="gr424" draw:text-style-name="P15" draw:layer="layout" draw:type="curve" svg:x1="46.254cm" svg:y1="57.528cm" svg:x2="42.688cm" svg:y2="59.541cm" draw:start-shape="id231" draw:start-glue-point="2" draw:end-shape="id338" draw:end-glue-point="0" svg:d="M46254 57528c0 1510-3566 504-3566 2013" svg:viewBox="0 0 3567 2014">
          <text:p/>
        </draw:connector>
        <draw:rect draw:style-name="gr292" draw:text-style-name="P35" xml:id="id339" draw:id="id339" draw:layer="layout" svg:width="2.3cm" svg:height="1cm" svg:x="63.329cm" svg:y="55.972cm">
          <text:p text:style-name="P5">Running<text:line-break/>plan</text:p>
        </draw:rect>
        <draw:connector draw:style-name="gr425" draw:text-style-name="P15" draw:layer="layout" draw:type="curve" svg:x1="60.954cm" svg:y1="54.528cm" svg:x2="64.479cm" svg:y2="55.972cm" draw:start-shape="id236" draw:start-glue-point="2" draw:end-shape="id339" draw:end-glue-point="0" svg:d="M60954 54528c0 1083 3525 361 3525 1444" svg:viewBox="0 0 3526 1445">
          <text:p/>
        </draw:connector>
        <draw:rect draw:style-name="gr292" draw:text-style-name="P35" xml:id="id340" draw:id="id340" draw:layer="layout" svg:width="2.3cm" svg:height="1cm" svg:x="60.945cm" svg:y="58.704cm">
          <text:p text:style-name="P5">Goal<text:line-break/>composite</text:p>
        </draw:rect>
        <draw:rect draw:style-name="gr292" draw:text-style-name="P35" xml:id="id341" draw:id="id341" draw:layer="layout" svg:width="2.3cm" svg:height="1cm" svg:x="65.867cm" svg:y="58.704cm">
          <text:p text:style-name="P5">Action<text:line-break/>composite</text:p>
        </draw:rect>
        <draw:connector draw:style-name="gr426" draw:text-style-name="P15" draw:layer="layout" draw:type="curve" svg:x1="63.245cm" svg:y1="59.204cm" svg:x2="65.867cm" svg:y2="59.204cm" draw:start-shape="id340" draw:start-glue-point="1" draw:end-shape="id341" draw:end-glue-point="3" svg:d="M63245 59204h2622" svg:viewBox="0 0 2623 1">
          <text:p text:style-name="P5">updates</text:p>
        </draw:connector>
        <draw:connector draw:style-name="gr427" draw:text-style-name="P15" draw:layer="layout" draw:type="curve" svg:x1="64.479cm" svg:y1="56.972cm" svg:x2="62.095cm" svg:y2="58.704cm" draw:start-shape="id339" draw:start-glue-point="2" draw:end-shape="id340" draw:end-glue-point="0" svg:d="M64479 56972c0 1299-2384 433-2384 1732" svg:viewBox="0 0 2385 1733">
          <text:p/>
        </draw:connector>
        <draw:connector draw:style-name="gr428" draw:text-style-name="P15" draw:layer="layout" draw:type="curve" svg:x1="64.479cm" svg:y1="56.972cm" svg:x2="67.017cm" svg:y2="58.704cm" draw:start-shape="id339" draw:start-glue-point="2" draw:end-shape="id341" draw:end-glue-point="0" svg:d="M64479 56972c0 1299 2538 433 2538 1732" svg:viewBox="0 0 2539 1733">
          <text:p/>
        </draw:connector>
        <draw:frame draw:style-name="gr135" draw:text-style-name="P41" draw:layer="layout" svg:width="10.319cm" svg:height="9.944cm" svg:x="72.745cm" svg:y="89.723cm">
          <draw:image xlink:href="Pictures/100000000000022600000212DA83A646.png" xlink:type="simple" xlink:show="embed" xlink:actuate="onLoad" draw:mime-type="image/png">
            <text:p/>
          </draw:image>
        </draw:frame>
        <draw:rect draw:style-name="gr38" draw:text-style-name="P29" xml:id="id342" draw:id="id342" draw:layer="layout" svg:width="2.714cm" svg:height="1.895cm" svg:x="-22.366cm" svg:y="4.979cm">
          <text:p text:style-name="P5"><text:span text:style-name="T2">Epistemic </text:span><text:span text:style-name="T2"><text:line-break/></text:span><text:span text:style-name="T2">foraging</text:span><text:span text:style-name="T2"><text:line-break/></text:span><text:span text:style-name="T2">(seeking env for </text:span><text:span text:style-name="T2"><text:line-break/></text:span><text:span text:style-name="T2">food info)</text:span></text:p>
        </draw:rect>
        <draw:rect draw:style-name="gr39" draw:text-style-name="P31" xml:id="id343" draw:id="id343" draw:layer="layout" svg:width="2.714cm" svg:height="1.895cm" svg:x="-17.65cm" svg:y="5.008cm">
          <text:p text:style-name="P30"><text:span text:style-name="T16">Allostasis</text:span><text:span text:style-name="T16"><text:line-break/></text:span><text:span text:style-name="T16">(energy</text:span><text:span text:style-name="T16"><text:line-break/></text:span><text:span text:style-name="T16">adjustmnt)</text:span></text:p>
        </draw:rect>
        <draw:connector draw:style-name="gr429" draw:text-style-name="P15" draw:layer="layout" draw:type="curve" svg:x1="-23.404cm" svg:y1="2.21cm" svg:x2="-21.009cm" svg:y2="4.979cm" draw:start-shape="id333" draw:start-glue-point="2" draw:end-shape="id342" draw:end-glue-point="0" svg:d="M-23404 2210c0 2077 2395 693 2395 2769" svg:viewBox="0 0 2396 2770">
          <text:p/>
        </draw:connector>
        <draw:connector draw:style-name="gr430" draw:text-style-name="P15" draw:layer="layout" draw:type="curve" svg:x1="-23.404cm" svg:y1="2.21cm" svg:x2="-16.293cm" svg:y2="5.008cm" draw:start-shape="id333" draw:start-glue-point="2" draw:end-shape="id343" draw:end-glue-point="0" svg:d="M-23404 2210c0 2098 7111 700 7111 2798" svg:viewBox="0 0 7112 2799">
          <text:p/>
        </draw:connector>
        <draw:rect draw:name="goal kinds 6" draw:style-name="gr388" draw:text-style-name="P23" xml:id="id344" draw:id="id344" draw:layer="layout" svg:width="4.06cm" svg:height="1.64cm" svg:x="-25.168cm" svg:y="10.138cm">
          <text:p text:style-name="P5">Biological <text:line-break/>goals that I know of</text:p>
        </draw:rect>
        <draw:connector draw:style-name="gr420" draw:text-style-name="P15" draw:layer="layout" draw:type="curve" svg:x1="-23.138cm" svg:y1="11.778cm" svg:x2="-26.517cm" svg:y2="14.393cm" draw:start-shape="id344" draw:start-glue-point="2" draw:end-shape="id345" draw:end-glue-point="0" svg:d="M-23138 11778c0 1962-3379 655-3379 2615" svg:viewBox="0 0 3380 2616">
          <text:p/>
        </draw:connector>
        <draw:connector draw:style-name="gr431" draw:text-style-name="P15" draw:layer="layout" draw:type="curve" svg:x1="-23.138cm" svg:y1="11.778cm" svg:x2="-29.881cm" svg:y2="14.393cm" draw:start-shape="id344" draw:start-glue-point="2" draw:end-shape="id346" draw:end-glue-point="0" svg:d="M-23138 11778c0 1962-6743 655-6743 2615" svg:viewBox="0 0 6744 2616">
          <text:p/>
        </draw:connector>
        <draw:connector draw:style-name="gr429" draw:text-style-name="P15" draw:layer="layout" draw:type="curve" svg:x1="-23.138cm" svg:y1="11.778cm" svg:x2="-19.79cm" svg:y2="14.393cm" draw:start-shape="id344" draw:start-glue-point="2" draw:end-shape="id347" draw:end-glue-point="0" svg:d="M-23138 11778c0 1962 3348 655 3348 2615" svg:viewBox="0 0 3349 2616">
          <text:p/>
        </draw:connector>
        <draw:connector draw:style-name="gr430" draw:text-style-name="P15" draw:layer="layout" draw:type="curve" svg:x1="-23.138cm" svg:y1="11.778cm" svg:x2="-16.427cm" svg:y2="14.393cm" draw:start-shape="id344" draw:start-glue-point="2" draw:end-shape="id348" draw:end-glue-point="0" svg:d="M-23138 11778c0 1962 6711 655 6711 2615" svg:viewBox="0 0 6712 2616">
          <text:p/>
        </draw:connector>
        <draw:rect draw:name="goal kinds 7" draw:style-name="gr388" draw:text-style-name="P23" xml:id="id384" draw:id="id384" draw:layer="layout" svg:width="4.06cm" svg:height="1.64cm" svg:x="-25.168cm" svg:y="10.138cm">
          <text:p text:style-name="P5">Biological <text:line-break/>actions</text:p>
        </draw:rect>
        <draw:rect draw:style-name="gr255" draw:text-style-name="P106" xml:id="id356" draw:id="id356" draw:layer="layout" svg:width="2.022cm" svg:height="1.04cm" svg:x="15.446cm" svg:y="98.421cm">
          <text:p text:style-name="P5">Control</text:p>
        </draw:rect>
        <draw:g draw:style-name="gr23">
          <draw:rect draw:style-name="gr432" draw:text-style-name="P106" draw:layer="layout" svg:width="2.022cm" svg:height="1.04cm" svg:x="-26.217cm" svg:y="99.337cm">
            <text:p text:style-name="P5">Action</text:p>
          </draw:rect>
          <draw:rect draw:style-name="gr433" draw:text-style-name="P106" xml:id="id349" draw:id="id349" draw:layer="layout" svg:width="4.3cm" svg:height="2.151cm" svg:x="-27.377cm" svg:y="98.226cm">
            <text:p text:style-name="P5">Control<text:line-break/>signal<text:line-break/>(generated by<text:line-break/>Flight controller)</text:p>
          </draw:rect>
          <draw:rect draw:style-name="gr433" draw:text-style-name="P106" xml:id="id351" draw:id="id351" draw:layer="layout" svg:width="2.022cm" svg:height="1.04cm" svg:x="-28.232cm" svg:y="103.515cm">
            <text:p text:style-name="P5">Goal gain</text:p>
          </draw:rect>
          <draw:rect draw:style-name="gr432" draw:text-style-name="P106" draw:layer="layout" svg:width="2.022cm" svg:height="1.04cm" svg:x="-26.217cm" svg:y="101.337cm">
            <text:p text:style-name="P5">Action</text:p>
          </draw:rect>
          <draw:rect draw:style-name="gr433" draw:text-style-name="P106" xml:id="id350" draw:id="id350" draw:layer="layout" svg:width="2.022cm" svg:height="1.04cm" svg:x="-26.217cm" svg:y="101.337cm">
            <text:p text:style-name="P5">Feedback</text:p>
          </draw:rect>
          <draw:rect draw:style-name="gr433" draw:text-style-name="P106" xml:id="id352" draw:id="id352" draw:layer="layout" svg:width="2.022cm" svg:height="1.04cm" svg:x="-24.19cm" svg:y="103.49cm">
            <text:p text:style-name="P5">Resource <text:line-break/>gain</text:p>
          </draw:rect>
          <draw:connector draw:style-name="gr434" draw:text-style-name="P15" draw:layer="layout" draw:type="curve" svg:x1="-25.227cm" svg:y1="100.377cm" svg:x2="-25.206cm" svg:y2="101.337cm" draw:start-shape="id349" draw:start-glue-point="2" draw:end-shape="id350" draw:end-glue-point="0" svg:d="M-25227 100377c0 720 21 240 21 960" svg:viewBox="0 0 22 961">
            <text:p/>
          </draw:connector>
          <draw:connector draw:style-name="gr435" draw:text-style-name="P15" draw:layer="layout" draw:type="curve" svg:x1="-25.206cm" svg:y1="102.377cm" svg:x2="-27.221cm" svg:y2="103.515cm" draw:start-shape="id350" draw:start-glue-point="2" draw:end-shape="id351" draw:end-glue-point="0" svg:d="M-25206 102377c0 853-2015 285-2015 1138" svg:viewBox="0 0 2016 1139">
            <text:p/>
          </draw:connector>
          <draw:connector draw:style-name="gr436" draw:text-style-name="P15" draw:layer="layout" draw:type="curve" svg:x1="-25.206cm" svg:y1="102.377cm" svg:x2="-23.179cm" svg:y2="103.49cm" draw:start-shape="id350" draw:start-glue-point="2" draw:end-shape="id352" draw:end-glue-point="0" svg:d="M-25206 102377c0 835 2027 279 2027 1113" svg:viewBox="0 0 2028 1114">
            <text:p/>
          </draw:connector>
          <draw:rect draw:style-name="gr433" draw:text-style-name="P106" xml:id="id353" draw:id="id353" draw:layer="layout" svg:width="2.022cm" svg:height="1.04cm" svg:x="-23.837cm" svg:y="105.651cm">
            <text:p text:style-name="P5">Battery</text:p>
          </draw:rect>
          <draw:connector draw:style-name="gr436" draw:text-style-name="P15" draw:layer="layout" draw:type="curve" svg:x1="-23.179cm" svg:y1="104.53cm" svg:x2="-22.826cm" svg:y2="105.651cm" draw:start-shape="id352" draw:start-glue-point="2" draw:end-shape="id353" draw:end-glue-point="0" svg:d="M-23179 104530c0 841 353 281 353 1121" svg:viewBox="0 0 354 1122">
            <text:p/>
          </draw:connector>
          <draw:rect draw:style-name="gr433" draw:text-style-name="P106" xml:id="id354" draw:id="id354" draw:layer="layout" svg:width="2.022cm" svg:height="1.04cm" svg:x="-30.196cm" svg:y="105.688cm">
            <text:p text:style-name="P5">From <text:line-break/>pose</text:p>
          </draw:rect>
          <draw:connector draw:style-name="gr436" draw:text-style-name="P15" draw:layer="layout" draw:type="curve" svg:x1="-27.221cm" svg:y1="104.555cm" svg:x2="-29.185cm" svg:y2="105.688cm" draw:start-shape="id351" draw:start-glue-point="2" draw:end-shape="id354" draw:end-glue-point="0" svg:d="M-27221 104555c0 850-1964 284-1964 1133" svg:viewBox="0 0 1965 1134">
            <text:p/>
          </draw:connector>
          <draw:rect draw:style-name="gr433" draw:text-style-name="P106" xml:id="id355" draw:id="id355" draw:layer="layout" svg:width="2.502cm" svg:height="1.583cm" svg:x="-27.241cm" svg:y="106.129cm">
            <text:p text:style-name="P5">From<text:line-break/>anomaly|<text:line-break/>reduction</text:p>
          </draw:rect>
          <draw:connector draw:style-name="gr436" draw:text-style-name="P15" draw:layer="layout" draw:type="curve" svg:x1="-27.221cm" svg:y1="104.556cm" svg:x2="-25.99cm" svg:y2="106.129cm" draw:end-shape="id355" draw:end-glue-point="0" svg:d="M-27221 104556c0 804 1231 18 1231 1573" svg:viewBox="0 0 1232 1574">
            <text:p/>
          </draw:connector>
        </draw:g>
        <draw:rect draw:style-name="gr41" draw:text-style-name="P5" xml:id="id364" draw:id="id364" draw:layer="layout" svg:width="2.434cm" svg:height="1.059cm" svg:x="17.411cm" svg:y="102.937cm">
          <text:p text:style-name="P5">behavior</text:p>
        </draw:rect>
        <draw:rect draw:style-name="gr255" draw:text-style-name="P106" xml:id="id359" draw:id="id359" draw:layer="layout" svg:width="2.022cm" svg:height="1.04cm" svg:x="27.053cm" svg:y="101.034cm">
          <text:p text:style-name="P5">Planing</text:p>
        </draw:rect>
        <draw:rect draw:style-name="gr255" draw:text-style-name="P106" xml:id="id446" draw:id="id446" draw:layer="layout" svg:width="2.022cm" svg:height="1.04cm" svg:x="29.798cm" svg:y="107.092cm">
          <text:p text:style-name="P5">Decision</text:p>
        </draw:rect>
        <draw:rect draw:style-name="gr41" draw:text-style-name="P5" xml:id="id357" draw:id="id357" draw:layer="layout" svg:width="2.064cm" svg:height="1.085cm" svg:x="14.199cm" svg:y="102.754cm">
          <text:p text:style-name="P5">open-loop</text:p>
        </draw:rect>
        <draw:connector draw:style-name="gr437" draw:text-style-name="P15" draw:layer="layout" draw:type="curve" svg:x1="16.457cm" svg:y1="99.461cm" svg:x2="15.231cm" svg:y2="102.754cm" draw:start-shape="id356" draw:start-glue-point="2" draw:end-shape="id357" draw:end-glue-point="0" svg:d="M16457 99461c0 824-307 1647-613 1647-307 0-613 823-613 1646" svg:viewBox="0 0 1227 3294">
          <text:p/>
        </draw:connector>
        <draw:rect draw:style-name="gr255" draw:text-style-name="P106" xml:id="id365" draw:id="id365" draw:layer="layout" svg:width="2.022cm" svg:height="1.04cm" svg:x="21.776cm" svg:y="102.207cm">
          <text:p text:style-name="P5">Attention</text:p>
        </draw:rect>
        <draw:rect draw:style-name="gr255" draw:text-style-name="P106" xml:id="id358" draw:id="id358" draw:layer="layout" svg:width="2.022cm" svg:height="1.04cm" svg:x="26.074cm" svg:y="103.745cm">
          <text:p text:style-name="P5">Motion<text:line-break/>planing</text:p>
        </draw:rect>
        <draw:connector draw:style-name="gr438" draw:text-style-name="P15" draw:layer="layout" draw:type="curve" svg:x1="27.085cm" svg:y1="103.745cm" svg:x2="28.064cm" svg:y2="102.074cm" draw:start-shape="id358" draw:start-glue-point="0" draw:end-shape="id359" draw:end-glue-point="2" svg:d="M27085 103745c0-1252 979-417 979-1671" svg:viewBox="0 0 980 1672">
          <text:p/>
        </draw:connector>
        <draw:rect draw:style-name="gr41" draw:text-style-name="P5" xml:id="id360" draw:id="id360" draw:layer="layout" svg:width="2.79cm" svg:height="0.955cm" svg:x="79.36cm" svg:y="44.135cm">
          <text:p text:style-name="P5">executive<text:line-break/>functions</text:p>
        </draw:rect>
        <draw:connector draw:style-name="gr439" draw:text-style-name="P15" draw:layer="layout" draw:type="curve" svg:x1="84.826cm" svg:y1="39.775cm" svg:x2="80.755cm" svg:y2="44.135cm" draw:start-shape="id201" draw:start-glue-point="2" draw:end-shape="id360" svg:d="M84826 39775c0 3270-4071 1090-4071 4360" svg:viewBox="0 0 4072 4361">
          <text:p/>
        </draw:connector>
        <draw:rect draw:style-name="gr41" draw:text-style-name="P5" xml:id="id361" draw:id="id361" draw:layer="layout" svg:width="2.79cm" svg:height="0.955cm" svg:x="79.382cm" svg:y="46.861cm">
          <text:p text:style-name="P5">Working<text:line-break/>memory</text:p>
        </draw:rect>
        <draw:connector draw:style-name="gr440" draw:text-style-name="P15" draw:layer="layout" draw:type="curve" svg:x1="80.755cm" svg:y1="45.09cm" svg:x2="80.777cm" svg:y2="46.861cm" draw:start-shape="id360" draw:start-glue-point="2" draw:end-shape="id361" draw:end-glue-point="0" svg:d="M80755 45090c0 1329 22 444 22 1771" svg:viewBox="0 0 23 1772">
          <text:p/>
        </draw:connector>
        <draw:rect draw:style-name="gr441" draw:text-style-name="P117" xml:id="id363" draw:id="id363" draw:layer="layout" svg:width="1.859cm" svg:height="0.972cm" svg:x="21.208cm" svg:y="97.838cm">
          <text:p text:style-name="P5"><text:span text:style-name="T36">Working</text:span><text:span text:style-name="T36"><text:line-break/></text:span><text:span text:style-name="T36">memory</text:span></text:p>
        </draw:rect>
        <draw:rect draw:style-name="gr255" draw:text-style-name="P106" xml:id="id366" draw:id="id366" draw:layer="layout" svg:width="2.022cm" svg:height="1.04cm" svg:x="25.567cm" svg:y="97.929cm">
          <text:p text:style-name="P5">Short term<text:line-break/>memory</text:p>
        </draw:rect>
        <draw:rect draw:style-name="gr442" draw:text-style-name="P118" xml:id="id362" draw:id="id362" draw:layer="layout" svg:width="1.859cm" svg:height="0.972cm" svg:x="20.302cm" svg:y="95.627cm">
          <text:p text:style-name="P5"><text:span text:style-name="T36">Executive</text:span><text:span text:style-name="T36"><text:line-break/></text:span><text:span text:style-name="T36">functions</text:span></text:p>
        </draw:rect>
        <draw:connector draw:style-name="gr443" draw:text-style-name="P15" draw:layer="layout" draw:type="curve" svg:x1="21.231cm" svg:y1="96.599cm" svg:x2="22.137cm" svg:y2="97.838cm" draw:start-shape="id362" draw:start-glue-point="2" draw:end-shape="id363" svg:d="M21231 96599c0 930 906 311 906 1239" svg:viewBox="0 0 907 1240">
          <text:p/>
        </draw:connector>
        <draw:connector draw:style-name="gr444" draw:text-style-name="P15" draw:layer="layout" draw:type="curve" svg:x1="21.231cm" svg:y1="96.599cm" svg:x2="16.457cm" svg:y2="98.421cm" draw:start-shape="id362" draw:start-glue-point="2" draw:end-shape="id356" svg:d="M21231 96599c0 1366-4774 456-4774 1822" svg:viewBox="0 0 4775 1823">
          <text:p/>
        </draw:connector>
        <draw:connector draw:style-name="gr445" draw:text-style-name="P15" draw:layer="layout" draw:type="curve" svg:x1="22.137cm" svg:y1="98.81cm" svg:x2="18.628cm" svg:y2="102.937cm" draw:start-shape="id363" draw:start-glue-point="2" draw:end-shape="id364" draw:end-glue-point="0" svg:d="M22137 98810c0 3096-3509 1033-3509 4127" svg:viewBox="0 0 3510 4128">
          <text:p/>
        </draw:connector>
        <draw:connector draw:style-name="gr446" draw:text-style-name="P15" draw:layer="layout" draw:type="curve" svg:x1="22.137cm" svg:y1="98.81cm" svg:x2="22.787cm" svg:y2="102.207cm" draw:start-shape="id363" draw:start-glue-point="2" draw:end-shape="id365" svg:d="M22137 98810c0 2548 650 850 650 3397" svg:viewBox="0 0 651 3398">
          <text:p/>
        </draw:connector>
        <draw:connector draw:style-name="gr447" draw:text-style-name="P15" draw:layer="layout" draw:type="curve" svg:x1="23.067cm" svg:y1="98.324cm" svg:x2="25.567cm" svg:y2="98.449cm" draw:start-shape="id363" draw:start-glue-point="1" draw:end-shape="id366" draw:end-glue-point="3" svg:d="M23067 98324c1875 0 625 125 2500 125" svg:viewBox="0 0 2501 126">
          <text:p/>
        </draw:connector>
        <draw:connector draw:style-name="gr448" draw:text-style-name="P15" draw:layer="layout" draw:type="curve" svg:x1="22.137cm" svg:y1="98.81cm" svg:x2="28.064cm" svg:y2="101.034cm" draw:start-shape="id363" draw:start-glue-point="2" draw:end-shape="id359" draw:end-glue-point="0" svg:d="M22137 98810c0 1668 5927 556 5927 2224" svg:viewBox="0 0 5928 2225">
          <text:p/>
        </draw:connector>
        <draw:rect draw:style-name="gr255" draw:text-style-name="P106" xml:id="id367" draw:id="id367" draw:layer="layout" svg:width="2.022cm" svg:height="1.04cm" svg:x="29.396cm" svg:y="104.739cm">
          <text:p text:style-name="P5">Motor<text:line-break/>planning</text:p>
        </draw:rect>
        <draw:connector draw:style-name="gr449" draw:text-style-name="P15" draw:layer="layout" draw:type="curve" svg:x1="30.407cm" svg:y1="104.739cm" svg:x2="28.064cm" svg:y2="102.074cm" draw:start-shape="id367" draw:start-glue-point="0" draw:end-shape="id359" draw:end-glue-point="2" svg:d="M30407 104739c0-1998-2343-666-2343-2665" svg:viewBox="0 0 2344 2666">
          <text:p/>
        </draw:connector>
        <draw:g draw:style-name="gr23">
          <draw:frame draw:style-name="gr135" draw:text-style-name="P41" draw:layer="layout" svg:width="14.046cm" svg:height="17.359cm" svg:x="-95.687cm" svg:y="33.319cm">
            <draw:image xlink:href="Pictures/10000000000003940000046C916862FF.png" xlink:type="simple" xlink:show="embed" xlink:actuate="onLoad" draw:mime-type="image/png">
              <text:p/>
            </draw:image>
          </draw:frame>
          <draw:frame draw:style-name="gr450" draw:text-style-name="P120" draw:layer="layout" svg:width="9.739cm" svg:height="2.221cm" svg:x="-96.545cm" svg:y="31.437cm">
            <draw:text-box>
              <text:p text:style-name="P119"><text:span text:style-name="T12">From A </text:span><text:span text:style-name="T12">Neurocognitive </text:span><text:span text:style-name="T12">Perspective on </text:span><text:span text:style-name="T12">the</text:span></text:p>
              <text:p text:style-name="P119"><text:span text:style-name="T12">Forms and </text:span><text:span text:style-name="T12">Functions of </text:span><text:span text:style-name="T12">Autobiographical </text:span><text:span text:style-name="T12">Memory Retrieval</text:span><text:span text:style-name="T12"><text:line-break/></text:span><text:span text:style-name="T12">and the </text:span><text:span text:style-name="T12">Construction of </text:span><text:span text:style-name="T12">Autobiographical </text:span><text:span text:style-name="T12">Memories</text:span></text:p>
              <text:p text:style-name="P119"><text:span text:style-name="T12">in the Self-</text:span><text:span text:style-name="T12">Memory System </text:span><text:span text:style-name="T12">and AI</text:span></text:p>
              <text:p text:style-name="P119"><text:span text:style-name="T12"/></text:p>
            </draw:text-box>
          </draw:frame>
        </draw:g>
        <draw:g draw:style-name="gr23">
          <draw:rect draw:style-name="gr3" draw:text-style-name="P4" xml:id="id369" draw:id="id369" draw:layer="layout" svg:width="2.015cm" svg:height="0.775cm" svg:x="-4.369cm" svg:y="26.431cm">
            <text:p text:style-name="P5"><text:span text:style-name="T2">event</text:span></text:p>
          </draw:rect>
          <draw:rect draw:style-name="gr4" draw:text-style-name="P6" xml:id="id368" draw:id="id368" draw:layer="layout" svg:width="2.324cm" svg:height="0.915cm" svg:x="-1.811cm" svg:y="23.973cm">
            <text:p text:style-name="P5"><text:span text:style-name="T3">Perception</text:span></text:p>
          </draw:rect>
          <draw:connector draw:style-name="gr451" draw:text-style-name="P15" draw:layer="layout" draw:type="curve" svg:x1="-0.649cm" svg:y1="24.888cm" svg:x2="-3.361cm" svg:y2="26.431cm" draw:start-shape="id368" draw:start-glue-point="2" draw:end-shape="id369" draw:end-glue-point="0" svg:d="M-649 24888c0 1158-2712 387-2712 1543" svg:viewBox="0 0 2713 1544">
            <text:p/>
          </draw:connector>
          <draw:rect draw:style-name="gr3" draw:text-style-name="P4" xml:id="id370" draw:id="id370" draw:layer="layout" svg:width="2.015cm" svg:height="0.775cm" svg:x="-1.579cm" svg:y="26.412cm">
            <text:p text:style-name="P5"><text:span text:style-name="T2">object</text:span></text:p>
          </draw:rect>
          <draw:connector draw:style-name="gr452" draw:text-style-name="P15" draw:layer="layout" draw:type="curve" svg:x1="-0.649cm" svg:y1="24.888cm" svg:x2="-0.571cm" svg:y2="26.412cm" draw:start-shape="id368" draw:start-glue-point="2" draw:end-shape="id370" draw:end-glue-point="0" svg:d="M-649 24888c0 1143 78 381 78 1524" svg:viewBox="0 0 79 1525">
            <text:p/>
          </draw:connector>
          <draw:rect draw:style-name="gr3" draw:text-style-name="P4" xml:id="id371" draw:id="id371" draw:layer="layout" svg:width="2.015cm" svg:height="1.511cm" svg:x="1.129cm" svg:y="26.474cm">
            <text:p text:style-name="P5"><text:span text:style-name="T2">Update/add</text:span><text:span text:style-name="T2"><text:line-break/></text:span><text:span text:style-name="T2">State</text:span><text:span text:style-name="T2"><text:line-break/></text:span><text:span text:style-name="T2">model</text:span></text:p>
          </draw:rect>
          <draw:connector draw:style-name="gr453" draw:text-style-name="P15" draw:layer="layout" draw:type="curve" svg:x1="-0.649cm" svg:y1="24.888cm" svg:x2="2.136cm" svg:y2="26.474cm" draw:start-shape="id368" draw:start-glue-point="2" draw:end-shape="id371" draw:end-glue-point="0" svg:d="M-649 24888c0 1189 2785 397 2785 1586" svg:viewBox="0 0 2786 1587">
            <text:p/>
          </draw:connector>
          <draw:connector draw:style-name="gr451" draw:text-style-name="P15" draw:layer="layout" draw:type="curve" svg:x1="-0.605cm" svg:y1="22.246cm" svg:x2="-0.649cm" svg:y2="23.973cm" draw:end-shape="id368" draw:end-glue-point="0" svg:d="M-605 22246c0 919-44 56-44 1727" svg:viewBox="0 0 45 1728">
            <text:p/>
          </draw:connector>
          <draw:rect draw:style-name="gr3" draw:text-style-name="P4" xml:id="id372" draw:id="id372" draw:layer="layout" svg:width="2.015cm" svg:height="0.775cm" svg:x="-4.772cm" svg:y="28.979cm">
            <text:p text:style-name="P5"><text:span text:style-name="T2">Mental</text:span><text:span text:style-name="T2"><text:line-break/></text:span><text:span text:style-name="T2">state change</text:span></text:p>
          </draw:rect>
          <draw:connector draw:style-name="gr454" draw:text-style-name="P15" draw:layer="layout" draw:type="curve" svg:x1="-3.361cm" svg:y1="27.206cm" svg:x2="-3.764cm" svg:y2="28.979cm" draw:start-shape="id369" draw:start-glue-point="2" draw:end-shape="id372" svg:d="M-3361 27206c0 1330-403 444-403 1773" svg:viewBox="0 0 404 1774">
            <text:p/>
          </draw:connector>
          <draw:rect draw:style-name="gr3" draw:text-style-name="P4" xml:id="id373" draw:id="id373" draw:layer="layout" svg:width="2.741cm" svg:height="1.541cm" svg:x="-6.255cm" svg:y="31.683cm">
            <text:p text:style-name="P5"><text:span text:style-name="T2">Change to </text:span><text:span text:style-name="T2"><text:line-break/></text:span><text:span text:style-name="T2">mind wandering </text:span><text:span text:style-name="T2"><text:line-break/></text:span><text:span text:style-name="T2">mode</text:span></text:p>
          </draw:rect>
          <draw:connector draw:style-name="gr455" draw:text-style-name="P15" draw:layer="layout" draw:type="curve" svg:x1="-3.764cm" svg:y1="29.754cm" svg:x2="-4.884cm" svg:y2="31.683cm" draw:start-shape="id372" draw:start-glue-point="2" draw:end-shape="id373" draw:end-glue-point="0" svg:d="M-3764 29754c0 1449-1120 485-1120 1929" svg:viewBox="0 0 1121 1930">
            <text:p/>
          </draw:connector>
          <draw:path draw:style-name="gr456" draw:text-style-name="P121" draw:layer="layout" svg:width="3.799cm" svg:height="2.419cm" svg:x="-2.715cm" svg:y="20.497cm" svg:viewBox="0 0 3800 2420" svg:d="M991 56c42 9 85-8 127-10 44-3 84-13 128-15 40-1 81-3 121-4 38 0 77-1 115 0 44 3 81-19 127-18 60 2 119 2 179-7 45-6 91 3 137 7 42 4 85 14 124 37 34 19 75 11 109 39 33 29 71 50 114 58 56 11 105 49 160 65 38 12 76 25 115 33 44 9 89 16 134 22 42 5 75 38 108 68 49 45 85 92 160 105 63 12 121 6 181 22 39 10 79 4 118 7 50 5 100 3 150 0 40-2 79 9 118 11 43 2 84 19 124 33 47 16 88 56 109 105 17 40 49 74 48 123-1 44 4 89 3 133-2 77-27 149-32 225-3 51-50 70-86 83-38 14-75 33-92 87-18 53-23 103-39 156-12 39-20 93 10 126 32 35 55 78 73 123 18 42 16 89 16 134 0 56-11 114-38 163-32 56-31 130-86 173-42 33-49 97-96 124-59 33-126 10-188 28-69 21-141 24-211 44-67 19-130 49-197 65-102 24-209 17-313 18-133 2-269 5-398-29-88-23-192-22-271-87-39-31-92-33-131-65s-99-9-121-76c-13-36-12-74-16-112-6-53-46-93-90-105-39-11-76-38-118-40-38-1-76 16-114 11-59-7-114 13-173 15-90 1-176 23-271 3-51-10-87-41-130-65-55-30-88-94-134-137-41-38-68-85-99-131-36-52-95-59-144-79-45-19-76-59-105-98-30-41-52-90-86-127-46-49-53-113-95-170-24-31-15-81-23-123-9-48 13-85 32-119 22-39 42-79 51-123 11-49 26-97 42-145 13-43 31-84 38-130 6-44 6-88 19-130 13-44 34-90 80-102 39-10 79-9 118-18 41-9 84-16 124-7 89 21 147-47 217-83 39-20 71-54 108-80 34-23 72-31 109-40 11 0 23 0 35 0 11 9 23 17 35 26 2 3 4 7 6 11z">
            <text:p text:style-name="P5">Action<text:line-break/>potential<text:line-break/>group</text:p>
          </draw:path>
        </draw:g>
        <draw:path draw:style-name="gr457" draw:text-style-name="P21" draw:layer="layout" svg:width="6.258cm" svg:height="6.926cm" svg:x="-44.708cm" svg:y="38.874cm" svg:viewBox="0 0 6259 6927" svg:d="M2122 19c935-72 1923 62 2804 424 674 277 859 934 1032 1495 186 602 291 1236 278 1878-8 432-25 866 13 1297 47 534-69 1141-468 1438-204 152-517 162-744 281-144 75-403 54-587 67-202 14-378-44-555-106-238-84-494-67-741-119-137-29-277-7-424 26-183 41-376 21-555 79-265 86-533 142-807 146-156 3-323 12-463-53-168-77-340-59-477-225-179-217-394-443-423-727-13-133-3-272 40-397 56-163 67-334 145-490 82-165 192-318 225-503 56-316-66-621-106-926-22-171-105-330-105-502s-4-344 26-516c26-150 55-300 66-450 14-185 33-366 0-556-27-152 80-595 80-595 0 0 1036-912 1746-966z">
          <text:p/>
        </draw:path>
        <draw:rect draw:style-name="gr41" draw:text-style-name="P19" xml:id="id382" draw:id="id382" draw:layer="layout" svg:width="2.501cm" svg:height="1.419cm" svg:x="-37.022cm" svg:y="42.106cm">
          <text:p text:style-name="P5"><text:span text:style-name="T4">Action</text:span><text:span text:style-name="T4"><text:line-break/></text:span><text:span text:style-name="T4">potential</text:span><text:span text:style-name="T4"><text:line-break/></text:span><text:span text:style-name="T4">population</text:span><text:span text:style-name="T4"><text:line-break/></text:span><text:span text:style-name="T4">(Population </text:span><text:span text:style-name="T4">spike)</text:span></text:p>
        </draw:rect>
        <draw:custom-shape draw:style-name="gr458" draw:text-style-name="P123" xml:id="id375" draw:id="id375" draw:layer="layout" svg:width="0.323cm" svg:height="0.323cm" svg:x="-43.371cm" svg:y="40.411cm">
          <text:p text:style-name="P122"><text:span text:style-name="T37"/></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59" draw:text-style-name="P7" draw:layer="layout" draw:type="curve" svg:x1="-40.74cm" svg:y1="40.783cm" svg:x2="-43.048cm" svg:y2="40.573cm" draw:start-shape="id374" draw:start-glue-point="3" draw:end-shape="id375" draw:end-glue-point="10" svg:d="M-40740 40783c-1729 0-576-210-2308-210" svg:viewBox="0 0 2309 211">
          <text:p text:style-name="P5"><text:span text:style-name="T4">Action</text:span><text:span text:style-name="T4"><text:line-break/></text:span><text:span text:style-name="T4">potential</text:span></text:p>
        </draw:connector>
        <draw:custom-shape draw:style-name="gr460" draw:text-style-name="P125" xml:id="id377" draw:id="id377" draw:layer="layout" svg:width="0.323cm" svg:height="0.323cm" svg:x="-43.357cm" svg:y="43.572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1" draw:text-style-name="P7" draw:layer="layout" draw:type="curve" svg:x1="-40.74cm" svg:y1="43.498cm" svg:x2="-43.034cm" svg:y2="43.734cm" draw:start-shape="id376" draw:start-glue-point="3" draw:end-shape="id377" draw:end-glue-point="10" svg:d="M-40740 43498c-1719 0-572 236-2294 236" svg:viewBox="0 0 2295 237">
          <text:p text:style-name="P5"><text:span text:style-name="T4">Action</text:span><text:span text:style-name="T4"><text:line-break/></text:span><text:span text:style-name="T4">potential</text:span></text:p>
        </draw:connector>
        <draw:custom-shape draw:style-name="gr460" draw:text-style-name="P125" xml:id="id379" draw:id="id379" draw:layer="layout" svg:width="0.323cm" svg:height="0.323cm" svg:x="-43.679cm" svg:y="41.978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2" draw:text-style-name="P7" draw:layer="layout" draw:type="curve" svg:x1="-40.74cm" svg:y1="42.14cm" svg:x2="-43.356cm" svg:y2="42.14cm" draw:start-shape="id378" draw:start-glue-point="3" draw:end-shape="id379" draw:end-glue-point="10" svg:d="M-40740 42140h-2616" svg:viewBox="0 0 2617 1">
          <text:p text:style-name="P5"><text:span text:style-name="T4">Action</text:span><text:span text:style-name="T4"><text:line-break/></text:span><text:span text:style-name="T4">potential</text:span></text:p>
        </draw:connector>
        <draw:custom-shape draw:style-name="gr460" draw:text-style-name="P125" xml:id="id381" draw:id="id381" draw:layer="layout" svg:width="0.323cm" svg:height="0.323cm" svg:x="-43.61cm" svg:y="44.873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3" draw:text-style-name="P41" draw:layer="layout" svg:width="0.393cm" svg:height="5.131cm" draw:transform="rotate (-3.14159265358979) translate (-43.708cm 45.225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64" draw:text-style-name="P126" draw:layer="layout" svg:width="2.549cm" svg:height="1.199cm" svg:x="-46.424cm" svg:y="42.213cm">
          <draw:text-box>
            <text:p text:style-name="P5">Sensors<text:line-break/>(receptors)</text:p>
          </draw:text-box>
        </draw:frame>
        <draw:connector draw:style-name="gr465" draw:text-style-name="P7" draw:layer="layout" draw:type="curve" svg:x1="-40.74cm" svg:y1="44.855cm" svg:x2="-43.287cm" svg:y2="45.035cm" draw:start-shape="id380" draw:start-glue-point="3" draw:end-shape="id381" draw:end-glue-point="10" svg:d="M-40740 44855c-1909 0-636 180-2547 180" svg:viewBox="0 0 2548 181">
          <text:p text:style-name="P5"><text:span text:style-name="T4">Action</text:span><text:span text:style-name="T4"><text:line-break/></text:span><text:span text:style-name="T4">potential</text:span></text:p>
        </draw:connector>
        <draw:custom-shape draw:style-name="gr466" draw:text-style-name="P128" draw:layer="layout" svg:width="2.381cm" svg:height="1.985cm" svg:x="-48.849cm" svg:y="41.842cm">
          <text:p text:style-name="P127"><text:span text:style-name="T3">physical</text:span><text:span text:style-name="T3"><text:line-break/></text:span><text:span text:style-name="T3">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467" draw:text-style-name="P19" xml:id="id399" draw:id="id399" draw:layer="layout" svg:width="2.574cm" svg:height="1.396cm" svg:x="-27.018cm" svg:y="42.029cm">
          <text:p text:style-name="P5"><text:span text:style-name="T4">Trace</text:span><text:span text:style-name="T4"><text:line-break/></text:span><text:span text:style-name="T4">(labeled</text:span><text:span text:style-name="T4"><text:line-break/></text:span><text:span text:style-name="T4">sensory data)</text:span></text:p>
        </draw:rect>
        <draw:rect draw:style-name="gr41" draw:text-style-name="P19" xml:id="id383" draw:id="id383" draw:layer="layout" svg:width="2.141cm" svg:height="1.419cm" svg:x="-33.461cm" svg:y="42.107cm">
          <text:p text:style-name="P5"><text:span text:style-name="T4">Neural</text:span><text:span text:style-name="T4"><text:line-break/></text:span><text:span text:style-name="T4">coding</text:span><text:span text:style-name="T4"><text:line-break/></text:span><text:span text:style-name="T4">(encoded FMM</text:span><text:span text:style-name="T4"><text:line-break/></text:span><text:span text:style-name="T4">wave params)</text:span></text:p>
        </draw:rect>
        <draw:rect draw:style-name="gr41" draw:text-style-name="P19" xml:id="id374" draw:id="id374" draw:layer="layout" svg:width="1.265cm" svg:height="1.082cm" svg:x="-40.74cm" svg:y="40.242cm">
          <text:p text:style-name="P5"><text:span text:style-name="T4">Action</text:span><text:span text:style-name="T4"><text:line-break/></text:span><text:span text:style-name="T4">potential</text:span><text:span text:style-name="T4"><text:line-break/></text:span><text:span text:style-name="T4">train</text:span></text:p>
        </draw:rect>
        <draw:connector draw:style-name="gr468" draw:text-style-name="P7" draw:layer="layout" draw:type="curve" svg:x1="-37.022cm" svg:y1="42.815cm" svg:x2="-39.475cm" svg:y2="40.783cm" draw:start-shape="id382" draw:start-glue-point="3" draw:end-shape="id374" draw:end-glue-point="1" svg:d="M-37022 42815c-1839 0-613-2032-2453-2032" svg:viewBox="0 0 2454 2033">
          <text:p/>
        </draw:connector>
        <draw:rect draw:style-name="gr41" draw:text-style-name="P19" xml:id="id378" draw:id="id378" draw:layer="layout" svg:width="1.265cm" svg:height="1.082cm" svg:x="-40.74cm" svg:y="41.599cm">
          <text:p text:style-name="P5"><text:span text:style-name="T4">Action</text:span><text:span text:style-name="T4"><text:line-break/></text:span><text:span text:style-name="T4">potenti</text:span><text:span text:style-name="T4">al</text:span><text:span text:style-name="T4"><text:line-break/></text:span><text:span text:style-name="T4">train</text:span></text:p>
        </draw:rect>
        <draw:rect draw:style-name="gr41" draw:text-style-name="P19" xml:id="id376" draw:id="id376" draw:layer="layout" svg:width="1.265cm" svg:height="1.082cm" svg:x="-40.74cm" svg:y="42.957cm">
          <text:p text:style-name="P5"><text:span text:style-name="T4">Action</text:span><text:span text:style-name="T4"><text:line-break/></text:span><text:span text:style-name="T4">potential</text:span><text:span text:style-name="T4"><text:line-break/></text:span><text:span text:style-name="T4">train</text:span></text:p>
        </draw:rect>
        <draw:rect draw:style-name="gr41" draw:text-style-name="P19" xml:id="id380" draw:id="id380" draw:layer="layout" svg:width="1.265cm" svg:height="1.082cm" svg:x="-40.74cm" svg:y="44.314cm">
          <text:p text:style-name="P5"><text:span text:style-name="T4">Action</text:span><text:span text:style-name="T4"><text:line-break/></text:span><text:span text:style-name="T4">potential</text:span><text:span text:style-name="T4"><text:line-break/></text:span><text:span text:style-name="T4">train</text:span></text:p>
        </draw:rect>
        <draw:connector draw:style-name="gr469" draw:text-style-name="P7" draw:layer="layout" draw:type="curve" svg:x1="-37.022cm" svg:y1="42.815cm" svg:x2="-39.475cm" svg:y2="42.14cm" draw:start-shape="id382" draw:start-glue-point="3" draw:end-shape="id378" draw:end-glue-point="1" svg:d="M-37022 42815c-1839 0-613-675-2453-675" svg:viewBox="0 0 2454 676">
          <text:p/>
        </draw:connector>
        <draw:connector draw:style-name="gr470" draw:text-style-name="P7" draw:layer="layout" draw:type="curve" svg:x1="-37.022cm" svg:y1="42.815cm" svg:x2="-39.475cm" svg:y2="43.498cm" draw:start-shape="id382" draw:start-glue-point="3" draw:end-shape="id376" draw:end-glue-point="1" svg:d="M-37022 42815c-1839 0-613 683-2453 683" svg:viewBox="0 0 2454 684">
          <text:p/>
        </draw:connector>
        <draw:connector draw:style-name="gr36" draw:text-style-name="P7" draw:layer="layout" draw:type="curve" svg:x1="-37.022cm" svg:y1="42.815cm" svg:x2="-39.475cm" svg:y2="44.855cm" draw:start-shape="id382" draw:start-glue-point="3" draw:end-shape="id380" draw:end-glue-point="1" svg:d="M-37022 42815c-1839 0-613 2040-2453 2040" svg:viewBox="0 0 2454 2041">
          <text:p/>
        </draw:connector>
        <draw:custom-shape draw:style-name="gr471" draw:text-style-name="P41" draw:layer="layout" svg:width="0.215cm" svg:height="1.199cm" draw:transform="rotate (-1.5707963267949) translate (-39.609cm 39.776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72" draw:text-style-name="P16" draw:layer="layout" svg:width="1.632cm" svg:height="0.569cm" svg:x="-40.927cm" svg:y="39.205cm">
          <draw:text-box>
            <text:p><text:span text:style-name="T4">Buffering</text:span></text:p>
          </draw:text-box>
        </draw:frame>
        <draw:connector draw:style-name="gr473" draw:text-style-name="P15" draw:layer="layout" draw:type="line" svg:x1="-27.845cm" svg:y1="44.056cm" svg:x2="-22.439cm" svg:y2="44.01cm" svg:d="M-27845 44056l5406-46" svg:viewBox="0 0 5407 47">
          <text:p/>
        </draw:connector>
        <draw:frame draw:style-name="gr474" draw:text-style-name="P129" draw:layer="layout" svg:width="3.263cm" svg:height="1.199cm" svg:x="-27.926cm" svg:y="44.049cm">
          <draw:text-box>
            <text:p><text:span text:style-name="T39">Semantic</text:span></text:p>
          </draw:text-box>
        </draw:frame>
        <draw:connector draw:style-name="gr36" draw:text-style-name="P7" draw:layer="layout" draw:type="curve" svg:x1="-33.461cm" svg:y1="42.816cm" svg:x2="-34.521cm" svg:y2="42.815cm" draw:start-shape="id383" draw:start-glue-point="3" draw:end-shape="id382" draw:end-glue-point="1" svg:d="M-33461 42816c-793 0-264-1-1060-1" svg:viewBox="0 0 1061 2">
          <text:p/>
        </draw:connector>
        <draw:g draw:style-name="gr23">
          <draw:path draw:style-name="gr475" draw:text-style-name="P130" xml:id="id400" draw:id="id400" draw:layer="layout" svg:width="2.434cm" svg:height="7.621cm" svg:x="-30.222cm" svg:y="38.983cm" svg:viewBox="0 0 2435 7622" svg:d="M1188 16c-304 91-494 61-608 419-79 245-67 523 17 750 104 284 138 597 136 903-2 308-115 593-188 882-93 366-282 671-411 1015-94 251-89 523-119 793-32 282-11 581 51 860s116 569 240 816c111 220 58 469 68 706 12 298 1231 682 1231 308 0-230-27-456-68-683-63-349-127-695-137-1058-10-412 121-711 317-1058 191-338 117-545 419-640 296-93 201-673 176-904-30-285 166-578 115-860-51-278-148-529-155-816-7-340-118-674-85-1014 25-264-735-498-999-419z">
            <text:p/>
          </draw:path>
          <draw:frame draw:style-name="gr476" draw:text-style-name="P131" draw:layer="layout" svg:width="3.263cm" svg:height="1.361cm" draw:transform="rotate (1.5707963267949) translate (-29.617cm 43.97cm)">
            <draw:text-box>
              <text:p text:style-name="P5"><text:span text:style-name="T40">Perception</text:span><text:span text:style-name="T40"><text:line-break/></text:span><text:span text:style-name="T41">(clustering</text:span><text:span text:style-name="T41"><text:line-break/></text:span><text:span text:style-name="T41">hierarchy)</text:span></text:p>
            </draw:text-box>
          </draw:frame>
        </draw:g>
        <draw:rect draw:style-name="gr467" draw:text-style-name="P19" xml:id="id397" draw:id="id397" draw:layer="layout" svg:width="2.574cm" svg:height="1.396cm" svg:x="-19.918cm" svg:y="42.029cm">
          <text:p text:style-name="P5"><text:span text:style-name="T4">Event specific</text:span><text:span text:style-name="T4"><text:line-break/></text:span><text:span text:style-name="T4">knowledge</text:span><text:span text:style-name="T4"><text:line-break/></text:span><text:span text:style-name="T4">in language</text:span></text:p>
        </draw:rect>
        <draw:connector draw:style-name="gr477" draw:text-style-name="P15" draw:layer="layout" draw:type="line" svg:x1="-36.644cm" svg:y1="44.056cm" svg:x2="-31.238cm" svg:y2="44.01cm" svg:d="M-36644 44056l5406-46" svg:viewBox="0 0 5407 47">
          <text:p/>
        </draw:connector>
        <draw:frame draw:style-name="gr474" draw:text-style-name="P129" draw:layer="layout" svg:width="3.263cm" svg:height="1.199cm" svg:x="-33.725cm" svg:y="44.149cm">
          <draw:text-box>
            <text:p><text:span text:style-name="T39">signal-level</text:span></text:p>
          </draw:text-box>
        </draw:frame>
        <draw:rect draw:style-name="gr467" draw:text-style-name="P19" xml:id="id398" draw:id="id398" draw:layer="layout" svg:width="2.574cm" svg:height="1.396cm" svg:x="-23.371cm" svg:y="42.029cm">
          <text:p text:style-name="P5"><text:span text:style-name="T4">internal</text:span><text:span text:style-name="T4"><text:line-break/></text:span><text:span text:style-name="T4">language</text:span><text:span text:style-name="T4"><text:line-break/></text:span><text:span text:style-name="T4">(inner speech)</text:span></text:p>
        </draw:rect>
        <draw:connector draw:style-name="gr478" draw:text-style-name="P15" draw:layer="layout" draw:type="curve" svg:x1="-23.138cm" svg:y1="11.778cm" svg:x2="-23.153cm" svg:y2="14.393cm" draw:start-shape="id384" draw:start-glue-point="2" draw:end-shape="id385" svg:d="M-23138 11778c0 1962-15 655-15 2615" svg:viewBox="0 0 16 2616">
          <text:p/>
        </draw:connector>
        <draw:custom-shape draw:style-name="gr34" draw:text-style-name="P26" xml:id="id387" draw:id="id387" draw:layer="layout" svg:width="0.891cm" svg:height="0.97cm" svg:x="-45.899cm" svg:y="74.579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86" draw:id="id386" draw:layer="layout" svg:width="0.891cm" svg:height="0.97cm" svg:x="-43.898cm" svg:y="74.579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5.064cm" svg:x2="-45.008cm" svg:y2="75.064cm" draw:start-shape="id386" draw:start-glue-point="6" draw:end-shape="id387" draw:end-glue-point="10" svg:d="M-43898 75064h-1110" svg:viewBox="0 0 1111 1">
          <text:p/>
        </draw:connector>
        <draw:connector draw:style-name="gr36" draw:text-style-name="P7" draw:layer="layout" draw:type="curve" svg:x1="-45.899cm" svg:y1="75.064cm" svg:x2="-47.007cm" svg:y2="75.064cm" draw:start-shape="id387" draw:start-glue-point="6" draw:end-shape="id16" draw:end-glue-point="10" svg:d="M-45899 75064h-1108" svg:viewBox="0 0 1109 1">
          <text:p/>
        </draw:connector>
        <draw:custom-shape draw:style-name="gr34" draw:text-style-name="P26" xml:id="id389" draw:id="id389" draw:layer="layout" svg:width="0.891cm" svg:height="0.97cm" svg:x="-38.899cm" svg:y="74.579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88" draw:id="id388" draw:layer="layout" svg:width="0.891cm" svg:height="0.97cm" svg:x="-36.898cm" svg:y="74.579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5.064cm" svg:x2="-38.008cm" svg:y2="75.064cm" draw:start-shape="id388" draw:start-glue-point="6" draw:end-shape="id389" draw:end-glue-point="10" svg:d="M-36898 75064h-1110" svg:viewBox="0 0 1111 1">
          <text:p/>
        </draw:connector>
        <draw:custom-shape draw:style-name="gr479" draw:text-style-name="P106" draw:layer="layout" svg:width="16.317cm" svg:height="1.952cm" svg:x="-51.303cm" svg:y="72.113cm">
          <text:p/>
          <draw:enhanced-geometry svg:viewBox="0 0 21600 21600" draw:type="rectangle" draw:enhanced-path="M 0 0 L 21600 0 21600 21600 0 21600 0 0 Z N"/>
        </draw:custom-shape>
        <draw:frame draw:style-name="gr480" draw:text-style-name="P38" draw:layer="layout" svg:width="1.966cm" svg:height="1.433cm" svg:x="-44.749cm" svg:y="72.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custom-shape draw:style-name="gr481" draw:text-style-name="P133" draw:layer="layout" svg:width="4.16cm" svg:height="0.97cm" svg:x="-51.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2" draw:text-style-name="P38" draw:layer="layout" svg:width="0.749cm" svg:height="0.725cm" svg:x="-42.98cm" svg:y="72.774cm">
          <draw:text-box>
            <text:p>+</text:p>
          </draw:text-box>
        </draw:frame>
        <draw:frame draw:style-name="gr483" draw:text-style-name="P38" draw:layer="layout" svg:width="1.849cm" svg:height="1.039cm" svg:x="-48.949cm" svg:y="72.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7.279cm" svg:y="72.774cm">
          <draw:text-box>
            <text:p>+</text:p>
          </draw:text-box>
        </draw:frame>
        <draw:frame draw:style-name="gr484" draw:text-style-name="P11" draw:layer="layout" svg:width="1.684cm" svg:height="0.57cm" svg:x="-42.281cm" svg:y="72.851cm">
          <draw:text-box>
            <text:p><text:span text:style-name="T4">DBSCAN</text:span></text:p>
          </draw:text-box>
        </draw:frame>
        <draw:custom-shape draw:style-name="gr485" draw:text-style-name="P134" draw:layer="layout" svg:width="1.539cm" svg:height="1.287cm" draw:transform="rotate (1.5707963267949) translate (-40.535cm 73.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81" draw:text-style-name="P133" draw:layer="layout" svg:width="4.16cm" svg:height="0.97cm" svg:x="-45.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26cm" svg:height="0.535cm" svg:x="-45.093cm" svg:y="70.679cm">
            <text:p text:style-name="P19"><text:span text:style-name="T4">P</text:span><text:span text:style-name="T42">i</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5cm" svg:height="0.535cm" svg:x="-44.043cm" svg:y="70.679cm">
            <text:p text:style-name="P19"><text:span text:style-name="T4">P</text:span><text:span text:style-name="T42">j</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53cm" svg:height="0.535cm" svg:x="-43.001cm" svg:y="70.679cm">
            <text:p text:style-name="P19"><text:span text:style-name="T4">P</text:span><text:span text:style-name="T42">k</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6cm" svg:height="0.535cm" svg:x="-41.948cm" svg:y="70.679cm">
            <text:p text:style-name="P19"><text:span text:style-name="T4">P</text:span><text:span text:style-name="T42">l</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64cm" svg:y1="70.944cm" svg:x2="-44.059cm" svg:y2="70.962cm">
            <text:p/>
          </draw:line>
          <draw:line draw:style-name="gr488" draw:text-style-name="P15" draw:layer="layout" svg:x1="-43.511cm" svg:y1="70.961cm" svg:x2="-43.013cm" svg:y2="70.956cm">
            <text:p/>
          </draw:line>
          <draw:line draw:style-name="gr488" draw:text-style-name="P15" draw:layer="layout" svg:x1="-42.465cm" svg:y1="70.961cm" svg:x2="-41.948cm" svg:y2="70.956cm">
            <text:p/>
          </draw:line>
        </draw:g>
        <draw:connector draw:style-name="gr489" draw:text-style-name="P7" draw:layer="layout" draw:type="curve" svg:x1="-39.312cm" svg:y1="75.023cm" svg:x2="-42.625cm" svg:y2="75.026cm" svg:d="M-39312 75023c-2484 0-828 3-3313 3" svg:viewBox="0 0 3314 4">
          <text:p/>
        </draw:connector>
        <draw:connector draw:style-name="gr489" draw:text-style-name="P7" draw:layer="layout" draw:type="curve" svg:x1="-45.797cm" svg:y1="70.923cm" svg:x2="-46.878cm" svg:y2="70.927cm" svg:d="M-45797 70923c-810 0-270 4-1081 4" svg:viewBox="0 0 1082 5">
          <text:p/>
        </draw:connector>
        <draw:connector draw:style-name="gr489" draw:text-style-name="P7" draw:layer="layout" draw:type="curve" svg:x1="-39.807cm" svg:y1="70.923cm" svg:x2="-40.888cm" svg:y2="70.927cm" svg:d="M-39807 70923c-810 0-270 4-1081 4" svg:viewBox="0 0 1082 5">
          <text:p/>
        </draw:connector>
        <draw:custom-shape draw:style-name="gr481" draw:text-style-name="P133" draw:layer="layout" svg:width="4.16cm" svg:height="0.97cm" svg:x="-39.349cm" svg:y="70.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9" draw:text-style-name="P106" draw:layer="layout" svg:width="16.317cm" svg:height="1.952cm" svg:x="-51.302cm" svg:y="76.113cm">
          <text:p/>
          <draw:enhanced-geometry svg:viewBox="0 0 21600 21600" draw:type="rectangle" draw:enhanced-path="M 0 0 L 21600 0 21600 21600 0 21600 0 0 Z N"/>
        </draw:custom-shape>
        <draw:frame draw:style-name="gr490" draw:text-style-name="P41" draw:layer="layout" svg:width="2.259cm" svg:height="1.523cm" svg:x="-44.28cm" svg:y="76.451cm">
          <draw:text-box>
            <text:p text:style-name="P5"><text:span text:style-name="T4">Clustering on 0</text:span><text:span text:style-name="T43">th</text:span><text:span text:style-name="T44">and</text:span><text:span text:style-name="T44"><text:line-break/></text:span><text:span text:style-name="T44">2</text:span><text:span text:style-name="T43">nd</text:span></text:p>
          </draw:text-box>
        </draw:frame>
        <draw:custom-shape draw:style-name="gr491" draw:text-style-name="P134" draw:layer="layout" svg:width="1.539cm" svg:height="1.287cm" draw:transform="rotate (1.5707963267949) translate (-40.534cm 77.836cm)">
          <text:p text:style-name="P19"><text:span text:style-name="T4">Phenom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34" draw:text-style-name="P26" xml:id="id391" draw:id="id391" draw:layer="layout" svg:width="0.891cm" svg:height="0.97cm" svg:x="-49.899cm" svg:y="78.579cm">
          <text:p text:style-name="P25"><text:span text:style-name="T12">X</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0" draw:id="id390" draw:layer="layout" svg:width="0.891cm" svg:height="0.97cm" svg:x="-47.898cm" svg:y="78.579cm">
          <text:p text:style-name="P25"><text:span text:style-name="T12">X</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9.064cm" svg:x2="-49.008cm" svg:y2="79.064cm" draw:start-shape="id390" draw:start-glue-point="6" draw:end-shape="id391" draw:end-glue-point="10" svg:d="M-47898 79064h-1110" svg:viewBox="0 0 1111 1">
          <text:p/>
        </draw:connector>
        <draw:custom-shape draw:style-name="gr34" draw:text-style-name="P26" xml:id="id393" draw:id="id393" draw:layer="layout" svg:width="0.891cm" svg:height="0.97cm" svg:x="-45.899cm" svg:y="78.579cm">
          <text:p text:style-name="P25"><text:span text:style-name="T12">X</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2" draw:id="id392" draw:layer="layout" svg:width="0.891cm" svg:height="0.97cm" svg:x="-43.898cm" svg:y="78.579cm">
          <text:p text:style-name="P25"><text:span text:style-name="T12">X</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9.064cm" svg:x2="-45.008cm" svg:y2="79.064cm" draw:start-shape="id392" draw:start-glue-point="6" draw:end-shape="id393" draw:end-glue-point="10" svg:d="M-43898 79064h-1110" svg:viewBox="0 0 1111 1">
          <text:p/>
        </draw:connector>
        <draw:connector draw:style-name="gr36" draw:text-style-name="P7" draw:layer="layout" draw:type="curve" svg:x1="-45.899cm" svg:y1="79.064cm" svg:x2="-47.007cm" svg:y2="79.064cm" draw:start-shape="id393" draw:start-glue-point="6" draw:end-shape="id390" draw:end-glue-point="10" svg:d="M-45899 79064h-1108" svg:viewBox="0 0 1109 1">
          <text:p/>
        </draw:connector>
        <draw:custom-shape draw:style-name="gr34" draw:text-style-name="P26" xml:id="id395" draw:id="id395" draw:layer="layout" svg:width="0.891cm" svg:height="0.97cm" svg:x="-38.899cm" svg:y="78.579cm">
          <text:p text:style-name="P25"><text:span text:style-name="T12">X</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394" draw:id="id394" draw:layer="layout" svg:width="0.891cm" svg:height="0.97cm" svg:x="-36.898cm" svg:y="78.579cm">
          <text:p text:style-name="P25"><text:span text:style-name="T12">X</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9.064cm" svg:x2="-38.008cm" svg:y2="79.064cm" draw:start-shape="id394" draw:start-glue-point="6" draw:end-shape="id395" draw:end-glue-point="10" svg:d="M-36898 79064h-1110" svg:viewBox="0 0 1111 1">
          <text:p/>
        </draw:connector>
        <draw:connector draw:style-name="gr489" draw:text-style-name="P7" draw:layer="layout" draw:type="curve" svg:x1="-39.312cm" svg:y1="79.023cm" svg:x2="-42.625cm" svg:y2="79.026cm" svg:d="M-39312 79023c-2484 0-828 3-3313 3" svg:viewBox="0 0 3314 4">
          <text:p/>
        </draw:connector>
        <draw:custom-shape draw:style-name="gr479" draw:text-style-name="P106" draw:layer="layout" svg:width="16.317cm" svg:height="1.952cm" svg:x="-51.301cm" svg:y="79.913cm">
          <text:p/>
          <draw:enhanced-geometry svg:viewBox="0 0 21600 21600" draw:type="rectangle" draw:enhanced-path="M 0 0 L 21600 0 21600 21600 0 21600 0 0 Z N"/>
        </draw:custom-shape>
        <draw:custom-shape draw:style-name="gr492" draw:text-style-name="P134" draw:layer="layout" svg:width="1.697cm" svg:height="1.287cm" draw:transform="rotate (1.5707963267949) translate (-40.534cm 81.736cm)">
          <text:p text:style-name="P19"><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3" draw:text-style-name="P137" draw:layer="layout" svg:width="2.011cm" svg:height="1.705cm" svg:x="-44.457cm" svg:y="80.092cm">
          <text:p text:style-name="P136"><text:span text:style-name="T45">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479" draw:text-style-name="P106" draw:layer="layout" svg:width="16.317cm" svg:height="1.952cm" svg:x="-51.302cm" svg:y="72.113cm">
          <text:p/>
          <draw:enhanced-geometry svg:viewBox="0 0 21600 21600" draw:type="rectangle" draw:enhanced-path="M 0 0 L 21600 0 21600 21600 0 21600 0 0 Z N"/>
        </draw:custom-shape>
        <draw:frame draw:style-name="gr494" draw:text-style-name="P138" draw:layer="layout" svg:width="3.743cm" svg:height="1.158cm" svg:x="-46.519cm" svg:y="72.64cm">
          <draw:text-box>
            <text:p text:style-name="P69"><text:span text:style-name="T12">Matrix-Profile-based </text:span><text:span text:style-name="T12"><text:line-break/></text:span><text:span text:style-name="T12">Motif Discovery</text:span></text:p>
          </draw:text-box>
        </draw:frame>
        <draw:frame draw:style-name="gr482" draw:text-style-name="P38" draw:layer="layout" svg:width="0.749cm" svg:height="0.725cm" svg:x="-42.979cm" svg:y="72.774cm">
          <draw:text-box>
            <text:p>+</text:p>
          </draw:text-box>
        </draw:frame>
        <draw:frame draw:style-name="gr483" draw:text-style-name="P38" draw:layer="layout" svg:width="1.849cm" svg:height="1.039cm" svg:x="-48.948cm" svg:y="72.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7.278cm" svg:y="72.774cm">
          <draw:text-box>
            <text:p>+</text:p>
          </draw:text-box>
        </draw:frame>
        <draw:frame draw:style-name="gr495" draw:text-style-name="P11" draw:layer="layout" svg:width="1.895cm" svg:height="0.887cm" svg:x="-42.28cm" svg:y="72.851cm">
          <draw:text-box>
            <text:p><text:span text:style-name="T4">Clustering</text:span></text:p>
          </draw:text-box>
        </draw:frame>
        <draw:custom-shape draw:style-name="gr491" draw:text-style-name="P134" draw:layer="layout" svg:width="1.539cm" svg:height="1.287cm" draw:transform="rotate (1.5707963267949) translate (-40.534cm 73.8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51.303cm" svg:y="68.113cm">
          <text:p/>
          <draw:enhanced-geometry svg:viewBox="0 0 21600 21600" draw:type="rectangle" draw:enhanced-path="M 0 0 L 21600 0 21600 21600 0 21600 0 0 Z N"/>
        </draw:custom-shape>
        <draw:frame draw:style-name="gr480" draw:text-style-name="P38" draw:layer="layout" svg:width="1.966cm" svg:height="1.433cm" svg:x="-44.749cm" svg:y="68.42cm">
          <draw:text-box>
            <text:p text:style-name="P132"><text:span text:style-name="T12">Dynamic </text:span><text:span text:style-name="T12"><text:line-break/></text:span><text:span text:style-name="T12">Time </text:span><text:span text:style-name="T12"><text:line-break/></text:span><text:span text:style-name="T12">Warping</text:span></text:p>
          </draw:text-box>
        </draw:frame>
        <draw:frame draw:style-name="gr482" draw:text-style-name="P38" draw:layer="layout" svg:width="0.749cm" svg:height="0.725cm" svg:x="-42.98cm" svg:y="68.774cm">
          <draw:text-box>
            <text:p>+</text:p>
          </draw:text-box>
        </draw:frame>
        <draw:frame draw:style-name="gr483" draw:text-style-name="P38" draw:layer="layout" svg:width="1.849cm" svg:height="1.039cm" svg:x="-46.949cm" svg:y="68.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5.279cm" svg:y="68.774cm">
          <draw:text-box>
            <text:p>+</text:p>
          </draw:text-box>
        </draw:frame>
        <draw:frame draw:style-name="gr484" draw:text-style-name="P11" draw:layer="layout" svg:width="1.684cm" svg:height="0.57cm" svg:x="-42.281cm" svg:y="68.851cm">
          <draw:text-box>
            <text:p><text:span text:style-name="T4">DBSCAN</text:span></text:p>
          </draw:text-box>
        </draw:frame>
        <draw:custom-shape draw:style-name="gr485" draw:text-style-name="P134" draw:layer="layout" svg:width="1.539cm" svg:height="1.287cm" draw:transform="rotate (1.5707963267949) translate (-40.535cm 69.936cm)">
          <text:p text:style-name="P19"><text:span text:style-name="T4">D</text:span><text:span text:style-name="T4">ic</text:span><text:span text:style-name="T4">ti</text:span><text:span text:style-name="T4">o</text:span><text:span text:style-name="T4">n</text:span><text:span text:style-name="T4">a</text:span><text:span text:style-name="T4">ry</text:span><text:span text:style-name="T4"><text:line-break/></text:span><text:span text:style-name="T4">of </text:span><text:span text:style-name="T4">w</text:span><text:span text:style-name="T4">o</text:span><text:span text:style-name="T4">r</text:span><text:span text:style-name="T4">d</text:span><text:span text:style-name="T4">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51.302cm" svg:y="68.113cm">
          <text:p/>
          <draw:enhanced-geometry svg:viewBox="0 0 21600 21600" draw:type="rectangle" draw:enhanced-path="M 0 0 L 21600 0 21600 21600 0 21600 0 0 Z N"/>
        </draw:custom-shape>
        <draw:frame draw:style-name="gr482" draw:text-style-name="P38" draw:layer="layout" svg:width="0.749cm" svg:height="0.725cm" svg:x="-42.979cm" svg:y="68.774cm">
          <draw:text-box>
            <text:p>+</text:p>
          </draw:text-box>
        </draw:frame>
        <draw:frame draw:style-name="gr483" draw:text-style-name="P38" draw:layer="layout" svg:width="1.849cm" svg:height="1.039cm" svg:x="-48.948cm" svg:y="68.617cm">
          <draw:text-box>
            <text:p text:style-name="P132"><text:span text:style-name="T12">Sliding</text:span><text:span text:style-name="T12"><text:line-break/></text:span><text:span text:style-name="T12">windows</text:span></text:p>
          </draw:text-box>
        </draw:frame>
        <draw:frame draw:style-name="gr482" draw:text-style-name="P38" draw:layer="layout" svg:width="0.749cm" svg:height="0.725cm" svg:x="-47.278cm" svg:y="68.774cm">
          <draw:text-box>
            <text:p>+</text:p>
          </draw:text-box>
        </draw:frame>
        <draw:frame draw:style-name="gr495" draw:text-style-name="P11" draw:layer="layout" svg:width="1.919cm" svg:height="0.887cm" svg:x="-42.28cm" svg:y="68.851cm">
          <draw:text-box>
            <text:p><text:span text:style-name="T4">Clustreing</text:span></text:p>
          </draw:text-box>
        </draw:frame>
        <draw:custom-shape draw:style-name="gr491" draw:text-style-name="P134" draw:layer="layout" svg:width="1.539cm" svg:height="1.287cm" draw:transform="rotate (1.5707963267949) translate (-40.534cm 69.836cm)">
          <text:p text:style-name="P19"><text:span text:style-name="T4">sentenc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5cm" svg:y="67.469cm">
          <draw:text-box>
            <text:p><text:span text:style-name="T12">S</text:span><text:span text:style-name="T13">0</text:span></text:p>
          </draw:text-box>
        </draw:frame>
        <draw:frame draw:style-name="gr33" draw:text-style-name="P11" draw:layer="layout" svg:width="0.947cm" svg:height="0.646cm" svg:x="-43.918cm" svg:y="67.469cm">
          <draw:text-box>
            <text:p><text:span text:style-name="T12">S</text:span><text:span text:style-name="T13">p</text:span></text:p>
          </draw:text-box>
        </draw:frame>
        <draw:frame draw:style-name="gr33" draw:text-style-name="P11" draw:layer="layout" svg:width="0.947cm" svg:height="0.646cm" svg:x="-37.916cm" svg:y="67.461cm">
          <draw:text-box>
            <text:p><text:span text:style-name="T12">S</text:span><text:span text:style-name="T13">p</text:span></text:p>
          </draw:text-box>
        </draw:frame>
        <draw:custom-shape draw:style-name="gr481" draw:text-style-name="P133" draw:layer="layout" svg:width="4.16cm" svg:height="0.97cm" svg:x="-51.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5.138cm" svg:y="66.68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4.093cm" svg:y="66.68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3.114cm" svg:y="66.68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41.99cm" svg:y="66.68cm">
            <text:p text:style-name="P19"><text:span text:style-name="T4">W</text:span><text:span text:style-name="T42">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83cm" svg:y1="66.948cm" svg:x2="-44.133cm" svg:y2="66.938cm">
            <text:p/>
          </draw:line>
          <draw:line draw:style-name="gr488" draw:text-style-name="P15" draw:layer="layout" svg:x1="-43.511cm" svg:y1="66.962cm" svg:x2="-43.088cm" svg:y2="66.951cm">
            <text:p/>
          </draw:line>
          <draw:line draw:style-name="gr488" draw:text-style-name="P15" draw:layer="layout" svg:x1="-42.465cm" svg:y1="66.962cm" svg:x2="-41.95cm" svg:y2="66.965cm">
            <text:p/>
          </draw:line>
        </draw:g>
        <draw:connector draw:style-name="gr489" draw:text-style-name="P7" draw:layer="layout" draw:type="curve" svg:x1="-45.797cm" svg:y1="66.924cm" svg:x2="-46.878cm" svg:y2="66.928cm" svg:d="M-45797 66924c-810 0-270 4-1081 4" svg:viewBox="0 0 1082 5">
          <text:p/>
        </draw:connector>
        <draw:connector draw:style-name="gr489" draw:text-style-name="P7" draw:layer="layout" draw:type="curve" svg:x1="-39.807cm" svg:y1="66.924cm" svg:x2="-40.888cm" svg:y2="66.928cm" svg:d="M-39807 66924c-810 0-270 4-1081 4" svg:viewBox="0 0 1082 5">
          <text:p/>
        </draw:connector>
        <draw:custom-shape draw:style-name="gr481" draw:text-style-name="P133" draw:layer="layout" svg:width="4.16cm" svg:height="0.97cm" svg:x="-39.349cm" svg:y="66.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96" draw:text-style-name="P139" xml:id="id396" draw:id="id396" draw:layer="layout" svg:width="5.693cm" svg:height="3.474cm" svg:x="-16.503cm" svg:y="49.103cm">
          <text:p text:style-name="P5"><text:span text:style-name="T46">Blackboard</text:span><text:span text:style-name="T46"><text:line-break/></text:span><text:span text:style-name="T46">for sharing </text:span><text:span text:style-name="T46"><text:line-break/></text:span><text:span text:style-name="T46">each robots</text:span><text:span text:style-name="T46"><text:line-break/></text:span><text:span text:style-name="T46">recent utterances</text:span><text:span text:style-name="T46"><text:line-break/></text:span><text:span text:style-name="T46">and decoders</text:span><text:span text:style-name="T46"><text:line-break/></text:span><text:span text:style-name="T46">(Stimuli with language</text:span><text:span text:style-name="T46"><text:line-break/></text:span><text:span text:style-name="T46">medium)</text:span></text:p>
        </draw:rect>
        <draw:connector draw:style-name="gr36" draw:text-style-name="P7" draw:layer="layout" draw:type="curve" svg:x1="-13.656cm" svg:y1="49.103cm" svg:x2="-18.631cm" svg:y2="43.425cm" draw:start-shape="id396" draw:start-glue-point="0" draw:end-shape="id397" draw:end-glue-point="2" svg:d="M-13656 49103c0-4258-4975-1420-4975-5678" svg:viewBox="0 0 4976 5679">
          <text:p/>
        </draw:connector>
        <draw:connector draw:style-name="gr36" draw:text-style-name="P7" draw:layer="layout" draw:type="curve" svg:x1="-23.371cm" svg:y1="42.727cm" svg:x2="-24.444cm" svg:y2="42.727cm" draw:start-shape="id398" draw:start-glue-point="3" draw:end-shape="id399" draw:end-glue-point="1" svg:d="M-23371 42727h-1073" svg:viewBox="0 0 1074 1">
          <text:p/>
        </draw:connector>
        <draw:connector draw:style-name="gr36" draw:text-style-name="P7" draw:layer="layout" draw:type="curve" svg:x1="-19.918cm" svg:y1="42.727cm" svg:x2="-20.797cm" svg:y2="42.727cm" draw:start-shape="id397" draw:start-glue-point="3" draw:end-shape="id398" draw:end-glue-point="1" svg:d="M-19918 42727h-879" svg:viewBox="0 0 880 1">
          <text:p/>
        </draw:connector>
        <draw:connector draw:style-name="gr36" draw:text-style-name="P7" draw:layer="layout" draw:type="curve" svg:x1="-30.222cm" svg:y1="42.794cm" svg:x2="-31.32cm" svg:y2="42.816cm" draw:start-shape="id400" draw:end-shape="id383" draw:end-glue-point="1" svg:d="M-30222 42794c-837 0-288 22-1098 22" svg:viewBox="0 0 1099 23">
          <text:p/>
        </draw:connector>
        <draw:path draw:style-name="gr497" draw:text-style-name="P140" draw:layer="layout" svg:width="23.609cm" svg:height="6.044cm" svg:x="-42.674cm" svg:y="49.187cm" svg:viewBox="0 0 23610 6045" svg:d="M2001 639c1509-369 1913-360 3899-516 1413-111 2931-107 4417-121 1009-10 1982 21 2946 68 856 41 1693 104 2513 175 762 65 1725 171 1855 405 111 197 262 313 983 455 570 113 1158 38 1853 61 732 25 1500 286 2020 415 479 119 810 285 873 459 72 202 225 405 217 608-7 183 210 408-379 567-546 146-513 515-785 698-229 158 187 1044-316 1262-493 678-889 332-1577 416-1243 151-2636 222-3982 310-670 44-1338 97-2018 135-793 45-1492-91-2184-162-712-74-1411-165-2181-203-661-31-1350-33-2020 14-778 53-1574 128-2398 108-657-16-1330 59-1855-149-404-159-1034-166-1454-318-526-193-1258-392-1585-616-243-168-423-443-564-618-195-243-78-497-218-743-93-165-19-333-52-499-71-340 304-667 490-999 119-214-38-407 110-648 104-384 1392-564 1392-564z">
          <text:p/>
        </draw:path>
        <draw:frame draw:style-name="gr498" draw:text-style-name="P13" draw:layer="layout" svg:width="3.475cm" svg:height="0.878cm" svg:x="-36.072cm" svg:y="39.061cm">
          <draw:text-box>
            <text:p text:style-name="P3"><text:span text:style-name="T7">Robot 1</text:span></text:p>
          </draw:text-box>
        </draw:frame>
        <draw:connector draw:style-name="gr499" draw:text-style-name="P7" draw:layer="layout" draw:type="curve" svg:x1="-20.661cm" svg:y1="51.489cm" svg:x2="-16.503cm" svg:y2="50.84cm" draw:start-shape="id401" draw:start-glue-point="1" draw:end-shape="id396" draw:end-glue-point="3" svg:d="M-20661 51489c3120 0 1041-649 4158-649" svg:viewBox="0 0 4159 650">
          <text:p text:style-name="P5"><text:span text:style-name="T4">Robot 1</text:span><text:span text:style-name="T4"><text:line-break/></text:span><text:span text:style-name="T4">utters</text:span><text:span text:style-name="T4"><text:line-break/></text:span><text:span text:style-name="T4">and decoder</text:span></text:p>
        </draw:connector>
        <draw:frame draw:style-name="gr500" draw:text-style-name="P13" draw:layer="layout" svg:width="3.475cm" svg:height="0.878cm" svg:x="-30.214cm" svg:y="49.736cm">
          <draw:text-box>
            <text:p text:style-name="P3"><text:span text:style-name="T7">Robot 2</text:span></text:p>
          </draw:text-box>
        </draw:frame>
        <draw:g draw:style-name="gr31">
          <draw:custom-shape draw:style-name="gr501" draw:text-style-name="P142" xml:id="id402" draw:id="id402" draw:layer="layout" svg:width="0.891cm" svg:height="0.97cm" svg:x="-59.84cm" svg:y="46.447cm">
            <text:p text:style-name="P141"><text:span text:style-name="T47">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04" draw:id="id404" draw:layer="layout" svg:width="0.891cm" svg:height="0.97cm" svg:x="-59.839cm" svg:y="47.747cm">
            <text:p text:style-name="P141"><text:span text:style-name="T47">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06" draw:id="id406" draw:layer="layout" svg:width="0.891cm" svg:height="0.97cm" svg:x="-59.838cm" svg:y="49.047cm">
            <text:p text:style-name="P141"><text:span text:style-name="T47">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08" draw:id="id408" draw:layer="layout" svg:width="0.891cm" svg:height="0.97cm" svg:x="-59.837cm" svg:y="50.347cm">
            <text:p text:style-name="P141"><text:span text:style-name="T47">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43" xml:id="id403" draw:id="id403" draw:layer="layout" svg:width="0.891cm" svg:height="0.97cm" svg:x="-56.936cm" svg:y="47.747cm">
            <text:p text:style-name="P25"><text:span text:style-name="T12">e</text:span><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43" xml:id="id405" draw:id="id405" draw:layer="layout" svg:width="0.891cm" svg:height="0.97cm" svg:x="-56.935cm" svg:y="48.847cm">
            <text:p text:style-name="P25"><text:span text:style-name="T12">e</text:span><text:span text:style-name="T1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43" xml:id="id407" draw:id="id407" draw:layer="layout" svg:width="0.891cm" svg:height="0.97cm" svg:x="-56.934cm" svg:y="49.947cm">
            <text:p text:style-name="P25"><text:span text:style-name="T12">e</text:span><text:span text:style-name="T1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8.949cm" svg:y1="46.932cm" svg:x2="-56.936cm" svg:y2="48.232cm" draw:start-shape="id402" draw:start-glue-point="10" draw:end-shape="id403" draw:end-glue-point="6" svg:d="M-58949 46932l2013 1300" svg:viewBox="0 0 2014 1301">
            <text:p/>
          </draw:connector>
          <draw:connector draw:style-name="gr503" draw:text-style-name="P15" draw:layer="layout" draw:type="line" svg:x1="-58.948cm" svg:y1="48.232cm" svg:x2="-56.935cm" svg:y2="49.332cm" draw:start-shape="id404" draw:start-glue-point="10" draw:end-shape="id405" draw:end-glue-point="6" svg:d="M-58948 48232l2013 1100" svg:viewBox="0 0 2014 1101">
            <text:p/>
          </draw:connector>
          <draw:connector draw:style-name="gr503" draw:text-style-name="P15" draw:layer="layout" draw:type="line" svg:x1="-58.947cm" svg:y1="49.532cm" svg:x2="-56.934cm" svg:y2="50.432cm" draw:start-shape="id406" draw:start-glue-point="10" draw:end-shape="id407" draw:end-glue-point="6" svg:d="M-58947 49532l2013 900" svg:viewBox="0 0 2014 901">
            <text:p/>
          </draw:connector>
          <draw:connector draw:style-name="gr503" draw:text-style-name="P15" draw:layer="layout" draw:type="line" svg:x1="-58.946cm" svg:y1="50.832cm" svg:x2="-56.934cm" svg:y2="50.432cm" draw:start-shape="id408" draw:start-glue-point="10" draw:end-shape="id407" draw:end-glue-point="6" svg:d="M-58946 50832l2012-400" svg:viewBox="0 0 2013 401">
            <text:p/>
          </draw:connector>
          <draw:connector draw:style-name="gr503" draw:text-style-name="P15" draw:layer="layout" draw:type="line" svg:x1="-58.946cm" svg:y1="50.832cm" svg:x2="-56.935cm" svg:y2="49.332cm" draw:start-shape="id408" draw:start-glue-point="10" draw:end-shape="id405" draw:end-glue-point="6" svg:d="M-58946 50832l2011-1500" svg:viewBox="0 0 2012 1501">
            <text:p/>
          </draw:connector>
          <draw:connector draw:style-name="gr503" draw:text-style-name="P15" draw:layer="layout" draw:type="line" svg:x1="-58.946cm" svg:y1="50.832cm" svg:x2="-56.936cm" svg:y2="48.232cm" draw:start-shape="id408" draw:start-glue-point="10" draw:end-shape="id403" draw:end-glue-point="6" svg:d="M-58946 50832l2010-2600" svg:viewBox="0 0 2011 2601">
            <text:p/>
          </draw:connector>
          <draw:connector draw:style-name="gr503" draw:text-style-name="P15" draw:layer="layout" draw:type="line" svg:x1="-58.947cm" svg:y1="49.532cm" svg:x2="-56.935cm" svg:y2="49.332cm" draw:start-shape="id406" draw:start-glue-point="10" draw:end-shape="id405" draw:end-glue-point="6" svg:d="M-58947 49532l2012-200" svg:viewBox="0 0 2013 201">
            <text:p/>
          </draw:connector>
          <draw:connector draw:style-name="gr503" draw:text-style-name="P15" draw:layer="layout" draw:type="line" svg:x1="-58.947cm" svg:y1="49.532cm" svg:x2="-56.936cm" svg:y2="48.232cm" draw:start-shape="id406" draw:start-glue-point="10" draw:end-shape="id403" draw:end-glue-point="6" svg:d="M-58947 49532l2011-1300" svg:viewBox="0 0 2012 1301">
            <text:p/>
          </draw:connector>
          <draw:connector draw:style-name="gr503" draw:text-style-name="P15" draw:layer="layout" draw:type="line" svg:x1="-58.948cm" svg:y1="48.232cm" svg:x2="-56.936cm" svg:y2="48.232cm" draw:start-shape="id404" draw:start-glue-point="10" draw:end-shape="id403" draw:end-glue-point="6" svg:d="M-58948 48232h2012" svg:viewBox="0 0 2013 1">
            <text:p/>
          </draw:connector>
          <draw:connector draw:style-name="gr503" draw:text-style-name="P15" draw:layer="layout" draw:type="line" svg:x1="-58.948cm" svg:y1="48.232cm" svg:x2="-56.934cm" svg:y2="50.432cm" draw:start-shape="id404" draw:start-glue-point="10" draw:end-shape="id407" draw:end-glue-point="6" svg:d="M-58948 48232l2014 2200" svg:viewBox="0 0 2015 2201">
            <text:p/>
          </draw:connector>
          <draw:connector draw:style-name="gr503" draw:text-style-name="P15" draw:layer="layout" draw:type="line" svg:x1="-58.949cm" svg:y1="46.932cm" svg:x2="-56.935cm" svg:y2="49.332cm" draw:start-shape="id402" draw:start-glue-point="10" draw:end-shape="id405" draw:end-glue-point="6" svg:d="M-58949 46932l2014 2400" svg:viewBox="0 0 2015 2401">
            <text:p/>
          </draw:connector>
          <draw:connector draw:style-name="gr503" draw:text-style-name="P15" draw:layer="layout" draw:type="line" svg:x1="-58.949cm" svg:y1="46.932cm" svg:x2="-56.934cm" svg:y2="50.432cm" draw:start-shape="id402" draw:start-glue-point="10" draw:end-shape="id407" draw:end-glue-point="6" svg:d="M-58949 46932l2015 3500" svg:viewBox="0 0 2016 3501">
            <text:p/>
          </draw:connector>
          <draw:custom-shape draw:style-name="gr501" draw:text-style-name="P142" xml:id="id409" draw:id="id409" draw:layer="layout" svg:width="0.891cm" svg:height="0.97cm" svg:x="-54.04cm" svg:y="46.447cm">
            <text:p text:style-name="P144"><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10" draw:id="id410" draw:layer="layout" svg:width="0.891cm" svg:height="0.97cm" svg:x="-54.039cm" svg:y="47.747cm">
            <text:p text:style-name="P144"><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11" draw:id="id411" draw:layer="layout" svg:width="0.891cm" svg:height="0.97cm" svg:x="-54.038cm" svg:y="49.047cm">
            <text:p text:style-name="P144"><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12" draw:id="id412" draw:layer="layout" svg:width="0.891cm" svg:height="0.97cm" svg:x="-54.037cm" svg:y="50.347cm">
            <text:p text:style-name="P144"><text:span text:style-name="T48">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6.045cm" svg:y1="48.232cm" svg:x2="-54.04cm" svg:y2="46.932cm" draw:start-shape="id403" draw:start-glue-point="10" draw:end-shape="id409" draw:end-glue-point="6" svg:d="M-56045 48232l2005-1300" svg:viewBox="0 0 2006 1301">
            <text:p/>
          </draw:connector>
          <draw:connector draw:style-name="gr503" draw:text-style-name="P15" draw:layer="layout" draw:type="line" svg:x1="-56.044cm" svg:y1="48.232cm" svg:x2="-54.039cm" svg:y2="48.232cm" draw:end-shape="id410" draw:end-glue-point="6" svg:d="M-56044 48232h2005" svg:viewBox="0 0 2006 1">
            <text:p/>
          </draw:connector>
          <draw:connector draw:style-name="gr503" draw:text-style-name="P15" draw:layer="layout" draw:type="line" svg:x1="-56.043cm" svg:y1="48.232cm" svg:x2="-54.038cm" svg:y2="49.532cm" draw:end-shape="id411" draw:end-glue-point="6" svg:d="M-56043 48232l2005 1300" svg:viewBox="0 0 2006 1301">
            <text:p/>
          </draw:connector>
          <draw:connector draw:style-name="gr503" draw:text-style-name="P15" xml:id="id427" draw:id="id427" draw:layer="layout" draw:type="line" svg:x1="-56.042cm" svg:y1="48.232cm" svg:x2="-54.037cm" svg:y2="50.832cm" draw:end-shape="id412" draw:end-glue-point="6" svg:d="M-56042 48232l2005 2600" svg:viewBox="0 0 2006 2601">
            <text:p/>
          </draw:connector>
          <draw:connector draw:style-name="gr503" draw:text-style-name="P15" draw:layer="layout" draw:type="line" svg:x1="-56.044cm" svg:y1="49.332cm" svg:x2="-54.04cm" svg:y2="46.932cm" draw:start-shape="id405" draw:start-glue-point="10" draw:end-shape="id409" draw:end-glue-point="6" svg:d="M-56044 49332l2004-2400" svg:viewBox="0 0 2005 2401">
            <text:p/>
          </draw:connector>
          <draw:connector draw:style-name="gr503" draw:text-style-name="P15" draw:layer="layout" draw:type="line" svg:x1="-56.043cm" svg:y1="49.332cm" svg:x2="-54.039cm" svg:y2="48.232cm" draw:end-shape="id410" draw:end-glue-point="6" svg:d="M-56043 49332l2004-1100" svg:viewBox="0 0 2005 1101">
            <text:p/>
          </draw:connector>
          <draw:connector draw:style-name="gr503" draw:text-style-name="P15" draw:layer="layout" draw:type="line" svg:x1="-56.043cm" svg:y1="49.332cm" svg:x2="-54.038cm" svg:y2="49.532cm" draw:end-shape="id411" draw:end-glue-point="6" svg:d="M-56043 49332l2005 200" svg:viewBox="0 0 2006 201">
            <text:p/>
          </draw:connector>
          <draw:connector draw:style-name="gr503" draw:text-style-name="P15" xml:id="id426" draw:id="id426" draw:layer="layout" draw:type="line" svg:x1="-56.042cm" svg:y1="49.332cm" svg:x2="-54.037cm" svg:y2="50.832cm" draw:end-shape="id412" draw:end-glue-point="6" svg:d="M-56042 49332l2005 1500" svg:viewBox="0 0 2006 1501">
            <text:p/>
          </draw:connector>
          <draw:connector draw:style-name="gr503" draw:text-style-name="P15" draw:layer="layout" draw:type="line" svg:x1="-56.043cm" svg:y1="50.432cm" svg:x2="-54.037cm" svg:y2="50.832cm" draw:start-shape="id407" draw:start-glue-point="10" draw:end-shape="id412" draw:end-glue-point="6" svg:d="M-56043 50432l2006 400" svg:viewBox="0 0 2007 401">
            <text:p/>
          </draw:connector>
          <draw:connector draw:style-name="gr503" draw:text-style-name="P15" draw:layer="layout" draw:type="line" svg:x1="-56.042cm" svg:y1="50.432cm" svg:x2="-54.038cm" svg:y2="49.532cm" draw:end-shape="id411" draw:end-glue-point="6" svg:d="M-56042 50432l2004-900" svg:viewBox="0 0 2005 901">
            <text:p/>
          </draw:connector>
          <draw:connector draw:style-name="gr503" draw:text-style-name="P15" draw:layer="layout" draw:type="line" svg:x1="-56.042cm" svg:y1="50.432cm" svg:x2="-54.039cm" svg:y2="48.232cm" draw:end-shape="id410" draw:end-glue-point="6" svg:d="M-56042 50432l2003-2200" svg:viewBox="0 0 2004 2201">
            <text:p/>
          </draw:connector>
          <draw:connector draw:style-name="gr503" draw:text-style-name="P15" draw:layer="layout" draw:type="line" svg:x1="-56.041cm" svg:y1="50.432cm" svg:x2="-54.04cm" svg:y2="46.932cm" draw:end-shape="id409" draw:end-glue-point="6" svg:d="M-56041 50432l2001-3500" svg:viewBox="0 0 2002 3501">
            <text:p/>
          </draw:connector>
          <draw:frame draw:style-name="gr504" draw:text-style-name="P38" draw:layer="layout" svg:width="2.903cm" svg:height="0.725cm" svg:x="-58.103cm" svg:y="56.045cm">
            <draw:text-box>
              <text:p>Autoencoder</text:p>
            </draw:text-box>
          </draw:frame>
          <draw:line draw:style-name="gr505" draw:text-style-name="P15" draw:layer="layout" svg:x1="-56.789cm" svg:y1="55.649cm" svg:x2="-59.907cm" svg:y2="55.64cm">
            <text:p/>
          </draw:line>
          <draw:line draw:style-name="gr506" draw:text-style-name="P15" draw:layer="layout" svg:x1="-56.389cm" svg:y1="55.65cm" svg:x2="-53.349cm" svg:y2="55.596cm">
            <text:p/>
          </draw:line>
          <draw:frame draw:style-name="gr507" draw:text-style-name="P38" draw:layer="layout" svg:width="2.22cm" svg:height="0.725cm" svg:x="-56.043cm" svg:y="55.031cm">
            <draw:text-box>
              <text:p>decoding</text:p>
            </draw:text-box>
          </draw:frame>
          <draw:frame draw:style-name="gr507" draw:text-style-name="P38" draw:layer="layout" svg:width="2.22cm" svg:height="0.725cm" svg:x="-59.124cm" svg:y="55.014cm">
            <draw:text-box>
              <text:p>encoding</text:p>
            </draw:text-box>
          </draw:frame>
          <draw:g draw:style-name="gr23">
            <draw:polygon draw:style-name="gr508" draw:text-style-name="P145" draw:layer="layout" svg:width="1.215cm" svg:height="1.383cm" svg:x="-58.949cm" svg:y="57.122cm" svg:viewBox="0 0 1216 1384" draw:points="1216,1384 0,792 0,591 1216,0">
              <text:p/>
            </draw:polygon>
            <draw:frame draw:style-name="gr509" draw:text-style-name="P146" draw:layer="layout" svg:width="1.527cm" svg:height="0.569cm" svg:x="-59.05cm" svg:y="57.52cm">
              <draw:text-box>
                <text:p><text:span text:style-name="T49">decoder</text:span></text:p>
              </draw:text-box>
            </draw:frame>
          </draw:g>
          <draw:g draw:style-name="gr31">
            <draw:g draw:style-name="gr23">
              <draw:polygon draw:style-name="gr510" draw:text-style-name="P113" draw:layer="layout" svg:width="1.179cm" svg:height="1.358cm" svg:x="-55.796cm" svg:y="57.231cm" svg:viewBox="0 0 1180 1359" draw:points="0,0 1180,581 1180,777 0,1359">
                <text:p/>
              </draw:polygon>
            </draw:g>
            <draw:frame draw:style-name="gr484" draw:text-style-name="P11" draw:layer="layout" svg:width="1.527cm" svg:height="0.57cm" svg:x="-56.027cm" svg:y="57.594cm">
              <draw:text-box>
                <text:p><text:span text:style-name="T49">encoder</text:span></text:p>
              </draw:text-box>
            </draw:frame>
          </draw:g>
          <draw:custom-shape draw:style-name="gr511" draw:text-style-name="P148" xml:id="id413" draw:id="id413" draw:layer="layout" svg:width="1.34cm" svg:height="1.458cm" svg:x="-72.248cm" svg:y="53.908cm">
            <text:p text:style-name="P147"><text:span text:style-name="T46">r</text:span><text:span text:style-name="T5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1" draw:text-style-name="P150" xml:id="id415" draw:id="id415" draw:layer="layout" svg:width="1.34cm" svg:height="1.458cm" svg:x="-72.248cm" svg:y="55.863cm">
            <text:p text:style-name="P149"><text:span text:style-name="T46">r</text:span><text:span text:style-name="T50">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414" draw:id="id414" draw:layer="layout" svg:width="1.34cm" svg:height="1.458cm" svg:x="-67.882cm" svg:y="54.209cm">
            <text:p text:style-name="P151"><text:span text:style-name="T51">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416" draw:id="id416" draw:layer="layout" svg:width="1.34cm" svg:height="1.458cm" svg:x="-67.882cm" svg:y="55.863cm">
            <text:p text:style-name="P151"><text:span text:style-name="T51">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417" draw:id="id417" draw:layer="layout" svg:width="1.34cm" svg:height="1.458cm" svg:x="-67.882cm" svg:y="57.517cm">
            <text:p text:style-name="P151"><text:span text:style-name="T51">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70.908cm" svg:y1="54.637cm" svg:x2="-67.882cm" svg:y2="54.938cm" draw:start-shape="id413" draw:start-glue-point="10" draw:end-shape="id414" draw:end-glue-point="6" svg:d="M-70908 54637l3026 301" svg:viewBox="0 0 3027 302">
            <text:p/>
          </draw:connector>
          <draw:connector draw:style-name="gr503" draw:text-style-name="P15" draw:layer="layout" draw:type="line" svg:x1="-70.908cm" svg:y1="56.592cm" svg:x2="-67.882cm" svg:y2="56.592cm" draw:start-shape="id415" draw:start-glue-point="10" draw:end-shape="id416" draw:end-glue-point="6" svg:d="M-70908 56592h3026" svg:viewBox="0 0 3027 1">
            <text:p/>
          </draw:connector>
          <draw:connector draw:style-name="gr503" draw:text-style-name="P15" draw:layer="layout" draw:type="line" svg:x1="-70.908cm" svg:y1="56.592cm" svg:x2="-67.882cm" svg:y2="54.938cm" draw:start-shape="id415" draw:start-glue-point="10" draw:end-shape="id414" draw:end-glue-point="6" svg:d="M-70908 56592l3026-1654" svg:viewBox="0 0 3027 1655">
            <text:p/>
          </draw:connector>
          <draw:connector draw:style-name="gr503" draw:text-style-name="P15" draw:layer="layout" draw:type="line" svg:x1="-70.908cm" svg:y1="56.592cm" svg:x2="-67.882cm" svg:y2="58.246cm" draw:start-shape="id415" draw:start-glue-point="10" draw:end-shape="id417" draw:end-glue-point="6" svg:d="M-70908 56592l3026 1654" svg:viewBox="0 0 3027 1655">
            <text:p/>
          </draw:connector>
          <draw:connector draw:style-name="gr503" draw:text-style-name="P15" draw:layer="layout" draw:type="line" svg:x1="-70.908cm" svg:y1="54.637cm" svg:x2="-67.882cm" svg:y2="56.592cm" draw:start-shape="id413" draw:start-glue-point="10" draw:end-shape="id416" draw:end-glue-point="6" svg:d="M-70908 54637l3026 1955" svg:viewBox="0 0 3027 1956">
            <text:p/>
          </draw:connector>
          <draw:connector draw:style-name="gr503" draw:text-style-name="P15" draw:layer="layout" draw:type="line" svg:x1="-70.908cm" svg:y1="54.637cm" svg:x2="-67.882cm" svg:y2="58.246cm" draw:start-shape="id413" draw:start-glue-point="10" draw:end-shape="id417" draw:end-glue-point="6" svg:d="M-70908 54637l3026 3609" svg:viewBox="0 0 3027 3610">
            <text:p/>
          </draw:connector>
          <draw:custom-shape draw:style-name="gr513" draw:text-style-name="P154" xml:id="id418" draw:id="id418" draw:layer="layout" svg:width="1.34cm" svg:height="1.458cm" svg:x="-63.523cm" svg:y="53.908cm">
            <text:p text:style-name="P153"><text:span text:style-name="T52">r</text:span><text:span text:style-name="T5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4" draw:text-style-name="P154" xml:id="id419" draw:id="id419" draw:layer="layout" svg:width="1.34cm" svg:height="1.458cm" svg:x="-63.523cm" svg:y="55.863cm">
            <text:p text:style-name="P153"><text:span text:style-name="T52">r</text:span><text:span text:style-name="T5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66.542cm" svg:y1="54.938cm" svg:x2="-63.523cm" svg:y2="54.637cm" draw:start-shape="id414" draw:start-glue-point="10" draw:end-shape="id418" draw:end-glue-point="6" svg:d="M-66542 54938l3019-301" svg:viewBox="0 0 3020 302">
            <text:p/>
          </draw:connector>
          <draw:connector draw:style-name="gr503" draw:text-style-name="P15" draw:layer="layout" draw:type="line" svg:x1="-66.542cm" svg:y1="54.938cm" svg:x2="-63.523cm" svg:y2="56.592cm" draw:start-shape="id414" draw:start-glue-point="10" draw:end-shape="id419" draw:end-glue-point="6" svg:d="M-66542 54938l3019 1654" svg:viewBox="0 0 3020 1655">
            <text:p/>
          </draw:connector>
          <draw:connector draw:style-name="gr503" draw:text-style-name="P15" xml:id="id420" draw:id="id420" draw:layer="layout" draw:type="line" svg:x1="-66.542cm" svg:y1="56.592cm" svg:x2="-63.526cm" svg:y2="54.637cm" draw:start-shape="id416" draw:start-glue-point="10" svg:d="M-66542 56592l3016-1955" svg:viewBox="0 0 3017 1956">
            <text:p/>
          </draw:connector>
          <draw:connector draw:style-name="gr503" draw:text-style-name="P15" draw:layer="layout" draw:type="line" svg:x1="-66.542cm" svg:y1="56.592cm" svg:x2="-63.523cm" svg:y2="56.592cm" draw:start-shape="id416" draw:start-glue-point="10" draw:end-shape="id419" draw:end-glue-point="6" svg:d="M-66542 56592h3019" svg:viewBox="0 0 3020 1">
            <text:p/>
          </draw:connector>
          <draw:connector draw:style-name="gr503" draw:text-style-name="P15" draw:layer="layout" draw:type="line" svg:x1="-66.542cm" svg:y1="58.246cm" svg:x2="-63.523cm" svg:y2="56.592cm" draw:start-shape="id417" draw:start-glue-point="10" draw:end-shape="id419" draw:end-glue-point="6" svg:d="M-66542 58246l3019-1654" svg:viewBox="0 0 3020 1655">
            <text:p/>
          </draw:connector>
          <draw:connector draw:style-name="gr503" draw:text-style-name="P15" draw:layer="layout" draw:type="line" svg:x1="-66.542cm" svg:y1="58.246cm" svg:x2="-63.526cm" svg:y2="54.637cm" draw:start-shape="id417" draw:start-glue-point="10" draw:end-shape="id420" draw:end-glue-point="3" svg:d="M-66542 58246l3016-3609" svg:viewBox="0 0 3017 3610">
            <text:p/>
          </draw:connector>
          <draw:frame draw:style-name="gr515" draw:text-style-name="P38" draw:layer="layout" svg:width="4.668cm" svg:height="3.095cm" svg:x="-65.318cm" svg:y="48.985cm">
            <draw:text-box>
              <text:p>Continue<text:line-break/>back decoding<text:line-break/>until the parameters<text:line-break/>each parameter<text:line-break/>one node for AE <text:line-break/>for the action potential</text:p>
            </draw:text-box>
          </draw:frame>
          <draw:custom-shape draw:style-name="gr512" draw:text-style-name="P152" xml:id="id421" draw:id="id421" draw:layer="layout" svg:width="1.34cm" svg:height="1.458cm" svg:x="-67.882cm" svg:y="59.321cm">
            <text:p text:style-name="P151"><text:span text:style-name="T51">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xml:id="id423" draw:id="id423" draw:layer="layout" draw:type="line" svg:x1="-66.542cm" svg:y1="60.05cm" svg:x2="-63.526cm" svg:y2="54.637cm" draw:start-shape="id421" draw:start-glue-point="10" svg:d="M-66542 60050l3016-5413" svg:viewBox="0 0 3017 5414">
            <text:p/>
          </draw:connector>
          <draw:connector draw:style-name="gr503" draw:text-style-name="P15" draw:layer="layout" draw:type="line" svg:x1="-66.542cm" svg:y1="60.05cm" svg:x2="-63.523cm" svg:y2="56.592cm" draw:start-shape="id421" draw:start-glue-point="10" draw:end-shape="id419" draw:end-glue-point="6" svg:d="M-66542 60050l3019-3458" svg:viewBox="0 0 3020 3459">
            <text:p/>
          </draw:connector>
          <draw:connector draw:style-name="gr503" draw:text-style-name="P15" draw:layer="layout" draw:type="line" svg:x1="-70.908cm" svg:y1="56.592cm" svg:x2="-67.882cm" svg:y2="60.05cm" draw:start-shape="id415" draw:start-glue-point="10" draw:end-shape="id421" draw:end-glue-point="6" svg:d="M-70908 56592l3026 3458" svg:viewBox="0 0 3027 3459">
            <text:p/>
          </draw:connector>
          <draw:connector draw:style-name="gr503" draw:text-style-name="P15" draw:layer="layout" draw:type="line" svg:x1="-70.908cm" svg:y1="54.637cm" svg:x2="-67.882cm" svg:y2="60.05cm" draw:start-shape="id413" draw:start-glue-point="10" draw:end-shape="id421" draw:end-glue-point="6" svg:d="M-70908 54637l3026 5413" svg:viewBox="0 0 3027 5414">
            <text:p/>
          </draw:connector>
          <draw:custom-shape draw:style-name="gr516" draw:text-style-name="P152" xml:id="id422" draw:id="id422" draw:layer="layout" svg:width="1.34cm" svg:height="1.459cm" svg:x="-67.882cm" svg:y="61.125cm">
            <text:p text:style-name="P151"><text:span text:style-name="T5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66.542cm" svg:y1="61.855cm" svg:x2="-63.523cm" svg:y2="56.592cm" draw:start-shape="id422" draw:start-glue-point="10" draw:end-shape="id419" draw:end-glue-point="6" svg:d="M-66542 61855l3019-5263" svg:viewBox="0 0 3020 5264">
            <text:p/>
          </draw:connector>
          <draw:connector draw:style-name="gr503" draw:text-style-name="P15" draw:layer="layout" draw:type="line" svg:x1="-66.542cm" svg:y1="61.855cm" svg:x2="-63.526cm" svg:y2="54.637cm" draw:start-shape="id422" draw:start-glue-point="10" draw:end-shape="id423" draw:end-glue-point="3" svg:d="M-66542 61855l3016-7218" svg:viewBox="0 0 3017 7219">
            <text:p/>
          </draw:connector>
          <draw:connector draw:style-name="gr503" draw:text-style-name="P15" draw:layer="layout" draw:type="line" svg:x1="-70.908cm" svg:y1="56.592cm" svg:x2="-67.882cm" svg:y2="61.855cm" draw:start-shape="id415" draw:start-glue-point="10" draw:end-shape="id422" draw:end-glue-point="6" svg:d="M-70908 56592l3026 5263" svg:viewBox="0 0 3027 5264">
            <text:p/>
          </draw:connector>
          <draw:connector draw:style-name="gr503" draw:text-style-name="P15" draw:layer="layout" draw:type="line" svg:x1="-70.908cm" svg:y1="54.637cm" svg:x2="-67.882cm" svg:y2="61.855cm" draw:start-shape="id413" draw:start-glue-point="10" draw:end-shape="id422" draw:end-glue-point="6" svg:d="M-70908 54637l3026 7218" svg:viewBox="0 0 3027 7219">
            <text:p/>
          </draw:connector>
          <draw:custom-shape draw:style-name="gr501" draw:text-style-name="P142" xml:id="id424" draw:id="id424" draw:layer="layout" svg:width="0.891cm" svg:height="0.97cm" svg:x="-59.836cm" svg:y="51.547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25" draw:id="id425" draw:layer="layout" svg:width="0.891cm" svg:height="0.97cm" svg:x="-54.035cm" svg:y="51.547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8.945cm" svg:y1="52.032cm" svg:x2="-56.934cm" svg:y2="50.432cm" draw:start-shape="id424" draw:start-glue-point="10" svg:d="M-58945 52032l2011-1600" svg:viewBox="0 0 2012 1601">
            <text:p/>
          </draw:connector>
          <draw:connector draw:style-name="gr503" draw:text-style-name="P15" draw:layer="layout" draw:type="line" svg:x1="-58.945cm" svg:y1="52.032cm" svg:x2="-56.935cm" svg:y2="49.332cm" draw:start-shape="id424" draw:start-glue-point="10" draw:end-shape="id405" draw:end-glue-point="6" svg:d="M-58945 52032l2010-2700" svg:viewBox="0 0 2011 2701">
            <text:p/>
          </draw:connector>
          <draw:connector draw:style-name="gr503" draw:text-style-name="P15" draw:layer="layout" draw:type="line" svg:x1="-58.945cm" svg:y1="52.032cm" svg:x2="-56.936cm" svg:y2="48.232cm" draw:start-shape="id424" draw:start-glue-point="10" draw:end-shape="id403" draw:end-glue-point="6" svg:d="M-58945 52032l2009-3800" svg:viewBox="0 0 2010 3801">
            <text:p/>
          </draw:connector>
          <draw:connector draw:style-name="gr503" draw:text-style-name="P15" draw:layer="layout" draw:type="line" svg:x1="-56.042cm" svg:y1="50.432cm" svg:x2="-54.035cm" svg:y2="52.032cm" draw:end-shape="id425" draw:end-glue-point="6" svg:d="M-56042 50432l2007 1600" svg:viewBox="0 0 2008 1601">
            <text:p/>
          </draw:connector>
          <draw:connector draw:style-name="gr503" draw:text-style-name="P15" draw:layer="layout" draw:type="line" svg:x1="-56.042cm" svg:y1="49.332cm" svg:x2="-54.035cm" svg:y2="52.032cm" draw:start-shape="id426" draw:start-glue-point="2" draw:end-shape="id425" draw:end-glue-point="6" svg:d="M-56042 49332l2007 2700" svg:viewBox="0 0 2008 2701">
            <text:p/>
          </draw:connector>
          <draw:connector draw:style-name="gr503" draw:text-style-name="P15" draw:layer="layout" draw:type="line" svg:x1="-56.042cm" svg:y1="48.232cm" svg:x2="-54.035cm" svg:y2="52.032cm" draw:start-shape="id427" draw:start-glue-point="2" draw:end-shape="id425" draw:end-glue-point="6" svg:d="M-56042 48232l2007 3800" svg:viewBox="0 0 2008 3801">
            <text:p/>
          </draw:connector>
          <draw:custom-shape draw:style-name="gr511" draw:text-style-name="P150" xml:id="id429" draw:id="id429" draw:layer="layout" svg:width="1.34cm" svg:height="1.458cm" svg:x="-63.502cm" svg:y="61.632cm">
            <text:p text:style-name="P149"><text:span text:style-name="T46">r</text:span><text:span text:style-name="T50">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1" draw:text-style-name="P148" xml:id="id428" draw:id="id428" draw:layer="layout" svg:width="1.34cm" svg:height="1.458cm" svg:x="-72.221cm" svg:y="61.632cm">
            <text:p text:style-name="P147"><text:span text:style-name="T46">r</text:span><text:span text:style-name="T50">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70.881cm" svg:y1="62.361cm" svg:x2="-67.882cm" svg:y2="61.855cm" draw:start-shape="id428" draw:start-glue-point="10" draw:end-shape="id422" draw:end-glue-point="6" svg:d="M-70881 62361l2999-506" svg:viewBox="0 0 3000 507">
            <text:p/>
          </draw:connector>
          <draw:connector draw:style-name="gr503" draw:text-style-name="P15" draw:layer="layout" draw:type="line" svg:x1="-70.881cm" svg:y1="62.363cm" svg:x2="-67.882cm" svg:y2="60.05cm" draw:end-shape="id421" draw:end-glue-point="6" svg:d="M-70881 62363l2999-2313" svg:viewBox="0 0 3000 2314">
            <text:p/>
          </draw:connector>
          <draw:connector draw:style-name="gr503" draw:text-style-name="P15" draw:layer="layout" draw:type="line" svg:x1="-70.88cm" svg:y1="62.363cm" svg:x2="-67.882cm" svg:y2="58.246cm" draw:end-shape="id417" draw:end-glue-point="6" svg:d="M-70880 62363l2998-4117" svg:viewBox="0 0 2999 4118">
            <text:p/>
          </draw:connector>
          <draw:connector draw:style-name="gr503" draw:text-style-name="P15" draw:layer="layout" draw:type="line" svg:x1="-70.88cm" svg:y1="62.363cm" svg:x2="-67.882cm" svg:y2="56.592cm" draw:end-shape="id416" draw:end-glue-point="6" svg:d="M-70880 62363l2998-5771" svg:viewBox="0 0 2999 5772">
            <text:p/>
          </draw:connector>
          <draw:connector draw:style-name="gr503" draw:text-style-name="P15" draw:layer="layout" draw:type="line" svg:x1="-70.88cm" svg:y1="62.363cm" svg:x2="-67.882cm" svg:y2="54.938cm" draw:end-shape="id414" draw:end-glue-point="6" svg:d="M-70880 62363l2998-7425" svg:viewBox="0 0 2999 7426">
            <text:p/>
          </draw:connector>
          <draw:connector draw:style-name="gr503" draw:text-style-name="P15" draw:layer="layout" draw:type="line" svg:x1="-66.542cm" svg:y1="61.855cm" svg:x2="-63.502cm" svg:y2="62.361cm" draw:start-shape="id422" draw:start-glue-point="10" draw:end-shape="id429" draw:end-glue-point="6" svg:d="M-66542 61855l3040 506" svg:viewBox="0 0 3041 507">
            <text:p/>
          </draw:connector>
          <draw:connector draw:style-name="gr503" draw:text-style-name="P15" draw:layer="layout" draw:type="line" svg:x1="-66.542cm" svg:y1="60.05cm" svg:x2="-63.5cm" svg:y2="62.363cm" draw:start-shape="id421" draw:start-glue-point="10" svg:d="M-66542 60050l3042 2313" svg:viewBox="0 0 3043 2314">
            <text:p/>
          </draw:connector>
          <draw:connector draw:style-name="gr503" draw:text-style-name="P15" draw:layer="layout" draw:type="line" svg:x1="-66.542cm" svg:y1="58.246cm" svg:x2="-63.499cm" svg:y2="62.363cm" draw:start-shape="id417" draw:start-glue-point="10" svg:d="M-66542 58246l3043 4117" svg:viewBox="0 0 3044 4118">
            <text:p/>
          </draw:connector>
          <draw:connector draw:style-name="gr503" draw:text-style-name="P15" draw:layer="layout" draw:type="line" svg:x1="-66.542cm" svg:y1="56.592cm" svg:x2="-63.499cm" svg:y2="62.363cm" draw:start-shape="id416" draw:start-glue-point="10" svg:d="M-66542 56592l3043 5771" svg:viewBox="0 0 3044 5772">
            <text:p/>
          </draw:connector>
          <draw:connector draw:style-name="gr503" draw:text-style-name="P15" draw:layer="layout" draw:type="line" svg:x1="-66.542cm" svg:y1="54.938cm" svg:x2="-63.499cm" svg:y2="62.363cm" draw:start-shape="id414" draw:start-glue-point="10" svg:d="M-66542 54938l3043 7425" svg:viewBox="0 0 3044 7426">
            <text:p/>
          </draw:connector>
          <draw:custom-shape draw:style-name="gr517" draw:text-style-name="P41" draw:layer="layout" svg:width="0.643cm" svg:height="5.878cm" svg:x="-53.044cm" svg:y="46.5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518" draw:text-style-name="P38" draw:layer="layout" svg:width="1.89cm" svg:height="1.673cm" svg:x="-52.41cm" svg:y="48.679cm">
            <draw:text-box>
              <text:p>Fusion <text:line-break/>from <text:line-break/>traces</text:p>
            </draw:text-box>
          </draw:frame>
          <draw:custom-shape draw:style-name="gr519" draw:text-style-name="P41" draw:layer="layout" svg:width="1.563cm" svg:height="9.521cm" svg:x="-74.077cm" svg:y="53.544cm">
            <text:p/>
            <draw:enhanced-geometry svg:viewBox="0 0 21600 21600" draw:mirror-horizontal="false" draw:mirror-vertical="false" draw:glue-points="21600 0 0 10800 21600 21600" draw:text-areas="13800 ?f9 21600 ?f10" draw:type="left-brace" draw:modifiers="1800 11023.40123164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520" draw:text-style-name="P38" draw:layer="layout" svg:width="4.836cm" svg:height="3.941cm" svg:x="-75.667cm" svg:y="57.84cm">
            <draw:text-box>
              <text:p>Lidar<text:line-break/>trace</text:p>
            </draw:text-box>
          </draw:frame>
          <draw:frame draw:style-name="gr135" draw:text-style-name="P41" draw:layer="layout" svg:width="4.004cm" svg:height="2.423cm" svg:x="-70.533cm" svg:y="44.08cm">
            <draw:image xlink:href="Pictures/10000000000002C5000001ADB823F0C7.png" xlink:type="simple" xlink:show="embed" xlink:actuate="onLoad" draw:mime-type="image/png">
              <text:p/>
            </draw:image>
          </draw:frame>
          <draw:frame draw:style-name="gr135" draw:text-style-name="P41" draw:layer="layout" svg:width="2.664cm" svg:height="1.582cm" svg:x="-69.357cm" svg:y="48.757cm">
            <draw:image xlink:href="Pictures/1000099600004225000027461A447516.svg" xlink:type="simple" xlink:show="embed" xlink:actuate="onLoad" draw:mime-type="image/svg+xml">
              <text:p/>
            </draw:image>
            <draw:image xlink:href="Pictures/10000001000002800000017C0782A2E4.png" xlink:type="simple" xlink:show="embed" xlink:actuate="onLoad" draw:mime-type="image/png"/>
          </draw:frame>
          <draw:frame draw:style-name="gr135" draw:text-style-name="P41" draw:layer="layout" svg:width="2.706cm" svg:height="1.606cm" svg:x="-71.281cm" svg:y="49.419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2.366cm" svg:height="1.405cm" svg:x="-71.165cm" svg:y="47.835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521" draw:text-style-name="P5" draw:layer="layout" svg:width="4.615cm" svg:height="0.907cm" svg:x="-70.141cm" svg:y="46.785cm">
            <draw:object xlink:href="./Object 7" xlink:type="simple" xlink:show="embed" xlink:actuate="onLoad">
              <loext:p/>
            </draw:object>
            <draw:image xlink:href="./ObjectReplacements/Object 7" xlink:type="simple" xlink:show="embed" xlink:actuate="onLoad"/>
          </draw:frame>
          <draw:custom-shape draw:style-name="gr501" draw:text-style-name="P142" xml:id="id430" draw:id="id430" draw:layer="layout" svg:width="0.891cm" svg:height="0.97cm" svg:x="-58.855cm" svg:y="60.441cm">
            <text:p text:style-name="P141"><text:span text:style-name="T47">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32" draw:id="id432" draw:layer="layout" svg:width="0.891cm" svg:height="0.97cm" svg:x="-58.855cm" svg:y="61.741cm">
            <text:p text:style-name="P141"><text:span text:style-name="T47">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34" draw:id="id434" draw:layer="layout" svg:width="0.891cm" svg:height="0.97cm" svg:x="-58.855cm" svg:y="63.041cm">
            <text:p text:style-name="P141"><text:span text:style-name="T47">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56" xml:id="id431" draw:id="id431" draw:layer="layout" svg:width="0.891cm" svg:height="0.97cm" svg:x="-55.951cm" svg:y="60.041cm">
            <text:p text:style-name="P155"><text:span text:style-name="T12">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56" xml:id="id433" draw:id="id433" draw:layer="layout" svg:width="0.891cm" svg:height="0.97cm" svg:x="-55.951cm" svg:y="61.141cm">
            <text:p text:style-name="P155"><text:span text:style-name="T12">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2" draw:text-style-name="P156" xml:id="id435" draw:id="id435" draw:layer="layout" svg:width="0.891cm" svg:height="0.97cm" svg:x="-55.951cm" svg:y="62.241cm">
            <text:p text:style-name="P155"><text:span text:style-name="T12">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7.964cm" svg:y1="60.926cm" svg:x2="-55.951cm" svg:y2="60.526cm" draw:start-shape="id430" draw:start-glue-point="10" draw:end-shape="id431" draw:end-glue-point="6" svg:d="M-57964 60926l2013-400" svg:viewBox="0 0 2014 401">
            <text:p/>
          </draw:connector>
          <draw:connector draw:style-name="gr503" draw:text-style-name="P15" draw:layer="layout" draw:type="line" svg:x1="-57.964cm" svg:y1="62.226cm" svg:x2="-55.951cm" svg:y2="61.626cm" draw:start-shape="id432" draw:start-glue-point="10" draw:end-shape="id433" draw:end-glue-point="6" svg:d="M-57964 62226l2013-600" svg:viewBox="0 0 2014 601">
            <text:p/>
          </draw:connector>
          <draw:connector draw:style-name="gr503" draw:text-style-name="P15" draw:layer="layout" draw:type="line" svg:x1="-57.964cm" svg:y1="63.526cm" svg:x2="-55.951cm" svg:y2="62.726cm" draw:start-shape="id434" draw:start-glue-point="10" draw:end-shape="id435" draw:end-glue-point="6" svg:d="M-57964 63526l2013-800" svg:viewBox="0 0 2014 801">
            <text:p/>
          </draw:connector>
          <draw:connector draw:style-name="gr503" draw:text-style-name="P15" draw:layer="layout" draw:type="line" svg:x1="-57.964cm" svg:y1="63.526cm" svg:x2="-55.951cm" svg:y2="61.626cm" draw:start-shape="id434" draw:start-glue-point="10" draw:end-shape="id433" draw:end-glue-point="6" svg:d="M-57964 63526l2013-1900" svg:viewBox="0 0 2014 1901">
            <text:p/>
          </draw:connector>
          <draw:connector draw:style-name="gr503" draw:text-style-name="P15" draw:layer="layout" draw:type="line" svg:x1="-57.964cm" svg:y1="63.526cm" svg:x2="-55.951cm" svg:y2="60.526cm" draw:start-shape="id434" draw:start-glue-point="10" draw:end-shape="id431" draw:end-glue-point="6" svg:d="M-57964 63526l2013-3000" svg:viewBox="0 0 2014 3001">
            <text:p/>
          </draw:connector>
          <draw:connector draw:style-name="gr503" draw:text-style-name="P15" draw:layer="layout" draw:type="line" svg:x1="-57.964cm" svg:y1="62.226cm" svg:x2="-55.951cm" svg:y2="60.526cm" draw:start-shape="id432" draw:start-glue-point="10" draw:end-shape="id431" draw:end-glue-point="6" svg:d="M-57964 62226l2013-1700" svg:viewBox="0 0 2014 1701">
            <text:p/>
          </draw:connector>
          <draw:connector draw:style-name="gr503" draw:text-style-name="P15" draw:layer="layout" draw:type="line" svg:x1="-57.964cm" svg:y1="62.226cm" svg:x2="-55.951cm" svg:y2="62.726cm" draw:start-shape="id432" draw:start-glue-point="10" draw:end-shape="id435" draw:end-glue-point="6" svg:d="M-57964 62226l2013 500" svg:viewBox="0 0 2014 501">
            <text:p/>
          </draw:connector>
          <draw:connector draw:style-name="gr503" draw:text-style-name="P15" draw:layer="layout" draw:type="line" svg:x1="-57.964cm" svg:y1="60.926cm" svg:x2="-55.951cm" svg:y2="61.626cm" draw:start-shape="id430" draw:start-glue-point="10" draw:end-shape="id433" draw:end-glue-point="6" svg:d="M-57964 60926l2013 700" svg:viewBox="0 0 2014 701">
            <text:p/>
          </draw:connector>
          <draw:connector draw:style-name="gr503" draw:text-style-name="P15" draw:layer="layout" draw:type="line" svg:x1="-57.964cm" svg:y1="60.926cm" svg:x2="-55.951cm" svg:y2="62.726cm" draw:start-shape="id430" draw:start-glue-point="10" draw:end-shape="id435" draw:end-glue-point="6" svg:d="M-57964 60926l2013 1800" svg:viewBox="0 0 2014 1801">
            <text:p/>
          </draw:connector>
          <draw:custom-shape draw:style-name="gr522" draw:text-style-name="P158" xml:id="id436" draw:id="id436" draw:layer="layout" svg:width="0.891cm" svg:height="0.97cm" svg:x="-53.052cm" svg:y="60.441cm">
            <text:p text:style-name="P157"><text:span text:style-name="T48">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3" draw:text-style-name="P158" xml:id="id437" draw:id="id437" draw:layer="layout" svg:width="0.891cm" svg:height="0.97cm" svg:x="-53.052cm" svg:y="61.741cm">
            <text:p text:style-name="P157"><text:span text:style-name="T48">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58" xml:id="id438" draw:id="id438" draw:layer="layout" svg:width="0.891cm" svg:height="0.97cm" svg:x="-53.052cm" svg:y="63.041cm">
            <text:p text:style-name="P157"><text:span text:style-name="T48">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5.06cm" svg:y1="60.526cm" svg:x2="-53.052cm" svg:y2="60.926cm" draw:start-shape="id431" draw:start-glue-point="10" draw:end-shape="id436" draw:end-glue-point="6" svg:d="M-55060 60526l2008 400" svg:viewBox="0 0 2009 401">
            <text:p/>
          </draw:connector>
          <draw:connector draw:style-name="gr503" draw:text-style-name="P15" draw:layer="layout" draw:type="line" svg:x1="-55.06cm" svg:y1="60.526cm" svg:x2="-53.052cm" svg:y2="62.226cm" draw:start-shape="id431" draw:start-glue-point="10" draw:end-shape="id437" draw:end-glue-point="6" svg:d="M-55060 60526l2008 1700" svg:viewBox="0 0 2009 1701">
            <text:p/>
          </draw:connector>
          <draw:connector draw:style-name="gr503" draw:text-style-name="P15" draw:layer="layout" draw:type="line" svg:x1="-55.06cm" svg:y1="60.526cm" svg:x2="-53.052cm" svg:y2="63.526cm" draw:start-shape="id431" draw:start-glue-point="10" draw:end-shape="id438" draw:end-glue-point="6" svg:d="M-55060 60526l2008 3000" svg:viewBox="0 0 2009 3001">
            <text:p/>
          </draw:connector>
          <draw:connector draw:style-name="gr503" draw:text-style-name="P15" draw:layer="layout" draw:type="line" svg:x1="-55.06cm" svg:y1="61.626cm" svg:x2="-53.052cm" svg:y2="60.926cm" draw:start-shape="id433" draw:start-glue-point="10" draw:end-shape="id436" draw:end-glue-point="6" svg:d="M-55060 61626l2008-700" svg:viewBox="0 0 2009 701">
            <text:p/>
          </draw:connector>
          <draw:connector draw:style-name="gr503" draw:text-style-name="P15" draw:layer="layout" draw:type="line" svg:x1="-55.06cm" svg:y1="61.626cm" svg:x2="-53.052cm" svg:y2="62.226cm" draw:start-shape="id433" draw:start-glue-point="10" draw:end-shape="id437" draw:end-glue-point="6" svg:d="M-55060 61626l2008 600" svg:viewBox="0 0 2009 601">
            <text:p/>
          </draw:connector>
          <draw:connector draw:style-name="gr503" draw:text-style-name="P15" draw:layer="layout" draw:type="line" svg:x1="-55.06cm" svg:y1="61.626cm" svg:x2="-53.052cm" svg:y2="63.526cm" draw:start-shape="id433" draw:start-glue-point="10" draw:end-shape="id438" draw:end-glue-point="6" svg:d="M-55060 61626l2008 1900" svg:viewBox="0 0 2009 1901">
            <text:p/>
          </draw:connector>
          <draw:connector draw:style-name="gr503" draw:text-style-name="P15" draw:layer="layout" draw:type="line" svg:x1="-55.06cm" svg:y1="62.726cm" svg:x2="-53.052cm" svg:y2="63.526cm" draw:start-shape="id435" draw:start-glue-point="10" draw:end-shape="id438" draw:end-glue-point="6" svg:d="M-55060 62726l2008 800" svg:viewBox="0 0 2009 801">
            <text:p/>
          </draw:connector>
          <draw:connector draw:style-name="gr503" draw:text-style-name="P15" draw:layer="layout" draw:type="line" svg:x1="-55.06cm" svg:y1="62.726cm" svg:x2="-53.052cm" svg:y2="62.226cm" draw:start-shape="id435" draw:start-glue-point="10" draw:end-shape="id437" draw:end-glue-point="6" svg:d="M-55060 62726l2008-500" svg:viewBox="0 0 2009 501">
            <text:p/>
          </draw:connector>
          <draw:connector draw:style-name="gr503" draw:text-style-name="P15" draw:layer="layout" draw:type="line" svg:x1="-55.06cm" svg:y1="62.726cm" svg:x2="-53.052cm" svg:y2="60.926cm" draw:start-shape="id435" draw:start-glue-point="10" draw:end-shape="id436" draw:end-glue-point="6" svg:d="M-55060 62726l2008-1800" svg:viewBox="0 0 2009 1801">
            <text:p/>
          </draw:connector>
          <draw:custom-shape draw:style-name="gr502" draw:text-style-name="P156" xml:id="id439" draw:id="id439" draw:layer="layout" svg:width="0.891cm" svg:height="0.97cm" svg:x="-55.951cm" svg:y="63.441cm">
            <text:p text:style-name="P155"><text:span text:style-name="T12">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xml:id="id441" draw:id="id441" draw:layer="layout" draw:type="line" svg:x1="-55.06cm" svg:y1="63.926cm" svg:x2="-53.052cm" svg:y2="60.926cm" draw:start-shape="id439" draw:start-glue-point="10" draw:end-shape="id436" draw:end-glue-point="6" svg:d="M-55060 63926l2008-3000" svg:viewBox="0 0 2009 3001">
            <text:p/>
          </draw:connector>
          <draw:connector draw:style-name="gr503" draw:text-style-name="P15" draw:layer="layout" draw:type="line" svg:x1="-55.06cm" svg:y1="63.926cm" svg:x2="-53.052cm" svg:y2="63.526cm" draw:start-shape="id439" draw:start-glue-point="10" draw:end-shape="id438" draw:end-glue-point="6" svg:d="M-55060 63926l2008-400" svg:viewBox="0 0 2009 401">
            <text:p/>
          </draw:connector>
          <draw:connector draw:style-name="gr503" draw:text-style-name="P15" draw:layer="layout" draw:type="line" svg:x1="-55.06cm" svg:y1="63.926cm" svg:x2="-53.052cm" svg:y2="62.226cm" draw:start-shape="id439" draw:start-glue-point="10" draw:end-shape="id437" draw:end-glue-point="6" svg:d="M-55060 63926l2008-1700" svg:viewBox="0 0 2009 1701">
            <text:p/>
          </draw:connector>
          <draw:connector draw:style-name="gr503" draw:text-style-name="P15" draw:layer="layout" draw:type="line" svg:x1="-57.964cm" svg:y1="63.526cm" svg:x2="-55.951cm" svg:y2="63.926cm" draw:start-shape="id434" draw:start-glue-point="10" draw:end-shape="id439" draw:end-glue-point="6" svg:d="M-57964 63526l2013 400" svg:viewBox="0 0 2014 401">
            <text:p/>
          </draw:connector>
          <draw:connector draw:style-name="gr503" draw:text-style-name="P15" draw:layer="layout" draw:type="line" svg:x1="-57.964cm" svg:y1="62.226cm" svg:x2="-55.951cm" svg:y2="63.926cm" draw:start-shape="id432" draw:start-glue-point="10" draw:end-shape="id439" draw:end-glue-point="6" svg:d="M-57964 62226l2013 1700" svg:viewBox="0 0 2014 1701">
            <text:p/>
          </draw:connector>
          <draw:connector draw:style-name="gr503" draw:text-style-name="P15" draw:layer="layout" draw:type="line" svg:x1="-57.964cm" svg:y1="60.926cm" svg:x2="-55.951cm" svg:y2="63.926cm" draw:start-shape="id430" draw:start-glue-point="10" draw:end-shape="id439" draw:end-glue-point="6" svg:d="M-57964 60926l2013 3000" svg:viewBox="0 0 2014 3001">
            <text:p/>
          </draw:connector>
          <draw:custom-shape draw:style-name="gr502" draw:text-style-name="P156" xml:id="id440" draw:id="id440" draw:layer="layout" svg:width="0.891cm" svg:height="0.97cm" svg:x="-55.951cm" svg:y="64.641cm">
            <text:p text:style-name="P155"><text:span text:style-name="T12">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5.06cm" svg:y1="65.126cm" svg:x2="-53.052cm" svg:y2="63.526cm" draw:start-shape="id440" draw:start-glue-point="10" draw:end-shape="id438" draw:end-glue-point="6" svg:d="M-55060 65126l2008-1600" svg:viewBox="0 0 2009 1601">
            <text:p/>
          </draw:connector>
          <draw:connector draw:style-name="gr503" draw:text-style-name="P15" draw:layer="layout" draw:type="line" svg:x1="-55.06cm" svg:y1="65.126cm" svg:x2="-53.052cm" svg:y2="62.226cm" draw:start-shape="id440" draw:start-glue-point="10" draw:end-shape="id437" draw:end-glue-point="6" svg:d="M-55060 65126l2008-2900" svg:viewBox="0 0 2009 2901">
            <text:p/>
          </draw:connector>
          <draw:connector draw:style-name="gr503" draw:text-style-name="P15" draw:layer="layout" draw:type="line" svg:x1="-55.06cm" svg:y1="65.126cm" svg:x2="-54.056cm" svg:y2="62.426cm" draw:start-shape="id440" draw:start-glue-point="10" draw:end-shape="id441" draw:end-glue-point="3" svg:d="M-55060 65126l1004-2700" svg:viewBox="0 0 1005 2701">
            <text:p/>
          </draw:connector>
          <draw:connector draw:style-name="gr503" draw:text-style-name="P15" draw:layer="layout" draw:type="line" svg:x1="-57.964cm" svg:y1="63.526cm" svg:x2="-55.951cm" svg:y2="65.126cm" draw:start-shape="id434" draw:start-glue-point="10" draw:end-shape="id440" draw:end-glue-point="6" svg:d="M-57964 63526l2013 1600" svg:viewBox="0 0 2014 1601">
            <text:p/>
          </draw:connector>
          <draw:connector draw:style-name="gr503" draw:text-style-name="P15" draw:layer="layout" draw:type="line" svg:x1="-57.964cm" svg:y1="62.226cm" svg:x2="-55.951cm" svg:y2="65.126cm" draw:start-shape="id432" draw:start-glue-point="10" draw:end-shape="id440" draw:end-glue-point="6" svg:d="M-57964 62226l2013 2900" svg:viewBox="0 0 2014 2901">
            <text:p/>
          </draw:connector>
          <draw:connector draw:style-name="gr503" draw:text-style-name="P15" draw:layer="layout" draw:type="line" svg:x1="-57.964cm" svg:y1="60.926cm" svg:x2="-55.951cm" svg:y2="65.126cm" draw:start-shape="id430" draw:start-glue-point="10" draw:end-shape="id440" draw:end-glue-point="6" svg:d="M-57964 60926l2013 4200" svg:viewBox="0 0 2014 4201">
            <text:p/>
          </draw:connector>
          <draw:custom-shape draw:style-name="gr501" draw:text-style-name="P142" xml:id="id443" draw:id="id443" draw:layer="layout" svg:width="0.891cm" svg:height="0.97cm" svg:x="-53.052cm" svg:y="64.387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1" draw:text-style-name="P142" xml:id="id442" draw:id="id442" draw:layer="layout" svg:width="0.891cm" svg:height="0.97cm" svg:x="-58.855cm" svg:y="64.426cm">
            <text:p text:style-name="P141"><text:span text:style-name="T47">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57.964cm" svg:y1="64.911cm" svg:x2="-55.951cm" svg:y2="65.126cm" draw:start-shape="id442" draw:start-glue-point="10" draw:end-shape="id440" draw:end-glue-point="6" svg:d="M-57964 64911l2013 215" svg:viewBox="0 0 2014 216">
            <text:p/>
          </draw:connector>
          <draw:connector draw:style-name="gr503" draw:text-style-name="P15" draw:layer="layout" draw:type="line" svg:x1="-57.964cm" svg:y1="64.911cm" svg:x2="-55.951cm" svg:y2="63.926cm" draw:start-shape="id442" draw:start-glue-point="10" draw:end-shape="id439" draw:end-glue-point="6" svg:d="M-57964 64911l2013-985" svg:viewBox="0 0 2014 986">
            <text:p/>
          </draw:connector>
          <draw:connector draw:style-name="gr503" draw:text-style-name="P15" draw:layer="layout" draw:type="line" svg:x1="-57.964cm" svg:y1="64.911cm" svg:x2="-55.951cm" svg:y2="62.726cm" draw:start-shape="id442" draw:start-glue-point="10" draw:end-shape="id435" draw:end-glue-point="6" svg:d="M-57964 64911l2013-2185" svg:viewBox="0 0 2014 2186">
            <text:p/>
          </draw:connector>
          <draw:connector draw:style-name="gr503" draw:text-style-name="P15" draw:layer="layout" draw:type="line" svg:x1="-57.964cm" svg:y1="64.911cm" svg:x2="-55.951cm" svg:y2="61.626cm" draw:start-shape="id442" draw:start-glue-point="10" draw:end-shape="id433" draw:end-glue-point="6" svg:d="M-57964 64911l2013-3285" svg:viewBox="0 0 2014 3286">
            <text:p/>
          </draw:connector>
          <draw:connector draw:style-name="gr503" draw:text-style-name="P15" draw:layer="layout" draw:type="line" svg:x1="-57.964cm" svg:y1="64.911cm" svg:x2="-55.951cm" svg:y2="60.526cm" draw:start-shape="id442" draw:start-glue-point="10" draw:end-shape="id431" draw:end-glue-point="6" svg:d="M-57964 64911l2013-4385" svg:viewBox="0 0 2014 4386">
            <text:p/>
          </draw:connector>
          <draw:connector draw:style-name="gr503" draw:text-style-name="P15" draw:layer="layout" draw:type="line" svg:x1="-55.06cm" svg:y1="65.126cm" svg:x2="-53.052cm" svg:y2="64.872cm" draw:start-shape="id440" draw:start-glue-point="10" draw:end-shape="id443" draw:end-glue-point="6" svg:d="M-55060 65126l2008-254" svg:viewBox="0 0 2009 255">
            <text:p/>
          </draw:connector>
          <draw:connector draw:style-name="gr503" draw:text-style-name="P15" draw:layer="layout" draw:type="line" svg:x1="-55.06cm" svg:y1="63.926cm" svg:x2="-53.052cm" svg:y2="64.872cm" draw:start-shape="id439" draw:start-glue-point="10" draw:end-shape="id443" draw:end-glue-point="6" svg:d="M-55060 63926l2008 946" svg:viewBox="0 0 2009 947">
            <text:p/>
          </draw:connector>
          <draw:connector draw:style-name="gr503" draw:text-style-name="P15" draw:layer="layout" draw:type="line" svg:x1="-55.06cm" svg:y1="62.726cm" svg:x2="-53.052cm" svg:y2="64.872cm" draw:start-shape="id435" draw:start-glue-point="10" draw:end-shape="id443" draw:end-glue-point="6" svg:d="M-55060 62726l2008 2146" svg:viewBox="0 0 2009 2147">
            <text:p/>
          </draw:connector>
          <draw:connector draw:style-name="gr503" draw:text-style-name="P15" draw:layer="layout" draw:type="line" svg:x1="-55.06cm" svg:y1="61.626cm" svg:x2="-53.052cm" svg:y2="64.872cm" draw:start-shape="id433" draw:start-glue-point="10" draw:end-shape="id443" draw:end-glue-point="6" svg:d="M-55060 61626l2008 3246" svg:viewBox="0 0 2009 3247">
            <text:p/>
          </draw:connector>
          <draw:connector draw:style-name="gr503" draw:text-style-name="P15" draw:layer="layout" draw:type="line" svg:x1="-55.06cm" svg:y1="60.526cm" svg:x2="-53.052cm" svg:y2="64.872cm" draw:start-shape="id431" draw:start-glue-point="10" draw:end-shape="id443" draw:end-glue-point="6" svg:d="M-55060 60526l2008 4346" svg:viewBox="0 0 2009 4347">
            <text:p/>
          </draw:connector>
          <draw:g draw:style-name="gr31">
            <draw:custom-shape draw:style-name="gr525" draw:text-style-name="P159" draw:layer="layout" svg:width="0.178cm" svg:height="0.178cm" svg:x="-71.757cm" svg:y="59.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71.757cm" svg:y="59.1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71.757cm" svg:y="58.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31">
            <draw:custom-shape draw:style-name="gr525" draw:text-style-name="P159" draw:layer="layout" svg:width="0.178cm" svg:height="0.178cm" svg:x="-62.957cm" svg:y="59.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62.957cm" svg:y="59.1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62.957cm" svg:y="58.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rect draw:style-name="gr467" draw:text-style-name="P19" xml:id="id401" draw:id="id401" draw:layer="layout" svg:width="2.349cm" svg:height="1.195cm" svg:x="-23.01cm" svg:y="50.892cm">
          <text:p text:style-name="P5"><text:span text:style-name="T4">utters</text:span><text:span text:style-name="T4"><text:line-break/></text:span><text:span text:style-name="T4">from robot 1</text:span><text:span text:style-name="T4"><text:line-break/></text:span><text:span text:style-name="T4">and its’ decoder</text:span></text:p>
        </draw:rect>
        <draw:rect draw:style-name="gr467" draw:text-style-name="P19" xml:id="id495" draw:id="id495" draw:layer="layout" svg:width="2.063cm" svg:height="1.396cm" svg:x="-22.913cm" svg:y="52.944cm">
          <text:p text:style-name="P5"><text:span text:style-name="T4">Robot 2</text:span><text:span text:style-name="T4"><text:line-break/></text:span><text:span text:style-name="T4">internal</text:span><text:span text:style-name="T4"><text:line-break/></text:span><text:span text:style-name="T4">language</text:span></text:p>
        </draw:rect>
        <draw:custom-shape draw:style-name="gr481" draw:text-style-name="P133" xml:id="id487" draw:id="id487" draw:layer="layout" svg:width="4.16cm" svg:height="0.97cm" svg:x="-42.394cm" svg:y="51.904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2.181cm" svg:y="52.134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1.136cm" svg:y="52.134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0.157cm" svg:y="52.134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39.033cm" svg:y="52.134cm">
            <text:p text:style-name="P19"><text:span text:style-name="T4">W</text:span><text:span text:style-name="T42">l</text:span><text:span text:style-name="T4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1.626cm" svg:y1="52.402cm" svg:x2="-41.176cm" svg:y2="52.392cm">
            <text:p/>
          </draw:line>
          <draw:line draw:style-name="gr488" draw:text-style-name="P15" draw:layer="layout" svg:x1="-40.554cm" svg:y1="52.416cm" svg:x2="-40.131cm" svg:y2="52.405cm">
            <text:p/>
          </draw:line>
          <draw:line draw:style-name="gr488" draw:text-style-name="P15" draw:layer="layout" svg:x1="-39.508cm" svg:y1="52.416cm" svg:x2="-38.993cm" svg:y2="52.419cm">
            <text:p/>
          </draw:line>
        </draw:g>
        <draw:connector draw:style-name="gr36" draw:text-style-name="P7" draw:layer="layout" draw:type="curve" svg:x1="-27.151cm" svg:y1="52.428cm" svg:x2="-25.491cm" svg:y2="53.738cm" draw:start-shape="id444" draw:start-glue-point="1" draw:end-shape="id445" draw:end-glue-point="3" svg:d="M-27151 52428c1246 0 417 1310 1660 1310" svg:viewBox="0 0 1661 1311">
          <text:p/>
        </draw:connector>
        <draw:connector draw:style-name="gr526" draw:text-style-name="P15" draw:layer="layout" draw:type="curve" svg:x1="30.809cm" svg:y1="107.092cm" svg:x2="30.407cm" svg:y2="105.779cm" draw:start-shape="id446" draw:start-glue-point="0" draw:end-shape="id367" draw:end-glue-point="2" svg:d="M30809 107092c0-984-402-328-402-1313" svg:viewBox="0 0 403 1314">
          <text:p/>
        </draw:connector>
        <draw:custom-shape draw:name="comment box 15" draw:style-name="gr527" draw:text-style-name="P161" xml:id="id447" draw:id="id447" draw:layer="layout" svg:width="1.885cm" svg:height="1.575cm" svg:x="-48.78cm" svg:y="76.294cm">
          <text:p text:style-name="P160"><text:span text:style-name="T4">DBSCAN</text:span><text:span text:style-name="T4"><text:line-break/></text:span><text:span text:style-name="T4">on 2</text:span><text:span text:style-name="T43">nd</text:span><text:span text:style-name="T4"><text:line-break/></text:span><text:span text:style-name="T4">derivitive</text:span><text:span text:style-name="T4"><text:line-break/></text:span><text:span text:style-name="T4">(vowel)</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47.452cm" svg:y1="75.549cm" svg:x2="-47.837cm" svg:y2="76.294cm" draw:end-shape="id447" draw:end-glue-point="4" svg:d="M-47452 75549c0 168-385-204-385 745" svg:viewBox="0 0 386 746">
          <text:p/>
        </draw:connector>
        <draw:connector draw:style-name="gr29" draw:text-style-name="P15" draw:layer="layout" draw:type="curve" svg:x1="-49.453cm" svg:y1="75.549cm" svg:x2="-49.92cm" svg:y2="76.336cm" draw:end-shape="id448" draw:end-glue-point="4" svg:d="M-49453 75549c0 199-467-194-467 787" svg:viewBox="0 0 468 788">
          <text:p/>
        </draw:connector>
        <draw:custom-shape draw:name="comment box 14" draw:style-name="gr528" draw:text-style-name="P161" xml:id="id448" draw:id="id448" draw:layer="layout" svg:width="1.884cm" svg:height="1.523cm" svg:x="-50.862cm" svg:y="76.336cm">
          <text:p text:style-name="P160"><text:span text:style-name="T4">DBSCAN</text:span><text:span text:style-name="T4"><text:line-break/></text:span><text:span text:style-name="T4">on 0</text:span><text:span text:style-name="T43">th</text:span><text:span text:style-name="T4"><text:line-break/></text:span><text:span text:style-name="T4">derivitive</text:span><text:span text:style-name="T4"><text:line-break/></text:span><text:span text:style-name="T4">(Consonant)</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style-name="gr31">
          <draw:g draw:style-name="gr23">
            <draw:polygon draw:style-name="gr510" draw:text-style-name="P113" draw:layer="layout" svg:width="1.179cm" svg:height="1.358cm" svg:x="-51.118cm" svg:y="80.163cm" svg:viewBox="0 0 1180 1359" draw:points="0,0 1180,581 1180,777 0,1359">
              <text:p/>
            </draw:polygon>
          </draw:g>
          <draw:frame draw:style-name="gr484" draw:text-style-name="P11" draw:layer="layout" svg:width="1.527cm" svg:height="0.57cm" svg:x="-51.349cm" svg:y="80.526cm">
            <draw:text-box>
              <text:p><text:span text:style-name="T49">encod</text:span><text:span text:style-name="T49">er</text:span></text:p>
            </draw:text-box>
          </draw:frame>
        </draw:g>
        <draw:frame draw:style-name="gr529" draw:text-style-name="P41" draw:layer="layout" svg:width="4.125cm" svg:height="2.221cm" svg:x="-49.213cm" svg:y="79.993cm">
          <draw:text-box>
            <text:p text:style-name="P5"><text:span text:style-name="T12">Actio</text:span><text:span text:style-name="T12">n </text:span><text:span text:style-name="T12">poten</text:span><text:span text:style-name="T12">tial </text:span><text:span text:style-name="T12">(with </text:span><text:span text:style-name="T12">autoe</text:span><text:span text:style-name="T12">ncod</text:span><text:span text:style-name="T12">er)</text:span><text:span text:style-name="T12"><text:line-break/></text:span><text:span text:style-name="T12">and</text:span><text:span text:style-name="T12"><text:line-break/></text:span><text:span text:style-name="T12">obser</text:span><text:span text:style-name="T12">vatio</text:span><text:span text:style-name="T12">n </text:span><text:span text:style-name="T12">matri</text:span><text:span text:style-name="T12">x (H)</text:span></text:p>
          </draw:text-box>
        </draw:frame>
        <draw:rect draw:style-name="gr292" draw:text-style-name="P35" xml:id="id449" draw:id="id449" draw:layer="layout" svg:width="2.3cm" svg:height="1cm" svg:x="33.204cm" svg:y="74.728cm">
          <text:p text:style-name="P5">IMU</text:p>
        </draw:rect>
        <draw:rect draw:style-name="gr292" draw:text-style-name="P35" xml:id="id450" draw:id="id450" draw:layer="layout" svg:width="2.3cm" svg:height="1cm" svg:x="36.204cm" svg:y="74.728cm">
          <text:p text:style-name="P5">Battery</text:p>
        </draw:rect>
        <draw:connector draw:style-name="gr293" draw:text-style-name="P15" draw:layer="layout" draw:type="curve" svg:x1="32.654cm" svg:y1="73.528cm" svg:x2="34.354cm" svg:y2="74.728cm" draw:start-shape="id240" draw:start-glue-point="2" draw:end-shape="id449" svg:d="M32654 73528c0 900 1700 300 1700 1200" svg:viewBox="0 0 1701 1201">
          <text:p/>
        </draw:connector>
        <draw:connector draw:style-name="gr293" draw:text-style-name="P15" draw:layer="layout" draw:type="curve" svg:x1="32.654cm" svg:y1="73.528cm" svg:x2="37.354cm" svg:y2="74.728cm" draw:start-shape="id240" draw:start-glue-point="2" draw:end-shape="id450" draw:end-glue-point="0" svg:d="M32654 73528c0 900 4700 300 4700 1200" svg:viewBox="0 0 4701 1201">
          <text:p/>
        </draw:connector>
        <draw:g draw:style-name="gr31">
          <draw:polygon draw:style-name="gr530" draw:text-style-name="P5" draw:layer="layout" svg:width="2.947cm" svg:height="4.308cm" svg:x="-69.005cm" svg:y="71.164cm" svg:viewBox="0 0 2948 4309" draw:points="0,3742 18,699 2891,0 2948,4309">
            <text:p/>
          </draw:polygon>
          <draw:g draw:style-name="gr31">
            <draw:custom-shape draw:style-name="gr531" draw:text-style-name="P162" draw:layer="layout" svg:width="0.254cm" svg:height="0.254cm" svg:x="-72.335cm" svg:y="71.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2" draw:text-style-name="P16" draw:layer="layout" svg:width="1.101cm" svg:height="0.569cm" svg:x="-72.247cm" svg:y="71.701cm">
              <draw:text-box>
                <text:p><text:span text:style-name="T4">GPS</text:span></text:p>
              </draw:text-box>
            </draw:frame>
          </draw:g>
          <draw:g draw:style-name="gr31">
            <draw:custom-shape draw:style-name="gr533" draw:text-style-name="P106" draw:layer="layout" svg:width="0.254cm" svg:height="0.254cm" svg:x="-72.342cm" svg:y="71.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4" draw:text-style-name="P16" draw:layer="layout" svg:width="1.337cm" svg:height="0.569cm" svg:x="-72.221cm" svg:y="71.194cm">
              <draw:text-box>
                <text:p><text:span text:style-name="T4">LIDAR</text:span></text:p>
              </draw:text-box>
            </draw:frame>
          </draw:g>
          <draw:custom-shape draw:style-name="gr533"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254cm" svg:height="0.254cm" svg:x="-71.0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254cm" svg:height="0.254cm" svg:x="-71.337cm" svg:y="7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254cm" svg:height="0.254cm" svg:x="-71.483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254cm" svg:height="0.254cm" svg:x="-71.139cm" svg:y="72.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254cm" svg:height="0.254cm" svg:x="-72.102cm" svg:y="7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254cm" svg:height="0.254cm" svg:x="-71.763cm" svg:y="73.6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254cm" svg:height="0.254cm" svg:x="-71.562cm" svg:y="72.9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254cm" svg:height="0.254cm" svg:x="-71.043cm" svg:y="73.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254cm" svg:height="0.254cm" svg:x="-71.572cm" svg:y="73.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5" draw:text-style-name="P16" draw:layer="layout" svg:width="2.047cm" svg:height="0.569cm" svg:x="-70.737cm" svg:y="72.996cm">
            <draw:text-box>
              <text:p><text:span text:style-name="T4">AE mapping</text:span></text:p>
            </draw:text-box>
          </draw:frame>
          <draw:polygon draw:style-name="gr530" draw:text-style-name="P5" draw:layer="layout" svg:width="3.884cm" svg:height="5.678cm" svg:x="-64.164cm" svg:y="70.371cm" svg:viewBox="0 0 3885 5679" draw:points="0,4931 24,921 3810,0 3885,5679">
            <text:p/>
          </draw:polygon>
          <draw:custom-shape draw:style-name="gr536" draw:text-style-name="P41" draw:layer="layout" svg:width="1.612cm" svg:height="1.163cm" svg:x="-63.343cm" svg:y="72.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7" draw:text-style-name="P41" draw:layer="layout" svg:width="1.976cm" svg:height="1.426cm" svg:x="-63.491cm" svg:y="72.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8" draw:text-style-name="P41" draw:layer="layout" svg:width="2.28cm" svg:height="1.645cm" svg:x="-63.597cm" svg:y="72.6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1.917cm" svg:y="73.6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3.172cm" svg:y="73.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1.925cm" svg:y="7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3cm" svg:x="-62.687cm" svg:y="72.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2.83cm" svg:y="73.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9" draw:text-style-name="P41" draw:layer="layout" svg:width="1.388cm" svg:height="1.002cm" svg:x="-63.243cm" svg:y="7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165cm" svg:height="0.165cm" svg:x="-62.633cm" svg:y="73.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0" draw:text-style-name="P15" draw:layer="layout" svg:x1="-66.058cm" svg:y1="73.543cm" svg:x2="-62.556cm" svg:y2="73.505cm">
            <text:p/>
          </draw:line>
          <draw:frame draw:style-name="gr541" draw:text-style-name="P163" draw:layer="layout" svg:width="2.473cm" svg:height="1.205cm" svg:x="-66.36cm" svg:y="73.072cm">
            <draw:text-box>
              <text:p text:style-name="P5"><text:span text:style-name="T4">knn</text:span><text:span text:style-name="T4"><text:line-break/></text:span><text:span text:style-name="T4">clustering</text:span><text:span text:style-name="T4"><text:line-break/></text:span><text:span text:style-name="T4">(using encoder)</text:span></text:p>
            </draw:text-box>
          </draw:frame>
          <draw:g draw:style-name="gr31" xml:id="id452" draw:id="id452">
            <draw:custom-shape draw:style-name="gr533"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164cm" svg:height="0.164cm" svg:x="-67.506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164cm" svg:height="0.163cm" svg:x="-67.67cm" svg:y="7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3" draw:text-style-name="P106" draw:layer="layout" svg:width="0.164cm" svg:height="0.164cm" svg:x="-67.764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7.542cm" svg:y="7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8.163cm" svg:y="73.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7.944cm" svg:y="73.5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3cm" svg:x="-67.815cm" svg:y="73.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7.48cm" svg:y="73.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62" draw:layer="layout" svg:width="0.164cm" svg:height="0.164cm" svg:x="-67.821cm" svg:y="73.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40" draw:text-style-name="P15" draw:layer="layout" svg:x1="-70.556cm" svg:y1="73.537cm" svg:x2="-67.656cm" svg:y2="73.505cm">
            <text:p/>
          </draw:line>
          <draw:frame draw:style-name="gr542" draw:text-style-name="P16" draw:layer="layout" svg:width="3.576cm" svg:height="1.205cm" svg:x="-66.669cm" svg:y="70.062cm">
            <draw:text-box>
              <text:p><text:span text:style-name="T4">GPS frequency is higher</text:span><text:span text:style-name="T4"><text:line-break/></text:span><text:span text:style-name="T4">so we need clustering</text:span><text:span text:style-name="T4"><text:line-break/></text:span><text:span text:style-name="T4">and extract means</text:span></text:p>
            </draw:text-box>
          </draw:frame>
          <draw:frame draw:style-name="gr543" draw:text-style-name="P164" draw:layer="layout" svg:width="2.126cm" svg:height="0.569cm" svg:x="-68.667cm" svg:y="71.77cm">
            <draw:text-box>
              <text:p><text:span text:style-name="T54">Latent space</text:span></text:p>
            </draw:text-box>
          </draw:frame>
          <draw:frame draw:style-name="gr544" draw:text-style-name="P166" draw:layer="layout" svg:width="0.87cm" svg:height="0.73cm" svg:x="-62.263cm" svg:y="74.119cm">
            <draw:text-box>
              <text:p text:style-name="P165"><text:span text:style-name="T4">μ</text:span><text:span text:style-name="T43">’</text:span><text:span text:style-name="T42">G</text:span></text:p>
            </draw:text-box>
          </draw:frame>
          <draw:frame draw:style-name="gr545" draw:text-style-name="P166" draw:layer="layout" svg:width="0.87cm" svg:height="0.73cm" svg:x="-62.689cm" svg:y="73.127cm">
            <draw:text-box>
              <text:p text:style-name="P165"><text:span text:style-name="T4">μ</text:span><text:span text:style-name="T43">’</text:span><text:span text:style-name="T42">L</text:span></text:p>
            </draw:text-box>
          </draw:frame>
          <draw:frame draw:style-name="gr546" draw:text-style-name="P164" draw:layer="layout" svg:width="2.346cm" svg:height="0.887cm" svg:x="-63.709cm" svg:y="71.199cm">
            <draw:text-box>
              <text:p><text:span text:style-name="T54">clusters mean</text:span><text:span text:style-name="T54"><text:line-break/></text:span><text:span text:style-name="T54">in latent space</text:span></text:p>
            </draw:text-box>
          </draw:frame>
          <draw:custom-shape draw:style-name="gr531" draw:text-style-name="P162" xml:id="id451" draw:id="id451" draw:layer="layout" svg:width="0.164cm" svg:height="0.164cm" svg:x="-62.181cm" svg:y="74.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7" draw:text-style-name="P5" draw:layer="layout" svg:x1="-62.487cm" svg:y1="73.557cm" svg:x2="-62.132cm" svg:y2="74.164cm">
            <text:p/>
          </draw:line>
          <draw:frame draw:style-name="gr548" draw:text-style-name="P16" draw:layer="layout" svg:width="0.697cm" svg:height="0.569cm" svg:x="-62.724cm" svg:y="73.709cm">
            <draw:text-box>
              <text:p><text:span text:style-name="T4">d</text:span><text:span text:style-name="T43">’</text:span></text:p>
            </draw:text-box>
          </draw:frame>
          <draw:connector draw:style-name="gr549" draw:text-style-name="P15" draw:layer="layout" draw:type="curve" draw:line-skew="0.315cm" svg:x1="-62.099cm" svg:y1="74.301cm" svg:x2="-67.739cm" svg:y2="73.922cm" draw:start-shape="id451" draw:start-glue-point="8" draw:end-shape="id452" draw:end-glue-point="2" svg:d="M-62099 74301c0 1224-5640 1413-5640-379" svg:viewBox="0 0 5641 1323">
            <text:p/>
          </draw:connector>
          <draw:frame draw:style-name="gr550" draw:text-style-name="P16" draw:layer="layout" svg:width="1.595cm" svg:height="0.887cm" svg:x="-65.852cm" svg:y="75.137cm">
            <draw:text-box>
              <text:p text:style-name="P165"><text:span text:style-name="T10">Decode</text:span><text:span text:style-name="T10"><text:line-break/></text:span><text:span text:style-name="T10">GPS+</text:span><text:span text:style-name="T4">μ</text:span><text:span text:style-name="T43">’</text:span><text:span text:style-name="T42">G</text:span></text:p>
            </draw:text-box>
          </draw:frame>
          <draw:frame draw:style-name="gr551" draw:text-style-name="P167" draw:layer="layout" svg:width="5.09cm" svg:height="1.039cm" svg:x="-67.482cm" svg:y="76.119cm">
            <draw:text-box>
              <text:p text:style-name="P5"><text:span text:style-name="T55">Mapping GPS to the center </text:span><text:span text:style-name="T55"><text:line-break/></text:span><text:span text:style-name="T55">of mapped LIDAR-class</text:span></text:p>
            </draw:text-box>
          </draw:frame>
        </draw:g>
        <draw:g draw:style-name="gr23">
          <draw:rect draw:style-name="gr41" draw:text-style-name="P5" xml:id="id454" draw:id="id454" draw:layer="layout" svg:width="1.283cm" svg:height="1.495cm" svg:x="-20.906cm" svg:y="108.783cm">
            <text:p text:style-name="P5">Robot</text:p>
          </draw:rect>
          <draw:line draw:style-name="gr552" draw:text-style-name="P5" xml:id="id453" draw:id="id453" draw:layer="layout" svg:x1="-19.65cm" svg:y1="109.523cm" svg:x2="-17.956cm" svg:y2="109.497cm">
            <text:p/>
          </draw:line>
          <draw:connector draw:style-name="gr553" draw:text-style-name="P15" draw:layer="layout" svg:x1="-18.803cm" svg:y1="109.523cm" svg:x2="-20.264cm" svg:y2="110.278cm" draw:start-shape="id453" draw:start-glue-point="2" draw:end-shape="id454" svg:d="M-18803 109523v1256h-1461v-501" svg:viewBox="0 0 1462 1257">
            <text:p/>
          </draw:connector>
          <draw:line draw:style-name="gr552" draw:text-style-name="P5" draw:layer="layout" svg:x1="-22.401cm" svg:y1="109.497cm" svg:x2="-20.92cm" svg:y2="109.497cm">
            <text:p/>
          </draw:line>
          <draw:frame draw:style-name="gr554" draw:text-style-name="P16" draw:layer="layout" svg:width="1.117cm" svg:height="0.569cm" svg:x="-22.168cm" svg:y="109.009cm">
            <draw:text-box>
              <text:p><text:span text:style-name="T4">input</text:span></text:p>
            </draw:text-box>
          </draw:frame>
          <draw:frame draw:style-name="gr555" draw:text-style-name="P16" draw:layer="layout" svg:width="1.291cm" svg:height="0.569cm" svg:x="-19.567cm" svg:y="109.01cm">
            <draw:text-box>
              <text:p><text:span text:style-name="T4">output</text:span></text:p>
            </draw:text-box>
          </draw:frame>
          <draw:frame draw:style-name="gr556" draw:text-style-name="P16" draw:layer="layout" svg:width="1.748cm" svg:height="0.569cm" svg:x="-20.366cm" svg:y="110.711cm">
            <draw:text-box>
              <text:p><text:span text:style-name="T4">Feedback</text:span></text:p>
            </draw:text-box>
          </draw:frame>
        </draw:g>
        <draw:line draw:style-name="gr557" draw:text-style-name="P15" draw:layer="layout" svg:x1="-51.273cm" svg:y1="82.253cm" svg:x2="-35.038cm" svg:y2="82.253cm">
          <text:p/>
        </draw:line>
        <draw:frame draw:style-name="gr558" draw:text-style-name="P168" draw:layer="layout" svg:width="4.884cm" svg:height="2.015cm" svg:x="-45.762cm" svg:y="82.29cm">
          <draw:text-box>
            <text:p text:style-name="P5"><text:span text:style-name="T56">Predictive model </text:span><text:span text:style-name="T56"><text:line-break/></text:span><text:span text:style-name="T56">building with </text:span><text:span text:style-name="T56"><text:line-break/></text:span><text:span text:style-name="T56">transformers</text:span></text:p>
          </draw:text-box>
        </draw:frame>
        <draw:line draw:style-name="gr559" draw:text-style-name="P15" draw:layer="layout" svg:x1="-34.727cm" svg:y1="66.427cm" svg:x2="-34.694cm" svg:y2="81.856cm">
          <text:p/>
        </draw:line>
        <draw:frame draw:style-name="gr560" draw:text-style-name="P169" draw:layer="layout" svg:width="5.588cm" svg:height="1.038cm" draw:transform="rotate (1.5707963267949) translate (-34.753cm 76.743cm)">
          <draw:text-box>
            <text:p><text:span text:style-name="T56">Language formation</text:span></text:p>
          </draw:text-box>
        </draw:frame>
        <draw:g draw:style-name="gr31">
          <draw:frame draw:style-name="gr33" draw:text-style-name="P11" draw:layer="layout" svg:width="0.947cm" svg:height="0.646cm" svg:x="-49.834cm" svg:y="96.469cm">
            <draw:text-box>
              <text:p><text:span text:style-name="T12">W</text:span><text:span text:style-name="T13">0</text:span></text:p>
            </draw:text-box>
          </draw:frame>
          <draw:frame draw:style-name="gr33" draw:text-style-name="P11" draw:layer="layout" svg:width="0.947cm" svg:height="0.646cm" svg:x="-49.833cm" svg:y="96.469cm">
            <draw:text-box>
              <text:p><text:span text:style-name="T12">W</text:span><text:span text:style-name="T13">0</text:span></text:p>
            </draw:text-box>
          </draw:frame>
          <draw:frame draw:style-name="gr33" draw:text-style-name="P11" draw:layer="layout" svg:width="0.947cm" svg:height="0.646cm" svg:x="-43.917cm" svg:y="96.469cm">
            <draw:text-box>
              <text:p><text:span text:style-name="T12">W</text:span><text:span text:style-name="T13">p</text:span></text:p>
            </draw:text-box>
          </draw:frame>
          <draw:frame draw:style-name="gr33" draw:text-style-name="P11" draw:layer="layout" svg:width="0.947cm" svg:height="0.646cm" svg:x="-37.915cm" svg:y="96.461cm">
            <draw:text-box>
              <text:p><text:span text:style-name="T12">W</text:span><text:span text:style-name="T13">p</text:span></text:p>
            </draw:text-box>
          </draw:frame>
          <draw:custom-shape draw:style-name="gr34" draw:text-style-name="P26" xml:id="id456" draw:id="id456" draw:layer="layout" svg:width="0.891cm" svg:height="0.97cm" svg:x="-49.898cm" svg:y="99.58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55" draw:id="id455" draw:layer="layout" svg:width="0.891cm" svg:height="0.97cm" svg:x="-47.897cm" svg:y="99.58cm">
            <text:p text:style-name="P25"><text:span text:style-name="T12">P</text:span><text:span text:style-name="T13">0</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7cm" svg:y1="100.065cm" svg:x2="-49.007cm" svg:y2="100.065cm" draw:start-shape="id455" draw:start-glue-point="6" draw:end-shape="id456" draw:end-glue-point="10" svg:d="M-47897 100065h-1110" svg:viewBox="0 0 1111 1">
            <text:p/>
          </draw:connector>
          <draw:custom-shape draw:style-name="gr34" draw:text-style-name="P26" xml:id="id458" draw:id="id458" draw:layer="layout" svg:width="0.891cm" svg:height="0.97cm" svg:x="-45.898cm" svg:y="99.58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57" draw:id="id457" draw:layer="layout" svg:width="0.891cm" svg:height="0.97cm" svg:x="-43.897cm" svg:y="99.58cm">
            <text:p text:style-name="P25"><text:span text:style-name="T12">P</text:span><text:span text:style-name="T13">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7cm" svg:y1="100.065cm" svg:x2="-45.007cm" svg:y2="100.065cm" draw:start-shape="id457" draw:start-glue-point="6" draw:end-shape="id458" draw:end-glue-point="10" svg:d="M-43897 100065h-1110" svg:viewBox="0 0 1111 1">
            <text:p/>
          </draw:connector>
          <draw:connector draw:style-name="gr36" draw:text-style-name="P7" draw:layer="layout" draw:type="curve" svg:x1="-45.898cm" svg:y1="100.065cm" svg:x2="-47.006cm" svg:y2="100.065cm" draw:start-shape="id458" draw:start-glue-point="6" draw:end-shape="id455" draw:end-glue-point="10" svg:d="M-45898 100065h-1108" svg:viewBox="0 0 1109 1">
            <text:p/>
          </draw:connector>
          <draw:custom-shape draw:style-name="gr34" draw:text-style-name="P26" xml:id="id460" draw:id="id460" draw:layer="layout" svg:width="0.891cm" svg:height="0.97cm" svg:x="-38.898cm" svg:y="99.58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59" draw:id="id459" draw:layer="layout" svg:width="0.891cm" svg:height="0.97cm" svg:x="-36.897cm" svg:y="99.58cm">
            <text:p text:style-name="P25"><text:span text:style-name="T12">P</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7cm" svg:y1="100.065cm" svg:x2="-38.007cm" svg:y2="100.065cm" draw:start-shape="id459" draw:start-glue-point="6" draw:end-shape="id460" draw:end-glue-point="10" svg:d="M-36897 100065h-1110" svg:viewBox="0 0 1111 1">
            <text:p/>
          </draw:connector>
          <draw:custom-shape draw:style-name="gr479" draw:text-style-name="P106" draw:layer="layout" svg:width="16.317cm" svg:height="1.952cm" svg:x="-51.302cm" svg:y="97.114cm">
            <text:p/>
            <draw:enhanced-geometry svg:viewBox="0 0 21600 21600" draw:type="rectangle" draw:enhanced-path="M 0 0 L 21600 0 21600 21600 0 21600 0 0 Z N"/>
          </draw:custom-shape>
          <draw:custom-shape draw:style-name="gr481" draw:text-style-name="P133" draw:layer="layout" svg:width="4.16cm" svg:height="0.97cm" svg:x="-51.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26cm" svg:height="0.535cm" svg:x="-45.092cm" svg:y="95.68cm">
              <text:p text:style-name="P19"><text:span text:style-name="T4">P</text:span><text:span text:style-name="T42">i</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5cm" svg:height="0.535cm" svg:x="-44.042cm" svg:y="95.68cm">
              <text:p text:style-name="P19"><text:span text:style-name="T4">P</text:span><text:span text:style-name="T42">j</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53cm" svg:height="0.535cm" svg:x="-43cm" svg:y="95.68cm">
              <text:p text:style-name="P19"><text:span text:style-name="T4">P</text:span><text:span text:style-name="T42">k</text:span><text:span text:style-name="T4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26cm" svg:height="0.535cm" svg:x="-41.947cm" svg:y="95.68cm">
              <text:p text:style-name="P19"><text:span text:style-name="T4">P</text:span><text:span text:style-name="T42">l</text:span><text:span text:style-name="T4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63cm" svg:y1="95.945cm" svg:x2="-44.058cm" svg:y2="95.963cm">
              <text:p/>
            </draw:line>
            <draw:line draw:style-name="gr488" draw:text-style-name="P15" draw:layer="layout" svg:x1="-43.51cm" svg:y1="95.962cm" svg:x2="-43.012cm" svg:y2="95.957cm">
              <text:p/>
            </draw:line>
            <draw:line draw:style-name="gr488" draw:text-style-name="P15" draw:layer="layout" svg:x1="-42.464cm" svg:y1="95.962cm" svg:x2="-41.947cm" svg:y2="95.957cm">
              <text:p/>
            </draw:line>
          </draw:g>
          <draw:connector draw:style-name="gr489" draw:text-style-name="P7" draw:layer="layout" draw:type="curve" svg:x1="-39.311cm" svg:y1="100.024cm" svg:x2="-42.624cm" svg:y2="100.027cm" svg:d="M-39311 100024c-2484 0-828 3-3313 3" svg:viewBox="0 0 3314 4">
            <text:p/>
          </draw:connector>
          <draw:connector draw:style-name="gr489" draw:text-style-name="P7" draw:layer="layout" draw:type="curve" svg:x1="-45.796cm" svg:y1="95.924cm" svg:x2="-46.877cm" svg:y2="95.928cm" svg:d="M-45796 95924c-810 0-270 4-1081 4" svg:viewBox="0 0 1082 5">
            <text:p/>
          </draw:connector>
          <draw:connector draw:style-name="gr489" draw:text-style-name="P7" draw:layer="layout" draw:type="curve" svg:x1="-39.806cm" svg:y1="95.924cm" svg:x2="-40.887cm" svg:y2="95.928cm" svg:d="M-39806 95924c-810 0-270 4-1081 4" svg:viewBox="0 0 1082 5">
            <text:p/>
          </draw:connector>
          <draw:custom-shape draw:style-name="gr481" draw:text-style-name="P133" draw:layer="layout" svg:width="4.16cm" svg:height="0.97cm" svg:x="-39.348cm" svg:y="95.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9" draw:text-style-name="P106" draw:layer="layout" svg:width="16.317cm" svg:height="1.952cm" svg:x="-51.301cm" svg:y="101.114cm">
            <text:p/>
            <draw:enhanced-geometry svg:viewBox="0 0 21600 21600" draw:type="rectangle" draw:enhanced-path="M 0 0 L 21600 0 21600 21600 0 21600 0 0 Z N"/>
          </draw:custom-shape>
          <draw:custom-shape draw:style-name="gr491" draw:text-style-name="P134" draw:layer="layout" svg:width="1.539cm" svg:height="1.287cm" draw:transform="rotate (-1.5707963267949) translate (-39.994cm 101.297cm)">
            <text:p text:style-name="P19"><text:span text:style-name="T4">Phenom</text:span><text:span text:style-name="T4"><text:line-break/></text:span><text:span text:style-name="T4">distribu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1" draw:text-style-name="P134" draw:layer="layout" svg:width="1.539cm" svg:height="1.287cm" draw:transform="rotate (-1.5707963267949) translate (-39.994cm 97.297cm)">
            <text:p text:style-name="P19"><text:span text:style-name="T4">Word</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79" draw:text-style-name="P106" draw:layer="layout" svg:width="16.317cm" svg:height="1.952cm" svg:x="-51.302cm" svg:y="93.114cm">
            <text:p/>
            <draw:enhanced-geometry svg:viewBox="0 0 21600 21600" draw:type="rectangle" draw:enhanced-path="M 0 0 L 21600 0 21600 21600 0 21600 0 0 Z N"/>
          </draw:custom-shape>
          <draw:custom-shape draw:style-name="gr491" draw:text-style-name="P134" draw:layer="layout" svg:width="1.539cm" svg:height="1.287cm" draw:transform="rotate (-1.5707963267949) translate (-39.994cm 93.297cm)">
            <text:p text:style-name="P19"><text:span text:style-name="T4">Sentence</text:span><text:span text:style-name="T4"><text:line-break/></text:span><text:span text:style-name="T4">distribu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4cm" svg:y="92.47cm">
            <draw:text-box>
              <text:p><text:span text:style-name="T12">S</text:span><text:span text:style-name="T13">0</text:span></text:p>
            </draw:text-box>
          </draw:frame>
          <draw:frame draw:style-name="gr33" draw:text-style-name="P11" draw:layer="layout" svg:width="0.947cm" svg:height="0.646cm" svg:x="-43.917cm" svg:y="92.47cm">
            <draw:text-box>
              <text:p><text:span text:style-name="T12">S</text:span><text:span text:style-name="T13">p</text:span></text:p>
            </draw:text-box>
          </draw:frame>
          <draw:frame draw:style-name="gr33" draw:text-style-name="P11" draw:layer="layout" svg:width="0.947cm" svg:height="0.646cm" svg:x="-37.915cm" svg:y="92.462cm">
            <draw:text-box>
              <text:p><text:span text:style-name="T12">S</text:span><text:span text:style-name="T13">p</text:span></text:p>
            </draw:text-box>
          </draw:frame>
          <draw:custom-shape draw:style-name="gr481" draw:text-style-name="P133" draw:layer="layout" svg:width="4.16cm" svg:height="0.97cm" svg:x="-51.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33" draw:layer="layout" svg:width="4.16cm" svg:height="0.97cm" svg:x="-45.35cm" svg:y="9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45.137cm" svg:y="91.681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44.092cm" svg:y="91.681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43.113cm" svg:y="91.681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41.989cm" svg:y="91.681cm">
              <text:p text:style-name="P19"><text:span text:style-name="T4">W</text:span><text:span text:style-name="T42">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44.582cm" svg:y1="91.949cm" svg:x2="-44.132cm" svg:y2="91.939cm">
              <text:p/>
            </draw:line>
            <draw:line draw:style-name="gr488" draw:text-style-name="P15" draw:layer="layout" svg:x1="-43.51cm" svg:y1="91.963cm" svg:x2="-43.087cm" svg:y2="91.952cm">
              <text:p/>
            </draw:line>
            <draw:line draw:style-name="gr488" draw:text-style-name="P15" draw:layer="layout" svg:x1="-42.464cm" svg:y1="91.963cm" svg:x2="-41.949cm" svg:y2="91.966cm">
              <text:p/>
            </draw:line>
          </draw:g>
          <draw:connector draw:style-name="gr489" draw:text-style-name="P7" draw:layer="layout" draw:type="curve" svg:x1="-45.796cm" svg:y1="91.925cm" svg:x2="-46.877cm" svg:y2="91.929cm" svg:d="M-45796 91925c-810 0-270 4-1081 4" svg:viewBox="0 0 1082 5">
            <text:p/>
          </draw:connector>
          <draw:connector draw:style-name="gr489" draw:text-style-name="P7" draw:layer="layout" draw:type="curve" svg:x1="-39.806cm" svg:y1="91.925cm" svg:x2="-40.887cm" svg:y2="91.929cm" svg:d="M-39806 91925c-810 0-270 4-1081 4" svg:viewBox="0 0 1082 5">
            <text:p/>
          </draw:connector>
          <draw:custom-shape draw:style-name="gr481" draw:text-style-name="P133" draw:layer="layout" svg:width="4.16cm" svg:height="0.97cm" svg:x="-39.348cm" svg:y="91.4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7" draw:text-style-name="P15" draw:layer="layout" svg:x1="-34.76cm" svg:y1="88.884cm" svg:x2="-34.671cm" svg:y2="102.989cm">
            <text:p/>
          </draw:line>
          <draw:frame draw:style-name="gr561" draw:text-style-name="P168" draw:layer="layout" svg:width="5.06cm" svg:height="2.015cm" draw:transform="rotate (1.5707963267949) translate (-34.659cm 98.445cm)">
            <draw:text-box>
              <text:p text:style-name="P5"><text:span text:style-name="T56">Live remembering</text:span><text:span text:style-name="T56"><text:line-break/></text:span><text:span text:style-name="T56">and</text:span><text:span text:style-name="T56"><text:line-break/></text:span><text:span text:style-name="T56">State estimation</text:span></text:p>
            </draw:text-box>
          </draw:frame>
          <draw:custom-shape draw:style-name="gr479" draw:text-style-name="P106" draw:layer="layout" svg:width="16.317cm" svg:height="1.952cm" svg:x="-51.299cm" svg:y="88.915cm">
            <text:p/>
            <draw:enhanced-geometry svg:viewBox="0 0 21600 21600" draw:type="rectangle" draw:enhanced-path="M 0 0 L 21600 0 21600 21600 0 21600 0 0 Z N"/>
          </draw:custom-shape>
          <draw:custom-shape draw:style-name="gr492" draw:text-style-name="P134" draw:layer="layout" svg:width="1.697cm" svg:height="1.287cm" draw:transform="rotate (-1.5707963267949) translate (-39.994cm 89.04cm)">
            <text:p text:style-name="P19"><text:span text:style-name="T4">fused</text:span><text:span text:style-name="T4"><text:line-break/></text:span><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62" draw:text-style-name="P137" draw:layer="layout" svg:width="2.198cm" svg:height="1.705cm" svg:x="-44.455cm" svg:y="89.094cm">
            <text:p text:style-name="P136"><text:span text:style-name="T45">Stimul</text:span><text:span text:style-name="T45">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g draw:style-name="gr31">
            <draw:g draw:style-name="gr23">
              <draw:polygon draw:style-name="gr510" draw:text-style-name="P113" draw:layer="layout" svg:width="1.179cm" svg:height="1.358cm" svg:x="-51.116cm" svg:y="89.165cm" svg:viewBox="0 0 1180 1359" draw:points="0,0 1180,581 1180,777 0,1359">
                <text:p/>
              </draw:polygon>
            </draw:g>
            <draw:frame draw:style-name="gr484" draw:text-style-name="P11" draw:layer="layout" svg:width="1.527cm" svg:height="0.57cm" svg:x="-51.347cm" svg:y="89.528cm">
              <draw:text-box>
                <text:p><text:span text:style-name="T49">encoder</text:span></text:p>
              </draw:text-box>
            </draw:frame>
          </draw:g>
          <draw:frame draw:style-name="gr563" draw:text-style-name="P41" draw:layer="layout" svg:width="2.729cm" svg:height="1.433cm" svg:x="-47.139cm" svg:y="89.195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3" draw:text-style-name="P41" draw:layer="layout" svg:width="2.729cm" svg:height="1.433cm" svg:x="-47.138cm" svg:y="93.396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3" draw:text-style-name="P41" draw:layer="layout" svg:width="2.729cm" svg:height="1.433cm" svg:x="-47.137cm" svg:y="97.397cm">
            <draw:text-box>
              <text:p text:style-name="P5"><text:span text:style-name="T12">Particle filter</text:span><text:span text:style-name="T12"><text:line-break/></text:span><text:span text:style-name="T12">+</text:span><text:span text:style-name="T12"><text:line-break/></text:span><text:span text:style-name="T12">transformer</text:span></text:p>
            </draw:text-box>
          </draw:frame>
          <draw:frame draw:style-name="gr563" draw:text-style-name="P41" draw:layer="layout" svg:width="2.729cm" svg:height="1.433cm" svg:x="-47.136cm" svg:y="101.598cm">
            <draw:text-box>
              <text:p text:style-name="P5"><text:span text:style-name="T12">Kalman</text:span><text:span text:style-name="T12"><text:line-break/></text:span><text:span text:style-name="T12">filter</text:span></text:p>
            </draw:text-box>
          </draw:frame>
          <draw:custom-shape draw:style-name="gr564" draw:text-style-name="P27" xml:id="id461" draw:id="id461" draw:layer="layout" svg:width="0.642cm" svg:height="0.699cm" svg:x="-39.723cm" svg:y="88.967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4" draw:text-style-name="P27" xml:id="id462" draw:id="id462" draw:layer="layout" svg:width="0.642cm" svg:height="0.699cm" svg:x="-39.723cm" svg:y="90.138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65" draw:text-style-name="P15" draw:layer="layout" draw:type="curve" svg:x1="-39.402cm" svg:y1="89.666cm" svg:x2="-39.402cm" svg:y2="90.138cm" draw:start-shape="id461" draw:start-glue-point="8" draw:end-shape="id462" draw:end-glue-point="4" svg:d="M-39402 89666v472" svg:viewBox="0 0 1 473">
            <text:p/>
          </draw:connector>
          <draw:frame draw:style-name="gr521" draw:text-style-name="P5" draw:layer="layout" svg:width="3.229cm" svg:height="0.597cm" svg:x="-51.173cm" svg:y="103.103cm">
            <draw:object xlink:href="./Object 1" xlink:type="simple" xlink:show="embed" xlink:actuate="onLoad">
              <loext:p/>
            </draw:object>
            <draw:image xlink:href="./ObjectReplacements/Object 1" xlink:type="simple" xlink:show="embed" xlink:actuate="onLoad"/>
          </draw:frame>
          <draw:custom-shape draw:style-name="gr35" draw:text-style-name="P27" xml:id="id464" draw:id="id464" draw:layer="layout" svg:width="0.891cm" svg:height="0.97cm" svg:x="-44.527cm" svg:y="101.637cm">
            <text:p text:style-name="P25"><text:span text:style-name="T12">P</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66" draw:text-style-name="P170" draw:layer="layout" svg:width="3.958cm" svg:height="0.645cm" svg:x="-39.467cm" svg:y="89.59cm">
            <draw:text-box>
              <text:p><text:span text:style-name="T12">H </text:span><text:span text:style-name="T57">(observation matrix)</text:span></text:p>
            </draw:text-box>
          </draw:frame>
          <draw:custom-shape draw:style-name="gr34" draw:text-style-name="P26" xml:id="id463" draw:id="id463" draw:layer="layout" svg:width="0.891cm" svg:height="0.97cm" svg:x="-42.586cm" svg:y="101.636cm">
            <text:p text:style-name="P25"><text:span text:style-name="T12">P</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2.586cm" svg:y1="102.121cm" svg:x2="-43.636cm" svg:y2="102.122cm" draw:start-shape="id463" draw:start-glue-point="6" draw:end-shape="id464" draw:end-glue-point="10" svg:d="M-42586 102121c-786 0-261 1-1050 1" svg:viewBox="0 0 1051 2">
            <text:p/>
          </draw:connector>
          <draw:g draw:style-name="gr31">
            <draw:custom-shape draw:style-name="gr567" draw:text-style-name="P26" xml:id="id468" draw:id="id468" draw:layer="layout" svg:width="2.001cm" svg:height="0.89cm" svg:x="-44.106cm" svg:y="105.13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8" draw:text-style-name="P171" xml:id="id470" draw:id="id470" draw:layer="layout" svg:width="0.891cm" svg:height="0.97cm" svg:x="-40.648cm" svg:y="104.212cm">
              <text:p text:style-name="P25"><text:span text:style-name="T12">KF</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9" draw:text-style-name="P27" xml:id="id465" draw:id="id465" draw:layer="layout" svg:width="0.837cm" svg:height="0.699cm" svg:x="-48.123cm" svg:y="104.335cm">
              <text:p text:style-name="P25"><text:span text:style-name="T12">Z</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0" draw:text-style-name="P27" xml:id="id466" draw:id="id466" draw:layer="layout" svg:width="0.817cm" svg:height="0.699cm" svg:x="-46.42cm" svg:y="104.341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1" draw:text-style-name="P7" draw:layer="layout" draw:type="curve" svg:x1="-47.286cm" svg:y1="104.685cm" svg:x2="-46.42cm" svg:y2="104.691cm" draw:start-shape="id465" draw:start-glue-point="10" draw:end-shape="id466" draw:end-glue-point="6" svg:d="M-47286 104685c651 0 218 6 866 6" svg:viewBox="0 0 867 7">
              <text:p/>
            </draw:connector>
            <draw:custom-shape draw:style-name="gr570" draw:text-style-name="P27" xml:id="id467" draw:id="id467" draw:layer="layout" svg:width="0.817cm" svg:height="0.699cm" svg:x="-46.419cm" svg:y="104.342cm">
              <text:p text:style-name="P25"><text:span text:style-name="T12">X</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7" draw:text-style-name="P26" xml:id="id469" draw:id="id469" draw:layer="layout" svg:width="2.001cm" svg:height="0.89cm" svg:x="-44.157cm" svg:y="103.249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1" draw:text-style-name="P5" draw:layer="layout" svg:width="1.698cm" svg:height="0.588cm" svg:x="-43.941cm" svg:y="103.4cm">
              <draw:object xlink:href="./Object 2" xlink:type="simple" xlink:show="embed" xlink:actuate="onLoad">
                <loext:p/>
              </draw:object>
              <draw:image xlink:href="./ObjectReplacements/Object 2" xlink:type="simple" xlink:show="embed" xlink:actuate="onLoad"/>
            </draw:frame>
            <draw:frame draw:style-name="gr484" draw:text-style-name="P11" draw:layer="layout" svg:width="0.707cm" svg:height="0.57cm" svg:x="-47.292cm" svg:y="104.207cm">
              <draw:text-box>
                <text:p><text:span text:style-name="T4">H</text:span></text:p>
              </draw:text-box>
            </draw:frame>
            <draw:connector draw:style-name="gr565" draw:text-style-name="P15" draw:layer="layout" draw:type="curve" svg:x1="-45.602cm" svg:y1="104.692cm" svg:x2="-44.106cm" svg:y2="105.584cm" draw:start-shape="id467" draw:start-glue-point="10" draw:end-shape="id468" draw:end-glue-point="6" svg:d="M-45602 104692c1123 0 376 892 1496 892" svg:viewBox="0 0 1497 893">
              <text:p/>
            </draw:connector>
            <draw:connector draw:style-name="gr565" draw:text-style-name="P15" draw:layer="layout" draw:type="curve" svg:x1="-45.602cm" svg:y1="104.692cm" svg:x2="-44.157cm" svg:y2="103.694cm" draw:start-shape="id467" draw:start-glue-point="10" draw:end-shape="id469" draw:end-glue-point="6" svg:d="M-45602 104692c1086 0 364-998 1445-998" svg:viewBox="0 0 1446 999">
              <text:p/>
            </draw:connector>
            <draw:connector draw:style-name="gr565" draw:text-style-name="P15" draw:layer="layout" draw:type="curve" svg:x1="-42.156cm" svg:y1="103.694cm" svg:x2="-40.648cm" svg:y2="104.697cm" draw:start-shape="id469" draw:start-glue-point="10" draw:end-shape="id470" draw:end-glue-point="6" svg:d="M-42156 103694c1132 0 379 1003 1508 1003" svg:viewBox="0 0 1509 1004">
              <text:p/>
            </draw:connector>
            <draw:connector draw:style-name="gr565" draw:text-style-name="P15" draw:layer="layout" draw:type="curve" svg:x1="-42.105cm" svg:y1="105.584cm" svg:x2="-40.648cm" svg:y2="104.697cm" draw:start-shape="id468" draw:end-shape="id470" draw:end-glue-point="6" svg:d="M-42105 105584c1095 0 367-887 1457-887" svg:viewBox="0 0 1458 888">
              <text:p/>
            </draw:connector>
            <draw:frame draw:style-name="gr521" draw:text-style-name="P5" draw:layer="layout" svg:width="1.44cm" svg:height="0.588cm" svg:x="-43.89cm" svg:y="105.29cm">
              <draw:object xlink:href="./Object 3" xlink:type="simple" xlink:show="embed" xlink:actuate="onLoad">
                <loext:p/>
              </draw:object>
              <draw:image xlink:href="./ObjectReplacements/Object 3" xlink:type="simple" xlink:show="embed" xlink:actuate="onLoad"/>
            </draw:frame>
            <draw:g draw:style-name="gr31" xml:id="id471" draw:id="id471">
              <draw:custom-shape draw:style-name="gr572" draw:text-style-name="P26" draw:layer="layout" svg:width="1.577cm" svg:height="0.757cm" svg:x="-38.671cm" svg:y="104.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1" draw:text-style-name="P5" draw:layer="layout" svg:width="1.207cm" svg:height="0.579cm" svg:x="-38.476cm" svg:y="104.414cm">
                <draw:object xlink:href="./Object 4" xlink:type="simple" xlink:show="embed" xlink:actuate="onLoad">
                  <loext:p/>
                </draw:object>
                <draw:image xlink:href="./ObjectReplacements/Object 4" xlink:type="simple" xlink:show="embed" xlink:actuate="onLoad"/>
              </draw:frame>
            </draw:g>
            <draw:connector draw:style-name="gr565" draw:text-style-name="P15" draw:layer="layout" draw:type="curve" svg:x1="-39.757cm" svg:y1="104.697cm" svg:x2="-38.671cm" svg:y2="104.679cm" draw:start-shape="id470" draw:start-glue-point="10" draw:end-shape="id471" draw:end-glue-point="3" svg:d="M-39757 104697c816 0 273-18 1086-18" svg:viewBox="0 0 1087 19">
              <text:p/>
            </draw:connector>
            <draw:custom-shape draw:style-name="gr569" draw:text-style-name="P27" xml:id="id472" draw:id="id472" draw:layer="layout" svg:width="0.837cm" svg:height="0.699cm" svg:x="-43.525cm" svg:y="108.048cm">
              <text:p text:style-name="P25"><text:span text:style-name="T12">Z</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0" draw:text-style-name="P27" draw:layer="layout" svg:width="0.817cm" svg:height="0.699cm" svg:x="-43.504cm" svg:y="106.508cm">
              <text:p text:style-name="P25"><text:span text:style-name="T12">X</text:span><text:span text:style-name="T13">t-1</text:span><text:span text:style-name="T14">(0</text:span><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1" draw:text-style-name="P7" draw:layer="layout" draw:type="curve" svg:x1="-43.106cm" svg:y1="108.048cm" svg:x2="-43.094cm" svg:y2="107.208cm" draw:start-shape="id472" draw:start-glue-point="4" draw:end-shape="id473" draw:end-glue-point="8" svg:d="M-43106 108048c0-630 12-210 12-840" svg:viewBox="0 0 13 841">
              <text:p/>
            </draw:connector>
            <draw:custom-shape draw:style-name="gr570" draw:text-style-name="P27" xml:id="id473" draw:id="id473" draw:layer="layout" svg:width="0.817cm" svg:height="0.699cm" svg:x="-43.503cm" svg:y="106.509cm">
              <text:p text:style-name="P25"><text:span text:style-name="T12">X</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4" draw:text-style-name="P11" draw:layer="layout" svg:width="0.707cm" svg:height="0.57cm" svg:x="-43.61cm" svg:y="107.393cm">
              <draw:text-box>
                <text:p><text:span text:style-name="T4">H</text:span></text:p>
              </draw:text-box>
            </draw:frame>
            <draw:connector draw:style-name="gr571" draw:text-style-name="P7" draw:layer="layout" draw:type="curve" svg:x1="-43.094cm" svg:y1="106.509cm" svg:x2="-43.105cm" svg:y2="106.029cm" draw:start-shape="id473" draw:start-glue-point="4" draw:end-shape="id468" draw:end-glue-point="8" svg:d="M-43094 106509c0-360-11-120-11-480" svg:viewBox="0 0 12 481">
              <text:p/>
            </draw:connector>
            <draw:measure draw:style-name="gr573" draw:text-style-name="P173" draw:layer="measurelines" svg:x1="-42.622cm" svg:y1="108.335cm" svg:x2="-38.396cm" svg:y2="105.093cm">
              <text:p text:style-name="P172"><text:span text:style-name="T58">Suprise</text:span><text:span text:style-name="T58"><text:line-break/></text:span><text:span text:style-name="T58"><text:measure text:kind="gap"/></text:span><text:span text:style-name="T58">Wasserstein</text:span></text:p>
            </draw:measure>
          </draw:g>
        </draw:g>
        <draw:rect draw:style-name="gr41" draw:text-style-name="P5" xml:id="id474" draw:id="id474" draw:layer="layout" svg:width="2.064cm" svg:height="1.085cm" svg:x="10.737cm" svg:y="102.447cm">
          <text:p text:style-name="P5">close-loop</text:p>
        </draw:rect>
        <draw:connector draw:style-name="gr293" draw:text-style-name="P15" draw:layer="layout" draw:type="curve" svg:x1="16.457cm" svg:y1="99.461cm" svg:x2="11.769cm" svg:y2="102.447cm" draw:start-shape="id356" draw:start-glue-point="2" draw:end-shape="id474" draw:end-glue-point="0" svg:d="M16457 99461c0 2239-4688 747-4688 2986" svg:viewBox="0 0 4689 2987">
          <text:p/>
        </draw:connector>
        <draw:path draw:style-name="gr574" draw:text-style-name="P174" draw:layer="layout" svg:width="0.38cm" svg:height="0.468cm" svg:x="-29.158cm" svg:y="91.783cm" svg:viewBox="0 0 381 469" svg:d="M381 336c0 42-17 75-50 98-32 23-79 35-138 35-111 0-175-39-193-116l60-12c7 27 21 47 44 60 22 13 52 19 91 19 40 0 70-6 92-20s33-34 33-60c0-15-4-27-11-37-6-9-16-16-28-23-12-6-27-11-44-15s-36-8-57-13c-36-8-63-16-81-24-19-8-34-17-44-27-11-9-19-21-25-34s-9-28-9-45c0-39 15-69 45-90s72-32 128-32c52 0 91 8 118 24 28 16 47 43 58 81l-61 10c-6-24-19-41-38-52s-45-16-78-16c-36 0-64 6-83 18s-29 30-29 54c0 14 4 25 11 34 8 9 19 17 33 24 14 6 41 14 83 23 14 3 28 7 42 10s27 7 40 12c13 4 24 10 36 16 11 6 20 14 28 23 9 9 15 20 20 32 4 12 7 27 7 43z">
          <text:p/>
        </draw:path>
        <draw:path draw:style-name="gr574" draw:text-style-name="P174" draw:layer="layout" svg:width="0.309cm" svg:height="0.361cm" svg:x="-28.719cm" svg:y="91.89cm" svg:viewBox="0 0 310 362" svg:d="M61 193c0 40 8 71 25 93 16 22 41 32 72 32 26 0 46-5 61-15s25-23 31-38l51 14c-21 55-69 83-143 83-51 0-90-15-117-46s-41-77-41-137c0-58 14-102 41-133s65-46 115-46c103 0 154 62 154 185v8zM250 148c-3-36-12-63-28-80-15-17-38-25-67-25-28 0-50 9-67 28-16 19-25 45-26 77z">
          <text:p/>
        </draw:path>
        <draw:path draw:style-name="gr574" draw:text-style-name="P174" draw:layer="layout" svg:width="0.168cm" svg:height="0.432cm" svg:x="-28.37cm" svg:y="91.818cm" svg:viewBox="0 0 169 433" svg:d="M169 425c-19 5-39 8-59 8-46 0-70-26-70-79v-234h-40v-42h43l17-78h38v78h65v42h-65v221c0 17 3 29 9 36 5 6 15 10 28 10 8 0 19-2 34-5z">
          <text:p/>
        </draw:path>
        <draw:path draw:style-name="gr574" draw:text-style-name="P174" draw:layer="layout" svg:width="0.351cm" svg:height="0.455cm" svg:x="-27.959cm" svg:y="91.791cm" svg:viewBox="0 0 352 456" svg:d="M352 137c0 43-14 77-42 103-28 25-67 38-115 38h-133v178h-62v-456h191c51 0 91 12 119 36s42 58 42 101zM290 138c0-59-35-89-106-89h-122v180h125c68 0 103-30 103-91z">
          <text:p/>
        </draw:path>
        <draw:path draw:style-name="gr574" draw:text-style-name="P174" draw:layer="layout" svg:width="0.311cm" svg:height="0.361cm" svg:x="-27.545cm" svg:y="91.89cm" svg:viewBox="0 0 312 362" svg:d="M312 181c0 61-13 106-40 136s-66 45-117 45-90-16-116-47-39-76-39-134c0-121 52-181 157-181 53 0 92 15 117 44 26 29 38 75 38 137zM251 181c0-48-7-83-21-105-15-22-39-33-72-33-34 0-59 11-74 33-15 23-23 57-23 105 0 46 7 80 22 103s39 35 71 35c35 0 60-11 75-34 15-22 22-57 22-104z">
          <text:p/>
        </draw:path>
        <draw:path draw:style-name="gr574" draw:text-style-name="P174" draw:layer="layout" svg:width="0.057cm" svg:height="0.479cm" svg:x="-27.161cm" svg:y="91.767cm" svg:viewBox="0 0 58 480" svg:d="M0 56c0-19 0-37 0-56 19 0 39 0 58 0 0 19 0 37 0 56-19 0-39 0-58 0zM0 480c0-117 0-233 0-350 19 0 39 0 58 0 0 117 0 233 0 350-19 0-39 0-58 0z">
          <text:p/>
        </draw:path>
        <draw:path draw:style-name="gr574" draw:text-style-name="P174" draw:layer="layout" svg:width="0.28cm" svg:height="0.355cm" svg:x="-27.015cm" svg:y="91.89cm" svg:viewBox="0 0 281 356" svg:d="M222 356v-222c0-23-2-41-6-53-5-13-12-22-22-28-10-5-24-8-44-8-28 0-50 9-66 29-16 19-24 45-24 79v203h-58v-275c0-41-1-65-2-75h55c0 2 0 4 1 9 0 5 0 10 0 17 1 6 1 17 1 34h1c14-24 29-41 47-51 17-10 39-15 65-15 38 0 66 10 84 29s27 50 27 94v233z">
          <text:p/>
        </draw:path>
        <draw:path draw:style-name="gr574" draw:text-style-name="P174" draw:layer="layout" svg:width="0.168cm" svg:height="0.432cm" svg:x="-26.682cm" svg:y="91.818cm" svg:viewBox="0 0 169 433" svg:d="M169 425c-19 5-39 8-59 8-46 0-70-26-70-79v-234h-40v-42h43l17-78h38v78h65v42h-65v221c0 17 3 29 9 36 5 6 15 10 28 10 8 0 19-2 34-5z">
          <text:p/>
        </draw:path>
        <draw:g draw:style-name="gr23">
          <draw:path draw:style-name="gr575" draw:text-style-name="P175" draw:layer="layout" svg:width="0.194cm" svg:height="0.298cm" svg:x="-26.733cm" svg:y="92.957cm" svg:viewBox="0 0 195 299" svg:d="M186 45c-8-3-16-4-25-4-19 0-36 10-51 30s-26 45-31 75l-30 153h-49l44-225 7-38 5-31h46l-10 60h1c12-24 24-41 36-50 11-10 25-15 40-15 8 0 17 1 26 4z">
            <text:p/>
          </draw:path>
          <draw:path draw:style-name="gr575" draw:text-style-name="P175" draw:layer="layout" svg:width="0.205cm" svg:height="0.517cm" svg:x="-26.531cm" svg:y="92.853cm" svg:viewBox="0 0 206 518" svg:d="M206 0c-105 92-157 203-157 332 0 70 19 132 56 186h-47c-39-54-58-117-58-191 0-67 14-128 41-184 27-55 66-103 118-143z">
            <text:p/>
          </draw:path>
          <draw:path draw:style-name="gr575" draw:text-style-name="P175" draw:layer="layout" svg:width="0.148cm" svg:height="0.364cm" svg:x="-26.347cm" svg:y="92.897cm" svg:viewBox="0 0 149 365" svg:d="M49 365c-15-1-27-5-36-14-9-10-13-22-13-37 0-10 1-22 4-35l34-178h-34l7-35h35l28-66h33l-13 66h55l-8 35h-54l-34 175c-2 11-3 20-3 26 0 16 8 24 24 24 8 0 17-2 28-4l-6 36c-18 4-33 6-47 7z">
            <text:p/>
          </draw:path>
          <draw:path draw:style-name="gr575" draw:text-style-name="P175" draw:layer="layout" svg:width="0.205cm" svg:height="0.517cm" svg:x="-26.273cm" svg:y="92.853cm" svg:viewBox="0 0 206 518" svg:d="M0 518c105-92 157-203 157-332 0-70-19-132-56-186h47c39 54 58 117 58 191 0 67-14 128-41 184-27 55-66 103-118 143z">
            <text:p/>
          </draw:path>
        </draw:g>
        <draw:path draw:style-name="gr576" draw:text-style-name="P5" draw:layer="layout" svg:width="4.073cm" svg:height="0cm" svg:x="-29.294cm" svg:y="92.706cm" svg:viewBox="0 0 4074 0" svg:d="M0 0c1358 0 2716 0 4074 0">
          <text:p/>
        </draw:path>
        <draw:path draw:style-name="gr577" draw:text-style-name="P176" draw:layer="layout" svg:width="0.316cm" svg:height="0.316cm" svg:x="-25.484cm" svg:y="92.547cm" svg:viewBox="0 0 317 317" svg:d="M0 0c106 53 211 106 317 159-106 53-211 105-317 158 0-106 0-211 0-317z">
          <text:p/>
        </draw:path>
        <draw:path draw:style-name="gr578" draw:text-style-name="P177"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79" draw:text-style-name="P126" draw:layer="layout" svg:width="0.951cm" svg:height="0.952cm" svg:x="-25.14cm" svg:y="92.23cm" svg:viewBox="0 0 952 953" svg:d="M952 477c0 83-22 165-63 238-42 72-103 132-175 174-73 42-154 64-238 64s-166-22-238-64-133-102-174-174c-42-73-64-155-64-238 0-84 22-166 64-238 41-73 102-133 174-175s154-64 238-64 165 22 238 64c72 42 133 102 175 175 41 72 63 154 63 238z">
          <text:p/>
        </draw:path>
        <draw:path draw:style-name="gr580" draw:text-style-name="P174" draw:layer="layout" svg:width="0.32cm" svg:height="0.323cm" svg:x="-25.108cm" svg:y="91.732cm" svg:viewBox="0 0 321 324" svg:d="M184 186c0 46 0 92 0 138-16 0-31 0-47 0 0-46 0-92 0-138-46 0-91 0-137 0 0-16 0-32 0-47 46 0 91 0 137 0 0-47 0-93 0-139 16 0 31 0 47 0 0 46 0 92 0 139 46 0 92 0 137 0 0 15 0 31 0 47-45 0-91 0-137 0z">
          <text:p/>
        </draw:path>
        <draw:path draw:style-name="gr580" draw:text-style-name="P174" draw:layer="layout" svg:width="0.32cm" svg:height="0.046cm" svg:x="-25.287cm" svg:y="93.431cm" svg:viewBox="0 0 321 47" svg:d="M0 47c0-16 0-31 0-47 107 0 214 0 321 0 0 16 0 31 0 47-107 0-214 0-321 0z">
          <text:p/>
        </draw:path>
        <draw:g draw:style-name="gr23">
          <draw:path draw:style-name="gr581" draw:text-style-name="P174" draw:layer="layout" svg:width="0.331cm" svg:height="0.341cm" svg:x="-24.496cm" svg:y="89.913cm" svg:viewBox="0 0 332 342" svg:d="M291 342v-229c0-24 0-48 2-72-8 29-15 51-22 68l-88 233h-33l-89-233-14-41-7-27 1 27v45 229h-41v-342h61l91 237c3 9 6 20 9 30 3 12 5 19 6 24 1-6 4-16 8-29 5-13 7-22 8-25l90-237h59v342z">
            <text:p/>
          </draw:path>
          <draw:path draw:style-name="gr581" draw:text-style-name="P174" draw:layer="layout" svg:width="0.232cm" svg:height="0.271cm" svg:x="-24.102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81" draw:text-style-name="P174" draw:layer="layout" svg:width="0.254cm" svg:height="0.271cm" svg:x="-23.827cm" svg:y="89.987cm" svg:viewBox="0 0 255 272" svg:d="M80 272c-27 0-47-7-60-21s-20-32-20-57c0-27 9-48 27-63 17-14 47-22 86-23l59-1v-14c0-22-4-37-13-46-10-9-24-14-43-14-20 0-34 4-43 11-8 6-14 16-16 31l-45-4c7-48 42-71 105-71 32 0 57 8 75 23 16 15 24 36 24 66v112c0 13 2 23 6 30 3 6 9 9 19 9 4 0 8 0 14-1v27c-11 3-22 4-33 4-17 0-28-4-36-13-7-8-12-22-12-40h-2c-11 20-24 35-39 43-14 8-32 12-53 12zM89 240c16 0 30-4 43-12 12-7 22-17 30-30 6-12 10-25 10-39v-22l-47 2c-21 0-36 2-48 6-10 4-18 10-24 18s-8 19-8 32c0 14 4 25 11 33 8 7 19 12 33 12z">
            <text:p/>
          </draw:path>
          <draw:path draw:style-name="gr581" draw:text-style-name="P174" draw:layer="layout" svg:width="0.215cm" svg:height="0.271cm" svg:x="-23.558cm" svg:y="89.987cm" svg:viewBox="0 0 216 272" svg:d="M216 195c0 24-9 43-27 57-19 13-46 20-79 20s-57-5-75-17c-18-10-30-27-35-50l38-7c4 14 12 24 24 31 11 6 27 10 48 10 22 0 39-4 49-11 10-6 15-17 15-30 0-10-3-19-10-25-8-7-19-12-35-17l-31-8c-25-6-43-13-54-19-10-6-18-13-24-22s-9-21-9-33c0-24 8-42 25-55s42-19 74-19c30 0 52 5 70 15 17 11 27 27 32 50l-39 4c-2-11-9-20-20-27-10-6-25-9-43-9-19 0-33 3-43 9-9 6-14 15-14 27 0 8 2 14 6 19 3 4 9 9 17 12 7 4 23 8 48 14 23 6 40 11 50 17 10 4 18 9 24 15 6 7 10 14 14 22 3 7 4 16 4 27z">
            <text:p/>
          </draw:path>
          <draw:path draw:style-name="gr581" draw:text-style-name="P174" draw:layer="layout" svg:width="0.21cm" svg:height="0.266cm" svg:x="-23.291cm" svg:y="89.992cm" svg:viewBox="0 0 211 267" svg:d="M44 0v167c0 17 2 31 5 40 4 9 9 16 16 21 8 3 18 6 33 6 21 0 37-7 50-22 12-14 18-34 18-59v-153h44v207c0 30 0 49 1 56h-41c0-2 0-3-1-7 0-4 0-7-1-12 0-5 0-13 0-26h-1c-10 18-21 31-35 38-13 8-29 11-49 11-29 0-50-7-63-21-13-15-20-38-20-71v-175z">
            <text:p/>
          </draw:path>
          <draw:path draw:style-name="gr581" draw:text-style-name="P174" draw:layer="layout" svg:width="0.123cm" svg:height="0.266cm" svg:x="-23.015cm" svg:y="89.987cm" svg:viewBox="0 0 124 267" svg:d="M2 267v-201c0-19-1-39-2-61h41c2 30 2 48 2 54h1c7-23 15-39 24-47 9-7 22-12 39-12 5 0 11 1 17 2v41c-5-2-14-3-23-3-18 0-32 8-42 23-9 16-14 38-14 68v136z">
            <text:p/>
          </draw:path>
          <draw:path draw:style-name="gr581" draw:text-style-name="P174" draw:layer="layout" svg:width="0.232cm" svg:height="0.271cm" svg:x="-22.861cm" svg:y="89.987cm" svg:viewBox="0 0 233 272" svg:d="M46 145c0 30 6 53 19 70 12 16 30 24 54 24 19 0 34-4 46-11 11-8 18-18 23-29l38 11c-16 41-52 62-107 62-39 0-68-11-88-35-20-23-31-57-31-103 0-43 11-76 31-99 20-24 49-35 86-35 78 0 116 47 116 139v6zM188 111c-2-27-9-47-21-60-11-13-29-19-51-19-21 0-37 7-50 21-12 15-19 34-19 58z">
            <text:p/>
          </draw:path>
          <draw:path draw:style-name="gr581" draw:text-style-name="P174" draw:layer="layout" svg:width="0.222cm" svg:height="0.364cm" svg:x="-22.586cm" svg:y="89.895cm" svg:viewBox="0 0 223 365" svg:d="M178 318c-8 17-19 29-32 36s-30 11-50 11c-33 0-57-11-73-34-15-21-23-56-23-101 0-92 32-138 96-138 20 0 37 4 50 12 13 6 24 18 32 34h1l-1-29v-109h44v306c0 28 0 46 1 54h-41c-1-2-2-8-2-17 0-10 0-18 0-25zM46 228c0 37 4 63 14 79s26 24 47 24c25 0 43-8 55-25 11-18 16-45 16-81 0-34-5-60-16-76-12-16-30-24-54-24-22 0-37 8-47 24s-15 43-15 79z">
            <text:p/>
          </draw:path>
          <draw:path draw:style-name="gr582" draw:text-style-name="P174" draw:layer="layout" svg:width="0.268cm" svg:height="0.341cm" svg:x="-24.019cm" svg:y="90.609cm" svg:viewBox="0 0 269 342" svg:d="M0 342c0-114 0-228 0-342 86 0 173 0 259 0 0 13 0 26 0 38-70 0-142 0-212 0 0 36 0 73 0 109 66 0 132 0 198 0 0 13 0 25 0 38-66 0-132 0-198 0 0 40 0 79 0 119 74 0 148 0 222 0 0 12 0 25 0 38-89 0-180 0-269 0z">
            <text:p/>
          </draw:path>
          <draw:path draw:style-name="gr582" draw:text-style-name="P174" draw:layer="layout" svg:width="0.123cm" svg:height="0.266cm" svg:x="-23.696cm" svg:y="90.683cm" svg:viewBox="0 0 124 267" svg:d="M2 267v-201c0-19-1-39-2-61h41c2 30 2 48 2 54h1c7-23 15-39 24-47 9-7 22-12 39-12 5 0 11 1 17 2v41c-5-2-14-3-23-3-18 0-32 8-42 23-9 16-14 38-14 68v136z">
            <text:p/>
          </draw:path>
          <draw:path draw:style-name="gr582" draw:text-style-name="P174" draw:layer="layout" svg:width="0.123cm" svg:height="0.266cm" svg:x="-23.531cm" svg:y="90.683cm" svg:viewBox="0 0 124 267" svg:d="M2 267v-201c0-19-1-39-2-61h41c2 30 2 48 2 54h1c7-23 15-39 24-47 9-7 22-12 39-12 5 0 11 1 17 2v41c-5-2-14-3-23-3-18 0-32 8-42 23-9 16-14 38-14 68v136z">
            <text:p/>
          </draw:path>
          <draw:path draw:style-name="gr582" draw:text-style-name="P174" draw:layer="layout" svg:width="0.233cm" svg:height="0.271cm" svg:x="-23.377cm" svg:y="90.683cm" svg:viewBox="0 0 234 272" svg:d="M234 136c0 46-9 80-30 102-20 23-49 34-88 34-38 0-67-12-87-35-19-24-29-57-29-101 0-91 39-136 118-136 40 0 69 11 88 33s28 56 28 103zM189 136c0-36-6-62-16-79-11-16-30-25-54-25-26 0-45 9-56 25-11 17-17 43-17 79 0 35 5 60 16 77 12 18 30 27 54 27 26 0 45-9 56-26 11-16 17-43 17-78z">
            <text:p/>
          </draw:path>
          <draw:path draw:style-name="gr582" draw:text-style-name="P174" draw:layer="layout" svg:width="0.123cm" svg:height="0.266cm" svg:x="-23.09cm" svg:y="90.683cm" svg:viewBox="0 0 124 267" svg:d="M2 267v-201c0-19-1-39-2-61h41c2 30 2 48 2 54h1c7-23 15-39 24-47 9-7 22-12 39-12 5 0 11 1 17 2v41c-5-2-14-3-23-3-18 0-32 8-42 23-9 16-14 38-14 68v136z">
            <text:p/>
          </draw:path>
        </draw:g>
        <draw:g draw:style-name="gr23">
          <draw:path draw:style-name="gr583" draw:text-style-name="P175" draw:layer="layout" svg:width="0.269cm" svg:height="0.303cm" svg:x="-24.036cm" svg:y="91.853cm" svg:viewBox="0 0 270 304" svg:d="M51 162c-1 6-2 17-3 31 0 24 6 42 18 55s31 19 55 19c17 0 33-4 48-13 14-8 25-20 33-35l37 17c-13 24-30 41-50 52s-45 16-74 16c-36 0-65-10-85-30s-30-49-30-85 6-69 19-98 31-51 55-67c23-16 49-24 78-24 37 0 66 9 87 28 21 18 31 45 31 79 0 19-2 37-7 55zM220 125l1-20c0-22-6-39-17-51-12-12-29-18-51-18-24 0-44 8-61 23-16 16-28 37-35 66z">
            <text:p/>
          </draw:path>
          <draw:path draw:style-name="gr583" draw:text-style-name="P175" draw:layer="layout" svg:width="0.205cm" svg:height="0.517cm" svg:x="-23.721cm" svg:y="91.749cm" svg:viewBox="0 0 206 518" svg:d="M206 0c-105 92-157 203-157 332 0 70 19 132 56 186h-47c-39-54-58-117-58-191 0-67 14-128 41-184 27-55 66-103 118-143z">
            <text:p/>
          </draw:path>
          <draw:path draw:style-name="gr583" draw:text-style-name="P175" draw:layer="layout" svg:width="0.148cm" svg:height="0.364cm" svg:x="-23.537cm" svg:y="91.793cm" svg:viewBox="0 0 149 365" svg:d="M49 365c-15-1-27-5-36-14-9-10-13-22-13-37 0-10 1-22 4-35l34-178h-34l7-35h35l28-66h33l-13 66h55l-8 35h-54l-34 175c-2 11-3 20-3 26 0 16 8 24 24 24 8 0 17-2 28-4l-6 36c-18 4-33 6-47 7z">
            <text:p/>
          </draw:path>
          <draw:path draw:style-name="gr583" draw:text-style-name="P175" draw:layer="layout" svg:width="0.205cm" svg:height="0.517cm" svg:x="-23.462cm" svg:y="91.749cm" svg:viewBox="0 0 206 518" svg:d="M0 518c105-92 157-203 157-332 0-70-19-132-56-186h47c39 54 58 117 58 191 0 67-14 128-41 184-27 55-66 103-118 143z">
            <text:p/>
          </draw:path>
        </draw:g>
        <draw:path draw:style-name="gr576" draw:text-style-name="P5" draw:layer="layout" svg:width="1.904cm" svg:height="0cm" svg:x="-24.161cm" svg:y="92.706cm" svg:viewBox="0 0 1905 0" svg:d="M0 0c635 0 1270 0 1905 0">
          <text:p/>
        </draw:path>
        <draw:path draw:style-name="gr577" draw:text-style-name="P176" draw:layer="layout" svg:width="0.317cm" svg:height="0.316cm" svg:x="-22.521cm" svg:y="92.547cm" svg:viewBox="0 0 318 317" svg:d="M0 0c106 53 212 106 318 159-106 53-212 105-318 158 0-106 0-211 0-317z">
          <text:p/>
        </draw:path>
        <draw:path draw:style-name="gr577" draw:text-style-name="P176" draw:layer="layout" svg:width="0.317cm" svg:height="0.316cm" svg:x="-22.521cm" svg:y="92.547cm" svg:viewBox="0 0 318 317" svg:d="M0 0c106 53 212 106 318 159-106 53-212 105-318 158 0-106 0-211 0-317z">
          <text:p/>
        </draw:path>
        <draw:path draw:style-name="gr584" draw:text-style-name="P178" draw:layer="layout" svg:width="4.629cm" svg:height="1.772cm" svg:x="-22.15cm" svg:y="91.595cm" svg:viewBox="0 0 4630 1773" svg:d="M0 0c1543 0 3087 0 4630 0 0 591 0 1182 0 1773-1543 0-3087 0-4630 0 0-591 0-1182 0-1773z">
          <text:p/>
        </draw:path>
        <draw:path draw:style-name="gr585" draw:text-style-name="P179" draw:layer="layout" svg:width="4.629cm" svg:height="1.772cm" svg:x="-22.15cm" svg:y="91.595cm" svg:viewBox="0 0 4630 1773" svg:d="M0 0c1543 0 3087 0 4630 0 0 591 0 1182 0 1773-1543 0-3087 0-4630 0 0-591 0-1182 0-1773z">
          <text:p/>
        </draw:path>
        <draw:g draw:style-name="gr23">
          <draw:path draw:style-name="gr586" draw:text-style-name="P180" draw:layer="layout" svg:width="0.455cm" svg:height="0.51cm" svg:x="-21.495cm" svg:y="92.265cm" svg:viewBox="0 0 456 511" svg:d="M242 54c-55 0-97 19-128 54-30 35-46 84-46 145s17 110 48 147c32 37 75 55 129 55 69 0 122-34 157-103l54 27c-20 43-49 76-86 98-36 23-79 34-128 34-50 0-93-11-130-32-36-20-64-50-84-89-18-38-28-84-28-137 0-79 21-141 64-186s102-67 177-67c53 0 97 11 132 31 36 21 62 52 79 92l-64 21c-12-29-30-51-55-66-26-16-56-24-91-24z">
            <text:p/>
          </draw:path>
          <draw:path draw:style-name="gr586" draw:text-style-name="P180" draw:layer="layout" svg:width="0.339cm" svg:height="0.394cm" svg:x="-20.982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86" draw:text-style-name="P180" draw:layer="layout" svg:width="0.305cm" svg:height="0.387cm" svg:x="-20.563cm" svg:y="92.381cm" svg:viewBox="0 0 306 388" svg:d="M242 388v-241c0-25-2-45-7-59s-12-24-24-30c-11-6-26-9-47-9-31 0-54 10-73 32-17 20-26 49-26 86v221h-63v-300c0-44-1-71-2-81h60c0 1 0 5 0 10 0 4 1 10 1 17 1 7 1 19 1 38h2c14-26 31-45 50-55 19-11 44-17 72-17 42 0 72 11 91 31 20 21 29 56 29 103v254z">
            <text:p/>
          </draw:path>
          <draw:path draw:style-name="gr586" draw:text-style-name="P180" draw:layer="layout" svg:width="0.183cm" svg:height="0.471cm" svg:x="-20.2cm" svg:y="92.303cm" svg:viewBox="0 0 184 472" svg:d="M184 463c-21 6-42 9-64 9-51 0-76-30-76-87v-254h-44v-45h47l18-86h42v86h71v45h-71v240c0 19 3 32 10 39 6 7 15 11 31 11 8 0 20-1 36-5z">
            <text:p/>
          </draw:path>
          <draw:path draw:style-name="gr586" draw:text-style-name="P180" draw:layer="layout" svg:width="0.179cm" svg:height="0.387cm" svg:x="-19.962cm" svg:y="92.381cm" svg:viewBox="0 0 180 388" svg:d="M2 388v-293c0-26-1-55-2-88h60c1 44 2 69 2 78h2c10-32 22-55 35-67s31-18 56-18c8 0 16 1 25 4v57c-8-2-20-3-33-3-26 0-47 11-60 34-15 23-22 55-22 98v198z">
            <text:p/>
          </draw:path>
          <draw:path draw:style-name="gr586" draw:text-style-name="P180" draw:layer="layout" svg:width="0.339cm" svg:height="0.394cm" svg:x="-19.74cm" svg:y="92.381cm" svg:viewBox="0 0 340 395" svg:d="M340 197c0 67-14 116-43 149-30 32-72 49-129 49-55 0-97-17-125-51s-43-82-43-147c0-131 57-197 170-197 59 0 101 16 130 48 27 32 40 81 40 149zM274 197c0-52-9-91-24-114-16-25-42-36-78-36-38 0-64 12-81 37-16 24-25 62-25 113 0 50 9 88 25 113s42 38 77 38c38 0 65-13 81-37s25-62 25-114z">
            <text:p/>
          </draw:path>
          <draw:path draw:style-name="gr586" draw:text-style-name="P180" draw:layer="layout" svg:width="0.062cm" svg:height="0.522cm" svg:x="-19.321cm" svg:y="92.247cm" svg:viewBox="0 0 63 523" svg:d="M0 523c0-175 0-349 0-523 21 0 42 0 63 0 0 174 0 348 0 523-21 0-42 0-63 0z">
            <text:p/>
          </draw:path>
          <draw:path draw:style-name="gr586" draw:text-style-name="P180" draw:layer="layout" svg:width="0.062cm" svg:height="0.522cm" svg:x="-19.161cm" svg:y="92.247cm" svg:viewBox="0 0 63 523" svg:d="M0 523c0-175 0-349 0-523 21 0 42 0 63 0 0 174 0 348 0 523-21 0-42 0-63 0z">
            <text:p/>
          </draw:path>
          <draw:path draw:style-name="gr586" draw:text-style-name="P180" draw:layer="layout" svg:width="0.337cm" svg:height="0.394cm" svg:x="-19.019cm" svg:y="92.381cm" svg:viewBox="0 0 338 395" svg:d="M66 211c0 44 10 77 27 101 19 23 45 35 80 35 27 0 49-5 65-16 18-11 28-25 34-42l56 16c-23 60-74 90-155 90-56 0-99-17-129-51-29-33-44-82-44-149 0-63 15-111 44-144 30-34 72-51 126-51 112 0 168 67 168 202v9zM272 162c-3-39-13-69-30-87-16-19-41-28-73-28-31 0-55 10-73 31-18 20-27 48-29 84z">
            <text:p/>
          </draw:path>
          <draw:path draw:style-name="gr586" draw:text-style-name="P180" draw:layer="layout" svg:width="0.179cm" svg:height="0.387cm" svg:x="-18.601cm" svg:y="92.381cm" svg:viewBox="0 0 180 388" svg:d="M2 388v-293c0-26-1-55-2-88h60c1 44 2 69 2 78h2c10-32 22-55 35-67s31-18 56-18c8 0 16 1 25 4v57c-8-2-20-3-33-3-26 0-47 11-60 34-15 23-22 55-22 98v198z">
            <text:p/>
          </draw:path>
        </draw:g>
        <draw:g draw:style-name="gr23">
          <draw:path draw:style-name="gr587" draw:text-style-name="P174" draw:layer="layout" svg:width="0.281cm" svg:height="0.313cm" svg:x="-17.765cm" svg:y="90.219cm" svg:viewBox="0 0 282 314" svg:d="M149 34c-33 0-60 11-78 33-19 21-29 51-29 89 0 37 10 68 29 91 20 22 47 34 80 34 42 0 75-22 96-64l35 17c-13 26-31 46-54 60-22 14-49 20-79 20-31 0-58-6-80-18-23-13-39-31-52-55-11-24-17-52-17-85 0-49 13-87 40-114 26-28 62-42 108-42 33 0 60 6 82 19s38 31 48 57l-39 13c-7-18-18-32-34-41-16-10-34-14-56-14z">
            <text:p/>
          </draw:path>
          <draw:path draw:style-name="gr587" draw:text-style-name="P174" draw:layer="layout" svg:width="0.209cm" svg:height="0.242cm" svg:x="-17.449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87" draw:text-style-name="P174" draw:layer="layout" svg:width="0.188cm" svg:height="0.238cm" svg:x="-17.191cm" svg:y="90.291cm" svg:viewBox="0 0 189 239" svg:d="M149 239v-149c0-15-1-28-4-36s-8-14-15-18c-6-4-16-6-29-6-19 0-34 6-45 20-10 12-16 30-16 53v136h-39v-185c0-27 0-43-1-50h37c0 1 0 3 1 6 0 3 0 7 0 11 0 5 0 12 0 23h1c9-16 19-27 32-34 11-7 26-10 43-10 26 0 45 7 57 19 12 13 18 34 18 64v156z">
            <text:p/>
          </draw:path>
          <draw:path draw:style-name="gr587" draw:text-style-name="P174" draw:layer="layout" svg:width="0.113cm" svg:height="0.29cm" svg:x="-16.968cm" svg:y="90.242cm" svg:viewBox="0 0 114 291" svg:d="M114 286c-13 3-27 5-40 5-31 0-47-18-47-53v-157h-27v-29h29l11-52h26v52h44v29h-44v148c0 12 2 20 6 24 3 4 10 7 19 7 5 0 12-1 23-3z">
            <text:p/>
          </draw:path>
          <draw:path draw:style-name="gr587" draw:text-style-name="P174" draw:layer="layout" svg:width="0.11cm" svg:height="0.238cm" svg:x="-16.821cm" svg:y="90.291cm" svg:viewBox="0 0 111 239" svg:d="M1 239v-180c0-17 0-35-1-55h37c1 27 1 43 1 48h2c6-20 13-34 21-41s20-11 34-11c5 0 10 1 16 2v36c-5-2-12-2-21-2-16 0-28 7-37 20-9 15-13 35-13 61v122z">
            <text:p/>
          </draw:path>
          <draw:path draw:style-name="gr587" draw:text-style-name="P174" draw:layer="layout" svg:width="0.209cm" svg:height="0.242cm" svg:x="-16.684cm" svg:y="90.291cm" svg:viewBox="0 0 210 243" svg:d="M210 122c0 41-9 71-27 91s-45 30-79 30-60-11-78-31c-17-21-26-51-26-90 0-82 35-122 105-122 36 0 62 10 79 30 18 19 26 50 26 92zM169 122c0-33-5-56-14-71-11-15-27-22-49-22-23 0-39 7-50 22-10 16-15 38-15 71 0 31 5 53 15 69 10 15 26 23 47 23 24 0 41-7 51-23 10-14 15-38 15-69z">
            <text:p/>
          </draw:path>
          <draw:path draw:style-name="gr587" draw:text-style-name="P174" draw:layer="layout" svg:width="0.038cm" svg:height="0.321cm" svg:x="-16.426cm" svg:y="90.208cm" svg:viewBox="0 0 39 322" svg:d="M0 322c0-107 0-215 0-322 13 0 26 0 39 0 0 107 0 215 0 322-13 0-26 0-39 0z">
            <text:p/>
          </draw:path>
          <draw:path draw:style-name="gr587" draw:text-style-name="P174" draw:layer="layout" svg:width="0.038cm" svg:height="0.321cm" svg:x="-16.328cm" svg:y="90.208cm" svg:viewBox="0 0 39 322" svg:d="M0 322c0-107 0-215 0-322 13 0 26 0 39 0 0 107 0 215 0 322-13 0-26 0-39 0z">
            <text:p/>
          </draw:path>
          <draw:path draw:style-name="gr587" draw:text-style-name="P174" draw:layer="layout" svg:width="0.207cm" svg:height="0.242cm" svg:x="-16.24cm" svg:y="90.291cm" svg:viewBox="0 0 208 243" svg:d="M41 130c0 27 5 47 17 62 11 15 27 22 48 22 18 0 31-4 41-10 10-7 17-16 21-26l34 9c-14 37-46 56-96 56-34 0-60-10-78-31-19-21-28-51-28-92 0-39 9-68 28-89 18-21 43-31 77-31 69 0 103 42 103 124v6zM168 99c-2-24-8-42-19-53-10-12-25-17-45-17-19 0-33 6-45 19-11 12-17 30-17 51z">
            <text:p/>
          </draw:path>
          <draw:path draw:style-name="gr587" draw:text-style-name="P174" draw:layer="layout" svg:width="0.11cm" svg:height="0.238cm" svg:x="-15.983cm" svg:y="90.291cm" svg:viewBox="0 0 111 239" svg:d="M1 239v-180c0-17 0-35-1-55h37c1 27 1 43 1 48h2c6-20 13-34 21-41s20-11 34-11c5 0 10 1 16 2v36c-5-2-12-2-21-2-16 0-28 7-37 20-9 15-13 35-13 61v122z">
            <text:p/>
          </draw:path>
          <draw:path draw:style-name="gr588" draw:text-style-name="P174" draw:layer="layout" svg:width="0.302cm" svg:height="0.313cm" svg:x="-17.465cm" svg:y="90.842cm" svg:viewBox="0 0 303 314" svg:d="M303 156c0 32-6 60-18 84s-30 42-53 56c-22 12-49 18-81 18-31 0-58-6-81-18-22-13-40-31-52-55-12-25-18-53-18-85 0-49 13-87 40-114 27-28 64-42 112-42 31 0 58 6 80 19 23 12 41 30 53 54 12 23 18 51 18 83zM261 156c0-38-10-68-29-89-18-22-45-33-80-33s-62 10-81 32c-19 21-29 52-29 90s10 69 29 91c19 23 46 34 80 34 36 0 63-11 81-32 19-23 29-53 29-93z">
            <text:p/>
          </draw:path>
          <draw:path draw:style-name="gr588" draw:text-style-name="P174" draw:layer="layout" svg:width="0.188cm" svg:height="0.238cm" svg:x="-17.111cm" svg:y="90.917cm" svg:viewBox="0 0 189 239" svg:d="M39 0v149c0 16 2 28 5 36s8 15 14 19c7 3 17 5 29 5 19 0 34-6 45-20 11-12 16-30 16-53v-136h39v185c0 27 1 44 2 50h-37c0-1 0-3-1-6 0-3 0-7-1-11 0-4 0-12 0-23h-1c-9 16-19 27-31 34-11 7-26 10-43 10-27 0-45-7-57-19-12-13-18-34-18-63v-157z">
            <text:p/>
          </draw:path>
          <draw:path draw:style-name="gr588" draw:text-style-name="P174" draw:layer="layout" svg:width="0.113cm" svg:height="0.29cm" svg:x="-16.887cm" svg:y="90.864cm" svg:viewBox="0 0 114 291" svg:d="M114 286c-13 3-27 5-40 5-31 0-47-18-47-53v-157h-27v-29h29l11-52h26v52h44v29h-44v148c0 12 2 20 6 24 3 4 10 7 19 7 5 0 12-1 23-3z">
            <text:p/>
          </draw:path>
          <draw:path draw:style-name="gr588" draw:text-style-name="P174" draw:layer="layout" svg:width="0.199cm" svg:height="0.33cm" svg:x="-16.742cm" svg:y="90.913cm" svg:viewBox="0 0 200 331" svg:d="M200 120c0 82-29 123-86 123-37 0-61-13-74-41 0 2 0 14 0 37v92h-39v-279c0-24 0-40-1-48h38c0 1 0 3 0 6 1 4 1 9 2 17 0 7 0 12 0 15h1c7-14 16-25 28-32 11-7 26-10 45-10 28 0 50 9 64 29 15 19 22 50 22 91zM159 122c0-33-4-57-13-71-10-14-23-21-43-21-15 0-27 4-36 10s-15 16-20 31c-5 13-7 31-7 53 0 31 5 54 15 68 10 15 26 22 48 22 19 0 33-7 42-21 10-14 14-38 14-71z">
            <text:p/>
          </draw:path>
          <draw:path draw:style-name="gr588" draw:text-style-name="P174" draw:layer="layout" svg:width="0.188cm" svg:height="0.238cm" svg:x="-16.495cm" svg:y="90.917cm" svg:viewBox="0 0 189 239" svg:d="M39 0v149c0 16 2 28 5 36s8 15 14 19c7 3 17 5 29 5 19 0 34-6 45-20 11-12 16-30 16-53v-136h39v185c0 27 1 44 2 50h-37c0-1 0-3-1-6 0-3 0-7-1-11 0-4 0-12 0-23h-1c-9 16-19 27-31 34-11 7-26 10-43 10-27 0-45-7-57-19-12-13-18-34-18-63v-157z">
            <text:p/>
          </draw:path>
          <draw:path draw:style-name="gr588" draw:text-style-name="P174" draw:layer="layout" svg:width="0.113cm" svg:height="0.29cm" svg:x="-16.27cm" svg:y="90.864cm" svg:viewBox="0 0 114 291" svg:d="M114 286c-13 3-27 5-40 5-31 0-47-18-47-53v-157h-27v-29h29l11-52h26v52h44v29h-44v148c0 12 2 20 6 24 3 4 10 7 19 7 5 0 12-1 23-3z">
            <text:p/>
          </draw:path>
        </draw:g>
        <draw:path draw:style-name="gr583" draw:text-style-name="P175" draw:layer="layout" svg:width="0.274cm" svg:height="0.298cm" svg:x="-17.206cm" svg:y="91.859cm" svg:viewBox="0 0 275 299" svg:d="M89 0l-34 175c-3 16-5 29-5 41 0 30 16 45 49 45 23 0 43-9 60-26 17-18 29-41 35-71l32-164h49l-45 231c-4 17-7 38-11 62h-46c0-2 1-9 3-21s3-21 5-29h-1c-15 21-30 35-45 43-16 8-34 12-54 13-27-1-47-7-61-20-13-13-20-33-20-57 0-12 2-27 6-45l34-177z">
          <text:p/>
        </draw:path>
        <draw:path draw:style-name="gr583" draw:text-style-name="P175" draw:layer="layout" svg:width="0.205cm" svg:height="0.517cm" svg:x="-16.895cm" svg:y="91.749cm" svg:viewBox="0 0 206 518" svg:d="M206 0c-105 92-157 203-157 332 0 70 19 132 56 186h-47c-39-54-58-117-58-191 0-67 14-128 41-184 27-55 66-103 118-143z">
          <text:p/>
        </draw:path>
        <draw:path draw:style-name="gr583" draw:text-style-name="P175" draw:layer="layout" svg:width="0.148cm" svg:height="0.364cm" svg:x="-16.711cm" svg:y="91.793cm" svg:viewBox="0 0 149 365" svg:d="M49 365c-15-1-27-5-36-14-9-10-13-22-13-37 0-10 1-22 4-35l34-178h-34l7-35h35l28-66h33l-13 66h55l-8 35h-54l-34 175c-2 11-3 20-3 26 0 16 8 24 24 24 8 0 17-2 28-4l-6 36c-18 4-33 6-47 7z">
          <text:p/>
        </draw:path>
        <draw:path draw:style-name="gr583" draw:text-style-name="P175" draw:layer="layout" svg:width="0.205cm" svg:height="0.517cm" svg:x="-16.636cm" svg:y="91.749cm" svg:viewBox="0 0 206 518" svg:d="M0 518c105-92 157-203 157-332 0-70-19-132-56-186h47c39 54 58 117 58 191 0 67-14 128-41 184-27 55-66 103-118 143z">
          <text:p/>
        </draw:path>
        <draw:path draw:style-name="gr576" draw:text-style-name="P5" draw:layer="layout" svg:width="1.692cm" svg:height="0cm" svg:x="-17.52cm" svg:y="92.706cm" svg:viewBox="0 0 1693 0" svg:d="M0 0c564 0 1129 0 1693 0">
          <text:p/>
        </draw:path>
        <draw:path draw:style-name="gr577" draw:text-style-name="P176" draw:layer="layout" svg:width="0.317cm" svg:height="0.316cm" svg:x="-16.092cm" svg:y="92.547cm" svg:viewBox="0 0 318 317" svg:d="M0 0c106 53 212 106 318 159-106 53-212 105-318 158 0-106 0-211 0-317z">
          <text:p/>
        </draw:path>
        <draw:path draw:style-name="gr577" draw:text-style-name="P176" draw:layer="layout" svg:width="0.317cm" svg:height="0.316cm" svg:x="-16.092cm" svg:y="92.547cm" svg:viewBox="0 0 318 317" svg:d="M0 0c106 53 212 106 318 159-106 53-212 105-318 158 0-106 0-211 0-317z">
          <text:p/>
        </draw:path>
        <draw:path draw:style-name="gr577" draw:text-style-name="P176" draw:layer="layout" svg:width="0.317cm" svg:height="0.316cm" svg:x="-16.092cm" svg:y="92.547cm" svg:viewBox="0 0 318 317" svg:d="M0 0c106 53 212 106 318 159-106 53-212 105-318 158 0-106 0-211 0-317z">
          <text:p/>
        </draw:path>
        <draw:path draw:style-name="gr589" draw:text-style-name="P181" draw:layer="layout" svg:width="4.1cm" svg:height="1.772cm" svg:x="-15.721cm" svg:y="91.595cm" svg:viewBox="0 0 4101 1773" svg:d="M0 0c1367 0 2734 0 4101 0 0 591 0 1182 0 1773-1367 0-2734 0-4101 0 0-591 0-1182 0-1773z">
          <text:p/>
        </draw:path>
        <draw:path draw:style-name="gr590" draw:text-style-name="P182" draw:layer="layout" svg:width="4.1cm" svg:height="1.772cm" svg:x="-15.721cm" svg:y="91.595cm" svg:viewBox="0 0 4101 1773" svg:d="M0 0c1367 0 2734 0 4101 0 0 591 0 1182 0 1773-1367 0-2734 0-4101 0 0-591 0-1182 0-1773z">
          <text:p/>
        </draw:path>
        <draw:g draw:style-name="gr23">
          <draw:path draw:style-name="gr591" draw:text-style-name="P180" draw:layer="layout" svg:width="0.43cm" svg:height="0.447cm" svg:x="-14.995cm" svg:y="92.224cm" svg:viewBox="0 0 431 448" svg:d="M370 448l-51-131h-205l-51 131h-63l183-448h69l179 448zM216 46l-3 8c-5 18-13 41-23 68l-57 148h167l-58-148c-5-15-11-32-17-50z">
            <text:p/>
          </draw:path>
          <draw:path draw:style-name="gr591" draw:text-style-name="P180" draw:layer="layout" svg:width="0.279cm" svg:height="0.356cm" svg:x="-14.534cm" svg:y="92.321cm" svg:viewBox="0 0 280 357" svg:d="M60 177c0 45 7 79 22 101 14 22 36 34 65 34 20 0 37-6 51-17 13-11 22-28 25-51l57 4c-4 33-18 59-42 79s-54 30-90 30c-48 0-85-15-110-46-26-30-38-75-38-133s12-102 38-132c25-31 62-46 110-46 35 0 64 9 87 27 23 19 38 43 43 76l-58 4c-3-19-11-34-22-46-13-11-30-16-52-16-30 0-52 10-66 30-13 20-20 54-20 102z">
            <text:p/>
          </draw:path>
          <draw:path draw:style-name="gr591" draw:text-style-name="P180" draw:layer="layout" svg:width="0.165cm" svg:height="0.425cm" svg:x="-14.227cm" svg:y="92.251cm" svg:viewBox="0 0 166 426" svg:d="M166 418c-18 5-38 8-58 8-46 0-68-26-68-78v-229h-40v-42h42l17-77h38v77h64v42h-64v216c0 17 2 29 8 36 6 6 14 9 28 9 8 0 19-1 33-4z">
            <text:p/>
          </draw:path>
          <draw:path draw:style-name="gr591" draw:text-style-name="P180" draw:layer="layout" svg:width="0.276cm" svg:height="0.349cm" svg:x="-14.014cm" svg:y="92.328cm" svg:viewBox="0 0 277 350" svg:d="M57 0v218c0 23 3 40 7 52 4 14 12 22 21 28 10 6 25 8 43 8 28 0 49-9 65-29 16-18 24-44 24-78v-199h58v270c0 41 0 65 2 74h-55c0-1 0-4 0-9-1-4-1-9-1-15-1-7-1-18-1-35h-1c-14 24-28 41-46 50-17 10-39 15-64 15-38 0-65-9-83-28-17-18-26-50-26-93v-229z">
            <text:p/>
          </draw:path>
          <draw:path draw:style-name="gr591" draw:text-style-name="P180" draw:layer="layout" svg:width="0.334cm" svg:height="0.356cm" svg:x="-13.666cm" svg:y="92.321cm" svg:viewBox="0 0 335 357" svg:d="M104 357c-35 0-61-9-78-28-17-18-26-43-26-75 0-35 11-63 35-82s62-29 113-31h78v-19c0-28-6-48-18-61-12-12-31-17-56-17-26 0-44 4-56 12-12 9-19 23-21 42l-60-5c10-62 56-93 138-93 44 0 76 10 97 30 22 19 34 48 34 86v147c0 17 1 30 6 39 4 8 13 12 25 12 6 0 13-1 20-1v35c-15 3-30 5-45 5-21 0-36-5-46-17-10-11-15-28-17-51h-1c-15 26-32 44-51 55-20 11-43 17-71 17zM117 313c21 0 39-4 56-14 16-9 29-22 39-39 9-17 14-33 14-51v-28l-63 1c-27 0-47 3-61 8s-25 13-32 23c-8 11-11 25-11 43s5 32 15 43c10 9 24 14 43 14z">
            <text:p/>
          </draw:path>
          <draw:path draw:style-name="gr591" draw:text-style-name="P180" draw:layer="layout" svg:width="0.165cm" svg:height="0.425cm" svg:x="-13.322cm" svg:y="92.251cm" svg:viewBox="0 0 166 426" svg:d="M166 418c-18 5-38 8-58 8-46 0-68-26-68-78v-229h-40v-42h42l17-77h38v77h64v42h-64v216c0 17 2 29 8 36 6 6 14 9 28 9 8 0 19-1 33-4z">
            <text:p/>
          </draw:path>
          <draw:path draw:style-name="gr591" draw:text-style-name="P180" draw:layer="layout" svg:width="0.306cm" svg:height="0.356cm" svg:x="-13.125cm" svg:y="92.321cm" svg:viewBox="0 0 307 357" svg:d="M307 178c0 60-13 105-39 135-27 29-65 44-116 44-50 0-88-15-113-46-26-31-39-75-39-133 0-118 52-178 154-178 52 0 91 14 116 43s37 74 37 135zM248 178c0-47-8-82-22-103-14-22-38-33-71-33-34 0-58 12-72 34-15 21-23 56-23 102 0 45 8 79 23 102 14 23 37 34 69 34 34 0 59-11 73-33 15-22 23-56 23-103z">
            <text:p/>
          </draw:path>
          <draw:path draw:style-name="gr591" draw:text-style-name="P180" draw:layer="layout" svg:width="0.161cm" svg:height="0.349cm" svg:x="-12.747cm" svg:y="92.321cm" svg:viewBox="0 0 162 350" svg:d="M2 350v-264c0-24-1-50-2-80h54c1 40 2 62 2 70h2c9-29 19-49 32-60 11-11 28-16 50-16 8 0 15 1 22 4v51c-7-1-17-2-29-2-24 0-43 9-55 30-13 21-19 50-19 88v179z">
            <text:p/>
          </draw:path>
        </draw:g>
        <draw:g draw:style-name="gr23">
          <draw:path draw:style-name="gr592" draw:text-style-name="P174" draw:layer="layout" svg:width="0.284cm" svg:height="0.349cm" svg:x="-11.73cm" svg:y="90.272cm" svg:viewBox="0 0 285 350" svg:d="M285 251c0 31-13 56-38 73-24 17-59 26-103 26-83 0-131-29-144-86l45-9c5 20 16 35 33 45 16 9 39 14 68 14 30 0 52-5 68-15 17-11 25-26 25-45 0-11-3-20-8-28-5-6-12-12-21-17-9-4-20-8-33-11s-27-6-43-10c-26-6-47-12-60-18-14-6-25-12-33-20-8-7-14-16-19-25-4-10-6-21-6-34 0-29 11-51 33-67 23-16 54-24 96-24 39 0 68 6 88 18 21 12 35 32 43 60l-45 8c-5-18-14-31-29-39-14-8-33-12-58-12-27 0-48 5-62 14s-21 22-21 40c0 10 2 19 8 25 6 7 14 13 24 18 11 5 31 11 62 17 11 3 21 6 32 8 10 2 20 5 30 9 9 3 18 7 27 12 8 4 14 10 20 17 7 7 12 15 15 24s6 20 6 32z">
            <text:p/>
          </draw:path>
          <draw:path draw:style-name="gr592" draw:text-style-name="P174" draw:layer="layout" svg:width="0.244cm" svg:height="0.363cm" svg:x="-11.422cm" svg:y="90.356cm" svg:viewBox="0 0 245 364" svg:d="M45 364c-12 0-22-1-30-3v-32c6 0 13 1 20 1 27 0 49-20 64-60l4-10-103-260h46l56 144c0 2 1 5 2 8s5 14 11 32 10 27 10 30l17-47 57-167h46l-101 261c-10 28-21 49-30 62-9 14-19 24-30 31-12 7-25 10-39 10z">
            <text:p/>
          </draw:path>
          <draw:path draw:style-name="gr592" draw:text-style-name="P174" draw:layer="layout" svg:width="0.214cm" svg:height="0.269cm" svg:x="-11.163cm" svg:y="90.352cm" svg:viewBox="0 0 215 270" svg:d="M215 193c0 25-9 44-27 57-19 14-45 20-78 20s-58-5-76-16c-18-10-29-27-34-50l38-8c4 15 12 25 23 32 11 6 28 10 49 10s38-4 48-11 15-17 15-31c0-9-3-18-10-24-8-7-19-12-35-17l-31-8c-25-6-42-13-53-19-10-5-19-13-25-22s-9-20-9-33c0-24 9-42 26-54 17-13 42-19 74-19 29 0 51 5 69 15 17 10 27 27 32 49l-39 5c-2-11-9-20-20-27-10-6-24-9-42-9-20 0-34 3-44 9-8 6-14 15-14 27 0 7 3 13 6 18 4 5 10 9 17 12 8 4 24 9 48 15 23 6 40 11 50 16 10 4 18 10 24 16 5 6 10 13 14 21 3 7 4 16 4 26z">
            <text:p/>
          </draw:path>
          <draw:path draw:style-name="gr592" draw:text-style-name="P174" draw:layer="layout" svg:width="0.125cm" svg:height="0.322cm" svg:x="-10.922cm" svg:y="90.298cm" svg:viewBox="0 0 126 323" svg:d="M126 317c-14 4-29 6-44 6-34 0-52-19-52-59v-174h-30v-32h32l13-58h28v58h49v32h-49v165c0 12 2 21 7 27 4 4 11 7 21 7 6 0 14-1 25-4z">
            <text:p/>
          </draw:path>
          <draw:path draw:style-name="gr592" draw:text-style-name="P174" draw:layer="layout" svg:width="0.231cm" svg:height="0.269cm" svg:x="-10.772cm" svg:y="90.352cm" svg:viewBox="0 0 232 270" svg:d="M46 144c0 30 6 53 18 70 12 16 31 24 54 24 19 0 34-4 46-12 11-7 18-17 23-28l38 10c-16 42-52 62-107 62-38 0-67-11-87-34-21-23-31-57-31-102 0-44 10-76 31-100 20-23 48-34 86-34 76 0 115 46 115 138v6zM187 111c-2-27-9-48-21-60-11-13-29-19-50-19s-38 7-50 21-19 34-20 58z">
            <text:p/>
          </draw:path>
          <draw:path draw:style-name="gr592" draw:text-style-name="P174" draw:layer="layout" svg:width="0.345cm" svg:height="0.265cm" svg:x="-10.485cm" svg:y="90.352cm" svg:viewBox="0 0 346 266" svg:d="M152 266v-166c0-25-3-42-10-52s-19-14-37-14c-19 0-33 6-44 21-11 14-16 34-16 59v152h-44v-205c0-31 0-49-1-57h41c0 2 0 3 1 7 0 4 0 8 0 13 1 4 1 13 1 25 10-18 20-31 32-38s27-11 45-11c20 0 35 4 47 12 12 7 19 20 23 37h1c9-17 20-30 33-37 13-8 29-12 46-12 27 0 46 7 58 22 12 14 18 37 18 70v174h-43v-166c0-25-3-42-10-52s-20-14-38-14c-19 0-33 6-44 21-11 14-16 34-16 59v152z">
            <text:p/>
          </draw:path>
          <draw:path draw:style-name="gr582" draw:text-style-name="P174" draw:layer="layout" svg:width="0.045cm" svg:height="0.339cm" svg:x="-11.43cm" svg:y="90.97cm" svg:viewBox="0 0 46 340" svg:d="M0 340c0-114 0-226 0-340 16 0 31 0 46 0 0 114 0 226 0 340-15 0-30 0-46 0z">
            <text:p/>
          </draw:path>
          <draw:path draw:style-name="gr582" draw:text-style-name="P174" draw:layer="layout" svg:width="0.209cm" svg:height="0.265cm" svg:x="-11.306cm" svg:y="91.044cm" svg:viewBox="0 0 210 266" svg:d="M166 266v-166c0-17-2-31-5-39-3-10-9-17-16-21-8-4-18-6-33-6-21 0-37 6-49 21-12 14-18 34-18 59v152h-44v-205c0-31 0-49-1-57h41c0 2 0 3 1 7 0 4 0 8 0 13 1 4 1 13 1 25 11-18 22-30 35-38 13-7 30-11 49-11 28 0 49 7 63 22 13 14 20 37 20 70v174z">
            <text:p/>
          </draw:path>
          <draw:path draw:style-name="gr582" draw:text-style-name="P174" draw:layer="layout" svg:width="0.221cm" svg:height="0.367cm" svg:x="-11.033cm" svg:y="91.044cm" svg:viewBox="0 0 222 368" svg:d="M222 134c0 91-32 136-96 136-40 0-67-15-81-45h-1c1 1 1 15 1 41v102h-44v-310c0-27 0-45-1-54h42c0 1 1 3 1 7 0 5 0 11 1 19 0 8 0 13 0 16h2c7-15 17-27 30-35 13-7 29-11 50-11 32 0 56 10 72 32s24 55 24 102zM176 135c0-36-4-63-14-78-10-16-25-23-47-23-17 0-31 3-40 10-10 8-17 19-23 34-5 15-7 36-7 60 0 35 5 60 16 76s29 24 53 24c22 0 38-8 47-24 11-15 15-42 15-79z">
            <text:p/>
          </draw:path>
          <draw:path draw:style-name="gr582" draw:text-style-name="P174" draw:layer="layout" svg:width="0.209cm" svg:height="0.265cm" svg:x="-10.758cm" svg:y="91.048cm" svg:viewBox="0 0 210 266" svg:d="M43 0v166c0 17 3 30 6 39 3 10 9 17 16 21s18 6 32 6c21 0 37-6 50-21 12-15 18-34 18-59v-152h43v205c0 31 1 50 2 56h-41c0-1 0-3-1-6 0-4 0-8-1-12 0-5 0-14 0-26h-1c-10 18-21 30-35 38-12 7-29 11-48 11-29 0-50-8-63-22s-20-37-20-70v-174z">
            <text:p/>
          </draw:path>
          <draw:path draw:style-name="gr582" draw:text-style-name="P174" draw:layer="layout" svg:width="0.125cm" svg:height="0.322cm" svg:x="-10.509cm" svg:y="90.99cm" svg:viewBox="0 0 126 323" svg:d="M126 317c-14 4-29 6-44 6-34 0-52-19-52-59v-174h-30v-32h32l13-58h28v58h49v32h-49v165c0 12 2 21 7 27 4 4 11 7 21 7 6 0 14-1 25-4z">
            <text:p/>
          </draw:path>
        </draw:g>
        <draw:path draw:style-name="gr593" draw:text-style-name="P175" draw:layer="layout" svg:width="0.274cm" svg:height="0.298cm" svg:x="-11.281cm" svg:y="91.859cm" svg:viewBox="0 0 275 299" svg:d="M89 0l-34 175c-3 16-5 29-5 41 0 30 16 45 49 45 23 0 43-9 60-26 17-18 29-41 35-71l32-164h49l-45 231c-4 17-7 38-11 62h-46c0-2 1-9 3-21s3-21 5-29h-1c-15 21-30 35-45 43-16 8-34 12-54 13-27-1-47-7-61-20-13-13-20-33-20-57 0-12 2-27 6-45l34-177z">
          <text:p/>
        </draw:path>
        <draw:path draw:style-name="gr594" draw:text-style-name="P183" draw:layer="layout" svg:width="0.188cm" svg:height="0.216cm" svg:x="-10.985cm" svg:y="91.981cm" svg:viewBox="0 0 189 217" svg:d="M175 152c0 21-8 37-24 48-16 12-39 17-70 17-22 0-40-3-53-11s-23-19-28-36l29-11c4 12 10 20 19 25s21 8 37 8c18 0 32-3 42-9 9-7 14-16 14-28 0-8-3-15-10-20s-20-11-42-18c-16-5-29-11-37-16s-15-11-19-18-7-15-7-24c0-19 8-34 23-44s36-15 63-15c46 0 72 17 77 50l-31 4c-3-10-8-17-16-22-8-4-19-7-32-7-16 0-28 3-37 8s-13 12-13 22c0 5 1 10 4 14 3 3 7 7 12 10s17 7 35 13c17 5 29 10 37 15 9 6 15 12 20 19 5 8 7 16 7 26z">
          <text:p/>
        </draw:path>
        <draw:path draw:style-name="gr595" draw:text-style-name="P175" draw:layer="layout" svg:width="0.205cm" svg:height="0.517cm" svg:x="-10.775cm" svg:y="91.749cm" svg:viewBox="0 0 206 518" svg:d="M206 0c-105 92-157 203-157 332 0 70 19 132 56 186h-47c-39-54-58-117-58-191 0-67 14-128 41-184 27-55 66-103 118-143z">
          <text:p/>
        </draw:path>
        <draw:path draw:style-name="gr595" draw:text-style-name="P175" draw:layer="layout" svg:width="0.148cm" svg:height="0.364cm" svg:x="-10.591cm" svg:y="91.793cm" svg:viewBox="0 0 149 365" svg:d="M49 365c-15-1-27-5-36-14-9-10-13-22-13-37 0-10 1-22 4-35l34-178h-34l7-35h35l28-66h33l-13 66h55l-8 35h-54l-34 175c-2 11-3 20-3 26 0 16 8 24 24 24 8 0 17-2 28-4l-6 36c-18 4-33 6-47 7z">
          <text:p/>
        </draw:path>
        <draw:path draw:style-name="gr595" draw:text-style-name="P175" draw:layer="layout" svg:width="0.205cm" svg:height="0.517cm" svg:x="-10.516cm" svg:y="91.749cm" svg:viewBox="0 0 206 518" svg:d="M0 518c105-92 157-203 157-332 0-70-19-132-56-186h47c39 54 58 117 58 191 0 67-14 128-41 184-27 55-66 103-118 143z">
          <text:p/>
        </draw:path>
        <draw:path draw:style-name="gr576" draw:text-style-name="P5" draw:layer="layout" svg:width="2.3cm" svg:height="0cm" svg:x="-11.621cm" svg:y="92.706cm" svg:viewBox="0 0 2301 0" svg:d="M0 0c767 0 1534 0 2301 0">
          <text:p/>
        </draw:path>
        <draw:path draw:style-name="gr577" draw:text-style-name="P176" draw:layer="layout" svg:width="0.316cm" svg:height="0.316cm" svg:x="-9.584cm" svg:y="92.547cm" svg:viewBox="0 0 317 317" svg:d="M0 0c106 53 211 106 317 159-106 53-211 105-317 158 0-106 0-211 0-317z">
          <text:p/>
        </draw:path>
        <draw:path draw:style-name="gr577" draw:text-style-name="P176" draw:layer="layout" svg:width="0.316cm" svg:height="0.316cm" svg:x="-9.584cm" svg:y="92.547cm" svg:viewBox="0 0 317 317" svg:d="M0 0c106 53 211 106 317 159-106 53-211 105-317 158 0-106 0-211 0-317z">
          <text:p/>
        </draw:path>
        <draw:path draw:style-name="gr577" draw:text-style-name="P176" draw:layer="layout" svg:width="0.316cm" svg:height="0.316cm" svg:x="-9.584cm" svg:y="92.547cm" svg:viewBox="0 0 317 317" svg:d="M0 0c106 53 211 106 317 159-106 53-211 105-317 158 0-106 0-211 0-317z">
          <text:p/>
        </draw:path>
        <draw:path draw:style-name="gr577" draw:text-style-name="P176" draw:layer="layout" svg:width="0.316cm" svg:height="0.316cm" svg:x="-9.584cm" svg:y="92.547cm" svg:viewBox="0 0 317 317" svg:d="M0 0c106 53 211 106 317 159-106 53-211 105-317 158 0-106 0-211 0-317z">
          <text:p/>
        </draw:path>
        <draw:g draw:style-name="gr23">
          <draw:path draw:style-name="gr596" draw:text-style-name="P174" draw:layer="layout" svg:width="0.335cm" svg:height="0.338cm" svg:x="-9.482cm" svg:y="88.478cm" svg:viewBox="0 0 336 339" svg:d="M336 166c0 35-9 66-24 92-16 26-38 46-67 60-28 14-62 21-99 21h-146v-339h128c66 0 118 14 154 43s54 70 54 123zM283 166c0-42-14-74-41-96-26-22-64-34-114-34h-75v266h87c28 0 54-6 75-16 21-11 39-27 50-48 12-20 18-44 18-72z">
            <text:p/>
          </draw:path>
          <draw:path draw:style-name="gr596" draw:text-style-name="P174" draw:layer="layout" svg:width="0.049cm" svg:height="0.357cm" svg:x="-9.082cm" svg:y="88.46cm" svg:viewBox="0 0 50 358" svg:d="M0 42c0-14 0-28 0-42 16 0 33 0 50 0 0 14 0 28 0 42-17 0-34 0-50 0zM0 358c0-88 0-174 0-261 16 0 33 0 50 0 0 87 0 173 0 261-17 0-34 0-50 0z">
            <text:p/>
          </draw:path>
          <draw:path draw:style-name="gr596" draw:text-style-name="P174" draw:layer="layout" svg:width="0.246cm" svg:height="0.269cm" svg:x="-8.978cm" svg:y="88.552cm" svg:viewBox="0 0 247 270" svg:d="M247 193c0 24-11 43-32 57-21 13-51 20-89 20s-66-6-87-17c-20-10-33-27-39-50l44-7c4 14 13 24 26 31 13 6 32 10 56 10 25 0 44-4 55-11 12-6 18-17 18-30 0-10-5-19-12-25-9-6-22-12-40-16l-36-8c-28-6-48-13-60-19s-22-13-29-22-10-20-10-33c0-24 9-42 29-54 20-13 48-19 85-19 33 0 59 5 79 15 19 10 31 27 37 49l-45 5c-3-12-10-21-22-27s-29-9-49-9c-22 0-39 3-50 9-10 6-16 15-16 27 0 7 3 13 7 18s11 9 20 12c8 4 26 8 54 14 27 6 46 11 57 17 12 4 21 9 28 15 6 6 11 14 16 21 3 8 5 16 5 27z">
            <text:p/>
          </draw:path>
          <draw:path draw:style-name="gr596" draw:text-style-name="P174" draw:layer="layout" svg:width="0.144cm" svg:height="0.322cm" svg:x="-8.703cm" svg:y="88.498cm" svg:viewBox="0 0 145 323" svg:d="M145 317c-17 3-34 6-51 6-39 0-60-20-60-59v-175h-34v-31h37l14-58h33v58h56v31h-56v165c0 13 3 22 8 27 4 4 12 7 24 7 6 0 16-1 29-3z">
            <text:p/>
          </draw:path>
          <draw:path draw:style-name="gr596" draw:text-style-name="P174" draw:layer="layout" svg:width="0.24cm" svg:height="0.264cm" svg:x="-8.518cm" svg:y="88.556cm" svg:viewBox="0 0 241 265" svg:d="M50 0v165c0 17 2 31 6 40 4 10 10 16 19 21 8 3 20 6 36 6 24 0 43-7 58-22 13-14 20-33 20-59v-151h50v205c0 30 1 49 2 56h-47c0-2 0-3-1-7 0-4 0-7-1-12 0-5 0-13-1-26h-1c-11 18-24 31-39 38s-34 11-56 11c-33 0-57-7-72-21-15-15-23-38-23-70v-174z">
            <text:p/>
          </draw:path>
          <draw:path draw:style-name="gr596" draw:text-style-name="P174" draw:layer="layout" svg:width="0.14cm" svg:height="0.264cm" svg:x="-8.202cm" svg:y="88.552cm" svg:viewBox="0 0 141 265" svg:d="M2 265v-199c0-19-1-39-2-62h47c2 30 2 48 2 54h2c7-22 17-38 27-46s25-12 44-12c6 0 12 1 19 2v40c-6-2-15-3-26-3-21 0-36 9-47 24s-17 38-17 67v135z">
            <text:p/>
          </draw:path>
          <draw:path draw:style-name="gr596" draw:text-style-name="P174" draw:layer="layout" svg:width="0.253cm" svg:height="0.361cm" svg:x="-8.015cm" svg:y="88.46cm" svg:viewBox="0 0 254 362" svg:d="M254 226c0 91-36 136-109 136-23 0-42-4-57-10-15-8-27-19-37-35 0 5 0 12-1 23-1 9-1 15-2 18h-48c1-9 2-27 2-55v-303h49v101c0 11 0 23 0 38 10-18 22-30 37-36 16-8 34-11 57-11 37 0 65 11 83 33s26 56 26 101zM202 227c0-36-5-62-16-78s-29-24-54-24c-28 0-49 8-62 25-12 17-19 44-19 79s6 60 19 76c13 17 33 25 61 25 26 0 44-8 55-25 11-15 16-41 16-78z">
            <text:p/>
          </draw:path>
          <draw:path draw:style-name="gr596" draw:text-style-name="P174" draw:layer="layout" svg:width="0.29cm" svg:height="0.269cm" svg:x="-7.713cm" svg:y="88.552cm" svg:viewBox="0 0 291 270" svg:d="M91 270c-31 0-53-7-69-21-14-14-22-32-22-57 0-27 10-47 31-62 20-14 53-22 98-23h67v-15c0-21-5-36-15-45-11-10-27-14-49-14s-39 3-49 10c-9 6-15 17-18 31l-51-4c7-47 48-70 120-70 36 0 65 7 84 22s29 37 29 66v112c0 12 1 22 6 29 3 6 11 9 22 9 4 0 9 0 16-1v27c-13 3-26 3-38 3-19 0-32-3-41-12-8-8-13-22-14-40h-2c-13 20-27 35-44 43s-37 12-61 12zM102 238c18 0 34-4 49-12 13-7 25-17 33-29 8-13 12-26 12-39v-22l-54 2c-24 0-41 2-54 6-12 3-20 9-27 18-7 8-10 18-10 31 0 14 5 25 13 33 9 7 22 12 38 12z">
            <text:p/>
          </draw:path>
          <draw:path draw:style-name="gr596" draw:text-style-name="P174" draw:layer="layout" svg:width="0.24cm" svg:height="0.264cm" svg:x="-7.385cm" svg:y="88.552cm" svg:viewBox="0 0 241 265" svg:d="M190 265v-165c0-17-2-31-5-40-4-9-10-16-19-21-8-3-20-5-38-5-24 0-42 6-56 21-14 14-21 34-21 59v151h-49v-205c0-30-1-48-2-56h47c0 2 0 3 1 7 0 4 0 8 0 13 1 4 1 12 1 25h1c12-18 25-30 40-38 14-7 33-11 56-11 32 0 56 7 72 22 15 14 23 37 23 70v173z">
            <text:p/>
          </draw:path>
          <draw:path draw:style-name="gr596" draw:text-style-name="P174" draw:layer="layout" svg:width="0.243cm" svg:height="0.269cm" svg:x="-7.084cm" svg:y="88.551cm" svg:viewBox="0 0 244 270" svg:d="M52 134c0 34 6 60 19 77 12 16 31 25 57 25 17 0 32-4 44-13 11-8 19-21 22-38l50 3c-4 25-16 44-37 60-20 15-47 22-79 22-41 0-73-12-95-35s-33-56-33-100 11-78 33-101c23-23 54-34 95-34 30 0 56 7 77 21 19 13 32 33 37 56l-51 4c-3-14-9-26-20-34-10-9-25-13-44-13-27 0-46 8-58 23-11 15-17 41-17 77z">
            <text:p/>
          </draw:path>
          <draw:path draw:style-name="gr596" draw:text-style-name="P174" draw:layer="layout" svg:width="0.264cm" svg:height="0.269cm" svg:x="-6.8cm" svg:y="88.552cm" svg:viewBox="0 0 265 270" svg:d="M52 144c0 30 7 53 22 69 13 16 35 24 61 24 23 0 40-4 53-11 12-8 21-17 26-29l44 11c-18 41-59 62-123 62-43 0-77-12-100-35s-35-57-35-102c0-43 12-76 35-99s56-34 99-34c88 0 131 46 131 138v6zM214 110c-2-27-10-47-24-59-13-13-32-19-57-19-24 0-43 7-58 21-13 14-21 33-22 57z">
            <text:p/>
          </draw:path>
        </draw:g>
        <draw:path draw:style-name="gr583" draw:text-style-name="P175" draw:layer="layout" svg:width="0.304cm" svg:height="0.408cm" svg:x="-7.925cm" svg:y="89.765cm" svg:viewBox="0 0 305 409" svg:d="M90 409c-28 0-50-9-66-26s-24-41-24-70c0-37 6-73 17-107 11-35 26-60 47-77 20-17 46-25 77-25 22 0 40 5 54 14s24 23 30 40h1l8-44 22-114h49l-66 342c-6 26-9 46-11 61h-46c0-9 2-24 5-43h-1c-13 17-27 29-42 37-14 8-33 12-54 12zM104 371c18 0 34-4 46-11 13-7 24-18 33-33s16-33 21-56c5-22 7-42 7-59 0-23-6-41-17-53-12-13-27-19-48-19-22 0-39 7-52 20s-23 34-31 64-12 57-12 80c0 22 4 39 13 50 8 11 22 17 40 17z">
          <text:p/>
        </draw:path>
        <draw:path draw:style-name="gr583" draw:text-style-name="P175" draw:layer="layout" svg:width="0.205cm" svg:height="0.517cm" svg:x="-7.61cm" svg:y="89.765cm" svg:viewBox="0 0 206 518" svg:d="M206 0c-105 92-157 203-157 332 0 70 19 132 56 186h-47c-39-54-58-117-58-191 0-67 14-128 41-184 27-55 66-103 118-143z">
          <text:p/>
        </draw:path>
        <draw:path draw:style-name="gr583" draw:text-style-name="P175" draw:layer="layout" svg:width="0.148cm" svg:height="0.364cm" svg:x="-7.426cm" svg:y="89.809cm" svg:viewBox="0 0 149 365" svg:d="M49 365c-15-1-27-5-36-14-9-10-13-22-13-37 0-10 1-22 4-35l34-178h-34l7-35h35l28-66h33l-13 66h55l-8 35h-54l-34 175c-2 11-3 20-3 26 0 16 8 24 24 24 8 0 17-2 28-4l-6 36c-18 4-33 6-47 7z">
          <text:p/>
        </draw:path>
        <draw:path draw:style-name="gr583" draw:text-style-name="P175" draw:layer="layout" svg:width="0.205cm" svg:height="0.517cm" svg:x="-7.351cm" svg:y="89.765cm" svg:viewBox="0 0 206 518" svg:d="M0 518c105-92 157-203 157-332 0-70-19-132-56-186h47c39 54 58 117 58 191 0 67-14 128-41 184-27 55-66 103-118 143z">
          <text:p/>
        </draw:path>
        <draw:path draw:style-name="gr597" draw:text-style-name="P5" draw:layer="layout" svg:width="2.3cm" svg:height="0cm" draw:transform="rotate (-1.5707963267949) translate (-8.0757565784782cm 89.0559062241644cm)" svg:viewBox="0 0 2301 0" svg:d="M0 0c767 0 1534 0 2301 0">
          <text:p/>
        </draw:path>
        <draw:path draw:style-name="gr598" draw:text-style-name="P184" draw:layer="layout" svg:width="0.317cm" svg:height="0.316cm" svg:x="-8.235cm" svg:y="91.093cm" svg:viewBox="0 0 318 317" svg:d="M318 0c-53 106-106 211-159 317-53-106-106-211-159-317 106 0 212 0 318 0z">
          <text:p/>
        </draw:path>
        <draw:path draw:style-name="gr599" draw:text-style-name="P185" draw:layer="layout" svg:width="4.497cm" svg:height="1.772cm" svg:x="-9.214cm" svg:y="91.595cm" svg:viewBox="0 0 4498 1773" svg:d="M0 0c1499 0 2999 0 4498 0 0 591 0 1182 0 1773-1499 0-2999 0-4498 0 0-591 0-1182 0-1773z">
          <text:p/>
        </draw:path>
        <draw:path draw:style-name="gr600" draw:text-style-name="P186" draw:layer="layout" svg:width="4.497cm" svg:height="1.772cm" svg:x="-9.214cm" svg:y="91.595cm" svg:viewBox="0 0 4498 1773" svg:d="M0 0c1499 0 2999 0 4498 0 0 591 0 1182 0 1773-1499 0-2999 0-4498 0 0-591 0-1182 0-1773z">
          <text:p/>
        </draw:path>
        <draw:path draw:style-name="gr601" draw:text-style-name="P175" draw:layer="layout" svg:width="0.336cm" svg:height="0.408cm" svg:x="-4.509cm" svg:y="91.858cm" svg:viewBox="0 0 337 409" svg:d="M36 409c-13 0-25-1-36-4l8-36c9 1 16 2 21 2 18 0 33-6 46-17 13-12 26-29 38-51l8-13-59-290h50l30 162c3 15 5 30 8 47 2 16 3 27 3 31 2-4 5-8 7-14 3-6 44-81 123-226h54l-169 294c-21 35-37 59-49 73s-25 25-38 32c-14 7-28 10-45 10z">
          <text:p/>
        </draw:path>
        <draw:path draw:style-name="gr601" draw:text-style-name="P175" draw:layer="layout" svg:width="0.205cm" svg:height="0.517cm" svg:x="-4.175cm" svg:y="91.749cm" svg:viewBox="0 0 206 518" svg:d="M206 0c-105 92-157 203-157 332 0 70 19 132 56 186h-47c-39-54-58-117-58-191 0-67 14-128 41-184 27-55 66-103 118-143z">
          <text:p/>
        </draw:path>
        <draw:path draw:style-name="gr601" draw:text-style-name="P175" draw:layer="layout" svg:width="0.148cm" svg:height="0.364cm" svg:x="-3.991cm" svg:y="91.793cm" svg:viewBox="0 0 149 365" svg:d="M49 365c-15-1-27-5-36-14-9-10-13-22-13-37 0-10 1-22 4-35l34-178h-34l7-35h35l28-66h33l-13 66h55l-8 35h-54l-34 175c-2 11-3 20-3 26 0 16 8 24 24 24 8 0 17-2 28-4l-6 36c-18 4-33 6-47 7z">
          <text:p/>
        </draw:path>
        <draw:path draw:style-name="gr601" draw:text-style-name="P175" draw:layer="layout" svg:width="0.205cm" svg:height="0.517cm" svg:x="-3.916cm" svg:y="91.749cm" svg:viewBox="0 0 206 518" svg:d="M0 518c105-92 157-203 157-332 0-70-19-132-56-186h47c39 54 58 117 58 191 0 67-14 128-41 184-27 55-66 103-118 143z">
          <text:p/>
        </draw:path>
        <draw:path draw:style-name="gr576" draw:text-style-name="P5" draw:layer="layout" svg:width="3.095cm" svg:height="0cm" svg:x="-4.716cm" svg:y="92.706cm" svg:viewBox="0 0 3096 0" svg:d="M0 0c1032 0 2064 0 3096 0">
          <text:p/>
        </draw:path>
        <draw:path draw:style-name="gr577" draw:text-style-name="P176" draw:layer="layout" svg:width="0.317cm" svg:height="0.316cm" svg:x="-1.885cm" svg:y="92.547cm" svg:viewBox="0 0 318 317" svg:d="M0 0c106 53 212 106 318 159-106 53-212 105-318 158 0-106 0-211 0-317z">
          <text:p/>
        </draw:path>
        <draw:path draw:style-name="gr577" draw:text-style-name="P176" draw:layer="layout" svg:width="0.317cm" svg:height="0.316cm" svg:x="-1.885cm" svg:y="92.547cm" svg:viewBox="0 0 318 317" svg:d="M0 0c106 53 212 106 318 159-106 53-212 105-318 158 0-106 0-211 0-317z">
          <text:p/>
        </draw:path>
        <draw:path draw:style-name="gr577" draw:text-style-name="P176" draw:layer="layout" svg:width="0.317cm" svg:height="0.316cm" svg:x="-1.885cm" svg:y="92.547cm" svg:viewBox="0 0 318 317" svg:d="M0 0c106 53 212 106 318 159-106 53-212 105-318 158 0-106 0-211 0-317z">
          <text:p/>
        </draw:path>
        <draw:path draw:style-name="gr577" draw:text-style-name="P176" draw:layer="layout" svg:width="0.317cm" svg:height="0.316cm" svg:x="-1.885cm" svg:y="92.547cm" svg:viewBox="0 0 318 317" svg:d="M0 0c106 53 212 106 318 159-106 53-212 105-318 158 0-106 0-211 0-317z">
          <text:p/>
        </draw:path>
        <draw:path draw:style-name="gr577" draw:text-style-name="P176" draw:layer="layout" svg:width="0.317cm" svg:height="0.316cm" svg:x="-1.885cm" svg:y="92.547cm" svg:viewBox="0 0 318 317" svg:d="M0 0c106 53 212 106 318 159-106 53-212 105-318 158 0-106 0-211 0-317z">
          <text:p/>
        </draw:path>
        <draw:path draw:style-name="gr576" draw:text-style-name="P5" draw:layer="layout" svg:width="7.169cm" svg:height="2.406cm" svg:x="-10.272cm" svg:y="92.706cm" svg:viewBox="0 0 7170 2407" svg:d="M7170 0c0 802 0 1604 0 2407-2390 0-4780 0-7170 0">
          <text:p/>
        </draw:path>
        <draw:path draw:style-name="gr577" draw:text-style-name="P176" draw:layer="layout" svg:width="0.317cm" svg:height="0.317cm" svg:x="-10.325cm" svg:y="94.954cm" svg:viewBox="0 0 318 318" svg:d="M318 318c-106-53-212-106-318-159 106-53 212-106 318-159 0 106 0 212 0 318z">
          <text:p/>
        </draw:path>
        <draw:path draw:style-name="gr577" draw:text-style-name="P176" draw:layer="layout" svg:width="0.317cm" svg:height="0.317cm" svg:x="-10.325cm" svg:y="94.954cm" svg:viewBox="0 0 318 318" svg:d="M318 318c-106-53-212-106-318-159 106-53 212-106 318-159 0 106 0 212 0 318z">
          <text:p/>
        </draw:path>
        <draw:path draw:style-name="gr577" draw:text-style-name="P176" draw:layer="layout" svg:width="0.317cm" svg:height="0.317cm" svg:x="-10.325cm" svg:y="94.954cm" svg:viewBox="0 0 318 318" svg:d="M318 318c-106-53-212-106-318-159 106-53 212-106 318-159 0 106 0 212 0 318z">
          <text:p/>
        </draw:path>
        <draw:path draw:style-name="gr577" draw:text-style-name="P176" draw:layer="layout" svg:width="0.317cm" svg:height="0.317cm" svg:x="-10.325cm" svg:y="94.954cm" svg:viewBox="0 0 318 318" svg:d="M318 318c-106-53-212-106-318-159 106-53 212-106 318-159 0 106 0 212 0 318z">
          <text:p/>
        </draw:path>
        <draw:path draw:style-name="gr577" draw:text-style-name="P176" draw:layer="layout" svg:width="0.317cm" svg:height="0.317cm" svg:x="-10.325cm" svg:y="94.954cm" svg:viewBox="0 0 318 318" svg:d="M318 318c-106-53-212-106-318-159 106-53 212-106 318-159 0 106 0 212 0 318z">
          <text:p/>
        </draw:path>
        <draw:path draw:style-name="gr577" draw:text-style-name="P176" draw:layer="layout" svg:width="0.317cm" svg:height="0.317cm" svg:x="-10.325cm" svg:y="94.954cm" svg:viewBox="0 0 318 318" svg:d="M318 318c-106-53-212-106-318-159 106-53 212-106 318-159 0 106 0 212 0 318z">
          <text:p/>
        </draw:path>
        <draw:path draw:style-name="gr602" draw:text-style-name="P187" draw:layer="layout" svg:width="5.185cm" svg:height="1.533cm" svg:x="-15.536cm" svg:y="94.346cm" svg:viewBox="0 0 5186 1534" svg:d="M0 0c1729 0 3457 0 5186 0 0 511 0 1023 0 1534-1729 0-3457 0-5186 0 0-511 0-1023 0-1534z">
          <text:p/>
        </draw:path>
        <draw:path draw:style-name="gr603" draw:text-style-name="P188" draw:layer="layout" svg:width="5.185cm" svg:height="1.533cm" svg:x="-15.536cm" svg:y="94.346cm" svg:viewBox="0 0 5186 1534" svg:d="M0 0c1729 0 3457 0 5186 0 0 511 0 1023 0 1534-1729 0-3457 0-5186 0 0-511 0-1023 0-1534z">
          <text:p/>
        </draw:path>
        <draw:g draw:style-name="gr23">
          <draw:path draw:style-name="gr604" draw:text-style-name="P180" draw:layer="layout" svg:width="0.426cm" svg:height="0.524cm" svg:x="-14.189cm" svg:y="94.868cm" svg:viewBox="0 0 427 525" svg:d="M427 377c0 47-19 83-56 109-36 26-88 39-155 39-124 0-196-43-216-130l67-13c8 31 24 53 49 68 25 14 59 21 103 21s79-8 103-23 36-38 36-67c0-17-4-31-11-41-8-10-18-19-32-26-14-6-30-12-49-17-19-4-41-9-64-15-40-9-71-17-91-26-21-9-38-19-50-30s-21-24-28-39c-6-15-9-31-9-50 0-44 17-78 50-102 33-23 81-35 143-35 58 0 103 9 133 27 31 17 52 48 65 90l-68 12c-8-27-22-46-43-59-21-12-50-18-87-18-41 0-72 7-94 20-21 14-32 34-32 61 0 16 4 29 13 39 8 10 20 19 36 26 15 7 47 16 93 26 16 4 32 7 47 11 16 4 31 8 45 14 14 5 27 11 40 18 12 7 23 15 32 26 9 10 17 22 22 35 5 14 8 30 8 49z">
            <text:p/>
          </draw:path>
          <draw:path draw:style-name="gr604" draw:text-style-name="P180" draw:layer="layout" svg:width="0.347cm" svg:height="0.405cm" svg:x="-13.697cm" svg:y="94.987cm" svg:viewBox="0 0 348 406" svg:d="M68 217c0 45 10 79 28 104 19 24 46 36 82 36 28 0 50-5 67-17 18-11 29-25 35-43l57 17c-23 61-76 92-159 92-58 0-102-17-133-52-30-34-45-85-45-153 0-65 15-115 45-149 31-35 74-52 130-52 115 0 173 69 173 208v9zM280 167c-3-41-14-71-31-90s-42-29-75-29c-32 0-57 11-75 32-19 21-28 50-30 87z">
            <text:p/>
          </draw:path>
          <draw:path draw:style-name="gr604" draw:text-style-name="P180" draw:layer="layout" svg:width="0.314cm" svg:height="0.398cm" svg:x="-13.268cm" svg:y="94.987cm" svg:viewBox="0 0 315 399" svg:d="M249 399v-248c0-26-2-46-7-60-5-15-13-25-25-31-11-7-27-10-48-10-32 0-56 11-75 33-18 21-27 51-27 89v227h-65v-308c0-46-1-74-2-84h62c0 1 0 5 0 10s1 11 1 18c1 7 1 20 1 39h2c14-27 32-46 51-57 20-11 45-17 74-17 43 0 74 11 94 32s30 57 30 106v261z">
            <text:p/>
          </draw:path>
          <draw:path draw:style-name="gr604" draw:text-style-name="P180" draw:layer="layout" svg:width="0.322cm" svg:height="0.404cm" svg:x="-12.884cm" svg:y="94.988cm" svg:viewBox="0 0 323 405" svg:d="M323 290c0 37-14 65-42 85s-67 30-117 30c-48 0-86-8-112-24-27-16-44-41-52-75l58-11c5 21 17 36 34 46s41 15 72 15c33 0 57-5 73-16 15-10 23-25 23-45 0-16-6-28-16-38-11-10-28-17-52-24l-46-12c-38-10-64-19-80-28-16-10-28-21-37-34-9-14-13-30-13-49 0-36 12-63 38-82 25-19 62-28 111-28 43 0 77 8 103 23 25 15 41 39 48 73l-58 7c-4-17-14-30-30-40-15-9-36-14-63-14-29 0-51 5-65 14s-21 22-21 40c0 11 3 20 9 28 5 7 14 13 25 18 12 5 35 12 72 21 34 9 59 17 74 24 16 8 28 16 36 25 9 9 16 19 21 31 5 11 7 25 7 40z">
            <text:p/>
          </draw:path>
          <draw:path draw:style-name="gr604" draw:text-style-name="P180" draw:layer="layout" svg:width="0.349cm" svg:height="0.405cm" svg:x="-12.503cm" svg:y="94.987cm" svg:viewBox="0 0 350 406" svg:d="M350 203c0 68-15 119-45 153-30 33-74 50-132 50-57 0-100-17-129-52s-44-85-44-151c0-135 59-203 175-203 60 0 104 16 133 49 28 33 42 84 42 154zM282 203c0-54-9-94-25-118-16-25-43-37-80-37-39 0-66 13-83 38s-26 64-26 117c0 51 9 90 26 116 16 26 43 39 79 39 39 0 67-13 83-38 17-25 26-64 26-117z">
            <text:p/>
          </draw:path>
          <draw:path draw:style-name="gr604" draw:text-style-name="P180" draw:layer="layout" svg:width="0.184cm" svg:height="0.398cm" svg:x="-12.073cm" svg:y="94.987cm" svg:viewBox="0 0 185 399" svg:d="M2 399v-301c0-27-1-57-2-91h62c1 45 2 71 2 80h2c10-33 22-56 36-69 13-12 32-18 57-18 9 0 17 1 26 4v59c-8-2-20-3-34-3-27 0-48 11-62 35-15 23-22 56-22 100v204z">
            <text:p/>
          </draw:path>
        </draw:g>
        <draw:path draw:style-name="gr576" draw:text-style-name="P5" draw:layer="layout" svg:width="9.127cm" svg:height="1.904cm" svg:x="-24.664cm" svg:y="93.208cm" svg:viewBox="0 0 9128 1905" svg:d="M9128 1905c-3043 0-6085 0-9128 0 0-635 0-1270 0-1905">
          <text:p/>
        </draw:path>
        <draw:path draw:style-name="gr577" draw:text-style-name="P176" draw:layer="layout" svg:width="0.317cm" svg:height="0.317cm" svg:x="-24.823cm" svg:y="93.155cm" svg:viewBox="0 0 318 318" svg:d="M0 318c53-106 106-212 159-318 53 106 106 212 159 318-106 0-212 0-318 0z">
          <text:p/>
        </draw:path>
        <draw:path draw:style-name="gr577" draw:text-style-name="P176" draw:layer="layout" svg:width="0.317cm" svg:height="0.317cm" svg:x="-24.823cm" svg:y="93.155cm" svg:viewBox="0 0 318 318" svg:d="M0 318c53-106 106-212 159-318 53 106 106 212 159 318-106 0-212 0-318 0z">
          <text:p/>
        </draw:path>
        <draw:path draw:style-name="gr577" draw:text-style-name="P176" draw:layer="layout" svg:width="0.317cm" svg:height="0.317cm" svg:x="-24.823cm" svg:y="93.155cm" svg:viewBox="0 0 318 318" svg:d="M0 318c53-106 106-212 159-318 53 106 106 212 159 318-106 0-212 0-318 0z">
          <text:p/>
        </draw:path>
        <draw:path draw:style-name="gr577" draw:text-style-name="P176" draw:layer="layout" svg:width="0.317cm" svg:height="0.317cm" svg:x="-24.823cm" svg:y="93.155cm" svg:viewBox="0 0 318 318" svg:d="M0 318c53-106 106-212 159-318 53 106 106 212 159 318-106 0-212 0-318 0z">
          <text:p/>
        </draw:path>
        <draw:path draw:style-name="gr577" draw:text-style-name="P176" draw:layer="layout" svg:width="0.317cm" svg:height="0.317cm" svg:x="-24.823cm" svg:y="93.155cm" svg:viewBox="0 0 318 318" svg:d="M0 318c53-106 106-212 159-318 53 106 106 212 159 318-106 0-212 0-318 0z">
          <text:p/>
        </draw:path>
        <draw:path draw:style-name="gr577" draw:text-style-name="P176" draw:layer="layout" svg:width="0.317cm" svg:height="0.317cm" svg:x="-24.823cm" svg:y="93.155cm" svg:viewBox="0 0 318 318" svg:d="M0 318c53-106 106-212 159-318 53 106 106 212 159 318-106 0-212 0-318 0z">
          <text:p/>
        </draw:path>
        <draw:path draw:style-name="gr577" draw:text-style-name="P176" draw:layer="layout" svg:width="0.317cm" svg:height="0.317cm" svg:x="-24.823cm" svg:y="93.155cm" svg:viewBox="0 0 318 318" svg:d="M0 318c53-106 106-212 159-318 53 106 106 212 159 318-106 0-212 0-318 0z">
          <text:p/>
        </draw:path>
        <draw:g draw:style-name="gr23">
          <draw:path draw:style-name="gr605" draw:text-style-name="P174" draw:layer="layout" svg:width="0.311cm" svg:height="0.32cm" svg:x="-22.025cm" svg:y="94.596cm" svg:viewBox="0 0 312 321" svg:d="M273 321v-214c0-24 1-46 2-68-7 27-14 48-20 63l-83 219h-31l-84-219-12-38-8-25 1 25 1 43v214h-39v-321h57l86 223c3 9 5 19 8 28 3 11 5 18 6 23 1-6 4-15 8-27 4-13 6-21 7-24l84-223h56v321z">
            <text:p/>
          </draw:path>
          <draw:path draw:style-name="gr605" draw:text-style-name="P174" draw:layer="layout" svg:width="0.218cm" svg:height="0.255cm" svg:x="-21.655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605" draw:text-style-name="P174" draw:layer="layout" svg:width="0.239cm" svg:height="0.255cm" svg:x="-21.396cm" svg:y="94.666cm" svg:viewBox="0 0 240 256" svg:d="M75 256c-26 0-44-7-57-20-12-13-18-30-18-54 0-25 8-45 25-58 17-14 44-22 82-22l55-1v-13c0-21-4-35-13-43-8-10-22-14-40-14-19 0-32 4-40 10s-13 16-15 30l-43-5c7-44 40-66 99-66 31 0 54 7 70 21s23 35 23 62v106c0 12 2 22 5 28s10 9 19 9c3 0 8-1 13-1v25c-10 3-21 4-32 4-15 0-26-4-33-12s-11-21-12-38h-1c-11 19-23 33-37 40-13 8-30 12-50 12zM84 225c15 0 28-3 40-10s21-17 28-29c6-12 10-24 10-36v-21l-45 2c-20 0-34 2-44 5-10 4-17 10-23 17-5 8-8 18-8 30 0 13 4 24 11 31s18 11 31 11z">
            <text:p/>
          </draw:path>
          <draw:path draw:style-name="gr605" draw:text-style-name="P174" draw:layer="layout" svg:width="0.202cm" svg:height="0.255cm" svg:x="-21.143cm" svg:y="94.666cm" svg:viewBox="0 0 203 256" svg:d="M203 183c0 23-8 41-26 54-17 12-42 19-73 19s-55-5-72-16c-16-10-27-25-32-47l36-7c4 13 11 23 22 29s26 10 46 10 36-4 45-10c10-7 15-17 15-29 0-9-4-18-10-24-7-6-18-11-33-15l-29-8c-23-5-40-12-50-18-10-5-18-12-24-21-5-8-8-19-8-31 0-22 8-39 24-51s39-18 70-18c27 0 49 5 65 14 16 10 26 26 30 47l-37 4c-2-11-8-19-18-25s-23-9-40-9c-19 0-32 3-41 9-9 5-14 14-14 25 0 7 3 13 6 18 4 4 9 8 16 11s22 8 46 13c21 6 37 11 46 16 10 4 18 9 23 15 5 5 10 12 13 20 3 7 4 15 4 25z">
            <text:p/>
          </draw:path>
          <draw:path draw:style-name="gr605" draw:text-style-name="P174" draw:layer="layout" svg:width="0.197cm" svg:height="0.25cm" svg:x="-20.892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5" draw:text-style-name="P174" draw:layer="layout" svg:width="0.116cm" svg:height="0.25cm" svg:x="-20.632cm" svg:y="94.666cm" svg:viewBox="0 0 117 251" svg:d="M1 251v-189c0-17 0-37-1-58h39c1 28 1 45 1 51h2c6-21 14-36 22-44 9-7 21-11 36-11 5 0 11 1 17 2v38c-5-2-13-3-22-3-17 0-30 8-39 22-9 15-14 36-14 64v128z">
            <text:p/>
          </draw:path>
          <draw:path draw:style-name="gr605" draw:text-style-name="P174" draw:layer="layout" svg:width="0.218cm" svg:height="0.255cm" svg:x="-20.488cm" svg:y="94.666cm" svg:viewBox="0 0 219 256" svg:d="M43 136c0 29 6 50 18 66 11 16 29 23 51 23 18 0 32-4 43-11 10-7 17-16 22-27l36 10c-15 39-49 59-101 59-36 0-64-11-83-33s-29-54-29-97c0-41 10-72 29-94 19-21 46-32 81-32 73 0 109 44 109 131v5zM177 105c-3-26-9-45-20-57s-27-18-48-18c-19 0-35 7-47 20-11 14-17 32-18 55z">
            <text:p/>
          </draw:path>
          <draw:path draw:style-name="gr605" draw:text-style-name="P174" draw:layer="layout" svg:width="0.209cm" svg:height="0.342cm" svg:x="-20.229cm" svg:y="94.579cm" svg:viewBox="0 0 210 343" svg:d="M167 299c-7 16-17 27-30 34-12 7-28 10-47 10-31 0-53-10-68-31s-22-53-22-96c0-86 30-129 90-129 19 0 35 3 48 10 12 7 22 18 29 33h1l-1-28v-102h41v287c0 27 1 44 2 51h-39c-1-2-1-7-1-16-1-9-1-17-1-23zM43 215c0 34 4 59 14 74 9 15 24 23 44 23 23 0 40-8 51-25 10-16 15-41 15-75 0-33-5-57-15-72-11-15-28-23-50-23-21 0-36 8-45 24-9 14-14 39-14 74z">
            <text:p/>
          </draw:path>
          <draw:path draw:style-name="gr605" draw:text-style-name="P174" draw:layer="layout" svg:width="0.318cm" svg:height="0.33cm" svg:x="-19.837cm" svg:y="94.591cm" svg:viewBox="0 0 319 331" svg:d="M319 164c0 34-7 63-19 88-13 26-32 45-56 59-24 13-52 20-85 20s-62-7-86-20c-23-14-41-33-54-58-13-26-19-55-19-89 0-52 14-91 42-120 29-29 67-44 118-44 32 0 60 6 84 20 24 12 43 32 56 56 12 25 19 54 19 88zM274 164c0-40-10-71-30-94-19-23-48-35-84-35-37 0-65 12-86 34-20 23-29 55-29 95s9 73 30 96c20 24 48 35 84 35 37 0 66-11 85-34 20-23 30-55 30-97z">
            <text:p/>
          </draw:path>
          <draw:path draw:style-name="gr605" draw:text-style-name="P174" draw:layer="layout" svg:width="0.197cm" svg:height="0.25cm" svg:x="-19.466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5" draw:text-style-name="P174" draw:layer="layout" svg:width="0.118cm" svg:height="0.305cm" svg:x="-19.23cm" svg:y="94.615cm" svg:viewBox="0 0 119 306" svg:d="M119 300c-13 4-27 6-41 6-33 0-50-19-50-56v-165h-28v-30h30l12-55h27v55h46v30h-46v156c0 12 2 20 7 25 3 5 10 7 19 7 6 0 14-1 24-3z">
            <text:p/>
          </draw:path>
          <draw:path draw:style-name="gr605" draw:text-style-name="P174" draw:layer="layout" svg:width="0.209cm" svg:height="0.347cm" svg:x="-19.077cm" svg:y="94.666cm" svg:viewBox="0 0 210 348" svg:d="M210 126c0 87-31 130-91 130-38 0-63-14-77-43 0 1 0 14 0 38v97h-41v-293c0-25 0-42-1-51h40c0 1 0 3 0 7 1 4 1 9 2 17 0 8 0 13 0 16h1c7-15 17-26 29-33s28-11 47-11c31 0 53 10 68 30 16 21 23 53 23 96zM167 128c0-35-5-59-14-74-10-15-24-22-44-22-16 0-29 3-38 10-10 7-17 17-22 32-4 14-7 33-7 57 0 32 5 56 16 71 11 16 27 23 50 23 21 0 35-7 45-22 9-15 14-41 14-75z">
            <text:p/>
          </draw:path>
          <draw:path draw:style-name="gr605" draw:text-style-name="P174" draw:layer="layout" svg:width="0.197cm" svg:height="0.25cm" svg:x="-18.817cm" svg:y="94.67cm" svg:viewBox="0 0 198 251" svg:d="M41 0v157c0 16 2 29 5 37 3 9 8 16 15 20 8 4 17 6 31 6 20 0 35-7 47-21 11-13 17-32 17-56v-143h41v194c0 29 1 47 1 53h-38c0-1 0-3-1-6 0-4 0-7-1-11 0-5 0-13 0-25h-1c-9 17-20 29-33 36-12 7-27 10-46 10-27 0-47-7-59-20-13-13-19-35-19-66v-165z">
            <text:p/>
          </draw:path>
          <draw:path draw:style-name="gr605" draw:text-style-name="P174" draw:layer="layout" svg:width="0.118cm" svg:height="0.305cm" svg:x="-18.581cm" svg:y="94.615cm" svg:viewBox="0 0 119 306" svg:d="M119 300c-13 4-27 6-41 6-33 0-50-19-50-56v-165h-28v-30h30l12-55h27v55h46v30h-46v156c0 12 2 20 7 25 3 5 10 7 19 7 6 0 14-1 24-3z">
            <text:p/>
          </draw:path>
        </draw:g>
        <draw:path draw:style-name="gr606" draw:text-style-name="P175" draw:layer="layout" svg:width="0.336cm" svg:height="0.408cm" svg:x="-20.382cm" svg:y="95.508cm" svg:viewBox="0 0 337 409" svg:d="M36 409c-13 0-25-1-36-4l8-36c9 1 16 2 21 2 18 0 33-6 46-17 13-12 26-29 38-51l8-13-59-290h50l30 162c3 15 5 30 8 47 2 16 3 27 3 31 2-4 5-8 7-14 3-6 44-81 123-226h54l-169 294c-21 35-37 59-49 73s-25 25-38 32c-14 7-28 10-45 10z">
          <text:p/>
        </draw:path>
        <draw:path draw:style-name="gr607" draw:text-style-name="P183" draw:layer="layout" svg:width="0.305cm" svg:height="0.213cm" svg:x="-20.053cm" svg:y="95.63cm" svg:viewBox="0 0 306 214" svg:d="M121 214l24-123c4-16 5-28 5-34 0-10-2-17-7-22s-13-8-24-8c-15 0-28 6-39 19-12 13-19 30-22 51l-23 117h-35l32-165c3-13 5-28 8-45h33c0 1-1 6-2 15-2 8-3 15-4 21h1c9-15 19-25 28-31 10-6 21-9 34-9 16 0 28 4 37 12 10 7 15 18 17 33 11-17 21-28 32-35 10-7 22-10 35-10 18 0 31 5 41 14 9 10 14 23 14 41 0 8-2 19-4 32l-25 127h-34l24-123c3-16 4-28 4-34 0-10-2-17-7-22s-13-8-24-8c-15 0-28 6-39 19s-19 29-22 50l-23 118z">
          <text:p/>
        </draw:path>
        <draw:path draw:style-name="gr595" draw:text-style-name="P175" draw:layer="layout" svg:width="0.205cm" svg:height="0.517cm" svg:x="-19.717cm" svg:y="95.399cm" svg:viewBox="0 0 206 518" svg:d="M206 0c-105 92-157 203-157 332 0 70 19 132 56 186h-47c-39-54-58-117-58-191 0-67 14-128 41-184 27-55 66-103 118-143z">
          <text:p/>
        </draw:path>
        <draw:path draw:style-name="gr595" draw:text-style-name="P175" draw:layer="layout" svg:width="0.148cm" svg:height="0.364cm" svg:x="-19.533cm" svg:y="95.443cm" svg:viewBox="0 0 149 365" svg:d="M49 365c-15-1-27-5-36-14-9-10-13-22-13-37 0-10 1-22 4-35l34-178h-34l7-35h35l28-66h33l-13 66h55l-8 35h-54l-34 175c-2 11-3 20-3 26 0 16 8 24 24 24 8 0 17-2 28-4l-6 36c-18 4-33 6-47 7z">
          <text:p/>
        </draw:path>
        <draw:path draw:style-name="gr595" draw:text-style-name="P175" draw:layer="layout" svg:width="0.205cm" svg:height="0.517cm" svg:x="-19.458cm" svg:y="95.399cm" svg:viewBox="0 0 206 518" svg:d="M0 518c105-92 157-203 157-332 0-70-19-132-56-186h47c39 54 58 117 58 191 0 67-14 128-41 184-27 55-66 103-118 143z">
          <text:p/>
        </draw:path>
        <draw:frame draw:style-name="gr608" draw:text-style-name="P189" draw:layer="layout" svg:width="2.196cm" svg:height="0.962cm" svg:x="-8.062cm" svg:y="91.966cm">
          <draw:text-box>
            <text:p><text:span text:style-name="T59">Robot</text:span></text:p>
          </draw:text-box>
        </draw:frame>
        <draw:g draw:style-name="gr31">
          <draw:custom-shape draw:style-name="gr609" draw:text-style-name="P41" xml:id="id475" draw:id="id475" draw:layer="layout" svg:width="0.613cm" svg:height="1.825cm" draw:transform="rotate (-1.5707963267949) translate (-15.463cm 100.2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10" draw:text-style-name="P126" xml:id="id476" draw:id="id476" draw:layer="layout" svg:width="4.644cm" svg:height="2.896cm" svg:x="-17.653cm" svg:y="101.617cm">
            <draw:text-box>
              <text:p text:style-name="P30"><text:span text:style-name="T60">Replace with</text:span><text:span text:style-name="T60"><text:line-break/></text:span><text:span text:style-name="T60">discrepancy value</text:span><text:span text:style-name="T60"><text:line-break/></text:span><text:span text:style-name="T60">(Wasserstein)</text:span><text:span text:style-name="T60"><text:line-break/></text:span><text:span text:style-name="T60">or</text:span><text:span text:style-name="T60"><text:line-break/></text:span><text:span text:style-name="T60">pose</text:span></text:p>
            </draw:text-box>
          </draw:frame>
          <draw:custom-shape draw:style-name="gr611" draw:text-style-name="P41" xml:id="id477" draw:id="id477" draw:layer="layout" svg:width="0.613cm" svg:height="1.419cm" draw:transform="rotate (-1.5707963267949) translate (-13.55cm 100.2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onnector draw:style-name="gr612" draw:text-style-name="P15" draw:layer="layout" draw:type="curve" svg:x1="-16.375cm" svg:y1="100.902cm" svg:x2="-15.331cm" svg:y2="101.617cm" draw:start-shape="id475" draw:start-glue-point="6" draw:end-shape="id476" draw:end-glue-point="0" svg:d="M-16375 100902c0 537 1044 180 1044 715" svg:viewBox="0 0 1045 716">
            <text:p/>
          </draw:connector>
          <draw:connector draw:style-name="gr613" draw:text-style-name="P15" draw:layer="layout" draw:type="curve" svg:x1="-14.259cm" svg:y1="100.814cm" svg:x2="-15.331cm" svg:y2="101.617cm" draw:start-shape="id477" draw:start-glue-point="6" draw:end-shape="id476" draw:end-glue-point="0" svg:d="M-14259 100814c0 603-1072 202-1072 803" svg:viewBox="0 0 1073 804">
            <text:p/>
          </draw:connector>
          <draw:frame draw:style-name="gr614" draw:text-style-name="P38" draw:layer="layout" svg:width="4.869cm" svg:height="1.199cm" svg:x="-13.047cm" svg:y="100.641cm">
            <draw:text-box>
              <text:p>U<text:span text:style-name="T61">k is from the second derivative</text:span><text:span text:style-name="T61"><text:line-break/></text:span><text:span text:style-name="T61">(nu clustering is need for 2</text:span><text:span text:style-name="T62">nd</text:span><text:span text:style-name="T61"> derivative)</text:span></text:p>
            </draw:text-box>
          </draw:frame>
          <draw:frame draw:style-name="gr521" draw:text-style-name="P5" draw:layer="layout" svg:width="6.644cm" svg:height="1.142cm" svg:x="-18.551cm" svg:y="99.256cm">
            <draw:object xlink:href="./Object 5" xlink:type="simple" xlink:show="embed" xlink:actuate="onLoad">
              <loext:p/>
            </draw:object>
            <draw:image xlink:href="./ObjectReplacements/Object 5" xlink:type="simple" xlink:show="embed" xlink:actuate="onLoad"/>
          </draw:frame>
        </draw:g>
        <draw:rect draw:style-name="gr280" draw:text-style-name="P72" xml:id="id479" draw:id="id479" draw:layer="layout" svg:width="2.927cm" svg:height="1cm" svg:x="89.678cm" svg:y="57.757cm">
          <text:p text:style-name="P8"><text:span text:style-name="T27">remembering</text:span></text:p>
        </draw:rect>
        <draw:connector draw:style-name="gr293" draw:text-style-name="P15" draw:layer="layout" draw:type="curve" svg:x1="81.254cm" svg:y1="58.328cm" svg:x2="87.054cm" svg:y2="60.528cm" draw:start-shape="id252" draw:start-glue-point="2" draw:end-shape="id478" draw:end-glue-point="0" svg:d="M81254 58328c0 1650 5800 550 5800 2200" svg:viewBox="0 0 5801 2201">
          <text:p/>
        </draw:connector>
        <draw:connector draw:style-name="gr293" draw:text-style-name="P15" draw:layer="layout" draw:type="curve" svg:x1="86.058cm" svg:y1="54.174cm" svg:x2="91.141cm" svg:y2="57.757cm" draw:start-shape="id251" draw:start-glue-point="2" draw:end-shape="id479" draw:end-glue-point="0" svg:d="M86058 54174c0 2688 5083 897 5083 3583" svg:viewBox="0 0 5084 3584">
          <text:p/>
        </draw:connector>
        <draw:rect draw:style-name="gr41" draw:text-style-name="P5" xml:id="id480" draw:id="id480" draw:layer="layout" svg:width="2.47cm" svg:height="1.058cm" svg:x="89.113cm" svg:y="60.289cm">
          <text:p text:style-name="P5">By<text:line-break/>stimulus</text:p>
        </draw:rect>
        <draw:connector draw:style-name="gr293" draw:text-style-name="P15" draw:layer="layout" draw:type="curve" svg:x1="91.141cm" svg:y1="58.757cm" svg:x2="90.348cm" svg:y2="60.289cm" draw:start-shape="id479" draw:start-glue-point="2" draw:end-shape="id480" draw:end-glue-point="0" svg:d="M91141 58757c0 1149-793 383-793 1532" svg:viewBox="0 0 794 1533">
          <text:p/>
        </draw:connector>
        <draw:rect draw:style-name="gr41" draw:text-style-name="P5" xml:id="id481" draw:id="id481" draw:layer="layout" svg:width="2.47cm" svg:height="1.763cm" svg:x="92.113cm" svg:y="60.284cm">
          <text:p text:style-name="P5">Stimulus<text:line-break/>independent <text:line-break/>thought</text:p>
        </draw:rect>
        <draw:connector draw:style-name="gr293" draw:text-style-name="P15" draw:layer="layout" draw:type="curve" svg:x1="91.141cm" svg:y1="58.757cm" svg:x2="93.348cm" svg:y2="60.284cm" draw:start-shape="id479" draw:start-glue-point="2" draw:end-shape="id481" draw:end-glue-point="0" svg:d="M91141 58757c0 1146 2207 383 2207 1527" svg:viewBox="0 0 2208 1528">
          <text:p/>
        </draw:connector>
        <draw:rect draw:style-name="gr41" draw:text-style-name="P5" xml:id="id482" draw:id="id482" draw:layer="layout" svg:width="2.61cm" svg:height="1.235cm" svg:x="92.078cm" svg:y="63.246cm">
          <text:p text:style-name="P5">Mind<text:line-break/>wandering</text:p>
        </draw:rect>
        <draw:connector draw:style-name="gr293" draw:text-style-name="P15" draw:layer="layout" draw:type="curve" svg:x1="93.348cm" svg:y1="62.047cm" svg:x2="93.383cm" svg:y2="63.246cm" draw:start-shape="id481" draw:start-glue-point="2" draw:end-shape="id482" draw:end-glue-point="0" svg:d="M93348 62047c0 900 35 301 35 1199" svg:viewBox="0 0 36 1200">
          <text:p/>
        </draw:connector>
        <draw:connector draw:style-name="gr36" draw:text-style-name="P7" draw:layer="layout" draw:type="curve" svg:x1="-27.151cm" svg:y1="52.428cm" svg:x2="-25.649cm" svg:y2="51.138cm" draw:start-shape="id444" draw:start-glue-point="1" draw:end-shape="id483" draw:end-glue-point="3" svg:d="M-27151 52428c1128 0 377-1290 1502-1290" svg:viewBox="0 0 1503 1291">
          <text:p/>
        </draw:connector>
        <draw:custom-shape draw:name="comment box 1" draw:style-name="gr615" draw:text-style-name="P20" xml:id="id484" draw:id="id484" draw:layer="layout" svg:width="2.572cm" svg:height="1.94cm" svg:x="-45.017cm" svg:y="45.883cm">
          <text:p text:style-name="P19"><text:span text:style-name="T4">Train length</text:span><text:span text:style-name="T4"><text:line-break/></text:span><text:span text:style-name="T4">is taken as </text:span><text:span text:style-name="T4"><text:line-break/></text:span><text:span text:style-name="T4">the length </text:span><text:span text:style-name="T4"><text:line-break/></text:span><text:span text:style-name="T4">of the </text:span><text:span text:style-name="T4"><text:line-break/></text:span><text:span text:style-name="T4">transformer</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616" draw:text-style-name="P133" xml:id="id485" draw:id="id485" draw:layer="layout" svg:width="2.674cm" svg:height="0.97cm" svg:x="-33.526cm" svg:y="51.936cm">
          <text:p text:style-name="P25"><text:span text:style-name="T12">Superposition</text:span><text:span text:style-name="T12"><text:line-break/></text:span><text:span text:style-name="T12">of AP wav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6" draw:text-style-name="P133" xml:id="id486" draw:id="id486" draw:layer="layout" svg:width="2.674cm" svg:height="0.97cm" svg:x="-37.326cm" svg:y="51.936cm">
          <text:p text:style-name="P25"><text:span text:style-name="T12">Language</text:span><text:span text:style-name="T12"><text:line-break/></text:span><text:span text:style-name="T12">build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40.74cm" svg:y1="44.855cm" svg:x2="-42.445cm" svg:y2="46.853cm" draw:start-shape="id380" draw:start-glue-point="3" draw:end-shape="id484" draw:end-glue-point="7" svg:d="M-40740 44855c-1263 0-411 1998-1705 1998" svg:viewBox="0 0 1706 1999">
          <text:p/>
        </draw:connector>
        <draw:connector draw:style-name="gr36" draw:text-style-name="P7" draw:layer="layout" draw:type="curve" svg:x1="-30.852cm" svg:y1="52.421cm" svg:x2="-29.549cm" svg:y2="52.428cm" draw:start-shape="id485" draw:start-glue-point="10" draw:end-shape="id444" draw:end-glue-point="3" svg:d="M-30852 52421c979 0 328 7 1303 7" svg:viewBox="0 0 1304 8">
          <text:p/>
        </draw:connector>
        <draw:connector draw:style-name="gr36" draw:text-style-name="P7" draw:layer="layout" draw:type="curve" svg:x1="-34.652cm" svg:y1="52.421cm" svg:x2="-33.526cm" svg:y2="52.421cm" draw:start-shape="id486" draw:start-glue-point="10" draw:end-shape="id485" draw:end-glue-point="6" svg:d="M-34652 52421h1126" svg:viewBox="0 0 1127 1">
          <text:p/>
        </draw:connector>
        <draw:connector draw:style-name="gr36" draw:text-style-name="P7" draw:layer="layout" draw:type="curve" svg:x1="-38.234cm" svg:y1="52.389cm" svg:x2="-37.326cm" svg:y2="52.421cm" draw:start-shape="id487" draw:start-glue-point="10" draw:end-shape="id486" draw:end-glue-point="6" svg:d="M-38234 52389c682 0 229 32 908 32" svg:viewBox="0 0 909 33">
          <text:p/>
        </draw:connector>
        <draw:g draw:style-name="gr31">
          <draw:rect draw:style-name="gr617" draw:text-style-name="P190" draw:layer="layout" svg:width="19.38cm" svg:height="1.608cm" svg:x="-39.952cm" svg:y="59.066cm">
            <text:p/>
          </draw:rect>
          <draw:rect draw:style-name="gr618" draw:text-style-name="P191" draw:layer="layout" svg:width="18.349cm" svg:height="1.608cm" svg:x="-34.991cm" svg:y="59.066cm">
            <text:p/>
          </draw:rect>
          <draw:g draw:style-name="gr31">
            <draw:custom-shape draw:style-name="gr34" draw:text-style-name="P26" xml:id="id489" draw:id="id489" draw:layer="layout" svg:width="0.891cm" svg:height="0.97cm" svg:x="-34.648cm" svg:y="59.423cm">
              <text:p text:style-name="P25"><text:span text:style-name="T12">L</text:span><text:span text:style-name="T13">t</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88" draw:id="id488" draw:layer="layout" svg:width="0.891cm" svg:height="0.97cm" svg:x="-32.647cm" svg:y="59.423cm">
              <text:p text:style-name="P25"><text:span text:style-name="T12">L</text:span><text:span text:style-name="T13">t</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2.647cm" svg:y1="59.908cm" svg:x2="-33.757cm" svg:y2="59.908cm" draw:start-shape="id488" draw:start-glue-point="6" draw:end-shape="id489" draw:end-glue-point="10" svg:d="M-32647 59908h-1110" svg:viewBox="0 0 1111 1">
              <text:p/>
            </draw:connector>
            <draw:custom-shape draw:style-name="gr34" draw:text-style-name="P26" xml:id="id491" draw:id="id491" draw:layer="layout" svg:width="0.891cm" svg:height="0.97cm" svg:x="-30.648cm" svg:y="59.423cm">
              <text:p text:style-name="P25"><text:span text:style-name="T12">L</text:span><text:span text:style-name="T13">t+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0" draw:id="id490" draw:layer="layout" svg:width="0.891cm" svg:height="0.97cm" svg:x="-28.647cm" svg:y="59.423cm">
              <text:p text:style-name="P25"><text:span text:style-name="T12">L</text:span><text:span text:style-name="T13">t+1</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8.647cm" svg:y1="59.908cm" svg:x2="-29.757cm" svg:y2="59.908cm" draw:start-shape="id490" draw:start-glue-point="6" draw:end-shape="id491" draw:end-glue-point="10" svg:d="M-28647 59908h-1110" svg:viewBox="0 0 1111 1">
              <text:p/>
            </draw:connector>
            <draw:connector draw:style-name="gr36" draw:text-style-name="P7" draw:layer="layout" draw:type="curve" svg:x1="-30.648cm" svg:y1="59.908cm" svg:x2="-31.756cm" svg:y2="59.908cm" draw:start-shape="id491" draw:start-glue-point="6" draw:end-shape="id488" draw:end-glue-point="10" svg:d="M-30648 59908h-1108" svg:viewBox="0 0 1109 1">
              <text:p/>
            </draw:connector>
            <draw:custom-shape draw:style-name="gr34" draw:text-style-name="P26" xml:id="id493" draw:id="id493" draw:layer="layout" svg:width="0.891cm" svg:height="0.97cm" svg:x="-23.648cm" svg:y="59.423cm">
              <text:p text:style-name="P25"><text:span text:style-name="T12">L</text:span><text:span text:style-name="T13">t+q</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92" draw:id="id492" draw:layer="layout" svg:width="0.891cm" svg:height="0.97cm" svg:x="-21.647cm" svg:y="59.423cm">
              <text:p text:style-name="P25"><text:span text:style-name="T12">L</text:span><text:span text:style-name="T13">t+q</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21.647cm" svg:y1="59.908cm" svg:x2="-22.757cm" svg:y2="59.908cm" draw:start-shape="id492" draw:start-glue-point="6" draw:end-shape="id493" draw:end-glue-point="10" svg:d="M-21647 59908h-1110" svg:viewBox="0 0 1111 1">
              <text:p/>
            </draw:connector>
            <draw:connector draw:style-name="gr489" draw:text-style-name="P7" draw:layer="layout" draw:type="curve" svg:x1="-24.061cm" svg:y1="59.867cm" svg:x2="-27.374cm" svg:y2="59.87cm" svg:d="M-24061 59867c-2484 0-828 3-3313 3" svg:viewBox="0 0 3314 4">
              <text:p/>
            </draw:connector>
            <draw:connector draw:style-name="gr489" draw:text-style-name="P7" draw:layer="layout" draw:type="curve" svg:x1="-35.776cm" svg:y1="59.882cm" svg:x2="-38.447cm" svg:y2="59.898cm" svg:d="M-35776 59882c-2002 0-667 16-2671 16" svg:viewBox="0 0 2672 17">
              <text:p/>
            </draw:connector>
            <draw:custom-shape draw:style-name="gr34" draw:text-style-name="P26" draw:layer="layout" svg:width="0.891cm" svg:height="0.97cm" svg:x="-39.747cm" svg:y="59.423cm">
              <text:p text:style-name="P25"><text:span text:style-name="T12">L</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draw:layer="layout" svg:width="0.891cm" svg:height="0.97cm" svg:x="-17.646cm" svg:y="59.423cm">
              <text:p text:style-name="P25"><text:span text:style-name="T12">L</text:span><text:span text:style-name="T13">n</text:span><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89" draw:text-style-name="P7" draw:layer="layout" draw:type="curve" svg:x1="-17.866cm" svg:y1="59.873cm" svg:x2="-20.446cm" svg:y2="59.898cm" svg:d="M-17866 59873c-1933 0-644 25-2580 25" svg:viewBox="0 0 2581 26">
              <text:p/>
            </draw:connector>
          </draw:g>
          <draw:line draw:style-name="gr557" draw:text-style-name="P15" draw:layer="layout" svg:x1="-39.972cm" svg:y1="60.96cm" svg:x2="-16.587cm" svg:y2="60.919cm">
            <text:p/>
          </draw:line>
          <draw:frame draw:style-name="gr619" draw:text-style-name="P192" draw:layer="layout" svg:width="8.791cm" svg:height="1.825cm" svg:x="-31.606cm" svg:y="60.852cm">
            <draw:text-box>
              <text:p text:style-name="P5"><text:span text:style-name="T63">Sliding </text:span><text:span text:style-name="T63">window</text:span><text:span text:style-name="T63"><text:line-break/></text:span><text:span text:style-name="T63">for training </text:span><text:span text:style-name="T63">transformers</text:span></text:p>
            </draw:text-box>
          </draw:frame>
          <draw:connector draw:style-name="gr620" draw:text-style-name="P15" draw:layer="layout" draw:type="line" svg:x1="-34.912cm" svg:y1="58.563cm" svg:x2="-20.638cm" svg:y2="58.597cm" svg:d="M-34912 58563l14274 34" svg:viewBox="0 0 14275 35">
            <text:p/>
          </draw:connector>
          <draw:connector draw:style-name="gr621" draw:text-style-name="P15" draw:layer="layout" draw:type="line" svg:x1="-39.939cm" svg:y1="58.963cm" svg:x2="-20.658cm" svg:y2="58.917cm" svg:d="M-39939 58963l19281-46" svg:viewBox="0 0 19282 47">
            <text:p/>
          </draw:connector>
          <draw:frame draw:style-name="gr622" draw:text-style-name="P193" draw:layer="layout" svg:width="4.037cm" svg:height="0.645cm" svg:x="-28.867cm" svg:y="58.006cm">
            <draw:text-box>
              <text:p><text:span text:style-name="T12">Overlap (with length q)</text:span></text:p>
            </draw:text-box>
          </draw:frame>
          <draw:connector draw:style-name="gr621" draw:text-style-name="P15" draw:layer="layout" draw:type="line" svg:x1="-34.925cm" svg:y1="58.773cm" svg:x2="-16.591cm" svg:y2="58.773cm" svg:d="M-34925 58773h18334" svg:viewBox="0 0 18335 1">
            <text:p/>
          </draw:connector>
          <draw:frame draw:style-name="gr623" draw:text-style-name="P193" draw:layer="layout" svg:width="1.264cm" svg:height="0.645cm" svg:x="-38.08cm" svg:y="58.292cm">
            <draw:text-box>
              <text:p><text:span text:style-name="T12">input</text:span></text:p>
            </draw:text-box>
          </draw:frame>
          <draw:frame draw:style-name="gr624" draw:text-style-name="P193" draw:layer="layout" svg:width="1.479cm" svg:height="0.645cm" svg:x="-19.38cm" svg:y="58.093cm">
            <draw:text-box>
              <text:p><text:span text:style-name="T12">output</text:span></text:p>
            </draw:text-box>
          </draw:frame>
          <draw:connector draw:style-name="gr620" draw:text-style-name="P15" draw:layer="layout" draw:type="line" svg:x1="-40.005cm" svg:y1="57.943cm" svg:x2="-20.638cm" svg:y2="57.998cm" svg:d="M-40005 57943l19367 55" svg:viewBox="0 0 19368 56">
            <text:p/>
          </draw:connector>
          <draw:frame draw:style-name="gr622" draw:text-style-name="P193" draw:layer="layout" svg:width="4.037cm" svg:height="0.645cm" svg:x="-32.467cm" svg:y="57.407cm">
            <draw:text-box>
              <text:p><text:span text:style-name="T12">Window length</text:span></text:p>
            </draw:text-box>
          </draw:frame>
        </draw:g>
        <draw:custom-shape draw:name="comment box 2" draw:style-name="gr625" draw:text-style-name="P20" xml:id="id494" draw:id="id494" draw:layer="layout" svg:width="3.629cm" svg:height="2.55cm" svg:x="-18.866cm" svg:y="53.929cm">
          <text:p text:style-name="P19"><text:span text:style-name="T4">Unscientifically</text:span><text:span text:style-name="T4"><text:line-break/></text:span><text:span text:style-name="T4">sharing encoder</text:span><text:span text:style-name="T4"><text:line-break/></text:span><text:span text:style-name="T4">can be</text:span><text:span text:style-name="T4"><text:line-break/></text:span><text:span text:style-name="T4">compared</text:span><text:span text:style-name="T4"><text:line-break/></text:span><text:span text:style-name="T4">to prior</text:span><text:span text:style-name="T4"><text:line-break/></text:span><text:span text:style-name="T4">knowledge about another</text:span><text:span text:style-name="T4"><text:line-break/></text:span><text:span text:style-name="T4">person’s personality</text:span></text:p>
          <draw:enhanced-geometry svg:viewBox="0 0 21600 21600" draw:mirror-horizontal="false" draw:mirror-vertical="false" draw:glue-points="10800 0 0 10800 10800 21600 21600 10800" draw:text-areas="0 0 21600 ?f11" draw:type="paper" draw:modifiers="18589.090909090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13.656cm" svg:y1="52.577cm" svg:x2="-15.237cm" svg:y2="55.204cm" draw:start-shape="id396" draw:end-shape="id494" draw:end-glue-point="7" svg:d="M-13656 52577c0 1752-527 2627-1581 2627" svg:viewBox="0 0 1582 2628">
          <text:p/>
        </draw:connector>
        <draw:polygon draw:style-name="gr508" draw:text-style-name="P145" xml:id="id483" draw:id="id483" draw:layer="layout" svg:width="1.215cm" svg:height="1.383cm" svg:x="-25.649cm" svg:y="50.446cm" svg:viewBox="0 0 1216 1384" draw:points="1216,1384 0,971 0,325 1216,0">
          <text:p/>
        </draw:polygon>
        <draw:frame draw:style-name="gr626" draw:text-style-name="P194" draw:layer="layout" svg:width="1.669cm" svg:height="0.887cm" svg:x="-25.877cm" svg:y="50.683cm">
          <draw:text-box>
            <text:p text:style-name="P5"><text:span text:style-name="T49">Robot 1</text:span><text:span text:style-name="T49"><text:line-break/></text:span><text:span text:style-name="T49">decoders</text:span></text:p>
          </draw:text-box>
        </draw:frame>
        <draw:rect draw:style-name="gr41" draw:text-style-name="P19" xml:id="id444" draw:id="id444" draw:layer="layout" svg:width="2.398cm" svg:height="1.621cm" svg:x="-29.549cm" svg:y="51.618cm">
          <text:p text:style-name="P3"><text:span text:style-name="T12">Action</text:span><text:span text:style-name="T12"><text:line-break/></text:span><text:span text:style-name="T12">potentials</text:span><text:span text:style-name="T12"><text:line-break/></text:span><text:span text:style-name="T12">from both </text:span><text:span text:style-name="T12"><text:line-break/></text:span><text:span text:style-name="T12">robots</text:span></text:p>
        </draw:rect>
        <draw:connector draw:style-name="gr36" draw:text-style-name="P7" draw:layer="layout" draw:type="curve" svg:x1="-24.433cm" svg:y1="51.138cm" svg:x2="-23.01cm" svg:y2="51.489cm" draw:start-shape="id483" draw:start-glue-point="1" draw:end-shape="id401" draw:end-glue-point="3" svg:d="M-24433 51138c1050 0 339 351 1423 351" svg:viewBox="0 0 1424 352">
          <text:p/>
        </draw:connector>
        <draw:frame draw:style-name="gr627" draw:text-style-name="P170" draw:layer="layout" svg:width="1.563cm" svg:height="1.039cm" svg:x="-43.704cm" svg:y="39.88cm">
          <draw:text-box>
            <text:p><text:span text:style-name="T55">GPS</text:span></text:p>
          </draw:text-box>
        </draw:frame>
        <draw:frame draw:style-name="gr628" draw:text-style-name="P170" draw:layer="layout" svg:width="1.587cm" svg:height="0.645cm" svg:x="-44.104cm" svg:y="41.381cm">
          <draw:text-box>
            <text:p><text:span text:style-name="T55">LIDAR</text:span></text:p>
          </draw:text-box>
        </draw:frame>
        <draw:frame draw:style-name="gr628" draw:text-style-name="P170" draw:layer="layout" svg:width="1.587cm" svg:height="0.645cm" svg:x="-43.603cm" svg:y="42.982cm">
          <draw:text-box>
            <text:p><text:span text:style-name="T55">IMU</text:span></text:p>
          </draw:text-box>
        </draw:frame>
        <draw:frame draw:style-name="gr627" draw:text-style-name="P170" draw:layer="layout" svg:width="1.977cm" svg:height="1.039cm" svg:x="-44.002cm" svg:y="44.283cm">
          <draw:text-box>
            <text:p><text:span text:style-name="T55">Battery</text:span></text:p>
          </draw:text-box>
        </draw:frame>
        <draw:frame draw:style-name="gr135" draw:text-style-name="P41" draw:layer="layout" svg:width="1.24cm" svg:height="0.736cm" svg:x="-27.256cm" svg:y="53.424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1.239cm" svg:height="0.735cm" svg:x="-27.474cm" svg:y="50.597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polygon draw:style-name="gr508" draw:text-style-name="P145" xml:id="id445" draw:id="id445" draw:layer="layout" svg:width="1.215cm" svg:height="1.383cm" svg:x="-25.491cm" svg:y="53.046cm" svg:viewBox="0 0 1216 1384" draw:points="1216,1384 0,971 0,325 1216,0">
          <text:p/>
        </draw:polygon>
        <draw:frame draw:style-name="gr626" draw:text-style-name="P194" draw:layer="layout" svg:width="1.669cm" svg:height="0.887cm" svg:x="-25.718cm" svg:y="53.295cm">
          <draw:text-box>
            <text:p text:style-name="P5"><text:span text:style-name="T49">Robot 2</text:span><text:span text:style-name="T49"><text:line-break/></text:span><text:span text:style-name="T49">decoders</text:span></text:p>
          </draw:text-box>
        </draw:frame>
        <draw:connector draw:style-name="gr36" draw:text-style-name="P7" draw:layer="layout" draw:type="curve" svg:x1="-24.275cm" svg:y1="53.738cm" svg:x2="-22.913cm" svg:y2="53.642cm" draw:start-shape="id445" draw:start-glue-point="1" draw:end-shape="id495" draw:end-glue-point="3" svg:d="M-24275 53738c1003 0 323-96 1362-96" svg:viewBox="0 0 1363 97">
          <text:p/>
        </draw:connector>
        <draw:frame draw:style-name="gr521" draw:text-style-name="P5" xml:id="id496" draw:id="id496" draw:layer="layout" svg:width="5.375cm" svg:height="1.92cm" svg:x="-36.53cm" svg:y="48.356cm">
          <draw:object xlink:href="./Object 6" xlink:type="simple" xlink:show="embed" xlink:actuate="onLoad">
            <loext:p/>
          </draw:object>
          <draw:image xlink:href="./ObjectReplacements/Object 6" xlink:type="simple" xlink:show="embed" xlink:actuate="onLoad"/>
        </draw:frame>
        <draw:connector draw:style-name="gr29" draw:text-style-name="P15" draw:layer="layout" draw:type="curve" svg:x1="-32.189cm" svg:y1="51.936cm" svg:x2="-31.155cm" svg:y2="49.316cm" draw:start-shape="id485" draw:start-glue-point="4" draw:end-shape="id496" draw:end-glue-point="1" svg:d="M-32189 51936c0-1245 767-1037 1213-1381s571-1239-179-1239" svg:viewBox="0 0 1573 2621">
          <text:p/>
        </draw:connector>
        <draw:g draw:style-name="gr23">
          <draw:polygon draw:style-name="gr508" draw:text-style-name="P145" draw:layer="layout" svg:width="1.311cm" svg:height="1.383cm" svg:x="-32.916cm" svg:y="44.854cm" svg:viewBox="0 0 1312 1384" draw:points="1312,1384 0,792 0,591 1312,0">
            <text:p/>
          </draw:polygon>
          <draw:frame draw:style-name="gr629" draw:text-style-name="P195" draw:layer="layout" svg:width="1.732cm" svg:height="0.569cm" svg:x="-33.025cm" svg:y="45.252cm">
            <draw:text-box>
              <text:p><text:span text:style-name="T64">decoder</text:span></text:p>
            </draw:text-box>
          </draw:frame>
        </draw:g>
        <draw:g draw:style-name="gr31">
          <draw:g draw:style-name="gr23">
            <draw:polygon draw:style-name="gr510" draw:text-style-name="P113" draw:layer="layout" svg:width="1.292cm" svg:height="1.358cm" svg:x="-27.759cm" svg:y="44.804cm" svg:viewBox="0 0 1293 1359" draw:points="0,0 1293,581 1293,777 0,1359">
              <text:p/>
            </draw:polygon>
          </draw:g>
          <draw:frame draw:style-name="gr495" draw:text-style-name="P196" draw:layer="layout" svg:width="1.673cm" svg:height="0.887cm" svg:x="-27.938cm" svg:y="45.181cm">
            <draw:text-box>
              <text:p><text:span text:style-name="T64">encoder</text:span></text:p>
            </draw:text-box>
          </draw:frame>
        </draw:g>
        <draw:frame draw:style-name="gr630" draw:text-style-name="P16" xml:id="id497" draw:id="id497" draw:layer="layout" svg:width="2.796cm" svg:height="0.911cm" svg:x="-41.717cm" svg:y="48.506cm">
          <draw:text-box>
            <text:p text:style-name="P66"><text:span text:style-name="T65">derivative-free </text:span><text:span text:style-name="T65"><text:line-break/></text:span><text:span text:style-name="T65">global optimizer</text:span></text:p>
          </draw:text-box>
        </draw:frame>
        <draw:connector draw:style-name="gr631" draw:text-style-name="P7" draw:layer="layout" draw:type="curve" svg:x1="-36.53cm" svg:y1="49.316cm" svg:x2="-38.921cm" svg:y2="48.961cm" draw:start-shape="id496" draw:start-glue-point="3" draw:end-shape="id497" svg:d="M-36530 49316c-1792 0-597-355-2391-355" svg:viewBox="0 0 2392 356">
          <text:p text:style-name="P5"><text:span text:style-name="T4">using</text:span></text:p>
        </draw:connector>
        <draw:frame draw:style-name="gr521" draw:text-style-name="P5" xml:id="id498" draw:id="id498" draw:layer="layout" svg:width="4.615cm" svg:height="0.907cm" svg:x="-45.576cm" svg:y="50.542cm">
          <draw:object xlink:href="./Object 8" xlink:type="simple" xlink:show="embed" xlink:actuate="onLoad">
            <loext:p/>
          </draw:object>
          <draw:image xlink:href="./ObjectReplacements/Object 8" xlink:type="simple" xlink:show="embed" xlink:actuate="onLoad"/>
        </draw:frame>
        <draw:connector draw:style-name="gr631" draw:text-style-name="P7" draw:layer="layout" draw:type="curve" svg:x1="-41.717cm" svg:y1="48.961cm" svg:x2="-43.268cm" svg:y2="50.542cm" draw:start-shape="id497" draw:start-glue-point="3" draw:end-shape="id498" draw:end-glue-point="0" svg:d="M-41717 48961c-1034 0-1551 527-1551 1581" svg:viewBox="0 0 1552 1582">
          <text:p text:style-name="P5"><text:span text:style-name="T4">converting</text:span></text:p>
        </draw:connector>
        <draw:connector draw:style-name="gr632" draw:text-style-name="P7" draw:layer="layout" draw:type="curve" draw:line-skew="0.726cm" svg:x1="-43.268cm" svg:y1="51.449cm" svg:x2="-34.652cm" svg:y2="52.421cm" draw:start-shape="id498" draw:start-glue-point="2" draw:end-shape="id486" draw:end-glue-point="10" svg:d="M-43268 51449c0 4027 4560 3357 6902 2593s2467-1621 1714-1621" svg:viewBox="0 0 9028 3172">
          <text:p text:style-name="P5"><text:span text:style-name="T4">converting</text:span></text:p>
        </draw:connector>
        <draw:rect draw:style-name="gr41" draw:text-style-name="P5" xml:id="id499" draw:id="id499" draw:layer="layout" svg:width="2.589cm" svg:height="1.784cm" svg:x="92.039cm" svg:y="65.721cm">
          <text:p text:style-name="P5">Default<text:line-break/>brain<text:line-break/>network</text:p>
        </draw:rect>
        <draw:connector draw:style-name="gr293" draw:text-style-name="P15" draw:layer="layout" draw:type="curve" svg:x1="93.383cm" svg:y1="64.481cm" svg:x2="93.333cm" svg:y2="65.721cm" draw:start-shape="id482" draw:start-glue-point="2" draw:end-shape="id499" draw:end-glue-point="0" svg:d="M93383 64481c0 930-50 310-50 1240" svg:viewBox="0 0 51 1241">
          <text:p/>
        </draw:connector>
        <draw:rect draw:style-name="gr292" draw:text-style-name="P35" xml:id="id503" draw:id="id503" draw:layer="layout" svg:width="2.3cm" svg:height="1cm" svg:x="40.457cm" svg:y="99.219cm">
          <text:p text:style-name="P5">Suprise<text:line-break/>reduction</text:p>
        </draw:rect>
        <draw:rect draw:style-name="gr292" draw:text-style-name="P35" xml:id="id501" draw:id="id501" draw:layer="layout" svg:width="2.853cm" svg:height="1.372cm" svg:x="37.683cm" svg:y="103.071cm">
          <text:p text:style-name="P5">Updating<text:line-break/>predicting<text:line-break/>models</text:p>
        </draw:rect>
        <draw:rect draw:style-name="gr292" draw:text-style-name="P35" xml:id="id502" draw:id="id502" draw:layer="layout" svg:width="2.853cm" svg:height="1.372cm" svg:x="42.435cm" svg:y="103.071cm">
          <text:p text:style-name="P5">Manipulating<text:line-break/>the world</text:p>
        </draw:rect>
        <draw:connector draw:style-name="gr633" draw:text-style-name="P15" draw:layer="layout" draw:type="curve" svg:x1="41.607cm" svg:y1="101.993cm" svg:x2="39.109cm" svg:y2="103.071cm" draw:start-shape="id500" draw:start-glue-point="2" draw:end-shape="id501" draw:end-glue-point="0" svg:d="M41607 101993c0 808-2498 270-2498 1078" svg:viewBox="0 0 2499 1079">
          <text:p/>
        </draw:connector>
        <draw:connector draw:style-name="gr634" draw:text-style-name="P15" draw:layer="layout" draw:type="curve" svg:x1="41.607cm" svg:y1="101.993cm" svg:x2="43.861cm" svg:y2="103.071cm" draw:start-shape="id500" draw:start-glue-point="2" draw:end-shape="id502" draw:end-glue-point="0" svg:d="M41607 101993c0 808 2254 270 2254 1078" svg:viewBox="0 0 2255 1079">
          <text:p/>
        </draw:connector>
        <draw:rect draw:style-name="gr292" draw:text-style-name="P35" xml:id="id500" draw:id="id500" draw:layer="layout" svg:width="1.437cm" svg:height="0.766cm" svg:x="40.889cm" svg:y="101.227cm">
          <text:p text:style-name="P5">kinds</text:p>
        </draw:rect>
        <draw:connector draw:style-name="gr635" draw:text-style-name="P15" draw:layer="layout" draw:type="curve" svg:x1="41.607cm" svg:y1="100.219cm" svg:x2="41.607cm" svg:y2="101.227cm" draw:start-shape="id503" draw:start-glue-point="2" draw:end-shape="id500" draw:end-glue-point="0" svg:d="M41607 100219v1008" svg:viewBox="0 0 1 1009">
          <text:p/>
        </draw:connector>
        <draw:rect draw:style-name="gr292" draw:text-style-name="P35" xml:id="id504" draw:id="id504" draw:layer="layout" svg:width="2.853cm" svg:height="1.372cm" svg:x="36.184cm" svg:y="105.571cm">
          <text:p text:style-name="P5">Updating<text:line-break/>forecasting<text:line-break/>models</text:p>
        </draw:rect>
        <draw:connector draw:style-name="gr636" draw:text-style-name="P15" draw:layer="layout" draw:type="curve" svg:x1="39.109cm" svg:y1="104.443cm" svg:x2="37.61cm" svg:y2="105.571cm" draw:start-shape="id501" draw:start-glue-point="2" draw:end-shape="id504" draw:end-glue-point="0" svg:d="M39109 104443c0 846-1499 282-1499 1128" svg:viewBox="0 0 1500 1129">
          <text:p/>
        </draw:connector>
        <draw:rect draw:style-name="gr292" draw:text-style-name="P35" xml:id="id505" draw:id="id505" draw:layer="layout" svg:width="2.853cm" svg:height="1.372cm" svg:x="39.185cm" svg:y="105.571cm">
          <text:p text:style-name="P5">Updating<text:line-break/>classification<text:line-break/>models</text:p>
        </draw:rect>
        <draw:connector draw:style-name="gr637" draw:text-style-name="P15" draw:layer="layout" draw:type="curve" svg:x1="39.109cm" svg:y1="104.443cm" svg:x2="40.611cm" svg:y2="105.571cm" draw:start-shape="id501" draw:start-glue-point="2" draw:end-shape="id505" svg:d="M39109 104443c0 846 1502 282 1502 1128" svg:viewBox="0 0 1503 1129">
          <text:p/>
        </draw:connector>
        <draw:custom-shape draw:style-name="gr638" draw:text-style-name="P68" xml:id="id506" draw:id="id506" draw:layer="layout" svg:width="4.56cm" svg:height="2.669cm" svg:x="152.195cm" svg:y="36.515cm">
          <text:p text:style-name="P17"><text:span text:style-name="T4">Connects brain and</text:span><text:span text:style-name="T4"><text:line-break/></text:span><text:span text:style-name="T4">spinal cord</text:span><text:span text:style-name="T4"><text:line-break/></text:span><text:span text:style-name="T4">and brain to sensory and skeltal</text:span><text:span text:style-name="T4"><text:line-break/></text:span><text:span text:style-name="T4">muscles</text:span><text:span text:style-name="T4"><text:line-break/></text:span><text:span text:style-name="T4">under </text:span><text:span text:style-name="T66">conscious</text:span><text:span text:style-name="T66"><text:line-break/></text:span><text:span text:style-name="T67">control</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51.265cm" svg:y1="40.2cm" svg:x2="154.475cm" svg:y2="39.184cm" draw:start-shape="id225" draw:start-glue-point="0" draw:end-shape="id506" draw:end-glue-point="6" svg:d="M151265 40200c0-762 3210-254 3210-1016" svg:viewBox="0 0 3211 1017">
          <text:p/>
        </draw:connector>
        <draw:connector draw:style-name="gr639" draw:text-style-name="P7" draw:layer="layout" draw:type="curve" svg:x1="-16.897cm" svg:y1="27.437cm" svg:x2="-23.334cm" svg:y2="26.699cm" draw:start-shape="id1" draw:start-glue-point="3" draw:end-shape="id3" draw:end-glue-point="0" svg:d="M-16897 27437c-3910 0-3258-620-3890-992s-2547-497-2547 254" svg:viewBox="0 0 6438 1289">
          <text:p text:style-name="P5"><text:span text:style-name="T4">What should</text:span><text:span text:style-name="T4"><text:line-break/></text:span><text:span text:style-name="T4">be saved</text:span></text:p>
        </draw:connector>
        <draw:connector draw:style-name="gr640" draw:text-style-name="P15" draw:layer="layout" draw:type="line" svg:x1="-25.784cm" svg:y1="39.701cm" svg:x2="-25.76cm" svg:y2="41.671cm" svg:d="M-25784 39701l24 1970" svg:viewBox="0 0 25 1971">
          <text:p/>
        </draw:connector>
        <draw:frame draw:style-name="gr641" draw:text-style-name="P197" draw:layer="layout" svg:width="3.475cm" svg:height="0.878cm" svg:x="-25.81cm" svg:y="40.138cm">
          <draw:text-box>
            <text:p text:style-name="P3"><text:span text:style-name="T68">ROS</text:span></text:p>
          </draw:text-box>
        </draw:frame>
        <draw:frame draw:style-name="gr521" draw:text-style-name="P5" draw:layer="layout" svg:width="4.672cm" svg:height="1.92cm" svg:x="-27.052cm" svg:y="64.858cm">
          <draw:object xlink:href="./Object 9" xlink:type="simple" xlink:show="embed" xlink:actuate="onLoad">
            <loext:p/>
          </draw:object>
          <draw:image xlink:href="./ObjectReplacements/Object 9" xlink:type="simple" xlink:show="embed" xlink:actuate="onLoad"/>
        </draw:frame>
        <draw:g draw:style-name="gr31">
          <draw:path draw:style-name="gr642" draw:text-style-name="P5" draw:layer="layout" svg:width="2.382cm" svg:height="2.15cm" svg:x="-101.135cm" svg:y="12.975cm" svg:viewBox="0 0 2383 2151" svg:d="M2383 2151c-953-685-1525-1369-2383-2151">
            <text:p/>
          </draw:path>
          <draw:path draw:style-name="gr642" draw:text-style-name="P5" draw:layer="layout" svg:width="1.429cm" svg:height="1.134cm" svg:x="-102.565cm" svg:y="11.84cm" svg:viewBox="0 0 1430 1135" svg:d="M1430 1135c-477-352-954-685-1430-1135">
            <text:p/>
          </draw:path>
          <draw:path draw:style-name="gr642" draw:text-style-name="P5" draw:layer="layout" svg:width="1.372cm" svg:height="0.429cm" svg:x="-102.508cm" svg:y="12.975cm" svg:viewBox="0 0 1373 430" svg:d="M1373 0c-477 195-916 293-1373 430">
            <text:p/>
          </draw:path>
          <draw:path draw:style-name="gr642" draw:text-style-name="P5" draw:layer="layout" svg:width="3.107cm" svg:height="0.586cm" svg:x="-101.86cm" svg:y="14.539cm" svg:viewBox="0 0 3108 587" svg:d="M3108 587c-1048-196-2002-293-3108-587">
            <text:p/>
          </draw:path>
          <draw:path draw:style-name="gr642" draw:text-style-name="P5" draw:layer="layout" svg:width="1.181cm" svg:height="0.82cm" svg:x="-103.042cm" svg:y="13.718cm" svg:viewBox="0 0 1182 821" svg:d="M1182 821c-457-234-839-489-1182-821">
            <text:p/>
          </draw:path>
          <draw:path draw:style-name="gr642" draw:text-style-name="P5" draw:layer="layout" svg:width="1.219cm" svg:height="0.684cm" svg:x="-103.08cm" svg:y="14.539cm" svg:viewBox="0 0 1220 685" svg:d="M1220 0c-515 157-896 391-1220 685">
            <text:p/>
          </draw:path>
          <draw:path draw:style-name="gr642" draw:text-style-name="P5" draw:layer="layout" svg:width="2.478cm" svg:height="2.346cm" svg:x="-101.231cm" svg:y="15.126cm" svg:viewBox="0 0 2479 2347" svg:d="M2479 0c-953 626-1716 1369-2479 2347">
            <text:p/>
          </draw:path>
          <draw:path draw:style-name="gr642" draw:text-style-name="P5" draw:layer="layout" svg:width="1.238cm" svg:height="1.251cm" svg:x="-102.47cm" svg:y="17.472cm" svg:viewBox="0 0 1239 1252" svg:d="M1239 0c-438 430-820 782-1239 1252">
            <text:p/>
          </draw:path>
          <draw:path draw:style-name="gr642" draw:text-style-name="P5" draw:layer="layout" svg:width="1.467cm" svg:height="0.429cm" svg:x="-102.699cm" svg:y="17.042cm" svg:viewBox="0 0 1468 430" svg:d="M1468 430c-514-156-972-293-1468-430">
            <text:p/>
          </draw:path>
          <draw:path draw:style-name="gr642" draw:text-style-name="P5" draw:layer="layout" svg:width="0.365cm" svg:height="2.933cm" svg:x="-98.641cm" svg:y="11.41cm" svg:viewBox="0 0 366 2934" svg:d="M366 2934c-381-978-477-1858-229-2934">
            <text:p/>
          </draw:path>
          <draw:path draw:style-name="gr642" draw:text-style-name="P5" draw:layer="layout" svg:width="0.628cm" svg:height="1.075cm" svg:x="-99.133cm" svg:y="10.334cm" svg:viewBox="0 0 629 1076" svg:d="M629 1076c-152-430-343-782-629-1076">
            <text:p/>
          </draw:path>
          <draw:path draw:style-name="gr642" draw:text-style-name="P5" draw:layer="layout" svg:width="1.525cm" svg:height="0.879cm" svg:x="-98.504cm" svg:y="10.53cm" svg:viewBox="0 0 1526 880" svg:d="M0 880c515-352 992-626 1526-880">
            <text:p/>
          </draw:path>
          <draw:path draw:style-name="gr642" draw:text-style-name="P5" draw:layer="layout" svg:width="2.382cm" svg:height="1.563cm" svg:x="-97.798cm" svg:y="12.975cm" svg:viewBox="0 0 2383 1564" svg:d="M0 1564c667-782 1430-1212 2383-1564">
            <text:p/>
          </draw:path>
          <draw:path draw:style-name="gr642" draw:text-style-name="P5" draw:layer="layout" svg:width="1.43cm" svg:height="0.88cm" svg:x="-95.415cm" svg:y="12.094cm" svg:viewBox="0 0 1431 881" svg:d="M0 881c496-294 954-548 1431-881">
            <text:p/>
          </draw:path>
          <draw:path draw:style-name="gr642" draw:text-style-name="P5" draw:layer="layout" svg:width="1.678cm" svg:height="0.624cm" svg:x="-95.415cm" svg:y="12.975cm" svg:viewBox="0 0 1679 625" svg:d="M0 0c573 234 1106 430 1679 625">
            <text:p/>
          </draw:path>
          <draw:path draw:style-name="gr642" draw:text-style-name="P5" draw:layer="layout" svg:width="1.562cm" svg:height="2.542cm" svg:x="-97.893cm" svg:y="15.907cm" svg:viewBox="0 0 1563 2543" svg:d="M0 0c572 744 1048 1526 1563 2543">
            <text:p/>
          </draw:path>
          <draw:path draw:style-name="gr642" draw:text-style-name="P5" draw:layer="layout" svg:width="1.01cm" svg:height="1.212cm" svg:x="-96.33cm" svg:y="18.45cm" svg:viewBox="0 0 1011 1213" svg:d="M0 0c343 430 629 782 1011 1213">
            <text:p/>
          </draw:path>
          <draw:path draw:style-name="gr642" draw:text-style-name="P5" draw:layer="layout" svg:width="1.372cm" svg:height="0.625cm" svg:x="-97.703cm" svg:y="18.45cm" svg:viewBox="0 0 1373 626" svg:d="M1373 0c-515 156-953 352-1373 626">
            <text:p/>
          </draw:path>
          <draw:path draw:style-name="gr643" draw:text-style-name="P198" draw:layer="layout" svg:width="3.037cm" svg:height="3.128cm" svg:x="-99.107cm" svg:y="13.751cm" svg:viewBox="0 0 3038 3129" svg:d="M450 298c953-645 2193-195 2517 880 343 1135-610 2152-1793 1917-1144-215-1582-1917-724-2797z">
            <text:p/>
          </draw:path>
          <draw:path draw:style-name="gr644" draw:text-style-name="P199" draw:layer="layout" svg:width="3.037cm" svg:height="3.128cm" svg:x="-99.107cm" svg:y="13.751cm" svg:viewBox="0 0 3038 3129" svg:d="M450 298c953-645 2193-195 2517 880 343 1135-610 2152-1793 1917-1144-215-1582-1917-724-2797z">
            <text:p/>
          </draw:path>
          <draw:path draw:style-name="gr645" draw:text-style-name="P200" draw:layer="layout" svg:width="1.296cm" svg:height="1.329cm" svg:x="-98.313cm" svg:y="14.657cm" svg:viewBox="0 0 1297 1330" svg:d="M1297 665c0 116-30 231-87 332s-139 184-237 243c-99 58-212 90-325 90-114 0-226-32-324-90-99-59-180-142-237-243s-87-216-87-332c0-117 30-232 87-333s138-185 237-243c98-59 211-89 324-89 114 0 226 30 325 89 98 58 180 142 237 243s87 216 87 333z">
            <text:p/>
          </draw:path>
          <draw:path draw:style-name="gr646" draw:text-style-name="P201" draw:layer="layout" svg:width="1.296cm" svg:height="1.329cm" svg:x="-98.313cm" svg:y="14.657cm" svg:viewBox="0 0 1297 1330" svg:d="M1297 665c0 116-30 231-87 332s-139 184-237 243c-99 58-212 90-325 90-114 0-226-32-324-90-99-59-180-142-237-243s-87-216-87-332c0-117 30-232 87-333s138-185 237-243c98-59 211-89 324-89 114 0 226 30 325 89 98 58 180 142 237 243s87 216 87 333z">
            <text:p/>
          </draw:path>
          <draw:path draw:style-name="gr647" draw:text-style-name="P202" draw:layer="layout" svg:width="0.304cm" svg:height="0.312cm" svg:x="-97.607cm" svg:y="14.93cm" svg:viewBox="0 0 305 313" svg:d="M305 157c0 27-8 54-21 78-14 24-33 43-56 57-24 13-49 21-76 21s-53-8-76-21c-23-14-43-33-56-57s-20-51-20-78c0-28 7-55 20-78 13-24 33-45 56-58 23-14 49-21 76-21s52 7 76 21c23 13 43 34 56 58 14 23 21 50 21 78z">
            <text:p/>
          </draw:path>
          <draw:path draw:style-name="gr642" draw:text-style-name="P5" draw:layer="layout" svg:width="2.535cm" svg:height="0.016cm" svg:x="-96.139cm" svg:y="15.108cm" svg:viewBox="0 0 2536 17" svg:d="M0 17c915-39 1678 0 2536 0">
            <text:p/>
          </draw:path>
          <draw:line draw:style-name="gr642" draw:text-style-name="P5" draw:layer="layout" svg:x1="-92.841cm" svg:y1="15.126cm" svg:x2="-91.792cm" svg:y2="15.126cm">
            <text:p/>
          </draw:line>
          <draw:line draw:style-name="gr642" draw:text-style-name="P5" draw:layer="layout" svg:x1="-91.03cm" svg:y1="15.126cm" svg:x2="-89.981cm" svg:y2="15.126cm">
            <text:p/>
          </draw:line>
          <draw:line draw:style-name="gr642" draw:text-style-name="P5" draw:layer="layout" svg:x1="-89.218cm" svg:y1="15.126cm" svg:x2="-88.169cm" svg:y2="15.126cm">
            <text:p/>
          </draw:line>
          <draw:path draw:style-name="gr648" draw:text-style-name="P203" draw:layer="layout" svg:width="1.315cm" svg:height="1.337cm" svg:x="-93.743cm" svg:y="14.514cm" svg:viewBox="0 0 1316 1338" svg:d="M139 220c286-293 667-293 953 0 325 352 287 782-57 1017-381 254-839 0-991-430-77-235-58-431 95-587z">
            <text:p/>
          </draw:path>
          <draw:path draw:style-name="gr649" draw:text-style-name="P204" draw:layer="layout" svg:width="1.315cm" svg:height="1.337cm" svg:x="-93.743cm" svg:y="14.514cm" svg:viewBox="0 0 1316 1338" svg:d="M139 220c286-293 667-294 953 0 325 352 287 782-57 1017-381 254-839 0-991-430-77-235-58-430 95-587z">
            <text:p/>
          </draw:path>
          <draw:path draw:style-name="gr650" draw:text-style-name="P203" draw:layer="layout" svg:width="1.314cm" svg:height="1.337cm" svg:x="-91.931cm" svg:y="14.514cm" svg:viewBox="0 0 1315 1338" svg:d="M139 220c286-293 667-293 953 0 324 352 286 782-57 1017-382 254-839 0-992-430-76-235-57-431 96-587z">
            <text:p/>
          </draw:path>
          <draw:path draw:style-name="gr649" draw:text-style-name="P204" draw:layer="layout" svg:width="1.314cm" svg:height="1.337cm" svg:x="-91.931cm" svg:y="14.514cm" svg:viewBox="0 0 1315 1338" svg:d="M139 220c287-293 667-294 953 0 324 352 286 782-57 1017-382 254-839 0-992-430-76-235-56-430 96-587z">
            <text:p/>
          </draw:path>
          <draw:path draw:style-name="gr650" draw:text-style-name="P203" draw:layer="layout" svg:width="1.314cm" svg:height="1.337cm" svg:x="-90.119cm" svg:y="14.514cm" svg:viewBox="0 0 1315 1338" svg:d="M138 220c286-293 668-293 954 0 324 352 286 782-58 1017-381 254-839 0-991-430-76-235-57-431 95-587z">
            <text:p/>
          </draw:path>
          <draw:path draw:style-name="gr649" draw:text-style-name="P204" draw:layer="layout" svg:width="1.314cm" svg:height="1.337cm" svg:x="-90.119cm" svg:y="14.514cm" svg:viewBox="0 0 1315 1338" svg:d="M138 220c286-293 668-294 954 0 324 352 286 782-58 1017-381 254-839 0-991-430-76-235-57-430 95-587z">
            <text:p/>
          </draw:path>
          <draw:path draw:style-name="gr642" draw:text-style-name="P5" draw:layer="layout" svg:width="1.81cm" svg:height="1.27cm" svg:x="-88.169cm" svg:y="13.855cm" svg:viewBox="0 0 1811 1271" svg:d="M0 1271c667-156 1239-587 1811-1271">
            <text:p/>
          </draw:path>
          <draw:line draw:style-name="gr642" draw:text-style-name="P5" draw:layer="layout" svg:x1="-88.169cm" svg:y1="15.126cm" svg:x2="-85.786cm" svg:y2="15.126cm">
            <text:p/>
          </draw:line>
          <draw:path draw:style-name="gr642" draw:text-style-name="P5" draw:layer="layout" svg:width="1.81cm" svg:height="1.368cm" svg:x="-88.169cm" svg:y="15.126cm" svg:viewBox="0 0 1811 1369" svg:d="M0 0c667 196 1239 626 1811 1369">
            <text:p/>
          </draw:path>
          <draw:path draw:style-name="gr642" draw:text-style-name="P5" draw:layer="layout" svg:width="1.391cm" svg:height="0.977cm" svg:x="-86.358cm" svg:y="12.877cm" svg:viewBox="0 0 1392 978" svg:d="M0 978c439-450 858-724 1392-978">
            <text:p/>
          </draw:path>
          <draw:path draw:style-name="gr642" draw:text-style-name="P5" draw:layer="layout" svg:width="1.334cm" svg:height="0.344cm" svg:x="-86.358cm" svg:y="13.522cm" svg:viewBox="0 0 1335 345" svg:d="M0 333c477 58 858-98 1335-333">
            <text:p/>
          </draw:path>
          <draw:path draw:style-name="gr642" draw:text-style-name="P5" draw:layer="layout" svg:width="1.143cm" svg:height="0.86cm" svg:x="-85.786cm" svg:y="14.265cm" svg:viewBox="0 0 1144 861" svg:d="M0 861c439-254 763-489 1144-861">
            <text:p/>
          </draw:path>
          <draw:line draw:style-name="gr642" draw:text-style-name="P5" draw:layer="layout" svg:x1="-85.786cm" svg:y1="15.126cm" svg:x2="-84.508cm" svg:y2="15.126cm">
            <text:p/>
          </draw:line>
          <draw:path draw:style-name="gr642" draw:text-style-name="P5" draw:layer="layout" svg:width="1.143cm" svg:height="0.977cm" svg:x="-85.786cm" svg:y="15.126cm" svg:viewBox="0 0 1144 978" svg:d="M0 0c439 293 763 587 1144 978">
            <text:p/>
          </draw:path>
          <draw:path draw:style-name="gr642" draw:text-style-name="P5" draw:layer="layout" svg:width="1.353cm" svg:height="1.075cm" svg:x="-86.358cm" svg:y="16.494cm" svg:viewBox="0 0 1354 1076" svg:d="M0 0c382 391 820 743 1354 1076">
            <text:p/>
          </draw:path>
          <draw:path draw:style-name="gr642" draw:text-style-name="P5" draw:layer="layout" svg:width="1.429cm" svg:height="0.316cm" svg:x="-86.358cm" svg:y="16.47cm" svg:viewBox="0 0 1430 317" svg:d="M0 24c477-78 954 39 1430 293">
            <text:p/>
          </draw:path>
          <draw:path draw:style-name="gr651" draw:text-style-name="P5" draw:layer="layout" svg:width="7.626cm" svg:height="0.439cm" svg:x="-95.128cm" svg:y="13.903cm" svg:viewBox="0 0 7627 440" svg:d="M0 440c2002-587 4862-587 7627 0">
            <text:p/>
          </draw:path>
          <draw:polygon draw:style-name="gr652" draw:text-style-name="P205" draw:layer="layout" svg:width="0.431cm" svg:height="0.401cm" svg:x="-87.895cm" svg:y="14.068cm" svg:viewBox="0 0 432 402" draw:points="81,0 432,284 0,402">
            <text:p/>
          </draw:polygon>
          <draw:frame draw:style-name="gr653" draw:text-style-name="P206" draw:layer="layout" svg:width="1.85cm" svg:height="0.484cm" svg:x="-102.384cm" svg:y="11.028cm">
            <draw:text-box>
              <text:p><text:span text:style-name="T69">Dendrites</text:span></text:p>
            </draw:text-box>
          </draw:frame>
          <draw:frame draw:style-name="gr654" draw:text-style-name="P206" draw:layer="layout" svg:width="3.194cm" svg:height="0.484cm" svg:x="-98.856cm" svg:y="17.286cm">
            <draw:text-box>
              <text:p><text:span text:style-name="T69">Soma / cell </text:span><text:span text:style-name="T69">body</text:span></text:p>
            </draw:text-box>
          </draw:frame>
          <draw:frame draw:style-name="gr655" draw:text-style-name="P207" draw:layer="layout" svg:width="1.287cm" svg:height="0.389cm" svg:x="-98.57cm" svg:y="15.154cm">
            <draw:text-box>
              <text:p><text:span text:style-name="T70">Nucleus</text:span></text:p>
            </draw:text-box>
          </draw:frame>
          <draw:frame draw:style-name="gr656" draw:text-style-name="P206" draw:layer="layout" svg:width="2.306cm" svg:height="0.484cm" svg:x="-96.091cm" svg:y="14.451cm">
            <draw:text-box>
              <text:p><text:span text:style-name="T69">Axon hillock</text:span></text:p>
            </draw:text-box>
          </draw:frame>
          <draw:frame draw:style-name="gr657" draw:text-style-name="P206" draw:layer="layout" svg:width="2.666cm" svg:height="0.484cm" svg:x="-92.183cm" svg:y="13.962cm">
            <draw:text-box>
              <text:p><text:span text:style-name="T69">Myelin </text:span><text:span text:style-name="T69">sheath</text:span></text:p>
            </draw:text-box>
          </draw:frame>
          <draw:frame draw:style-name="gr658" draw:text-style-name="P208" draw:layer="layout" svg:width="2.477cm" svg:height="0.389cm" svg:x="-91.459cm" svg:y="16.171cm">
            <draw:text-box>
              <text:p><text:span text:style-name="T71">Node of Ranvier</text:span></text:p>
            </draw:text-box>
          </draw:frame>
          <draw:frame draw:style-name="gr659" draw:text-style-name="P206" draw:layer="layout" svg:width="2.858cm" svg:height="0.484cm" svg:x="-87.893cm" svg:y="12.397cm">
            <draw:text-box>
              <text:p><text:span text:style-name="T69">Axon </text:span><text:span text:style-name="T69">terminals</text:span></text:p>
            </draw:text-box>
          </draw:frame>
          <draw:frame draw:style-name="gr660" draw:text-style-name="P208" draw:layer="layout" svg:width="4.155cm" svg:height="0.389cm" svg:x="-92.851cm" svg:y="13.141cm">
            <draw:text-box>
              <text:p><text:span text:style-name="T71">Direction of </text:span><text:span text:style-name="T71">action potential</text:span></text:p>
            </draw:text-box>
          </draw:frame>
          <draw:custom-shape draw:style-name="gr661" draw:text-style-name="P209" draw:layer="layout" svg:width="3.952cm" svg:height="3.294cm" svg:x="-110.764cm" svg:y="13.456cm">
            <text:p text:style-name="P127"><text:span text:style-name="T3">Sti</text:span><text:span text:style-name="T3">m</text:span><text:span text:style-name="T3">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662" draw:text-style-name="P134" draw:layer="layout" svg:width="2.106cm" svg:height="1.771cm" svg:x="-106.4cm" svg:y="14.177cm">
            <text:p text:style-name="P19"><text:span text:style-name="T4">environmen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35" draw:text-style-name="P41" draw:layer="layout" svg:width="5.171cm" svg:height="3.42cm" svg:x="-80.433cm" svg:y="12.392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frame draw:style-name="gr663" draw:text-style-name="P38" draw:layer="layout" svg:width="3.655cm" svg:height="1.199cm" svg:x="-79.675cm" svg:y="15.998cm">
            <draw:text-box>
              <text:p>Action potential<text:line-break/>(A voltage pulse)</text:p>
            </draw:text-box>
          </draw:frame>
          <draw:custom-shape draw:style-name="gr662" draw:text-style-name="P134" draw:layer="layout" svg:width="2.106cm" svg:height="1.771cm" svg:x="-83.261cm" svg:y="14.17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g>
        <draw:rect draw:style-name="gr41" draw:text-style-name="P5" xml:id="id507" draw:id="id507" draw:layer="layout" svg:width="2.863cm" svg:height="1.515cm" svg:x="-88.035cm" svg:y="106.604cm">
          <text:p text:style-name="P3">Sensor<text:line-break/>reading<text:line-break/>robot1</text:p>
        </draw:rect>
        <draw:connector draw:style-name="gr293" draw:text-style-name="P15" draw:layer="layout" draw:type="curve" svg:x1="-85.172cm" svg:y1="107.361cm" svg:x2="-84.079cm" svg:y2="107.361cm" draw:start-shape="id507" draw:start-glue-point="1" draw:end-shape="id508" draw:end-glue-point="3" svg:d="M-85172 107361h1093" svg:viewBox="0 0 1094 1">
          <text:p/>
        </draw:connector>
        <draw:rect draw:style-name="gr41" draw:text-style-name="P5" xml:id="id508" draw:id="id508" draw:layer="layout" svg:width="2.863cm" svg:height="1.515cm" svg:x="-84.079cm" svg:y="106.604cm">
          <text:p text:style-name="P3">Interpolation<text:line-break/>(frequency <text:line-break/>matching)</text:p>
        </draw:rect>
        <draw:connector draw:style-name="gr293" draw:text-style-name="P15" draw:layer="layout" draw:type="curve" svg:x1="-81.216cm" svg:y1="107.361cm" svg:x2="-79.594cm" svg:y2="107.361cm" draw:start-shape="id508" draw:start-glue-point="1" draw:end-shape="id509" draw:end-glue-point="3" svg:d="M-81216 107361h1622" svg:viewBox="0 0 1623 1">
          <text:p/>
        </draw:connector>
        <draw:rect draw:style-name="gr41" draw:text-style-name="P5" xml:id="id510" draw:id="id510" draw:layer="layout" svg:width="5.081cm" svg:height="3.199cm" svg:x="-70.426cm" svg:y="105.783cm">
          <text:p text:style-name="P3">Combine <text:line-break/>with other<text:line-break/>sensors<text:line-break/>(Simple <text:line-break/>appending vector <text:line-break/>components)</text:p>
        </draw:rect>
        <draw:rect draw:style-name="gr41" draw:text-style-name="P5" xml:id="id511" draw:id="id511" draw:layer="layout" svg:width="2.863cm" svg:height="1.515cm" svg:x="-63.711cm" svg:y="106.604cm">
          <text:p text:style-name="P3">Conversion<text:line-break/>to action <text:line-break/>potential wave</text:p>
        </draw:rect>
        <draw:connector draw:style-name="gr293" draw:text-style-name="P15" draw:layer="layout" draw:type="curve" svg:x1="-65.345cm" svg:y1="107.382cm" svg:x2="-63.711cm" svg:y2="107.361cm" draw:start-shape="id510" draw:start-glue-point="1" draw:end-shape="id511" draw:end-glue-point="3" svg:d="M-65345 107382c1227 0 410-21 1634-21" svg:viewBox="0 0 1635 22">
          <text:p/>
        </draw:connector>
        <draw:rect draw:style-name="gr41" draw:text-style-name="P5" draw:layer="layout" svg:width="2.863cm" svg:height="1.515cm" svg:x="-84.078cm" svg:y="106.604cm">
          <text:p text:style-name="P3">Interpolation<text:line-break/>(frequency <text:line-break/>matching)</text:p>
        </draw:rect>
        <draw:rect draw:style-name="gr41" draw:text-style-name="P5" xml:id="id509" draw:id="id509" draw:layer="layout" svg:width="3.93cm" svg:height="3.608cm" svg:x="-79.594cm" svg:y="105.557cm">
          <text:p text:style-name="P3">Buffering until all<text:line-break/>sensors have<text:line-break/>the same length <text:line-break/>as the one used<text:line-break/>for transformer<text:line-break/>sliding window <text:line-break/>training</text:p>
        </draw:rect>
        <draw:rect draw:style-name="gr41" draw:text-style-name="P5" xml:id="id512" draw:id="id512" draw:layer="layout" svg:width="2.574cm" svg:height="1.924cm" svg:x="-74.699cm" svg:y="106.399cm">
          <text:p text:style-name="P3">Averaging<text:line-break/>the sensor <text:line-break/>values</text:p>
        </draw:rect>
        <draw:connector draw:style-name="gr293" draw:text-style-name="P15" draw:layer="layout" draw:type="curve" svg:x1="-75.664cm" svg:y1="107.361cm" svg:x2="-74.699cm" svg:y2="107.361cm" draw:start-shape="id509" draw:start-glue-point="1" draw:end-shape="id512" draw:end-glue-point="3" svg:d="M-75664 107361h965" svg:viewBox="0 0 966 1">
          <text:p/>
        </draw:connector>
        <draw:connector draw:style-name="gr293" draw:text-style-name="P15" draw:layer="layout" draw:type="curve" svg:x1="-72.125cm" svg:y1="107.361cm" svg:x2="-70.426cm" svg:y2="107.382cm" draw:start-shape="id512" draw:start-glue-point="1" draw:end-shape="id510" svg:d="M-72125 107361c1275 0 426 21 1699 21" svg:viewBox="0 0 1700 22">
          <text:p/>
        </draw:connector>
        <draw:custom-shape draw:style-name="gr664" draw:text-style-name="P210" xml:id="id513" draw:id="id513" draw:layer="layout" svg:width="3.921cm" svg:height="2.237cm" svg:x="-94.048cm" svg:y="106.211cm">
          <text:p text:style-name="P5">Online<text:line-break/>testing<text:line-break/>(language<text:line-break/>exist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3" draw:text-style-name="P15" draw:layer="layout" draw:type="curve" svg:x1="-90.127cm" svg:y1="107.33cm" svg:x2="-88.035cm" svg:y2="107.361cm" draw:start-shape="id513" draw:start-glue-point="10" draw:end-shape="id507" draw:end-glue-point="3" svg:d="M-90127 107330c1570 0 525 31 2092 31" svg:viewBox="0 0 2093 32">
          <text:p/>
        </draw:connector>
        <draw:rect draw:style-name="gr254" draw:text-style-name="P33" xml:id="id517" draw:id="id517" draw:layer="layout" svg:width="2.978cm" svg:height="1cm" svg:x="89.465cm" svg:y="3.976cm">
          <text:p text:style-name="P5">Mind</text:p>
        </draw:rect>
        <draw:rect draw:style-name="gr255" draw:text-style-name="P67" xml:id="id518" draw:id="id518" draw:layer="layout" svg:width="2.4cm" svg:height="1cm" svg:x="87.559cm" svg:y="11.435cm">
          <text:p text:style-name="P8"><text:span text:style-name="T29">awarene</text:span><text:span text:style-name="T29">ss</text:span></text:p>
        </draw:rect>
        <draw:rect draw:style-name="gr255" draw:text-style-name="P77" xml:id="id515" draw:id="id515" draw:layer="layout" svg:width="2.962cm" svg:height="1cm" svg:x="87.278cm" svg:y="9.015cm">
          <text:p text:style-name="P76"><text:span text:style-name="T29">Consciousness</text:span></text:p>
        </draw:rect>
        <draw:connector draw:style-name="gr313" draw:text-style-name="P15" draw:layer="layout" draw:type="curve" svg:x1="90.988cm" svg:y1="7.261cm" svg:x2="88.759cm" svg:y2="9.015cm" draw:start-shape="id514" draw:start-glue-point="2" draw:end-shape="id515" draw:end-glue-point="0" svg:d="M90988 7261c0 439-557 877-1115 877-557 0-1114 439-1114 877" svg:viewBox="0 0 2230 1755">
          <text:p/>
        </draw:connector>
        <draw:rect draw:style-name="gr255" draw:text-style-name="P77" xml:id="id516" draw:id="id516" draw:layer="layout" svg:width="3.448cm" svg:height="1cm" svg:x="91.714cm" svg:y="8.981cm">
          <text:p text:style-name="P76"><text:span text:style-name="T29">unconsciousness</text:span></text:p>
        </draw:rect>
        <draw:connector draw:style-name="gr314" draw:text-style-name="P15" draw:layer="layout" draw:type="curve" svg:x1="90.988cm" svg:y1="7.261cm" svg:x2="93.438cm" svg:y2="8.981cm" draw:start-shape="id514" draw:start-glue-point="2" draw:end-shape="id516" draw:end-glue-point="0" svg:d="M90988 7261c0 1290 2450 430 2450 1720" svg:viewBox="0 0 2451 1721">
          <text:p/>
        </draw:connector>
        <draw:rect draw:style-name="gr255" draw:text-style-name="P67" xml:id="id514" draw:id="id514" draw:layer="layout" svg:width="2.4cm" svg:height="1cm" svg:x="89.788cm" svg:y="6.261cm">
          <text:p text:style-name="P8"><text:span text:style-name="T29">Psyche</text:span></text:p>
        </draw:rect>
        <draw:connector draw:style-name="gr318" draw:text-style-name="P15" draw:layer="layout" draw:type="curve" svg:x1="90.954cm" svg:y1="4.976cm" svg:x2="90.988cm" svg:y2="6.261cm" draw:start-shape="id517" draw:start-glue-point="2" draw:end-shape="id514" draw:end-glue-point="0" svg:d="M90954 4976c0 322 9 643 17 643 9 0 17 321 17 642" svg:viewBox="0 0 35 1286">
          <text:p/>
        </draw:connector>
        <draw:connector draw:style-name="gr406" draw:text-style-name="P15" draw:layer="layout" draw:type="curve" svg:x1="88.759cm" svg:y1="10.015cm" svg:x2="88.759cm" svg:y2="11.435cm" draw:start-shape="id515" draw:start-glue-point="2" draw:end-shape="id518" svg:d="M88759 10015v1420" svg:viewBox="0 0 1 1421">
          <text:p/>
        </draw:connector>
        <draw:connector draw:style-name="gr46" draw:text-style-name="P15" draw:layer="layout" draw:type="curve" svg:x1="88.759cm" svg:y1="11.435cm" svg:x2="85.044cm" svg:y2="10.093cm" draw:start-shape="id518" draw:start-glue-point="0" draw:end-shape="id519" draw:end-glue-point="6" svg:d="M88759 11435c0-1006-3715-336-3715-1342" svg:viewBox="0 0 3716 1343">
          <text:p/>
        </draw:connector>
        <draw:custom-shape draw:style-name="gr665" draw:text-style-name="P68" xml:id="id519" draw:id="id519" draw:layer="layout" svg:width="2.475cm" svg:height="1.679cm" svg:x="83.806cm" svg:y="8.414cm">
          <text:p text:style-name="P17"><text:span text:style-name="T4">self-awarenes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55" draw:text-style-name="P67" xml:id="id520" draw:id="id520" draw:layer="layout" svg:width="2.4cm" svg:height="1cm" svg:x="105.81cm" svg:y="3.693cm">
          <text:p text:style-name="P8"><text:span text:style-name="T29">cognitive</text:span><text:span text:style-name="T29"><text:line-break/></text:span><text:span text:style-name="T29">processes</text:span></text:p>
        </draw:rect>
        <draw:rect draw:style-name="gr41" draw:text-style-name="P5" xml:id="id521" draw:id="id521" draw:layer="layout" svg:width="2.79cm" svg:height="0.955cm" svg:x="104.228cm" svg:y="7.294cm">
          <text:p text:style-name="P5">thinking</text:p>
        </draw:rect>
        <draw:connector draw:style-name="gr259" draw:text-style-name="P15" draw:layer="layout" draw:type="curve" svg:x1="107.01cm" svg:y1="4.693cm" svg:x2="105.623cm" svg:y2="7.294cm" draw:start-shape="id520" draw:start-glue-point="2" draw:end-shape="id521" draw:end-glue-point="0" svg:d="M107010 4693c0 1951-1387 651-1387 2601" svg:viewBox="0 0 1388 2602">
          <text:p/>
        </draw:connector>
        <draw:rect draw:style-name="gr41" draw:text-style-name="P5" xml:id="id524" draw:id="id524" draw:layer="layout" svg:width="2.79cm" svg:height="0.955cm" svg:x="100.455cm" svg:y="7.228cm">
          <text:p text:style-name="P5">learning</text:p>
        </draw:rect>
        <draw:rect draw:style-name="gr41" draw:text-style-name="P5" xml:id="id522" draw:id="id522" draw:layer="layout" svg:width="2.79cm" svg:height="0.955cm" svg:x="108.002cm" svg:y="7.294cm">
          <text:p text:style-name="P5">perception</text:p>
        </draw:rect>
        <draw:rect draw:style-name="gr41" draw:text-style-name="P5" xml:id="id523" draw:id="id523" draw:layer="layout" svg:width="2.79cm" svg:height="0.955cm" svg:x="111.775cm" svg:y="7.294cm">
          <text:p text:style-name="P5">attention</text:p>
        </draw:rect>
        <draw:connector draw:style-name="gr260" draw:text-style-name="P15" draw:layer="layout" draw:type="curve" svg:x1="107.01cm" svg:y1="4.693cm" svg:x2="109.397cm" svg:y2="7.294cm" draw:start-shape="id520" draw:start-glue-point="2" draw:end-shape="id522" draw:end-glue-point="0" svg:d="M107010 4693c0 1951 2387 651 2387 2601" svg:viewBox="0 0 2388 2602">
          <text:p/>
        </draw:connector>
        <draw:connector draw:style-name="gr262" draw:text-style-name="P15" draw:layer="layout" draw:type="curve" svg:x1="107.01cm" svg:y1="4.693cm" svg:x2="113.17cm" svg:y2="7.294cm" draw:start-shape="id520" draw:start-glue-point="2" draw:end-shape="id523" svg:d="M107010 4693c0 1951 6160 651 6160 2601" svg:viewBox="0 0 6161 2602">
          <text:p/>
        </draw:connector>
        <draw:connector draw:style-name="gr265" draw:text-style-name="P15" draw:layer="layout" draw:type="curve" svg:x1="107.01cm" svg:y1="4.693cm" svg:x2="101.85cm" svg:y2="7.228cm" draw:start-shape="id520" draw:start-glue-point="2" draw:end-shape="id524" draw:end-glue-point="0" svg:d="M107010 4693c0 1902-5160 635-5160 2535" svg:viewBox="0 0 5161 2536">
          <text:p/>
        </draw:connector>
        <draw:rect draw:style-name="gr292" draw:text-style-name="P35" xml:id="id525" draw:id="id525" draw:layer="layout" svg:width="3.093cm" svg:height="1.601cm" svg:x="56.276cm" svg:y="56.448cm">
          <text:p text:style-name="P5">Holding<text:line-break/>sliding window<text:line-break/>sensory data</text:p>
        </draw:rect>
        <draw:connector draw:style-name="gr293" draw:text-style-name="P15" draw:layer="layout" draw:type="curve" svg:x1="60.954cm" svg:y1="54.528cm" svg:x2="57.822cm" svg:y2="56.448cm" draw:start-shape="id236" draw:start-glue-point="2" draw:end-shape="id525" svg:d="M60954 54528c0 1440-3132 480-3132 1920" svg:viewBox="0 0 3133 1921">
          <text:p/>
        </draw:connector>
        <draw:rect draw:style-name="gr41" draw:text-style-name="P5" xml:id="id526" draw:id="id526" draw:layer="layout" svg:width="2.731cm" svg:height="1.2cm" svg:x="128.149cm" svg:y="42.022cm">
          <text:p text:style-name="P5">Networks</text:p>
        </draw:rect>
        <draw:rect draw:style-name="gr41" draw:text-style-name="P5" xml:id="id527" draw:id="id527" draw:layer="layout" svg:width="2.731cm" svg:height="1.2cm" svg:x="128.157cm" svg:y="44.651cm">
          <text:p text:style-name="P5">Large scale</text:p>
        </draw:rect>
        <draw:connector draw:style-name="gr293" draw:text-style-name="P15" draw:layer="layout" draw:type="curve" svg:x1="130.698cm" svg:y1="40.4cm" svg:x2="129.514cm" svg:y2="42.022cm" draw:start-shape="id192" draw:start-glue-point="2" draw:end-shape="id526" draw:end-glue-point="0" svg:d="M130698 40400c0 1216-1184 406-1184 1622" svg:viewBox="0 0 1185 1623">
          <text:p/>
        </draw:connector>
        <draw:connector draw:style-name="gr293" draw:text-style-name="P15" draw:layer="layout" draw:type="curve" svg:x1="129.514cm" svg:y1="43.222cm" svg:x2="129.522cm" svg:y2="44.651cm" draw:start-shape="id526" draw:start-glue-point="2" draw:end-shape="id527" draw:end-glue-point="0" svg:d="M129514 43222c0 1072 8 358 8 1429" svg:viewBox="0 0 9 1430">
          <text:p/>
        </draw:connector>
        <draw:rect draw:style-name="gr41" draw:text-style-name="P5" xml:id="id528" draw:id="id528" draw:layer="layout" svg:width="2.731cm" svg:height="1.2cm" svg:x="124.066cm" svg:y="48.178cm">
          <text:p text:style-name="P5">Default mode<text:line-break/>network</text:p>
        </draw:rect>
        <draw:rect draw:style-name="gr41" draw:text-style-name="P5" xml:id="id529" draw:id="id529" draw:layer="layout" svg:width="3.399cm" svg:height="1.44cm" svg:x="127.983cm" svg:y="48.037cm">
          <text:p text:style-name="P5">Dorsal<text:line-break/>(when new<text:line-break/>observation)</text:p>
        </draw:rect>
        <draw:rect draw:style-name="gr276" draw:text-style-name="P5" xml:id="id530" draw:id="id530" draw:layer="layout" svg:width="3.223cm" svg:height="1.493cm" svg:x="132.286cm" svg:y="48.037cm">
          <text:p text:style-name="P30"><text:span text:style-name="T28">Ventral </text:span><text:span text:style-name="T28"><text:line-break/></text:span><text:span text:style-name="T28">(when following</text:span><text:span text:style-name="T28"><text:line-break/></text:span><text:span text:style-name="T28">a goal)</text:span></text:p>
        </draw:rect>
        <draw:connector draw:style-name="gr293" draw:text-style-name="P15" draw:layer="layout" draw:type="curve" svg:x1="129.522cm" svg:y1="45.851cm" svg:x2="125.431cm" svg:y2="48.178cm" draw:start-shape="id527" draw:start-glue-point="2" draw:end-shape="id528" draw:end-glue-point="0" svg:d="M129522 45851c0 1746-4091 583-4091 2327" svg:viewBox="0 0 4092 2328">
          <text:p/>
        </draw:connector>
        <draw:connector draw:style-name="gr293" draw:text-style-name="P15" draw:layer="layout" draw:type="curve" svg:x1="129.522cm" svg:y1="45.851cm" svg:x2="129.682cm" svg:y2="48.037cm" draw:start-shape="id527" draw:start-glue-point="2" draw:end-shape="id529" draw:end-glue-point="0" svg:d="M129522 45851c0 1639 160 547 160 2186" svg:viewBox="0 0 161 2187">
          <text:p/>
        </draw:connector>
        <draw:connector draw:style-name="gr293" draw:text-style-name="P15" draw:layer="layout" draw:type="curve" svg:x1="129.522cm" svg:y1="45.851cm" svg:x2="133.897cm" svg:y2="48.037cm" draw:start-shape="id527" draw:start-glue-point="2" draw:end-shape="id530" draw:end-glue-point="0" svg:d="M129522 45851c0 1639 4375 547 4375 2186" svg:viewBox="0 0 4376 2187">
          <text:p/>
        </draw:connector>
        <draw:rect draw:style-name="gr41" draw:text-style-name="P5" xml:id="id531" draw:id="id531" draw:layer="layout" svg:width="2.731cm" svg:height="1.2cm" svg:x="124.103cm" svg:y="50.86cm">
          <text:p text:style-name="P5">Mind<text:line-break/>wandering</text:p>
        </draw:rect>
        <draw:connector draw:style-name="gr293" draw:text-style-name="P15" draw:layer="layout" draw:type="curve" svg:x1="125.431cm" svg:y1="49.378cm" svg:x2="125.468cm" svg:y2="50.86cm" draw:start-shape="id528" draw:start-glue-point="2" draw:end-shape="id531" draw:end-glue-point="0" svg:d="M125431 49378c0 1111 37 371 37 1482" svg:viewBox="0 0 38 1483">
          <text:p/>
        </draw:connector>
        <draw:rect draw:style-name="gr292" draw:text-style-name="P35" xml:id="id533" draw:id="id533" draw:layer="layout" svg:width="2.3cm" svg:height="1cm" svg:x="43.008cm" svg:y="61.741cm">
          <text:p text:style-name="P5">Goal<text:line-break/>types</text:p>
        </draw:rect>
        <draw:rect draw:style-name="gr292" draw:text-style-name="P35" xml:id="id532" draw:id="id532" draw:layer="layout" svg:width="2.3cm" svg:height="1cm" svg:x="40.243cm" svg:y="61.741cm">
          <text:p text:style-name="P5">Action<text:line-break/>types</text:p>
        </draw:rect>
        <draw:connector draw:style-name="gr293" draw:text-style-name="P15" draw:layer="layout" draw:type="curve" svg:x1="42.688cm" svg:y1="60.541cm" svg:x2="41.393cm" svg:y2="61.741cm" draw:start-shape="id338" draw:start-glue-point="2" draw:end-shape="id532" draw:end-glue-point="0" svg:d="M42688 60541c0 900-1295 300-1295 1200" svg:viewBox="0 0 1296 1201">
          <text:p/>
        </draw:connector>
        <draw:connector draw:style-name="gr293" draw:text-style-name="P15" draw:layer="layout" draw:type="curve" svg:x1="42.688cm" svg:y1="60.541cm" svg:x2="44.158cm" svg:y2="61.741cm" draw:start-shape="id338" draw:start-glue-point="2" draw:end-shape="id533" draw:end-glue-point="0" svg:d="M42688 60541c0 900 1470 300 1470 1200" svg:viewBox="0 0 1471 1201">
          <text:p/>
        </draw:connector>
        <draw:rect draw:style-name="gr292" draw:text-style-name="P35" xml:id="id534" draw:id="id534" draw:layer="layout" svg:width="2.3cm" svg:height="1cm" svg:x="31.239cm" svg:y="69.67cm">
          <text:p text:style-name="P5">next-to<text:line-break/>scenario</text:p>
        </draw:rect>
        <draw:connector draw:style-name="gr293" draw:text-style-name="P15" draw:layer="layout" draw:type="curve" svg:x1="30.784cm" svg:y1="67.468cm" svg:x2="32.389cm" svg:y2="69.67cm" draw:start-shape="id248" draw:start-glue-point="2" draw:end-shape="id534" draw:end-glue-point="0" svg:d="M30784 67468c0 1651 1605 551 1605 2202" svg:viewBox="0 0 1606 2203">
          <text:p/>
        </draw:connector>
        <draw:frame draw:style-name="gr135" draw:text-style-name="P41" draw:layer="layout" svg:width="17.692cm" svg:height="19.588cm" svg:x="-73.528cm" svg:y="78.655cm">
          <draw:image xlink:href="Pictures/10000000000002D80000032646F0B612.png" xlink:type="simple" xlink:show="embed" xlink:actuate="onLoad" draw:mime-type="image/png">
            <text:p/>
          </draw:image>
        </draw:frame>
        <draw:rect draw:style-name="gr41" draw:text-style-name="P5" xml:id="id535" draw:id="id535" draw:layer="layout" svg:width="2.863cm" svg:height="1.515cm" svg:x="-88.035cm" svg:y="110.604cm">
          <text:p text:style-name="P3">Switching<text:line-break/>to DMN</text:p>
        </draw:rect>
        <draw:connector draw:style-name="gr293" draw:text-style-name="P15" draw:layer="layout" draw:type="curve" svg:x1="-85.172cm" svg:y1="111.361cm" svg:x2="-84.079cm" svg:y2="111.361cm" draw:start-shape="id535" draw:start-glue-point="1" draw:end-shape="id536" draw:end-glue-point="3" svg:d="M-85172 111361h1093" svg:viewBox="0 0 1094 1">
          <text:p/>
        </draw:connector>
        <draw:rect draw:style-name="gr41" draw:text-style-name="P5" xml:id="id536" draw:id="id536" draw:layer="layout" svg:width="2.863cm" svg:height="1.515cm" svg:x="-84.079cm" svg:y="110.604cm">
          <text:p text:style-name="P3">Interpolation<text:line-break/>(frequency <text:line-break/>matching)</text:p>
        </draw:rect>
        <draw:connector draw:style-name="gr293" draw:text-style-name="P15" draw:layer="layout" draw:type="curve" svg:x1="-81.216cm" svg:y1="111.361cm" svg:x2="-79.594cm" svg:y2="111.361cm" draw:start-shape="id536" draw:start-glue-point="1" draw:end-shape="id537" draw:end-glue-point="3" svg:d="M-81216 111361h1622" svg:viewBox="0 0 1623 1">
          <text:p/>
        </draw:connector>
        <draw:rect draw:style-name="gr41" draw:text-style-name="P5" xml:id="id538" draw:id="id538" draw:layer="layout" svg:width="5.081cm" svg:height="3.199cm" svg:x="-70.426cm" svg:y="109.783cm">
          <text:p text:style-name="P3">Combine <text:line-break/>with other<text:line-break/>sensors<text:line-break/>(Simple <text:line-break/>appending vector <text:line-break/>components)</text:p>
        </draw:rect>
        <draw:rect draw:style-name="gr41" draw:text-style-name="P5" xml:id="id539" draw:id="id539" draw:layer="layout" svg:width="2.863cm" svg:height="1.515cm" svg:x="-63.711cm" svg:y="110.604cm">
          <text:p text:style-name="P3">Conversion<text:line-break/>to action <text:line-break/>potential wave</text:p>
        </draw:rect>
        <draw:connector draw:style-name="gr293" draw:text-style-name="P15" draw:layer="layout" draw:type="curve" svg:x1="-65.345cm" svg:y1="111.382cm" svg:x2="-63.711cm" svg:y2="111.361cm" draw:start-shape="id538" draw:start-glue-point="1" draw:end-shape="id539" draw:end-glue-point="3" svg:d="M-65345 111382c1227 0 410-21 1634-21" svg:viewBox="0 0 1635 22">
          <text:p/>
        </draw:connector>
        <draw:rect draw:style-name="gr41" draw:text-style-name="P5" draw:layer="layout" svg:width="2.863cm" svg:height="1.515cm" svg:x="-84.078cm" svg:y="110.604cm">
          <text:p text:style-name="P3">Interpolation<text:line-break/>(frequency <text:line-break/>matching)</text:p>
        </draw:rect>
        <draw:rect draw:style-name="gr41" draw:text-style-name="P5" xml:id="id537" draw:id="id537" draw:layer="layout" svg:width="3.93cm" svg:height="3.608cm" svg:x="-79.594cm" svg:y="109.557cm">
          <text:p text:style-name="P3">Buffering until all<text:line-break/>sensors have<text:line-break/>the same length <text:line-break/>as the one used<text:line-break/>for transformer<text:line-break/>sliding window <text:line-break/>training</text:p>
        </draw:rect>
        <draw:rect draw:style-name="gr41" draw:text-style-name="P5" xml:id="id540" draw:id="id540" draw:layer="layout" svg:width="2.574cm" svg:height="1.924cm" svg:x="-74.699cm" svg:y="110.399cm">
          <text:p text:style-name="P3">Averaging<text:line-break/>the sensor <text:line-break/>values</text:p>
        </draw:rect>
        <draw:connector draw:style-name="gr293" draw:text-style-name="P15" draw:layer="layout" draw:type="curve" svg:x1="-75.664cm" svg:y1="111.361cm" svg:x2="-74.699cm" svg:y2="111.361cm" draw:start-shape="id537" draw:start-glue-point="1" draw:end-shape="id540" draw:end-glue-point="3" svg:d="M-75664 111361h965" svg:viewBox="0 0 966 1">
          <text:p/>
        </draw:connector>
        <draw:connector draw:style-name="gr293" draw:text-style-name="P15" draw:layer="layout" draw:type="curve" svg:x1="-72.125cm" svg:y1="111.361cm" svg:x2="-70.426cm" svg:y2="111.382cm" draw:start-shape="id540" draw:start-glue-point="1" draw:end-shape="id538" svg:d="M-72125 111361c1275 0 426 21 1699 21" svg:viewBox="0 0 1700 22">
          <text:p/>
        </draw:connector>
        <draw:custom-shape draw:style-name="gr664" draw:text-style-name="P210" xml:id="id541" draw:id="id541" draw:layer="layout" svg:width="3.921cm" svg:height="2.237cm" svg:x="-94.048cm" svg:y="110.211cm">
          <text:p text:style-name="P5">Offline<text:line-break/>learning<text:line-break/>(Building <text:line-break/>languag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3" draw:text-style-name="P15" draw:layer="layout" draw:type="curve" svg:x1="-90.127cm" svg:y1="111.33cm" svg:x2="-88.035cm" svg:y2="111.361cm" draw:start-shape="id541" draw:start-glue-point="10" draw:end-shape="id535" draw:end-glue-point="3" svg:d="M-90127 111330c1570 0 525 31 2092 31" svg:viewBox="0 0 2093 32">
          <text:p/>
        </draw:connector>
        <draw:frame draw:style-name="gr494" draw:text-style-name="P138" draw:layer="layout" svg:width="3.743cm" svg:height="1.158cm" svg:x="-46.518cm" svg:y="68.54cm">
          <draw:text-box>
            <text:p text:style-name="P69"><text:span text:style-name="T12">Matrix-Profile-based </text:span><text:span text:style-name="T12"><text:line-break/></text:span><text:span text:style-name="T12">Motif Discovery</text:span></text:p>
          </draw:text-box>
        </draw:frame>
        <draw:g draw:style-name="gr31">
          <draw:path draw:style-name="gr2" draw:text-style-name="P2" draw:layer="layout" svg:width="31.019cm" svg:height="9.289cm" svg:x="-16.441cm" svg:y="-35.13cm" svg:viewBox="0 0 31020 9290" svg:d="M8213 246c346 39 689-38 1035-47 358-9 683-57 1036-64 329-6 657-12 982-15 312-3 623-9 933 0 360 10 658-84 1036-79 485 7 966 7 1449-31 370-29 743 13 1112 31 347 15 688 58 1011 158 273 85 606 50 880 173 271 122 579 214 932 251 454 48 847 215 1296 284 307 49 614 108 930 141 359 38 725 70 1087 94 343 25 1101 114 1372 246 394 196 933 31 1535 90 511 50 586 224 1076 290 312 44 753 119 1074 136 404 20 364 133 768 121 328-11 638 39 959 46 348 9 678 82 1007 142 378 70 714 243 881 457 139 177 399 325 391 535-11 194 32 387 24 582-13 331-223 648-260 976-24 225-409 303-700 362-305 63-466 239-609 471-141 232-134 495-262 724-98 171-843 1303-1229 1420-474 146-932 142-1439 223-554 86-952 246-1517 334-545 83-996 434-1543 501-829 102-1816 358-2662 362-1081 8-2431 228-3485 78-712-100-1504 210-2145-70-314-136-675-24-992-165-320-140-1042-399-1075-563-46-229-488-311-844-363-323-47-572 221-912 212-312-8-619 70-933 48-472-33-925 58-1398 63-734 6-1432 100-2199 16-414-46-710-180-1061-285-444-130-777 55-1154-131-325-163-821 320-1074 123-294-228-1125-242-1522-331-365-82-493-915-726-1083-246-177-463-460-739-619-374-215 1-475-346-723-195-138-119-698-184-878-73-209 307-780 462-928 173-169 313-55 390-245 86-216 214-423 337-631 109-186 254-367 310-566 53-192 31-429 141-615 106-189 426-480 794-530 319-44 599-273 914-312 336-41 464-306 793-265 724 92 1188-112 1751-269 321-89 716 276 1018 165 277-102 580-136 882-173 93 0 188 0 282 0 95 36 190 72 285 110 17 16 35 31 51 47z">
            <text:p/>
          </draw:path>
          <draw:path draw:style-name="gr457" draw:text-style-name="P21" draw:layer="layout" svg:width="6.258cm" svg:height="6.499cm" svg:x="-14.783cm" svg:y="-33.876cm" svg:viewBox="0 0 6259 6500" svg:d="M2156 33c935-72 1644-49 2525 313 674 277 1104 604 1277 1165 186 602 291 1236 278 1878-8 432-25 866 13 1297 47 534-69 1141-468 1438-204 152-517 162-744 281-144 75-403 54-587 67-202 14-378-44-555-106-238-84-494-67-741-119-137-29-277-7-424 26-183 41-376 21-555 79-265 86-533 142-807 146-156 3-323 12-463-53-168-77-340-59-477-225-179-217-394-443-423-727-13-133-3-272 40-397 56-163 67-334 145-490 82-165 192-318 225-503 56-316-66-621-106-926-22-171-105-330-105-502s-4-344 26-516c26-150 55-300 66-450 14-185 33-366 0-556-27-152 489-807 489-807 0 0 661-259 1371-313z">
            <text:p/>
          </draw:path>
          <draw:rect draw:style-name="gr41" draw:text-style-name="P19" xml:id="id548" draw:id="id548" draw:layer="layout" svg:width="2.758cm" svg:height="1.759cm" svg:x="-7.097cm" svg:y="-31.247cm">
            <text:p text:style-name="P3"><text:span text:style-name="T10">Short-term</text:span><text:span text:style-name="T10"><text:line-break/></text:span><text:span text:style-name="T10">memory buffering</text:span><text:span text:style-name="T10"><text:line-break/></text:span><text:span text:style-name="T10">(Sliding window</text:span><text:span text:style-name="T10"><text:line-break/></text:span><text:span text:style-name="T10">length matches </text:span><text:span text:style-name="T10"><text:line-break/></text:span><text:span text:style-name="T10">frequency alignment)</text:span></text:p>
          </draw:rect>
          <draw:custom-shape draw:style-name="gr666" draw:text-style-name="P123" xml:id="id543" draw:id="id543" draw:layer="layout" svg:width="0.323cm" svg:height="0.323cm" svg:x="-13.746cm" svg:y="-32.566cm">
            <text:p text:style-name="P122"><text:span text:style-name="T37"/></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7" draw:text-style-name="P7" draw:layer="layout" draw:type="curve" svg:x1="-11.715cm" svg:y1="-32.394cm" svg:x2="-13.423cm" svg:y2="-32.404cm" draw:start-shape="id542" draw:start-glue-point="3" draw:end-shape="id543" draw:end-glue-point="10" svg:d="M-11715-32394c-1279 0-426-10-1708-10" svg:viewBox="0 0 1709 11">
            <text:p/>
          </draw:connector>
          <draw:custom-shape draw:style-name="gr460" draw:text-style-name="P125" xml:id="id545" draw:id="id545" draw:layer="layout" svg:width="0.323cm" svg:height="0.323cm" svg:x="-13.754cm" svg:y="-31.199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8" draw:text-style-name="P7" draw:layer="layout" draw:type="curve" svg:x1="-11.715cm" svg:y1="-31.037cm" svg:x2="-13.431cm" svg:y2="-31.037cm" draw:start-shape="id544" draw:start-glue-point="3" draw:end-shape="id545" draw:end-glue-point="10" svg:d="M-11715-31037h-1716" svg:viewBox="0 0 1717 1">
            <text:p/>
          </draw:connector>
          <draw:custom-shape draw:style-name="gr460" draw:text-style-name="P125" xml:id="id547" draw:id="id547" draw:layer="layout" svg:width="0.323cm" svg:height="0.323cm" svg:x="-13.685cm" svg:y="-28.504cm">
            <text:p text:style-name="P124"><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3" draw:text-style-name="P41" draw:layer="layout" svg:width="0.393cm" svg:height="5.131cm" draw:transform="rotate (-3.14159265358979) translate (-14.083cm -27.952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64" draw:text-style-name="P126" draw:layer="layout" svg:width="2.549cm" svg:height="1.199cm" svg:x="-16.799cm" svg:y="-30.964cm">
            <draw:text-box>
              <text:p text:style-name="P5">Sensors<text:line-break/>(receptors)</text:p>
            </draw:text-box>
          </draw:frame>
          <draw:connector draw:style-name="gr669" draw:text-style-name="P7" draw:layer="layout" draw:type="curve" svg:x1="-11.715cm" svg:y1="-28.322cm" svg:x2="-13.362cm" svg:y2="-28.342cm" draw:start-shape="id546" draw:start-glue-point="3" draw:end-shape="id547" draw:end-glue-point="10" svg:d="M-11715-28322c-1234 0-411-20-1647-20" svg:viewBox="0 0 1648 21">
            <text:p/>
          </draw:connector>
          <draw:custom-shape draw:style-name="gr670" draw:text-style-name="P209" draw:layer="layout" svg:width="2.381cm" svg:height="1.985cm" svg:x="-18.924cm" svg:y="-31.335cm">
            <text:p text:style-name="P127"><text:span text:style-name="T3">Stimulu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467" draw:text-style-name="P19" xml:id="id553" draw:id="id553" draw:layer="layout" svg:width="2.574cm" svg:height="1.396cm" svg:x="2.907cm" svg:y="-31.148cm">
            <text:p text:style-name="P5"><text:span text:style-name="T4">trace</text:span><text:span text:style-name="T4"><text:line-break/></text:span><text:span text:style-name="T4">(labeled</text:span><text:span text:style-name="T4"><text:line-break/></text:span><text:span text:style-name="T4">sensory data)</text:span></text:p>
          </draw:rect>
          <draw:rect draw:style-name="gr41" draw:text-style-name="P19" xml:id="id542" draw:id="id542" draw:layer="layout" svg:width="1.265cm" svg:height="1.082cm" svg:x="-11.715cm" svg:y="-32.935cm">
            <text:p text:style-name="P5"><text:span text:style-name="T4">Action</text:span><text:span text:style-name="T4"><text:line-break/></text:span><text:span text:style-name="T4">potential</text:span><text:span text:style-name="T4"><text:line-break/></text:span><text:span text:style-name="T4">wave</text:span></text:p>
          </draw:rect>
          <draw:connector draw:style-name="gr468" draw:text-style-name="P7" draw:layer="layout" draw:type="curve" svg:x1="-7.097cm" svg:y1="-30.367cm" svg:x2="-10.45cm" svg:y2="-32.394cm" draw:start-shape="id548" draw:start-glue-point="3" draw:end-shape="id542" draw:end-glue-point="1" svg:d="M-7097-30367c-2514 0-838-2027-3353-2027" svg:viewBox="0 0 3354 2028">
            <text:p/>
          </draw:connector>
          <draw:rect draw:style-name="gr41" draw:text-style-name="P19" xml:id="id544" draw:id="id544" draw:layer="layout" svg:width="1.265cm" svg:height="1.082cm" svg:x="-11.715cm" svg:y="-31.578cm">
            <text:p text:style-name="P5"><text:span text:style-name="T4">Action</text:span><text:span text:style-name="T4"><text:line-break/></text:span><text:span text:style-name="T4">potential</text:span><text:span text:style-name="T4"><text:line-break/></text:span><text:span text:style-name="T4">wave</text:span></text:p>
          </draw:rect>
          <draw:rect draw:style-name="gr41" draw:text-style-name="P19" xml:id="id546" draw:id="id546" draw:layer="layout" svg:width="1.265cm" svg:height="1.082cm" svg:x="-11.715cm" svg:y="-28.863cm">
            <text:p text:style-name="P5"><text:span text:style-name="T4">Action</text:span><text:span text:style-name="T4"><text:line-break/></text:span><text:span text:style-name="T4">potential</text:span><text:span text:style-name="T4"><text:line-break/></text:span><text:span text:style-name="T4">wave</text:span></text:p>
          </draw:rect>
          <draw:connector draw:style-name="gr469" draw:text-style-name="P7" draw:layer="layout" draw:type="curve" svg:x1="-7.097cm" svg:y1="-30.367cm" svg:x2="-10.45cm" svg:y2="-31.037cm" draw:start-shape="id548" draw:start-glue-point="3" draw:end-shape="id544" draw:end-glue-point="1" svg:d="M-7097-30367c-2514 0-838-670-3353-670" svg:viewBox="0 0 3354 671">
            <text:p/>
          </draw:connector>
          <draw:connector draw:style-name="gr36" draw:text-style-name="P7" draw:layer="layout" draw:type="curve" svg:x1="-7.097cm" svg:y1="-30.367cm" svg:x2="-10.45cm" svg:y2="-28.322cm" draw:start-shape="id548" draw:start-glue-point="3" draw:end-shape="id546" draw:end-glue-point="1" svg:d="M-7097-30367c-2514 0-838 2045-3353 2045" svg:viewBox="0 0 3354 2046">
            <text:p/>
          </draw:connector>
          <draw:connector draw:style-name="gr473" draw:text-style-name="P15" draw:layer="layout" draw:type="line" svg:x1="2.08cm" svg:y1="-29.121cm" svg:x2="7.486cm" svg:y2="-29.167cm" svg:d="M2080-29121l5406-46" svg:viewBox="0 0 5407 47">
            <text:p/>
          </draw:connector>
          <draw:frame draw:style-name="gr474" draw:text-style-name="P129" draw:layer="layout" svg:width="3.263cm" svg:height="1.199cm" svg:x="1.999cm" svg:y="-29.128cm">
            <draw:text-box>
              <text:p><text:span text:style-name="T39">Sem</text:span><text:span text:style-name="T39">antic</text:span></text:p>
            </draw:text-box>
          </draw:frame>
          <draw:connector draw:style-name="gr36" draw:text-style-name="P7" draw:layer="layout" draw:type="curve" svg:x1="-3.296cm" svg:y1="-30.361cm" svg:x2="-4.339cm" svg:y2="-30.367cm" draw:start-shape="id549" draw:start-glue-point="3" draw:end-shape="id548" draw:end-glue-point="1" svg:d="M-3296-30361c-781 0-260-6-1043-6" svg:viewBox="0 0 1044 7">
            <text:p/>
          </draw:connector>
          <draw:g draw:style-name="gr23">
            <draw:path draw:style-name="gr475" draw:text-style-name="P130" draw:layer="layout" svg:width="2.434cm" svg:height="7.621cm" svg:x="-0.297cm" svg:y="-34.194cm" svg:viewBox="0 0 2435 7622" svg:d="M1188 16c-304 91-494 61-608 419-79 245-67 523 17 750 104 284 138 597 136 903-2 308-115 593-188 882-93 366-282 671-411 1015-94 251-89 523-119 793-32 282-11 581 51 860s116 569 240 816c111 220 58 469 68 706 12 298 1231 682 1231 308 0-230-27-456-68-683-63-349-127-695-137-1058-10-412 121-711 317-1058 191-338 117-545 419-640 296-93 201-673 176-904-30-285 166-578 115-860-51-278-148-529-155-816-7-340-118-674-85-1014 25-264-735-498-999-419z">
              <text:p/>
            </draw:path>
            <draw:frame draw:style-name="gr476" draw:text-style-name="P131" draw:layer="layout" svg:width="3.263cm" svg:height="1.361cm" draw:transform="rotate (1.5707963267949) translate (0.308cm -29.207cm)">
              <draw:text-box>
                <text:p text:style-name="P5"><text:span text:style-name="T40">Perc</text:span><text:span text:style-name="T40">eptio</text:span><text:span text:style-name="T40">n</text:span><text:span text:style-name="T40"><text:line-break/></text:span><text:span text:style-name="T41">(cluster</text:span><text:span text:style-name="T41">ing</text:span><text:span text:style-name="T41"><text:line-break/></text:span><text:span text:style-name="T41">hierarc</text:span><text:span text:style-name="T41">hy)</text:span></text:p>
              </draw:text-box>
            </draw:frame>
          </draw:g>
          <draw:rect draw:style-name="gr467" draw:text-style-name="P19" xml:id="id551" draw:id="id551" draw:layer="layout" svg:width="2.574cm" svg:height="1.396cm" svg:x="10.007cm" svg:y="-31.148cm">
            <text:p text:style-name="P5"><text:span text:style-name="T4">Event </text:span><text:span text:style-name="T4">specific</text:span><text:span text:style-name="T4"><text:line-break/></text:span><text:span text:style-name="T4">knowled</text:span><text:span text:style-name="T4">ge</text:span><text:span text:style-name="T4"><text:line-break/></text:span><text:span text:style-name="T4">in </text:span><text:span text:style-name="T4">languag</text:span><text:span text:style-name="T4">e</text:span></text:p>
          </draw:rect>
          <draw:connector draw:style-name="gr477" draw:text-style-name="P15" draw:layer="layout" draw:type="line" svg:x1="-6.719cm" svg:y1="-29.121cm" svg:x2="-1.313cm" svg:y2="-29.167cm" svg:d="M-6719-29121l5406-46" svg:viewBox="0 0 5407 47">
            <text:p/>
          </draw:connector>
          <draw:frame draw:style-name="gr474" draw:text-style-name="P129" draw:layer="layout" svg:width="3.263cm" svg:height="1.199cm" svg:x="-3.8cm" svg:y="-29.028cm">
            <draw:text-box>
              <text:p><text:span text:style-name="T39">signal-</text:span><text:span text:style-name="T39">level</text:span></text:p>
            </draw:text-box>
          </draw:frame>
          <draw:rect draw:style-name="gr467" draw:text-style-name="P19" xml:id="id552" draw:id="id552" draw:layer="layout" svg:width="2.574cm" svg:height="1.396cm" svg:x="6.554cm" svg:y="-31.148cm">
            <text:p text:style-name="P5"><text:span text:style-name="T4">internal</text:span><text:span text:style-name="T4"><text:line-break/></text:span><text:span text:style-name="T4">language</text:span><text:span text:style-name="T4"><text:line-break/></text:span><text:span text:style-name="T4">(inner speech)</text:span></text:p>
          </draw:rect>
          <draw:rect draw:style-name="gr496" draw:text-style-name="P139" xml:id="id550" draw:id="id550" draw:layer="layout" svg:width="5.693cm" svg:height="3.474cm" svg:x="13.422cm" svg:y="-24.074cm">
            <text:p text:style-name="P5"><text:span text:style-name="T46">Blackboard</text:span><text:span text:style-name="T46"><text:line-break/></text:span><text:span text:style-name="T46">for sharing </text:span><text:span text:style-name="T46"><text:line-break/></text:span><text:span text:style-name="T46">each robots</text:span><text:span text:style-name="T46"><text:line-break/></text:span><text:span text:style-name="T46">recent utterances</text:span><text:span text:style-name="T46"><text:line-break/></text:span><text:span text:style-name="T46">and encoders</text:span><text:span text:style-name="T46"><text:line-break/></text:span><text:span text:style-name="T46">(Stimuli with language</text:span><text:span text:style-name="T46"><text:line-break/></text:span><text:span text:style-name="T46">medium)</text:span></text:p>
          </draw:rect>
          <draw:connector draw:style-name="gr36" draw:text-style-name="P7" draw:layer="layout" draw:type="curve" svg:x1="16.268cm" svg:y1="-24.074cm" svg:x2="11.294cm" svg:y2="-29.752cm" draw:start-shape="id550" draw:start-glue-point="0" draw:end-shape="id551" draw:end-glue-point="2" svg:d="M16268-24074c0-4257-4974-1418-4974-5678" svg:viewBox="0 0 4975 5679">
            <text:p/>
          </draw:connector>
          <draw:connector draw:style-name="gr36" draw:text-style-name="P7" draw:layer="layout" draw:type="curve" svg:x1="6.554cm" svg:y1="-30.45cm" svg:x2="5.481cm" svg:y2="-30.45cm" draw:start-shape="id552" draw:start-glue-point="3" draw:end-shape="id553" draw:end-glue-point="1" svg:d="M6554-30450h-1073" svg:viewBox="0 0 1074 1">
            <text:p/>
          </draw:connector>
          <draw:connector draw:style-name="gr36" draw:text-style-name="P7" draw:layer="layout" draw:type="curve" svg:x1="10.007cm" svg:y1="-30.45cm" svg:x2="9.128cm" svg:y2="-30.45cm" draw:start-shape="id551" draw:start-glue-point="3" draw:end-shape="id552" draw:end-glue-point="1" svg:d="M10007-30450h-879" svg:viewBox="0 0 880 1">
            <text:p/>
          </draw:connector>
          <draw:path draw:style-name="gr671" draw:text-style-name="P140" draw:layer="layout" svg:width="23.609cm" svg:height="6.044cm" svg:x="-12.749cm" svg:y="-23.99cm" svg:viewBox="0 0 23610 6045" svg:d="M2001 639c1509-369 1913-360 3899-516 1413-111 2931-107 4417-121 1009-10 1982 21 2946 68 856 41 1693 104 2513 175 762 65 1725 171 1855 405 111 197 262 313 983 455 570 113 1158 38 1853 61 732 25 1500 286 2020 415 479 119 810 285 873 459 72 202 225 405 217 608-7 183 210 408-379 567-546 146-513 515-785 698-229 158 187 1044-316 1262-493 678-889 332-1577 416-1243 151-2636 222-3982 310-670 44-1338 97-2018 135-793 45-1492-91-2184-162-712-74-1411-165-2181-203-661-31-1350-33-2020 14-778 53-1574 128-2398 108-657-16-1330 59-1855-149-404-159-1034-166-1454-318-526-193-1258-392-1585-616-243-168-423-443-564-618-195-243-78-497-218-743-93-165-19-333-52-499-71-340 304-667 490-999 119-214-38-407 110-648 104-384 1392-564 1392-564z">
            <text:p/>
          </draw:path>
          <draw:frame draw:style-name="gr672" draw:text-style-name="P13" draw:layer="layout" svg:width="3.475cm" svg:height="0.878cm" svg:x="-6.147cm" svg:y="-34.116cm">
            <draw:text-box>
              <text:p text:style-name="P3"><text:span text:style-name="T7">Robot 1</text:span></text:p>
            </draw:text-box>
          </draw:frame>
          <draw:connector draw:style-name="gr499" draw:text-style-name="P7" draw:layer="layout" draw:type="curve" svg:x1="9.264cm" svg:y1="-21.687cm" svg:x2="13.422cm" svg:y2="-22.337cm" draw:start-shape="id554" draw:start-glue-point="1" draw:end-shape="id550" draw:end-glue-point="3" svg:d="M9264-21687c3118 0 1040-650 4158-650" svg:viewBox="0 0 4159 651">
            <text:p text:style-name="P5"><text:span text:style-name="T4">Robot 1</text:span><text:span text:style-name="T4"><text:line-break/></text:span><text:span text:style-name="T4">utters</text:span><text:span text:style-name="T4"><text:line-break/></text:span><text:span text:style-name="T4">and decoder</text:span></text:p>
          </draw:connector>
          <draw:frame draw:style-name="gr673" draw:text-style-name="P13" draw:layer="layout" svg:width="3.475cm" svg:height="0.878cm" svg:x="-0.289cm" svg:y="-23.441cm">
            <draw:text-box>
              <text:p text:style-name="P3"><text:span text:style-name="T7">Robot 2</text:span></text:p>
            </draw:text-box>
          </draw:frame>
          <draw:rect draw:style-name="gr467" draw:text-style-name="P19" xml:id="id554" draw:id="id554" draw:layer="layout" svg:width="2.349cm" svg:height="1.195cm" svg:x="6.915cm" svg:y="-22.285cm">
            <text:p text:style-name="P5"><text:span text:style-name="T4">utters</text:span><text:span text:style-name="T4"><text:line-break/></text:span><text:span text:style-name="T4">from robot 1</text:span><text:span text:style-name="T4"><text:line-break/></text:span><text:span text:style-name="T4">and its’ decoder</text:span></text:p>
          </draw:rect>
          <draw:rect draw:style-name="gr467" draw:text-style-name="P19" xml:id="id563" draw:id="id563" draw:layer="layout" svg:width="2.063cm" svg:height="1.396cm" svg:x="7.012cm" svg:y="-20.233cm">
            <text:p text:style-name="P5"><text:span text:style-name="T4">Robot 2</text:span><text:span text:style-name="T4"><text:line-break/></text:span><text:span text:style-name="T4">internal</text:span><text:span text:style-name="T4"><text:line-break/></text:span><text:span text:style-name="T4">language</text:span></text:p>
          </draw:rect>
          <draw:custom-shape draw:style-name="gr481" draw:text-style-name="P133" xml:id="id560" draw:id="id560" draw:layer="layout" svg:width="4.16cm" svg:height="0.97cm" svg:x="-12.445cm" svg:y="-21.225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486" draw:text-style-name="P20" draw:layer="layout" svg:width="0.571cm" svg:height="0.535cm" svg:x="-12.232cm" svg:y="-20.995cm">
              <text:p text:style-name="P19"><text:span text:style-name="T4">W</text:span><text:span text:style-name="T42">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75cm" svg:height="0.535cm" svg:x="-11.187cm" svg:y="-20.995cm">
              <text:p text:style-name="P19"><text:span text:style-name="T4">W</text:span><text:span text:style-name="T42">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6" draw:text-style-name="P20" draw:layer="layout" svg:width="0.643cm" svg:height="0.535cm" svg:x="-10.208cm" svg:y="-20.995cm">
              <text:p text:style-name="P19"><text:span text:style-name="T4">W</text:span><text:span text:style-name="T4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135" draw:layer="layout" svg:width="0.568cm" svg:height="0.535cm" svg:x="-9.084cm" svg:y="-20.995cm">
              <text:p text:style-name="P19"><text:span text:style-name="T4">W</text:span><text:span text:style-name="T42">l</text:span><text:span text:style-name="T43">(</text:span><text:span text:style-name="T4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8" draw:text-style-name="P15" draw:layer="layout" svg:x1="-11.677cm" svg:y1="-20.727cm" svg:x2="-11.227cm" svg:y2="-20.737cm">
              <text:p/>
            </draw:line>
            <draw:line draw:style-name="gr488" draw:text-style-name="P15" draw:layer="layout" svg:x1="-10.605cm" svg:y1="-20.713cm" svg:x2="-10.182cm" svg:y2="-20.724cm">
              <text:p/>
            </draw:line>
            <draw:line draw:style-name="gr488" draw:text-style-name="P15" draw:layer="layout" svg:x1="-9.559cm" svg:y1="-20.713cm" svg:x2="-9.044cm" svg:y2="-20.71cm">
              <text:p/>
            </draw:line>
          </draw:g>
          <draw:connector draw:style-name="gr36" draw:text-style-name="P7" draw:layer="layout" draw:type="curve" svg:x1="2.873cm" svg:y1="-20.756cm" svg:x2="4.434cm" svg:y2="-19.439cm" draw:start-shape="id555" draw:start-glue-point="10" draw:end-shape="id556" draw:end-glue-point="3" svg:d="M2873-20756c1173 0 393 1317 1561 1317" svg:viewBox="0 0 1562 1318">
            <text:p/>
          </draw:connector>
          <draw:connector draw:style-name="gr36" draw:text-style-name="P7" draw:layer="layout" draw:type="curve" svg:x1="2.873cm" svg:y1="-20.756cm" svg:x2="4.276cm" svg:y2="-22.039cm" draw:start-shape="id555" draw:start-glue-point="10" draw:end-shape="id557" draw:end-glue-point="3" svg:d="M2873-20756c1054 0 353-1283 1403-1283" svg:viewBox="0 0 1404 1284">
            <text:p/>
          </draw:connector>
          <draw:custom-shape draw:name="comment box 6" draw:style-name="gr674" draw:text-style-name="P20" xml:id="id558" draw:id="id558" draw:layer="layout" svg:width="2.572cm" svg:height="1.94cm" svg:x="-15.492cm" svg:y="-27.294cm">
            <text:p text:style-name="P19"><text:span text:style-name="T4">Train length</text:span><text:span text:style-name="T4"><text:line-break/></text:span><text:span text:style-name="T4">is taken as </text:span><text:span text:style-name="T4"><text:line-break/></text:span><text:span text:style-name="T4">the length </text:span><text:span text:style-name="T4"><text:line-break/></text:span><text:span text:style-name="T4">of the </text:span><text:span text:style-name="T4"><text:line-break/></text:span><text:span text:style-name="T4">transformer</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616" draw:text-style-name="P133" xml:id="id555" draw:id="id555" draw:layer="layout" svg:width="2.674cm" svg:height="0.97cm" svg:x="0.199cm" svg:y="-21.241cm">
            <text:p text:style-name="P25"><text:span text:style-name="T12">Regression on</text:span><text:span text:style-name="T12"><text:line-break/></text:span><text:span text:style-name="T12">AP waves su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5" draw:text-style-name="P133" xml:id="id561" draw:id="id561" draw:layer="layout" svg:width="2.674cm" svg:height="1.449cm" svg:x="-7.425cm" svg:y="-21.451cm">
            <text:p text:style-name="P25"><text:span text:style-name="T12">Social</text:span><text:span text:style-name="T12"><text:line-break/></text:span><text:span text:style-name="T12">Language</text:span><text:span text:style-name="T12"><text:line-break/></text:span><text:span text:style-name="T12">build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11.715cm" svg:y1="-28.322cm" svg:x2="-12.92cm" svg:y2="-26.324cm" draw:start-shape="id546" draw:start-glue-point="3" draw:end-shape="id558" draw:end-glue-point="7" svg:d="M-11715-28322c-888 0-286 1998-1205 1998" svg:viewBox="0 0 1206 1999">
            <text:p/>
          </draw:connector>
          <draw:connector draw:style-name="gr36" draw:text-style-name="P7" draw:layer="layout" draw:type="curve" svg:x1="-1.837cm" svg:y1="-20.695cm" svg:x2="0.199cm" svg:y2="-20.756cm" draw:start-shape="id559" draw:start-glue-point="1" draw:end-shape="id555" draw:end-glue-point="6" svg:d="M-1837-20695c1527 0 509-61 2036-61" svg:viewBox="0 0 2037 62">
            <text:p/>
          </draw:connector>
          <draw:connector draw:style-name="gr36" draw:text-style-name="P7" draw:layer="layout" draw:type="curve" svg:x1="-8.285cm" svg:y1="-20.74cm" svg:x2="-7.425cm" svg:y2="-20.726cm" draw:start-shape="id560" draw:start-glue-point="10" draw:end-shape="id561" draw:end-glue-point="6" svg:d="M-8285-20740c646 0 217 14 860 14" svg:viewBox="0 0 861 15">
            <text:p/>
          </draw:connector>
          <draw:custom-shape draw:name="comment box 16" draw:style-name="gr676" draw:text-style-name="P20" xml:id="id562" draw:id="id562" draw:layer="layout" svg:width="3.629cm" svg:height="2.55cm" svg:x="11.059cm" svg:y="-19.248cm">
            <text:p text:style-name="P19"><text:span text:style-name="T4">Unscientifically</text:span><text:span text:style-name="T4"><text:line-break/></text:span><text:span text:style-name="T4">sharing encoder</text:span><text:span text:style-name="T4"><text:line-break/></text:span><text:span text:style-name="T4">can be</text:span><text:span text:style-name="T4"><text:line-break/></text:span><text:span text:style-name="T4">compared</text:span><text:span text:style-name="T4"><text:line-break/></text:span><text:span text:style-name="T4">to prior</text:span><text:span text:style-name="T4"><text:line-break/></text:span><text:span text:style-name="T4">knowledge about another</text:span><text:span text:style-name="T4"><text:line-break/></text:span><text:span text:style-name="T4">person’s personality</text:span></text:p>
            <draw:enhanced-geometry svg:viewBox="0 0 21600 21600" draw:mirror-horizontal="false" draw:mirror-vertical="false" draw:glue-points="10800 0 0 10800 10800 21600 21600 10800" draw:text-areas="0 0 21600 ?f11" draw:type="paper" draw:modifiers="18589.090909090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16.268cm" svg:y1="-20.6cm" svg:x2="14.688cm" svg:y2="-17.973cm" draw:start-shape="id550" draw:end-shape="id562" draw:end-glue-point="7" svg:d="M16268-20600c0 1752-526 2627-1580 2627" svg:viewBox="0 0 1581 2628">
            <text:p/>
          </draw:connector>
          <draw:polygon draw:style-name="gr510" draw:text-style-name="P211" xml:id="id557" draw:id="id557" draw:layer="layout" svg:width="1.215cm" svg:height="1.383cm" svg:x="4.276cm" svg:y="-22.731cm" svg:viewBox="0 0 1216 1384" draw:points="1216,1384 0,971 0,325 1216,0">
            <text:p/>
          </draw:polygon>
          <draw:frame draw:style-name="gr626" draw:text-style-name="P194" draw:layer="layout" svg:width="1.669cm" svg:height="0.887cm" svg:x="4.048cm" svg:y="-22.494cm">
            <draw:text-box>
              <text:p text:style-name="P5"><text:span text:style-name="T49">Robot 1</text:span><text:span text:style-name="T49"><text:line-break/></text:span><text:span text:style-name="T49">encoder</text:span></text:p>
            </draw:text-box>
          </draw:frame>
          <draw:connector draw:style-name="gr36" draw:text-style-name="P7" draw:layer="layout" draw:type="curve" svg:x1="5.492cm" svg:y1="-22.039cm" svg:x2="6.915cm" svg:y2="-21.687cm" draw:start-shape="id557" draw:start-glue-point="1" draw:end-shape="id554" draw:end-glue-point="3" svg:d="M5492-22039c1048 0 337 352 1423 352" svg:viewBox="0 0 1424 353">
            <text:p/>
          </draw:connector>
          <draw:frame draw:style-name="gr628" draw:text-style-name="P170" draw:layer="layout" svg:width="2.065cm" svg:height="0.645cm" svg:x="-14.179cm" svg:y="-33.097cm">
            <draw:text-box>
              <text:p><text:span text:style-name="T55">Sensor 1</text:span></text:p>
            </draw:text-box>
          </draw:frame>
          <draw:frame draw:style-name="gr627" draw:text-style-name="P170" draw:layer="layout" svg:width="2.441cm" svg:height="1.039cm" svg:x="-14.179cm" svg:y="-31.796cm">
            <draw:text-box>
              <text:p><text:span text:style-name="T55">Sensor 2</text:span></text:p>
            </draw:text-box>
          </draw:frame>
          <draw:frame draw:style-name="gr677" draw:text-style-name="P170" draw:layer="layout" svg:width="1.977cm" svg:height="0.655cm" svg:x="-14.077cm" svg:y="-29.194cm">
            <draw:text-box>
              <text:p><text:span text:style-name="T55">Sensor</text:span><text:span text:style-name="T72">p</text:span></text:p>
            </draw:text-box>
          </draw:frame>
          <draw:frame draw:style-name="gr135" draw:text-style-name="P41" draw:layer="layout" svg:width="1.24cm" svg:height="0.736cm" svg:x="2.969cm" svg:y="-20.153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frame draw:style-name="gr135" draw:text-style-name="P41" draw:layer="layout" svg:width="1.239cm" svg:height="0.735cm" svg:x="2.751cm" svg:y="-22.18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polygon draw:style-name="gr510" draw:text-style-name="P211" xml:id="id556" draw:id="id556" draw:layer="layout" svg:width="1.215cm" svg:height="1.383cm" svg:x="4.434cm" svg:y="-20.131cm" svg:viewBox="0 0 1216 1384" draw:points="1216,1384 0,971 0,325 1216,0">
            <text:p/>
          </draw:polygon>
          <draw:frame draw:style-name="gr626" draw:text-style-name="P194" draw:layer="layout" svg:width="1.669cm" svg:height="0.887cm" svg:x="4.207cm" svg:y="-19.882cm">
            <draw:text-box>
              <text:p text:style-name="P5"><text:span text:style-name="T49">Robot 2</text:span><text:span text:style-name="T49"><text:line-break/></text:span><text:span text:style-name="T49">encoder</text:span></text:p>
            </draw:text-box>
          </draw:frame>
          <draw:connector draw:style-name="gr36" draw:text-style-name="P7" draw:layer="layout" draw:type="curve" svg:x1="5.65cm" svg:y1="-19.439cm" svg:x2="7.012cm" svg:y2="-19.535cm" draw:start-shape="id556" draw:start-glue-point="1" draw:end-shape="id563" draw:end-glue-point="3" svg:d="M5650-19439c1003 0 323-96 1362-96" svg:viewBox="0 0 1363 97">
            <text:p/>
          </draw:connector>
          <draw:frame draw:style-name="gr521" draw:text-style-name="P5" xml:id="id564" draw:id="id564" draw:layer="layout" svg:width="5.375cm" svg:height="1.92cm" svg:x="-6.605cm" svg:y="-24.821cm">
            <draw:object xlink:href="./Object 10" xlink:type="simple" xlink:show="embed" xlink:actuate="onLoad">
              <loext:p/>
            </draw:object>
            <draw:image xlink:href="./ObjectReplacements/Object 10" xlink:type="simple" xlink:show="embed" xlink:actuate="onLoad"/>
          </draw:frame>
          <draw:connector draw:style-name="gr29" draw:text-style-name="P15" draw:layer="layout" draw:type="curve" svg:x1="1.536cm" svg:y1="-21.241cm" svg:x2="-1.23cm" svg:y2="-23.861cm" draw:start-shape="id555" draw:start-glue-point="4" draw:end-shape="id564" draw:end-glue-point="1" svg:d="M1536-21241c0-1747-922-2620-2766-2620" svg:viewBox="0 0 2767 2621">
            <text:p/>
          </draw:connector>
          <draw:frame draw:style-name="gr630" draw:text-style-name="P16" xml:id="id565" draw:id="id565" draw:layer="layout" svg:width="2.796cm" svg:height="0.911cm" svg:x="-11.792cm" svg:y="-24.671cm">
            <draw:text-box>
              <text:p text:style-name="P66"><text:span text:style-name="T65">derivative-free </text:span><text:span text:style-name="T65"><text:line-break/></text:span><text:span text:style-name="T65">global optimizer</text:span></text:p>
            </draw:text-box>
          </draw:frame>
          <draw:connector draw:style-name="gr631" draw:text-style-name="P7" draw:layer="layout" draw:type="curve" svg:x1="-6.605cm" svg:y1="-23.861cm" svg:x2="-8.996cm" svg:y2="-24.215cm" draw:start-shape="id564" draw:start-glue-point="3" draw:end-shape="id565" svg:d="M-6605-23861c-1792 0-597-354-2391-354" svg:viewBox="0 0 2392 355">
            <text:p text:style-name="P5"><text:span text:style-name="T4">using</text:span></text:p>
          </draw:connector>
          <draw:frame draw:style-name="gr521" draw:text-style-name="P5" xml:id="id566" draw:id="id566" draw:layer="layout" svg:width="4.615cm" svg:height="0.907cm" svg:x="-15.651cm" svg:y="-22.635cm">
            <draw:object xlink:href="./Object 11" xlink:type="simple" xlink:show="embed" xlink:actuate="onLoad">
              <loext:p/>
            </draw:object>
            <draw:image xlink:href="./ObjectReplacements/Object 11" xlink:type="simple" xlink:show="embed" xlink:actuate="onLoad"/>
          </draw:frame>
          <draw:connector draw:style-name="gr631" draw:text-style-name="P7" draw:layer="layout" draw:type="curve" svg:x1="-11.792cm" svg:y1="-24.215cm" svg:x2="-13.343cm" svg:y2="-22.635cm" draw:start-shape="id565" draw:start-glue-point="3" draw:end-shape="id566" draw:end-glue-point="0" svg:d="M-11792-24215c-1034 0-1551 526-1551 1580" svg:viewBox="0 0 1552 1581">
            <text:p text:style-name="P5"><text:span text:style-name="T4">converting</text:span></text:p>
          </draw:connector>
          <draw:connector draw:style-name="gr632" draw:text-style-name="P7" draw:layer="layout" draw:type="curve" svg:x1="-13.343cm" svg:y1="-21.728cm" svg:x2="-1.837cm" svg:y2="-20.695cm" draw:start-shape="id566" draw:start-glue-point="2" draw:end-shape="id559" draw:end-glue-point="1" svg:d="M-13343-21728c0 3267 6003 2722 9067 2164s3189-1131 2439-1131" svg:viewBox="0 0 11891 2587">
            <text:p text:style-name="P5"><text:span text:style-name="T4">converting</text:span></text:p>
          </draw:connector>
          <draw:rect draw:style-name="gr41" draw:text-style-name="P19" xml:id="id549" draw:id="id549" draw:layer="layout" svg:width="2.747cm" svg:height="1.768cm" svg:x="-3.296cm" svg:y="-31.245cm">
            <text:p text:style-name="P3"><text:span text:style-name="T4">Regression on</text:span><text:span text:style-name="T4"><text:line-break/></text:span><text:span text:style-name="T4">Action</text:span><text:span text:style-name="T4"><text:line-break/></text:span><text:span text:style-name="T4">potential wave</text:span><text:span text:style-name="T4"><text:line-break/></text:span><text:span text:style-name="T4">sum</text:span><text:span text:style-name="T4"><text:line-break/></text:span><text:span text:style-name="T4">(sensor fusion)</text:span></text:p>
          </draw:rect>
          <draw:g draw:style-name="gr31">
            <draw:custom-shape draw:style-name="gr525" draw:text-style-name="P159" draw:layer="layout" svg:width="0.178cm" svg:height="0.178cm" svg:x="-13.684cm" svg:y="-29.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13.684cm" svg:y="-30.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13.684cm" svg:y="-30.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comment box 17" draw:style-name="gr678" draw:text-style-name="P20" xml:id="id567" draw:id="id567" draw:layer="layout" svg:width="2.145cm" svg:height="1.68cm" svg:x="-8.946cm" svg:y="-23.359cm">
            <text:p text:style-name="P19"><text:span text:style-name="T4">The same as</text:span><text:span text:style-name="T4"><text:line-break/></text:span><text:span text:style-name="T4">internal </text:span></text:p>
            <text:p text:style-name="P19"><text:span text:style-name="T4">language </text:span><text:span text:style-name="T4"><text:line-break/></text:span><text:span text:style-name="T4">building</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6.088cm" svg:y1="-21.451cm" svg:x2="-6.801cm" svg:y2="-22.519cm" draw:end-shape="id567" draw:end-glue-point="7" svg:d="M-6088-21451c-142 0 214-1068-713-1068" svg:viewBox="0 0 714 1069">
            <text:p/>
          </draw:connector>
          <draw:g draw:style-name="gr23" xml:id="id559" draw:id="id559">
            <draw:polygon draw:style-name="gr508" draw:text-style-name="P145" draw:layer="layout" svg:width="1.198cm" svg:height="1.29cm" svg:x="-3.036cm" svg:y="-21.341cm" svg:viewBox="0 0 1199 1291" draw:points="0,0 1199,368 1191,940 0,1291">
              <text:p/>
            </draw:polygon>
          </draw:g>
          <draw:frame draw:style-name="gr135" draw:text-style-name="P41" draw:layer="layout" svg:width="0.97cm" svg:height="0.576cm" svg:x="-1.257cm" svg:y="-21.408cm">
            <draw:image xlink:href="Pictures/100009960000422500002746BB38F83E.svg" xlink:type="simple" xlink:show="embed" xlink:actuate="onLoad" draw:mime-type="image/svg+xml">
              <text:p/>
            </draw:image>
            <draw:image xlink:href="Pictures/10000001000002800000017CBF93BF78.png" xlink:type="simple" xlink:show="embed" xlink:actuate="onLoad" draw:mime-type="image/png"/>
          </draw:frame>
          <draw:connector draw:style-name="gr36" draw:text-style-name="P7" draw:layer="layout" draw:type="curve" svg:x1="-4.751cm" svg:y1="-20.726cm" svg:x2="-3.036cm" svg:y2="-20.695cm" draw:start-shape="id561" draw:start-glue-point="10" draw:end-shape="id559" draw:end-glue-point="3" svg:d="M-4751-20726c1288 0 431 31 1715 31" svg:viewBox="0 0 1716 32">
            <text:p/>
          </draw:connector>
          <draw:frame draw:style-name="gr679" draw:text-style-name="P212" draw:layer="layout" svg:width="1.342cm" svg:height="0.645cm" svg:x="-4.355cm" svg:y="-21.221cm">
            <draw:text-box>
              <text:p><text:span text:style-name="T73">trace</text:span></text:p>
            </draw:text-box>
          </draw:frame>
          <draw:custom-shape draw:name="comment box 18" draw:style-name="gr678" draw:text-style-name="P20" xml:id="id568" draw:id="id568" draw:layer="layout" svg:width="2.145cm" svg:height="1.68cm" svg:x="-3.428cm" svg:y="-19.107cm">
            <text:p text:style-name="P19"><text:span text:style-name="T4">Trained</text:span><text:span text:style-name="T4"><text:line-break/></text:span><text:span text:style-name="T4">during social </text:span><text:span text:style-name="T4"><text:line-break/></text:span><text:span text:style-name="T4">language </text:span><text:span text:style-name="T4"><text:line-break/></text:span><text:span text:style-name="T4">building</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2.436cm" svg:y1="-20.05cm" svg:x2="-2.355cm" svg:y2="-19.107cm" draw:start-shape="id559" draw:start-glue-point="2" draw:end-shape="id568" draw:end-glue-point="4" svg:d="M-2436-20050c0 693 81 222 81 943" svg:viewBox="0 0 82 944">
            <text:p/>
          </draw:connector>
          <draw:frame draw:style-name="gr135" draw:text-style-name="P41" draw:layer="layout" svg:width="1.239cm" svg:height="0.735cm" svg:x="-0.748cm" svg:y="-30.779cm">
            <draw:image xlink:href="Pictures/100009960000422500002746C89C7BB4.svg" xlink:type="simple" xlink:show="embed" xlink:actuate="onLoad" draw:mime-type="image/svg+xml">
              <text:p/>
            </draw:image>
            <draw:image xlink:href="Pictures/10000001000002800000017CB1ECEB8C.png" xlink:type="simple" xlink:show="embed" xlink:actuate="onLoad" draw:mime-type="image/png"/>
          </draw:frame>
          <draw:polygon draw:style-name="gr680" draw:text-style-name="P113" draw:layer="layout" svg:width="1.198cm" svg:height="1.29cm" svg:x="1.703cm" svg:y="-31.14cm" svg:viewBox="0 0 1199 1291" draw:points="0,0 1199,368 1191,940 0,1291">
            <text:p text:style-name="P5"/>
          </draw:polygon>
          <draw:frame draw:style-name="gr681" draw:text-style-name="P196" draw:layer="layout" svg:width="1.687cm" svg:height="0.595cm" svg:x="1.512cm" svg:y="-30.776cm">
            <draw:text-box>
              <text:p text:style-name="P213"><text:span text:style-name="T64">encoder</text:span></text:p>
            </draw:text-box>
          </draw:frame>
          <draw:frame draw:style-name="gr682" draw:text-style-name="P38" draw:layer="layout" svg:width="1.749cm" svg:height="0.725cm" svg:x="-11.862cm" svg:y="-36.145cm">
            <draw:text-box>
              <text:p>During</text:p>
            </draw:text-box>
          </draw:frame>
          <draw:frame draw:style-name="gr681" draw:text-style-name="P196" draw:layer="layout" svg:width="1.687cm" svg:height="0.595cm" svg:x="-3.24cm" svg:y="-20.991cm">
            <draw:text-box>
              <text:p text:style-name="P213"><text:span text:style-name="T64">decoder</text:span></text:p>
            </draw:text-box>
          </draw:frame>
        </draw:g>
        <draw:g draw:style-name="gr23">
          <draw:polygon draw:style-name="gr508" draw:text-style-name="P145" draw:layer="layout" svg:width="1.311cm" svg:height="1.383cm" svg:x="-19.841cm" svg:y="-9.917cm" svg:viewBox="0 0 1312 1384" draw:points="1312,1384 0,792 0,591 1312,0">
            <text:p/>
          </draw:polygon>
          <draw:frame draw:style-name="gr629" draw:text-style-name="P195" draw:layer="layout" svg:width="1.732cm" svg:height="0.569cm" svg:x="-19.95cm" svg:y="-9.519cm">
            <draw:text-box>
              <text:p><text:span text:style-name="T64">decoder</text:span></text:p>
            </draw:text-box>
          </draw:frame>
        </draw:g>
        <draw:g draw:style-name="gr31">
          <draw:g draw:style-name="gr23">
            <draw:polygon draw:style-name="gr510" draw:text-style-name="P113" draw:layer="layout" svg:width="1.292cm" svg:height="1.358cm" svg:x="-21.216cm" svg:y="-9.905cm" svg:viewBox="0 0 1293 1359" draw:points="0,0 1293,581 1293,777 0,1359">
              <text:p/>
            </draw:polygon>
          </draw:g>
          <draw:frame draw:style-name="gr495" draw:text-style-name="P196" draw:layer="layout" svg:width="1.673cm" svg:height="0.887cm" svg:x="-21.395cm" svg:y="-9.528cm">
            <draw:text-box>
              <text:p><text:span text:style-name="T64">encoder</text:span></text:p>
            </draw:text-box>
          </draw:frame>
        </draw:g>
        <draw:connector draw:style-name="gr640" draw:text-style-name="P15" draw:layer="layout" draw:type="line" svg:x1="-24.93cm" svg:y1="-10.093cm" svg:x2="-24.906cm" svg:y2="-8.123cm" svg:d="M-24930-10093l24 1970" svg:viewBox="0 0 25 1971">
          <text:p/>
        </draw:connector>
        <draw:frame draw:style-name="gr683" draw:text-style-name="P197" draw:layer="layout" svg:width="3.475cm" svg:height="0.878cm" svg:x="-24.956cm" svg:y="-9.656cm">
          <draw:text-box>
            <text:p text:style-name="P3"><text:span text:style-name="T68">ROS</text:span></text:p>
          </draw:text-box>
        </draw:frame>
        <draw:custom-shape draw:style-name="gr511" draw:text-style-name="P148" xml:id="id569" draw:id="id569" draw:layer="layout" svg:width="1.34cm" svg:height="1.458cm" svg:x="-91.813cm" svg:y="55.245cm">
          <text:p text:style-name="P147"><text:span text:style-name="T46">x</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1" draw:text-style-name="P150" xml:id="id571" draw:id="id571" draw:layer="layout" svg:width="1.34cm" svg:height="1.458cm" svg:x="-91.813cm" svg:y="57.2cm">
          <text:p text:style-name="P214"><text:span text:style-name="T3">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4" draw:text-style-name="P150" xml:id="id573" draw:id="id573" draw:layer="layout" svg:width="1.34cm" svg:height="1.459cm" svg:x="-91.813cm" svg:y="59.154cm">
          <text:p text:style-name="P214"><text:span text:style-name="T3">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570" draw:id="id570" draw:layer="layout" svg:width="1.34cm" svg:height="1.458cm" svg:x="-87.447cm" svg:y="53.746cm">
          <text:p text:style-name="P151"><text:span text:style-name="T51">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572" draw:id="id572" draw:layer="layout" svg:width="1.34cm" svg:height="1.458cm" svg:x="-87.447cm" svg:y="55.4cm">
          <text:p text:style-name="P151"><text:span text:style-name="T51">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52" xml:id="id574" draw:id="id574" draw:layer="layout" svg:width="1.34cm" svg:height="1.458cm" svg:x="-87.447cm" svg:y="57.054cm">
          <text:p text:style-name="P151"><text:span text:style-name="T51">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90.473cm" svg:y1="55.974cm" svg:x2="-87.447cm" svg:y2="54.475cm" draw:start-shape="id569" draw:start-glue-point="10" draw:end-shape="id570" draw:end-glue-point="6" svg:d="M-90473 55974l3026-1499" svg:viewBox="0 0 3027 1500">
          <text:p/>
        </draw:connector>
        <draw:connector draw:style-name="gr503" draw:text-style-name="P15" draw:layer="layout" draw:type="line" svg:x1="-90.473cm" svg:y1="57.929cm" svg:x2="-87.447cm" svg:y2="56.129cm" draw:start-shape="id571" draw:start-glue-point="10" draw:end-shape="id572" draw:end-glue-point="6" svg:d="M-90473 57929l3026-1800" svg:viewBox="0 0 3027 1801">
          <text:p/>
        </draw:connector>
        <draw:connector draw:style-name="gr503" draw:text-style-name="P15" draw:layer="layout" draw:type="line" svg:x1="-90.473cm" svg:y1="59.884cm" svg:x2="-87.447cm" svg:y2="57.783cm" draw:start-shape="id573" draw:start-glue-point="10" draw:end-shape="id574" draw:end-glue-point="6" svg:d="M-90473 59884l3026-2101" svg:viewBox="0 0 3027 2102">
          <text:p/>
        </draw:connector>
        <draw:connector draw:style-name="gr503" draw:text-style-name="P15" draw:layer="layout" draw:type="line" svg:x1="-90.473cm" svg:y1="59.884cm" svg:x2="-87.447cm" svg:y2="56.129cm" draw:start-shape="id573" draw:start-glue-point="10" draw:end-shape="id572" draw:end-glue-point="6" svg:d="M-90473 59884l3026-3755" svg:viewBox="0 0 3027 3756">
          <text:p/>
        </draw:connector>
        <draw:connector draw:style-name="gr503" draw:text-style-name="P15" draw:layer="layout" draw:type="line" svg:x1="-90.473cm" svg:y1="59.884cm" svg:x2="-87.447cm" svg:y2="54.475cm" draw:start-shape="id573" draw:start-glue-point="10" draw:end-shape="id570" draw:end-glue-point="6" svg:d="M-90473 59884l3026-5409" svg:viewBox="0 0 3027 5410">
          <text:p/>
        </draw:connector>
        <draw:connector draw:style-name="gr503" draw:text-style-name="P15" draw:layer="layout" draw:type="line" svg:x1="-90.473cm" svg:y1="57.929cm" svg:x2="-87.447cm" svg:y2="54.475cm" draw:start-shape="id571" draw:start-glue-point="10" draw:end-shape="id570" draw:end-glue-point="6" svg:d="M-90473 57929l3026-3454" svg:viewBox="0 0 3027 3455">
          <text:p/>
        </draw:connector>
        <draw:connector draw:style-name="gr503" draw:text-style-name="P15" draw:layer="layout" draw:type="line" svg:x1="-90.473cm" svg:y1="57.929cm" svg:x2="-87.447cm" svg:y2="57.783cm" draw:start-shape="id571" draw:start-glue-point="10" draw:end-shape="id574" draw:end-glue-point="6" svg:d="M-90473 57929l3026-146" svg:viewBox="0 0 3027 147">
          <text:p/>
        </draw:connector>
        <draw:connector draw:style-name="gr503" draw:text-style-name="P15" draw:layer="layout" draw:type="line" svg:x1="-90.473cm" svg:y1="55.974cm" svg:x2="-87.447cm" svg:y2="56.129cm" draw:start-shape="id569" draw:start-glue-point="10" draw:end-shape="id572" draw:end-glue-point="6" svg:d="M-90473 55974l3026 155" svg:viewBox="0 0 3027 156">
          <text:p/>
        </draw:connector>
        <draw:connector draw:style-name="gr503" draw:text-style-name="P15" draw:layer="layout" draw:type="line" svg:x1="-90.473cm" svg:y1="55.974cm" svg:x2="-87.447cm" svg:y2="57.783cm" draw:start-shape="id569" draw:start-glue-point="10" draw:end-shape="id574" draw:end-glue-point="6" svg:d="M-90473 55974l3026 1809" svg:viewBox="0 0 3027 1810">
          <text:p/>
        </draw:connector>
        <draw:custom-shape draw:style-name="gr685" draw:text-style-name="P154" xml:id="id575" draw:id="id575" draw:layer="layout" svg:width="1.34cm" svg:height="1.458cm" svg:x="-83.088cm" svg:y="55.445cm">
          <text:p text:style-name="P215"><text:span text:style-name="T74">x</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6" draw:text-style-name="P154" xml:id="id576" draw:id="id576" draw:layer="layout" svg:width="1.34cm" svg:height="1.458cm" svg:x="-83.088cm" svg:y="57.4cm">
          <text:p text:style-name="P215"><text:span text:style-name="T74">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7" draw:text-style-name="P154" xml:id="id577" draw:id="id577" draw:layer="layout" svg:width="1.34cm" svg:height="1.459cm" svg:x="-83.088cm" svg:y="59.354cm">
          <text:p text:style-name="P215"><text:span text:style-name="T74">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86.107cm" svg:y1="54.475cm" svg:x2="-83.088cm" svg:y2="56.174cm" draw:start-shape="id570" draw:start-glue-point="10" draw:end-shape="id575" draw:end-glue-point="6" svg:d="M-86107 54475l3019 1699" svg:viewBox="0 0 3020 1700">
          <text:p/>
        </draw:connector>
        <draw:connector draw:style-name="gr503" draw:text-style-name="P15" draw:layer="layout" draw:type="line" svg:x1="-86.107cm" svg:y1="54.475cm" svg:x2="-83.088cm" svg:y2="58.129cm" draw:start-shape="id570" draw:start-glue-point="10" draw:end-shape="id576" draw:end-glue-point="6" svg:d="M-86107 54475l3019 3654" svg:viewBox="0 0 3020 3655">
          <text:p/>
        </draw:connector>
        <draw:connector draw:style-name="gr503" draw:text-style-name="P15" draw:layer="layout" draw:type="line" svg:x1="-86.107cm" svg:y1="54.475cm" svg:x2="-83.088cm" svg:y2="60.084cm" draw:start-shape="id570" draw:start-glue-point="10" draw:end-shape="id577" draw:end-glue-point="6" svg:d="M-86107 54475l3019 5609" svg:viewBox="0 0 3020 5610">
          <text:p/>
        </draw:connector>
        <draw:connector draw:style-name="gr503" draw:text-style-name="P15" draw:layer="layout" draw:type="line" svg:x1="-86.107cm" svg:y1="56.129cm" svg:x2="-83.088cm" svg:y2="56.174cm" draw:start-shape="id572" draw:start-glue-point="10" draw:end-shape="id575" draw:end-glue-point="6" svg:d="M-86107 56129l3019 45" svg:viewBox="0 0 3020 46">
          <text:p/>
        </draw:connector>
        <draw:connector draw:style-name="gr503" draw:text-style-name="P15" draw:layer="layout" draw:type="line" svg:x1="-86.107cm" svg:y1="56.129cm" svg:x2="-83.088cm" svg:y2="58.129cm" draw:start-shape="id572" draw:start-glue-point="10" draw:end-shape="id576" draw:end-glue-point="6" svg:d="M-86107 56129l3019 2000" svg:viewBox="0 0 3020 2001">
          <text:p/>
        </draw:connector>
        <draw:connector draw:style-name="gr503" draw:text-style-name="P15" draw:layer="layout" draw:type="line" svg:x1="-86.107cm" svg:y1="56.129cm" svg:x2="-83.088cm" svg:y2="60.084cm" draw:start-shape="id572" draw:start-glue-point="10" draw:end-shape="id577" draw:end-glue-point="6" svg:d="M-86107 56129l3019 3955" svg:viewBox="0 0 3020 3956">
          <text:p/>
        </draw:connector>
        <draw:connector draw:style-name="gr503" draw:text-style-name="P15" draw:layer="layout" draw:type="line" svg:x1="-86.107cm" svg:y1="57.783cm" svg:x2="-83.088cm" svg:y2="60.084cm" draw:start-shape="id574" draw:start-glue-point="10" draw:end-shape="id577" draw:end-glue-point="6" svg:d="M-86107 57783l3019 2301" svg:viewBox="0 0 3020 2302">
          <text:p/>
        </draw:connector>
        <draw:connector draw:style-name="gr503" draw:text-style-name="P15" draw:layer="layout" draw:type="line" svg:x1="-86.107cm" svg:y1="57.783cm" svg:x2="-83.088cm" svg:y2="58.129cm" draw:start-shape="id574" draw:start-glue-point="10" draw:end-shape="id576" draw:end-glue-point="6" svg:d="M-86107 57783l3019 346" svg:viewBox="0 0 3020 347">
          <text:p/>
        </draw:connector>
        <draw:connector draw:style-name="gr503" draw:text-style-name="P15" draw:layer="layout" draw:type="line" svg:x1="-86.107cm" svg:y1="57.783cm" svg:x2="-83.088cm" svg:y2="56.174cm" draw:start-shape="id574" draw:start-glue-point="10" draw:end-shape="id575" draw:end-glue-point="6" svg:d="M-86107 57783l3019-1609" svg:viewBox="0 0 3020 1610">
          <text:p/>
        </draw:connector>
        <draw:custom-shape draw:style-name="gr512" draw:text-style-name="P152" xml:id="id578" draw:id="id578" draw:layer="layout" svg:width="1.34cm" svg:height="1.458cm" svg:x="-87.447cm" svg:y="58.858cm">
          <text:p text:style-name="P151"><text:span text:style-name="T51">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86.107cm" svg:y1="59.587cm" svg:x2="-83.088cm" svg:y2="56.174cm" draw:start-shape="id578" draw:start-glue-point="10" draw:end-shape="id575" draw:end-glue-point="6" svg:d="M-86107 59587l3019-3413" svg:viewBox="0 0 3020 3414">
          <text:p/>
        </draw:connector>
        <draw:connector draw:style-name="gr503" draw:text-style-name="P15" draw:layer="layout" draw:type="line" svg:x1="-86.107cm" svg:y1="59.587cm" svg:x2="-83.088cm" svg:y2="60.084cm" draw:start-shape="id578" draw:start-glue-point="10" draw:end-shape="id577" draw:end-glue-point="6" svg:d="M-86107 59587l3019 497" svg:viewBox="0 0 3020 498">
          <text:p/>
        </draw:connector>
        <draw:connector draw:style-name="gr503" draw:text-style-name="P15" draw:layer="layout" draw:type="line" svg:x1="-86.107cm" svg:y1="59.587cm" svg:x2="-83.088cm" svg:y2="58.129cm" draw:start-shape="id578" draw:start-glue-point="10" draw:end-shape="id576" draw:end-glue-point="6" svg:d="M-86107 59587l3019-1458" svg:viewBox="0 0 3020 1459">
          <text:p/>
        </draw:connector>
        <draw:connector draw:style-name="gr503" draw:text-style-name="P15" draw:layer="layout" draw:type="line" svg:x1="-90.473cm" svg:y1="59.884cm" svg:x2="-87.447cm" svg:y2="59.587cm" draw:start-shape="id573" draw:start-glue-point="10" draw:end-shape="id578" draw:end-glue-point="6" svg:d="M-90473 59884l3026-297" svg:viewBox="0 0 3027 298">
          <text:p/>
        </draw:connector>
        <draw:connector draw:style-name="gr503" draw:text-style-name="P15" draw:layer="layout" draw:type="line" svg:x1="-90.473cm" svg:y1="57.929cm" svg:x2="-87.447cm" svg:y2="59.587cm" draw:start-shape="id571" draw:start-glue-point="10" draw:end-shape="id578" draw:end-glue-point="6" svg:d="M-90473 57929l3026 1658" svg:viewBox="0 0 3027 1659">
          <text:p/>
        </draw:connector>
        <draw:connector draw:style-name="gr503" draw:text-style-name="P15" draw:layer="layout" draw:type="line" svg:x1="-90.473cm" svg:y1="55.974cm" svg:x2="-87.447cm" svg:y2="59.587cm" draw:start-shape="id569" draw:start-glue-point="10" draw:end-shape="id578" draw:end-glue-point="6" svg:d="M-90473 55974l3026 3613" svg:viewBox="0 0 3027 3614">
          <text:p/>
        </draw:connector>
        <draw:custom-shape draw:style-name="gr516" draw:text-style-name="P152" xml:id="id579" draw:id="id579" draw:layer="layout" svg:width="1.34cm" svg:height="1.459cm" svg:x="-87.447cm" svg:y="60.662cm">
          <text:p text:style-name="P151"><text:span text:style-name="T5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3" draw:text-style-name="P15" draw:layer="layout" draw:type="line" svg:x1="-86.107cm" svg:y1="61.392cm" svg:x2="-83.088cm" svg:y2="60.084cm" draw:start-shape="id579" draw:start-glue-point="10" draw:end-shape="id577" draw:end-glue-point="6" svg:d="M-86107 61392l3019-1308" svg:viewBox="0 0 3020 1309">
          <text:p/>
        </draw:connector>
        <draw:connector draw:style-name="gr503" draw:text-style-name="P15" draw:layer="layout" draw:type="line" svg:x1="-86.107cm" svg:y1="61.392cm" svg:x2="-83.088cm" svg:y2="58.129cm" draw:start-shape="id579" draw:start-glue-point="10" draw:end-shape="id576" draw:end-glue-point="6" svg:d="M-86107 61392l3019-3263" svg:viewBox="0 0 3020 3264">
          <text:p/>
        </draw:connector>
        <draw:connector draw:style-name="gr503" draw:text-style-name="P15" draw:layer="layout" draw:type="line" svg:x1="-86.107cm" svg:y1="61.392cm" svg:x2="-83.088cm" svg:y2="56.174cm" draw:start-shape="id579" draw:start-glue-point="10" draw:end-shape="id575" draw:end-glue-point="6" svg:d="M-86107 61392l3019-5218" svg:viewBox="0 0 3020 5219">
          <text:p/>
        </draw:connector>
        <draw:connector draw:style-name="gr503" draw:text-style-name="P15" draw:layer="layout" draw:type="line" svg:x1="-90.473cm" svg:y1="59.884cm" svg:x2="-87.447cm" svg:y2="61.392cm" draw:start-shape="id573" draw:start-glue-point="10" draw:end-shape="id579" draw:end-glue-point="6" svg:d="M-90473 59884l3026 1508" svg:viewBox="0 0 3027 1509">
          <text:p/>
        </draw:connector>
        <draw:connector draw:style-name="gr503" draw:text-style-name="P15" draw:layer="layout" draw:type="line" svg:x1="-90.473cm" svg:y1="57.929cm" svg:x2="-87.447cm" svg:y2="61.392cm" draw:start-shape="id571" draw:start-glue-point="10" draw:end-shape="id579" draw:end-glue-point="6" svg:d="M-90473 57929l3026 3463" svg:viewBox="0 0 3027 3464">
          <text:p/>
        </draw:connector>
        <draw:connector draw:style-name="gr503" draw:text-style-name="P15" draw:layer="layout" draw:type="line" svg:x1="-90.473cm" svg:y1="55.974cm" svg:x2="-87.447cm" svg:y2="61.392cm" draw:start-shape="id569" draw:start-glue-point="10" draw:end-shape="id579" draw:end-glue-point="6" svg:d="M-90473 55974l3026 5418" svg:viewBox="0 0 3027 5419">
          <text:p/>
        </draw:connector>
        <draw:custom-shape draw:style-name="gr688" draw:text-style-name="P41" draw:layer="layout" svg:width="0.951cm" svg:height="5.53cm" svg:x="-93.03cm" svg:y="55.245cm">
          <text:p/>
          <draw:enhanced-geometry svg:viewBox="0 0 21600 21600" draw:mirror-horizontal="false" draw:mirror-vertical="false" draw:glue-points="21600 0 0 10800 21600 21600" draw:text-areas="13800 ?f9 21600 ?f10" draw:type="left-brace" draw:modifiers="1800 11023.40123164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689" draw:text-style-name="P38" draw:layer="layout" svg:width="1.578cm" svg:height="1.673cm" svg:x="-94.418cm" svg:y="57.507cm">
          <draw:text-box>
            <text:p>GPS<text:line-break/>Trace<text:line-break/></text:p>
          </draw:text-box>
        </draw:frame>
        <draw:g draw:style-name="gr23">
          <draw:frame draw:style-name="gr135" draw:text-style-name="P41" draw:layer="layout" svg:width="63.239cm" svg:height="26.418cm" svg:x="-92.977cm" svg:y="-66.923cm">
            <draw:image xlink:href="Pictures/10000000000008CD000003AE13A2E865.png" xlink:type="simple" xlink:show="embed" xlink:actuate="onLoad" draw:mime-type="image/png">
              <text:p/>
            </draw:image>
          </draw:frame>
          <draw:frame draw:style-name="gr690" draw:text-style-name="P216" draw:layer="layout" svg:width="2.23cm" svg:height="1.038cm" svg:x="-91.642cm" svg:y="-68.262cm">
            <draw:text-box>
              <text:p><text:span text:style-name="T75">Lidar</text:span></text:p>
            </draw:text-box>
          </draw:frame>
        </draw:g>
        <draw:g draw:style-name="gr23">
          <draw:frame draw:style-name="gr135" draw:text-style-name="P41" draw:layer="layout" svg:width="62.313cm" svg:height="26.161cm" svg:x="-92.187cm" svg:y="-33.464cm">
            <draw:image xlink:href="Pictures/10000000000008DF000003B9CB1644F7.png" xlink:type="simple" xlink:show="embed" xlink:actuate="onLoad" draw:mime-type="image/png">
              <text:p/>
            </draw:image>
          </draw:frame>
          <draw:frame draw:style-name="gr691" draw:text-style-name="P217" draw:layer="layout" svg:width="1.995cm" svg:height="1.038cm" svg:x="-87.361cm" svg:y="-34.973cm">
            <draw:text-box>
              <text:p><text:span text:style-name="T76">GPS</text:span></text:p>
            </draw:text-box>
          </draw:frame>
        </draw:g>
        <draw:g draw:style-name="gr31">
          <draw:custom-shape draw:style-name="gr525" draw:text-style-name="P159" draw:layer="layout" svg:width="0.178cm" svg:height="0.178cm" svg:x="17.3cm" svg:y="6.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17.3cm" svg:y="6.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17.3cm" svg:y="6.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31">
          <draw:custom-shape draw:style-name="gr525" draw:text-style-name="P159" draw:layer="layout" svg:width="0.178cm" svg:height="0.178cm" svg:x="-33.025cm" svg:y="13.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33.025cm" svg:y="13.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5" draw:text-style-name="P159" draw:layer="layout" svg:width="0.178cm" svg:height="0.178cm" svg:x="-33.025cm" svg:y="13.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23">
          <draw:a xlink:href="https://www.youtube.com/watch?v=LJbpXx8fMUk" xlink:type="simple" xlink:show="embed">
            <draw:frame draw:style-name="gr135" draw:text-style-name="P41" draw:layer="layout" svg:width="20.5cm" svg:height="12.203cm" svg:x="-77.883cm" svg:y="27.714cm">
              <draw:image xlink:href="Pictures/10000000000003D00000024573F23757.png" xlink:type="simple" xlink:show="embed" xlink:actuate="onLoad" draw:mime-type="image/png">
                <text:p/>
              </draw:image>
            </draw:frame>
          </draw:a>
          <draw:frame draw:style-name="gr692" draw:text-style-name="P38" draw:layer="layout" svg:width="9.761cm" svg:height="0.725cm" svg:x="-66.939cm" svg:y="33.999cm">
            <draw:text-box>
              <text:p><text:a xlink:href="https://www.youtube.com/watch?v=LJbpXx8fMUk" xlink:type="simple">https://www.youtube.com/watch?v=LJbpXx8fMUk</text:a></text:p>
            </draw:text-box>
          </draw:frame>
        </draw:g>
        <draw:frame draw:style-name="gr693" draw:text-style-name="P38" draw:layer="layout" svg:width="12.243cm" svg:height="1.199cm" svg:x="-51.362cm" svg:y="86.552cm">
          <draw:text-box>
            <text:p text:style-name="P218"><text:span text:style-name="T77">Language works from feature sturktures (trace) </text:span>and afterwards<text:line-break/>. Thats why we don’t cluster FMM params but traces</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7" draw:display-name="Hatching 7" draw:style="single" draw:color="#ed1c24" draw:distance="0.102cm" draw:rotation="450"/>
    <draw:marker draw:name="Arrow" svg:viewBox="0 0 20 20" svg:d="M0 20l10-20 10 20z"/>
    <draw:marker draw:name="Arrow_20_short" draw:display-name="Arrow short" svg:viewBox="0 0 20 13" svg:d="M0 13l10-13 10 13z"/>
    <draw:marker draw:name="Arrowheads_20_100" draw:display-name="Arrowheads 100" svg:viewBox="0 0 20 20" svg:d="M0 20l10-20 10 20z"/>
    <draw:marker draw:name="Arrowheads_20_101" draw:display-name="Arrowheads 101" svg:viewBox="0 0 20 20" svg:d="M0 20l10-20 10 20z"/>
    <draw:marker draw:name="Arrowheads_20_104" draw:display-name="Arrowheads 104" svg:viewBox="0 0 20 20" svg:d="M0 20l10-20 10 20z"/>
    <draw:marker draw:name="Arrowheads_20_107" draw:display-name="Arrowheads 107"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5" draw:display-name="Arrowheads 115" svg:viewBox="0 0 20 20" svg:d="M0 20l10-20 10 20z"/>
    <draw:marker draw:name="Arrowheads_20_116" draw:display-name="Arrowheads 116" svg:viewBox="0 0 20 20" svg:d="M0 20l10-20 10 20z"/>
    <draw:marker draw:name="Arrowheads_20_118" draw:display-name="Arrowheads 118" svg:viewBox="0 0 20 20" svg:d="M0 20l10-20 10 20z"/>
    <draw:marker draw:name="Arrowheads_20_119" draw:display-name="Arrowheads 119" svg:viewBox="0 0 20 20" svg:d="M0 20l10-20 10 20z"/>
    <draw:marker draw:name="Arrowheads_20_12" draw:display-name="Arrowheads 12" svg:viewBox="0 0 20 20" svg:d="M0 20l10-20 10 20z"/>
    <draw:marker draw:name="Arrowheads_20_120" draw:display-name="Arrowheads 120"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6" draw:display-name="Arrowheads 126" svg:viewBox="0 0 20 20" svg:d="M0 20l10-20 10 20z"/>
    <draw:marker draw:name="Arrowheads_20_127" draw:display-name="Arrowheads 127"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 draw:display-name="Arrowheads 13"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14" draw:display-name="Arrowheads 14" svg:viewBox="0 0 20 20" svg:d="M0 20l10-20 10 20z"/>
    <draw:marker draw:name="Arrowheads_20_140" draw:display-name="Arrowheads 140" svg:viewBox="0 0 20 20" svg:d="M0 20l10-20 10 20z"/>
    <draw:marker draw:name="Arrowheads_20_141" draw:display-name="Arrowheads 141" svg:viewBox="0 0 20 20" svg:d="M0 20l10-20 10 20z"/>
    <draw:marker draw:name="Arrowheads_20_142" draw:display-name="Arrowheads 142" svg:viewBox="0 0 20 20" svg:d="M0 20l10-20 10 20z"/>
    <draw:marker draw:name="Arrowheads_20_143" draw:display-name="Arrowheads 143" svg:viewBox="0 0 20 20" svg:d="M0 20l10-20 10 20z"/>
    <draw:marker draw:name="Arrowheads_20_146" draw:display-name="Arrowheads 146" svg:viewBox="0 0 20 20" svg:d="M0 20l10-20 10 20z"/>
    <draw:marker draw:name="Arrowheads_20_147" draw:display-name="Arrowheads 147" svg:viewBox="0 0 20 20" svg:d="M0 20l10-20 10 20z"/>
    <draw:marker draw:name="Arrowheads_20_149" draw:display-name="Arrowheads 149" svg:viewBox="0 0 20 20" svg:d="M0 20l10-20 10 20z"/>
    <draw:marker draw:name="Arrowheads_20_15" draw:display-name="Arrowheads 15" svg:viewBox="0 0 20 20" svg:d="M0 20l10-20 10 20z"/>
    <draw:marker draw:name="Arrowheads_20_150" draw:display-name="Arrowheads 150" svg:viewBox="0 0 20 20" svg:d="M0 20l10-20 10 20z"/>
    <draw:marker draw:name="Arrowheads_20_151" draw:display-name="Arrowheads 151" svg:viewBox="0 0 20 20" svg:d="M0 20l10-20 10 20z"/>
    <draw:marker draw:name="Arrowheads_20_152" draw:display-name="Arrowheads 152" svg:viewBox="0 0 20 20" svg:d="M0 20l10-20 10 20z"/>
    <draw:marker draw:name="Arrowheads_20_153" draw:display-name="Arrowheads 153" svg:viewBox="0 0 20 20" svg:d="M0 20l10-20 10 20z"/>
    <draw:marker draw:name="Arrowheads_20_155" draw:display-name="Arrowheads 155" svg:viewBox="0 0 20 20" svg:d="M0 20l10-20 10 20z"/>
    <draw:marker draw:name="Arrowheads_20_156" draw:display-name="Arrowheads 156" svg:viewBox="0 0 20 20" svg:d="M0 20l10-20 10 20z"/>
    <draw:marker draw:name="Arrowheads_20_157" draw:display-name="Arrowheads 157" svg:viewBox="0 0 20 20" svg:d="M0 20l10-20 10 20z"/>
    <draw:marker draw:name="Arrowheads_20_158" draw:display-name="Arrowheads 158" svg:viewBox="0 0 20 20" svg:d="M0 20l10-20 10 20z"/>
    <draw:marker draw:name="Arrowheads_20_159" draw:display-name="Arrowheads 159" svg:viewBox="0 0 20 20" svg:d="M0 20l10-20 10 20z"/>
    <draw:marker draw:name="Arrowheads_20_16" draw:display-name="Arrowheads 16" svg:viewBox="0 0 20 20" svg:d="M0 20l10-20 10 20z"/>
    <draw:marker draw:name="Arrowheads_20_160" draw:display-name="Arrowheads 160" svg:viewBox="0 0 20 20" svg:d="M0 20l10-20 10 20z"/>
    <draw:marker draw:name="Arrowheads_20_163" draw:display-name="Arrowheads 163" svg:viewBox="0 0 20 20" svg:d="M0 20l10-20 10 20z"/>
    <draw:marker draw:name="Arrowheads_20_164" draw:display-name="Arrowheads 164" svg:viewBox="0 0 20 20" svg:d="M0 20l10-20 10 20z"/>
    <draw:marker draw:name="Arrowheads_20_165" draw:display-name="Arrowheads 165" svg:viewBox="0 0 20 20" svg:d="M0 20l10-20 10 20z"/>
    <draw:marker draw:name="Arrowheads_20_167" draw:display-name="Arrowheads 167" svg:viewBox="0 0 20 20" svg:d="M0 20l10-20 10 20z"/>
    <draw:marker draw:name="Arrowheads_20_168" draw:display-name="Arrowheads 168" svg:viewBox="0 0 20 20" svg:d="M0 20l10-20 10 20z"/>
    <draw:marker draw:name="Arrowheads_20_169" draw:display-name="Arrowheads 169" svg:viewBox="0 0 20 20" svg:d="M0 20l10-20 10 20z"/>
    <draw:marker draw:name="Arrowheads_20_17" draw:display-name="Arrowheads 17" svg:viewBox="0 0 20 20" svg:d="M0 20l10-20 10 20z"/>
    <draw:marker draw:name="Arrowheads_20_170" draw:display-name="Arrowheads 170" svg:viewBox="0 0 20 20" svg:d="M0 20l10-20 10 20z"/>
    <draw:marker draw:name="Arrowheads_20_171" draw:display-name="Arrowheads 171" svg:viewBox="0 0 20 20" svg:d="M0 20l10-20 10 20z"/>
    <draw:marker draw:name="Arrowheads_20_172" draw:display-name="Arrowheads 172" svg:viewBox="0 0 20 20" svg:d="M0 20l10-20 10 20z"/>
    <draw:marker draw:name="Arrowheads_20_173" draw:display-name="Arrowheads 173" svg:viewBox="0 0 20 20" svg:d="M0 20l10-20 10 20z"/>
    <draw:marker draw:name="Arrowheads_20_174" draw:display-name="Arrowheads 174" svg:viewBox="0 0 20 20" svg:d="M0 20l10-20 10 20z"/>
    <draw:marker draw:name="Arrowheads_20_175" draw:display-name="Arrowheads 175" svg:viewBox="0 0 20 20" svg:d="M0 20l10-20 10 20z"/>
    <draw:marker draw:name="Arrowheads_20_176" draw:display-name="Arrowheads 176" svg:viewBox="0 0 20 20" svg:d="M0 20l10-20 10 20z"/>
    <draw:marker draw:name="Arrowheads_20_177" draw:display-name="Arrowheads 177" svg:viewBox="0 0 20 20" svg:d="M0 20l10-20 10 20z"/>
    <draw:marker draw:name="Arrowheads_20_178" draw:display-name="Arrowheads 178" svg:viewBox="0 0 20 20" svg:d="M0 20l10-20 10 20z"/>
    <draw:marker draw:name="Arrowheads_20_18" draw:display-name="Arrowheads 18" svg:viewBox="0 0 20 20" svg:d="M0 20l10-20 10 20z"/>
    <draw:marker draw:name="Arrowheads_20_180" draw:display-name="Arrowheads 180" svg:viewBox="0 0 20 20" svg:d="M0 20l10-20 10 20z"/>
    <draw:marker draw:name="Arrowheads_20_182" draw:display-name="Arrowheads 182" svg:viewBox="0 0 20 20" svg:d="M0 20l10-20 10 20z"/>
    <draw:marker draw:name="Arrowheads_20_183" draw:display-name="Arrowheads 183" svg:viewBox="0 0 20 20" svg:d="M0 20l10-20 10 20z"/>
    <draw:marker draw:name="Arrowheads_20_184" draw:display-name="Arrowheads 184" svg:viewBox="0 0 20 20" svg:d="M0 20l10-20 10 20z"/>
    <draw:marker draw:name="Arrowheads_20_185" draw:display-name="Arrowheads 185" svg:viewBox="0 0 20 20" svg:d="M0 20l10-20 10 20z"/>
    <draw:marker draw:name="Arrowheads_20_186" draw:display-name="Arrowheads 186" svg:viewBox="0 0 20 20" svg:d="M0 20l10-20 10 20z"/>
    <draw:marker draw:name="Arrowheads_20_187" draw:display-name="Arrowheads 187" svg:viewBox="0 0 20 20" svg:d="M0 20l10-20 10 20z"/>
    <draw:marker draw:name="Arrowheads_20_188" draw:display-name="Arrowheads 188" svg:viewBox="0 0 20 20" svg:d="M0 20l10-20 10 20z"/>
    <draw:marker draw:name="Arrowheads_20_189" draw:display-name="Arrowheads 189" svg:viewBox="0 0 20 20" svg:d="M0 20l10-20 10 20z"/>
    <draw:marker draw:name="Arrowheads_20_19" draw:display-name="Arrowheads 19" svg:viewBox="0 0 20 20" svg:d="M0 20l10-20 10 20z"/>
    <draw:marker draw:name="Arrowheads_20_190" draw:display-name="Arrowheads 190" svg:viewBox="0 0 20 20" svg:d="M0 20l10-20 10 20z"/>
    <draw:marker draw:name="Arrowheads_20_191" draw:display-name="Arrowheads 191" svg:viewBox="0 0 20 20" svg:d="M0 20l10-20 10 20z"/>
    <draw:marker draw:name="Arrowheads_20_192" draw:display-name="Arrowheads 192" svg:viewBox="0 0 20 20" svg:d="M0 20l10-20 10 20z"/>
    <draw:marker draw:name="Arrowheads_20_193" draw:display-name="Arrowheads 193" svg:viewBox="0 0 20 20" svg:d="M0 20l10-20 10 20z"/>
    <draw:marker draw:name="Arrowheads_20_194" draw:display-name="Arrowheads 194" svg:viewBox="0 0 20 20" svg:d="M0 20l10-20 10 20z"/>
    <draw:marker draw:name="Arrowheads_20_195" draw:display-name="Arrowheads 195" svg:viewBox="0 0 20 20" svg:d="M0 20l10-20 10 20z"/>
    <draw:marker draw:name="Arrowheads_20_196" draw:display-name="Arrowheads 196" svg:viewBox="0 0 20 20" svg:d="M0 20l10-20 10 20z"/>
    <draw:marker draw:name="Arrowheads_20_197" draw:display-name="Arrowheads 197" svg:viewBox="0 0 20 20" svg:d="M0 20l10-20 10 20z"/>
    <draw:marker draw:name="Arrowheads_20_198" draw:display-name="Arrowheads 198" svg:viewBox="0 0 20 20" svg:d="M0 20l10-20 10 20z"/>
    <draw:marker draw:name="Arrowheads_20_199" draw:display-name="Arrowheads 199" svg:viewBox="0 0 20 20" svg:d="M0 20l10-20 10 20z"/>
    <draw:marker draw:name="Arrowheads_20_20" draw:display-name="Arrowheads 20" svg:viewBox="0 0 20 20" svg:d="M0 20l10-20 10 20z"/>
    <draw:marker draw:name="Arrowheads_20_200" draw:display-name="Arrowheads 200" svg:viewBox="0 0 20 20" svg:d="M0 20l10-20 10 20z"/>
    <draw:marker draw:name="Arrowheads_20_201" draw:display-name="Arrowheads 201" svg:viewBox="0 0 20 20" svg:d="M0 20l10-20 10 20z"/>
    <draw:marker draw:name="Arrowheads_20_202" draw:display-name="Arrowheads 202" svg:viewBox="0 0 20 20" svg:d="M0 20l10-20 10 20z"/>
    <draw:marker draw:name="Arrowheads_20_204" draw:display-name="Arrowheads 204" svg:viewBox="0 0 20 20" svg:d="M0 20l10-20 10 20z"/>
    <draw:marker draw:name="Arrowheads_20_205" draw:display-name="Arrowheads 205" svg:viewBox="0 0 20 20" svg:d="M0 20l10-20 10 20z"/>
    <draw:marker draw:name="Arrowheads_20_206" draw:display-name="Arrowheads 206" svg:viewBox="0 0 20 20" svg:d="M0 20l10-20 10 20z"/>
    <draw:marker draw:name="Arrowheads_20_207" draw:display-name="Arrowheads 207" svg:viewBox="0 0 20 20" svg:d="M0 20l10-20 10 20z"/>
    <draw:marker draw:name="Arrowheads_20_208" draw:display-name="Arrowheads 208" svg:viewBox="0 0 20 20" svg:d="M0 20l10-20 10 20z"/>
    <draw:marker draw:name="Arrowheads_20_209" draw:display-name="Arrowheads 209" svg:viewBox="0 0 20 20" svg:d="M0 20l10-20 10 20z"/>
    <draw:marker draw:name="Arrowheads_20_21" draw:display-name="Arrowheads 21" svg:viewBox="0 0 20 20" svg:d="M0 20l10-20 10 20z"/>
    <draw:marker draw:name="Arrowheads_20_210" draw:display-name="Arrowheads 210" svg:viewBox="0 0 20 20" svg:d="M0 20l10-20 10 20z"/>
    <draw:marker draw:name="Arrowheads_20_211" draw:display-name="Arrowheads 211" svg:viewBox="0 0 20 20" svg:d="M0 20l10-20 10 20z"/>
    <draw:marker draw:name="Arrowheads_20_212" draw:display-name="Arrowheads 212" svg:viewBox="0 0 20 20" svg:d="M0 20l10-20 10 20z"/>
    <draw:marker draw:name="Arrowheads_20_213" draw:display-name="Arrowheads 213" svg:viewBox="0 0 20 20" svg:d="M0 20l10-20 10 20z"/>
    <draw:marker draw:name="Arrowheads_20_214" draw:display-name="Arrowheads 214" svg:viewBox="0 0 20 20" svg:d="M0 20l10-20 10 20z"/>
    <draw:marker draw:name="Arrowheads_20_215" draw:display-name="Arrowheads 215" svg:viewBox="0 0 20 20" svg:d="M0 20l10-20 10 20z"/>
    <draw:marker draw:name="Arrowheads_20_216" draw:display-name="Arrowheads 216" svg:viewBox="0 0 20 20" svg:d="M0 20l10-20 10 20z"/>
    <draw:marker draw:name="Arrowheads_20_217" draw:display-name="Arrowheads 217" svg:viewBox="0 0 20 20" svg:d="M0 20l10-20 10 20z"/>
    <draw:marker draw:name="Arrowheads_20_218" draw:display-name="Arrowheads 218" svg:viewBox="0 0 20 20" svg:d="M0 20l10-20 10 20z"/>
    <draw:marker draw:name="Arrowheads_20_219" draw:display-name="Arrowheads 219" svg:viewBox="0 0 20 20" svg:d="M0 20l10-20 10 20z"/>
    <draw:marker draw:name="Arrowheads_20_22" draw:display-name="Arrowheads 22" svg:viewBox="0 0 20 20" svg:d="M0 20l10-20 10 20z"/>
    <draw:marker draw:name="Arrowheads_20_220" draw:display-name="Arrowheads 220" svg:viewBox="0 0 20 20" svg:d="M0 20l10-20 10 20z"/>
    <draw:marker draw:name="Arrowheads_20_221" draw:display-name="Arrowheads 221" svg:viewBox="0 0 20 20" svg:d="M0 20l10-20 10 20z"/>
    <draw:marker draw:name="Arrowheads_20_222" draw:display-name="Arrowheads 222" svg:viewBox="0 0 20 20" svg:d="M0 20l10-20 10 20z"/>
    <draw:marker draw:name="Arrowheads_20_223" draw:display-name="Arrowheads 223" svg:viewBox="0 0 20 20" svg:d="M0 20l10-20 10 20z"/>
    <draw:marker draw:name="Arrowheads_20_224" draw:display-name="Arrowheads 224" svg:viewBox="0 0 20 20" svg:d="M0 20l10-20 10 20z"/>
    <draw:marker draw:name="Arrowheads_20_225" draw:display-name="Arrowheads 225" svg:viewBox="0 0 20 20" svg:d="M0 20l10-20 10 20z"/>
    <draw:marker draw:name="Arrowheads_20_228" draw:display-name="Arrowheads 228" svg:viewBox="0 0 20 20" svg:d="M0 20l10-20 10 20z"/>
    <draw:marker draw:name="Arrowheads_20_229" draw:display-name="Arrowheads 229" svg:viewBox="0 0 20 20" svg:d="M0 20l10-20 10 20z"/>
    <draw:marker draw:name="Arrowheads_20_23" draw:display-name="Arrowheads 23" svg:viewBox="0 0 20 20" svg:d="M0 20l10-20 10 20z"/>
    <draw:marker draw:name="Arrowheads_20_230" draw:display-name="Arrowheads 230" svg:viewBox="0 0 20 20" svg:d="M0 20l10-20 10 20z"/>
    <draw:marker draw:name="Arrowheads_20_231" draw:display-name="Arrowheads 231" svg:viewBox="0 0 20 20" svg:d="M0 20l10-20 10 20z"/>
    <draw:marker draw:name="Arrowheads_20_233" draw:display-name="Arrowheads 233" svg:viewBox="0 0 20 20" svg:d="M0 20l10-20 10 20z"/>
    <draw:marker draw:name="Arrowheads_20_234" draw:display-name="Arrowheads 234" svg:viewBox="0 0 20 20" svg:d="M0 20l10-20 10 20z"/>
    <draw:marker draw:name="Arrowheads_20_235" draw:display-name="Arrowheads 235" svg:viewBox="0 0 20 20" svg:d="M0 20l10-20 10 20z"/>
    <draw:marker draw:name="Arrowheads_20_237" draw:display-name="Arrowheads 237" svg:viewBox="0 0 20 20" svg:d="M0 20l10-20 10 20z"/>
    <draw:marker draw:name="Arrowheads_20_238" draw:display-name="Arrowheads 238" svg:viewBox="0 0 20 20" svg:d="M0 20l10-20 10 20z"/>
    <draw:marker draw:name="Arrowheads_20_239" draw:display-name="Arrowheads 239" svg:viewBox="0 0 20 20" svg:d="M0 20l10-20 10 20z"/>
    <draw:marker draw:name="Arrowheads_20_24" draw:display-name="Arrowheads 24" svg:viewBox="0 0 20 20" svg:d="M0 20l10-20 10 20z"/>
    <draw:marker draw:name="Arrowheads_20_240" draw:display-name="Arrowheads 240" svg:viewBox="0 0 20 20" svg:d="M0 20l10-20 10 20z"/>
    <draw:marker draw:name="Arrowheads_20_241" draw:display-name="Arrowheads 241" svg:viewBox="0 0 20 20" svg:d="M0 20l10-20 10 20z"/>
    <draw:marker draw:name="Arrowheads_20_242" draw:display-name="Arrowheads 242" svg:viewBox="0 0 20 20" svg:d="M0 20l10-20 10 20z"/>
    <draw:marker draw:name="Arrowheads_20_243" draw:display-name="Arrowheads 243" svg:viewBox="0 0 20 20" svg:d="M0 20l10-20 10 20z"/>
    <draw:marker draw:name="Arrowheads_20_245" draw:display-name="Arrowheads 245" svg:viewBox="0 0 20 20" svg:d="M0 20l10-20 10 20z"/>
    <draw:marker draw:name="Arrowheads_20_246" draw:display-name="Arrowheads 246" svg:viewBox="0 0 20 20" svg:d="M0 20l10-20 10 20z"/>
    <draw:marker draw:name="Arrowheads_20_247" draw:display-name="Arrowheads 247" svg:viewBox="0 0 20 20" svg:d="M0 20l10-20 10 20z"/>
    <draw:marker draw:name="Arrowheads_20_248" draw:display-name="Arrowheads 248" svg:viewBox="0 0 20 20" svg:d="M0 20l10-20 10 20z"/>
    <draw:marker draw:name="Arrowheads_20_249" draw:display-name="Arrowheads 249" svg:viewBox="0 0 20 20" svg:d="M0 20l10-20 10 20z"/>
    <draw:marker draw:name="Arrowheads_20_25" draw:display-name="Arrowheads 25" svg:viewBox="0 0 20 20" svg:d="M0 20l10-20 10 20z"/>
    <draw:marker draw:name="Arrowheads_20_251" draw:display-name="Arrowheads 251" svg:viewBox="0 0 20 20" svg:d="M0 20l10-20 10 20z"/>
    <draw:marker draw:name="Arrowheads_20_253" draw:display-name="Arrowheads 253" svg:viewBox="0 0 20 20" svg:d="M0 20l10-20 10 20z"/>
    <draw:marker draw:name="Arrowheads_20_254" draw:display-name="Arrowheads 254" svg:viewBox="0 0 20 20" svg:d="M0 20l10-20 10 20z"/>
    <draw:marker draw:name="Arrowheads_20_255" draw:display-name="Arrowheads 255" svg:viewBox="0 0 20 20" svg:d="M0 20l10-20 10 20z"/>
    <draw:marker draw:name="Arrowheads_20_256" draw:display-name="Arrowheads 256" svg:viewBox="0 0 20 20" svg:d="M0 20l10-20 10 20z"/>
    <draw:marker draw:name="Arrowheads_20_257" draw:display-name="Arrowheads 257" svg:viewBox="0 0 20 20" svg:d="M0 20l10-20 10 20z"/>
    <draw:marker draw:name="Arrowheads_20_258" draw:display-name="Arrowheads 258" svg:viewBox="0 0 20 20" svg:d="M0 20l10-20 10 20z"/>
    <draw:marker draw:name="Arrowheads_20_259" draw:display-name="Arrowheads 259" svg:viewBox="0 0 20 20" svg:d="M0 20l10-20 10 20z"/>
    <draw:marker draw:name="Arrowheads_20_26" draw:display-name="Arrowheads 26" svg:viewBox="0 0 20 20" svg:d="M0 20l10-20 10 20z"/>
    <draw:marker draw:name="Arrowheads_20_260" draw:display-name="Arrowheads 260" svg:viewBox="0 0 20 20" svg:d="M0 20l10-20 10 20z"/>
    <draw:marker draw:name="Arrowheads_20_261" draw:display-name="Arrowheads 261" svg:viewBox="0 0 20 20" svg:d="M0 20l10-20 10 20z"/>
    <draw:marker draw:name="Arrowheads_20_262" draw:display-name="Arrowheads 262" svg:viewBox="0 0 20 20" svg:d="M0 20l10-20 10 20z"/>
    <draw:marker draw:name="Arrowheads_20_264" draw:display-name="Arrowheads 264" svg:viewBox="0 0 20 20" svg:d="M0 20l10-20 10 20z"/>
    <draw:marker draw:name="Arrowheads_20_265" draw:display-name="Arrowheads 265" svg:viewBox="0 0 20 20" svg:d="M0 20l10-20 10 20z"/>
    <draw:marker draw:name="Arrowheads_20_266" draw:display-name="Arrowheads 266" svg:viewBox="0 0 20 20" svg:d="M0 20l10-20 10 20z"/>
    <draw:marker draw:name="Arrowheads_20_268" draw:display-name="Arrowheads 268" svg:viewBox="0 0 20 20" svg:d="M0 20l10-20 10 20z"/>
    <draw:marker draw:name="Arrowheads_20_269" draw:display-name="Arrowheads 269" svg:viewBox="0 0 20 20" svg:d="M0 20l10-20 10 20z"/>
    <draw:marker draw:name="Arrowheads_20_27" draw:display-name="Arrowheads 27" svg:viewBox="0 0 20 20" svg:d="M0 20l10-20 10 20z"/>
    <draw:marker draw:name="Arrowheads_20_272" draw:display-name="Arrowheads 272" svg:viewBox="0 0 20 20" svg:d="M0 20l10-20 10 20z"/>
    <draw:marker draw:name="Arrowheads_20_273" draw:display-name="Arrowheads 273" svg:viewBox="0 0 20 20" svg:d="M0 20l10-20 10 20z"/>
    <draw:marker draw:name="Arrowheads_20_274" draw:display-name="Arrowheads 274" svg:viewBox="0 0 20 20" svg:d="M0 20l10-20 10 20z"/>
    <draw:marker draw:name="Arrowheads_20_275" draw:display-name="Arrowheads 275" svg:viewBox="0 0 20 20" svg:d="M0 20l10-20 10 20z"/>
    <draw:marker draw:name="Arrowheads_20_276" draw:display-name="Arrowheads 276" svg:viewBox="0 0 20 20" svg:d="M0 20l10-20 10 20z"/>
    <draw:marker draw:name="Arrowheads_20_279" draw:display-name="Arrowheads 279" svg:viewBox="0 0 20 20" svg:d="M0 20l10-20 10 20z"/>
    <draw:marker draw:name="Arrowheads_20_28" draw:display-name="Arrowheads 28" svg:viewBox="0 0 20 20" svg:d="M0 20l10-20 10 20z"/>
    <draw:marker draw:name="Arrowheads_20_280" draw:display-name="Arrowheads 280" svg:viewBox="0 0 20 20" svg:d="M0 20l10-20 10 20z"/>
    <draw:marker draw:name="Arrowheads_20_281" draw:display-name="Arrowheads 281" svg:viewBox="0 0 20 20" svg:d="M0 20l10-20 10 20z"/>
    <draw:marker draw:name="Arrowheads_20_282" draw:display-name="Arrowheads 282" svg:viewBox="0 0 20 20" svg:d="M0 20l10-20 10 20z"/>
    <draw:marker draw:name="Arrowheads_20_283" draw:display-name="Arrowheads 283" svg:viewBox="0 0 20 20" svg:d="M0 20l10-20 10 20z"/>
    <draw:marker draw:name="Arrowheads_20_284" draw:display-name="Arrowheads 284" svg:viewBox="0 0 20 20" svg:d="M0 20l10-20 10 20z"/>
    <draw:marker draw:name="Arrowheads_20_285" draw:display-name="Arrowheads 285" svg:viewBox="0 0 20 20" svg:d="M0 20l10-20 10 20z"/>
    <draw:marker draw:name="Arrowheads_20_286" draw:display-name="Arrowheads 286" svg:viewBox="0 0 20 20" svg:d="M0 20l10-20 10 20z"/>
    <draw:marker draw:name="Arrowheads_20_288" draw:display-name="Arrowheads 288" svg:viewBox="0 0 20 20" svg:d="M0 20l10-20 10 20z"/>
    <draw:marker draw:name="Arrowheads_20_289" draw:display-name="Arrowheads 289" svg:viewBox="0 0 20 20" svg:d="M0 20l10-20 10 20z"/>
    <draw:marker draw:name="Arrowheads_20_29" draw:display-name="Arrowheads 29" svg:viewBox="0 0 20 20" svg:d="M0 20l10-20 10 20z"/>
    <draw:marker draw:name="Arrowheads_20_290" draw:display-name="Arrowheads 290" svg:viewBox="0 0 20 20" svg:d="M0 20l10-20 10 20z"/>
    <draw:marker draw:name="Arrowheads_20_291" draw:display-name="Arrowheads 291" svg:viewBox="0 0 20 20" svg:d="M0 20l10-20 10 20z"/>
    <draw:marker draw:name="Arrowheads_20_292" draw:display-name="Arrowheads 292" svg:viewBox="0 0 20 20" svg:d="M0 20l10-20 10 20z"/>
    <draw:marker draw:name="Arrowheads_20_293" draw:display-name="Arrowheads 293" svg:viewBox="0 0 20 20" svg:d="M0 20l10-20 10 20z"/>
    <draw:marker draw:name="Arrowheads_20_294" draw:display-name="Arrowheads 294" svg:viewBox="0 0 20 20" svg:d="M0 20l10-20 10 20z"/>
    <draw:marker draw:name="Arrowheads_20_295" draw:display-name="Arrowheads 295" svg:viewBox="0 0 20 20" svg:d="M0 20l10-20 10 20z"/>
    <draw:marker draw:name="Arrowheads_20_296" draw:display-name="Arrowheads 296" svg:viewBox="0 0 20 20" svg:d="M0 20l10-20 10 20z"/>
    <draw:marker draw:name="Arrowheads_20_30" draw:display-name="Arrowheads 30" svg:viewBox="0 0 20 20" svg:d="M0 20l10-20 10 20z"/>
    <draw:marker draw:name="Arrowheads_20_300" draw:display-name="Arrowheads 300" svg:viewBox="0 0 20 20" svg:d="M0 20l10-20 10 20z"/>
    <draw:marker draw:name="Arrowheads_20_301" draw:display-name="Arrowheads 301" svg:viewBox="0 0 20 20" svg:d="M0 20l10-20 10 20z"/>
    <draw:marker draw:name="Arrowheads_20_302" draw:display-name="Arrowheads 302" svg:viewBox="0 0 20 20" svg:d="M0 20l10-20 10 20z"/>
    <draw:marker draw:name="Arrowheads_20_305" draw:display-name="Arrowheads 305" svg:viewBox="0 0 20 20" svg:d="M0 20l10-20 10 20z"/>
    <draw:marker draw:name="Arrowheads_20_306" draw:display-name="Arrowheads 306" svg:viewBox="0 0 20 20" svg:d="M0 20l10-20 10 20z"/>
    <draw:marker draw:name="Arrowheads_20_307" draw:display-name="Arrowheads 307" svg:viewBox="0 0 20 20" svg:d="M0 20l10-20 10 20z"/>
    <draw:marker draw:name="Arrowheads_20_308" draw:display-name="Arrowheads 308" svg:viewBox="0 0 20 20" svg:d="M0 20l10-20 10 20z"/>
    <draw:marker draw:name="Arrowheads_20_309" draw:display-name="Arrowheads 309" svg:viewBox="0 0 20 20" svg:d="M0 20l10-20 10 20z"/>
    <draw:marker draw:name="Arrowheads_20_31" draw:display-name="Arrowheads 31" svg:viewBox="0 0 20 20" svg:d="M0 20l10-20 10 20z"/>
    <draw:marker draw:name="Arrowheads_20_310" draw:display-name="Arrowheads 310" svg:viewBox="0 0 20 20" svg:d="M0 20l10-20 10 20z"/>
    <draw:marker draw:name="Arrowheads_20_311" draw:display-name="Arrowheads 311" svg:viewBox="0 0 20 20" svg:d="M0 20l10-20 10 20z"/>
    <draw:marker draw:name="Arrowheads_20_312" draw:display-name="Arrowheads 312" svg:viewBox="0 0 20 20" svg:d="M0 20l10-20 10 20z"/>
    <draw:marker draw:name="Arrowheads_20_313" draw:display-name="Arrowheads 313" svg:viewBox="0 0 20 20" svg:d="M0 20l10-20 10 20z"/>
    <draw:marker draw:name="Arrowheads_20_314" draw:display-name="Arrowheads 314" svg:viewBox="0 0 20 20" svg:d="M0 20l10-20 10 20z"/>
    <draw:marker draw:name="Arrowheads_20_315" draw:display-name="Arrowheads 315" svg:viewBox="0 0 20 20" svg:d="M0 20l10-20 10 20z"/>
    <draw:marker draw:name="Arrowheads_20_317" draw:display-name="Arrowheads 317"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31" draw:display-name="Arrowheads 331" svg:viewBox="0 0 20 20" svg:d="M0 20l10-20 10 20z"/>
    <draw:marker draw:name="Arrowheads_20_334" draw:display-name="Arrowheads 334" svg:viewBox="0 0 20 20" svg:d="M0 20l10-20 10 20z"/>
    <draw:marker draw:name="Arrowheads_20_339" draw:display-name="Arrowheads 339" svg:viewBox="0 0 20 20" svg:d="M0 20l10-20 10 20z"/>
    <draw:marker draw:name="Arrowheads_20_34" draw:display-name="Arrowheads 34" svg:viewBox="0 0 20 20" svg:d="M0 20l10-20 10 20z"/>
    <draw:marker draw:name="Arrowheads_20_340" draw:display-name="Arrowheads 340" svg:viewBox="0 0 20 20" svg:d="M0 20l10-20 10 20z"/>
    <draw:marker draw:name="Arrowheads_20_341" draw:display-name="Arrowheads 341" svg:viewBox="0 0 20 20" svg:d="M0 20l10-20 10 20z"/>
    <draw:marker draw:name="Arrowheads_20_342" draw:display-name="Arrowheads 342" svg:viewBox="0 0 20 20" svg:d="M0 20l10-20 10 20z"/>
    <draw:marker draw:name="Arrowheads_20_348" draw:display-name="Arrowheads 348" svg:viewBox="0 0 20 20" svg:d="M0 20l10-20 10 20z"/>
    <draw:marker draw:name="Arrowheads_20_349" draw:display-name="Arrowheads 349" svg:viewBox="0 0 20 20" svg:d="M0 20l10-20 10 20z"/>
    <draw:marker draw:name="Arrowheads_20_35" draw:display-name="Arrowheads 35" svg:viewBox="0 0 20 20" svg:d="M0 20l10-20 10 20z"/>
    <draw:marker draw:name="Arrowheads_20_350" draw:display-name="Arrowheads 350" svg:viewBox="0 0 20 20" svg:d="M0 20l10-20 10 20z"/>
    <draw:marker draw:name="Arrowheads_20_351" draw:display-name="Arrowheads 351" svg:viewBox="0 0 20 20" svg:d="M0 20l10-20 10 20z"/>
    <draw:marker draw:name="Arrowheads_20_352" draw:display-name="Arrowheads 352" svg:viewBox="0 0 20 20" svg:d="M0 20l10-20 10 20z"/>
    <draw:marker draw:name="Arrowheads_20_353" draw:display-name="Arrowheads 353" svg:viewBox="0 0 20 20" svg:d="M0 20l10-20 10 20z"/>
    <draw:marker draw:name="Arrowheads_20_354" draw:display-name="Arrowheads 354" svg:viewBox="0 0 20 20" svg:d="M0 20l10-20 10 20z"/>
    <draw:marker draw:name="Arrowheads_20_355" draw:display-name="Arrowheads 355" svg:viewBox="0 0 20 20" svg:d="M0 20l10-20 10 20z"/>
    <draw:marker draw:name="Arrowheads_20_356" draw:display-name="Arrowheads 356" svg:viewBox="0 0 20 20" svg:d="M0 20l10-20 10 20z"/>
    <draw:marker draw:name="Arrowheads_20_357" draw:display-name="Arrowheads 357" svg:viewBox="0 0 20 20" svg:d="M0 20l10-20 10 20z"/>
    <draw:marker draw:name="Arrowheads_20_36" draw:display-name="Arrowheads 36" svg:viewBox="0 0 20 20" svg:d="M0 20l10-20 10 20z"/>
    <draw:marker draw:name="Arrowheads_20_361" draw:display-name="Arrowheads 361" svg:viewBox="0 0 20 20" svg:d="M0 20l10-20 10 20z"/>
    <draw:marker draw:name="Arrowheads_20_365" draw:display-name="Arrowheads 365" svg:viewBox="0 0 20 20" svg:d="M0 20l10-20 10 20z"/>
    <draw:marker draw:name="Arrowheads_20_37" draw:display-name="Arrowheads 37" svg:viewBox="0 0 20 20" svg:d="M0 20l10-20 10 20z"/>
    <draw:marker draw:name="Arrowheads_20_375" draw:display-name="Arrowheads 375" svg:viewBox="0 0 20 20" svg:d="M0 20l10-20 10 20z"/>
    <draw:marker draw:name="Arrowheads_20_376" draw:display-name="Arrowheads 376" svg:viewBox="0 0 20 20" svg:d="M0 20l10-20 10 20z"/>
    <draw:marker draw:name="Arrowheads_20_377" draw:display-name="Arrowheads 377" svg:viewBox="0 0 20 20" svg:d="M0 20l10-20 10 20z"/>
    <draw:marker draw:name="Arrowheads_20_378" draw:display-name="Arrowheads 378" svg:viewBox="0 0 20 20" svg:d="M0 20l10-20 10 20z"/>
    <draw:marker draw:name="Arrowheads_20_379" draw:display-name="Arrowheads 379" svg:viewBox="0 0 20 20" svg:d="M0 20l10-20 10 20z"/>
    <draw:marker draw:name="Arrowheads_20_38" draw:display-name="Arrowheads 38" svg:viewBox="0 0 20 20" svg:d="M0 20l10-20 10 20z"/>
    <draw:marker draw:name="Arrowheads_20_380" draw:display-name="Arrowheads 380" svg:viewBox="0 0 20 20" svg:d="M0 20l10-20 10 20z"/>
    <draw:marker draw:name="Arrowheads_20_381" draw:display-name="Arrowheads 381" svg:viewBox="0 0 20 20" svg:d="M0 20l10-20 10 20z"/>
    <draw:marker draw:name="Arrowheads_20_382" draw:display-name="Arrowheads 382" svg:viewBox="0 0 20 20" svg:d="M0 20l10-20 10 20z"/>
    <draw:marker draw:name="Arrowheads_20_383" draw:display-name="Arrowheads 383" svg:viewBox="0 0 20 20" svg:d="M0 20l10-20 10 20z"/>
    <draw:marker draw:name="Arrowheads_20_388" draw:display-name="Arrowheads 388" svg:viewBox="0 0 20 20" svg:d="M0 20l10-20 10 20z"/>
    <draw:marker draw:name="Arrowheads_20_389" draw:display-name="Arrowheads 389" svg:viewBox="0 0 20 20" svg:d="M0 20l10-20 10 20z"/>
    <draw:marker draw:name="Arrowheads_20_39" draw:display-name="Arrowheads 39" svg:viewBox="0 0 20 20" svg:d="M0 20l10-20 10 20z"/>
    <draw:marker draw:name="Arrowheads_20_390" draw:display-name="Arrowheads 390" svg:viewBox="0 0 20 20" svg:d="M0 20l10-20 10 20z"/>
    <draw:marker draw:name="Arrowheads_20_391" draw:display-name="Arrowheads 391" svg:viewBox="0 0 20 20" svg:d="M0 20l10-20 10 20z"/>
    <draw:marker draw:name="Arrowheads_20_392" draw:display-name="Arrowheads 392" svg:viewBox="0 0 20 20" svg:d="M0 20l10-20 10 20z"/>
    <draw:marker draw:name="Arrowheads_20_393" draw:display-name="Arrowheads 393" svg:viewBox="0 0 20 20" svg:d="M0 20l10-20 10 20z"/>
    <draw:marker draw:name="Arrowheads_20_394" draw:display-name="Arrowheads 394" svg:viewBox="0 0 20 20" svg:d="M0 20l10-20 10 20z"/>
    <draw:marker draw:name="Arrowheads_20_395" draw:display-name="Arrowheads 395" svg:viewBox="0 0 20 20" svg:d="M0 20l10-20 10 20z"/>
    <draw:marker draw:name="Arrowheads_20_396" draw:display-name="Arrowheads 396" svg:viewBox="0 0 20 20" svg:d="M0 20l10-20 10 20z"/>
    <draw:marker draw:name="Arrowheads_20_397" draw:display-name="Arrowheads 397" svg:viewBox="0 0 20 20" svg:d="M0 20l10-20 10 20z"/>
    <draw:marker draw:name="Arrowheads_20_398" draw:display-name="Arrowheads 398" svg:viewBox="0 0 20 20" svg:d="M0 20l10-20 10 20z"/>
    <draw:marker draw:name="Arrowheads_20_399" draw:display-name="Arrowheads 399" svg:viewBox="0 0 20 20" svg:d="M0 20l10-20 10 20z"/>
    <draw:marker draw:name="Arrowheads_20_40" draw:display-name="Arrowheads 40" svg:viewBox="0 0 20 20" svg:d="M0 20l10-20 10 20z"/>
    <draw:marker draw:name="Arrowheads_20_400" draw:display-name="Arrowheads 400" svg:viewBox="0 0 20 20" svg:d="M0 20l10-20 10 20z"/>
    <draw:marker draw:name="Arrowheads_20_401" draw:display-name="Arrowheads 401" svg:viewBox="0 0 20 20" svg:d="M0 20l10-20 10 20z"/>
    <draw:marker draw:name="Arrowheads_20_41" draw:display-name="Arrowheads 41" svg:viewBox="0 0 20 20" svg:d="M0 20l10-20 10 20z"/>
    <draw:marker draw:name="Arrowheads_20_418" draw:display-name="Arrowheads 418" svg:viewBox="0 0 20 20" svg:d="M0 20l10-20 10 20z"/>
    <draw:marker draw:name="Arrowheads_20_419" draw:display-name="Arrowheads 419" svg:viewBox="0 0 20 20" svg:d="M0 20l10-20 10 20z"/>
    <draw:marker draw:name="Arrowheads_20_420" draw:display-name="Arrowheads 420" svg:viewBox="0 0 20 13" svg:d="M0 13l10-13 10 13z"/>
    <draw:marker draw:name="Arrowheads_20_421" draw:display-name="Arrowheads 421" svg:viewBox="0 0 20 13" svg:d="M0 13l10-13 10 13z"/>
    <draw:marker draw:name="Arrowheads_20_43" draw:display-name="Arrowheads 43" svg:viewBox="0 0 20 20" svg:d="M0 20l10-20 10 20z"/>
    <draw:marker draw:name="Arrowheads_20_44" draw:display-name="Arrowheads 44"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2" draw:display-name="Arrowheads 62" svg:viewBox="0 0 20 20" svg:d="M0 20l10-20 10 20z"/>
    <draw:marker draw:name="Arrowheads_20_65" draw:display-name="Arrowheads 65" svg:viewBox="0 0 20 20" svg:d="M0 20l10-20 10 20z"/>
    <draw:marker draw:name="Arrowheads_20_67" draw:display-name="Arrowheads 67"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0" draw:display-name="Arrowheads 70" svg:viewBox="0 0 20 20" svg:d="M0 20l10-20 10 20z"/>
    <draw:marker draw:name="Arrowheads_20_71" draw:display-name="Arrowheads 71" svg:viewBox="0 0 20 20" svg:d="M0 20l10-20 10 20z"/>
    <draw:marker draw:name="Arrowheads_20_76" draw:display-name="Arrowheads 76" svg:viewBox="0 0 20 20" svg:d="M0 20l10-20 10 20z"/>
    <draw:marker draw:name="Arrowheads_20_77" draw:display-name="Arrowheads 77" svg:viewBox="0 0 20 20" svg:d="M0 20l10-20 10 20z"/>
    <draw:marker draw:name="Arrowheads_20_78" draw:display-name="Arrowheads 78" svg:viewBox="0 0 20 20" svg:d="M0 20l10-20 10 20z"/>
    <draw:marker draw:name="Arrowheads_20_79" draw:display-name="Arrowheads 79" svg:viewBox="0 0 20 20" svg:d="M0 20l10-20 10 20z"/>
    <draw:marker draw:name="Arrowheads_20_80" draw:display-name="Arrowheads 80" svg:viewBox="0 0 20 20" svg:d="M0 20l10-20 10 20z"/>
    <draw:marker draw:name="Arrowheads_20_82" draw:display-name="Arrowheads 82" svg:viewBox="0 0 20 20" svg:d="M0 20l10-20 10 20z"/>
    <draw:marker draw:name="Arrowheads_20_84" draw:display-name="Arrowheads 84" svg:viewBox="0 0 20 20" svg:d="M0 20l10-20 10 20z"/>
    <draw:marker draw:name="Arrowheads_20_85" draw:display-name="Arrowheads 85" svg:viewBox="0 0 20 20" svg:d="M0 20l10-20 10 20z"/>
    <draw:marker draw:name="Arrowheads_20_86" draw:display-name="Arrowheads 86" svg:viewBox="0 0 20 20" svg:d="M0 20l10-20 10 20z"/>
    <draw:marker draw:name="Arrowheads_20_87" draw:display-name="Arrowheads 87" svg:viewBox="0 0 20 20" svg:d="M0 20l10-20 10 20z"/>
    <draw:marker draw:name="Arrowheads_20_93" draw:display-name="Arrowheads 93" svg:viewBox="0 0 20 20" svg:d="M0 20l10-20 10 20z"/>
    <draw:marker draw:name="Arrowheads_20_96" draw:display-name="Arrowheads 96" svg:viewBox="0 0 20 20" svg:d="M0 20l10-20 10 20z"/>
    <draw:marker draw:name="Arrowheads_20_97" draw:display-name="Arrowheads 97" svg:viewBox="0 0 20 20" svg:d="M0 20l10-20 10 20z"/>
    <draw:marker draw:name="Arrowheads_20_98" draw:display-name="Arrowheads 98" svg:viewBox="0 0 20 20" svg:d="M0 20l10-20 10 20z"/>
    <draw:stroke-dash draw:name="Dash_20_Dot_20_4" draw:display-name="Dash Dot 4" draw:style="rect" draw:dots1="1" draw:dots1-length="0.02cm" draw:dots2="1" draw:dots2-length="0.02cm" draw:distance="0.02cm"/>
    <draw:stroke-dash draw:name="Dot_20__28_Rounded_29_" draw:display-name="Dot (Rounded)" draw:style="round" draw:dots1="1" draw:dots1-length="1%" draw:distance="199%"/>
    <draw:stroke-dash draw:name="Fine_20_Dashed" draw:display-name="Fine Dashed" draw:style="rect" draw:dots1="1" draw:dots1-length="197%" draw:distance="197%"/>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d86a50" draw:marker-start-width="0.2cm" draw:marker-start-center="false" draw:marker-end-width="0.2cm" draw:marker-end-center="false" draw:fill="solid" draw:fill-color="#f9dc8c" loext:fill-use-slide-background="false"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en" fo:country="US"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000000" fo:padding-top="0.1cm" fo:padding-bottom="0.1cm" fo:padding-left="0.1cm" fo:padding-right="0.1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text-properties fo:font-size="12pt" style:font-size-complex="12pt"/>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8T09:11:48.695874949</meta:creation-date>
    <meta:editing-duration>P33DT5H47M41S</meta:editing-duration>
    <meta:editing-cycles>830</meta:editing-cycles>
    <meta:generator>LibreOffice/25.8.0.4$Linux_X86_64 LibreOffice_project/48f00303701489684e67c38c28aff00cd5929e67</meta:generator>
    <dc:title>diagram</dc:title>
    <dc:date>2026-05-19T20:08:58.081684177</dc:date>
    <meta:document-statistic meta:object-count="2116"/>
    <meta:template xlink:type="simple" xlink:actuate="onRequest" xlink:title="diagram" xlink:href="../../../phd_thesis/assets/Templates/diagram1.otg" meta:date="2026-01-08T09:11:48.083349446"/>
  </office:meta>
</office:document-meta>
</file>

<file path=Object 1/content.xml><?xml version="1.0" encoding="utf-8"?>
<math xmlns="http://www.w3.org/1998/Math/MathML" display="block">
  <semantics>
    <mrow>
      <mrow>
        <msubsup>
          <mi>μ</mi>
          <mi>t</mi>
          <mi mathvariant="italic">vel</mi>
        </msubsup>
        <mo stretchy="false">=</mo>
        <mrow>
          <msub>
            <mi>X</mi>
            <mrow>
              <mi>t</mi>
              <mo stretchy="false">−</mo>
              <mn>1</mn>
            </mrow>
          </msub>
          <mo stretchy="false">+</mo>
          <msubsup>
            <mi>P</mi>
            <mrow>
              <mi>t</mi>
              <mo stretchy="false">−</mo>
              <mn>1</mn>
            </mrow>
            <mrow>
              <mo fence="true" form="prefix" stretchy="false">(</mo>
              <mrow>
                <mn>1</mn>
              </mrow>
              <mo fence="true" form="postfix" stretchy="false">)</mo>
            </mrow>
          </msubsup>
        </mrow>
      </mrow>
      <mi mathvariant="normal">Δ</mi>
      <mi>t</mi>
    </mrow>
    <annotation encoding="StarMath 5.0">%mu^{vel}_{t}=X_{t-1} +  P_{t-1}^{(1)} %DELTA t</annotation>
  </semantics>
</math>
</file>

<file path=Object 10/content.xml><?xml version="1.0" encoding="utf-8"?>
<math xmlns="http://www.w3.org/1998/Math/MathML" display="block">
  <semantics>
    <mtable>
      <mtr>
        <mtd>
          <mrow>
            <mi>V</mi>
            <mrow>
              <mrow>
                <mo fence="true" form="prefix" stretchy="false">(</mo>
                <mrow>
                  <mi>t</mi>
                </mrow>
                <mo fence="true" form="postfix" stretchy="false">)</mo>
              </mrow>
              <mo stretchy="false">=</mo>
              <mrow>
                <mi>M</mi>
                <mo stretchy="false">+</mo>
                <msub>
                  <mi>A</mi>
                  <mn>1</mn>
                </msub>
              </mrow>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phantom>
                <mrow>
                  <mi>V</mi>
                  <mrow>
                    <mrow>
                      <mo fence="true" form="prefix" stretchy="false">(</mo>
                      <mrow>
                        <mi>t</mi>
                      </mrow>
                      <mo fence="true" form="postfix" stretchy="false">)</mo>
                    </mrow>
                    <mo stretchy="false">=</mo>
                    <mi>M</mi>
                  </mrow>
                </mrow>
              </mphantom>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V(t) = M + A_1 cos left[ %beta_1 + 2 arctan left( %omega_1 tan left( {t - %alpha_1} over 2 right) right) right]
newline
phantom{V(t) = M} + A_2 cos left[ %beta_2 + 2 arctan left( %omega_2 tan left( {t - %alpha_2} over 2 right) right) right]</annotation>
  </semantics>
</math>
</file>

<file path=Object 11/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2/content.xml><?xml version="1.0" encoding="utf-8"?>
<math xmlns="http://www.w3.org/1998/Math/MathML" display="block">
  <semantics>
    <mrow>
      <mo stretchy="false">(</mo>
      <msubsup>
        <mi>μ</mi>
        <mi>t</mi>
        <mi mathvariant="italic">vel</mi>
      </msubsup>
      <mi>,</mi>
      <msubsup>
        <mi mathvariant="normal">Σ</mi>
        <mi>t</mi>
        <mi mathvariant="italic">vel</mi>
      </msubsup>
      <mo stretchy="false">)</mo>
    </mrow>
    <annotation encoding="StarMath 5.0">\(%mu^{vel}_{t},%SIGMA_t^{vel}\)</annotation>
  </semantics>
</math>
</file>

<file path=Object 3/content.xml><?xml version="1.0" encoding="utf-8"?>
<math xmlns="http://www.w3.org/1998/Math/MathML" display="block">
  <semantics>
    <mrow>
      <mo stretchy="false">(</mo>
      <msubsup>
        <mi>μ</mi>
        <mi>t</mi>
        <mi mathvariant="italic">tr</mi>
      </msubsup>
      <mi>,</mi>
      <msubsup>
        <mi mathvariant="normal">Σ</mi>
        <mi>t</mi>
        <mi mathvariant="italic">tr</mi>
      </msubsup>
      <mo stretchy="false">)</mo>
    </mrow>
    <annotation encoding="StarMath 5.0">\(%mu^{tr}_{t},%SIGMA_t^{tr}\)</annotation>
  </semantics>
</math>
</file>

<file path=Object 4/content.xml><?xml version="1.0" encoding="utf-8"?>
<math xmlns="http://www.w3.org/1998/Math/MathML" display="block">
  <semantics>
    <mrow>
      <mo fence="true" form="prefix" stretchy="false">(</mo>
      <mrow>
        <mrow>
          <mover accent="true">
            <msub>
              <mi>μ</mi>
              <mi>t</mi>
            </msub>
            <mo stretchy="false">^</mo>
          </mover>
          <mi>,</mi>
          <mover accent="true">
            <msub>
              <mi mathvariant="normal">Σ</mi>
              <mi>t</mi>
            </msub>
            <mo stretchy="false">^</mo>
          </mover>
        </mrow>
      </mrow>
      <mo fence="true" form="postfix" stretchy="false">)</mo>
    </mrow>
    <annotation encoding="StarMath 5.0">(hat{%mu_t}, hat{%SIGMA}_t)</annotation>
  </semantics>
</math>
</file>

<file path=Object 5/content.xml><?xml version="1.0" encoding="utf-8"?>
<math xmlns="http://www.w3.org/1998/Math/MathML" display="block">
  <semantics>
    <mrow>
      <mi>J</mi>
      <mo stretchy="false">=</mo>
      <mrow>
        <munderover>
          <mo stretchy="false">∑</mo>
          <mrow>
            <mi>k</mi>
            <mo stretchy="false">=</mo>
            <mn>0</mn>
          </mrow>
          <mrow>
            <mi>N</mi>
            <mo stretchy="false">−</mo>
            <mn>1</mn>
          </mrow>
        </munderover>
        <mrow>
          <mo fence="true" form="prefix" stretchy="true">[</mo>
          <mrow>
            <mrow>
              <msup>
                <mrow>
                  <mo fence="true" form="prefix" stretchy="false">(</mo>
                  <mrow>
                    <mrow>
                      <msub>
                        <mi>x</mi>
                        <mi>k</mi>
                      </msub>
                      <mo stretchy="false">−</mo>
                      <msubsup>
                        <mi>x</mi>
                        <mi>k</mi>
                        <mi mathvariant="italic">ref</mi>
                      </msubsup>
                    </mrow>
                  </mrow>
                  <mo fence="true" form="postfix" stretchy="false">)</mo>
                </mrow>
                <mi>T</mi>
              </msup>
              <mi>Q</mi>
              <mrow>
                <mrow>
                  <mo fence="true" form="prefix" stretchy="false">(</mo>
                  <mrow>
                    <mrow>
                      <msub>
                        <mi>x</mi>
                        <mi>k</mi>
                      </msub>
                      <mo stretchy="false">−</mo>
                      <msubsup>
                        <mi>x</mi>
                        <mi>k</mi>
                        <mi mathvariant="italic">ref</mi>
                      </msubsup>
                    </mrow>
                  </mrow>
                  <mo fence="true" form="postfix" stretchy="false">)</mo>
                </mrow>
                <mo stretchy="false">+</mo>
                <msubsup>
                  <mi>u</mi>
                  <mi>k</mi>
                  <mi>T</mi>
                </msubsup>
              </mrow>
              <mi>R</mi>
              <msub>
                <mi>u</mi>
                <mi>k</mi>
              </msub>
            </mrow>
          </mrow>
          <mo fence="true" form="postfix" stretchy="true">]</mo>
        </mrow>
      </mrow>
    </mrow>
    <annotation encoding="StarMath 5.0">J = sum from {k=0} to {N-1} left [ ( x_k - x_k^{ref} )^T Q ( x_k - x_k^{ref} ) + u_k^T R u_k right ]</annotation>
  </semantics>
</math>
</file>

<file path=Object 6/content.xml><?xml version="1.0" encoding="utf-8"?>
<math xmlns="http://www.w3.org/1998/Math/MathML" display="block">
  <semantics>
    <mtable>
      <mtr>
        <mtd>
          <mrow>
            <mi>V</mi>
            <mrow>
              <mrow>
                <mo fence="true" form="prefix" stretchy="false">(</mo>
                <mrow>
                  <mi>t</mi>
                </mrow>
                <mo fence="true" form="postfix" stretchy="false">)</mo>
              </mrow>
              <mo stretchy="false">=</mo>
              <mrow>
                <mi>M</mi>
                <mo stretchy="false">+</mo>
                <msub>
                  <mi>A</mi>
                  <mn>1</mn>
                </msub>
              </mrow>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phantom>
                <mrow>
                  <mi>V</mi>
                  <mrow>
                    <mrow>
                      <mo fence="true" form="prefix" stretchy="false">(</mo>
                      <mrow>
                        <mi>t</mi>
                      </mrow>
                      <mo fence="true" form="postfix" stretchy="false">)</mo>
                    </mrow>
                    <mo stretchy="false">=</mo>
                    <mi>M</mi>
                  </mrow>
                </mrow>
              </mphantom>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V(t) = M + A_1 cos left[ %beta_1 + 2 arctan left( %omega_1 tan left( {t - %alpha_1} over 2 right) right) right]
newline
phantom{V(t) = M} + A_2 cos left[ %beta_2 + 2 arctan left( %omega_2 tan left( {t - %alpha_2} over 2 right) right) right]</annotation>
  </semantics>
</math>
</file>

<file path=Object 7/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8/content.xml><?xml version="1.0" encoding="utf-8"?>
<math xmlns="http://www.w3.org/1998/Math/MathML" display="block">
  <semantics>
    <mrow>
      <mi>W</mi>
      <mrow>
        <mrow>
          <mo fence="true" form="prefix" stretchy="false">(</mo>
          <mrow>
            <mi>t</mi>
          </mrow>
          <mo fence="true" form="postfix" stretchy="false">)</mo>
        </mrow>
        <mo stretchy="false">=</mo>
        <mi>A</mi>
      </mrow>
      <mi>cos</mi>
      <mrow>
        <mo fence="true" form="prefix" stretchy="true">[</mo>
        <mrow>
          <mrow>
            <mrow>
              <mi>β</mi>
              <mo stretchy="false">+</mo>
              <mn>2</mn>
            </mrow>
            <mi>arctan</mi>
            <mrow>
              <mo fence="true" form="prefix" stretchy="true">(</mo>
              <mrow>
                <mrow>
                  <mi>ω</mi>
                  <mi>tan</mi>
                  <mrow>
                    <mo fence="true" form="prefix" stretchy="true">(</mo>
                    <mrow>
                      <mfrac>
                        <mrow>
                          <mi>t</mi>
                          <mo stretchy="false">−</mo>
                          <mi>α</mi>
                        </mrow>
                        <mn>2</mn>
                      </mfrac>
                    </mrow>
                    <mo fence="true" form="postfix" stretchy="true">)</mo>
                  </mrow>
                </mrow>
              </mrow>
              <mo fence="true" form="postfix" stretchy="true">)</mo>
            </mrow>
          </mrow>
        </mrow>
        <mo fence="true" form="postfix" stretchy="true">]</mo>
      </mrow>
    </mrow>
    <annotation encoding="StarMath 5.0">W(t) = A cos left[ %beta + 2 arctan left( %omega tan left( {t - %alpha} over 2 right) right) right]</annotation>
  </semantics>
</math>
</file>

<file path=Object 9/content.xml><?xml version="1.0" encoding="utf-8"?>
<math xmlns="http://www.w3.org/1998/Math/MathML" display="block">
  <semantics>
    <mtable>
      <mtr>
        <mtd>
          <mrow>
            <mrow>
              <msub>
                <mi>M</mi>
                <mn>1</mn>
              </msub>
              <mo stretchy="false">+</mo>
              <msub>
                <mi>A</mi>
                <mn>1</mn>
              </msub>
            </mrow>
            <mi>cos</mi>
            <mrow>
              <mo fence="true" form="prefix" stretchy="true">[</mo>
              <mrow>
                <mrow>
                  <mrow>
                    <msub>
                      <mi>β</mi>
                      <mn>1</mn>
                    </msub>
                    <mo stretchy="false">+</mo>
                    <mn>2</mn>
                  </mrow>
                  <mi>arctan</mi>
                  <mrow>
                    <mo fence="true" form="prefix" stretchy="true">(</mo>
                    <mrow>
                      <mrow>
                        <msub>
                          <mi>ω</mi>
                          <mn>1</mn>
                        </msub>
                        <mi>tan</mi>
                        <mrow>
                          <mo fence="true" form="prefix" stretchy="true">(</mo>
                          <mrow>
                            <mfrac>
                              <mrow>
                                <mi>t</mi>
                                <mo stretchy="false">−</mo>
                                <msub>
                                  <mi>α</mi>
                                  <mn>1</mn>
                                </msub>
                              </mrow>
                              <mn>2</mn>
                            </mfrac>
                          </mrow>
                          <mo fence="true" form="postfix" stretchy="true">)</mo>
                        </mrow>
                      </mrow>
                    </mrow>
                    <mo fence="true" form="postfix" stretchy="true">)</mo>
                  </mrow>
                </mrow>
              </mrow>
              <mo fence="true" form="postfix" stretchy="true">]</mo>
            </mrow>
          </mrow>
        </mtd>
      </mtr>
      <mtr>
        <mtd>
          <mrow>
            <mrow>
              <msub>
                <mi>M</mi>
                <mn>2</mn>
              </msub>
              <mo stretchy="false">+</mo>
              <msub>
                <mi>A</mi>
                <mn>2</mn>
              </msub>
            </mrow>
            <mi>cos</mi>
            <mrow>
              <mo fence="true" form="prefix" stretchy="true">[</mo>
              <mrow>
                <mrow>
                  <mrow>
                    <msub>
                      <mi>β</mi>
                      <mn>2</mn>
                    </msub>
                    <mo stretchy="false">+</mo>
                    <mn>2</mn>
                  </mrow>
                  <mi>arctan</mi>
                  <mrow>
                    <mo fence="true" form="prefix" stretchy="true">(</mo>
                    <mrow>
                      <mrow>
                        <msub>
                          <mi>ω</mi>
                          <mn>2</mn>
                        </msub>
                        <mi>tan</mi>
                        <mrow>
                          <mo fence="true" form="prefix" stretchy="true">(</mo>
                          <mrow>
                            <mfrac>
                              <mrow>
                                <mi>t</mi>
                                <mo stretchy="false">−</mo>
                                <msub>
                                  <mi>α</mi>
                                  <mn>2</mn>
                                </msub>
                              </mrow>
                              <mn>2</mn>
                            </mfrac>
                          </mrow>
                          <mo fence="true" form="postfix" stretchy="true">)</mo>
                        </mrow>
                      </mrow>
                    </mrow>
                    <mo fence="true" form="postfix" stretchy="true">)</mo>
                  </mrow>
                </mrow>
              </mrow>
              <mo fence="true" form="postfix" stretchy="true">]</mo>
            </mrow>
          </mrow>
        </mtd>
      </mtr>
    </mtable>
    <annotation encoding="StarMath 5.0">M_1 + A_1 cos left[ %beta_1 + 2 arctan left( %omega_1 tan left( {t - %alpha_1} over 2 right) right) right]
newline
M_2+A_2 cos left[ %beta_2 + 2 arctan left( %omega_2 tan left( {t - %alpha_2} over 2 right) right) right]</annotation>
  </semantics>
</math>
</file>