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Pictures/10000000000001A200000048E815E1E3.png" manifest:media-type="image/png"/>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157000000297E1E39E4.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1900000018BB52D7D4C.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settings.xml" manifest:media-type="text/xml"/>
  <manifest:file-entry manifest:full-path="meta.xml" manifest:media-type="text/xml"/>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1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14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objectwithoutfill">
      <style:graphic-properties draw:marker-end="Arrowheads_20_161" draw:marker-end-width="0.3cm" draw:fill="solid" draw:textarea-vertical-align="middle" loext:decorative="false"/>
    </style:style>
    <style:style style:name="gr267" style:family="graphic" style:parent-style-name="standard">
      <style:graphic-properties draw:stroke="solid" svg:stroke-color="#b2b2b2" draw:fill="solid" draw:fill-color="#ffffff" draw:textarea-horizontal-align="justify" draw:textarea-vertical-align="middle" draw:auto-grow-height="true" fo:min-height="0cm" fo:min-width="0cm" fo:wrap-option="wrap" style:writing-mode="lr-tb" loext:decorative="false"/>
      <style:paragraph-properties style:writing-mode="lr-tb"/>
    </style:style>
    <style:style style:name="gr268"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9" style:family="graphic" style:parent-style-name="objectwithoutfill">
      <style:graphic-properties draw:marker-end="Arrowheads_20_225" draw:marker-end-width="0.3cm" draw:fill="solid" draw:textarea-vertical-align="middle" loext:decorative="false"/>
    </style:style>
    <style:style style:name="gr270" style:family="graphic" style:parent-style-name="objectwithoutfill">
      <style:graphic-properties draw:marker-end="Arrowheads_20_228" draw:marker-end-width="0.3cm" draw:fill="solid" draw:textarea-vertical-align="middle" loext:decorative="false"/>
    </style:style>
    <style:style style:name="gr271" style:family="graphic" style:parent-style-name="objectwithoutfill">
      <style:graphic-properties draw:marker-end="Arrowheads_20_229" draw:marker-end-width="0.3cm" draw:fill="solid" draw:textarea-vertical-align="middle" loext:decorative="false"/>
    </style:style>
    <style:style style:name="gr272" style:family="graphic" style:parent-style-name="objectwithoutfill">
      <style:graphic-properties draw:marker-end="Arrowheads_20_230" draw:marker-end-width="0.3cm" draw:fill="solid" draw:textarea-vertical-align="middle" loext:decorative="false"/>
    </style:style>
    <style:style style:name="gr273" style:family="graphic" style:parent-style-name="objectwithoutfill">
      <style:graphic-properties draw:marker-end="Arrowheads_20_231" draw:marker-end-width="0.3cm" draw:fill="solid" draw:textarea-vertical-align="middle" loext:decorative="false"/>
    </style:style>
    <style:style style:name="gr274"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5" style:family="graphic" style:parent-style-name="objectwithoutfill">
      <style:graphic-properties draw:marker-end="Arrowheads_20_233" draw:marker-end-width="0.3cm" draw:fill="solid" draw:textarea-vertical-align="middle" loext:decorative="false"/>
    </style:style>
    <style:style style:name="gr276"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7" style:family="graphic" style:parent-style-name="standard">
      <style:graphic-properties draw:textarea-horizontal-align="center" draw:textarea-vertical-align="middle" loext:decorative="false"/>
      <style:paragraph-properties style:writing-mode="lr-tb"/>
    </style:style>
    <style:style style:name="gr278" style:family="graphic" style:parent-style-name="objectwithoutfill">
      <style:graphic-properties draw:marker-end="Arrowheads_20_234" draw:marker-end-width="0.3cm" draw:fill="solid" draw:textarea-vertical-align="middle" loext:decorative="false"/>
    </style:style>
    <style:style style:name="gr279" style:family="graphic" style:parent-style-name="objectwithoutfill">
      <style:graphic-properties draw:marker-end="Arrowheads_20_235" draw:marker-end-width="0.3cm" draw:fill="solid" draw:textarea-vertical-align="middle" loext:decorative="false"/>
    </style:style>
    <style:style style:name="gr280"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standard">
      <style:graphic-properties svg:stroke-color="#6390c2" draw:fill="solid" draw:fill-color="#b4d2ea" draw:textarea-vertical-align="middle" loext:decorative="false"/>
      <style:paragraph-properties style:writing-mode="lr-tb"/>
    </style:style>
    <style:style style:name="gr295" style:family="graphic" style:parent-style-name="objectwithoutfill">
      <style:graphic-properties draw:marker-end="Arrowheads_20_61" draw:marker-end-width="0.3cm" draw:fill="solid" draw:textarea-vertical-align="middle" loext:decorative="false"/>
    </style:style>
    <style:style style:name="gr296" style:family="graphic" style:parent-style-name="objectwithoutfill">
      <style:graphic-properties draw:marker-end="Arrowheads_20_62" draw:marker-end-width="0.3cm" draw:fill="solid" draw:textarea-vertical-align="middle" loext:decorative="false"/>
    </style:style>
    <style:style style:name="gr297" style:family="graphic" style:parent-style-name="objectwithoutfill">
      <style:graphic-properties draw:marker-end="Arrowheads_20_67" draw:marker-end-width="0.3cm" draw:fill="solid" draw:textarea-vertical-align="middle" loext:decorative="false"/>
    </style:style>
    <style:style style:name="gr298" style:family="graphic" style:parent-style-name="standard">
      <style:graphic-properties svg:stroke-color="#70ae61" draw:fill="solid" draw:fill-color="#accda1" draw:textarea-vertical-align="middle" loext:decorative="false"/>
      <style:paragraph-properties style:writing-mode="lr-tb"/>
    </style:style>
    <style:style style:name="gr299" style:family="graphic" style:parent-style-name="objectwithoutfill">
      <style:graphic-properties draw:marker-end="Arrowheads_20_68" draw:marker-end-width="0.3cm" draw:fill="solid" draw:textarea-vertical-align="middle" loext:decorative="false"/>
    </style:style>
    <style:style style:name="gr300" style:family="graphic" style:parent-style-name="objectwithoutfill">
      <style:graphic-properties draw:marker-end="Arrowheads_20_69" draw:marker-end-width="0.3cm" draw:fill="solid" draw:textarea-vertical-align="middle" loext:decorative="false"/>
    </style:style>
    <style:style style:name="gr301" style:family="graphic" style:parent-style-name="objectwithoutfill">
      <style:graphic-properties draw:marker-end="Arrowheads_20_70" draw:marker-end-width="0.3cm" draw:fill="solid" draw:textarea-vertical-align="middle" loext:decorative="false"/>
    </style:style>
    <style:style style:name="gr302" style:family="graphic" style:parent-style-name="objectwithoutfill">
      <style:graphic-properties draw:marker-end="Arrowheads_20_71" draw:marker-end-width="0.3cm" draw:fill="solid" draw:textarea-vertical-align="middle" loext:decorative="false"/>
    </style:style>
    <style:style style:name="gr303" style:family="graphic" style:parent-style-name="objectwithoutfill">
      <style:graphic-properties draw:marker-end="Arrowheads_20_100" draw:marker-end-width="0.3cm" draw:fill="solid" draw:textarea-vertical-align="middle" loext:decorative="false"/>
    </style:style>
    <style:style style:name="gr304" style:family="graphic" style:parent-style-name="objectwithoutfill">
      <style:graphic-properties draw:marker-end="Arrowheads_20_101" draw:marker-end-width="0.3cm" draw:fill="solid" draw:textarea-vertical-align="middle" loext:decorative="false"/>
    </style:style>
    <style:style style:name="gr305" style:family="graphic" style:parent-style-name="objectwithoutfill">
      <style:graphic-properties draw:marker-end="Arrowheads_20_215" draw:marker-end-width="0.3cm" draw:fill="solid" draw:textarea-vertical-align="middle" loext:decorative="false"/>
    </style:style>
    <style:style style:name="gr306"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7" style:family="graphic" style:parent-style-name="objectwithoutfill">
      <style:graphic-properties draw:marker-end="Arrowheads_20_216" draw:marker-end-width="0.3cm" draw:fill="solid" draw:textarea-vertical-align="middle" loext:decorative="false"/>
    </style:style>
    <style:style style:name="gr308" style:family="graphic" style:parent-style-name="objectwithoutfill">
      <style:graphic-properties draw:marker-end="Arrowheads_20_217" draw:marker-end-width="0.3cm" draw:fill="solid" draw:textarea-vertical-align="middle" loext:decorative="false"/>
    </style:style>
    <style:style style:name="gr309" style:family="graphic" style:parent-style-name="objectwithoutfill">
      <style:graphic-properties draw:marker-end="Arrowheads_20_218" draw:marker-end-width="0.3cm" draw:fill="solid" draw:textarea-vertical-align="middle" loext:decorative="false"/>
    </style:style>
    <style:style style:name="gr310" style:family="graphic" style:parent-style-name="objectwithoutfill">
      <style:graphic-properties draw:marker-end="Arrowheads_20_219" draw:marker-end-width="0.3cm" draw:fill="solid" draw:textarea-vertical-align="middle" loext:decorative="false"/>
    </style:style>
    <style:style style:name="gr311" style:family="graphic" style:parent-style-name="objectwithoutfill">
      <style:graphic-properties draw:marker-end="Arrowheads_20_239" draw:marker-end-width="0.3cm" draw:fill="solid" draw:fill-color="#8fd7d7" draw:textarea-vertical-align="middle" loext:decorative="false"/>
    </style:style>
    <style:style style:name="gr312" style:family="graphic" style:parent-style-name="objectwithoutfill">
      <style:graphic-properties draw:marker-end="Arrowheads_20_240" draw:marker-end-width="0.3cm" draw:fill="solid" draw:fill-color="#8fd7d7" draw:textarea-vertical-align="middle" loext:decorative="false"/>
    </style:style>
    <style:style style:name="gr313" style:family="graphic" style:parent-style-name="objectwithoutfill">
      <style:graphic-properties draw:marker-end="Arrowheads_20_241" draw:marker-end-width="0.3cm" draw:fill="solid" draw:fill-color="#8fd7d7" draw:textarea-vertical-align="middle" loext:decorative="false"/>
    </style:style>
    <style:style style:name="gr314" style:family="graphic" style:parent-style-name="objectwithoutfill">
      <style:graphic-properties draw:marker-end="Arrowheads_20_242" draw:marker-end-width="0.3cm" draw:fill="solid" draw:fill-color="#8fd7d7" draw:textarea-vertical-align="middle" loext:decorative="false"/>
    </style:style>
    <style:style style:name="gr315" style:family="graphic" style:parent-style-name="objectwithoutfill">
      <style:graphic-properties draw:marker-end="Arrowheads_20_247" draw:marker-end-width="0.3cm" draw:fill="solid" draw:textarea-vertical-align="middle" loext:decorative="false"/>
    </style:style>
    <style:style style:name="gr316" style:family="graphic" style:parent-style-name="objectwithoutfill">
      <style:graphic-properties draw:marker-end="Arrowheads_20_248" draw:marker-end-width="0.3cm" draw:fill="solid" draw:textarea-vertical-align="middle" loext:decorative="false"/>
    </style:style>
    <style:style style:name="gr317" style:family="graphic" style:parent-style-name="objectwithoutfill">
      <style:graphic-properties draw:marker-end="Arrowheads_20_249" draw:marker-end-width="0.3cm" draw:fill="solid" draw:textarea-vertical-align="middle" loext:decorative="false"/>
    </style:style>
    <style:style style:name="gr318" style:family="graphic" style:parent-style-name="objectwithoutfill">
      <style:graphic-properties draw:marker-end="Arrowheads_20_251" draw:marker-end-width="0.3cm" draw:fill="solid" draw:textarea-vertical-align="middle" loext:decorative="false"/>
    </style:style>
    <style:style style:name="gr319" style:family="graphic" style:parent-style-name="objectwithoutfill">
      <style:graphic-properties draw:marker-end="Arrowheads_20_253" draw:marker-end-width="0.3cm" draw:fill="solid" draw:textarea-vertical-align="middle" loext:decorative="false"/>
    </style:style>
    <style:style style:name="gr320" style:family="graphic" style:parent-style-name="objectwithoutfill">
      <style:graphic-properties draw:marker-end="Arrowheads_20_254" draw:marker-end-width="0.3cm" draw:fill="solid" draw:textarea-vertical-align="middle" loext:decorative="false"/>
    </style:style>
    <style:style style:name="gr321" style:family="graphic" style:parent-style-name="objectwithoutfill">
      <style:graphic-properties draw:marker-end="Arrowheads_20_255" draw:marker-end-width="0.3cm" draw:fill="solid" draw:textarea-vertical-align="middle" loext:decorative="false"/>
    </style:style>
    <style:style style:name="gr322" style:family="graphic" style:parent-style-name="objectwithoutfill">
      <style:graphic-properties draw:marker-end="Arrowheads_20_256" draw:marker-end-width="0.3cm" draw:fill="solid" draw:textarea-vertical-align="middle" loext:decorative="false"/>
    </style:style>
    <style:style style:name="gr323" style:family="graphic" style:parent-style-name="objectwithoutfill">
      <style:graphic-properties draw:marker-end="Arrowheads_20_257" draw:marker-end-width="0.3cm" draw:fill="solid" draw:textarea-vertical-align="middle" loext:decorative="false"/>
    </style:style>
    <style:style style:name="gr324" style:family="graphic" style:parent-style-name="objectwithoutfill">
      <style:graphic-properties draw:marker-end="Arrowheads_20_258" draw:marker-end-width="0.3cm" draw:fill="solid" draw:textarea-vertical-align="middle" loext:decorative="false"/>
    </style:style>
    <style:style style:name="gr325" style:family="graphic" style:parent-style-name="objectwithoutfill">
      <style:graphic-properties draw:marker-end="Arrowheads_20_259" draw:marker-end-width="0.3cm" draw:fill="solid" draw:textarea-vertical-align="middle" loext:decorative="false"/>
    </style:style>
    <style:style style:name="gr326" style:family="graphic" style:parent-style-name="objectwithoutfill">
      <style:graphic-properties draw:marker-end="Arrowheads_20_260" draw:marker-end-width="0.3cm" draw:fill="solid" draw:textarea-vertical-align="middle" loext:decorative="false"/>
    </style:style>
    <style:style style:name="gr327" style:family="graphic" style:parent-style-name="objectwithoutfill">
      <style:graphic-properties draw:marker-end="Arrowheads_20_261" draw:marker-end-width="0.3cm" draw:fill="solid" draw:textarea-vertical-align="middle" loext:decorative="false"/>
    </style:style>
    <style:style style:name="gr328" style:family="graphic" style:parent-style-name="objectwithoutfill">
      <style:graphic-properties draw:marker-end="Arrowheads_20_262" draw:marker-end-width="0.3cm" draw:fill="solid" draw:textarea-vertical-align="middle" loext:decorative="false"/>
    </style:style>
    <style:style style:name="gr3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30"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1"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3"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4"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5"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6" style:family="graphic" style:parent-style-name="standard">
      <style:graphic-properties draw:stroke="none" draw:fill="none" fo:min-height="1.447cm" loext:decorative="false"/>
      <style:paragraph-properties style:writing-mode="lr-tb"/>
    </style:style>
    <style:style style:name="gr337" style:family="graphic" style:parent-style-name="standard">
      <style:graphic-properties draw:stroke="none" draw:fill="none" fo:min-height="1.446cm" loext:decorative="false"/>
      <style:paragraph-properties style:writing-mode="lr-tb"/>
    </style:style>
    <style:style style:name="gr338"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40"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1" style:family="graphic" style:parent-style-name="objectwithoutfill">
      <style:graphic-properties draw:marker-end="Arrow" draw:marker-end-width="0.3cm" draw:fill="none" draw:textarea-vertical-align="middle" loext:decorative="false"/>
    </style:style>
    <style:style style:name="gr342" style:family="graphic" style:parent-style-name="standard">
      <style:graphic-properties draw:stroke="none" draw:fill="none" fo:min-height="2.167cm" loext:decorative="false"/>
      <style:paragraph-properties style:writing-mode="lr-tb"/>
    </style:style>
    <style:style style:name="gr343"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4"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5"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6" style:family="graphic" style:parent-style-name="standard">
      <style:graphic-properties draw:stroke="none" draw:fill="none" fo:min-height="1.343cm" loext:decorative="false"/>
      <style:paragraph-properties style:writing-mode="lr-tb"/>
    </style:style>
    <style:style style:name="gr347" style:family="graphic" style:parent-style-name="standard">
      <style:graphic-properties draw:stroke="none" draw:fill="none" fo:min-height="1.918cm" loext:decorative="false"/>
      <style:paragraph-properties style:writing-mode="lr-tb"/>
    </style:style>
    <style:style style:name="gr34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9"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50"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1"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2"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4"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5"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6"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7"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8"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60"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1"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3"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4" style:family="graphic" style:parent-style-name="standard">
      <style:graphic-properties draw:stroke="none" svg:stroke-width="0.044cm" draw:stroke-linejoin="miter" draw:fill="solid" draw:fill-color="#000000"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6"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7"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8"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9"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7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2"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3"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5"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6"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7" style:family="graphic" style:parent-style-name="standard">
      <style:graphic-properties draw:fill="solid" draw:fill-color="#e8995a" draw:textarea-vertical-align="middle" loext:decorative="false"/>
    </style:style>
    <style:style style:name="gr378" style:family="graphic" style:parent-style-name="standard">
      <style:graphic-properties draw:fill="solid" draw:fill-color="#c7bcda" draw:textarea-vertical-align="middle" loext:decorative="false"/>
      <style:paragraph-properties style:writing-mode="lr-tb"/>
    </style:style>
    <style:style style:name="gr379" style:family="graphic" style:parent-style-name="standard">
      <style:graphic-properties draw:fill="solid" draw:fill-color="#f9dc8c" draw:textarea-vertical-align="middle" loext:decorative="false"/>
      <style:paragraph-properties style:writing-mode="lr-tb"/>
    </style:style>
    <style:style style:name="gr380" style:family="graphic" style:parent-style-name="objectwithoutfill">
      <style:graphic-properties draw:marker-end="Arrowheads_20_167" draw:marker-end-width="0.3cm" draw:fill="solid" draw:textarea-vertical-align="middle" loext:decorative="false"/>
    </style:style>
    <style:style style:name="gr381" style:family="graphic" style:parent-style-name="objectwithoutfill">
      <style:graphic-properties draw:marker-end="Arrowheads_20_168" draw:marker-end-width="0.3cm" draw:fill="solid" draw:textarea-vertical-align="middle" loext:decorative="false"/>
    </style:style>
    <style:style style:name="gr382" style:family="graphic" style:parent-style-name="objectwithoutfill">
      <style:graphic-properties draw:marker-end="Arrowheads_20_264" draw:marker-end-width="0.3cm" draw:fill="solid" draw:textarea-vertical-align="middle" loext:decorative="false"/>
    </style:style>
    <style:style style:name="gr383" style:family="graphic" style:parent-style-name="objectwithoutfill">
      <style:graphic-properties draw:marker-end="Arrowheads_20_265" draw:marker-end-width="0.3cm" draw:fill="solid" draw:textarea-vertical-align="middle" loext:decorative="false"/>
    </style:style>
    <style:style style:name="gr384" style:family="graphic" style:parent-style-name="objectwithoutfill">
      <style:graphic-properties draw:marker-end="Arrowheads_20_266" draw:marker-end-width="0.3cm" draw:fill="solid" draw:textarea-vertical-align="middle" loext:decorative="false"/>
    </style:style>
    <style:style style:name="gr385"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6" style:family="graphic" style:parent-style-name="objectwithoutfill">
      <style:graphic-properties draw:marker-end="Arrowheads_20_268" draw:marker-end-width="0.3cm" draw:fill="solid" draw:textarea-vertical-align="middle" loext:decorative="false"/>
    </style:style>
    <style:style style:name="gr387" style:family="graphic" style:parent-style-name="objectwithoutfill">
      <style:graphic-properties draw:marker-end="Arrowheads_20_269" draw:marker-end-width="0.3cm" draw:fill="solid" draw:textarea-vertical-align="middle"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9" style:family="graphic" style:parent-style-name="standard">
      <style:graphic-properties draw:fill="solid" draw:fill-color="#d86a50" draw:textarea-vertical-align="middle"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1" style:family="graphic" style:parent-style-name="standard">
      <style:graphic-properties draw:fill="solid" draw:fill-color="#b4d2ea" draw:textarea-vertical-align="middle" loext:decorative="false"/>
    </style:style>
    <style:style style:name="gr392" style:family="graphic" style:parent-style-name="standard">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standard" style:list-style-name="L1">
      <style:graphic-properties draw:fill="solid" draw:fill-color="#f6f5f8" draw:textarea-vertical-align="middle" loext:decorative="false"/>
      <style:paragraph-properties style:writing-mode="lr-tb"/>
    </style:style>
    <style:style style:name="gr395" style:family="graphic" style:parent-style-name="objectwithoutfill">
      <style:graphic-properties draw:marker-end="Arrowheads_20_279" draw:marker-end-width="0.3cm" draw:fill="solid" draw:textarea-vertical-align="middle" loext:decorative="false"/>
    </style:style>
    <style:style style:name="gr396" style:family="graphic" style:parent-style-name="objectwithoutfill">
      <style:graphic-properties draw:marker-end="Arrowheads_20_280" draw:marker-end-width="0.3cm" draw:fill="solid" draw:textarea-vertical-align="middle" loext:decorative="false"/>
    </style:style>
    <style:style style:name="gr397" style:family="graphic" style:parent-style-name="objectwithoutfill">
      <style:graphic-properties draw:marker-end="Arrowheads_20_281" draw:marker-end-width="0.3cm" draw:fill="solid" draw:textarea-vertical-align="middle" loext:decorative="false"/>
    </style:style>
    <style:style style:name="gr398" style:family="graphic" style:parent-style-name="objectwithoutfill">
      <style:graphic-properties draw:marker-end="Arrowheads_20_282" draw:marker-end-width="0.3cm" draw:fill="solid" draw:textarea-vertical-align="middle" loext:decorative="false"/>
    </style:style>
    <style:style style:name="gr399" style:family="graphic" style:parent-style-name="objectwithoutfill">
      <style:graphic-properties draw:marker-end="Arrowheads_20_283" draw:marker-end-width="0.3cm" draw:fill="solid" draw:textarea-vertical-align="middle" loext:decorative="false"/>
    </style:style>
    <style:style style:name="gr400" style:family="graphic" style:parent-style-name="objectwithoutfill">
      <style:graphic-properties draw:marker-end="Arrowheads_20_284" draw:marker-end-width="0.3cm" draw:fill="solid" draw:textarea-vertical-align="middle" loext:decorative="false"/>
    </style:style>
    <style:style style:name="gr401" style:family="graphic" style:parent-style-name="objectwithoutfill">
      <style:graphic-properties draw:marker-end="Arrowheads_20_272" draw:marker-end-width="0.3cm" draw:fill="solid" draw:textarea-vertical-align="middle" loext:decorative="false"/>
    </style:style>
    <style:style style:name="gr402" style:family="graphic" style:parent-style-name="objectwithoutfill">
      <style:graphic-properties draw:marker-end="Arrowheads_20_273" draw:marker-end-width="0.3cm" draw:fill="solid" draw:textarea-vertical-align="middle" loext:decorative="false"/>
    </style:style>
    <style:style style:name="gr403" style:family="graphic" style:parent-style-name="objectwithoutfill">
      <style:graphic-properties draw:marker-end="Arrowheads_20_274" draw:marker-end-width="0.3cm" draw:fill="solid" draw:textarea-vertical-align="middle" loext:decorative="false"/>
    </style:style>
    <style:style style:name="gr404" style:family="graphic" style:parent-style-name="objectwithoutfill">
      <style:graphic-properties draw:marker-end="Arrowheads_20_275" draw:marker-end-width="0.3cm" draw:fill="solid" draw:textarea-vertical-align="middle" loext:decorative="false"/>
    </style:style>
    <style:style style:name="gr405" style:family="graphic" style:parent-style-name="objectwithoutfill">
      <style:graphic-properties draw:marker-end="Arrowheads_20_276" draw:marker-end-width="0.3cm" draw:fill="solid" draw:textarea-vertical-align="middle" loext:decorative="false"/>
    </style:style>
    <style:style style:name="gr406" style:family="graphic" style:parent-style-name="objectwithoutfill">
      <style:graphic-properties draw:marker-end="Arrowheads_20_285" draw:marker-end-width="0.3cm" draw:fill="solid" draw:textarea-vertical-align="middle" loext:decorative="false"/>
    </style:style>
    <style:style style:name="gr407" style:family="graphic" style:parent-style-name="objectwithoutfill">
      <style:graphic-properties draw:marker-end="Arrowheads_20_286" draw:marker-end-width="0.3cm" draw:fill="solid" draw:textarea-vertical-align="middle" loext:decorative="false"/>
    </style:style>
    <style:style style:name="gr408" style:family="graphic" style:parent-style-name="standard">
      <style:graphic-properties draw:fill="solid" draw:fill-color="#f9dc8c" draw:textarea-vertical-align="middle" loext:decorative="false"/>
    </style:style>
    <style:style style:name="gr409" style:family="graphic" style:parent-style-name="standard">
      <style:graphic-properties draw:fill="solid" draw:fill-color="#70ae61" draw:textarea-vertical-align="middle" loext:decorative="false"/>
      <style:paragraph-properties style:writing-mode="lr-tb"/>
    </style:style>
    <style:style style:name="gr410" style:family="graphic" style:parent-style-name="objectwithoutfill">
      <style:graphic-properties draw:marker-end="Arrowheads_20_288" draw:marker-end-width="0.3cm" draw:fill="solid" draw:textarea-vertical-align="middle" loext:decorative="false"/>
    </style:style>
    <style:style style:name="gr411" style:family="graphic" style:parent-style-name="standard">
      <style:graphic-properties draw:fill="solid" draw:fill-color="#9b592e" draw:textarea-vertical-align="middle" loext:decorative="false"/>
      <style:paragraph-properties style:writing-mode="lr-tb"/>
    </style:style>
    <style:style style:name="gr412"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5"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6" style:family="graphic" style:parent-style-name="objectwithoutfill">
      <style:graphic-properties draw:marker-end="Arrowheads_20_289" draw:marker-end-width="0.3cm" draw:fill="solid" draw:textarea-vertical-align="middle" loext:decorative="false"/>
    </style:style>
    <style:style style:name="gr417" style:family="graphic" style:parent-style-name="objectwithoutfill">
      <style:graphic-properties draw:marker-end="Arrowheads_20_290" draw:marker-end-width="0.3cm" draw:fill="solid" draw:textarea-vertical-align="middle" loext:decorative="false"/>
    </style:style>
    <style:style style:name="gr418" style:family="graphic" style:parent-style-name="objectwithoutfill">
      <style:graphic-properties draw:marker-end="Arrowheads_20_291" draw:marker-end-width="0.3cm" draw:fill="solid" draw:textarea-vertical-align="middle" loext:decorative="false"/>
    </style:style>
    <style:style style:name="gr419" style:family="graphic" style:parent-style-name="objectwithoutfill">
      <style:graphic-properties draw:marker-end="Arrowheads_20_292" draw:marker-end-width="0.3cm" draw:fill="solid" draw:textarea-vertical-align="middle" loext:decorative="false"/>
    </style:style>
    <style:style style:name="gr420" style:family="graphic" style:parent-style-name="objectwithoutfill">
      <style:graphic-properties draw:marker-end="Arrowheads_20_293" draw:marker-end-width="0.3cm" draw:fill="solid" draw:textarea-vertical-align="middle" loext:decorative="false"/>
    </style:style>
    <style:style style:name="gr421" style:family="graphic" style:parent-style-name="objectwithoutfill">
      <style:graphic-properties draw:marker-end="Arrowheads_20_294" draw:marker-end-width="0.3cm" draw:fill="solid" draw:textarea-vertical-align="middle" loext:decorative="false"/>
    </style:style>
    <style:style style:name="gr422" style:family="graphic" style:parent-style-name="objectwithoutfill">
      <style:graphic-properties draw:marker-end="Arrowheads_20_296" draw:marker-end-width="0.3cm" draw:fill="solid" draw:textarea-vertical-align="middle" loext:decorative="false"/>
    </style:style>
    <style:style style:name="gr423" style:family="graphic" style:parent-style-name="objectwithoutfill">
      <style:graphic-properties draw:marker-end="Arrowheads_20_300" draw:marker-end-width="0.3cm" draw:fill="solid" draw:textarea-vertical-align="middle" loext:decorative="false"/>
    </style:style>
    <style:style style:name="gr424" style:family="graphic" style:parent-style-name="objectwithoutfill">
      <style:graphic-properties draw:marker-end="Arrowheads_20_301" draw:marker-end-width="0.3cm" draw:fill="solid" draw:textarea-vertical-align="middle" loext:decorative="false"/>
    </style:style>
    <style:style style:name="gr425" style:family="graphic" style:parent-style-name="objectwithoutfill">
      <style:graphic-properties draw:marker-end="Arrowheads_20_302" draw:marker-end-width="0.3cm" draw:fill="solid" draw:textarea-vertical-align="middle" loext:decorative="false"/>
    </style:style>
    <style:style style:name="gr426" style:family="graphic" style:parent-style-name="objectwithoutfill">
      <style:graphic-properties draw:marker-end="Arrowheads_20_303" draw:marker-end-width="0.3cm" draw:fill="solid" draw:textarea-vertical-align="middle" loext:decorative="false"/>
    </style:style>
    <style:style style:name="gr427" style:family="graphic" style:parent-style-name="objectwithoutfill">
      <style:graphic-properties draw:marker-end="Arrowheads_20_304" draw:marker-end-width="0.3cm" draw:fill="solid" draw:textarea-vertical-align="middle" loext:decorative="false"/>
    </style:style>
    <style:style style:name="gr428" style:family="graphic" style:parent-style-name="objectwithoutfill">
      <style:graphic-properties draw:marker-end="Arrowheads_20_305" draw:marker-end-width="0.3cm" draw:fill="solid" draw:textarea-vertical-align="middle" loext:decorative="false"/>
    </style:style>
    <style:style style:name="gr429"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30" style:family="graphic" style:parent-style-name="objectwithoutfill">
      <style:graphic-properties draw:marker-end="Arrowheads_20_307" draw:marker-end-width="0.3cm" draw:fill="solid" draw:textarea-vertical-align="middle" loext:decorative="false"/>
    </style:style>
    <style:style style:name="gr431" style:family="graphic" style:parent-style-name="objectwithoutfill">
      <style:graphic-properties draw:marker-end="Arrowheads_20_308" draw:marker-end-width="0.3cm" draw:fill="solid" draw:textarea-vertical-align="middle" loext:decorative="false"/>
    </style:style>
    <style:style style:name="gr432" style:family="graphic" style:parent-style-name="objectwithoutfill">
      <style:graphic-properties draw:marker-end="Arrowheads_20_309" draw:marker-end-width="0.3cm" draw:fill="solid" draw:textarea-vertical-align="middle" loext:decorative="false"/>
    </style:style>
    <style:style style:name="gr433" style:family="graphic" style:parent-style-name="objectwithoutfill">
      <style:graphic-properties draw:marker-end="Arrowheads_20_310" draw:marker-end-width="0.3cm" draw:fill="solid" draw:textarea-vertical-align="middle" loext:decorative="false"/>
    </style:style>
    <style:style style:name="gr434" style:family="graphic" style:parent-style-name="objectwithoutfill">
      <style:graphic-properties draw:marker-end="Arrowheads_20_311" draw:marker-end-width="0.3cm" draw:fill="solid" draw:textarea-vertical-align="middle" loext:decorative="false"/>
    </style:style>
    <style:style style:name="gr435" style:family="graphic" style:parent-style-name="objectwithoutfill">
      <style:graphic-properties draw:marker-end="Arrowheads_20_312" draw:marker-end-width="0.3cm" draw:fill="solid" draw:textarea-vertical-align="middle" loext:decorative="false"/>
    </style:style>
    <style:style style:name="gr436" style:family="graphic" style:parent-style-name="objectwithoutfill">
      <style:graphic-properties draw:marker-end="Arrowheads_20_313" draw:marker-end-width="0.3cm" draw:fill="solid" draw:textarea-vertical-align="middle" loext:decorative="false"/>
    </style:style>
    <style:style style:name="gr437" style:family="graphic" style:parent-style-name="objectwithoutfill">
      <style:graphic-properties draw:marker-end="Arrowheads_20_314" draw:marker-end-width="0.3cm" draw:fill="solid" draw:textarea-vertical-align="middle" loext:decorative="false"/>
    </style:style>
    <style:style style:name="gr438" style:family="graphic" style:parent-style-name="objectwithoutfill">
      <style:graphic-properties draw:marker-end="Arrowheads_20_315" draw:marker-end-width="0.3cm" draw:fill="solid" draw:textarea-vertical-align="middle" loext:decorative="false"/>
    </style:style>
    <style:style style:name="gr439" style:family="graphic" style:parent-style-name="objectwithoutfill">
      <style:graphic-properties draw:marker-end="Arrowheads_20_295" draw:marker-end-width="0.3cm" draw:fill="solid" draw:textarea-vertical-align="middle" loext:decorative="false"/>
    </style:style>
    <style:style style:name="gr440" style:family="graphic" style:parent-style-name="standard">
      <style:graphic-properties draw:fill="solid" draw:fill-color="#b4d2ea" draw:textarea-vertical-align="middle" loext:decorative="false"/>
      <style:paragraph-properties style:writing-mode="lr-tb"/>
    </style:style>
    <style:style style:name="gr441" style:family="graphic" style:parent-style-name="standard">
      <style:graphic-properties svg:stroke-color="#00b0be" draw:fill="solid" draw:fill-color="#b4d2ea" draw:textarea-vertical-align="middle" loext:decorative="false"/>
      <style:paragraph-properties style:writing-mode="lr-tb"/>
    </style:style>
    <style:style style:name="gr442" style:family="graphic" style:parent-style-name="objectwithoutfill">
      <style:graphic-properties svg:stroke-color="#d86a50" draw:marker-end="Arrowheads_20_339" draw:marker-end-width="0.3cm" draw:fill="solid" draw:textarea-vertical-align="middle" loext:decorative="false"/>
    </style:style>
    <style:style style:name="gr443" style:family="graphic" style:parent-style-name="objectwithoutfill">
      <style:graphic-properties svg:stroke-color="#d86a50" draw:marker-end="Arrowheads_20_340" draw:marker-end-width="0.3cm" draw:fill="solid" draw:textarea-vertical-align="middle" loext:decorative="false"/>
    </style:style>
    <style:style style:name="gr444" style:family="graphic" style:parent-style-name="objectwithoutfill">
      <style:graphic-properties svg:stroke-color="#d86a50" draw:marker-end="Arrowheads_20_341" draw:marker-end-width="0.3cm" draw:fill="solid" draw:textarea-vertical-align="middle" loext:decorative="false"/>
    </style:style>
    <style:style style:name="gr445" style:family="graphic" style:parent-style-name="objectwithoutfill">
      <style:graphic-properties draw:marker-end="Arrowheads_20_342" draw:marker-end-width="0.3cm" draw:fill="solid" draw:textarea-vertical-align="middle" loext:decorative="false"/>
    </style:style>
    <style:style style:name="gr446" style:family="graphic" style:parent-style-name="objectwithoutfill">
      <style:graphic-properties draw:marker-end="Arrowheads_20_348" draw:marker-end-width="0.3cm" draw:fill="solid" draw:textarea-vertical-align="middle" loext:decorative="false"/>
    </style:style>
    <style:style style:name="gr447" style:family="graphic" style:parent-style-name="objectwithoutfill">
      <style:graphic-properties draw:marker-end="Arrowheads_20_349" draw:marker-end-width="0.3cm" draw:fill="solid" draw:textarea-vertical-align="middle" loext:decorative="false"/>
    </style:style>
    <style:style style:name="gr448" style:family="graphic" style:parent-style-name="objectwithoutfill">
      <style:graphic-properties draw:marker-end="Arrowheads_20_350" draw:marker-end-width="0.3cm" draw:fill="solid" draw:textarea-vertical-align="middle" loext:decorative="false"/>
    </style:style>
    <style:style style:name="gr449" style:family="graphic" style:parent-style-name="standard">
      <style:graphic-properties draw:stroke="solid" svg:stroke-color="#345d95" draw:fill="solid" draw:fill-color="#6390c2" draw:textarea-vertical-align="middle" loext:decorative="false"/>
      <style:paragraph-properties style:writing-mode="lr-tb"/>
    </style:style>
    <style:style style:name="gr450" style:family="graphic" style:parent-style-name="standard">
      <style:graphic-properties draw:stroke="solid" svg:stroke-color="#d86a50" draw:fill="solid" draw:fill-color="#9b592e" draw:textarea-vertical-align="middle" loext:decorative="false"/>
      <style:paragraph-properties style:writing-mode="lr-tb"/>
    </style:style>
    <style:style style:name="gr451" style:family="graphic" style:parent-style-name="objectwithoutfill">
      <style:graphic-properties draw:marker-end="Arrowheads_20_351" draw:marker-end-width="0.3cm" draw:fill="solid" draw:textarea-vertical-align="middle" loext:decorative="false"/>
    </style:style>
    <style:style style:name="gr452" style:family="graphic" style:parent-style-name="objectwithoutfill">
      <style:graphic-properties draw:marker-end="Arrowheads_20_352" draw:marker-end-width="0.3cm" draw:fill="solid" draw:textarea-vertical-align="middle" loext:decorative="false"/>
    </style:style>
    <style:style style:name="gr453" style:family="graphic" style:parent-style-name="objectwithoutfill">
      <style:graphic-properties draw:marker-end="Arrowheads_20_353" draw:marker-end-width="0.3cm" draw:fill="solid" draw:textarea-vertical-align="middle" loext:decorative="false"/>
    </style:style>
    <style:style style:name="gr454" style:family="graphic" style:parent-style-name="objectwithoutfill">
      <style:graphic-properties draw:marker-end="Arrowheads_20_354" draw:marker-end-width="0.3cm" draw:fill="solid" draw:textarea-vertical-align="middle" loext:decorative="false"/>
    </style:style>
    <style:style style:name="gr455" style:family="graphic" style:parent-style-name="objectwithoutfill">
      <style:graphic-properties draw:marker-end="Arrowheads_20_355" draw:marker-end-width="0.3cm" draw:fill="solid" draw:textarea-vertical-align="middle" loext:decorative="false"/>
    </style:style>
    <style:style style:name="gr456" style:family="graphic" style:parent-style-name="objectwithoutfill">
      <style:graphic-properties draw:marker-end="Arrowheads_20_356" draw:marker-end-width="0.3cm" draw:fill="solid" draw:textarea-vertical-align="middle" loext:decorative="false"/>
    </style:style>
    <style:style style:name="gr457" style:family="graphic" style:parent-style-name="objectwithoutfill">
      <style:graphic-properties draw:marker-end="Arrowheads_20_357" draw:marker-end-width="0.3cm" draw:fill="solid" draw:textarea-vertical-align="middle" loext:decorative="false"/>
    </style:style>
    <style:style style:name="gr458" style:family="graphic" style:parent-style-name="objectwithoutfill">
      <style:graphic-properties draw:marker-end="Arrowheads_20_358" draw:marker-end-width="0.3cm" draw:fill="solid" draw:textarea-vertical-align="middle" loext:decorative="false"/>
    </style:style>
    <style:style style:name="gr459" style:family="graphic" style:parent-style-name="objectwithoutfill">
      <style:graphic-properties draw:marker-end="Arrowheads_20_359" draw:marker-end-width="0.3cm" draw:fill="solid" draw:textarea-vertical-align="middle" loext:decorative="false"/>
    </style:style>
    <style:style style:name="gr460" style:family="graphic" style:parent-style-name="objectwithoutfill">
      <style:graphic-properties draw:marker-end="Arrowheads_20_360" draw:marker-end-width="0.3cm" draw:fill="solid" draw:textarea-vertical-align="middle" loext:decorative="false"/>
    </style:style>
    <style:style style:name="gr461"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62" style:family="graphic" style:parent-style-name="objectwithoutfill">
      <style:graphic-properties draw:marker-end="Arrowheads_20_377" draw:marker-end-width="0.3cm" draw:fill="solid" draw:textarea-vertical-align="middle" loext:decorative="false"/>
    </style:style>
    <style:style style:name="gr463" style:family="graphic" style:parent-style-name="objectwithoutfill">
      <style:graphic-properties draw:marker-end="Arrowheads_20_378" draw:marker-end-width="0.3cm" draw:fill="solid" draw:textarea-vertical-align="middle" loext:decorative="false"/>
    </style:style>
    <style:style style:name="gr464" style:family="graphic" style:parent-style-name="objectwithoutfill">
      <style:graphic-properties draw:marker-end="Arrowheads_20_379" draw:marker-end-width="0.3cm" draw:fill="solid" draw:textarea-vertical-align="middle" loext:decorative="false"/>
    </style:style>
    <style:style style:name="gr465" style:family="graphic" style:parent-style-name="objectwithoutfill">
      <style:graphic-properties draw:marker-end="Arrowheads_20_380" draw:marker-end-width="0.3cm" draw:fill="solid" draw:textarea-vertical-align="middle" loext:decorative="false"/>
    </style:style>
    <style:style style:name="gr466" style:family="graphic" style:parent-style-name="objectwithoutfill">
      <style:graphic-properties draw:marker-end="Arrowheads_20_381" draw:marker-end-width="0.3cm" draw:fill="solid" draw:textarea-vertical-align="middle" loext:decorative="false"/>
    </style:style>
    <style:style style:name="gr467"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68"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69"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0"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1"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2"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3"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4"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75"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76"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7"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78"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79"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80"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1"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2"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83"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84"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85"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8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13cm" fo:min-width="2.033cm" fo:padding-top="0.45cm" fo:padding-bottom="0.25cm" fo:padding-left="0.27cm" fo:padding-right="0.27cm" style:writing-mode="lr-tb" loext:decorative="false"/>
      <style:paragraph-properties style:writing-mode="lr-tb"/>
    </style:style>
    <style:style style:name="gr487" style:family="graphic" style:parent-style-name="objectwithoutfill">
      <style:graphic-properties draw:stroke="dash" draw:stroke-dash="Long_20_Dash" svg:stroke-width="0.04cm" svg:stroke-color="#6390c2" draw:marker-start-width="0.26cm" draw:marker-end-width="0.26cm" draw:fill="solid" draw:fill-color="#8fd7d7" draw:opacity="25%" draw:textarea-vertical-align="middle" fo:padding-top="0.12cm" fo:padding-bottom="0.12cm" fo:padding-left="0.12cm" fo:padding-right="0.12cm" draw:shadow-opacity="25%" loext:decorative="false"/>
    </style:style>
    <style:style style:name="gr488"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89"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490" style:family="graphic" style:parent-style-name="standard">
      <style:graphic-properties draw:stroke="none" svg:stroke-color="#000000" draw:fill="none" draw:fill-color="#ffffff" draw:textarea-horizontal-align="left" draw:auto-grow-height="true" draw:auto-grow-width="true" fo:min-height="0.949cm" fo:min-width="4.024cm" loext:decorative="false"/>
      <style:paragraph-properties style:writing-mode="lr-tb"/>
    </style:style>
    <style:style style:name="gr491"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92" style:family="graphic" style:parent-style-name="objectwithoutfill">
      <style:graphic-properties draw:marker-end="Arrowheads_20_398" draw:marker-end-width="0.3cm" draw:fill="solid" draw:textarea-vertical-align="middle" loext:decorative="false"/>
    </style:style>
    <style:style style:name="gr493"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94"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95"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98" style:family="graphic" style:parent-style-name="standard">
      <style:graphic-properties draw:stroke="none" draw:fill="none" fo:min-height="0.32cm" loext:decorative="false"/>
      <style:paragraph-properties style:writing-mode="lr-tb"/>
    </style:style>
    <style:style style:name="gr499"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00"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501"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502"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503"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504"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05"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506"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07"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508"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509"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10"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12"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3"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14" style:family="graphic" style:parent-style-name="objectwithoutfill">
      <style:graphic-properties draw:marker-end="" draw:marker-end-width="0.1cm" draw:fill="solid" draw:textarea-vertical-align="middle" loext:decorative="false"/>
    </style:style>
    <style:style style:name="gr515"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16" style:family="graphic" style:parent-style-name="objectwithoutfill">
      <style:graphic-properties draw:marker-start="Arrow_20_short" draw:marker-end="" draw:marker-end-width="0.2cm" draw:fill="solid" draw:textarea-vertical-align="middle" loext:decorative="false"/>
    </style:style>
    <style:style style:name="gr517" style:family="graphic" style:parent-style-name="objectwithoutfill">
      <style:graphic-properties draw:marker-start="" draw:marker-end="Arrow_20_short" draw:marker-end-width="0.2cm" draw:fill="solid" draw:textarea-vertical-align="middle"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19"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21"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6"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27" style:family="graphic" style:parent-style-name="standard">
      <style:graphic-properties draw:stroke="none" svg:stroke-color="#000000" draw:fill="none" draw:fill-color="#ffffff" draw:textarea-horizontal-align="center" draw:auto-grow-height="true" draw:auto-grow-width="true" fo:min-height="1.423cm" fo:min-width="6.356cm" loext:decorative="false"/>
      <style:paragraph-properties style:writing-mode="lr-tb"/>
    </style:style>
    <style:style style:name="gr528" style:family="graphic" style:parent-style-name="standard">
      <style:graphic-properties draw:fill="none" draw:textarea-vertical-align="middle" draw:auto-grow-height="false" fo:min-height="5.322cm" fo:min-width="0cm" fo:wrap-option="wrap" loext:decorative="false"/>
    </style:style>
    <style:style style:name="gr529"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30" style:family="graphic" style:parent-style-name="standard">
      <style:graphic-properties draw:fill="none" draw:textarea-vertical-align="middle" draw:auto-grow-height="false" fo:min-height="5.752cm" fo:min-width="0cm" fo:wrap-option="wrap" loext:decorative="false"/>
    </style:style>
    <style:style style:name="gr531" style:family="graphic" style:parent-style-name="standard">
      <style:graphic-properties draw:stroke="none" svg:stroke-color="#000000" draw:fill="none" draw:fill-color="#ffffff" draw:textarea-horizontal-align="left" draw:auto-grow-height="true" draw:auto-grow-width="true" fo:min-height="2.371cm" fo:min-width="2.716cm" loext:decorative="false"/>
      <style:paragraph-properties style:writing-mode="lr-tb"/>
    </style:style>
    <style:style style:name="gr532" style:family="graphic" style:parent-style-name="objectwithoutfill">
      <style:graphic-properties draw:marker-end="Arrowheads_20_418" draw:marker-end-width="0.3cm" draw:fill="solid" draw:textarea-vertical-align="middle" loext:decorative="false"/>
    </style:style>
    <style:style style:name="gr533" style:family="graphic" style:parent-style-name="objectwithoutfill">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34" style:family="graphic" style:parent-style-name="standard">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3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3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7" style:family="graphic" style:parent-style-name="standard">
      <style:graphic-properties draw:stroke="none" draw:fill="none" draw:textarea-horizontal-align="center" fo:min-height="1.971cm" loext:decorative="false"/>
      <style:paragraph-properties style:writing-mode="lr-tb"/>
    </style:style>
    <style:style style:name="gr538" style:family="graphic" style:parent-style-name="standard">
      <style:graphic-properties draw:textarea-horizontal-align="justify" draw:textarea-vertical-align="middle" draw:auto-grow-height="false" fo:min-height="3.285cm" fo:min-width="2.618cm" loext:decorative="false"/>
    </style:style>
    <style:style style:name="gr539" style:family="graphic" style:parent-style-name="standard">
      <style:graphic-properties draw:stroke="none" draw:fill="solid" draw:fill-color="#345d95" draw:textarea-vertical-align="middle" draw:auto-grow-height="false" fo:min-height="0cm" fo:min-width="0cm" loext:decorative="false"/>
    </style:style>
    <style:style style:name="gr540"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41" style:family="graphic" style:parent-style-name="standard">
      <style:graphic-properties draw:stroke="none" draw:fill="solid" draw:fill-color="#b4d2ea" draw:textarea-vertical-align="middle" draw:auto-grow-height="false" fo:min-height="0cm" fo:min-width="0cm" loext:decorative="false"/>
    </style:style>
    <style:style style:name="gr542"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44"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45"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4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8" style:family="graphic" style:parent-style-name="objectwithoutfill">
      <style:graphic-properties draw:marker-end="Arrowheads_20_419" draw:marker-end-width="0.2cm" draw:fill="solid" draw:textarea-vertical-align="middle" loext:decorative="false"/>
    </style:style>
    <style:style style:name="gr549"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52" style:family="graphic" style:parent-style-name="standard" style:list-style-name="L1">
      <style:graphic-properties draw:stroke="none" draw:fill="none" fo:min-height="0.48cm" loext:decorative="false"/>
      <style:paragraph-properties style:writing-mode="lr-tb"/>
    </style:style>
    <style:style style:name="gr553" style:family="graphic" style:parent-style-name="standard" style:list-style-name="L1">
      <style:graphic-properties draw:stroke="none" draw:fill="none" fo:min-height="0.48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55" style:family="graphic" style:parent-style-name="standard">
      <style:graphic-properties draw:marker-start="Arrow" draw:marker-start-width="0.05cm" draw:marker-end="Arrow" draw:marker-end-width="0.05cm" draw:textarea-vertical-align="middle" loext:decorative="false"/>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7" style:family="graphic" style:parent-style-name="objectwithoutfill">
      <style:graphic-properties draw:marker-end="Arrow" draw:marker-end-width="0.2cm" draw:fill="solid" draw:textarea-vertical-align="middle" loext:decorative="false"/>
    </style:style>
    <style:style style:name="gr558"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9"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60" style:family="graphic" style:parent-style-name="standard">
      <style:graphic-properties draw:marker-end="Arrowheads_20_420" draw:textarea-vertical-align="middle" loext:decorative="false"/>
    </style:style>
    <style:style style:name="gr561"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62"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65"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66"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7"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8"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9"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70"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71" style:family="graphic" style:parent-style-name="standard">
      <style:graphic-properties draw:stroke="none" draw:fill="none" draw:textarea-horizontal-align="center" fo:min-height="1.183cm" loext:decorative="false"/>
      <style:paragraph-properties style:writing-mode="lr-tb"/>
    </style:style>
    <style:style style:name="gr572"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73" style:family="graphic" style:parent-style-name="objectwithoutfill">
      <style:graphic-properties draw:marker-end="Arrow" draw:marker-end-width="0.1cm" draw:fill="solid" draw:textarea-vertical-align="middle" loext:decorative="false"/>
    </style:style>
    <style:style style:name="gr574" style:family="graphic" style:parent-style-name="Object_20_with_20_no_20_fill_20_and_20_no_20_line">
      <style:graphic-properties draw:textarea-horizontal-align="center" draw:textarea-vertical-align="middle" draw:ole-draw-aspect="1" style:protect="size" loext:decorative="false"/>
    </style:style>
    <style:style style:name="gr575"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76"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77"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8"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9"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80" style:family="graphic" style:parent-style-name="objectwithoutfill">
      <style:graphic-properties draw:marker-end="Arrow" draw:marker-end-width="0.1cm" draw:fill="solid" draw:textarea-vertical-align="bottom" loext:decorative="false"/>
    </style:style>
    <style:style style:name="gr581"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82" style:family="graphic" style:parent-style-name="Arrow_20_Line" style:list-style-name="L1">
      <style:graphic-properties draw:textarea-vertical-align="middle" draw:line-distance="0.14cm" loext:decorative="false"/>
      <style:paragraph-properties style:writing-mode="lr-tb"/>
    </style:style>
    <style:style style:name="gr583"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85"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86"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7"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8"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90"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91"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92"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93"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94"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95"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8"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9"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600"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601"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602"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603"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604"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605"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606"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7"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8"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9"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10"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11"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12"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13"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14"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15"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16"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8" style:family="graphic" style:parent-style-name="standard">
      <style:graphic-properties draw:fill="none" draw:textarea-vertical-align="middle" draw:auto-grow-height="false" fo:min-height="1.677cm" fo:min-width="0cm" fo:wrap-option="wrap" loext:decorative="false"/>
    </style:style>
    <style:style style:name="gr619" style:family="graphic" style:parent-style-name="standard">
      <style:graphic-properties draw:stroke="none" svg:stroke-color="#000000" draw:fill="none" draw:fill-color="#ffffff" draw:textarea-horizontal-align="left" draw:auto-grow-height="true" draw:auto-grow-width="true" fo:min-height="1.059cm" fo:min-width="3.369cm" loext:decorative="false"/>
      <style:paragraph-properties style:writing-mode="lr-tb"/>
    </style:style>
    <style:style style:name="gr620" style:family="graphic" style:parent-style-name="objectwithoutfill">
      <style:graphic-properties draw:marker-end="Arrowheads_20_399" draw:marker-end-width="0.1cm" draw:fill="solid" draw:textarea-vertical-align="middle" loext:decorative="false"/>
    </style:style>
    <style:style style:name="gr621" style:family="graphic" style:parent-style-name="objectwithoutfill">
      <style:graphic-properties draw:marker-end="Arrowheads_20_400" draw:marker-end-width="0.1cm" draw:fill="solid" draw:textarea-vertical-align="middle" loext:decorative="false"/>
    </style:style>
    <style:style style:name="gr62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0.475cm" fo:min-width="2.473cm" loext:decorative="false"/>
      <style:paragraph-properties style:writing-mode="lr-tb"/>
    </style:style>
    <style:style style:name="gr624"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2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03cm" fo:min-width="2.033cm" fo:padding-top="0.45cm" fo:padding-bottom="0.25cm" fo:padding-left="0.27cm" fo:padding-right="0.27cm" style:writing-mode="lr-tb" loext:decorative="false"/>
      <style:paragraph-properties style:writing-mode="lr-tb"/>
    </style:style>
    <style:style style:name="gr626"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7"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8" style:family="graphic" style:parent-style-name="standard">
      <style:graphic-properties draw:stroke="none" svg:stroke-color="#000000" draw:fill="none" draw:fill-color="#ffffff" draw:textarea-horizontal-align="left" draw:auto-grow-height="true" draw:auto-grow-width="true" fo:min-height="0.788cm" fo:min-width="4.127cm" loext:decorative="false"/>
      <style:paragraph-properties style:writing-mode="lr-tb"/>
    </style:style>
    <style:style style:name="gr629" style:family="graphic" style:parent-style-name="objectwithoutfill">
      <style:graphic-properties draw:marker-start="Arrow" draw:marker-start-width="0.3cm" draw:marker-end="Arrow" draw:marker-end-width="0.3cm" draw:fill="solid" draw:textarea-vertical-align="middle" loext:decorative="false"/>
    </style:style>
    <style:style style:name="gr630" style:family="graphic" style:parent-style-name="objectwithoutfill">
      <style:graphic-properties draw:marker-start="Arrow" draw:marker-start-width="0.3cm" draw:marker-end="" draw:marker-end-width="0.3cm" draw:fill="solid" draw:textarea-vertical-align="middle" loext:decorative="false"/>
    </style:style>
    <style:style style:name="gr631" style:family="graphic" style:parent-style-name="objectwithoutfill">
      <style:graphic-properties draw:marker-start="" draw:marker-start-width="0.3cm" draw:marker-end="Arrow" draw:marker-end-width="0.3cm" draw:fill="solid" draw:textarea-vertical-align="middle" loext:decorative="false"/>
    </style:style>
    <style:style style:name="gr63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08cm" fo:min-width="3.335cm" fo:padding-top="0.75cm" fo:padding-bottom="0.25cm" fo:padding-left="0.27cm" fo:padding-right="0.27cm" style:writing-mode="lr-tb"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loext:graphic-properties draw:fill="solid" draw:fill-color="#b4d2ea"/>
      <style:paragraph-properties fo:text-align="center"/>
      <style:text-properties fo:color="#000000" loext:opacity="100%" fo:font-weight="normal" style:font-weight-asian="normal" style:font-weight-complex="normal"/>
    </style:style>
    <style:style style:name="P70" style:family="paragraph">
      <style:paragraph-properties fo:margin-top="0.42cm" fo:margin-bottom="0.35cm" fo:text-align="center"/>
    </style:style>
    <style:style style:name="P71" style:family="paragraph">
      <loext:graphic-properties draw:fill="solid" draw:fill-color="#ffffff"/>
      <style:paragraph-properties fo:margin-top="0.42cm" fo:margin-bottom="0.35cm" fo:text-align="center" style:writing-mode="lr-tb"/>
    </style:style>
    <style:style style:name="P72"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3" style:family="paragraph">
      <style:paragraph-properties fo:margin-left="0cm" fo:margin-right="0cm" fo:text-align="center" fo:text-indent="0cm"/>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P74" style:family="paragraph">
      <loext:graphic-properties draw:fill="solid" draw:fill-color="#b4d2ea"/>
      <style:paragraph-properties fo:margin-left="0cm" fo:margin-right="0cm" fo:text-align="center" fo:text-indent="0cm"/>
      <style:text-properties fo:color="#000000" loext:opacity="100%"/>
    </style:style>
    <style:style style:name="P75" style:family="paragraph">
      <loext:graphic-properties draw:fill="solid" draw:fill-color="#accda1"/>
      <style:paragraph-properties fo:text-align="center"/>
    </style:style>
    <style:style style:name="P76" style:family="paragraph">
      <style:paragraph-properties fo:margin-left="0cm" fo:margin-right="0cm" fo:text-align="center" fo:text-indent="0cm" style:text-autospace="ideograph-alpha"/>
    </style:style>
    <style:style style:name="P77" style:family="paragraph">
      <loext:graphic-properties draw:fill="solid" draw:fill-color="#b4d2ea"/>
      <style:paragraph-properties fo:text-align="center" style:text-autospace="none"/>
      <style:text-properties fo:color="#000000" loext:opacity="100%"/>
    </style:style>
    <style:style style:name="P78" style:family="paragraph">
      <style:paragraph-properties fo:margin-left="0cm" fo:margin-right="0cm" fo:margin-top="0cm" fo:margin-bottom="0cm" fo:text-align="center" fo:text-indent="0cm"/>
    </style:style>
    <style:style style:name="P79" style:family="paragraph">
      <loext:graphic-properties draw:fill="solid" draw:fill-color="#b4d2ea"/>
      <style:paragraph-properties fo:margin-top="0.42cm" fo:margin-bottom="0.35cm" fo:text-align="center"/>
      <style:text-properties fo:color="#000000" loext:opacity="100%"/>
    </style:style>
    <style:style style:name="P80" style:family="paragraph">
      <style:paragraph-properties fo:margin-left="0cm" fo:margin-right="0cm" fo:margin-top="0.42cm" fo:margin-bottom="0.35cm" fo:text-align="center" fo:text-indent="0cm"/>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P81" style:family="paragraph">
      <loext:graphic-properties draw:fill="none"/>
      <style:paragraph-properties fo:text-align="center"/>
      <style:text-properties fo:font-size="18pt"/>
    </style:style>
    <style:style style:name="P82"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3"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4" style:family="paragraph">
      <loext:graphic-properties draw:fill="solid" draw:fill-color="#00aaad"/>
      <style:paragraph-properties fo:text-align="center"/>
      <style:text-properties fo:font-size="18pt"/>
    </style:style>
    <style:style style:name="P85" style:family="paragraph">
      <loext:graphic-properties draw:fill="solid" draw:fill-color="#dde8cb"/>
      <style:paragraph-properties fo:text-align="center"/>
      <style:text-properties fo:font-size="18pt"/>
    </style:style>
    <style:style style:name="P86" style:family="paragraph">
      <loext:graphic-properties draw:fill="none"/>
      <style:paragraph-properties fo:text-align="center"/>
      <style:text-properties fo:font-size="18pt" style:font-size-asian="18pt" style:font-size-complex="18pt"/>
    </style:style>
    <style:style style:name="P87" style:family="paragraph">
      <loext:graphic-properties draw:fill="solid" draw:fill-color="#b3cac7"/>
      <style:paragraph-properties fo:text-align="center"/>
      <style:text-properties fo:font-size="18pt"/>
    </style:style>
    <style:style style:name="P88"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9" style:family="paragraph">
      <style:paragraph-properties fo:text-align="center"/>
      <style:text-properties fo:font-size="18pt"/>
    </style:style>
    <style:style style:name="P90" style:family="paragraph">
      <loext:graphic-properties draw:fill="none"/>
      <style:text-properties fo:font-size="18pt" style:font-size-asian="18pt" style:font-size-complex="18pt"/>
    </style:style>
    <style:style style:name="P91" style:family="paragraph">
      <loext:graphic-properties draw:fill="none"/>
      <style:text-properties fo:font-size="12pt" fo:font-weight="bold" style:font-size-asian="12pt" style:font-weight-asian="bold" style:font-size-complex="12pt" style:font-weight-complex="bold"/>
    </style:style>
    <style:style style:name="P92" style:family="paragraph">
      <loext:graphic-properties draw:fill="solid" draw:fill-color="#fffcdf"/>
    </style:style>
    <style:style style:name="P93" style:family="paragraph">
      <loext:graphic-properties draw:fill="solid" draw:fill-color="#00a65d"/>
      <style:paragraph-properties fo:text-align="center"/>
    </style:style>
    <style:style style:name="P94" style:family="paragraph">
      <loext:graphic-properties draw:fill="solid" draw:fill-color="#0066b3"/>
      <style:paragraph-properties fo:text-align="center"/>
    </style:style>
    <style:style style:name="P95" style:family="paragraph">
      <loext:graphic-properties draw:fill="solid" draw:fill-color="#28a127"/>
      <style:paragraph-properties fo:text-align="center"/>
    </style:style>
    <style:style style:name="P96" style:family="paragraph">
      <loext:graphic-properties draw:fill="solid" draw:fill-color="#bcaed5" draw:opacity="50%"/>
      <style:paragraph-properties fo:text-align="center"/>
    </style:style>
    <style:style style:name="P97" style:family="paragraph">
      <loext:graphic-properties draw:fill="solid" draw:fill-color="#bce4e5" draw:opacity="50%"/>
      <style:paragraph-properties fo:text-align="center"/>
    </style:style>
    <style:style style:name="P98" style:family="paragraph">
      <loext:graphic-properties draw:fill="solid" draw:fill-color="#bee3d3"/>
      <style:paragraph-properties fo:text-align="center"/>
      <style:text-properties fo:font-weight="bold" style:font-weight-asian="bold" style:font-weight-complex="bold"/>
    </style:style>
    <style:style style:name="P99" style:family="paragraph">
      <loext:graphic-properties draw:fill="none"/>
      <style:paragraph-properties fo:text-align="center"/>
      <style:text-properties fo:font-weight="normal"/>
    </style:style>
    <style:style style:name="P100" style:family="paragraph">
      <loext:graphic-properties draw:fill="solid" draw:fill-color="#000000"/>
    </style:style>
    <style:style style:name="P101" style:family="paragraph">
      <style:paragraph-properties style:writing-mode="lr-tb"/>
    </style:style>
    <style:style style:name="P102"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3"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4" style:family="paragraph">
      <loext:graphic-properties draw:fill="hatch" draw:fill-color="#ffffff" draw:fill-hatch-name="Hatching_20_7" draw:fill-hatch-solid="true"/>
      <style:paragraph-properties fo:text-align="center"/>
    </style:style>
    <style:style style:name="P105" style:family="paragraph">
      <loext:graphic-properties draw:fill="solid" draw:fill-color="#e8995a"/>
      <style:paragraph-properties fo:text-align="center"/>
    </style:style>
    <style:style style:name="P106" style:family="paragraph">
      <loext:graphic-properties draw:fill="solid" draw:fill-color="#c7bcda"/>
      <style:paragraph-properties fo:text-align="center"/>
    </style:style>
    <style:style style:name="P107" style:family="paragraph">
      <loext:graphic-properties draw:fill="solid" draw:fill-color="#f9dc8c"/>
      <style:paragraph-properties fo:text-align="center"/>
    </style:style>
    <style:style style:name="P108" style:family="paragraph">
      <loext:graphic-properties draw:fill="solid" draw:fill-color="#b4d2ea"/>
      <style:paragraph-properties fo:text-align="center"/>
    </style:style>
    <style:style style:name="P109" style:family="paragraph">
      <loext:graphic-properties draw:fill="solid" draw:fill-color="#f6f5f8"/>
      <style:paragraph-properties fo:text-align="center"/>
    </style:style>
    <style:style style:name="P110" style:family="paragraph">
      <loext:graphic-properties draw:fill="solid" draw:fill-color="#f6f5f8"/>
      <style:paragraph-properties fo:margin-left="0cm" fo:margin-right="0cm" fo:margin-top="0cm" fo:margin-bottom="0cm" fo:line-height="100%" fo:text-align="center" fo:text-indent="0cm"/>
    </style:style>
    <style:style style:name="P111"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2" style:family="paragraph">
      <loext:graphic-properties draw:fill="solid" draw:fill-color="#9b592e"/>
      <style:paragraph-properties fo:text-align="center"/>
      <style:text-properties fo:font-weight="normal" style:font-weight-asian="normal" style:font-weight-complex="normal"/>
    </style:style>
    <style:style style:name="P113" style:family="paragraph">
      <loext:graphic-properties draw:fill="solid" draw:fill-color="#d86a50"/>
      <style:paragraph-properties fo:text-align="center"/>
      <style:text-properties fo:font-weight="bold" fo:background-color="#ffffff" style:font-weight-asian="bold" style:font-weight-complex="bold"/>
    </style:style>
    <style:style style:name="P114"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5" style:family="paragraph">
      <loext:graphic-properties draw:fill="solid" draw:fill-color="#6390c2"/>
      <style:paragraph-properties fo:text-align="center"/>
    </style:style>
    <style:style style:name="P116" style:family="paragraph">
      <loext:graphic-properties draw:fill="solid" draw:fill-color="#ffffff"/>
      <style:paragraph-properties fo:text-align="center" style:writing-mode="lr-tb"/>
      <style:text-properties fo:font-size="8pt" style:font-size-asian="8pt" style:font-size-complex="8pt"/>
    </style:style>
    <style:style style:name="P117"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9" style:family="paragraph">
      <style:paragraph-properties fo:text-align="center"/>
      <style:text-properties fo:color="#ffffff" loext:opacity="100%"/>
    </style:style>
    <style:style style:name="P120"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21"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22" style:family="paragraph">
      <style:paragraph-properties fo:text-align="start"/>
    </style:style>
    <style:style style:name="P123" style:family="paragraph">
      <loext:graphic-properties draw:fill="none" draw:fill-color="#ffffff"/>
      <style:paragraph-properties fo:text-align="start"/>
      <style:text-properties fo:font-size="10pt" style:font-size-asian="10pt" style:font-size-complex="10pt"/>
    </style:style>
    <style:style style:name="P124" style:family="paragraph">
      <loext:graphic-properties draw:fill="solid" draw:fill-color="#c7bcda" draw:opacity="100%"/>
      <style:paragraph-properties fo:text-align="center"/>
    </style:style>
    <style:style style:name="P125"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6"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7"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8"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9" style:family="paragraph">
      <loext:graphic-properties draw:fill="none" draw:fill-color="#ffffff"/>
      <style:paragraph-properties fo:text-align="center"/>
    </style:style>
    <style:style style:name="P130" style:family="paragraph">
      <loext:graphic-properties draw:fill="solid" draw:fill-color="#ff5128"/>
      <style:paragraph-properties fo:margin-left="0cm" fo:margin-right="0cm" fo:margin-top="0cm" fo:margin-bottom="0cm" fo:line-height="100%" fo:text-align="center" fo:text-indent="0cm" style:writing-mode="lr-tb"/>
    </style:style>
    <style:style style:name="P131" style:family="paragraph">
      <loext:graphic-properties draw:fill="none" draw:fill-color="#ffffff"/>
      <style:text-properties fo:color="#00b0be" loext:opacity="100%" fo:font-weight="bold" style:font-weight-asian="bold" style:font-weight-complex="bold"/>
    </style:style>
    <style:style style:name="P132" style:family="paragraph">
      <loext:graphic-properties draw:fill="solid" draw:fill-color="#8fd7d7" draw:opacity="25%"/>
      <style:paragraph-properties fo:text-align="center"/>
    </style:style>
    <style:style style:name="P133" style:family="paragraph">
      <style:paragraph-properties fo:text-align="center"/>
      <style:text-properties fo:color="#6390c2" loext:opacity="100%"/>
    </style:style>
    <style:style style:name="P134" style:family="paragraph">
      <loext:graphic-properties draw:fill="none" draw:fill-color="#ffffff"/>
      <style:paragraph-properties fo:text-align="center"/>
      <style:text-properties fo:color="#6390c2" loext:opacity="100%" fo:font-weight="bold" style:font-weight-asian="bold" style:font-weight-complex="bold"/>
    </style:style>
    <style:style style:name="P135" style:family="paragraph">
      <loext:graphic-properties draw:fill="none" draw:fill-color="#ffffff"/>
      <style:text-properties fo:color="#6390c2" loext:opacity="100%" fo:font-weight="bold" style:font-weight-asian="bold" style:font-weight-complex="bold"/>
    </style:style>
    <style:style style:name="P136" style:family="paragraph">
      <style:paragraph-properties fo:margin-top="0.42cm" fo:margin-bottom="0.35cm"/>
    </style:style>
    <style:style style:name="P137" style:family="paragraph">
      <style:paragraph-properties fo:text-align="center" style:writing-mode="lr-tb"/>
      <style:text-properties fo:font-size="10pt" style:font-size-asian="10pt" style:font-size-complex="10pt"/>
    </style:style>
    <style:style style:name="P138" style:family="paragraph">
      <loext:graphic-properties draw:fill="solid" draw:fill-color="#ffe0d9"/>
      <style:paragraph-properties fo:text-align="center" style:writing-mode="lr-tb"/>
      <style:text-properties fo:font-size="8pt" style:font-size-asian="8pt" style:font-size-complex="8pt"/>
    </style:style>
    <style:style style:name="P139" style:family="paragraph">
      <loext:graphic-properties draw:fill="solid" draw:fill-color="#ff5128"/>
      <style:paragraph-properties fo:text-align="center" style:writing-mode="lr-tb"/>
      <style:text-properties fo:font-size="8pt" style:font-size-asian="8pt" style:font-size-complex="8pt"/>
    </style:style>
    <style:style style:name="P140" style:family="paragraph">
      <style:paragraph-properties fo:margin-left="0cm" fo:margin-right="0cm" fo:margin-top="0cm" fo:margin-bottom="0cm" fo:line-height="100%" fo:text-align="center" fo:text-indent="0cm"/>
      <style:text-properties fo:font-size="9pt" style:font-size-asian="9pt" style:font-size-complex="9pt"/>
    </style:style>
    <style:style style:name="P141" style:family="paragraph">
      <loext:graphic-properties draw:fill="solid" draw:fill-color="#70ae61"/>
      <style:paragraph-properties fo:margin-left="0cm" fo:margin-right="0cm" fo:margin-top="0cm" fo:margin-bottom="0cm" fo:line-height="100%" fo:text-align="center" fo:text-indent="0cm" style:writing-mode="lr-tb"/>
      <style:text-properties fo:font-size="9pt" style:font-size-asian="9pt" style:font-size-complex="9pt"/>
    </style:style>
    <style:style style:name="P142"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3"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4" style:family="paragraph">
      <style:paragraph-properties fo:text-align="center"/>
      <style:text-properties fo:color="#ffffff" loext:opacity="100%" fo:font-size="10pt" style:font-size-asian="10pt" style:font-size-complex="10pt"/>
    </style:style>
    <style:style style:name="P145"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6" style:family="paragraph">
      <loext:graphic-properties draw:fill="solid" draw:fill-color="#6390c2"/>
      <style:paragraph-properties fo:text-align="center" style:writing-mode="lr-tb"/>
      <style:text-properties fo:font-size="10pt" style:font-size-asian="10pt" style:font-size-complex="10pt"/>
    </style:style>
    <style:style style:name="P147" style:family="paragraph">
      <style:paragraph-properties fo:margin-left="0cm" fo:margin-right="0cm" fo:text-align="center" fo:text-indent="0cm"/>
      <style:text-properties fo:color="#ffffff" loext:opacity="100%" fo:font-size="10pt" style:font-size-asian="10pt" style:font-size-complex="10pt"/>
    </style:style>
    <style:style style:name="P148" style:family="paragraph">
      <loext:graphic-properties draw:fill="solid" draw:fill-color="#70ae61"/>
      <style:paragraph-properties fo:text-align="center"/>
      <style:text-properties fo:color="#ffffff" loext:opacity="100%" fo:font-size="8pt" style:font-size-asian="8pt" style:font-size-complex="8pt"/>
    </style:style>
    <style:style style:name="P149" style:family="paragraph">
      <loext:graphic-properties draw:fill="none" draw:fill-color="#ffffff"/>
      <style:text-properties fo:color="#ffffff" loext:opacity="100%" fo:font-size="8pt" style:font-size-asian="8pt" style:font-size-complex="8pt"/>
    </style:style>
    <style:style style:name="P150" style:family="paragraph">
      <style:paragraph-properties fo:margin-top="0.42cm" fo:margin-bottom="0.35cm" fo:text-align="center"/>
      <style:text-properties fo:font-size="10pt" style:font-size-asian="10pt" style:font-size-complex="10pt"/>
    </style:style>
    <style:style style:name="P151"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2"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3"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4" style:family="paragraph">
      <style:paragraph-properties fo:margin-top="0.42cm" fo:margin-bottom="0.35cm" fo:text-align="center"/>
      <style:text-properties fo:font-size="8pt" style:font-size-asian="8pt" style:font-size-complex="8pt"/>
    </style:style>
    <style:style style:name="P155"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6" style:family="paragraph">
      <loext:graphic-properties draw:fill="solid" draw:fill-color="#345d95"/>
      <style:paragraph-properties fo:text-align="center"/>
    </style:style>
    <style:style style:name="P157" style:family="paragraph">
      <loext:graphic-properties draw:fill="none" draw:fill-color="#ffffff"/>
      <style:paragraph-properties fo:text-align="center"/>
      <style:text-properties fo:font-size="8pt" style:font-size-asian="8pt" style:font-size-complex="8pt"/>
    </style:style>
    <style:style style:name="P158" style:family="paragraph">
      <loext:graphic-properties draw:fill="none" draw:fill-color="#ffffff"/>
      <style:text-properties fo:color="#f45f74" loext:opacity="100%" fo:font-size="8pt" style:font-size-asian="8pt" style:font-size-complex="8pt"/>
    </style:style>
    <style:style style:name="P159" style:family="paragraph">
      <style:paragraph-properties fo:margin-left="0cm" fo:margin-right="0cm" fo:margin-top="0.42cm" fo:margin-bottom="0.35cm" fo:line-height="100%" fo:text-indent="0cm"/>
    </style:style>
    <style:style style:name="P160"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1"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2"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3"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4" style:family="paragraph">
      <loext:graphic-properties draw:fill="none" draw:fill-color="#ffffff"/>
      <style:text-properties fo:font-size="10pt" fo:font-weight="bold" style:font-size-asian="10pt" style:font-weight-asian="bold" style:font-size-complex="10pt" style:font-weight-complex="bold"/>
    </style:style>
    <style:style style:name="P165" style:family="paragraph">
      <loext:graphic-properties draw:fill="solid" draw:fill-color="#e8995a"/>
      <style:paragraph-properties fo:text-align="center" style:writing-mode="lr-tb"/>
      <style:text-properties fo:font-size="10pt" style:font-size-asian="10pt" style:font-size-complex="10pt"/>
    </style:style>
    <style:style style:name="P16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8"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69"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0" style:family="paragraph">
      <loext:graphic-properties draw:fill="solid" draw:fill-color="#333333"/>
      <style:paragraph-properties fo:text-align="center"/>
    </style:style>
    <style:style style:name="P171" style:family="paragraph">
      <loext:graphic-properties draw:fill="solid" draw:fill-color="#ffffff"/>
      <style:paragraph-properties fo:text-align="center"/>
    </style:style>
    <style:style style:name="P172" style:family="paragraph">
      <loext:graphic-properties draw:fill="solid" draw:fill-color="#cfe8fa"/>
      <style:paragraph-properties fo:text-align="center"/>
    </style:style>
    <style:style style:name="P173" style:family="paragraph">
      <loext:graphic-properties draw:fill="none" draw:fill-color="#cfe8fa"/>
      <style:paragraph-properties fo:text-align="center"/>
    </style:style>
    <style:style style:name="P17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5" style:family="paragraph">
      <loext:graphic-properties draw:fill="solid" draw:fill-color="#bfe3bd"/>
      <style:paragraph-properties fo:text-align="center"/>
    </style:style>
    <style:style style:name="P176" style:family="paragraph">
      <loext:graphic-properties draw:fill="none" draw:fill-color="#bfe3bd"/>
      <style:paragraph-properties fo:text-align="center"/>
    </style:style>
    <style:style style:name="P177"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78" style:family="paragraph">
      <loext:graphic-properties draw:fill="solid" draw:fill-color="#d36b42"/>
      <style:paragraph-properties fo:text-align="center"/>
    </style:style>
    <style:style style:name="P179" style:family="paragraph">
      <loext:graphic-properties draw:fill="solid" draw:fill-color="#f7d682"/>
      <style:paragraph-properties fo:text-align="center"/>
    </style:style>
    <style:style style:name="P180" style:family="paragraph">
      <loext:graphic-properties draw:fill="none" draw:fill-color="#f7d682"/>
      <style:paragraph-properties fo:text-align="center"/>
    </style:style>
    <style:style style:name="P181" style:family="paragraph">
      <loext:graphic-properties draw:fill="solid" draw:fill-color="#d6cce4"/>
      <style:paragraph-properties fo:text-align="center"/>
    </style:style>
    <style:style style:name="P182" style:family="paragraph">
      <loext:graphic-properties draw:fill="none" draw:fill-color="#d6cce4"/>
      <style:paragraph-properties fo:text-align="center"/>
    </style:style>
    <style:style style:name="P183" style:family="paragraph">
      <loext:graphic-properties draw:fill="none" draw:fill-color="#ffffff"/>
      <style:text-properties fo:font-size="18pt" style:font-size-asian="18pt" style:font-size-complex="18pt"/>
    </style:style>
    <style:style style:name="P184" style:family="paragraph">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185" style:family="paragraph">
      <loext:graphic-properties draw:fill="solid" draw:fill-color="#accda1" draw:opacity="50%"/>
      <style:paragraph-properties fo:text-align="center"/>
    </style:style>
    <style:style style:name="P186" style:family="paragraph">
      <loext:graphic-properties draw:fill="solid" draw:fill-color="#b4d2ea" draw:opacity="50%"/>
      <style:paragraph-properties fo:text-align="center"/>
    </style:style>
    <style:style style:name="P187"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88" style:family="paragraph">
      <loext:graphic-properties draw:fill="none" draw:fill-color="#ffffff"/>
      <style:text-properties fo:font-size="10pt" style:font-size-asian="10pt" style:font-size-complex="10pt"/>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color="#000000" loext:opacity="100%" fo:font-weight="normal" style:font-weight-asian="normal" style:font-weight-complex="normal"/>
    </style:style>
    <style:style style:name="T31" style:family="text">
      <style:text-properties fo:font-size="18pt" fo:text-shadow="none" fo:font-weight="normal" style:font-size-asian="18pt" style:font-weight-asian="normal" style:font-size-complex="18pt" style:font-weight-complex="normal"/>
    </style:style>
    <style:style style:name="T32" style:family="text">
      <style:text-properties fo:font-size="18pt" fo:text-shadow="none" fo:font-weight="bold" style:font-size-asian="18pt" style:font-weight-asian="bold" style:font-size-complex="18pt" style:font-weight-complex="bold"/>
    </style:style>
    <style:style style:name="T33" style:family="text">
      <style:text-properties style:font-name="Calibri" fo:font-size="12pt" fo:font-weight="bold" style:font-size-asian="12pt" style:font-weight-asian="bold" style:font-size-complex="12pt" style:font-weight-complex="bold"/>
    </style:style>
    <style:style style:name="T34" style:family="text">
      <style:text-properties fo:color="#00a65d" loext:opacity="100%" fo:font-size="16pt" fo:font-weight="bold" style:font-size-asian="16pt" style:font-weight-asian="bold" style:font-size-complex="16pt" style:font-weight-complex="bold"/>
    </style:style>
    <style:style style:name="T35" style:family="text">
      <style:text-properties fo:color="#aa55a1" loext:opacity="100%" fo:font-size="16pt" fo:font-weight="bold" style:font-size-asian="16pt" style:font-weight-asian="bold" style:font-size-complex="16pt" style:font-weight-complex="bold"/>
    </style:style>
    <style:style style:name="T36" style:family="text">
      <style:text-properties fo:color="#ffffff" loext:opacity="100%" fo:font-weight="normal" style:font-weight-asian="normal" style:font-weight-complex="normal"/>
    </style:style>
    <style:style style:name="T37" style:family="text">
      <style:text-properties fo:color="#ffffff" loext:opacity="100%" fo:font-size="10pt" fo:font-weight="normal" style:font-size-asian="10pt" style:font-weight-asian="normal" style:font-size-complex="10pt" style:font-weight-complex="normal"/>
    </style:style>
    <style:style style:name="T38"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9" style:family="text">
      <style:text-properties fo:color="#ffffff" loext:opacity="100%" fo:font-size="10pt" fo:font-weight="bold" fo:background-color="#ffffff" style:font-size-asian="10pt" style:font-weight-asian="bold" style:font-size-complex="10pt" style:font-weight-complex="bold"/>
    </style:style>
    <style:style style:name="T40" style:family="text">
      <style:text-properties fo:color="#00b0be" loext:opacity="100%" fo:font-weight="bold" style:font-weight-asian="bold" style:font-weight-complex="bold"/>
    </style:style>
    <style:style style:name="T41" style:family="text">
      <style:text-properties fo:font-size="8pt" fo:font-weight="bold" style:font-size-asian="8pt" style:font-weight-asian="bold" style:font-size-complex="8pt" style:font-weight-complex="bold"/>
    </style:style>
    <style:style style:name="T42" style:family="text">
      <style:text-properties fo:color="#6390c2" loext:opacity="100%" fo:font-weight="bold" style:font-weight-asian="bold" style:font-weight-complex="bold"/>
    </style:style>
    <style:style style:name="T43" style:family="text">
      <style:text-properties style:text-position="sub 58%" fo:font-size="8pt" style:font-size-asian="8pt" style:font-size-complex="8pt"/>
    </style:style>
    <style:style style:name="T44" style:family="text">
      <style:text-properties style:text-position="super 58%" fo:font-size="8pt" style:font-size-asian="8pt" style:font-size-complex="8pt"/>
    </style:style>
    <style:style style:name="T45" style:family="text">
      <style:text-properties style:text-position="0% 100%" fo:font-size="8pt" style:font-size-asian="8pt" style:font-size-complex="8pt"/>
    </style:style>
    <style:style style:name="T46" style:family="text">
      <style:text-properties fo:color="#ffffff" loext:opacity="100%" fo:font-size="9pt" fo:font-weight="bold" style:font-size-asian="9pt" style:font-weight-asian="bold" style:font-size-complex="9pt" style:font-weight-complex="bold"/>
    </style:style>
    <style:style style:name="T47" style:family="text">
      <style:text-properties fo:color="#ffffff" loext:opacity="100%" fo:font-size="12pt" fo:font-weight="bold" style:font-size-asian="12pt" style:font-weight-asian="bold" style:font-size-complex="12pt" style:font-weight-complex="bold"/>
    </style:style>
    <style:style style:name="T48" style:family="text">
      <style:text-properties fo:color="#ffffff" loext:opacity="100%" fo:font-size="10pt" style:font-size-asian="10pt" style:font-size-complex="10pt"/>
    </style:style>
    <style:style style:name="T49"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50" style:family="text">
      <style:text-properties fo:color="#ffffff" loext:opacity="100%" fo:font-size="8pt" style:font-size-asian="8pt" style:font-size-complex="8pt"/>
    </style:style>
    <style:style style:name="T51" style:family="text">
      <style:text-properties fo:color="#f45f74" loext:opacity="100%" fo:font-size="8pt" style:font-size-asian="8pt" style:font-size-complex="8pt"/>
    </style:style>
    <style:style style:name="T52" style:family="text">
      <style:text-properties fo:font-size="10pt" fo:font-weight="bold" style:font-size-asian="10pt" style:font-weight-asian="bold" style:font-size-complex="10pt" style:font-weight-complex="bold"/>
    </style:style>
    <style:style style:name="T53" style:family="text">
      <style:text-properties fo:color="#00b0be" loext:opacity="100%" fo:font-size="15pt" fo:font-weight="bold" fo:background-color="transparent" style:font-size-asian="15pt" style:font-weight-asian="bold" style:font-size-complex="15pt" style:font-weight-complex="bold"/>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6" style:family="text">
      <style:text-properties fo:font-size="18pt" style:font-size-asian="18pt" style:font-size-complex="18pt"/>
    </style:style>
    <style:style style:name="T57"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8" style:family="text">
      <style:text-properties style:text-position="sub 58%"/>
    </style:style>
    <style:style style:name="T59" style:family="text">
      <style:text-properties style:text-position="super 58%"/>
    </style:style>
    <style:style style:name="T60" style:family="text">
      <style:text-properties fo:color="#00b0be" loext:opacity="100%" fo:font-size="20pt" fo:font-weight="bold" fo:background-color="transparent"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5.57cm" svg:height="10.714cm" svg:x="-46.366cm" svg:y="38.365cm" svg:viewBox="0 0 35571 10715" svg:d="M9418 252c396 40 791-39 1187-48 410-9 783-58 1188-65 377-7 754-13 1127-16 357-3 714-9 1069 0 413 10 754-86 1188-81 556 7 1107 7 1662-32 425-29 852 14 1275 32 398 16 789 60 1159 162 314 87 695 51 1009 178 311 125 664 219 1069 257 520 49 971 220 1486 291 353 50 705 111 1067 145 411 39 831 71 1246 96 394 26 1263 117 1573 252 453 201 1070 32 1760 93 586 51 672 229 1234 297 358 45 864 122 1232 139 463 21 417 137 881 124 375-11 731 40 1099 48 399 9 778 84 1155 145 434 72 819 249 1010 469 160 181 458 333 448 548-12 199 37 397 28 597-15 339-256 664-298 1001-27 230-469 310-802 371-351 64-696 150-860 388-163 238-209 460-355 694-114 176-188 418 88 564 301 158 511 349 684 550 163 188 147 396 147 597-2 251-101 508-355 726-297 252-290 583-802 774-385 144-450 429-892 549-544 150-1169 47-1751 130-635 88-1311 103-1959 193-624 85-1215 221-1841 290-950 105-1754-1323-2724-1318-1240 8-2788 233-3996 80-817-103-1699 419-2434 132-360-140-774 65-1138-79-366-144-1304-213-1343-381-52-235-425-414-832-467-371-48-707-169-1097-178-357-9-710 71-1070 49-541-34-1061 59-1603 64-842 7-1643 103-2522 17-474-47-814-185-1217-292-509-134-890 56-1322-135-374-167-953 175-1244-27-337-234-1079-253-1534-344-419-84-765-780-1032-952-282-182-531-472-847-635-429-220 1-487-397-741-224-142-137-716-211-900-84-215 351-800 529-952 199-173 360-56 448-251 98-221 245-434 386-647 126-191 291-376 355-580 61-197-203-659-78-850 122-194 399-530 820-582 366-45 883-437 1244-477 386-42 681 38 1058 80 830 94 1348-52 1994-213 368-91 821 283 1167 170 318-105 666-140 1011-178 107 0 217 0 325 0 108 37 217 74 326 113 19 16 40 32 58 48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53" draw:id="id353"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54" draw:id="id354"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95" draw:id="id39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55" draw:id="id355"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56" draw:id="id356"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52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52cm" svg:x2="241.848cm" svg:y2="13.474cm" draw:start-shape="id36" draw:start-glue-point="4" draw:end-shape="id37" draw:end-glue-point="8" svg:d="M237714 14952c0-1108 4134-370 4134-1478" svg:viewBox="0 0 4135 1479">
            <text:p/>
          </draw:connector>
          <draw:custom-shape draw:style-name="gr64" draw:text-style-name="P45" xml:id="id38" draw:id="id38" draw:layer="layout" svg:width="2.331cm" svg:height="1.027cm" svg:x="245.051cm" svg:y="14.952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52cm" svg:x2="241.847cm" svg:y2="13.474cm" draw:start-shape="id38" draw:start-glue-point="4" draw:end-shape="id37" svg:d="M246217 14952c0-1108-4370-370-4370-1478" svg:viewBox="0 0 4371 1479">
            <text:p/>
          </draw:connector>
          <draw:custom-shape draw:style-name="gr64" draw:text-style-name="P45" xml:id="id39" draw:id="id39" draw:layer="layout" svg:width="2.773cm" svg:height="1.027cm" svg:x="234.618cm" svg:y="17.152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27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52cm" svg:x2="237.714cm" svg:y2="15.979cm" draw:start-shape="id39" draw:start-glue-point="4" draw:end-shape="id36" draw:end-glue-point="8" svg:d="M236005 17152c0-880 1709-294 1709-1173" svg:viewBox="0 0 1710 1174">
            <text:p/>
          </draw:connector>
          <draw:connector draw:style-name="gr68" draw:text-style-name="P15" draw:layer="layout" draw:type="curve" svg:x1="239.509cm" svg:y1="17.127cm" svg:x2="237.714cm" svg:y2="15.979cm" draw:start-shape="id40" draw:start-glue-point="4" draw:end-shape="id36" draw:end-glue-point="8" svg:d="M239509 17127c0-861-1795-287-1795-1148" svg:viewBox="0 0 1796 1149">
            <text:p/>
          </draw:connector>
          <draw:custom-shape draw:style-name="gr64" draw:text-style-name="P45" xml:id="id41" draw:id="id41" draw:layer="layout" svg:width="2.173cm" svg:height="1.027cm" svg:x="243.624cm" svg:y="17.152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27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52cm" svg:x2="246.217cm" svg:y2="15.979cm" draw:start-shape="id41" draw:start-glue-point="4" draw:end-shape="id38" draw:end-glue-point="8" svg:d="M244711 17152c0-880 1506-294 1506-1173" svg:viewBox="0 0 1507 1174">
            <text:p/>
          </draw:connector>
          <draw:connector draw:style-name="gr70" draw:text-style-name="P15" draw:layer="layout" draw:type="curve" svg:x1="248.215cm" svg:y1="17.127cm" svg:x2="246.217cm" svg:y2="15.979cm" draw:start-shape="id42" draw:start-glue-point="4" draw:end-shape="id38" draw:end-glue-point="8" svg:d="M248215 17127c0-861-1998-287-1998-1148" svg:viewBox="0 0 1999 1149">
            <text:p/>
          </draw:connector>
          <draw:custom-shape draw:style-name="gr64" draw:text-style-name="P45" xml:id="id43" draw:id="id43" draw:layer="layout" svg:width="3.539cm" svg:height="1.027cm" svg:x="236.021cm" svg:y="20.027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0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27cm" svg:x2="239.509cm" svg:y2="18.154cm" draw:start-shape="id43" draw:start-glue-point="4" draw:end-shape="id40" draw:end-glue-point="8" svg:d="M237791 20027c0-1405 1718-469 1718-1873" svg:viewBox="0 0 1719 1874">
            <text:p/>
          </draw:connector>
          <draw:connector draw:style-name="gr72" draw:text-style-name="P15" draw:layer="layout" draw:type="curve" svg:x1="241.584cm" svg:y1="19.902cm" svg:x2="239.509cm" svg:y2="18.154cm" draw:start-shape="id44" draw:start-glue-point="4" draw:end-shape="id40" draw:end-glue-point="8" svg:d="M241584 19902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66cm" svg:x2="249.055cm" svg:y2="13.159cm" draw:start-shape="id38" draw:start-glue-point="10" draw:end-shape="id45" draw:end-glue-point="3" svg:d="M247382 15466c1255 0 419-2307 1673-2307" svg:viewBox="0 0 1674 2308">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2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22cm" svg:y1="47.379cm" svg:x2="85.371cm" svg:y2="49.074cm" draw:start-shape="id196" draw:end-shape="id197" draw:end-glue-point="0" svg:d="M88522 47379c0 1272-3151 425-3151 1695" svg:viewBox="0 0 3152 1696">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3.976cm" svg:y="49.074cm">
          <text:p text:style-name="P5">Decision<text:line-break/>making</text:p>
        </draw:rect>
        <draw:rect draw:style-name="gr41" draw:text-style-name="P5" xml:id="id199" draw:id="id199" draw:layer="layout" svg:width="2.79cm" svg:height="0.955cm" svg:x="80.776cm" svg:y="49.066cm">
          <text:p text:style-name="P5">planning</text:p>
        </draw:rect>
        <draw:connector draw:style-name="gr257" draw:text-style-name="P15" draw:layer="layout" draw:type="curve" svg:x1="88.522cm" svg:y1="47.379cm" svg:x2="82.171cm" svg:y2="49.066cm" draw:start-shape="id196" draw:end-shape="id199" draw:end-glue-point="0" svg:d="M88522 47379c0 1266-6351 423-6351 1687" svg:viewBox="0 0 6352 1688">
          <text:p/>
        </draw:connector>
        <draw:rect draw:style-name="gr41" draw:text-style-name="P5" xml:id="id200" draw:id="id200" draw:layer="layout" svg:width="2.79cm" svg:height="0.955cm" svg:x="87.078cm" svg:y="49.074cm">
          <text:p text:style-name="P5">Concept<text:line-break/>formation</text:p>
        </draw:rect>
        <draw:connector draw:style-name="gr258" draw:text-style-name="P15" draw:layer="layout" draw:type="curve" svg:x1="88.522cm" svg:y1="47.379cm" svg:x2="88.473cm" svg:y2="49.074cm" draw:start-shape="id196" draw:start-glue-point="2" draw:end-shape="id200" svg:d="M88522 47379c0 1272-49 425-49 1695" svg:viewBox="0 0 50 1696">
          <text:p/>
        </draw:connector>
        <draw:rect draw:style-name="gr41" draw:text-style-name="P5" xml:id="id202" draw:id="id202"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202" draw:end-glue-point="0" svg:d="M84826 39775c0 2055 3723 685 3723 2740" svg:viewBox="0 0 3724 2741">
          <text:p/>
        </draw:connector>
        <draw:rect draw:style-name="gr41" draw:text-style-name="P5" xml:id="id208" draw:id="id208" draw:layer="layout" svg:width="2.79cm" svg:height="0.955cm" svg:x="83.872cm" svg:y="42.449cm">
          <text:p text:style-name="P5">learning</text:p>
        </draw:rect>
        <draw:rect draw:style-name="gr41" draw:text-style-name="P5" xml:id="id203" draw:id="id203" draw:layer="layout" svg:width="2.79cm" svg:height="0.955cm" svg:x="90.833cm" svg:y="42.515cm">
          <text:p text:style-name="P5">perception</text:p>
        </draw:rect>
        <draw:rect draw:style-name="gr41" draw:text-style-name="P5" xml:id="id205" draw:id="id205"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3"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4"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5" svg:d="M84826 39775c0 2055 11761 685 11761 2740" svg:viewBox="0 0 11762 2741">
          <text:p/>
        </draw:connector>
        <draw:rect draw:style-name="gr41" draw:text-style-name="P5" xml:id="id206" draw:id="id206" draw:layer="layout" svg:width="2.79cm" svg:height="0.955cm" svg:x="90.331cm" svg:y="49.074cm">
          <text:p text:style-name="P5">Problem<text:line-break/>solving</text:p>
        </draw:rect>
        <draw:rect draw:style-name="gr41" draw:text-style-name="P5" xml:id="id207" draw:id="id207" draw:layer="layout" svg:width="2.79cm" svg:height="0.955cm" svg:x="93.453cm" svg:y="49.074cm">
          <text:p text:style-name="P5">reasoning</text:p>
        </draw:rect>
        <draw:connector draw:style-name="gr263" draw:text-style-name="P15" draw:layer="layout" draw:type="curve" svg:x1="88.522cm" svg:y1="47.379cm" svg:x2="91.726cm" svg:y2="49.074cm" draw:start-shape="id196" draw:start-glue-point="2" draw:end-shape="id206" svg:d="M88522 47379c0 1272 3204 425 3204 1695" svg:viewBox="0 0 3205 1696">
          <text:p/>
        </draw:connector>
        <draw:connector draw:style-name="gr264" draw:text-style-name="P15" draw:layer="layout" draw:type="curve" svg:x1="88.522cm" svg:y1="47.379cm" svg:x2="94.848cm" svg:y2="49.074cm" draw:start-shape="id196" draw:end-shape="id207" draw:end-glue-point="0" svg:d="M88522 47379c0 1272 6326 425 6326 1695" svg:viewBox="0 0 6327 1696">
          <text:p/>
        </draw:connector>
        <draw:rect draw:style-name="gr255" draw:text-style-name="P69" xml:id="id196" draw:id="id196" draw:layer="layout" svg:width="5.292cm" svg:height="1.612cm" svg:x="85.876cm" svg:y="45.767cm">
          <text:p text:style-name="P5"><text:span text:style-name="T30">None architectural</text:span><text:span text:style-name="T30"><text:line-break/></text:span><text:span text:style-name="T30">(work on existing learned</text:span><text:span text:style-name="T30"><text:line-break/></text:span><text:span text:style-name="T30">structures)</text:span></text:p>
        </draw:rect>
        <draw:connector draw:style-name="gr265" draw:text-style-name="P15" draw:layer="layout" draw:type="curve" svg:x1="84.826cm" svg:y1="39.775cm" svg:x2="85.267cm" svg:y2="42.449cm" draw:start-shape="id201" draw:start-glue-point="2" draw:end-shape="id208" draw:end-glue-point="0" svg:d="M84826 39775c0 2005 441 669 441 2674" svg:viewBox="0 0 442 2675">
          <text:p/>
        </draw:connector>
        <draw:connector draw:style-name="gr266" draw:text-style-name="P15" draw:layer="layout" draw:type="curve" svg:x1="88.549cm" svg:y1="43.47cm" svg:x2="88.522cm" svg:y2="45.767cm" draw:start-shape="id202" draw:start-glue-point="2" draw:end-shape="id196" draw:end-glue-point="0" svg:d="M88549 43470c0 1723-27 575-27 2297" svg:viewBox="0 0 28 2298">
          <text:p/>
        </draw:connector>
        <draw:connector draw:style-name="gr46" draw:text-style-name="P15" draw:layer="layout" draw:type="curve" svg:x1="85.267cm" svg:y1="42.449cm" svg:x2="78.306cm" svg:y2="39.681cm" draw:start-shape="id208" draw:start-glue-point="0" draw:end-shape="id209" draw:end-glue-point="7" svg:d="M85267 42449c0-1846-2320-2768-6961-2768" svg:viewBox="0 0 6962 2769">
          <text:p/>
        </draw:connector>
        <draw:custom-shape draw:name="comment box 4" draw:style-name="gr267" draw:text-style-name="P71" xml:id="id209" draw:id="id209" draw:layer="layout" svg:width="3.82cm" svg:height="2.833cm" svg:x="74.486cm" svg:y="38.264cm">
          <text:p text:style-name="P70"><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8" draw:text-style-name="P68" xml:id="id210" draw:id="id210"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10" draw:end-glue-point="6" svg:d="M133450 26509c0-1380 3568-460 3568-1841" svg:viewBox="0 0 3569 1842">
          <text:p/>
        </draw:connector>
        <draw:custom-shape draw:name="comment box 5" draw:style-name="gr267" draw:text-style-name="P71" xml:id="id211" draw:id="id211" draw:layer="layout" svg:width="3.82cm" svg:height="1.979cm" svg:x="87.313cm" svg:y="38.586cm">
          <text:p text:style-name="P70"><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565cm" draw:start-shape="id202" draw:start-glue-point="0" draw:end-shape="id211" draw:end-glue-point="6" svg:d="M88549 42515c0-1462 674-488 674-1950" svg:viewBox="0 0 675 1951">
          <text:p/>
        </draw:connector>
        <draw:rect draw:style-name="gr255" draw:text-style-name="P67" xml:id="id213" draw:id="id213"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2" draw:id="id212" draw:layer="layout" svg:width="2.4cm" svg:height="1cm" svg:x="91.63cm" svg:y="35.148cm">
          <text:p text:style-name="P8"><text:span text:style-name="T29">Object</text:span><text:span text:style-name="T29"><text:line-break/></text:span><text:span text:style-name="T29">level</text:span></text:p>
        </draw:rect>
        <draw:connector draw:style-name="gr269" draw:text-style-name="P15" draw:layer="layout" draw:type="curve" svg:x1="92.83cm" svg:y1="36.148cm" svg:x2="84.826cm" svg:y2="38.775cm" draw:start-shape="id212" draw:start-glue-point="2" draw:end-shape="id201" draw:end-glue-point="0" svg:d="M92830 36148c0 1971-8004 658-8004 2627" svg:viewBox="0 0 8005 2628">
          <text:p/>
        </draw:connector>
        <draw:rect draw:style-name="gr255" draw:text-style-name="P72" xml:id="id214" draw:id="id214" draw:layer="layout" svg:width="2.885cm" svg:height="1cm" svg:x="101.415cm" svg:y="37.365cm">
          <text:p text:style-name="P3"><text:span text:style-name="T29">Self-</text:span><text:span text:style-name="T29"><text:line-break/></text:span><text:span text:style-name="T29">consciousness</text:span></text:p>
        </draw:rect>
        <draw:connector draw:style-name="gr270" draw:text-style-name="P15" draw:layer="layout" draw:type="curve" svg:x1="106.992cm" svg:y1="35.872cm" svg:x2="102.857cm" svg:y2="37.365cm" draw:start-shape="id213" draw:start-glue-point="2" draw:end-shape="id214" draw:end-glue-point="0" svg:d="M106992 35872c0 1120-4135 374-4135 1493" svg:viewBox="0 0 4136 1494">
          <text:p/>
        </draw:connector>
        <draw:rect draw:style-name="gr255" draw:text-style-name="P67" xml:id="id215" draw:id="id215" draw:layer="layout" svg:width="2.8cm" svg:height="1.2cm" svg:x="125.553cm" svg:y="28.971cm">
          <text:p text:style-name="P8"><text:span text:style-name="T29">Organ</text:span><text:span text:style-name="T29"><text:line-break/></text:span><text:span text:style-name="T29">(link)</text:span></text:p>
        </draw:rect>
        <draw:connector draw:style-name="gr271" draw:text-style-name="P15" draw:layer="layout" draw:type="curve" svg:x1="133.45cm" svg:y1="27.509cm" svg:x2="126.953cm" svg:y2="28.971cm" draw:start-shape="id188" draw:start-glue-point="2" draw:end-shape="id215"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2"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6" draw:id="id216" draw:layer="layout" svg:width="3.331cm" svg:height="1.431cm" svg:x="148.038cm" svg:y="36.861cm">
          <text:p text:style-name="P5">Peripheral<text:line-break/>nerves</text:p>
        </draw:rect>
        <draw:connector draw:style-name="gr273" draw:text-style-name="P15" draw:layer="layout" draw:type="curve" svg:x1="137.15cm" svg:y1="30.109cm" svg:x2="149.703cm" svg:y2="36.861cm" draw:start-shape="id190" draw:start-glue-point="2" draw:end-shape="id216" draw:end-glue-point="0" svg:d="M137150 30109c0 5064 12553 1688 12553 6752" svg:viewBox="0 0 12554 6753">
          <text:p/>
        </draw:connector>
        <draw:custom-shape draw:style-name="gr274" draw:text-style-name="P68" xml:id="id217" draw:id="id217"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5" draw:start-glue-point="0" draw:end-shape="id217"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054cm" svg:y2="38.017cm" draw:start-shape="id195" draw:start-glue-point="0" draw:end-shape="id218" draw:end-glue-point="6" svg:d="M141081 39048c0-772 973-257 973-1031" svg:viewBox="0 0 974 1032">
          <text:p/>
        </draw:connector>
        <draw:connector draw:style-name="gr275"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6" draw:text-style-name="P68" xml:id="id219" draw:id="id219"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9" draw:end-glue-point="6" svg:d="M132337 28909c0-1065-2267-355-2267-1420" svg:viewBox="0 0 2268 1421">
          <text:p/>
        </draw:connector>
        <draw:rect draw:style-name="gr277" draw:text-style-name="P5" xml:id="id221" draw:id="id221" draw:layer="layout" svg:width="2.475cm" svg:height="0.752cm" svg:x="144.138cm" svg:y="43.335cm">
          <text:p text:style-name="P30"><text:span text:style-name="T28">Enteric</text:span></text:p>
        </draw:rect>
        <draw:connector draw:style-name="gr278" draw:text-style-name="P15" draw:layer="layout" draw:type="curve" svg:x1="145.379cm" svg:y1="41.953cm" svg:x2="145.375cm" svg:y2="43.335cm" draw:start-shape="id220" draw:start-glue-point="2" draw:end-shape="id221" svg:d="M145379 41953c0 1036-4 346-4 1382" svg:viewBox="0 0 5 1383">
          <text:p/>
        </draw:connector>
        <draw:rect draw:style-name="gr41" draw:text-style-name="P5" xml:id="id220" draw:id="id220" draw:layer="layout" svg:width="2.426cm" svg:height="1.051cm" svg:x="144.166cm" svg:y="40.902cm">
          <text:p text:style-name="P5">Automatic</text:p>
        </draw:rect>
        <draw:connector draw:style-name="gr279" draw:text-style-name="P15" draw:layer="layout" draw:type="curve" svg:x1="149.703cm" svg:y1="38.292cm" svg:x2="145.379cm" svg:y2="40.902cm" draw:start-shape="id216" draw:start-glue-point="2" draw:end-shape="id220" draw:end-glue-point="0" svg:d="M149703 38292c0 1957-4324 653-4324 2610" svg:viewBox="0 0 4325 2611">
          <text:p/>
        </draw:connector>
        <draw:custom-shape draw:style-name="gr280" draw:text-style-name="P68" xml:id="id218" draw:id="id218" draw:layer="layout" svg:width="2.971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07" draw:text-style-name="P34" xml:id="id222" draw:id="id222" draw:layer="layout" svg:width="2.138cm" svg:height="1.014cm" svg:x="127.181cm" svg:y="31.128cm">
          <text:p text:style-name="P5">Motor <text:line-break/>neurons</text:p>
        </draw:rect>
        <draw:connector draw:style-name="gr281" draw:text-style-name="P15" draw:layer="layout" draw:type="curve" svg:x1="128.25cm" svg:y1="31.128cm" svg:x2="132.337cm" svg:y2="30.109cm" draw:start-shape="id222"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3" draw:start-glue-point="2" draw:end-shape="id192" draw:end-glue-point="0" svg:d="M130925 38049c0 864-227 289-227 1151" svg:viewBox="0 0 228 1152">
          <text:p/>
        </draw:connector>
        <draw:rect draw:style-name="gr207" draw:text-style-name="P34" xml:id="id223" draw:id="id223" draw:layer="layout" svg:width="2.138cm" svg:height="1.014cm" svg:x="129.856cm" svg:y="37.035cm">
          <text:p text:style-name="P5">projection <text:line-break/>neurons</text:p>
        </draw:rect>
        <draw:custom-shape draw:style-name="gr283" draw:text-style-name="P68" xml:id="id224" draw:id="id224"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4" draw:start-glue-point="6" draw:end-shape="id223" draw:end-glue-point="0" svg:d="M129583 35929c0 831 1342 278 1342 1106" svg:viewBox="0 0 1343 1107">
          <text:p/>
        </draw:connector>
        <draw:rect draw:style-name="gr255" draw:text-style-name="P67" xml:id="id225" draw:id="id225"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2" draw:start-glue-point="2" draw:end-shape="id225" draw:end-glue-point="0" svg:d="M92830 36148c0 2266 3785 756 3785 3022" svg:viewBox="0 0 3786 3023">
          <text:p/>
        </draw:connector>
        <draw:rect draw:style-name="gr41" draw:text-style-name="P5" xml:id="id226" draw:id="id226" draw:layer="layout" svg:width="2.449cm" svg:height="0.713cm" svg:x="152.441cm" svg:y="41cm">
          <text:p text:style-name="P5">Somatic</text:p>
        </draw:rect>
        <draw:connector draw:style-name="gr286" draw:text-style-name="P15" draw:layer="layout" draw:type="curve" svg:x1="149.703cm" svg:y1="38.292cm" svg:x2="153.665cm" svg:y2="41cm" draw:start-shape="id216" draw:start-glue-point="2" draw:end-shape="id226" draw:end-glue-point="0" svg:d="M149703 38292c0 2031 3962 677 3962 2708" svg:viewBox="0 0 3963 2709">
          <text:p/>
        </draw:connector>
        <draw:rect draw:style-name="gr255" draw:text-style-name="P67" xml:id="id227" draw:id="id227" draw:layer="layout" svg:width="2.5cm" svg:height="1cm" svg:x="55.004cm" svg:y="51.128cm">
          <text:p text:style-name="P8"><text:span text:style-name="T29">explicit</text:span></text:p>
        </draw:rect>
        <draw:rect draw:style-name="gr255" draw:text-style-name="P67" xml:id="id228" draw:id="id228"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4" draw:start-glue-point="2" draw:end-shape="id227" svg:d="M69716 45549c0 4185-13462 1396-13462 5579" svg:viewBox="0 0 13463 5580">
          <text:p/>
        </draw:connector>
        <draw:connector draw:style-name="gr288" draw:text-style-name="P15" draw:layer="layout" draw:type="curve" svg:x1="56.254cm" svg:y1="52.128cm" svg:x2="46.254cm" svg:y2="53.528cm" draw:start-shape="id227" draw:start-glue-point="2" draw:end-shape="id228" draw:end-glue-point="0" svg:d="M56254 52128c0 1050-10000 350-10000 1400" svg:viewBox="0 0 10001 1401">
          <text:p/>
        </draw:connector>
        <draw:rect draw:style-name="gr255" draw:text-style-name="P67" xml:id="id229" draw:id="id229"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4" draw:start-glue-point="2" draw:end-shape="id229" draw:end-glue-point="0" svg:d="M69716 45549c0 5310-962 1771-962 7079" svg:viewBox="0 0 963 7080">
          <text:p/>
        </draw:connector>
        <draw:rect draw:style-name="gr255" draw:text-style-name="P67" xml:id="id231" draw:id="id231"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30" draw:id="id230"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9" draw:start-glue-point="2" draw:end-shape="id230" draw:end-glue-point="0" svg:d="M68754 53628c0 1050-1500 350-1500 1400" svg:viewBox="0 0 1501 1401">
          <text:p/>
        </draw:connector>
        <draw:connector draw:style-name="gr291" draw:text-style-name="P15" draw:layer="layout" draw:type="curve" svg:x1="68.754cm" svg:y1="53.628cm" svg:x2="70.254cm" svg:y2="55.028cm" draw:start-shape="id229" draw:start-glue-point="2" draw:end-shape="id231" draw:end-glue-point="0" svg:d="M68754 53628c0 1050 1500 350 1500 1400" svg:viewBox="0 0 1501 1401">
          <text:p/>
        </draw:connector>
        <draw:rect draw:style-name="gr255" draw:text-style-name="P67" xml:id="id233" draw:id="id233" draw:layer="layout" svg:width="2.56cm" svg:height="1.113cm" svg:x="34.23cm" svg:y="56.001cm">
          <text:p text:style-name="P8"><text:span text:style-name="T29">episodic</text:span></text:p>
        </draw:rect>
        <draw:rect draw:style-name="gr255" draw:text-style-name="P67" xml:id="id232" draw:id="id232" draw:layer="layout" svg:width="2.3cm" svg:height="1cm" svg:x="47.104cm" svg:y="56.528cm">
          <text:p text:style-name="P8"><text:span text:style-name="T29">semantic</text:span></text:p>
        </draw:rect>
        <draw:connector draw:style-name="gr65" draw:text-style-name="P15" draw:layer="layout" draw:type="curve" svg:x1="46.254cm" svg:y1="54.528cm" svg:x2="48.254cm" svg:y2="56.528cm" draw:start-shape="id228" draw:start-glue-point="2" draw:end-shape="id232" draw:end-glue-point="0" svg:d="M46254 54528c0 1500 2000 500 2000 2000" svg:viewBox="0 0 2001 2001">
          <text:p/>
        </draw:connector>
        <draw:connector draw:style-name="gr66" draw:text-style-name="P15" draw:layer="layout" draw:type="curve" svg:x1="46.254cm" svg:y1="54.528cm" svg:x2="35.51cm" svg:y2="56.001cm" draw:start-shape="id228" draw:start-glue-point="2" draw:end-shape="id233" draw:end-glue-point="0" svg:d="M46254 54528c0 1105-10744 369-10744 1473" svg:viewBox="0 0 10745 1474">
          <text:p/>
        </draw:connector>
        <draw:rect draw:style-name="gr292" draw:text-style-name="P35" xml:id="id246" draw:id="id246"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1" draw:start-glue-point="2" draw:end-shape="id234" draw:end-glue-point="0" svg:d="M70254 56028c0 1350 800 450 800 1800" svg:viewBox="0 0 801 1801">
          <text:p/>
        </draw:connector>
        <draw:rect draw:style-name="gr255" draw:text-style-name="P67" xml:id="id235" draw:id="id235" draw:layer="layout" svg:width="2.3cm" svg:height="1cm" svg:x="52.804cm" svg:y="56.528cm">
          <text:p text:style-name="P73">item <text:line-break/>memory</text:p>
        </draw:rect>
        <draw:connector draw:style-name="gr70" draw:text-style-name="P15" draw:layer="layout" draw:type="curve" svg:x1="46.254cm" svg:y1="54.528cm" svg:x2="53.954cm" svg:y2="56.528cm" draw:start-shape="id228" draw:start-glue-point="2" draw:end-shape="id235" draw:end-glue-point="0" svg:d="M46254 54528c0 1500 7700 500 7700 2000" svg:viewBox="0 0 7701 2001">
          <text:p/>
        </draw:connector>
        <draw:rect draw:style-name="gr255" draw:text-style-name="P67" xml:id="id236" draw:id="id236"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5" draw:start-glue-point="2" draw:end-shape="id236" svg:d="M53954 57528v1700" svg:viewBox="0 0 1 1701">
          <text:p/>
        </draw:connector>
        <draw:connector draw:style-name="gr72" draw:text-style-name="P15" draw:layer="layout" draw:type="curve" svg:x1="48.254cm" svg:y1="57.528cm" svg:x2="53.954cm" svg:y2="59.228cm" draw:start-shape="id232" draw:start-glue-point="2" draw:end-shape="id236" draw:end-glue-point="0" svg:d="M48254 57528c0 1275 5700 425 5700 1700" svg:viewBox="0 0 5701 1701">
          <text:p/>
        </draw:connector>
        <draw:rect draw:name="memory" draw:style-name="gr40" draw:text-style-name="P63" xml:id="id204" draw:id="id204" draw:layer="layout" svg:width="2.4cm" svg:height="1cm" svg:x="68.516cm" svg:y="44.549cm">
          <text:p text:style-name="P5"><text:span text:style-name="T17">memory</text:span></text:p>
        </draw:rect>
        <draw:rect draw:style-name="gr255" draw:text-style-name="P67" xml:id="id237" draw:id="id237"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7" draw:start-glue-point="2" draw:end-shape="id237" draw:end-glue-point="0" svg:d="M56254 52128c0 1050 4700 350 4700 1400" svg:viewBox="0 0 4701 1401">
          <text:p/>
        </draw:connector>
        <draw:rect draw:style-name="gr255" draw:text-style-name="P67" xml:id="id238" draw:id="id238"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6" draw:start-glue-point="2" draw:end-shape="id238" draw:end-glue-point="0" svg:d="M53954 60228v1000" svg:viewBox="0 0 1 1001">
          <text:p/>
        </draw:connector>
        <draw:rect draw:style-name="gr292" draw:text-style-name="P35" xml:id="id240" draw:id="id240" draw:layer="layout" svg:width="2.3cm" svg:height="1cm" svg:x="17.504cm" svg:y="71.728cm">
          <text:p text:style-name="P5">Goal</text:p>
        </draw:rect>
        <draw:connector draw:style-name="gr69" draw:text-style-name="P15" draw:layer="layout" draw:type="curve" svg:x1="16.654cm" svg:y1="69.628cm" svg:x2="18.654cm" svg:y2="71.728cm" draw:start-shape="id239" draw:end-shape="id240" draw:end-glue-point="0" svg:d="M16654 69628c0 1575 2000 525 2000 2100" svg:viewBox="0 0 2001 2101">
          <text:p/>
        </draw:connector>
        <draw:rect draw:style-name="gr292" draw:text-style-name="P35" xml:id="id239" draw:id="id239" draw:layer="layout" svg:width="2.3cm" svg:height="1cm" svg:x="15.504cm" svg:y="68.628cm">
          <text:p text:style-name="P5">Normal<text:line-break/>scenario</text:p>
        </draw:rect>
        <draw:rect draw:style-name="gr292" draw:text-style-name="P35" xml:id="id261" draw:id="id261" draw:layer="layout" svg:width="2.3cm" svg:height="1cm" svg:x="27.314cm" svg:y="68.887cm">
          <text:p text:style-name="P5">follow<text:line-break/>scenario</text:p>
        </draw:rect>
        <draw:rect draw:style-name="gr292" draw:text-style-name="P35" xml:id="id241" draw:id="id241" draw:layer="layout" svg:width="2.3cm" svg:height="1cm" svg:x="24.504cm" svg:y="71.628cm">
          <text:p text:style-name="P5">sensors</text:p>
        </draw:rect>
        <draw:connector draw:style-name="gr92" draw:text-style-name="P15" draw:layer="layout" draw:type="curve" svg:x1="16.654cm" svg:y1="69.628cm" svg:x2="25.654cm" svg:y2="71.628cm" draw:start-shape="id239" draw:start-glue-point="2" draw:end-shape="id241" draw:end-glue-point="0" svg:d="M16654 69628c0 1500 9000 500 9000 2000" svg:viewBox="0 0 9001 2001">
          <text:p/>
        </draw:connector>
        <draw:rect draw:style-name="gr292" draw:text-style-name="P35" xml:id="id242" draw:id="id242"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1" draw:start-glue-point="2" draw:end-shape="id242" svg:d="M25654 72628c0 900-4600 300-4600 1200" svg:viewBox="0 0 4601 1201">
          <text:p/>
        </draw:connector>
        <draw:rect draw:style-name="gr292" draw:text-style-name="P35" xml:id="id243" draw:id="id243" draw:layer="layout" svg:width="2.3cm" svg:height="1cm" svg:x="22.604cm" svg:y="73.828cm">
          <text:p text:style-name="P5">GPS</text:p>
        </draw:rect>
        <draw:connector draw:style-name="gr95" draw:text-style-name="P15" draw:layer="layout" draw:type="curve" svg:x1="25.654cm" svg:y1="72.628cm" svg:x2="23.754cm" svg:y2="73.828cm" draw:start-shape="id241" draw:start-glue-point="2" draw:end-shape="id243" svg:d="M25654 72628c0 900-1900 300-1900 1200" svg:viewBox="0 0 1901 1201">
          <text:p/>
        </draw:connector>
        <draw:rect draw:style-name="gr294" draw:text-style-name="P74" xml:id="id245" draw:id="id245" draw:layer="layout" svg:width="3.154cm" svg:height="1.57cm" svg:x="22.41cm" svg:y="62.2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27.572cm" svg:y1="60.881cm" svg:x2="23.987cm" svg:y2="62.261cm" draw:start-shape="id244" draw:start-glue-point="2" draw:end-shape="id245" draw:end-glue-point="0" svg:d="M27572 60881c0 1035-3585 345-3585 1380" svg:viewBox="0 0 3586 1381">
          <text:p/>
        </draw:connector>
        <draw:rect draw:style-name="gr292" draw:text-style-name="P35" xml:id="id249" draw:id="id249" draw:layer="layout" svg:width="2.3cm" svg:height="1cm" svg:x="22.734cm" svg:y="65.568cm">
          <text:p text:style-name="P5">oldest</text:p>
        </draw:rect>
        <draw:rect draw:style-name="gr292" draw:text-style-name="P35" xml:id="id234" draw:id="id234" draw:layer="layout" svg:width="2.3cm" svg:height="1cm" svg:x="69.904cm" svg:y="57.828cm">
          <text:p text:style-name="P5">Robotic lab</text:p>
        </draw:rect>
        <draw:connector draw:style-name="gr293" draw:text-style-name="P15" draw:layer="layout" draw:type="curve" svg:x1="71.054cm" svg:y1="58.828cm" svg:x2="71.054cm" svg:y2="59.828cm" draw:start-shape="id234" draw:start-glue-point="2" draw:end-shape="id246" draw:end-glue-point="0" svg:d="M71054 58828v1000" svg:viewBox="0 0 1 1001">
          <text:p/>
        </draw:connector>
        <draw:rect draw:style-name="gr292" draw:text-style-name="P35" xml:id="id247" draw:id="id247" draw:layer="layout" svg:width="2.9cm" svg:height="1.2cm" svg:x="67.004cm" svg:y="62.528cm">
          <text:p text:style-name="P5">Architecture</text:p>
        </draw:rect>
        <draw:rect draw:style-name="gr292" draw:text-style-name="P35" xml:id="id248" draw:id="id248" draw:layer="layout" svg:width="2.9cm" svg:height="1.2cm" svg:x="72.304cm" svg:y="62.528cm">
          <text:p text:style-name="P5">Training config</text:p>
        </draw:rect>
        <draw:connector draw:style-name="gr293" draw:text-style-name="P15" draw:layer="layout" draw:type="curve" svg:x1="71.054cm" svg:y1="61.428cm" svg:x2="68.454cm" svg:y2="62.528cm" draw:start-shape="id246" draw:start-glue-point="2" draw:end-shape="id247" svg:d="M71054 61428c0 825-2600 275-2600 1100" svg:viewBox="0 0 2601 1101">
          <text:p/>
        </draw:connector>
        <draw:connector draw:style-name="gr293" draw:text-style-name="P15" draw:layer="layout" draw:type="curve" svg:x1="71.054cm" svg:y1="61.428cm" svg:x2="73.754cm" svg:y2="62.528cm" draw:start-shape="id246" draw:start-glue-point="2" draw:end-shape="id248" draw:end-glue-point="0" svg:d="M71054 61428c0 825 2700 275 2700 1100" svg:viewBox="0 0 2701 1101">
          <text:p/>
        </draw:connector>
        <draw:connector draw:style-name="gr293" draw:text-style-name="P15" draw:layer="layout" draw:type="curve" svg:x1="23.884cm" svg:y1="66.568cm" svg:x2="16.654cm" svg:y2="68.628cm" draw:start-shape="id249" draw:start-glue-point="2" draw:end-shape="id239" draw:end-glue-point="0" svg:d="M23884 66568c0 1545-7230 515-7230 2060" svg:viewBox="0 0 7231 2061">
          <text:p/>
        </draw:connector>
        <draw:rect draw:style-name="gr292" draw:text-style-name="P35" xml:id="id250" draw:id="id250" draw:layer="layout" svg:width="2.3cm" svg:height="1cm" svg:x="14.804cm" svg:y="71.728cm">
          <text:p text:style-name="P5">Actions</text:p>
        </draw:rect>
        <draw:rect draw:style-name="gr292" draw:text-style-name="P35" xml:id="id251" draw:id="id251" draw:layer="layout" svg:width="2.3cm" svg:height="1cm" svg:x="12.104cm" svg:y="71.728cm">
          <text:p text:style-name="P5">Plans</text:p>
        </draw:rect>
        <draw:connector draw:style-name="gr295" draw:text-style-name="P15" draw:layer="layout" draw:type="curve" svg:x1="16.654cm" svg:y1="69.628cm" svg:x2="15.954cm" svg:y2="71.728cm" draw:start-shape="id239" draw:start-glue-point="2" draw:end-shape="id250" draw:end-glue-point="0" svg:d="M16654 69628c0 1575-700 525-700 2100" svg:viewBox="0 0 701 2101">
          <text:p/>
        </draw:connector>
        <draw:connector draw:style-name="gr296" draw:text-style-name="P15" draw:layer="layout" draw:type="curve" svg:x1="16.654cm" svg:y1="69.628cm" svg:x2="13.254cm" svg:y2="71.728cm" draw:start-shape="id239" draw:start-glue-point="2" draw:end-shape="id251" svg:d="M16654 69628c0 1575-3400 525-3400 2100" svg:viewBox="0 0 3401 2101">
          <text:p/>
        </draw:connector>
        <draw:rect draw:style-name="gr254" draw:text-style-name="P33" xml:id="id252" draw:id="id252" draw:layer="layout" svg:width="2.5cm" svg:height="1cm" svg:x="71.755cm" svg:y="51.445cm">
          <text:p text:style-name="P5">action</text:p>
        </draw:rect>
        <draw:connector draw:style-name="gr297" draw:text-style-name="P15" draw:layer="layout" draw:type="curve" svg:x1="69.716cm" svg:y1="45.549cm" svg:x2="73.005cm" svg:y2="51.445cm" draw:start-shape="id204" draw:start-glue-point="2" draw:end-shape="id252" draw:end-glue-point="0" svg:d="M69716 45549c0 4422 3289 1474 3289 5896" svg:viewBox="0 0 3290 5897">
          <text:p/>
        </draw:connector>
        <draw:rect draw:style-name="gr298" draw:text-style-name="P75" xml:id="id253" draw:id="id253" draw:layer="layout" svg:width="2.5cm" svg:height="1cm" svg:x="77.004cm" svg:y="57.328cm">
          <text:p text:style-name="P5">Segregarion</text:p>
        </draw:rect>
        <draw:rect draw:style-name="gr292" draw:text-style-name="P35" xml:id="id254" draw:id="id254" draw:layer="layout" svg:width="2.5cm" svg:height="1cm" svg:x="73.904cm" svg:y="60.528cm">
          <text:p text:style-name="P8"><text:span text:style-name="T27">Auto </text:span><text:span text:style-name="T27"><text:line-break/></text:span><text:span text:style-name="T27">correlation</text:span></text:p>
        </draw:rect>
        <draw:rect draw:style-name="gr292" draw:text-style-name="P35" xml:id="id255" draw:id="id255" draw:layer="layout" svg:width="2.5cm" svg:height="1cm" svg:x="76.871cm" svg:y="60.528cm">
          <text:p text:style-name="P8"><text:span text:style-name="T27">split</text:span></text:p>
        </draw:rect>
        <draw:rect draw:style-name="gr292" draw:text-style-name="P35" xml:id="id256" draw:id="id256" draw:layer="layout" svg:width="2.5cm" svg:height="1cm" svg:x="79.837cm" svg:y="60.528cm">
          <text:p text:style-name="P8"><text:span text:style-name="T27">clustering</text:span></text:p>
        </draw:rect>
        <draw:connector draw:style-name="gr299" draw:text-style-name="P15" draw:layer="layout" draw:type="curve" svg:x1="78.254cm" svg:y1="58.328cm" svg:x2="75.154cm" svg:y2="60.528cm" draw:start-shape="id253" draw:start-glue-point="2" draw:end-shape="id254" draw:end-glue-point="0" svg:d="M78254 58328c0 1650-3100 550-3100 2200" svg:viewBox="0 0 3101 2201">
          <text:p/>
        </draw:connector>
        <draw:connector draw:style-name="gr300" draw:text-style-name="P15" draw:layer="layout" draw:type="curve" svg:x1="78.254cm" svg:y1="58.328cm" svg:x2="78.121cm" svg:y2="60.528cm" draw:start-shape="id253" draw:start-glue-point="2" draw:end-shape="id255" draw:end-glue-point="0" svg:d="M78254 58328c0 1650-133 550-133 2200" svg:viewBox="0 0 134 2201">
          <text:p/>
        </draw:connector>
        <draw:connector draw:style-name="gr301" draw:text-style-name="P15" draw:layer="layout" draw:type="curve" svg:x1="78.254cm" svg:y1="58.328cm" svg:x2="81.087cm" svg:y2="60.528cm" draw:start-shape="id253" draw:start-glue-point="2" draw:end-shape="id256" svg:d="M78254 58328c0 1650 2833 550 2833 2200" svg:viewBox="0 0 2834 2201">
          <text:p/>
        </draw:connector>
        <draw:connector draw:style-name="gr302" draw:text-style-name="P15" draw:layer="layout" draw:type="curve" svg:x1="73.005cm" svg:y1="52.445cm" svg:x2="78.254cm" svg:y2="57.328cm" draw:start-shape="id252" draw:start-glue-point="2" draw:end-shape="id253" draw:end-glue-point="0" svg:d="M73005 52445c0 3663 5249 1222 5249 4883" svg:viewBox="0 0 5250 4884">
          <text:p/>
        </draw:connector>
        <draw:rect draw:style-name="gr292" draw:text-style-name="P35" xml:id="id479" draw:id="id479" draw:layer="layout" svg:width="2.5cm" svg:height="1cm" svg:x="82.804cm" svg:y="60.528cm">
          <text:p text:style-name="P8"><text:span text:style-name="T27">Feature</text:span><text:span text:style-name="T27"><text:line-break/></text:span><text:span text:style-name="T27">slice</text:span></text:p>
        </draw:rect>
        <draw:rect draw:style-name="gr292" draw:text-style-name="P35" xml:id="id257" draw:id="id257" draw:layer="layout" svg:width="2.3cm" svg:height="1cm" svg:x="46.472cm" svg:y="59.941cm">
          <text:p text:style-name="P5">goals</text:p>
        </draw:rect>
        <draw:connector draw:style-name="gr303" draw:text-style-name="P15" draw:layer="layout" draw:type="curve" svg:x1="48.254cm" svg:y1="57.528cm" svg:x2="47.622cm" svg:y2="59.941cm" draw:start-shape="id232" draw:start-glue-point="2" draw:end-shape="id257" draw:end-glue-point="0" svg:d="M48254 57528c0 1810-632 604-632 2413" svg:viewBox="0 0 633 2414">
          <text:p/>
        </draw:connector>
        <draw:rect draw:style-name="gr292" draw:text-style-name="P35" xml:id="id258" draw:id="id258" draw:layer="layout" svg:width="2.3cm" svg:height="1cm" svg:x="46.418cm" svg:y="61.675cm">
          <text:p text:style-name="P5">Suprise<text:line-break/>reduction</text:p>
        </draw:rect>
        <draw:connector draw:style-name="gr304" draw:text-style-name="P15" draw:layer="layout" draw:type="curve" svg:x1="47.622cm" svg:y1="60.941cm" svg:x2="47.568cm" svg:y2="61.675cm" draw:start-shape="id257" draw:start-glue-point="2" draw:end-shape="id258" draw:end-glue-point="0" svg:d="M47622 60941c0 550-54 184-54 734" svg:viewBox="0 0 55 735">
          <text:p/>
        </draw:connector>
        <draw:rect draw:style-name="gr255" draw:text-style-name="P67" xml:id="id259" draw:id="id259" draw:layer="layout" svg:width="3.154cm" svg:height="1.57cm" svg:x="29.795cm" svg:y="62.261cm">
          <text:p text:style-name="P8"><text:span text:style-name="T29">General events</text:span></text:p>
        </draw:rect>
        <draw:connector draw:style-name="gr305" draw:text-style-name="P15" draw:layer="layout" draw:type="curve" svg:x1="27.572cm" svg:y1="60.881cm" svg:x2="31.372cm" svg:y2="62.261cm" draw:start-shape="id244" draw:start-glue-point="2" draw:end-shape="id259" draw:end-glue-point="0" svg:d="M27572 60881c0 1035 3800 345 3800 1380" svg:viewBox="0 0 3801 1381">
          <text:p/>
        </draw:connector>
        <draw:rect draw:style-name="gr306" draw:text-style-name="P77" xml:id="id260" draw:id="id260" draw:layer="layout" svg:width="3.154cm" svg:height="1.57cm" svg:x="26.103cm" svg:y="62.261cm">
          <text:p text:style-name="P76"><text:span text:style-name="T29">lifetime</text:span></text:p>
        </draw:rect>
        <draw:connector draw:style-name="gr307" draw:text-style-name="P15" draw:layer="layout" draw:type="curve" svg:x1="27.572cm" svg:y1="60.881cm" svg:x2="27.68cm" svg:y2="62.261cm" draw:start-shape="id244" draw:end-shape="id260" draw:end-glue-point="0" svg:d="M27572 60881c0 1035 108 345 108 1380" svg:viewBox="0 0 109 1381">
          <text:p/>
        </draw:connector>
        <draw:connector draw:style-name="gr308" draw:text-style-name="P15" draw:layer="layout" draw:type="curve" svg:x1="23.987cm" svg:y1="63.831cm" svg:x2="23.884cm" svg:y2="65.568cm" draw:start-shape="id245" draw:start-glue-point="2" draw:end-shape="id249" draw:end-glue-point="0" svg:d="M23987 63831c0 1303-103 435-103 1737" svg:viewBox="0 0 104 1738">
          <text:p/>
        </draw:connector>
        <draw:connector draw:style-name="gr309" draw:text-style-name="P15" draw:layer="layout" draw:type="curve" svg:x1="23.884cm" svg:y1="66.568cm" svg:x2="28.464cm" svg:y2="68.887cm" draw:start-shape="id249" draw:start-glue-point="2" draw:end-shape="id261" draw:end-glue-point="0" svg:d="M23884 66568c0 1740 4580 581 4580 2319" svg:viewBox="0 0 4581 2320">
          <text:p/>
        </draw:connector>
        <draw:rect draw:style-name="gr255" draw:text-style-name="P67" xml:id="id244" draw:id="id244" draw:layer="layout" svg:width="3.804cm" svg:height="1cm" svg:x="25.67cm" svg:y="59.881cm">
          <text:p text:style-name="P8"><text:span text:style-name="T29">Autobiographic</text:span></text:p>
        </draw:rect>
        <draw:connector draw:style-name="gr310" draw:text-style-name="P15" draw:layer="layout" draw:type="curve" svg:x1="35.51cm" svg:y1="57.114cm" svg:x2="27.572cm" svg:y2="59.881cm" draw:start-shape="id233" draw:end-shape="id244" draw:end-glue-point="0" svg:d="M35510 57114c0 2076-7938 693-7938 2767" svg:viewBox="0 0 7939 2768">
          <text:p/>
        </draw:connector>
        <draw:rect draw:style-name="gr292" draw:text-style-name="P35" xml:id="id262" draw:id="id262" draw:layer="layout" svg:width="2.138cm" svg:height="1.014cm" svg:x="119.674cm" svg:y="37.646cm">
          <text:p text:style-name="P5">neurons</text:p>
        </draw:rect>
        <draw:rect draw:style-name="gr255" draw:text-style-name="P67" xml:id="id265" draw:id="id265"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4" draw:id="id264"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3" draw:id="id263" draw:layer="layout" svg:width="2.138cm" svg:height="1.014cm" svg:x="118.571cm" svg:y="40.55cm">
          <text:p text:style-name="P8"><text:span text:style-name="T29">projection </text:span><text:span text:style-name="T29"><text:line-break/></text:span><text:span text:style-name="T29">neurons</text:span></text:p>
        </draw:rect>
        <draw:connector draw:style-name="gr311" draw:text-style-name="P46" draw:layer="layout" draw:type="curve" svg:x1="120.743cm" svg:y1="38.66cm" svg:x2="119.64cm" svg:y2="40.55cm" draw:start-shape="id262" draw:start-glue-point="2" draw:end-shape="id263" svg:d="M120743 38660c0 1417-1103 473-1103 1890" svg:viewBox="0 0 1104 1891">
          <text:p/>
        </draw:connector>
        <draw:connector draw:style-name="gr312" draw:text-style-name="P46" draw:layer="layout" draw:type="curve" svg:x1="120.743cm" svg:y1="38.66cm" svg:x2="122.227cm" svg:y2="40.526cm" draw:start-shape="id262" draw:start-glue-point="2" draw:end-shape="id264" draw:end-glue-point="0" svg:d="M120743 38660c0 1399 1484 467 1484 1866" svg:viewBox="0 0 1485 1867">
          <text:p/>
        </draw:connector>
        <draw:connector draw:style-name="gr313" draw:text-style-name="P46" draw:layer="layout" draw:type="curve" svg:x1="120.743cm" svg:y1="38.66cm" svg:x2="124.862cm" svg:y2="40.623cm" draw:start-shape="id262" draw:start-glue-point="2" draw:end-shape="id265" draw:end-glue-point="0" svg:d="M120743 38660c0 1473 4119 492 4119 1963" svg:viewBox="0 0 4120 1964">
          <text:p/>
        </draw:connector>
        <draw:rect draw:style-name="gr255" draw:text-style-name="P67" xml:id="id266" draw:id="id266" draw:layer="layout" svg:width="2.51cm" svg:height="1.014cm" svg:x="115.804cm" svg:y="40.53cm">
          <text:p text:style-name="P8"><text:span text:style-name="T29">Interneuron </text:span><text:span text:style-name="T29"><text:line-break/></text:span><text:span text:style-name="T29">neurons</text:span></text:p>
        </draw:rect>
        <draw:connector draw:style-name="gr314" draw:text-style-name="P46" draw:layer="layout" draw:type="curve" svg:x1="120.743cm" svg:y1="38.66cm" svg:x2="117.059cm" svg:y2="40.53cm" draw:start-shape="id262" draw:start-glue-point="2" draw:end-shape="id266" draw:end-glue-point="0" svg:d="M120743 38660c0 1402-3684 468-3684 1870" svg:viewBox="0 0 3685 1871">
          <text:p/>
        </draw:connector>
        <draw:rect draw:style-name="gr255" draw:text-style-name="P67" xml:id="id324" draw:id="id324" draw:layer="layout" svg:width="2.4cm" svg:height="1cm" svg:x="111.949cm" svg:y="32.36cm">
          <text:p text:style-name="P8"><text:span text:style-name="T29">awareness</text:span></text:p>
        </draw:rect>
        <draw:rect draw:style-name="gr255" draw:text-style-name="P79" xml:id="id268" draw:id="id268" draw:layer="layout" svg:width="2.4cm" svg:height="1cm" svg:x="112.023cm" svg:y="30.205cm">
          <text:p text:style-name="P78"><text:span text:style-name="T29">Consciousness</text:span></text:p>
        </draw:rect>
        <draw:connector draw:style-name="gr315" draw:text-style-name="P15" draw:layer="layout" draw:type="curve" svg:x1="115.171cm" svg:y1="28.951cm" svg:x2="113.223cm" svg:y2="30.205cm" draw:start-shape="id267" draw:start-glue-point="2" draw:end-shape="id268" draw:end-glue-point="0" svg:d="M115171 28951c0 314-487 627-974 627s-974 314-974 627" svg:viewBox="0 0 1949 1255">
          <text:p/>
        </draw:connector>
        <draw:rect draw:style-name="gr255" draw:text-style-name="P79" xml:id="id269" draw:id="id269" draw:layer="layout" svg:width="3.448cm" svg:height="1cm" svg:x="115.797cm" svg:y="30.671cm">
          <text:p text:style-name="P78"><text:span text:style-name="T29">unconsciousness</text:span></text:p>
        </draw:rect>
        <draw:connector draw:style-name="gr316" draw:text-style-name="P15" draw:layer="layout" draw:type="curve" svg:x1="115.171cm" svg:y1="28.951cm" svg:x2="117.521cm" svg:y2="30.671cm" draw:start-shape="id267" draw:start-glue-point="2" draw:end-shape="id269" draw:end-glue-point="0" svg:d="M115171 28951c0 1290 2350 430 2350 1720" svg:viewBox="0 0 2351 1721">
          <text:p/>
        </draw:connector>
        <draw:rect draw:style-name="gr255" draw:text-style-name="P67" xml:id="id270" draw:id="id270" draw:layer="layout" svg:width="2.4cm" svg:height="1cm" svg:x="101.7cm" svg:y="39.065cm">
          <text:p text:style-name="P8"><text:span text:style-name="T29">Self-</text:span><text:span text:style-name="T29"><text:line-break/></text:span><text:span text:style-name="T29">awareness</text:span></text:p>
        </draw:rect>
        <draw:connector draw:style-name="gr317" draw:text-style-name="P15" draw:layer="layout" draw:type="curve" svg:x1="102.857cm" svg:y1="38.365cm" svg:x2="102.9cm" svg:y2="39.065cm" draw:start-shape="id214" draw:start-glue-point="2" draw:end-shape="id270" draw:end-glue-point="0" svg:d="M102857 38365c0 525 43 175 43 700" svg:viewBox="0 0 44 701">
          <text:p/>
        </draw:connector>
        <draw:rect draw:style-name="gr41" draw:text-style-name="P5" xml:id="id271" draw:id="id271" draw:layer="layout" svg:width="2.143cm" svg:height="1.085cm" svg:x="101.829cm" svg:y="40.952cm">
          <text:p text:style-name="P5">Body<text:line-break/>awareness</text:p>
        </draw:rect>
        <draw:connector draw:style-name="gr318" draw:text-style-name="P15" draw:layer="layout" draw:type="curve" svg:x1="102.9cm" svg:y1="40.065cm" svg:x2="102.9cm" svg:y2="40.952cm" draw:start-shape="id270" draw:start-glue-point="2" draw:end-shape="id271" draw:end-glue-point="0" svg:d="M102900 40065v887" svg:viewBox="0 0 1 888">
          <text:p/>
        </draw:connector>
        <draw:custom-shape draw:style-name="gr280" draw:text-style-name="P68" xml:id="id273" draw:id="id273"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7" draw:id="id267" draw:layer="layout" svg:width="2.4cm" svg:height="1cm" svg:x="113.971cm" svg:y="27.951cm">
          <text:p text:style-name="P8"><text:span text:style-name="T29">Psyche</text:span></text:p>
        </draw:rect>
        <draw:connector draw:style-name="gr319" draw:text-style-name="P15" draw:layer="layout" draw:type="curve" svg:x1="110.471cm" svg:y1="27.075cm" svg:x2="115.171cm" svg:y2="27.951cm" draw:start-shape="id187" draw:start-glue-point="2" draw:end-shape="id267" draw:end-glue-point="0" svg:d="M110471 27075c0 251 624 501 1248 501 623 0 1247-32 1247-63 0-32 551-63 1103-63 551 0 1102 251 1102 501" svg:viewBox="0 0 4701 877">
          <text:p/>
        </draw:connector>
        <draw:rect draw:style-name="gr255" draw:text-style-name="P67" xml:id="id272" draw:id="id272" draw:layer="layout" svg:width="2.4cm" svg:height="1.412cm" svg:x="102.126cm" svg:y="29.926cm">
          <text:p text:style-name="P8"><text:span text:style-name="T29">Cognition</text:span></text:p>
        </draw:rect>
        <draw:connector draw:style-name="gr320" draw:text-style-name="P15" draw:layer="layout" draw:type="curve" svg:x1="103.326cm" svg:y1="31.338cm" svg:x2="106.992cm" svg:y2="34.46cm" draw:start-shape="id272" draw:start-glue-point="2" draw:end-shape="id213" draw:end-glue-point="0" svg:d="M103326 31338c0 2341 3666 781 3666 3122" svg:viewBox="0 0 3667 3123">
          <text:p/>
        </draw:connector>
        <draw:connector draw:style-name="gr321" draw:text-style-name="P15" draw:layer="layout" draw:type="curve" svg:x1="103.326cm" svg:y1="31.338cm" svg:x2="92.83cm" svg:y2="35.148cm" draw:start-shape="id272" draw:start-glue-point="2" draw:end-shape="id212" draw:end-glue-point="0" svg:d="M103326 31338c0 2857-10496 953-10496 3810" svg:viewBox="0 0 10497 3811">
          <text:p/>
        </draw:connector>
        <draw:connector draw:style-name="gr322" draw:text-style-name="P15" draw:layer="layout" draw:type="curve" svg:x1="110.471cm" svg:y1="27.075cm" svg:x2="103.326cm" svg:y2="29.926cm" draw:start-shape="id187" draw:start-glue-point="2" draw:end-shape="id272" draw:end-glue-point="0" svg:d="M110471 27075c0 2139-7145 714-7145 2851" svg:viewBox="0 0 7146 2852">
          <text:p/>
        </draw:connector>
        <draw:connector draw:style-name="gr284" draw:text-style-name="P15" draw:layer="layout" draw:type="curve" svg:x1="102.857cm" svg:y1="37.365cm" svg:x2="103.55cm" svg:y2="36.083cm" draw:start-shape="id214" draw:end-shape="id273" draw:end-glue-point="6" svg:d="M102857 37365c0-961 693-321 693-1282" svg:viewBox="0 0 694 1283">
          <text:p/>
        </draw:connector>
        <draw:rect draw:style-name="gr255" draw:text-style-name="P72" xml:id="id274" draw:id="id274" draw:layer="layout" svg:width="2.4cm" svg:height="1cm" svg:x="104.817cm" svg:y="37.308cm">
          <text:p text:style-name="P3"><text:span text:style-name="T29">Self-</text:span><text:span text:style-name="T29"><text:line-break/></text:span><text:span text:style-name="T29">monitoring</text:span></text:p>
        </draw:rect>
        <draw:rect draw:style-name="gr255" draw:text-style-name="P79" xml:id="id275" draw:id="id275" draw:layer="layout" svg:width="2.4cm" svg:height="1cm" svg:x="107.733cm" svg:y="37.27cm">
          <text:p text:style-name="P80">Self-<text:line-break/>evaluation</text:p>
        </draw:rect>
        <draw:rect draw:style-name="gr255" draw:text-style-name="P72" xml:id="id276" draw:id="id276" draw:layer="layout" svg:width="2.4cm" svg:height="1cm" svg:x="110.65cm" svg:y="37.27cm">
          <text:p text:style-name="P3"><text:span text:style-name="T29">Self-</text:span><text:span text:style-name="T29"><text:line-break/></text:span><text:span text:style-name="T29">regulation</text:span></text:p>
        </draw:rect>
        <draw:connector draw:style-name="gr323" draw:text-style-name="P15" draw:layer="layout" draw:type="curve" svg:x1="106.992cm" svg:y1="35.872cm" svg:x2="106.017cm" svg:y2="37.308cm" draw:start-shape="id213" draw:start-glue-point="2" draw:end-shape="id274" draw:end-glue-point="0" svg:d="M106992 35872c0 1077-975 359-975 1436" svg:viewBox="0 0 976 1437">
          <text:p/>
        </draw:connector>
        <draw:connector draw:style-name="gr324" draw:text-style-name="P15" draw:layer="layout" draw:type="curve" svg:x1="106.992cm" svg:y1="35.872cm" svg:x2="108.933cm" svg:y2="37.27cm" draw:start-shape="id213" draw:start-glue-point="2" draw:end-shape="id275" draw:end-glue-point="0" svg:d="M106992 35872c0 1048 1941 350 1941 1398" svg:viewBox="0 0 1942 1399">
          <text:p/>
        </draw:connector>
        <draw:connector draw:style-name="gr325" draw:text-style-name="P15" draw:layer="layout" draw:type="curve" svg:x1="106.992cm" svg:y1="35.872cm" svg:x2="111.85cm" svg:y2="37.27cm" draw:start-shape="id213" draw:start-glue-point="2" draw:end-shape="id276" draw:end-glue-point="0" svg:d="M106992 35872c0 1048 4858 350 4858 1398" svg:viewBox="0 0 4859 1399">
          <text:p/>
        </draw:connector>
        <draw:connector draw:style-name="gr326" draw:text-style-name="P15" draw:layer="layout" draw:type="curve" svg:x1="122.751cm" svg:y1="35.691cm" svg:x2="120.743cm" svg:y2="37.646cm" draw:start-shape="id277" draw:start-glue-point="2" draw:end-shape="id262" draw:end-glue-point="0" svg:d="M122751 35691c0 1467-2008 490-2008 1955" svg:viewBox="0 0 2009 1956">
          <text:p/>
        </draw:connector>
        <draw:rect draw:style-name="gr292" draw:text-style-name="P35" xml:id="id278" draw:id="id278" draw:layer="layout" svg:width="2.138cm" svg:height="1.014cm" svg:x="123.302cm" svg:y="36.493cm">
          <text:p text:style-name="P5">Nerve</text:p>
        </draw:rect>
        <draw:connector draw:style-name="gr327" draw:text-style-name="P15" draw:layer="layout" draw:type="curve" svg:x1="122.751cm" svg:y1="35.691cm" svg:x2="124.371cm" svg:y2="36.493cm" draw:start-shape="id277" draw:start-glue-point="2" draw:end-shape="id278" draw:end-glue-point="0" svg:d="M122751 35691c0 601 1620 201 1620 802" svg:viewBox="0 0 1621 803">
          <text:p/>
        </draw:connector>
        <draw:rect draw:style-name="gr254" draw:text-style-name="P33" xml:id="id277" draw:id="id277" draw:layer="layout" svg:width="2.411cm" svg:height="0.984cm" svg:x="121.546cm" svg:y="34.707cm">
          <text:p text:style-name="P5">shared</text:p>
        </draw:rect>
        <draw:connector draw:style-name="gr328" draw:text-style-name="P15" draw:layer="layout" draw:type="curve" svg:x1="137.15cm" svg:y1="30.109cm" svg:x2="122.751cm" svg:y2="34.707cm" draw:start-shape="id190" draw:start-glue-point="2" draw:end-shape="id277" draw:end-glue-point="0" svg:d="M137150 30109c0 3448-14399 1150-14399 4598" svg:viewBox="0 0 14400 4599">
          <text:p/>
        </draw:connector>
        <draw:g draw:style-name="gr31">
          <draw:frame draw:style-name="gr329" draw:text-style-name="P81" draw:layer="layout" svg:width="2.753cm" svg:height="1.947cm" svg:x="-103.881cm" svg:y="74.399cm">
            <draw:image xlink:href="Pictures/100000010000032000000236D36E8DB6.png" xlink:type="simple" xlink:show="embed" xlink:actuate="onLoad" draw:mime-type="image/png">
              <text:p/>
            </draw:image>
          </draw:frame>
          <draw:frame draw:style-name="gr329" draw:text-style-name="P81" draw:layer="layout" svg:width="2.753cm" svg:height="1.948cm" svg:x="-103.881cm" svg:y="67.807cm">
            <draw:image xlink:href="Pictures/100000010000032000000236D36E8DB6.png" xlink:type="simple" xlink:show="embed" xlink:actuate="onLoad" draw:mime-type="image/png">
              <text:p/>
            </draw:image>
          </draw:frame>
          <draw:connector draw:style-name="gr330" draw:text-style-name="P81" draw:layer="layout" draw:type="line" svg:x1="-101.046cm" svg:y1="68.701cm" svg:x2="-98.561cm" svg:y2="68.713cm" svg:d="M-101046 68701l2485 12" svg:viewBox="0 0 2486 13">
            <text:p/>
          </draw:connector>
          <draw:connector draw:style-name="gr330" draw:text-style-name="P81" draw:layer="layout" draw:type="line" svg:x1="-101.056cm" svg:y1="75.29cm" svg:x2="-98.571cm" svg:y2="75.3cm" svg:d="M-101056 75290l2485 10" svg:viewBox="0 0 2486 11">
            <text:p/>
          </draw:connector>
          <draw:custom-shape draw:style-name="gr331" draw:text-style-name="P82" xml:id="id279" draw:id="id279"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2" draw:text-style-name="P83" draw:layer="layout" svg:width="4.719cm" svg:height="3.139cm" draw:transform="rotate (1.5707963267949) translate (-102.479cm 74.219cm)">
            <draw:text-box>
              <text:p text:style-name="P3"><text:span text:style-name="T31">Exteroceptive </text:span></text:p>
              <text:p text:style-name="P3"><text:span text:style-name="T31">and </text:span></text:p>
              <text:p text:style-name="P3"><text:span text:style-name="T31">proprioceptive </text:span></text:p>
              <text:p text:style-name="P3"><text:span text:style-name="T31">data</text:span></text:p>
            </draw:text-box>
          </draw:frame>
          <draw:custom-shape draw:style-name="gr333" draw:text-style-name="P84" xml:id="id280" draw:id="id280"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0" draw:text-style-name="P81" draw:layer="layout" draw:type="line" svg:x1="-95.15cm" svg:y1="71.967cm" svg:x2="-93.325cm" svg:y2="72.02cm" draw:start-shape="id279" draw:start-glue-point="1" draw:end-shape="id280" draw:end-glue-point="6" svg:d="M-95150 71967l1825 53" svg:viewBox="0 0 1826 54">
            <text:p/>
          </draw:connector>
          <draw:custom-shape draw:style-name="gr333" draw:text-style-name="P84" xml:id="id281" draw:id="id281"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84" xml:id="id283" draw:id="id283"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0" draw:text-style-name="P81" draw:layer="layout" draw:type="line" svg:x1="-92.923cm" svg:y1="72.02cm" svg:x2="-92.172cm" svg:y2="69.475cm" draw:start-shape="id280" draw:start-glue-point="10" draw:end-shape="id281" draw:end-glue-point="8" svg:d="M-92923 72020l751-2545" svg:viewBox="0 0 752 2546">
            <text:p/>
          </draw:connector>
          <draw:custom-shape draw:style-name="gr335" draw:text-style-name="P85" xml:id="id282" draw:id="id282"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6" draw:text-style-name="P86" draw:layer="layout" svg:width="5.423cm" svg:height="1.697cm" svg:x="-87.435cm" svg:y="66.065cm">
            <draw:text-box>
              <text:p text:style-name="P5"><text:span text:style-name="T32">Clustering </text:span></text:p>
              <text:p text:style-name="P5"><text:span text:style-name="T32">abstraction</text:span></text:p>
            </draw:text-box>
          </draw:frame>
          <draw:frame draw:style-name="gr337" draw:text-style-name="P86" draw:layer="layout" svg:width="3.515cm" svg:height="1.696cm" draw:transform="rotate (1.5707963267949) translate (-78.895cm 72.031cm)">
            <draw:text-box>
              <text:p text:style-name="P5"><text:span text:style-name="T32">Offline </text:span></text:p>
              <text:p text:style-name="P5"><text:span text:style-name="T32">learning</text:span></text:p>
            </draw:text-box>
          </draw:frame>
          <draw:custom-shape draw:style-name="gr338" draw:text-style-name="P85"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5" draw:text-style-name="P85" xml:id="id284" draw:id="id284"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9" draw:text-style-name="P87"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40" draw:text-style-name="P87"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1" draw:text-style-name="P81" draw:layer="layout" svg:x1="-92.172cm" svg:y1="69.065cm" svg:x2="-89.265cm" svg:y2="66.815cm" draw:start-shape="id281" draw:start-glue-point="4" draw:end-shape="id282" draw:end-glue-point="0" svg:d="M-92172 69065v-2250h2907" svg:viewBox="0 0 2908 2251">
            <text:p/>
          </draw:connector>
          <draw:connector draw:style-name="gr341" draw:text-style-name="P81" draw:layer="layout" svg:x1="-92.178cm" svg:y1="74.897cm" svg:x2="-89.265cm" svg:y2="77.107cm" draw:start-shape="id283" draw:start-glue-point="8" draw:end-shape="id284" draw:end-glue-point="0" svg:d="M-92178 74897v2210h2913" svg:viewBox="0 0 2914 2211">
            <text:p/>
          </draw:connector>
          <draw:frame draw:style-name="gr337" draw:text-style-name="P86" draw:layer="layout" svg:width="5.422cm" svg:height="1.696cm" svg:x="-87.433cm" svg:y="76.42cm">
            <draw:text-box>
              <text:p text:style-name="P5"><text:span text:style-name="T32">Abnormality</text:span></text:p>
              <text:p text:style-name="P5"><text:span text:style-name="T32">detection</text:span></text:p>
            </draw:text-box>
          </draw:frame>
          <draw:frame draw:style-name="gr342" draw:text-style-name="P86" draw:layer="layout" svg:width="4.203cm" svg:height="2.417cm" draw:transform="rotate (1.5707963267949) translate (-79.09cm 79.256cm)">
            <draw:text-box>
              <text:p text:style-name="P5"><text:span text:style-name="T32">Online</text:span></text:p>
              <text:p text:style-name="P5"><text:span text:style-name="T32">inference</text:span></text:p>
            </draw:text-box>
          </draw:frame>
          <draw:custom-shape draw:style-name="gr343" draw:text-style-name="P81"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6" draw:text-style-name="P88" draw:layer="layout" svg:width="6.047cm" svg:height="1.697cm" draw:transform="rotate (1.5707963267949) translate (-87.207cm 75.046cm)">
            <draw:text-box>
              <text:p text:style-name="P5"><text:span text:style-name="T32">Proprioceptive DBN</text:span></text:p>
            </draw:text-box>
          </draw:frame>
          <draw:frame draw:style-name="gr337" draw:text-style-name="P88" draw:layer="layout" svg:width="6.047cm" svg:height="1.696cm" draw:transform="rotate (1.5707963267949) translate (-83.337cm 75.046cm)">
            <draw:text-box>
              <text:p text:style-name="P5"><text:span text:style-name="T32">Exteroceptive </text:span></text:p>
              <text:p text:style-name="P5"><text:span text:style-name="T32">DBN</text:span></text:p>
            </draw:text-box>
          </draw:frame>
          <draw:connector draw:style-name="gr344" draw:text-style-name="P81" draw:layer="layout" draw:type="line" svg:x1="-86.991cm" svg:y1="67.564cm" svg:x2="-86.96cm" svg:y2="69.289cm" svg:d="M-86991 67564l31 1725" svg:viewBox="0 0 32 1726">
            <text:p/>
          </draw:connector>
          <draw:connector draw:style-name="gr344" draw:text-style-name="P81" draw:layer="layout" draw:type="line" svg:x1="-82.745cm" svg:y1="67.553cm" svg:x2="-82.713cm" svg:y2="69.28cm" svg:d="M-82745 67553l32 1727" svg:viewBox="0 0 33 1728">
            <text:p/>
          </draw:connector>
          <draw:connector draw:style-name="gr344" draw:text-style-name="P81" draw:layer="layout" draw:type="line" svg:x1="-86.672cm" svg:y1="74.463cm" svg:x2="-86.641cm" svg:y2="76.188cm" svg:d="M-86672 74463l31 1725" svg:viewBox="0 0 32 1726">
            <text:p/>
          </draw:connector>
          <draw:connector draw:style-name="gr344" draw:text-style-name="P81" draw:layer="layout" draw:type="line" svg:x1="-82.424cm" svg:y1="74.453cm" svg:x2="-82.395cm" svg:y2="76.178cm" svg:d="M-82424 74453l29 1725" svg:viewBox="0 0 30 1726">
            <text:p/>
          </draw:connector>
          <draw:connector draw:style-name="gr345" draw:text-style-name="P89" draw:layer="layout" svg:x1="-89.265cm" svg:y1="78.209cm" svg:x2="-92.982cm" svg:y2="72.165cm" draw:start-shape="id284" draw:start-glue-point="4" draw:end-shape="id280" draw:end-glue-point="9" svg:d="M-89265 78209h-1828v-6044h-1889" svg:viewBox="0 0 3718 6045">
            <text:p/>
          </draw:connector>
          <draw:frame draw:style-name="gr346" draw:text-style-name="P90" draw:layer="layout" svg:width="4.985cm" svg:height="1.593cm" draw:transform="rotate (1.5707963267949) translate (-97.297cm 74.331cm)">
            <draw:text-box>
              <text:p><text:span text:style-name="T32">Preprocessing</text:span></text:p>
            </draw:text-box>
          </draw:frame>
          <draw:frame draw:style-name="gr347" draw:text-style-name="P91" draw:layer="layout" svg:width="3.073cm" svg:height="2.168cm" svg:x="-92.954cm" svg:y="71.578cm">
            <draw:text-box>
              <text:p><text:span text:style-name="T33">Create/update</text:span><text:span text:style-name="T33"><text:line-break/></text:span><text:span text:style-name="T33">models</text:span></text:p>
            </draw:text-box>
          </draw:frame>
        </draw:g>
        <draw:g draw:style-name="gr31">
          <draw:custom-shape draw:style-name="gr348" draw:text-style-name="P92"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93"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1"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2"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4"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95" draw:layer="layout" svg:width="0.255cm" svg:height="0.248cm" svg:x="-100.65cm" svg:y="83.496cm" svg:viewBox="0 0 256 249" draw:points="0,41 38,4 126,92 218,0 256,37 163,130 245,210 206,249 126,168 47,245 11,206 88,130">
                <draw:glue-point draw:id="4" svg:x="-0.04cm" svg:y="0.329cm"/>
                <text:p/>
              </draw:polygon>
              <draw:custom-shape draw:style-name="gr356" draw:text-style-name="P95"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93"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7" draw:text-style-name="P96"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7"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9" draw:text-style-name="P98" xml:id="id285" draw:id="id285"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8" xml:id="id286" draw:id="id286"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8" xml:id="id287" draw:id="id287"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9" draw:layer="layout" draw:type="line" svg:x1="-115.355cm" svg:y1="75.144cm" svg:x2="-115.355cm" svg:y2="75.931cm" draw:start-shape="id285" draw:start-glue-point="8" draw:end-shape="id286" draw:end-glue-point="0" svg:d="M-115355 75144v787" svg:viewBox="0 0 1 788">
            <text:p/>
          </draw:connector>
          <draw:connector draw:style-name="gr361" draw:text-style-name="P99" draw:layer="layout" draw:type="line" svg:x1="-115.355cm" svg:y1="76.838cm" svg:x2="-115.355cm" svg:y2="77.647cm" draw:start-shape="id286" draw:start-glue-point="8" draw:end-shape="id287" draw:end-glue-point="4" svg:d="M-115355 76838v809" svg:viewBox="0 0 1 810">
            <text:p/>
          </draw:connector>
          <draw:custom-shape draw:style-name="gr362" draw:text-style-name="P98" xml:id="id288" draw:id="id288"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8" xml:id="id289" draw:id="id289"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3" draw:text-style-name="P98" xml:id="id290" draw:id="id290"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9" draw:layer="layout" draw:type="line" svg:x1="-110.363cm" svg:y1="75.147cm" svg:x2="-110.363cm" svg:y2="75.931cm" draw:start-shape="id288" draw:start-glue-point="8" draw:end-shape="id289" draw:end-glue-point="0" svg:d="M-110363 75147v784" svg:viewBox="0 0 1 785">
            <text:p/>
          </draw:connector>
          <draw:connector draw:style-name="gr361" draw:text-style-name="P99" draw:layer="layout" draw:type="line" svg:x1="-110.363cm" svg:y1="76.838cm" svg:x2="-110.363cm" svg:y2="77.649cm" draw:start-shape="id289" draw:start-glue-point="8" draw:end-shape="id290" draw:end-glue-point="4" svg:d="M-110363 76838v811" svg:viewBox="0 0 1 812">
            <text:p/>
          </draw:connector>
          <draw:connector draw:style-name="gr361" draw:text-style-name="P99" draw:layer="layout" draw:type="line" svg:x1="-114.848cm" svg:y1="74.692cm" svg:x2="-110.871cm" svg:y2="74.694cm" draw:start-shape="id285" draw:start-glue-point="10" draw:end-shape="id288" draw:end-glue-point="6" svg:d="M-114848 74692l3977 2" svg:viewBox="0 0 3978 3">
            <text:p/>
          </draw:connector>
          <draw:connector draw:style-name="gr361" draw:text-style-name="P99" draw:layer="layout" draw:type="line" svg:x1="-114.848cm" svg:y1="76.385cm" svg:x2="-110.871cm" svg:y2="76.385cm" draw:start-shape="id286" draw:start-glue-point="10" draw:end-shape="id289" draw:end-glue-point="6" svg:d="M-114848 76385h3977" svg:viewBox="0 0 3978 1">
            <text:p/>
          </draw:connector>
          <draw:g draw:style-name="gr23">
            <svg:title>TexMaths</svg:title>
            <svg:desc>14§display§\lambda_{X^{1}S^{2}}§svg§600§FALSE§</svg:desc>
            <draw:path draw:style-name="gr364" draw:text-style-name="P100"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4" draw:text-style-name="P100"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4" draw:text-style-name="P100" draw:layer="layout" svg:width="0.068cm" svg:height="0.11cm" svg:x="-108.942cm" svg:y="75.389cm" svg:viewBox="0 0 69 111" svg:d="M44 5c0-5-1-5-7-5-11 11-31 11-34 11h-3v7h3c4 0 14-1 24-4v83c0 5 0 8-17 8h-8v6c9 0 25 0 34 0s24 0 33 0v-6h-8c-17 0-17-3-17-8z">
              <text:p/>
            </draw:path>
            <draw:path draw:style-name="gr364" draw:text-style-name="P100"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4" draw:text-style-name="P100"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4" draw:text-style-name="P100"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4" draw:text-style-name="P100" draw:layer="layout" svg:width="0.086cm" svg:height="0.155cm" svg:x="-113.076cm" svg:y="74.24cm" svg:viewBox="0 0 87 156" svg:d="M53 7c0-7-1-7-7-7-15 15-36 15-46 15v9c5 0 21 0 34-8v121c0 7 0 10-23 10h-9v9c4 0 34-2 42-2 7 0 37 2 43 2v-9h-10c-24 0-24-3-24-10z">
              <text:p/>
            </draw:path>
            <draw:path draw:style-name="gr364" draw:text-style-name="P100"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4" draw:text-style-name="P100"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4" draw:text-style-name="P100"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4" draw:text-style-name="P100" draw:layer="layout" svg:width="0.085cm" svg:height="0.154cm" svg:x="-113.076cm" svg:y="75.967cm" svg:viewBox="0 0 86 155" svg:d="M53 7c0-7-1-7-7-7-15 15-36 15-46 15v9c5 0 21 0 34-8v120c0 8 0 11-23 11h-9v8c4 0 33-1 42-1 7 0 37 1 42 1v-8h-9c-24 0-24-3-24-11z">
              <text:p/>
            </draw:path>
            <draw:path draw:style-name="gr364" draw:text-style-name="P100"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4" draw:text-style-name="P100"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4" draw:text-style-name="P100"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4" draw:text-style-name="P100" draw:layer="layout" svg:width="0.086cm" svg:height="0.154cm" svg:x="-115.427cm" svg:y="74.481cm" svg:viewBox="0 0 87 155" svg:d="M53 7c0-7 0-7-7-7-15 15-36 15-46 15v9c5 0 21 0 34-8v120c0 8 0 11-23 11h-9v8c4 0 34-1 42-1 7 0 37 1 43 1v-8h-10c-24 0-24-3-24-11z">
              <text:p/>
            </draw:path>
            <draw:path draw:style-name="gr364" draw:text-style-name="P100"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100" draw:layer="layout" svg:width="0.158cm" svg:height="0.011cm" svg:x="-115.347cm" svg:y="74.792cm" svg:viewBox="0 0 159 12" svg:d="M150 12c3 0 9 0 9-6s-6-6-9-6h-141c-4 0-9 0-9 6s5 6 9 6z">
              <text:p/>
            </draw:path>
            <draw:path draw:style-name="gr364" draw:text-style-name="P100"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4" draw:text-style-name="P100"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4" draw:text-style-name="P100" draw:layer="layout" svg:width="0.086cm" svg:height="0.154cm" svg:x="-115.379cm" svg:y="76.178cm" svg:viewBox="0 0 87 155" svg:d="M53 7c0-7 0-7-7-7-15 15-36 15-46 15v9c5 0 21 0 34-8v120c0 8 0 11-23 11h-9v8c4 0 34-1 42-1 7 0 37 1 43 1v-8h-10c-24 0-24-3-24-11z">
              <text:p/>
            </draw:path>
            <draw:path draw:style-name="gr364" draw:text-style-name="P100"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4" draw:text-style-name="P100" draw:layer="layout" svg:width="0.158cm" svg:height="0.011cm" svg:x="-115.305cm" svg:y="76.489cm" svg:viewBox="0 0 159 12" svg:d="M150 12c3 0 9 0 9-6s-6-6-9-6h-141c-4 0-9 0-9 6s5 6 9 6z">
              <text:p/>
            </draw:path>
            <draw:path draw:style-name="gr364" draw:text-style-name="P100"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4" draw:text-style-name="P100"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4" draw:text-style-name="P100" draw:layer="layout" svg:width="0.086cm" svg:height="0.154cm" svg:x="-115.41cm" svg:y="77.893cm" svg:viewBox="0 0 87 155" svg:d="M53 7c0-7-1-7-7-7-15 15-36 15-46 15v9c5 0 21 0 34-8v120c0 8 0 11-23 11h-9v8c4 0 34-1 42-1 7 0 37 1 43 1v-8h-10c-24 0-24-3-24-11z">
              <text:p/>
            </draw:path>
            <draw:path draw:style-name="gr364" draw:text-style-name="P100"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100" draw:layer="layout" svg:width="0.158cm" svg:height="0.011cm" svg:x="-115.334cm" svg:y="78.205cm" svg:viewBox="0 0 159 12" svg:d="M150 12c3 0 9 0 9-6s-6-6-9-6h-141c-4 0-9 0-9 6s5 6 9 6z">
              <text:p/>
            </draw:path>
            <draw:path draw:style-name="gr364" draw:text-style-name="P100"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4" draw:text-style-name="P100"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4" draw:text-style-name="P100" draw:layer="layout" svg:width="0.085cm" svg:height="0.154cm" svg:x="-110.269cm" svg:y="74.483cm" svg:viewBox="0 0 86 155" svg:d="M53 7c0-7 0-7-7-7-15 15-36 15-46 15v9c5 0 21 0 34-8v120c0 8 0 11-23 11h-9v8c4 0 33-1 42-1 7 0 37 1 42 1v-8h-9c-24 0-24-3-24-11z">
              <text:p/>
            </draw:path>
            <draw:path draw:style-name="gr364" draw:text-style-name="P100"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4" draw:text-style-name="P100"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4" draw:text-style-name="P100" draw:layer="layout" svg:width="0.085cm" svg:height="0.154cm" svg:x="-110.223cm" svg:y="76.178cm" svg:viewBox="0 0 86 155" svg:d="M53 7c0-7 0-7-7-7-15 15-36 15-46 15v9c5 0 21 0 34-8v120c0 8 0 11-23 11h-9v8c4 0 33-1 42-1 7 0 37 1 42 1v-8h-9c-24 0-24-3-24-11z">
              <text:p/>
            </draw:path>
            <draw:path draw:style-name="gr364" draw:text-style-name="P100"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4" draw:text-style-name="P100"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4" draw:text-style-name="P100" draw:layer="layout" svg:width="0.086cm" svg:height="0.154cm" svg:x="-110.252cm" svg:y="77.893cm" svg:viewBox="0 0 87 155" svg:d="M53 7c0-7-1-7-7-7-15 15-36 15-46 15v9c5 0 21 0 34-8v120c0 8 0 11-23 11h-9v8c4 0 34-1 42-1 7 0 37 1 43 1v-8h-10c-24 0-24-3-24-11z">
              <text:p/>
            </draw:path>
            <draw:path draw:style-name="gr364" draw:text-style-name="P100"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2" draw:text-style-name="P98" xml:id="id292" draw:id="id292"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8" xml:id="id291" draw:id="id291"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8" xml:id="id293" draw:id="id293"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9" draw:layer="layout" draw:type="line" svg:x1="-115.359cm" svg:y1="69.615cm" svg:x2="-115.359cm" svg:y2="68.829cm" draw:start-shape="id291" draw:start-glue-point="4" draw:end-shape="id292" draw:end-glue-point="8" svg:d="M-115359 69615v-786" svg:viewBox="0 0 1 787">
            <text:p/>
          </draw:connector>
          <draw:connector draw:style-name="gr361" draw:text-style-name="P99" draw:layer="layout" draw:type="line" svg:x1="-115.359cm" svg:y1="71.329cm" svg:x2="-115.359cm" svg:y2="70.521cm" draw:start-shape="id293" draw:start-glue-point="4" draw:end-shape="id291" draw:end-glue-point="8" svg:d="M-115359 71329v-808" svg:viewBox="0 0 1 809">
            <text:p/>
          </draw:connector>
          <draw:custom-shape draw:style-name="gr366" draw:text-style-name="P98" xml:id="id295" draw:id="id295"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98" xml:id="id294" draw:id="id294"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98" xml:id="id296" draw:id="id296"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9" draw:layer="layout" draw:type="line" svg:x1="-110.366cm" svg:y1="69.615cm" svg:x2="-110.366cm" svg:y2="68.829cm" draw:start-shape="id294" draw:start-glue-point="4" draw:end-shape="id295" draw:end-glue-point="8" svg:d="M-110366 69615v-786" svg:viewBox="0 0 1 787">
            <text:p/>
          </draw:connector>
          <draw:connector draw:style-name="gr361" draw:text-style-name="P99" draw:layer="layout" draw:type="line" svg:x1="-110.366cm" svg:y1="71.332cm" svg:x2="-110.366cm" svg:y2="70.521cm" draw:start-shape="id296" draw:start-glue-point="4" draw:end-shape="id294" draw:end-glue-point="8" svg:d="M-110366 71332v-811" svg:viewBox="0 0 1 812">
            <text:p/>
          </draw:connector>
          <draw:connector draw:style-name="gr361" draw:text-style-name="P99" draw:layer="layout" draw:type="line" svg:x1="-114.851cm" svg:y1="71.784cm" svg:x2="-110.875cm" svg:y2="71.785cm" draw:start-shape="id293" draw:start-glue-point="10" draw:end-shape="id296" draw:end-glue-point="6" svg:d="M-114851 71784l3976 1" svg:viewBox="0 0 3977 2">
            <text:p/>
          </draw:connector>
          <draw:connector draw:style-name="gr361" draw:text-style-name="P99" draw:layer="layout" draw:type="line" svg:x1="-114.851cm" svg:y1="70.068cm" svg:x2="-110.875cm" svg:y2="70.068cm" draw:start-shape="id291" draw:start-glue-point="10" draw:end-shape="id294" draw:end-glue-point="6" svg:d="M-114851 70068h3976" svg:viewBox="0 0 3977 1">
            <text:p/>
          </draw:connector>
          <draw:g draw:style-name="gr23">
            <svg:title>TexMaths</svg:title>
            <svg:desc>14§display§X_{t-1}^{2}§svg§600§FALSE§</svg:desc>
            <draw:path draw:style-name="gr364" draw:text-style-name="P100"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4" draw:text-style-name="P100"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100"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4" draw:text-style-name="P100" draw:layer="layout" svg:width="0.158cm" svg:height="0.011cm" svg:x="-115.31cm" svg:y="70.171cm" svg:viewBox="0 0 159 12" svg:d="M150 12c3 0 9 0 9-6s-6-6-9-6h-141c-4 0-9 0-9 6s5 6 9 6z">
              <text:p/>
            </draw:path>
            <draw:path draw:style-name="gr364" draw:text-style-name="P100"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4" draw:text-style-name="P100"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4" draw:text-style-name="P100"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100"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100" draw:layer="layout" svg:width="0.158cm" svg:height="0.011cm" svg:x="-115.337cm" svg:y="68.495cm" svg:viewBox="0 0 159 12" svg:d="M150 12c3 0 9 0 9-6s-6-6-9-6h-141c-4 0-9 0-9 6s5 6 9 6z">
              <text:p/>
            </draw:path>
            <draw:path draw:style-name="gr364" draw:text-style-name="P100"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4" draw:text-style-name="P100"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4" draw:text-style-name="P100"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100"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4" draw:text-style-name="P100"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4" draw:text-style-name="P100"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100"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5" draw:text-style-name="P98" xml:id="id297" draw:id="id297"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8" xml:id="id298" draw:id="id298"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9" draw:layer="layout" draw:type="line" svg:x1="-114.358cm" svg:y1="73.522cm" svg:x2="-115.355cm" svg:y2="74.24cm" draw:start-shape="id297" draw:start-glue-point="7" draw:end-shape="id285" draw:end-glue-point="4" svg:d="M-114358 73522l-997 718" svg:viewBox="0 0 998 719">
            <text:p/>
          </draw:connector>
          <draw:connector draw:style-name="gr361" draw:text-style-name="P99" draw:layer="layout" draw:type="line" svg:x1="-114.358cm" svg:y1="72.88cm" svg:x2="-115.359cm" svg:y2="72.238cm" draw:start-shape="id297" draw:start-glue-point="5" draw:end-shape="id293" draw:end-glue-point="8" svg:d="M-114358 72880l-1001-642" svg:viewBox="0 0 1002 643">
            <text:p/>
          </draw:connector>
          <draw:connector draw:style-name="gr361" draw:text-style-name="P99" draw:layer="layout" draw:type="line" svg:x1="-111.36cm" svg:y1="73.523cm" svg:x2="-110.723cm" svg:y2="74.372cm" draw:start-shape="id298" draw:start-glue-point="9" draw:end-shape="id288" draw:end-glue-point="5" svg:d="M-111360 73523l637 849" svg:viewBox="0 0 638 850">
            <text:p/>
          </draw:connector>
          <draw:connector draw:style-name="gr361" draw:text-style-name="P99" draw:layer="layout" draw:type="line" svg:x1="-111.36cm" svg:y1="72.88cm" svg:x2="-110.726cm" svg:y2="72.106cm" draw:start-shape="id298" draw:start-glue-point="11" draw:end-shape="id296" draw:end-glue-point="7" svg:d="M-111360 72880l634-774" svg:viewBox="0 0 635 775">
            <text:p/>
          </draw:connector>
          <draw:connector draw:style-name="gr361" draw:text-style-name="P99" draw:layer="layout" draw:type="line" svg:x1="-113.49cm" svg:y1="73.201cm" svg:x2="-112.228cm" svg:y2="73.202cm" draw:start-shape="id297" draw:start-glue-point="10" draw:end-shape="id298" draw:end-glue-point="6" svg:d="M-113490 73201l1262 1" svg:viewBox="0 0 1263 2">
            <text:p/>
          </draw:connector>
          <draw:g draw:style-name="gr23">
            <svg:title>TexMaths</svg:title>
            <svg:desc>14§display§D_{t-1}§svg§600§FALSE§</svg:desc>
            <draw:path draw:style-name="gr364" draw:text-style-name="P100"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4" draw:text-style-name="P100"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100" draw:layer="layout" svg:width="0.158cm" svg:height="0.011cm" svg:x="-113.913cm" svg:y="73.258cm" svg:viewBox="0 0 159 12" svg:d="M150 12c3 0 9 0 9-6s-6-6-9-6h-141c-4 0-9 0-9 6s5 6 9 6z">
              <text:p/>
            </draw:path>
            <draw:path draw:style-name="gr364" draw:text-style-name="P100"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4" draw:text-style-name="P100"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4" draw:text-style-name="P100"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7" draw:text-style-name="P41" draw:layer="layout" draw:type="curve" svg:x1="-109.858cm" svg:y1="71.785cm" svg:x2="-109.855cm" svg:y2="76.384cm" draw:start-shape="id296" draw:start-glue-point="10" draw:end-shape="id289" svg:d="M-109858 71785c775 0 774 4599 3 4599" svg:viewBox="0 0 582 4600">
            <text:p/>
          </draw:connector>
          <draw:connector draw:style-name="gr367" draw:text-style-name="P41" draw:layer="layout" draw:type="curve" svg:x1="-109.855cm" svg:y1="74.694cm" svg:x2="-109.858cm" svg:y2="70.068cm" draw:start-shape="id288" draw:start-glue-point="10" draw:end-shape="id294" draw:end-glue-point="10" svg:d="M-109855 74694c771 0 772-4626-3-4626" svg:viewBox="0 0 582 4627">
            <text:p/>
          </draw:connector>
          <draw:connector draw:style-name="gr367" draw:text-style-name="P41" draw:layer="layout" draw:type="curve" svg:x1="-115.867cm" svg:y1="71.784cm" svg:x2="-115.863cm" svg:y2="76.385cm" draw:start-shape="id293" draw:start-glue-point="6" draw:end-shape="id286" draw:end-glue-point="6" svg:d="M-115867 71784c-769 0-771 4601 4 4601" svg:viewBox="0 0 582 4602">
            <text:p/>
          </draw:connector>
          <draw:connector draw:style-name="gr367" draw:text-style-name="P41" draw:layer="layout" draw:type="curve" svg:x1="-115.863cm" svg:y1="74.692cm" svg:x2="-115.867cm" svg:y2="70.068cm" draw:start-shape="id285" draw:start-glue-point="6" draw:end-shape="id291" draw:end-glue-point="6" svg:d="M-115863 74692c-775 0-773-4624-4-4624" svg:viewBox="0 0 582 4625">
            <text:p/>
          </draw:connector>
          <draw:g draw:style-name="gr23">
            <svg:title>TexMaths</svg:title>
            <svg:desc>14§display§\pi_{SS}^{2}§svg§600§FALSE§</svg:desc>
            <draw:path draw:style-name="gr364" draw:text-style-name="P100"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4" draw:text-style-name="P100"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4" draw:text-style-name="P100"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4" draw:text-style-name="P100"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4" draw:text-style-name="P100"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4" draw:text-style-name="P100"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4" draw:text-style-name="P100"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4" draw:text-style-name="P100"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4" draw:text-style-name="P100"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4" draw:text-style-name="P100"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4" draw:text-style-name="P100"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4" draw:text-style-name="P100"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4" draw:text-style-name="P100"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100"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100" draw:layer="layout" svg:width="0.158cm" svg:height="0.011cm" svg:x="-115.345cm" svg:y="71.875cm" svg:viewBox="0 0 159 12" svg:d="M150 12c3 0 9 0 9-6s-6-6-9-6h-141c-4 0-9 0-9 6s5 6 9 6z">
              <text:p/>
            </draw:path>
            <draw:path draw:style-name="gr364" draw:text-style-name="P100"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4" draw:text-style-name="P100"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4" draw:text-style-name="P100"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4" draw:text-style-name="P100"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4" draw:text-style-name="P100"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4" draw:text-style-name="P100" draw:layer="layout" svg:width="0.086cm" svg:height="0.155cm" svg:x="-110.874cm" svg:y="75.275cm" svg:viewBox="0 0 87 156" svg:d="M53 7c0-7 0-7-7-7-15 15-36 15-46 15v9c5 0 21 0 34-8v121c0 7 0 10-23 10h-9v9c4 0 34-2 42-2 7 0 37 2 43 2v-9h-10c-24 0-24-3-24-10z">
              <text:p/>
            </draw:path>
            <draw:path draw:style-name="gr364" draw:text-style-name="P100"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4" draw:text-style-name="P100"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4" draw:text-style-name="P100"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4" draw:text-style-name="P100"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4" draw:text-style-name="P100"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4" draw:text-style-name="P100"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4" draw:text-style-name="P100"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4" draw:text-style-name="P100"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4" draw:text-style-name="P100"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4" draw:text-style-name="P100"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4" draw:text-style-name="P100" draw:layer="layout" svg:width="0.068cm" svg:height="0.11cm" svg:x="-108.634cm" svg:y="70.912cm" svg:viewBox="0 0 69 111" svg:d="M44 5c0-5-1-5-7-5-11 11-31 11-34 11h-3v7h3c4 0 14-1 24-4v83c0 5 0 8-17 8h-8v6c9 0 25 0 33 0 10 0 24 0 34 0v-6h-8c-17 0-17-3-17-8z">
              <text:p/>
            </draw:path>
          </draw:g>
          <draw:frame draw:style-name="gr368" draw:text-style-name="P102" draw:layer="layout" svg:width="2.93cm" svg:height="1.096cm" draw:transform="rotate (1.5707963267949) translate (-108.336cm 77.328cm)">
            <draw:text-box>
              <text:p text:style-name="P101"><text:span text:style-name="T34">robot 1</text:span></text:p>
            </draw:text-box>
          </draw:frame>
          <draw:frame draw:style-name="gr368" draw:text-style-name="P103" draw:layer="layout" svg:width="2.93cm" svg:height="1.096cm" draw:transform="rotate (1.5707963267949) translate (-108.291cm 70.891cm)">
            <draw:text-box>
              <text:p text:style-name="P101"><text:span text:style-name="T35">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9" draw:text-style-name="P92"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93"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0"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1"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4"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95" draw:layer="layout" svg:width="0.358cm" svg:height="0.349cm" svg:x="-94.922cm" svg:y="94.33cm" svg:viewBox="0 0 359 350" draw:points="0,58 53,6 177,129 306,0 359,52 229,182 344,295 289,350 177,236 66,344 15,289 124,182">
                <draw:glue-point draw:id="4" svg:x="-0.04cm" svg:y="0.329cm"/>
                <text:p/>
              </draw:polygon>
              <draw:custom-shape draw:style-name="gr356" draw:text-style-name="P95"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93"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2" draw:text-style-name="P92"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93"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3" draw:text-style-name="P104"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4" draw:text-style-name="P41" draw:layer="layout" svg:width="6.626cm" svg:height="5.551cm" svg:x="-114.456cm" svg:y="91.543cm" svg:viewBox="0 0 6627 5552" draw:points="567,5552 527,4131 31,4131 0,1499 556,1499 567,0 6627,0 6627,5552">
            <text:p/>
          </draw:polygon>
          <draw:polygon draw:style-name="gr375" draw:text-style-name="P41" draw:layer="layout" svg:width="9.94cm" svg:height="9.345cm" svg:x="-115.862cm" svg:y="89.664cm" svg:viewBox="0 0 9941 9346" draw:points="54,9346 0,5962 473,5948 527,3337 68,3325 54,0 9941,0 9941,9346">
            <text:p/>
          </draw:polygon>
          <draw:custom-shape draw:style-name="gr376" draw:text-style-name="P104"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4"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95" draw:layer="layout" svg:width="0.351cm" svg:height="0.343cm" svg:x="-114.597cm" svg:y="94.137cm" svg:viewBox="0 0 352 344" draw:points="0,57 53,6 173,129 301,0 352,51 225,179 337,291 287,344 173,230 67,337 15,287 121,179">
                <draw:glue-point draw:id="4" svg:x="-0.04cm" svg:y="0.329cm"/>
                <text:p/>
              </draw:polygon>
              <draw:custom-shape draw:style-name="gr356" draw:text-style-name="P95"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95"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93"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94"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9" draw:id="id299"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4" draw:start-glue-point="0" draw:end-shape="id299" draw:end-glue-point="6" svg:d="M27572 59881c0-859-2437-286-2437-1147" svg:viewBox="0 0 2438 1148">
          <text:p/>
        </draw:connector>
        <draw:g draw:style-name="gr31">
          <draw:rect draw:style-name="gr377" draw:text-style-name="P105" draw:layer="layout" svg:width="3.611cm" svg:height="7.25cm" svg:x="236.382cm" svg:y="-9.872cm">
            <text:p/>
          </draw:rect>
          <draw:rect draw:style-name="gr378" draw:text-style-name="P106" xml:id="id300" draw:id="id300" draw:layer="layout" svg:width="3.01cm" svg:height="1.489cm" svg:x="211.272cm" svg:y="-7.578cm">
            <text:p text:style-name="P5">stimulus</text:p>
          </draw:rect>
          <draw:rect draw:style-name="gr379" draw:text-style-name="P107" xml:id="id308" draw:id="id308" draw:layer="layout" svg:width="3.01cm" svg:height="1.489cm" svg:x="236.645cm" svg:y="-9.278cm">
            <text:p text:style-name="P5">trace</text:p>
          </draw:rect>
          <draw:connector draw:style-name="gr380" draw:text-style-name="P15" draw:layer="layout" draw:type="curve" svg:x1="214.282cm" svg:y1="-6.833cm" svg:x2="215.346cm" svg:y2="-6.833cm" draw:start-shape="id300" draw:start-glue-point="1" draw:end-shape="id301" draw:end-glue-point="3" svg:d="M214282-6833h1064" svg:viewBox="0 0 1065 1">
            <text:p/>
          </draw:connector>
          <draw:connector draw:style-name="gr381" draw:text-style-name="P15" draw:layer="layout" draw:type="curve" svg:x1="235.58cm" svg:y1="-6.833cm" svg:x2="236.645cm" svg:y2="-6.832cm" draw:start-shape="id302" draw:start-glue-point="1" draw:end-shape="id303" draw:end-glue-point="3" svg:d="M235580-6833c799 0 267 1 1065 1" svg:viewBox="0 0 1066 2">
            <text:p/>
          </draw:connector>
          <draw:rect draw:style-name="gr378" draw:text-style-name="P106" xml:id="id302" draw:id="id302" draw:layer="layout" svg:width="3.01cm" svg:height="1.489cm" svg:x="232.57cm" svg:y="-7.578cm">
            <text:p text:style-name="P5">brain</text:p>
          </draw:rect>
          <draw:rect draw:style-name="gr378" draw:text-style-name="P106" xml:id="id304" draw:id="id304" draw:layer="layout" svg:width="3.01cm" svg:height="1.489cm" svg:x="207.197cm" svg:y="-7.578cm">
            <text:p text:style-name="P5">Inner style<text:line-break/>environment</text:p>
          </draw:rect>
          <draw:connector draw:style-name="gr382" draw:text-style-name="P15" draw:layer="layout" draw:type="curve" svg:x1="210.207cm" svg:y1="-6.833cm" svg:x2="211.272cm" svg:y2="-6.833cm" draw:start-shape="id304" draw:start-glue-point="1" draw:end-shape="id300" draw:end-glue-point="3" svg:d="M210207-6833h1065" svg:viewBox="0 0 1066 1">
            <text:p/>
          </draw:connector>
          <draw:rect draw:style-name="gr378" draw:text-style-name="P106" xml:id="id301" draw:id="id301" draw:layer="layout" svg:width="3.01cm" svg:height="1.489cm" svg:x="215.346cm" svg:y="-7.578cm">
            <text:p text:style-name="P5">Target<text:line-break/>robot<text:line-break/>(Self)</text:p>
          </draw:rect>
          <draw:connector draw:style-name="gr383" draw:text-style-name="P15" draw:layer="layout" draw:type="curve" svg:x1="218.356cm" svg:y1="-6.833cm" svg:x2="219.496cm" svg:y2="-6.833cm" draw:start-shape="id301" draw:start-glue-point="1" draw:end-shape="id305" draw:end-glue-point="3" svg:d="M218356-6833h1140" svg:viewBox="0 0 1141 1">
            <text:p/>
          </draw:connector>
          <draw:rect draw:style-name="gr378" draw:text-style-name="P106" xml:id="id305" draw:id="id305" draw:layer="layout" svg:width="3.01cm" svg:height="1.489cm" svg:x="219.496cm" svg:y="-7.578cm">
            <text:p text:style-name="P5">Neuron<text:line-break/>network</text:p>
          </draw:rect>
          <draw:connector draw:style-name="gr384" draw:text-style-name="P15" draw:layer="layout" draw:type="curve" svg:x1="226.892cm" svg:y1="-6.833cm" svg:x2="228.625cm" svg:y2="-6.833cm" draw:start-shape="id306" draw:start-glue-point="1" draw:end-shape="id307" draw:end-glue-point="3" svg:d="M226892-6833h1733" svg:viewBox="0 0 1734 1">
            <text:p/>
          </draw:connector>
          <draw:custom-shape draw:name="comment box 7" draw:style-name="gr385" draw:text-style-name="P52" xml:id="id309" draw:id="id309"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8" draw:start-glue-point="1" draw:end-shape="id309" draw:end-glue-point="6" svg:d="M239655-8533c482 0 723-963 723-2889" svg:viewBox="0 0 724 2890">
            <text:p/>
          </draw:connector>
          <draw:rect draw:style-name="gr378" draw:text-style-name="P106" xml:id="id307" draw:id="id307" draw:layer="layout" svg:width="3.01cm" svg:height="1.489cm" svg:x="228.625cm" svg:y="-7.578cm">
            <text:p text:style-name="P5">Neural<text:line-break/>coding</text:p>
          </draw:rect>
          <draw:connector draw:style-name="gr386" draw:text-style-name="P15" draw:layer="layout" draw:type="curve" svg:x1="231.635cm" svg:y1="-6.833cm" svg:x2="232.57cm" svg:y2="-6.833cm" draw:start-shape="id307" draw:start-glue-point="1" draw:end-shape="id302" draw:end-glue-point="3" svg:d="M231635-6833h935" svg:viewBox="0 0 936 1">
            <text:p/>
          </draw:connector>
          <draw:rect draw:style-name="gr378" draw:text-style-name="P106" xml:id="id306" draw:id="id306" draw:layer="layout" svg:width="3.01cm" svg:height="1.489cm" svg:x="223.882cm" svg:y="-7.578cm">
            <text:p text:style-name="P5">Action<text:line-break/>potential<text:line-break/>train</text:p>
          </draw:rect>
          <draw:connector draw:style-name="gr387" draw:text-style-name="P15" draw:layer="layout" draw:type="curve" svg:x1="222.506cm" svg:y1="-6.833cm" svg:x2="223.882cm" svg:y2="-6.833cm" draw:start-shape="id305" draw:start-glue-point="1" draw:end-shape="id306"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9" draw:text-style-name="P107" xml:id="id314" draw:id="id314" draw:layer="layout" svg:width="3.01cm" svg:height="1.489cm" svg:x="236.645cm" svg:y="-4.277cm">
            <text:p text:style-name="P5">trace</text:p>
          </draw:rect>
          <draw:rect draw:style-name="gr379" draw:text-style-name="P107" xml:id="id303" draw:id="id303" draw:layer="layout" svg:width="3.01cm" svg:height="1.489cm" svg:x="236.645cm" svg:y="-7.577cm">
            <text:p text:style-name="P5">trace</text:p>
          </draw:rect>
          <draw:frame draw:style-name="gr388"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9" draw:text-style-name="P23" xml:id="id310" draw:id="id310" draw:layer="layout" svg:width="3.01cm" svg:height="1.489cm" svg:x="241.467cm" svg:y="-7.032cm">
            <text:p text:style-name="P5">Episode</text:p>
          </draw:rect>
          <draw:frame draw:style-name="gr390" draw:text-style-name="P38" xml:id="id315" draw:id="id315" draw:layer="layout" svg:width="2.775cm" svg:height="0.725cm" svg:x="236.375cm" svg:y="-9.938cm">
            <draw:text-box>
              <text:p>Trace group</text:p>
            </draw:text-box>
          </draw:frame>
          <draw:rect draw:style-name="gr391" draw:text-style-name="P108" draw:layer="layout" svg:width="4.727cm" svg:height="7.25cm" svg:x="245.382cm" svg:y="-9.872cm">
            <text:p/>
          </draw:rect>
          <draw:rect draw:style-name="gr392" draw:text-style-name="P109" xml:id="id311" draw:id="id311" draw:layer="layout" svg:width="4.153cm" svg:height="1.489cm" svg:x="245.645cm" svg:y="-9.278cm">
            <text:p text:style-name="P5">Modality<text:line-break/>(ie times-ranges)</text:p>
          </draw:rect>
          <draw:rect draw:style-name="gr393" draw:text-style-name="P110" xml:id="id313" draw:id="id313" draw:layer="layout" svg:width="4.153cm" svg:height="1.489cm" svg:x="245.645cm" svg:y="-4.277cm">
            <text:p text:style-name="P3">Modality</text:p>
          </draw:rect>
          <draw:rect draw:style-name="gr394" draw:text-style-name="P110" xml:id="id312" draw:id="id312" draw:layer="layout" svg:width="4.153cm" svg:height="1.489cm" svg:x="245.645cm" svg:y="-7.577cm">
            <text:p text:style-name="P3">Modality<text:line-break/>(ie time-positions)</text:p>
          </draw:rect>
          <draw:frame draw:style-name="gr388"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90" draw:text-style-name="P38" draw:layer="layout" svg:width="2.775cm" svg:height="0.725cm" svg:x="245.375cm" svg:y="-9.938cm">
            <draw:text-box>
              <text:p>modalities</text:p>
            </draw:text-box>
          </draw:frame>
          <draw:connector draw:style-name="gr395" draw:text-style-name="P15" draw:layer="layout" draw:type="curve" svg:x1="244.477cm" svg:y1="-6.287cm" svg:x2="245.645cm" svg:y2="-8.533cm" draw:start-shape="id310" draw:start-glue-point="1" draw:end-shape="id311" draw:end-glue-point="3" svg:d="M244477-6287c876 0 292-2246 1168-2246" svg:viewBox="0 0 1169 2247">
            <text:p/>
          </draw:connector>
          <draw:connector draw:style-name="gr396" draw:text-style-name="P15" draw:layer="layout" draw:type="curve" svg:x1="244.477cm" svg:y1="-6.287cm" svg:x2="245.645cm" svg:y2="-6.832cm" draw:start-shape="id310" draw:start-glue-point="1" draw:end-shape="id312" svg:d="M244477-6287c876 0 292-545 1168-545" svg:viewBox="0 0 1169 546">
            <text:p/>
          </draw:connector>
          <draw:connector draw:style-name="gr397" draw:text-style-name="P15" draw:layer="layout" draw:type="curve" svg:x1="244.477cm" svg:y1="-6.287cm" svg:x2="245.645cm" svg:y2="-3.532cm" draw:start-shape="id310" draw:start-glue-point="1" draw:end-shape="id313" draw:end-glue-point="3" svg:d="M244477-6287c876 0 292 2755 1168 2755" svg:viewBox="0 0 1169 2756">
            <text:p/>
          </draw:connector>
          <draw:connector draw:style-name="gr398" draw:text-style-name="P15" draw:layer="layout" draw:type="curve" svg:x1="239.655cm" svg:y1="-8.533cm" svg:x2="241.467cm" svg:y2="-6.287cm" draw:start-shape="id308" draw:start-glue-point="1" draw:end-shape="id310" draw:end-glue-point="3" svg:d="M239655-8533c1359 0 453 2246 1812 2246" svg:viewBox="0 0 1813 2247">
            <text:p/>
          </draw:connector>
          <draw:connector draw:style-name="gr399" draw:text-style-name="P15" draw:layer="layout" draw:type="curve" svg:x1="239.655cm" svg:y1="-6.832cm" svg:x2="241.467cm" svg:y2="-6.287cm" draw:start-shape="id303" draw:start-glue-point="1" draw:end-shape="id310" draw:end-glue-point="3" svg:d="M239655-6832c1359 0 453 545 1812 545" svg:viewBox="0 0 1813 546">
            <text:p/>
          </draw:connector>
          <draw:connector draw:style-name="gr400" draw:text-style-name="P15" draw:layer="layout" draw:type="curve" svg:x1="239.655cm" svg:y1="-3.532cm" svg:x2="241.467cm" svg:y2="-6.287cm" draw:start-shape="id314" draw:start-glue-point="1" draw:end-shape="id310" draw:end-glue-point="3" svg:d="M239655-3532c1359 0 453-2755 1812-2755" svg:viewBox="0 0 1813 2756">
            <text:p/>
          </draw:connector>
          <draw:custom-shape draw:name="comment box 8" draw:style-name="gr385" draw:text-style-name="P52" xml:id="id316" draw:id="id316"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5" draw:end-shape="id316" draw:end-glue-point="6" svg:d="M237762-9938c0-1458-3139-485-3139-1946" svg:viewBox="0 0 3140 1947">
            <text:p/>
          </draw:connector>
        </draw:g>
        <draw:rect draw:style-name="gr41" draw:text-style-name="P5" xml:id="id317" draw:id="id317" draw:layer="layout" svg:width="3.01cm" svg:height="1.489cm" svg:x="258.162cm" svg:y="-7.1cm">
          <text:p text:style-name="P5">Episode</text:p>
        </draw:rect>
        <draw:rect draw:style-name="gr41" draw:text-style-name="P5" xml:id="id318" draw:id="id318" draw:layer="layout" svg:width="3.01cm" svg:height="1.489cm" svg:x="258.162cm" svg:y="-3.883cm">
          <text:p text:style-name="P5">parts</text:p>
        </draw:rect>
        <draw:rect draw:style-name="gr41" draw:text-style-name="P5" xml:id="id322" draw:id="id322" draw:layer="layout" svg:width="3.01cm" svg:height="1.489cm" svg:x="261.697cm" svg:y="3.118cm">
          <text:p text:style-name="P5">action</text:p>
        </draw:rect>
        <draw:rect draw:style-name="gr41" draw:text-style-name="P5" xml:id="id323" draw:id="id323" draw:layer="layout" svg:width="3.01cm" svg:height="1.489cm" svg:x="261.67cm" svg:y="5.897cm">
          <text:p text:style-name="P5">property</text:p>
        </draw:rect>
        <draw:rect draw:style-name="gr41" draw:text-style-name="P5" xml:id="id320" draw:id="id320" draw:layer="layout" svg:width="3.01cm" svg:height="1.489cm" svg:x="258.162cm" svg:y="0.338cm">
          <text:p text:style-name="P5">time</text:p>
        </draw:rect>
        <draw:rect draw:style-name="gr41" draw:text-style-name="P5" xml:id="id319" draw:id="id319" draw:layer="layout" svg:width="3.01cm" svg:height="1.489cm" svg:x="254.728cm" svg:y="0.338cm">
          <text:p text:style-name="P5">location</text:p>
        </draw:rect>
        <draw:connector draw:style-name="gr401" draw:text-style-name="P15" draw:layer="layout" draw:type="curve" svg:x1="259.667cm" svg:y1="-5.611cm" svg:x2="259.667cm" svg:y2="-3.883cm" draw:start-shape="id317" draw:start-glue-point="2" draw:end-shape="id318" draw:end-glue-point="0" svg:d="M259667-5611v1728" svg:viewBox="0 0 1 1729">
          <text:p/>
        </draw:connector>
        <draw:connector draw:style-name="gr402" draw:text-style-name="P15" draw:layer="layout" draw:type="curve" svg:x1="259.667cm" svg:y1="-2.394cm" svg:x2="256.233cm" svg:y2="0.338cm" draw:start-shape="id318" draw:start-glue-point="2" draw:end-shape="id319" draw:end-glue-point="0" svg:d="M259667-2394c0 2050-3434 685-3434 2732" svg:viewBox="0 0 3435 2733">
          <text:p/>
        </draw:connector>
        <draw:connector draw:style-name="gr403" draw:text-style-name="P15" draw:layer="layout" draw:type="curve" svg:x1="259.667cm" svg:y1="-2.394cm" svg:x2="259.667cm" svg:y2="0.338cm" draw:start-shape="id318" draw:start-glue-point="2" draw:end-shape="id320" draw:end-glue-point="0" svg:d="M259667-2394v2732" svg:viewBox="0 0 1 2733">
          <text:p/>
        </draw:connector>
        <draw:connector draw:style-name="gr404" draw:text-style-name="P15" draw:layer="layout" draw:type="curve" svg:x1="263.136cm" svg:y1="1.827cm" svg:x2="263.202cm" svg:y2="3.118cm" draw:start-shape="id321" draw:end-shape="id322" draw:end-glue-point="0" svg:d="M263136 1827c0 969 66 324 66 1291" svg:viewBox="0 0 67 1292">
          <text:p/>
        </draw:connector>
        <draw:connector draw:style-name="gr405" draw:text-style-name="P15" draw:layer="layout" draw:type="curve" svg:x1="263.202cm" svg:y1="4.607cm" svg:x2="263.175cm" svg:y2="5.897cm" draw:start-shape="id322" draw:start-glue-point="2" draw:end-shape="id323" draw:end-glue-point="0" svg:d="M263202 4607c0 967-27 323-27 1290" svg:viewBox="0 0 28 1291">
          <text:p/>
        </draw:connector>
        <draw:rect draw:style-name="gr41" draw:text-style-name="P5" xml:id="id321" draw:id="id321" draw:layer="layout" svg:width="3.01cm" svg:height="1.489cm" svg:x="261.631cm" svg:y="0.338cm">
          <text:p text:style-name="P5">event</text:p>
        </draw:rect>
        <draw:connector draw:style-name="gr406" draw:text-style-name="P15" draw:layer="layout" draw:type="curve" svg:x1="259.667cm" svg:y1="-2.394cm" svg:x2="263.136cm" svg:y2="0.338cm" draw:start-shape="id318" draw:start-glue-point="2" draw:end-shape="id321"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7" draw:text-style-name="P15" draw:layer="layout" draw:type="curve" svg:x1="113.223cm" svg:y1="31.205cm" svg:x2="113.149cm" svg:y2="32.36cm" draw:start-shape="id268" draw:start-glue-point="2" draw:end-shape="id324"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8" draw:text-style-name="P107" draw:layer="layout" svg:width="3.439cm" svg:height="4.472cm" svg:x="-55.906cm" svg:y="15.663cm">
          <text:p/>
        </draw:rect>
        <draw:rect draw:style-name="gr409" draw:text-style-name="P111" xml:id="id326" draw:id="id326" draw:layer="layout" svg:width="2.256cm" svg:height="1.003cm" svg:x="-55.314cm" svg:y="18.923cm">
          <text:p text:style-name="P5"><text:span text:style-name="T36">Suprise </text:span><text:span text:style-name="T36"><text:line-break/></text:span><text:span text:style-name="T36">Poise</text:span></text:p>
        </draw:rect>
        <draw:connector draw:style-name="gr410" draw:text-style-name="P15" draw:layer="layout" draw:type="curve" svg:x1="-54.186cm" svg:y1="17.186cm" svg:x2="-54.186cm" svg:y2="18.923cm" draw:start-shape="id325" draw:start-glue-point="2" draw:end-shape="id326" draw:end-glue-point="0" svg:d="M-54186 17186v1737" svg:viewBox="0 0 1 1738">
          <text:p/>
        </draw:connector>
        <draw:rect draw:style-name="gr411" draw:text-style-name="P112" xml:id="id325" draw:id="id325" draw:layer="layout" svg:width="2.726cm" svg:height="1.24cm" svg:x="-55.549cm" svg:y="15.946cm">
          <text:p text:style-name="P5"><text:span text:style-name="T26">composite</text:span><text:span text:style-name="T26"><text:line-break/></text:span><text:span text:style-name="T26">goal</text:span></text:p>
        </draw:rect>
        <draw:rect draw:style-name="gr389" draw:text-style-name="P113" draw:layer="layout" svg:width="2.256cm" svg:height="1.003cm" svg:x="-51.234cm" svg:y="17.569cm">
          <text:p text:style-name="P5"><text:span text:style-name="T17">Planning</text:span></text:p>
        </draw:rect>
        <draw:rect draw:style-name="gr408" draw:text-style-name="P107" draw:layer="layout" svg:width="3.439cm" svg:height="4.472cm" svg:x="-47.912cm" svg:y="15.663cm">
          <text:p/>
        </draw:rect>
        <draw:rect draw:style-name="gr409" draw:text-style-name="P114" xml:id="id328" draw:id="id328" draw:layer="layout" svg:width="2.256cm" svg:height="1.003cm" svg:x="-47.32cm" svg:y="18.923cm">
          <text:p text:style-name="P5"><text:span text:style-name="T36">Suprise </text:span><text:span text:style-name="T36"><text:line-break/></text:span><text:span text:style-name="T36">reduction</text:span></text:p>
        </draw:rect>
        <draw:connector draw:style-name="gr410" draw:text-style-name="P15" draw:layer="layout" draw:type="curve" svg:x1="-46.192cm" svg:y1="17.186cm" svg:x2="-46.192cm" svg:y2="18.923cm" draw:start-shape="id327" draw:start-glue-point="2" draw:end-shape="id328" draw:end-glue-point="0" svg:d="M-46192 17186v1737" svg:viewBox="0 0 1 1738">
          <text:p/>
        </draw:connector>
        <draw:rect draw:style-name="gr411" draw:text-style-name="P112" xml:id="id327" draw:id="id327" draw:layer="layout" svg:width="2.726cm" svg:height="1.24cm" svg:x="-47.555cm" svg:y="15.946cm">
          <text:p text:style-name="P5"><text:span text:style-name="T26">composite</text:span><text:span text:style-name="T26"><text:line-break/></text:span><text:span text:style-name="T26">action</text:span></text:p>
        </draw:rect>
        <draw:custom-shape draw:style-name="gr412"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06cm" svg:height="0.725cm" svg:x="-43.754cm" svg:y="17.552cm">
          <draw:text-box>
            <text:p>plan</text:p>
          </draw:text-box>
        </draw:frame>
        <draw:custom-shape draw:style-name="gr412"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4" draw:text-style-name="P38" draw:layer="layout" svg:width="1.399cm" svg:height="0.725cm" svg:x="-58.208cm" svg:y="17.564cm">
          <draw:text-box>
            <text:p>Goal</text:p>
          </draw:text-box>
        </draw:frame>
        <draw:custom-shape draw:style-name="gr415" draw:text-style-name="P115"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5" draw:text-style-name="P115"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6" xml:id="id329" draw:id="id329"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6" draw:start-glue-point="1" draw:end-shape="id329" draw:end-glue-point="6" svg:d="M-53058 19424c890 0 1334-1368 1334-4105" svg:viewBox="0 0 1335 4106">
          <text:p/>
        </draw:connector>
        <draw:rect draw:style-name="gr409" draw:text-style-name="P117" xml:id="id330" draw:id="id330" draw:layer="layout" svg:width="2.714cm" svg:height="1.841cm" svg:x="-47.549cm" svg:y="23.785cm">
          <text:p text:style-name="P5"><text:span text:style-name="T37">Building</text:span><text:span text:style-name="T37"><text:line-break/></text:span><text:span text:style-name="T37">forecasting </text:span><text:span text:style-name="T37"><text:line-break/></text:span><text:span text:style-name="T37">transformer</text:span><text:span text:style-name="T37"><text:line-break/></text:span><text:span text:style-name="T37">models </text:span></text:p>
        </draw:rect>
        <draw:connector draw:style-name="gr416" draw:text-style-name="P15" draw:layer="layout" draw:type="curve" svg:x1="-46.192cm" svg:y1="23.785cm" svg:x2="-46.192cm" svg:y2="22.771cm" draw:start-shape="id330" draw:start-glue-point="0" draw:end-shape="id331" draw:end-glue-point="2" svg:d="M-46192 23785v-1014" svg:viewBox="0 0 1 1015">
          <text:p/>
        </draw:connector>
        <draw:rect draw:style-name="gr409" draw:text-style-name="P117" xml:id="id331" draw:id="id331" draw:layer="layout" svg:width="2.714cm" svg:height="1.841cm" svg:x="-47.549cm" svg:y="20.93cm">
          <text:p text:style-name="P5"><text:span text:style-name="T37">Learning by </text:span><text:span text:style-name="T37"><text:line-break/></text:span><text:span text:style-name="T37">demonstration</text:span></text:p>
        </draw:rect>
        <draw:connector draw:style-name="gr417" draw:text-style-name="P15" draw:layer="layout" draw:type="curve" svg:x1="-46.192cm" svg:y1="20.93cm" svg:x2="-46.192cm" svg:y2="19.926cm" draw:start-shape="id331" draw:start-glue-point="0" draw:end-shape="id328" draw:end-glue-point="2" svg:d="M-46192 20930v-1004" svg:viewBox="0 0 1 1005">
          <text:p/>
        </draw:connector>
        <draw:rect draw:style-name="gr409" draw:text-style-name="P117" xml:id="id332" draw:id="id332" draw:layer="layout" svg:width="2.714cm" svg:height="1.841cm" svg:x="-47.549cm" svg:y="26.586cm">
          <text:p text:style-name="P5"><text:span text:style-name="T37">improving</text:span><text:span text:style-name="T37"><text:line-break/></text:span><text:span text:style-name="T37">forecasting </text:span><text:span text:style-name="T37"><text:line-break/></text:span><text:span text:style-name="T37">transformer</text:span><text:span text:style-name="T37"><text:line-break/></text:span><text:span text:style-name="T37">models </text:span></text:p>
        </draw:rect>
        <draw:rect draw:style-name="gr409" draw:text-style-name="P117" draw:layer="layout" svg:width="2.714cm" svg:height="1.841cm" svg:x="-49.606cm" svg:y="29.466cm">
          <text:p text:style-name="P5"><text:span text:style-name="T37">Clustering</text:span><text:span text:style-name="T37"><text:line-break/></text:span><text:span text:style-name="T37">then training</text:span><text:span text:style-name="T37"><text:line-break/></text:span><text:span text:style-name="T37">forecasting</text:span></text:p>
        </draw:rect>
        <draw:connector draw:style-name="gr418" draw:text-style-name="P15" draw:layer="layout" draw:type="curve" svg:x1="-46.192cm" svg:y1="26.586cm" svg:x2="-46.192cm" svg:y2="25.626cm" draw:start-shape="id332" draw:start-glue-point="0" draw:end-shape="id330" draw:end-glue-point="2" svg:d="M-46192 26586v-960" svg:viewBox="0 0 1 961">
          <text:p/>
        </draw:connector>
        <draw:connector draw:style-name="gr419" draw:text-style-name="P15" draw:layer="layout" draw:type="curve" svg:x1="-47.406cm" svg:y1="29.466cm" svg:x2="-46.192cm" svg:y2="28.427cm" draw:end-shape="id332" draw:end-glue-point="2" svg:d="M-47406 29466c0-403 1214 116 1214-1039" svg:viewBox="0 0 1215 1040">
          <text:p/>
        </draw:connector>
        <draw:rect draw:style-name="gr409" draw:text-style-name="P117" xml:id="id333" draw:id="id333" draw:layer="layout" svg:width="2.714cm" svg:height="1.841cm" svg:x="-45.835cm" svg:y="29.484cm">
          <text:p text:style-name="P5"><text:span text:style-name="T37">Using KF</text:span><text:span text:style-name="T37"><text:line-break/></text:span><text:span text:style-name="T37">in predictions</text:span></text:p>
        </draw:rect>
        <draw:connector draw:style-name="gr420" draw:text-style-name="P15" draw:layer="layout" draw:type="curve" svg:x1="-44.478cm" svg:y1="29.484cm" svg:x2="-46.192cm" svg:y2="28.427cm" draw:start-shape="id333" draw:start-glue-point="0" draw:end-shape="id332"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9" draw:text-style-name="P23" xml:id="id334" draw:id="id334" draw:layer="layout" svg:width="4.06cm" svg:height="1.64cm" svg:x="-25.434cm" svg:y="0.57cm">
          <text:p text:style-name="P5">Default biological <text:line-break/>goals</text:p>
        </draw:rect>
        <draw:connector draw:style-name="gr421" draw:text-style-name="P15" draw:layer="layout" draw:type="curve" svg:x1="-23.404cm" svg:y1="2.21cm" svg:x2="-30.212cm" svg:y2="4.909cm" draw:start-shape="id334" draw:start-glue-point="2" draw:end-shape="id335" svg:d="M-23404 2210c0 2025-6808 676-6808 2699" svg:viewBox="0 0 6809 2700">
          <text:p/>
        </draw:connector>
        <draw:connector draw:style-name="gr422" draw:text-style-name="P15" draw:layer="layout" draw:type="curve" svg:x1="-23.404cm" svg:y1="2.21cm" svg:x2="-25.726cm" svg:y2="4.925cm" draw:start-shape="id334" draw:start-glue-point="2" draw:end-shape="id336" svg:d="M-23404 2210c0 2037-2322 680-2322 2715" svg:viewBox="0 0 2323 2716">
          <text:p/>
        </draw:connector>
        <draw:rect draw:style-name="gr37" draw:text-style-name="P118" xml:id="id335" draw:id="id335"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6" draw:id="id336"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7" draw:id="id337" draw:layer="layout" svg:width="2.3cm" svg:height="1cm" svg:x="43.707cm" svg:y="59.941cm">
          <text:p text:style-name="P5">Actions</text:p>
        </draw:rect>
        <draw:connector draw:style-name="gr423" draw:text-style-name="P15" draw:layer="layout" draw:type="curve" svg:x1="48.254cm" svg:y1="57.528cm" svg:x2="44.857cm" svg:y2="59.941cm" draw:start-shape="id232" draw:start-glue-point="2" draw:end-shape="id337" draw:end-glue-point="0" svg:d="M48254 57528c0 1810-3397 604-3397 2413" svg:viewBox="0 0 3398 2414">
          <text:p/>
        </draw:connector>
        <draw:rect draw:style-name="gr292" draw:text-style-name="P35" xml:id="id339" draw:id="id339" draw:layer="layout" svg:width="2.3cm" svg:height="1cm" svg:x="38.338cm" svg:y="59.941cm">
          <text:p text:style-name="P5">Plan</text:p>
        </draw:rect>
        <draw:rect draw:style-name="gr292" draw:text-style-name="P35" xml:id="id338" draw:id="id338" draw:layer="layout" svg:width="2.3cm" svg:height="1cm" svg:x="43.707cm" svg:y="61.675cm">
          <text:p text:style-name="P5">Suprise<text:line-break/>poise</text:p>
        </draw:rect>
        <draw:connector draw:style-name="gr424" draw:text-style-name="P15" draw:layer="layout" draw:type="curve" svg:x1="44.857cm" svg:y1="60.941cm" svg:x2="44.857cm" svg:y2="61.675cm" draw:start-shape="id337" draw:start-glue-point="2" draw:end-shape="id338" draw:end-glue-point="0" svg:d="M44857 60941v734" svg:viewBox="0 0 1 735">
          <text:p/>
        </draw:connector>
        <draw:connector draw:style-name="gr425" draw:text-style-name="P15" draw:layer="layout" draw:type="curve" svg:x1="48.254cm" svg:y1="57.528cm" svg:x2="39.488cm" svg:y2="59.941cm" draw:start-shape="id232" draw:start-glue-point="2" draw:end-shape="id339" draw:end-glue-point="0" svg:d="M48254 57528c0 1810-8766 604-8766 2413" svg:viewBox="0 0 8767 2414">
          <text:p/>
        </draw:connector>
        <draw:rect draw:style-name="gr292" draw:text-style-name="P35" xml:id="id340" draw:id="id340" draw:layer="layout" svg:width="2.3cm" svg:height="1cm" svg:x="36.687cm" svg:y="62.175cm">
          <text:p text:style-name="P5">Active goal<text:line-break/>composite</text:p>
        </draw:rect>
        <draw:rect draw:style-name="gr292" draw:text-style-name="P35" xml:id="id341" draw:id="id341" draw:layer="layout" svg:width="2.3cm" svg:height="1cm" svg:x="39.809cm" svg:y="62.175cm">
          <text:p text:style-name="P5">Active action<text:line-break/>composite</text:p>
        </draw:rect>
        <draw:connector draw:style-name="gr426" draw:text-style-name="P15" draw:layer="layout" draw:type="curve" svg:x1="39.488cm" svg:y1="60.941cm" svg:x2="37.837cm" svg:y2="62.175cm" draw:start-shape="id339" draw:start-glue-point="2" draw:end-shape="id340" draw:end-glue-point="0" svg:d="M39488 60941c0 925-1651 309-1651 1234" svg:viewBox="0 0 1652 1235">
          <text:p/>
        </draw:connector>
        <draw:connector draw:style-name="gr427" draw:text-style-name="P15" draw:layer="layout" draw:type="curve" svg:x1="39.488cm" svg:y1="60.941cm" svg:x2="40.959cm" svg:y2="62.175cm" draw:start-shape="id339" draw:start-glue-point="2" draw:end-shape="id341" svg:d="M39488 60941c0 925 1471 309 1471 1234" svg:viewBox="0 0 1472 1235">
          <text:p/>
        </draw:connector>
        <draw:rect draw:style-name="gr292" draw:text-style-name="P35" xml:id="id342" draw:id="id342" draw:layer="layout" svg:width="2.3cm" svg:height="1cm" svg:x="61.329cm" svg:y="55.972cm">
          <text:p text:style-name="P5">Running<text:line-break/>plan</text:p>
        </draw:rect>
        <draw:connector draw:style-name="gr428" draw:text-style-name="P15" draw:layer="layout" draw:type="curve" svg:x1="60.954cm" svg:y1="54.528cm" svg:x2="62.479cm" svg:y2="55.972cm" draw:start-shape="id237" draw:start-glue-point="2" draw:end-shape="id342" draw:end-glue-point="0" svg:d="M60954 54528c0 1083 1525 361 1525 1444" svg:viewBox="0 0 1526 1445">
          <text:p/>
        </draw:connector>
        <draw:rect draw:style-name="gr292" draw:text-style-name="P35" xml:id="id343" draw:id="id343" draw:layer="layout" svg:width="2.3cm" svg:height="1cm" svg:x="58.945cm" svg:y="58.704cm">
          <text:p text:style-name="P5">Goal<text:line-break/>composite</text:p>
        </draw:rect>
        <draw:rect draw:style-name="gr292" draw:text-style-name="P35" xml:id="id344" draw:id="id344" draw:layer="layout" svg:width="2.3cm" svg:height="1cm" svg:x="63.867cm" svg:y="58.704cm">
          <text:p text:style-name="P5">Action<text:line-break/>composite</text:p>
        </draw:rect>
        <draw:connector draw:style-name="gr429" draw:text-style-name="P15" draw:layer="layout" draw:type="curve" svg:x1="61.245cm" svg:y1="59.204cm" svg:x2="63.867cm" svg:y2="59.204cm" draw:start-shape="id343" draw:start-glue-point="1" draw:end-shape="id344" draw:end-glue-point="3" svg:d="M61245 59204h2622" svg:viewBox="0 0 2623 1">
          <text:p text:style-name="P5">updates</text:p>
        </draw:connector>
        <draw:connector draw:style-name="gr430" draw:text-style-name="P15" draw:layer="layout" draw:type="curve" svg:x1="62.479cm" svg:y1="56.972cm" svg:x2="60.095cm" svg:y2="58.704cm" draw:start-shape="id342" draw:start-glue-point="2" draw:end-shape="id343" draw:end-glue-point="0" svg:d="M62479 56972c0 1299-2384 433-2384 1732" svg:viewBox="0 0 2385 1733">
          <text:p/>
        </draw:connector>
        <draw:connector draw:style-name="gr431" draw:text-style-name="P15" draw:layer="layout" draw:type="curve" svg:x1="62.479cm" svg:y1="56.972cm" svg:x2="65.017cm" svg:y2="58.704cm" draw:start-shape="id342" draw:start-glue-point="2" draw:end-shape="id344" draw:end-glue-point="0" svg:d="M62479 56972c0 1299 2538 433 2538 1732" svg:viewBox="0 0 2539 1733">
          <text:p/>
        </draw:connector>
        <draw:rect draw:style-name="gr292" draw:text-style-name="P35" xml:id="id346" draw:id="id346" draw:layer="layout" svg:width="2.853cm" svg:height="1.372cm" svg:x="43.644cm" svg:y="65.527cm">
          <text:p text:style-name="P5">Updating<text:line-break/>predicting<text:line-break/>models</text:p>
        </draw:rect>
        <draw:rect draw:style-name="gr292" draw:text-style-name="P35" xml:id="id347" draw:id="id347" draw:layer="layout" svg:width="2.853cm" svg:height="1.372cm" svg:x="48.396cm" svg:y="65.527cm">
          <text:p text:style-name="P5">Manipulating<text:line-break/>the world</text:p>
        </draw:rect>
        <draw:connector draw:style-name="gr432" draw:text-style-name="P15" draw:layer="layout" draw:type="curve" svg:x1="47.568cm" svg:y1="64.449cm" svg:x2="45.07cm" svg:y2="65.527cm" draw:start-shape="id345" draw:start-glue-point="2" draw:end-shape="id346" draw:end-glue-point="0" svg:d="M47568 64449c0 808-2498 270-2498 1078" svg:viewBox="0 0 2499 1079">
          <text:p/>
        </draw:connector>
        <draw:connector draw:style-name="gr433" draw:text-style-name="P15" draw:layer="layout" draw:type="curve" svg:x1="47.568cm" svg:y1="64.449cm" svg:x2="49.822cm" svg:y2="65.527cm" draw:start-shape="id345" draw:start-glue-point="2" draw:end-shape="id347" draw:end-glue-point="0" svg:d="M47568 64449c0 808 2254 270 2254 1078" svg:viewBox="0 0 2255 1079">
          <text:p/>
        </draw:connector>
        <draw:rect draw:style-name="gr292" draw:text-style-name="P35" xml:id="id345" draw:id="id345" draw:layer="layout" svg:width="1.437cm" svg:height="0.766cm" svg:x="46.85cm" svg:y="63.683cm">
          <text:p text:style-name="P5">kinds</text:p>
        </draw:rect>
        <draw:connector draw:style-name="gr434" draw:text-style-name="P15" draw:layer="layout" draw:type="curve" svg:x1="47.568cm" svg:y1="62.675cm" svg:x2="47.568cm" svg:y2="63.683cm" draw:start-shape="id258" draw:start-glue-point="2" draw:end-shape="id345" draw:end-glue-point="0" svg:d="M47568 62675v1008" svg:viewBox="0 0 1 1009">
          <text:p/>
        </draw:connector>
        <draw:rect draw:style-name="gr292" draw:text-style-name="P35" xml:id="id348" draw:id="id348" draw:layer="layout" svg:width="2.853cm" svg:height="1.372cm" svg:x="42.145cm" svg:y="68.027cm">
          <text:p text:style-name="P5">Updating<text:line-break/>forecasting<text:line-break/>models</text:p>
        </draw:rect>
        <draw:connector draw:style-name="gr435" draw:text-style-name="P15" draw:layer="layout" draw:type="curve" svg:x1="45.07cm" svg:y1="66.899cm" svg:x2="43.571cm" svg:y2="68.027cm" draw:start-shape="id346" draw:start-glue-point="2" draw:end-shape="id348" draw:end-glue-point="0" svg:d="M45070 66899c0 846-1499 282-1499 1128" svg:viewBox="0 0 1500 1129">
          <text:p/>
        </draw:connector>
        <draw:rect draw:style-name="gr292" draw:text-style-name="P35" xml:id="id349" draw:id="id349" draw:layer="layout" svg:width="2.853cm" svg:height="1.372cm" svg:x="45.146cm" svg:y="68.027cm">
          <text:p text:style-name="P5">Updating<text:line-break/>classification<text:line-break/>models</text:p>
        </draw:rect>
        <draw:connector draw:style-name="gr436" draw:text-style-name="P15" draw:layer="layout" draw:type="curve" svg:x1="45.07cm" svg:y1="66.899cm" svg:x2="46.572cm" svg:y2="68.027cm" draw:start-shape="id346" draw:start-glue-point="2" draw:end-shape="id349" svg:d="M45070 66899c0 846 1502 282 1502 1128" svg:viewBox="0 0 1503 1129">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50" draw:id="id350"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51" draw:id="id351"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37" draw:text-style-name="P15" draw:layer="layout" draw:type="curve" svg:x1="-23.404cm" svg:y1="2.21cm" svg:x2="-21.009cm" svg:y2="4.979cm" draw:start-shape="id334" draw:start-glue-point="2" draw:end-shape="id350" draw:end-glue-point="0" svg:d="M-23404 2210c0 2077 2395 693 2395 2769" svg:viewBox="0 0 2396 2770">
          <text:p/>
        </draw:connector>
        <draw:connector draw:style-name="gr438" draw:text-style-name="P15" draw:layer="layout" draw:type="curve" svg:x1="-23.404cm" svg:y1="2.21cm" svg:x2="-16.293cm" svg:y2="5.008cm" draw:start-shape="id334" draw:start-glue-point="2" draw:end-shape="id351" draw:end-glue-point="0" svg:d="M-23404 2210c0 2098 7111 700 7111 2798" svg:viewBox="0 0 7112 2799">
          <text:p/>
        </draw:connector>
        <draw:rect draw:name="goal kinds 6" draw:style-name="gr389" draw:text-style-name="P23" xml:id="id352" draw:id="id352" draw:layer="layout" svg:width="4.06cm" svg:height="1.64cm" svg:x="-25.168cm" svg:y="10.138cm">
          <text:p text:style-name="P5">Biological <text:line-break/>goals that I know of</text:p>
        </draw:rect>
        <draw:connector draw:style-name="gr421" draw:text-style-name="P15" draw:layer="layout" draw:type="curve" svg:x1="-23.138cm" svg:y1="11.778cm" svg:x2="-26.517cm" svg:y2="14.393cm" draw:start-shape="id352" draw:start-glue-point="2" draw:end-shape="id353" draw:end-glue-point="0" svg:d="M-23138 11778c0 1962-3379 655-3379 2615" svg:viewBox="0 0 3380 2616">
          <text:p/>
        </draw:connector>
        <draw:connector draw:style-name="gr439" draw:text-style-name="P15" draw:layer="layout" draw:type="curve" svg:x1="-23.138cm" svg:y1="11.778cm" svg:x2="-29.881cm" svg:y2="14.393cm" draw:start-shape="id352" draw:start-glue-point="2" draw:end-shape="id354" draw:end-glue-point="0" svg:d="M-23138 11778c0 1962-6743 655-6743 2615" svg:viewBox="0 0 6744 2616">
          <text:p/>
        </draw:connector>
        <draw:connector draw:style-name="gr437" draw:text-style-name="P15" draw:layer="layout" draw:type="curve" svg:x1="-23.138cm" svg:y1="11.778cm" svg:x2="-19.79cm" svg:y2="14.393cm" draw:start-shape="id352" draw:start-glue-point="2" draw:end-shape="id355" draw:end-glue-point="0" svg:d="M-23138 11778c0 1962 3348 655 3348 2615" svg:viewBox="0 0 3349 2616">
          <text:p/>
        </draw:connector>
        <draw:connector draw:style-name="gr438" draw:text-style-name="P15" draw:layer="layout" draw:type="curve" svg:x1="-23.138cm" svg:y1="11.778cm" svg:x2="-16.427cm" svg:y2="14.393cm" draw:start-shape="id352" draw:start-glue-point="2" draw:end-shape="id356" draw:end-glue-point="0" svg:d="M-23138 11778c0 1962 6711 655 6711 2615" svg:viewBox="0 0 6712 2616">
          <text:p/>
        </draw:connector>
        <draw:rect draw:name="goal kinds 7" draw:style-name="gr389" draw:text-style-name="P23" xml:id="id394" draw:id="id394" draw:layer="layout" svg:width="4.06cm" svg:height="1.64cm" svg:x="-25.168cm" svg:y="10.138cm">
          <text:p text:style-name="P5">Biological <text:line-break/>actions</text:p>
        </draw:rect>
        <draw:rect draw:style-name="gr294" draw:text-style-name="P108" xml:id="id361" draw:id="id361" draw:layer="layout" svg:width="2.022cm" svg:height="1.04cm" svg:x="-22.17cm" svg:y="70.596cm">
          <text:p text:style-name="P5">Control</text:p>
        </draw:rect>
        <draw:g draw:style-name="gr23">
          <draw:rect draw:style-name="gr440" draw:text-style-name="P108" draw:layer="layout" svg:width="2.022cm" svg:height="1.04cm" svg:x="-10.121cm" svg:y="57.357cm">
            <text:p text:style-name="P5">Action</text:p>
          </draw:rect>
          <draw:rect draw:style-name="gr441" draw:text-style-name="P108" xml:id="id357" draw:id="id357" draw:layer="layout" svg:width="2.022cm" svg:height="1.04cm" svg:x="-10.121cm" svg:y="57.357cm">
            <text:p text:style-name="P5">Control<text:line-break/>signal</text:p>
          </draw:rect>
          <draw:rect draw:style-name="gr441" draw:text-style-name="P108" xml:id="id359" draw:id="id359" draw:layer="layout" svg:width="2.022cm" svg:height="1.04cm" svg:x="-12.136cm" svg:y="61.535cm">
            <text:p text:style-name="P5">Goal gain</text:p>
          </draw:rect>
          <draw:rect draw:style-name="gr440" draw:text-style-name="P108" draw:layer="layout" svg:width="2.022cm" svg:height="1.04cm" svg:x="-10.121cm" svg:y="59.357cm">
            <text:p text:style-name="P5">Action</text:p>
          </draw:rect>
          <draw:rect draw:style-name="gr441" draw:text-style-name="P108" xml:id="id358" draw:id="id358" draw:layer="layout" svg:width="2.022cm" svg:height="1.04cm" svg:x="-10.121cm" svg:y="59.357cm">
            <text:p text:style-name="P5">Feedback</text:p>
          </draw:rect>
          <draw:rect draw:style-name="gr441" draw:text-style-name="P108" xml:id="id360" draw:id="id360" draw:layer="layout" svg:width="2.022cm" svg:height="1.04cm" svg:x="-8.094cm" svg:y="61.51cm">
            <text:p text:style-name="P5">Resource <text:line-break/>gain</text:p>
          </draw:rect>
          <draw:connector draw:style-name="gr442" draw:text-style-name="P15" draw:layer="layout" draw:type="curve" svg:x1="-9.11cm" svg:y1="58.397cm" svg:x2="-9.11cm" svg:y2="59.357cm" draw:start-shape="id357" draw:start-glue-point="2" draw:end-shape="id358" draw:end-glue-point="0" svg:d="M-9110 58397v960" svg:viewBox="0 0 1 961">
            <text:p/>
          </draw:connector>
          <draw:connector draw:style-name="gr443" draw:text-style-name="P15" draw:layer="layout" draw:type="curve" svg:x1="-9.11cm" svg:y1="60.397cm" svg:x2="-11.125cm" svg:y2="61.535cm" draw:start-shape="id358" draw:start-glue-point="2" draw:end-shape="id359" draw:end-glue-point="0" svg:d="M-9110 60397c0 853-2015 285-2015 1138" svg:viewBox="0 0 2016 1139">
            <text:p/>
          </draw:connector>
          <draw:connector draw:style-name="gr444" draw:text-style-name="P15" draw:layer="layout" draw:type="curve" svg:x1="-9.11cm" svg:y1="60.397cm" svg:x2="-7.083cm" svg:y2="61.51cm" draw:start-shape="id358" draw:start-glue-point="2" draw:end-shape="id360" draw:end-glue-point="0" svg:d="M-9110 60397c0 835 2027 279 2027 1113" svg:viewBox="0 0 2028 1114">
            <text:p/>
          </draw:connector>
        </draw:g>
        <draw:rect draw:style-name="gr41" draw:text-style-name="P5" xml:id="id369" draw:id="id369" draw:layer="layout" svg:width="2.434cm" svg:height="1.059cm" svg:x="-20.205cm" svg:y="75.112cm">
          <text:p text:style-name="P5">behavior</text:p>
        </draw:rect>
        <draw:rect draw:style-name="gr294" draw:text-style-name="P108" xml:id="id364" draw:id="id364" draw:layer="layout" svg:width="2.022cm" svg:height="1.04cm" svg:x="-10.563cm" svg:y="73.209cm">
          <text:p text:style-name="P5">Planing</text:p>
        </draw:rect>
        <draw:rect draw:style-name="gr294" draw:text-style-name="P108" xml:id="id447" draw:id="id447" draw:layer="layout" svg:width="2.022cm" svg:height="1.04cm" svg:x="-7.818cm" svg:y="79.267cm">
          <text:p text:style-name="P5">Decision</text:p>
        </draw:rect>
        <draw:rect draw:style-name="gr41" draw:text-style-name="P5" xml:id="id362" draw:id="id362" draw:layer="layout" svg:width="2.064cm" svg:height="1.085cm" svg:x="-23.417cm" svg:y="74.929cm">
          <text:p text:style-name="P5">open-loop</text:p>
        </draw:rect>
        <draw:connector draw:style-name="gr445" draw:text-style-name="P15" draw:layer="layout" draw:type="curve" svg:x1="-21.159cm" svg:y1="71.636cm" svg:x2="-22.385cm" svg:y2="74.929cm" draw:start-shape="id361" draw:start-glue-point="2" draw:end-shape="id362" draw:end-glue-point="0" svg:d="M-21159 71636c0 824-307 1647-613 1647-307 0-613 823-613 1646" svg:viewBox="0 0 1227 3294">
          <text:p/>
        </draw:connector>
        <draw:rect draw:style-name="gr294" draw:text-style-name="P108" xml:id="id370" draw:id="id370" draw:layer="layout" svg:width="2.022cm" svg:height="1.04cm" svg:x="-15.84cm" svg:y="74.382cm">
          <text:p text:style-name="P5">Attention</text:p>
        </draw:rect>
        <draw:rect draw:style-name="gr294" draw:text-style-name="P108" xml:id="id363" draw:id="id363" draw:layer="layout" svg:width="2.022cm" svg:height="1.04cm" svg:x="-11.542cm" svg:y="75.92cm">
          <text:p text:style-name="P5">Motion<text:line-break/>planing</text:p>
        </draw:rect>
        <draw:connector draw:style-name="gr446" draw:text-style-name="P15" draw:layer="layout" draw:type="curve" svg:x1="-10.531cm" svg:y1="75.92cm" svg:x2="-9.552cm" svg:y2="74.249cm" draw:start-shape="id363" draw:start-glue-point="0" draw:end-shape="id364" draw:end-glue-point="2" svg:d="M-10531 75920c0-1252 979-417 979-1671" svg:viewBox="0 0 980 1672">
          <text:p/>
        </draw:connector>
        <draw:rect draw:style-name="gr41" draw:text-style-name="P5" xml:id="id365" draw:id="id365" draw:layer="layout" svg:width="2.79cm" svg:height="0.955cm" svg:x="80.06cm" svg:y="43.835cm">
          <text:p text:style-name="P5">executive<text:line-break/>functions</text:p>
        </draw:rect>
        <draw:connector draw:style-name="gr447" draw:text-style-name="P15" draw:layer="layout" draw:type="curve" svg:x1="84.826cm" svg:y1="39.775cm" svg:x2="81.455cm" svg:y2="43.835cm" draw:start-shape="id201" draw:start-glue-point="2" draw:end-shape="id365" svg:d="M84826 39775c0 3045-3371 1015-3371 4060" svg:viewBox="0 0 3372 4061">
          <text:p/>
        </draw:connector>
        <draw:rect draw:style-name="gr41" draw:text-style-name="P5" xml:id="id366" draw:id="id366" draw:layer="layout" svg:width="2.79cm" svg:height="0.955cm" svg:x="80.082cm" svg:y="46.561cm">
          <text:p text:style-name="P5">Working<text:line-break/>memory</text:p>
        </draw:rect>
        <draw:connector draw:style-name="gr448" draw:text-style-name="P15" draw:layer="layout" draw:type="curve" svg:x1="81.455cm" svg:y1="44.79cm" svg:x2="81.477cm" svg:y2="46.561cm" draw:start-shape="id365" draw:start-glue-point="2" draw:end-shape="id366" draw:end-glue-point="0" svg:d="M81455 44790c0 1329 22 444 22 1771" svg:viewBox="0 0 23 1772">
          <text:p/>
        </draw:connector>
        <draw:rect draw:style-name="gr449" draw:text-style-name="P120" xml:id="id368" draw:id="id368" draw:layer="layout" svg:width="1.859cm" svg:height="0.972cm" svg:x="-16.408cm" svg:y="70.013cm">
          <text:p text:style-name="P119"><text:span text:style-name="T37">Working</text:span><text:span text:style-name="T37"><text:line-break/></text:span><text:span text:style-name="T37">memory</text:span></text:p>
        </draw:rect>
        <draw:rect draw:style-name="gr294" draw:text-style-name="P108" xml:id="id371" draw:id="id371" draw:layer="layout" svg:width="2.022cm" svg:height="1.04cm" svg:x="-12.049cm" svg:y="70.104cm">
          <text:p text:style-name="P5">Short term<text:line-break/>memory</text:p>
        </draw:rect>
        <draw:rect draw:style-name="gr450" draw:text-style-name="P121" xml:id="id367" draw:id="id367" draw:layer="layout" svg:width="1.859cm" svg:height="0.972cm" svg:x="-17.314cm" svg:y="67.802cm">
          <text:p text:style-name="P5"><text:span text:style-name="T37">Executive</text:span><text:span text:style-name="T37"><text:line-break/></text:span><text:span text:style-name="T37">functions</text:span></text:p>
        </draw:rect>
        <draw:connector draw:style-name="gr451" draw:text-style-name="P15" draw:layer="layout" draw:type="curve" svg:x1="-16.384cm" svg:y1="68.774cm" svg:x2="-15.478cm" svg:y2="70.013cm" draw:start-shape="id367" draw:start-glue-point="2" draw:end-shape="id368" svg:d="M-16384 68774c0 930 906 311 906 1239" svg:viewBox="0 0 907 1240">
          <text:p/>
        </draw:connector>
        <draw:connector draw:style-name="gr452" draw:text-style-name="P15" draw:layer="layout" draw:type="curve" svg:x1="-16.384cm" svg:y1="68.774cm" svg:x2="-21.159cm" svg:y2="70.596cm" draw:start-shape="id367" draw:start-glue-point="2" draw:end-shape="id361" svg:d="M-16384 68774c0 1366-4775 456-4775 1822" svg:viewBox="0 0 4776 1823">
          <text:p/>
        </draw:connector>
        <draw:connector draw:style-name="gr453" draw:text-style-name="P15" draw:layer="layout" draw:type="curve" svg:x1="-15.478cm" svg:y1="70.985cm" svg:x2="-18.988cm" svg:y2="75.112cm" draw:start-shape="id368" draw:start-glue-point="2" draw:end-shape="id369" draw:end-glue-point="0" svg:d="M-15478 70985c0 3096-3510 1033-3510 4127" svg:viewBox="0 0 3511 4128">
          <text:p/>
        </draw:connector>
        <draw:connector draw:style-name="gr454" draw:text-style-name="P15" draw:layer="layout" draw:type="curve" svg:x1="-15.478cm" svg:y1="70.985cm" svg:x2="-14.829cm" svg:y2="74.382cm" draw:start-shape="id368" draw:start-glue-point="2" draw:end-shape="id370" svg:d="M-15478 70985c0 2548 649 850 649 3397" svg:viewBox="0 0 650 3398">
          <text:p/>
        </draw:connector>
        <draw:connector draw:style-name="gr455" draw:text-style-name="P15" draw:layer="layout" draw:type="curve" svg:x1="-14.549cm" svg:y1="70.499cm" svg:x2="-12.049cm" svg:y2="70.624cm" draw:start-shape="id368" draw:start-glue-point="1" draw:end-shape="id371" draw:end-glue-point="3" svg:d="M-14549 70499c1876 0 627 125 2500 125" svg:viewBox="0 0 2501 126">
          <text:p/>
        </draw:connector>
        <draw:connector draw:style-name="gr456" draw:text-style-name="P15" draw:layer="layout" draw:type="curve" svg:x1="-15.478cm" svg:y1="70.985cm" svg:x2="-9.552cm" svg:y2="73.209cm" draw:start-shape="id368" draw:start-glue-point="2" draw:end-shape="id364" draw:end-glue-point="0" svg:d="M-15478 70985c0 1668 5926 556 5926 2224" svg:viewBox="0 0 5927 2225">
          <text:p/>
        </draw:connector>
        <draw:rect draw:style-name="gr294" draw:text-style-name="P108" xml:id="id372" draw:id="id372" draw:layer="layout" svg:width="2.022cm" svg:height="1.04cm" svg:x="-8.22cm" svg:y="76.914cm">
          <text:p text:style-name="P5">Motor<text:line-break/>planning</text:p>
        </draw:rect>
        <draw:connector draw:style-name="gr457" draw:text-style-name="P15" draw:layer="layout" draw:type="curve" svg:x1="-7.209cm" svg:y1="76.914cm" svg:x2="-9.552cm" svg:y2="74.249cm" draw:start-shape="id372" draw:start-glue-point="0" draw:end-shape="id364" draw:end-glue-point="2" svg:d="M-7209 76914c0-1998-2343-666-2343-2665" svg:viewBox="0 0 2344 2666">
          <text:p/>
        </draw:connector>
        <draw:rect draw:style-name="gr41" draw:text-style-name="P5" xml:id="id373" draw:id="id373" draw:layer="layout" svg:width="3.9cm" svg:height="1.2cm" svg:x="128.748cm" svg:y="41.835cm">
          <text:p text:style-name="P5">theories</text:p>
        </draw:rect>
        <draw:rect draw:style-name="gr41" draw:text-style-name="P5" xml:id="id374" draw:id="id374" draw:layer="layout" svg:width="3.9cm" svg:height="1.2cm" svg:x="128.748cm" svg:y="43.803cm">
          <text:p text:style-name="P5">Bayesian</text:p>
        </draw:rect>
        <draw:rect draw:style-name="gr41" draw:text-style-name="P5" xml:id="id375" draw:id="id375" draw:layer="layout" svg:width="3.9cm" svg:height="1.2cm" svg:x="128.748cm" svg:y="45.784cm">
          <text:p text:style-name="P5">predictive</text:p>
        </draw:rect>
        <draw:connector draw:style-name="gr458" draw:text-style-name="P15" draw:layer="layout" draw:type="curve" svg:x1="130.698cm" svg:y1="40.4cm" svg:x2="130.698cm" svg:y2="41.835cm" draw:start-shape="id192" draw:start-glue-point="2" draw:end-shape="id373" svg:d="M130698 40400v1435" svg:viewBox="0 0 1 1436">
          <text:p/>
        </draw:connector>
        <draw:connector draw:style-name="gr459" draw:text-style-name="P15" draw:layer="layout" draw:type="curve" svg:x1="130.698cm" svg:y1="43.035cm" svg:x2="130.698cm" svg:y2="43.803cm" draw:start-shape="id373" draw:start-glue-point="2" draw:end-shape="id374" draw:end-glue-point="0" svg:d="M130698 43035v768" svg:viewBox="0 0 1 769">
          <text:p/>
        </draw:connector>
        <draw:connector draw:style-name="gr460" draw:text-style-name="P15" draw:layer="layout" draw:type="curve" svg:x1="130.698cm" svg:y1="45.003cm" svg:x2="130.698cm" svg:y2="45.784cm" draw:start-shape="id374" draw:start-glue-point="2" draw:end-shape="id375" draw:end-glue-point="0" svg:d="M130698 45003v781" svg:viewBox="0 0 1 782">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61" draw:text-style-name="P123" draw:layer="layout" svg:width="9.739cm" svg:height="2.221cm" svg:x="-96.545cm" svg:y="31.437cm">
            <draw:text-box>
              <text:p text:style-name="P122"><text:span text:style-name="T12">From A Neurocognitive Perspective on the</text:span></text:p>
              <text:p text:style-name="P122"><text:span text:style-name="T12">Forms and Functions of Autobiographical Memory Retrieval</text:span><text:span text:style-name="T12"><text:line-break/></text:span><text:span text:style-name="T12">and the Construction of Autobiographical Memories</text:span></text:p>
              <text:p text:style-name="P122"><text:span text:style-name="T12">in the Self-Memory System and AI</text:span></text:p>
              <text:p text:style-name="P122"><text:span text:style-name="T12"/></text:p>
            </draw:text-box>
          </draw:frame>
        </draw:g>
        <draw:g draw:style-name="gr23">
          <draw:rect draw:style-name="gr3" draw:text-style-name="P4" xml:id="id377" draw:id="id377" draw:layer="layout" svg:width="2.015cm" svg:height="0.775cm" svg:x="-4.369cm" svg:y="26.431cm">
            <text:p text:style-name="P5"><text:span text:style-name="T2">event</text:span></text:p>
          </draw:rect>
          <draw:rect draw:style-name="gr4" draw:text-style-name="P6" xml:id="id376" draw:id="id376" draw:layer="layout" svg:width="2.324cm" svg:height="0.915cm" svg:x="-1.811cm" svg:y="23.973cm">
            <text:p text:style-name="P5"><text:span text:style-name="T3">Perception</text:span></text:p>
          </draw:rect>
          <draw:connector draw:style-name="gr462" draw:text-style-name="P15" draw:layer="layout" draw:type="curve" svg:x1="-0.649cm" svg:y1="24.888cm" svg:x2="-3.361cm" svg:y2="26.431cm" draw:start-shape="id376" draw:start-glue-point="2" draw:end-shape="id377" draw:end-glue-point="0" svg:d="M-649 24888c0 1158-2712 387-2712 1543" svg:viewBox="0 0 2713 1544">
            <text:p/>
          </draw:connector>
          <draw:rect draw:style-name="gr3" draw:text-style-name="P4" xml:id="id378" draw:id="id378" draw:layer="layout" svg:width="2.015cm" svg:height="0.775cm" svg:x="-1.579cm" svg:y="26.412cm">
            <text:p text:style-name="P5"><text:span text:style-name="T2">object</text:span></text:p>
          </draw:rect>
          <draw:connector draw:style-name="gr463" draw:text-style-name="P15" draw:layer="layout" draw:type="curve" svg:x1="-0.649cm" svg:y1="24.888cm" svg:x2="-0.571cm" svg:y2="26.412cm" draw:start-shape="id376" draw:start-glue-point="2" draw:end-shape="id378" draw:end-glue-point="0" svg:d="M-649 24888c0 1143 78 381 78 1524" svg:viewBox="0 0 79 1525">
            <text:p/>
          </draw:connector>
          <draw:rect draw:style-name="gr3" draw:text-style-name="P4" xml:id="id379" draw:id="id379"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64" draw:text-style-name="P15" draw:layer="layout" draw:type="curve" svg:x1="-0.649cm" svg:y1="24.888cm" svg:x2="2.136cm" svg:y2="26.474cm" draw:start-shape="id376" draw:start-glue-point="2" draw:end-shape="id379" draw:end-glue-point="0" svg:d="M-649 24888c0 1189 2785 397 2785 1586" svg:viewBox="0 0 2786 1587">
            <text:p/>
          </draw:connector>
          <draw:connector draw:style-name="gr462" draw:text-style-name="P15" draw:layer="layout" draw:type="curve" svg:x1="-0.605cm" svg:y1="22.246cm" svg:x2="-0.649cm" svg:y2="23.973cm" draw:end-shape="id376" draw:end-glue-point="0" svg:d="M-605 22246c0 919-44 56-44 1727" svg:viewBox="0 0 45 1728">
            <text:p/>
          </draw:connector>
          <draw:rect draw:style-name="gr3" draw:text-style-name="P4" xml:id="id380" draw:id="id380" draw:layer="layout" svg:width="2.015cm" svg:height="0.775cm" svg:x="-4.772cm" svg:y="28.979cm">
            <text:p text:style-name="P5"><text:span text:style-name="T2">Mental</text:span><text:span text:style-name="T2"><text:line-break/></text:span><text:span text:style-name="T2">state change</text:span></text:p>
          </draw:rect>
          <draw:connector draw:style-name="gr465" draw:text-style-name="P15" draw:layer="layout" draw:type="curve" svg:x1="-3.361cm" svg:y1="27.206cm" svg:x2="-3.764cm" svg:y2="28.979cm" draw:start-shape="id377" draw:start-glue-point="2" draw:end-shape="id380" svg:d="M-3361 27206c0 1330-403 444-403 1773" svg:viewBox="0 0 404 1774">
            <text:p/>
          </draw:connector>
          <draw:rect draw:style-name="gr3" draw:text-style-name="P4" xml:id="id381" draw:id="id381"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66" draw:text-style-name="P15" draw:layer="layout" draw:type="curve" svg:x1="-3.764cm" svg:y1="29.754cm" svg:x2="-4.884cm" svg:y2="31.683cm" draw:start-shape="id380" draw:start-glue-point="2" draw:end-shape="id381" draw:end-glue-point="0" svg:d="M-3764 29754c0 1449-1120 485-1120 1929" svg:viewBox="0 0 1121 1930">
            <text:p/>
          </draw:connector>
          <draw:path draw:style-name="gr467" draw:text-style-name="P124"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68"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90" draw:id="id390" draw:layer="layout" svg:width="2.501cm" svg:height="1.419cm" svg:x="-35.1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69" draw:text-style-name="P126" xml:id="id383" draw:id="id383" draw:layer="layout" svg:width="0.323cm" svg:height="0.323cm" svg:x="-43.371cm" svg:y="40.411cm">
          <text:p text:style-name="P125"><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0" draw:text-style-name="P7" draw:layer="layout" draw:type="curve" svg:x1="-40.74cm" svg:y1="40.783cm" svg:x2="-43.048cm" svg:y2="40.573cm" draw:start-shape="id382" draw:start-glue-point="3" draw:end-shape="id383" draw:end-glue-point="10" svg:d="M-40740 40783c-1729 0-576-210-2308-210" svg:viewBox="0 0 2309 211">
          <text:p text:style-name="P5"><text:span text:style-name="T4">Action</text:span><text:span text:style-name="T4"><text:line-break/></text:span><text:span text:style-name="T4">potential</text:span></text:p>
        </draw:connector>
        <draw:custom-shape draw:style-name="gr471" draw:text-style-name="P128" xml:id="id385" draw:id="id385" draw:layer="layout" svg:width="0.323cm" svg:height="0.323cm" svg:x="-43.357cm" svg:y="43.572cm">
          <text:p text:style-name="P127"><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2" draw:text-style-name="P7" draw:layer="layout" draw:type="curve" svg:x1="-40.74cm" svg:y1="43.498cm" svg:x2="-43.034cm" svg:y2="43.734cm" draw:start-shape="id384" draw:start-glue-point="3" draw:end-shape="id385" draw:end-glue-point="10" svg:d="M-40740 43498c-1719 0-572 236-2294 236" svg:viewBox="0 0 2295 237">
          <text:p text:style-name="P5"><text:span text:style-name="T4">Action</text:span><text:span text:style-name="T4"><text:line-break/></text:span><text:span text:style-name="T4">potential</text:span></text:p>
        </draw:connector>
        <draw:custom-shape draw:style-name="gr471" draw:text-style-name="P128" xml:id="id387" draw:id="id387" draw:layer="layout" svg:width="0.323cm" svg:height="0.323cm" svg:x="-43.679cm" svg:y="41.978cm">
          <text:p text:style-name="P127"><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3" draw:text-style-name="P7" draw:layer="layout" draw:type="curve" svg:x1="-40.74cm" svg:y1="42.14cm" svg:x2="-43.356cm" svg:y2="42.14cm" draw:start-shape="id386" draw:start-glue-point="3" draw:end-shape="id387" draw:end-glue-point="10" svg:d="M-40740 42140h-2616" svg:viewBox="0 0 2617 1">
          <text:p text:style-name="P5"><text:span text:style-name="T4">Action</text:span><text:span text:style-name="T4"><text:line-break/></text:span><text:span text:style-name="T4">potential</text:span></text:p>
        </draw:connector>
        <draw:custom-shape draw:style-name="gr471" draw:text-style-name="P128" xml:id="id389" draw:id="id389" draw:layer="layout" svg:width="0.323cm" svg:height="0.323cm" svg:x="-43.61cm" svg:y="44.873cm">
          <text:p text:style-name="P127"><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1" draw:layer="layout" svg:width="0.393cm" svg:height="5.131cm" draw:transform="rotate (-3.14159265358979) translate (-43.708cm 45.28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5" draw:text-style-name="P129" draw:layer="layout" svg:width="2.549cm" svg:height="1.199cm" svg:x="-46.424cm" svg:y="42.213cm">
          <draw:text-box>
            <text:p text:style-name="P5">Sensors<text:line-break/>(receptors)</text:p>
          </draw:text-box>
        </draw:frame>
        <draw:connector draw:style-name="gr476" draw:text-style-name="P7" draw:layer="layout" draw:type="curve" svg:x1="-40.74cm" svg:y1="44.855cm" svg:x2="-43.287cm" svg:y2="45.035cm" draw:start-shape="id388" draw:start-glue-point="3" draw:end-shape="id389" draw:end-glue-point="10" svg:d="M-40740 44855c-1909 0-636 180-2547 180" svg:viewBox="0 0 2548 181">
          <text:p text:style-name="P5"><text:span text:style-name="T4">Action</text:span><text:span text:style-name="T4"><text:line-break/></text:span><text:span text:style-name="T4">potential</text:span></text:p>
        </draw:connector>
        <draw:custom-shape draw:style-name="gr477" draw:text-style-name="P130"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78" draw:text-style-name="P19" xml:id="id409" draw:id="id409" draw:layer="layout" svg:width="2.574cm" svg:height="1.396cm" svg:x="-25.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93" draw:id="id393" draw:layer="layout" svg:width="2.141cm" svg:height="1.419cm" svg:x="-31.1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82" draw:id="id382"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79" draw:text-style-name="P7" draw:layer="layout" draw:type="curve" svg:x1="-35.122cm" svg:y1="42.815cm" svg:x2="-39.475cm" svg:y2="40.783cm" draw:start-shape="id390" draw:start-glue-point="3" draw:end-shape="id382" draw:end-glue-point="1" svg:d="M-35122 42815c-3264 0-1088-2032-4353-2032" svg:viewBox="0 0 4354 2033">
          <text:p/>
        </draw:connector>
        <draw:rect draw:style-name="gr41" draw:text-style-name="P19" xml:id="id386" draw:id="id386"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4" draw:id="id384"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8" draw:id="id388"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80" draw:text-style-name="P7" draw:layer="layout" draw:type="curve" svg:x1="-35.122cm" svg:y1="42.815cm" svg:x2="-39.475cm" svg:y2="42.14cm" draw:start-shape="id390" draw:start-glue-point="3" draw:end-shape="id386" draw:end-glue-point="1" svg:d="M-35122 42815c-3264 0-1088-675-4353-675" svg:viewBox="0 0 4354 676">
          <text:p/>
        </draw:connector>
        <draw:connector draw:style-name="gr481" draw:text-style-name="P7" draw:layer="layout" draw:type="curve" svg:x1="-35.122cm" svg:y1="42.815cm" svg:x2="-39.475cm" svg:y2="43.498cm" draw:start-shape="id390" draw:start-glue-point="3" draw:end-shape="id384" draw:end-glue-point="1" svg:d="M-35122 42815c-3264 0-1088 683-4353 683" svg:viewBox="0 0 4354 684">
          <text:p/>
        </draw:connector>
        <draw:connector draw:style-name="gr36" draw:text-style-name="P7" draw:layer="layout" draw:type="curve" svg:x1="-35.122cm" svg:y1="42.815cm" svg:x2="-39.475cm" svg:y2="44.855cm" draw:start-shape="id390" draw:start-glue-point="3" draw:end-shape="id388" draw:end-glue-point="1" svg:d="M-35122 42815c-3264 0-1088 2040-4353 2040" svg:viewBox="0 0 4354 2041">
          <text:p/>
        </draw:connector>
        <draw:custom-shape draw:style-name="gr482" draw:text-style-name="P41" draw:layer="layout" svg:width="0.215cm" svg:height="1.199cm" draw:transform="rotate (-1.5707963267949) translate (-39.551cm 39.834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3" draw:text-style-name="P16" draw:layer="layout" svg:width="1.632cm" svg:height="0.569cm" svg:x="-40.927cm" svg:y="39.205cm">
          <draw:text-box>
            <text:p><text:span text:style-name="T4">Buffering</text:span></text:p>
          </draw:text-box>
        </draw:frame>
        <draw:connector draw:style-name="gr484" draw:text-style-name="P15" draw:layer="layout" draw:type="line" svg:x1="-25.545cm" svg:y1="44.456cm" svg:x2="-20.139cm" svg:y2="44.41cm" svg:d="M-25545 44456l5406-46" svg:viewBox="0 0 5407 47">
          <text:p/>
        </draw:connector>
        <draw:frame draw:style-name="gr485" draw:text-style-name="P131" draw:layer="layout" svg:width="3.263cm" svg:height="1.199cm" svg:x="-25.626cm" svg:y="44.449cm">
          <draw:text-box>
            <text:p><text:span text:style-name="T40">Semantic</text:span></text:p>
          </draw:text-box>
        </draw:frame>
        <draw:custom-shape draw:style-name="gr30" draw:text-style-name="P23" xml:id="id391" draw:id="id391" draw:layer="layout" svg:width="0.217cm" svg:height="0.217cm" svg:x="-42.701cm" svg:y="3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2.701cm" svg:y1="38.941cm" svg:x2="-43.713cm" svg:y2="38.318cm" draw:start-shape="id391" draw:start-glue-point="6" draw:end-shape="id392" draw:end-glue-point="6" svg:d="M-42701 38941c-675 0-1012-207-1012-623" svg:viewBox="0 0 1013 624">
          <text:p/>
        </draw:connector>
        <draw:custom-shape draw:name="comment box 13" draw:style-name="gr486" draw:text-style-name="P20" xml:id="id392" draw:id="id392" draw:layer="layout" svg:width="2.572cm" svg:height="1.356cm" svg:x="-44.999cm" svg:y="36.962cm">
          <text:p text:style-name="P19"><text:span text:style-name="T4">Neural</text:span><text:span text:style-name="T4"><text:line-break/></text:span><text:span text:style-name="T4">ensemble</text:span><text:span text:style-name="T4"><text:line-break/></text:span><text:span text:style-name="T4">(for denoising etc)</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36" draw:text-style-name="P7" draw:layer="layout" draw:type="curve" svg:x1="-31.161cm" svg:y1="42.816cm" svg:x2="-32.621cm" svg:y2="42.815cm" draw:start-shape="id393" draw:start-glue-point="3" draw:end-shape="id390" draw:end-glue-point="1" svg:d="M-31161 42816c-1093 0-364-1-1460-1" svg:viewBox="0 0 1461 2">
          <text:p/>
        </draw:connector>
        <draw:path draw:style-name="gr487" draw:text-style-name="P132" xml:id="id410" draw:id="id410" draw:layer="layout" svg:width="2.434cm" svg:height="7.621cm" svg:x="-27.8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88" draw:text-style-name="P134" draw:layer="layout" svg:width="3.263cm" svg:height="1.361cm" draw:transform="rotate (1.5707963267949) translate (-27.217cm 43.97cm)">
          <draw:text-box>
            <text:p text:style-name="P133"><text:span text:style-name="T17">Perception</text:span><text:span text:style-name="T17"><text:line-break/></text:span><text:span text:style-name="T41">(clustering</text:span><text:span text:style-name="T41"><text:line-break/></text:span><text:span text:style-name="T41">hierarchy)</text:span></text:p>
          </draw:text-box>
        </draw:frame>
        <draw:rect draw:style-name="gr478" draw:text-style-name="P19" xml:id="id407" draw:id="id407" draw:layer="layout" svg:width="2.574cm" svg:height="1.396cm" svg:x="-16.0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89" draw:text-style-name="P15" draw:layer="layout" draw:type="line" svg:x1="-25.479cm" svg:y1="45.726cm" svg:x2="-20.073cm" svg:y2="45.68cm" svg:d="M-25479 45726l5406-46" svg:viewBox="0 0 5407 47">
          <text:p/>
        </draw:connector>
        <draw:frame draw:style-name="gr490" draw:text-style-name="P135" draw:layer="layout" svg:width="4.524cm" svg:height="1.199cm" svg:x="-25.725cm" svg:y="45.85cm">
          <draw:text-box>
            <text:p><text:span text:style-name="T42">encoding/clustering</text:span></text:p>
          </draw:text-box>
        </draw:frame>
        <draw:connector draw:style-name="gr489" draw:text-style-name="P15" draw:layer="layout" draw:type="line" svg:x1="-28.566cm" svg:y1="45.705cm" svg:x2="-33.954cm" svg:y2="45.738cm" svg:d="M-28566 45705l-5388 33" svg:viewBox="0 0 5389 34">
          <text:p/>
        </draw:connector>
        <draw:frame draw:style-name="gr485" draw:text-style-name="P135" draw:layer="layout" svg:width="3.263cm" svg:height="1.199cm" svg:x="-30.627cm" svg:y="45.796cm">
          <draw:text-box>
            <text:p><text:span text:style-name="T42">decoding</text:span></text:p>
          </draw:text-box>
        </draw:frame>
        <draw:connector draw:style-name="gr491" draw:text-style-name="P15" draw:layer="layout" draw:type="line" svg:x1="-33.844cm" svg:y1="44.456cm" svg:x2="-28.438cm" svg:y2="44.41cm" svg:d="M-33844 44456l5406-46" svg:viewBox="0 0 5407 47">
          <text:p/>
        </draw:connector>
        <draw:frame draw:style-name="gr485" draw:text-style-name="P131" draw:layer="layout" svg:width="3.263cm" svg:height="1.199cm" svg:x="-30.925cm" svg:y="44.449cm">
          <draw:text-box>
            <text:p><text:span text:style-name="T40">signal-level</text:span></text:p>
          </draw:text-box>
        </draw:frame>
        <draw:rect draw:style-name="gr478" draw:text-style-name="P19" xml:id="id408" draw:id="id408" draw:layer="layout" svg:width="2.574cm" svg:height="1.396cm" svg:x="-20.271cm" svg:y="42.029cm">
          <text:p text:style-name="P5"><text:span text:style-name="T4">language</text:span></text:p>
        </draw:rect>
        <draw:connector draw:style-name="gr492" draw:text-style-name="P15" draw:layer="layout" draw:type="curve" svg:x1="-23.138cm" svg:y1="11.778cm" svg:x2="-23.153cm" svg:y2="14.393cm" draw:start-shape="id394" draw:start-glue-point="2" draw:end-shape="id395" svg:d="M-23138 11778c0 1962-15 655-15 2615" svg:viewBox="0 0 16 2616">
          <text:p/>
        </draw:connector>
        <draw:custom-shape draw:style-name="gr34" draw:text-style-name="P26" xml:id="id397" draw:id="id39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6" draw:id="id39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96" draw:start-glue-point="6" draw:end-shape="id397" draw:end-glue-point="10" svg:d="M-43898 75064h-1110" svg:viewBox="0 0 1111 1">
          <text:p/>
        </draw:connector>
        <draw:connector draw:style-name="gr36" draw:text-style-name="P7" draw:layer="layout" draw:type="curve" svg:x1="-45.899cm" svg:y1="75.064cm" svg:x2="-47.007cm" svg:y2="75.064cm" draw:start-shape="id397" draw:start-glue-point="6" draw:end-shape="id16" draw:end-glue-point="10" svg:d="M-45899 75064h-1108" svg:viewBox="0 0 1109 1">
          <text:p/>
        </draw:connector>
        <draw:custom-shape draw:style-name="gr34" draw:text-style-name="P26" xml:id="id399" draw:id="id39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8" draw:id="id39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98" draw:start-glue-point="6" draw:end-shape="id399" draw:end-glue-point="10" svg:d="M-36898 75064h-1110" svg:viewBox="0 0 1111 1">
          <text:p/>
        </draw:connector>
        <draw:custom-shape draw:style-name="gr493" draw:text-style-name="P108" draw:layer="layout" svg:width="16.317cm" svg:height="1.952cm" svg:x="-51.303cm" svg:y="72.113cm">
          <text:p/>
          <draw:enhanced-geometry svg:viewBox="0 0 21600 21600" draw:type="rectangle" draw:enhanced-path="M 0 0 L 21600 0 21600 21600 0 21600 0 0 Z N"/>
        </draw:custom-shape>
        <draw:frame draw:style-name="gr494" draw:text-style-name="P38" draw:layer="layout" svg:width="1.966cm" svg:height="1.433cm" svg:x="-44.749cm" svg:y="72.42cm">
          <draw:text-box>
            <text:p text:style-name="P136"><text:span text:style-name="T12">Dynamic </text:span><text:span text:style-name="T12"><text:line-break/></text:span><text:span text:style-name="T12">Time </text:span><text:span text:style-name="T12"><text:line-break/></text:span><text:span text:style-name="T12">Warping</text:span></text:p>
          </draw:text-box>
        </draw:frame>
        <draw:custom-shape draw:style-name="gr495" draw:text-style-name="P137"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6" draw:text-style-name="P38" draw:layer="layout" svg:width="0.749cm" svg:height="0.725cm" svg:x="-42.98cm" svg:y="72.774cm">
          <draw:text-box>
            <text:p>+</text:p>
          </draw:text-box>
        </draw:frame>
        <draw:frame draw:style-name="gr497" draw:text-style-name="P38" draw:layer="layout" svg:width="1.849cm" svg:height="1.039cm" svg:x="-46.949cm" svg:y="72.617cm">
          <draw:text-box>
            <text:p text:style-name="P136"><text:span text:style-name="T12">Sliding</text:span><text:span text:style-name="T12"><text:line-break/></text:span><text:span text:style-name="T12">windows</text:span></text:p>
          </draw:text-box>
        </draw:frame>
        <draw:frame draw:style-name="gr496" draw:text-style-name="P38" draw:layer="layout" svg:width="0.749cm" svg:height="0.725cm" svg:x="-45.279cm" svg:y="72.774cm">
          <draw:text-box>
            <text:p>+</text:p>
          </draw:text-box>
        </draw:frame>
        <draw:frame draw:style-name="gr498" draw:text-style-name="P11" draw:layer="layout" svg:width="1.684cm" svg:height="0.57cm" svg:x="-42.281cm" svg:y="72.851cm">
          <draw:text-box>
            <text:p><text:span text:style-name="T4">DBSCAN</text:span></text:p>
          </draw:text-box>
        </draw:frame>
        <draw:custom-shape draw:style-name="gr499" draw:text-style-name="P138"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5" draw:text-style-name="P137"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0" draw:text-style-name="P20" draw:layer="layout" svg:width="0.526cm" svg:height="0.535cm" svg:x="-45.093cm" svg:y="70.679cm">
            <text:p text:style-name="P19"><text:span text:style-name="T4">P</text:span><text:span text:style-name="T43">i</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25cm" svg:height="0.535cm" svg:x="-44.043cm" svg:y="70.679cm">
            <text:p text:style-name="P19"><text:span text:style-name="T4">P</text:span><text:span text:style-name="T43">j</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20" draw:layer="layout" svg:width="0.53cm" svg:height="0.535cm" svg:x="-43.001cm" svg:y="70.679cm">
            <text:p text:style-name="P19"><text:span text:style-name="T4">P</text:span><text:span text:style-name="T43">k</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26cm" svg:height="0.535cm" svg:x="-41.948cm" svg:y="70.679cm">
            <text:p text:style-name="P19"><text:span text:style-name="T4">P</text:span><text:span text:style-name="T43">l</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2" draw:text-style-name="P15" draw:layer="layout" svg:x1="-44.564cm" svg:y1="70.944cm" svg:x2="-44.059cm" svg:y2="70.962cm">
            <text:p/>
          </draw:line>
          <draw:line draw:style-name="gr502" draw:text-style-name="P15" draw:layer="layout" svg:x1="-43.511cm" svg:y1="70.961cm" svg:x2="-43.013cm" svg:y2="70.956cm">
            <text:p/>
          </draw:line>
          <draw:line draw:style-name="gr502" draw:text-style-name="P15" draw:layer="layout" svg:x1="-42.465cm" svg:y1="70.961cm" svg:x2="-41.948cm" svg:y2="70.956cm">
            <text:p/>
          </draw:line>
        </draw:g>
        <draw:connector draw:style-name="gr503" draw:text-style-name="P7" draw:layer="layout" draw:type="curve" svg:x1="-39.312cm" svg:y1="75.023cm" svg:x2="-42.625cm" svg:y2="75.026cm" svg:d="M-39312 75023c-2484 0-828 3-3313 3" svg:viewBox="0 0 3314 4">
          <text:p/>
        </draw:connector>
        <draw:connector draw:style-name="gr503" draw:text-style-name="P7" draw:layer="layout" draw:type="curve" svg:x1="-45.797cm" svg:y1="70.923cm" svg:x2="-46.878cm" svg:y2="70.927cm" svg:d="M-45797 70923c-810 0-270 4-1081 4" svg:viewBox="0 0 1082 5">
          <text:p/>
        </draw:connector>
        <draw:connector draw:style-name="gr503" draw:text-style-name="P7" draw:layer="layout" draw:type="curve" svg:x1="-39.807cm" svg:y1="70.923cm" svg:x2="-40.888cm" svg:y2="70.927cm" svg:d="M-39807 70923c-810 0-270 4-1081 4" svg:viewBox="0 0 1082 5">
          <text:p/>
        </draw:connector>
        <draw:custom-shape draw:style-name="gr495" draw:text-style-name="P137"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108"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4">th</text:span><text:span text:style-name="T45">and</text:span><text:span text:style-name="T45"><text:line-break/></text:span><text:span text:style-name="T45">2</text:span><text:span text:style-name="T44">nd</text:span></text:p>
          </draw:text-box>
        </draw:frame>
        <draw:custom-shape draw:style-name="gr504" draw:text-style-name="P138"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401" draw:id="id40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0" draw:id="id40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400" draw:start-glue-point="6" draw:end-shape="id401" draw:end-glue-point="10" svg:d="M-47898 79064h-1110" svg:viewBox="0 0 1111 1">
          <text:p/>
        </draw:connector>
        <draw:custom-shape draw:style-name="gr34" draw:text-style-name="P26" xml:id="id403" draw:id="id40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2" draw:id="id40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402" draw:start-glue-point="6" draw:end-shape="id403" draw:end-glue-point="10" svg:d="M-43898 79064h-1110" svg:viewBox="0 0 1111 1">
          <text:p/>
        </draw:connector>
        <draw:connector draw:style-name="gr36" draw:text-style-name="P7" draw:layer="layout" draw:type="curve" svg:x1="-45.899cm" svg:y1="79.064cm" svg:x2="-47.007cm" svg:y2="79.064cm" draw:start-shape="id403" draw:start-glue-point="6" draw:end-shape="id400" draw:end-glue-point="10" svg:d="M-45899 79064h-1108" svg:viewBox="0 0 1109 1">
          <text:p/>
        </draw:connector>
        <draw:custom-shape draw:style-name="gr34" draw:text-style-name="P26" xml:id="id405" draw:id="id40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4" draw:id="id40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404" draw:start-glue-point="6" draw:end-shape="id405" draw:end-glue-point="10" svg:d="M-36898 79064h-1110" svg:viewBox="0 0 1111 1">
          <text:p/>
        </draw:connector>
        <draw:connector draw:style-name="gr503" draw:text-style-name="P7" draw:layer="layout" draw:type="curve" svg:x1="-39.312cm" svg:y1="79.023cm" svg:x2="-42.625cm" svg:y2="79.026cm" svg:d="M-39312 79023c-2484 0-828 3-3313 3" svg:viewBox="0 0 3314 4">
          <text:p/>
        </draw:connector>
        <draw:custom-shape draw:style-name="gr493" draw:text-style-name="P108" draw:layer="layout" svg:width="16.317cm" svg:height="1.952cm" svg:x="-51.301cm" svg:y="79.913cm">
          <text:p/>
          <draw:enhanced-geometry svg:viewBox="0 0 21600 21600" draw:type="rectangle" draw:enhanced-path="M 0 0 L 21600 0 21600 21600 0 21600 0 0 Z N"/>
        </draw:custom-shape>
        <draw:custom-shape draw:style-name="gr505" draw:text-style-name="P138"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6" draw:text-style-name="P141" draw:layer="layout" svg:width="1.818cm" svg:height="1.705cm" svg:x="-44.457cm" svg:y="80.092cm">
          <text:p text:style-name="P140"><text:span text:style-name="T46">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93" draw:text-style-name="P108" draw:layer="layout" svg:width="16.317cm" svg:height="1.952cm" svg:x="-51.302cm" svg:y="72.113cm">
          <text:p/>
          <draw:enhanced-geometry svg:viewBox="0 0 21600 21600" draw:type="rectangle" draw:enhanced-path="M 0 0 L 21600 0 21600 21600 0 21600 0 0 Z N"/>
        </draw:custom-shape>
        <draw:frame draw:style-name="gr494" draw:text-style-name="P38" draw:layer="layout" svg:width="1.966cm" svg:height="1.433cm" svg:x="-44.748cm" svg:y="72.42cm">
          <draw:text-box>
            <text:p text:style-name="P136"><text:span text:style-name="T12">Dynamic </text:span><text:span text:style-name="T12"><text:line-break/></text:span><text:span text:style-name="T12">Time </text:span><text:span text:style-name="T12"><text:line-break/></text:span><text:span text:style-name="T12">Warping</text:span></text:p>
          </draw:text-box>
        </draw:frame>
        <draw:frame draw:style-name="gr496" draw:text-style-name="P38" draw:layer="layout" svg:width="0.749cm" svg:height="0.725cm" svg:x="-42.979cm" svg:y="72.774cm">
          <draw:text-box>
            <text:p>+</text:p>
          </draw:text-box>
        </draw:frame>
        <draw:frame draw:style-name="gr497" draw:text-style-name="P38" draw:layer="layout" svg:width="1.849cm" svg:height="1.039cm" svg:x="-46.948cm" svg:y="72.617cm">
          <draw:text-box>
            <text:p text:style-name="P136"><text:span text:style-name="T12">Sliding</text:span><text:span text:style-name="T12"><text:line-break/></text:span><text:span text:style-name="T12">windows</text:span></text:p>
          </draw:text-box>
        </draw:frame>
        <draw:frame draw:style-name="gr496" draw:text-style-name="P38" draw:layer="layout" svg:width="0.749cm" svg:height="0.725cm" svg:x="-45.278cm" svg:y="72.774cm">
          <draw:text-box>
            <text:p>+</text:p>
          </draw:text-box>
        </draw:frame>
        <draw:frame draw:style-name="gr498" draw:text-style-name="P11" draw:layer="layout" svg:width="1.684cm" svg:height="0.57cm" svg:x="-42.28cm" svg:y="72.851cm">
          <draw:text-box>
            <text:p><text:span text:style-name="T4">DBSCAN</text:span></text:p>
          </draw:text-box>
        </draw:frame>
        <draw:custom-shape draw:style-name="gr504" draw:text-style-name="P138"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08" draw:layer="layout" svg:width="16.317cm" svg:height="1.952cm" svg:x="-51.303cm" svg:y="68.113cm">
          <text:p/>
          <draw:enhanced-geometry svg:viewBox="0 0 21600 21600" draw:type="rectangle" draw:enhanced-path="M 0 0 L 21600 0 21600 21600 0 21600 0 0 Z N"/>
        </draw:custom-shape>
        <draw:frame draw:style-name="gr494" draw:text-style-name="P38" draw:layer="layout" svg:width="1.966cm" svg:height="1.433cm" svg:x="-44.749cm" svg:y="68.42cm">
          <draw:text-box>
            <text:p text:style-name="P136"><text:span text:style-name="T12">Dynamic </text:span><text:span text:style-name="T12"><text:line-break/></text:span><text:span text:style-name="T12">Time </text:span><text:span text:style-name="T12"><text:line-break/></text:span><text:span text:style-name="T12">Warping</text:span></text:p>
          </draw:text-box>
        </draw:frame>
        <draw:frame draw:style-name="gr496" draw:text-style-name="P38" draw:layer="layout" svg:width="0.749cm" svg:height="0.725cm" svg:x="-42.98cm" svg:y="68.774cm">
          <draw:text-box>
            <text:p>+</text:p>
          </draw:text-box>
        </draw:frame>
        <draw:frame draw:style-name="gr497" draw:text-style-name="P38" draw:layer="layout" svg:width="1.849cm" svg:height="1.039cm" svg:x="-46.949cm" svg:y="68.617cm">
          <draw:text-box>
            <text:p text:style-name="P136"><text:span text:style-name="T12">Sliding</text:span><text:span text:style-name="T12"><text:line-break/></text:span><text:span text:style-name="T12">windows</text:span></text:p>
          </draw:text-box>
        </draw:frame>
        <draw:frame draw:style-name="gr496" draw:text-style-name="P38" draw:layer="layout" svg:width="0.749cm" svg:height="0.725cm" svg:x="-45.279cm" svg:y="68.774cm">
          <draw:text-box>
            <text:p>+</text:p>
          </draw:text-box>
        </draw:frame>
        <draw:frame draw:style-name="gr498" draw:text-style-name="P11" draw:layer="layout" svg:width="1.684cm" svg:height="0.57cm" svg:x="-42.281cm" svg:y="68.851cm">
          <draw:text-box>
            <text:p><text:span text:style-name="T4">DBSCAN</text:span></text:p>
          </draw:text-box>
        </draw:frame>
        <draw:custom-shape draw:style-name="gr499" draw:text-style-name="P138"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08" draw:layer="layout" svg:width="16.317cm" svg:height="1.952cm" svg:x="-51.302cm" svg:y="68.113cm">
          <text:p/>
          <draw:enhanced-geometry svg:viewBox="0 0 21600 21600" draw:type="rectangle" draw:enhanced-path="M 0 0 L 21600 0 21600 21600 0 21600 0 0 Z N"/>
        </draw:custom-shape>
        <draw:frame draw:style-name="gr494" draw:text-style-name="P38" draw:layer="layout" svg:width="1.966cm" svg:height="1.433cm" svg:x="-44.748cm" svg:y="68.42cm">
          <draw:text-box>
            <text:p text:style-name="P136"><text:span text:style-name="T12">Dynamic </text:span><text:span text:style-name="T12"><text:line-break/></text:span><text:span text:style-name="T12">Time </text:span><text:span text:style-name="T12"><text:line-break/></text:span><text:span text:style-name="T12">Warping</text:span></text:p>
          </draw:text-box>
        </draw:frame>
        <draw:frame draw:style-name="gr496" draw:text-style-name="P38" draw:layer="layout" svg:width="0.749cm" svg:height="0.725cm" svg:x="-42.979cm" svg:y="68.774cm">
          <draw:text-box>
            <text:p>+</text:p>
          </draw:text-box>
        </draw:frame>
        <draw:frame draw:style-name="gr497" draw:text-style-name="P38" draw:layer="layout" svg:width="1.849cm" svg:height="1.039cm" svg:x="-46.948cm" svg:y="68.617cm">
          <draw:text-box>
            <text:p text:style-name="P136"><text:span text:style-name="T12">Sliding</text:span><text:span text:style-name="T12"><text:line-break/></text:span><text:span text:style-name="T12">windows</text:span></text:p>
          </draw:text-box>
        </draw:frame>
        <draw:frame draw:style-name="gr496" draw:text-style-name="P38" draw:layer="layout" svg:width="0.749cm" svg:height="0.725cm" svg:x="-45.278cm" svg:y="68.774cm">
          <draw:text-box>
            <text:p>+</text:p>
          </draw:text-box>
        </draw:frame>
        <draw:frame draw:style-name="gr498" draw:text-style-name="P11" draw:layer="layout" svg:width="1.684cm" svg:height="0.57cm" svg:x="-42.28cm" svg:y="68.851cm">
          <draw:text-box>
            <text:p><text:span text:style-name="T4">DBSCAN</text:span></text:p>
          </draw:text-box>
        </draw:frame>
        <draw:custom-shape draw:style-name="gr504" draw:text-style-name="P138"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95" draw:text-style-name="P137"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137"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0" draw:text-style-name="P20" draw:layer="layout" svg:width="0.571cm" svg:height="0.535cm" svg:x="-45.138cm" svg:y="66.68cm">
            <text:p text:style-name="P19"><text:span text:style-name="T4">W</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75cm" svg:height="0.535cm" svg:x="-44.093cm" svg:y="66.68cm">
            <text:p text:style-name="P19"><text:span text:style-name="T4">W</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20" draw:layer="layout" svg:width="0.643cm" svg:height="0.535cm" svg:x="-43.114cm" svg:y="66.68cm">
            <text:p text:style-name="P19"><text:span text:style-name="T4">W</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68cm" svg:height="0.535cm" svg:x="-41.99cm" svg:y="66.68cm">
            <text:p text:style-name="P19"><text:span text:style-name="T4">W</text:span><text:span text:style-name="T43">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2" draw:text-style-name="P15" draw:layer="layout" svg:x1="-44.583cm" svg:y1="66.948cm" svg:x2="-44.133cm" svg:y2="66.938cm">
            <text:p/>
          </draw:line>
          <draw:line draw:style-name="gr502" draw:text-style-name="P15" draw:layer="layout" svg:x1="-43.511cm" svg:y1="66.962cm" svg:x2="-43.088cm" svg:y2="66.951cm">
            <text:p/>
          </draw:line>
          <draw:line draw:style-name="gr502" draw:text-style-name="P15" draw:layer="layout" svg:x1="-42.465cm" svg:y1="66.962cm" svg:x2="-41.95cm" svg:y2="66.965cm">
            <text:p/>
          </draw:line>
        </draw:g>
        <draw:connector draw:style-name="gr503" draw:text-style-name="P7" draw:layer="layout" draw:type="curve" svg:x1="-45.797cm" svg:y1="66.924cm" svg:x2="-46.878cm" svg:y2="66.928cm" svg:d="M-45797 66924c-810 0-270 4-1081 4" svg:viewBox="0 0 1082 5">
          <text:p/>
        </draw:connector>
        <draw:connector draw:style-name="gr503" draw:text-style-name="P7" draw:layer="layout" draw:type="curve" svg:x1="-39.807cm" svg:y1="66.924cm" svg:x2="-40.888cm" svg:y2="66.928cm" svg:d="M-39807 66924c-810 0-270 4-1081 4" svg:viewBox="0 0 1082 5">
          <text:p/>
        </draw:connector>
        <draw:custom-shape draw:style-name="gr495" draw:text-style-name="P137"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507" draw:text-style-name="P142" xml:id="id406" draw:id="id406" draw:layer="layout" svg:width="4.151cm" svg:height="2.81cm" svg:x="-18.296cm" svg:y="50.197cm">
          <text:p text:style-name="P119"><text:span text:style-name="T47">Blackboard</text:span><text:span text:style-name="T47"><text:line-break/></text:span><text:span text:style-name="T47">for sharing </text:span><text:span text:style-name="T47"><text:line-break/></text:span><text:span text:style-name="T47">each robots</text:span><text:span text:style-name="T47"><text:line-break/></text:span><text:span text:style-name="T47">recent utterances</text:span><text:span text:style-name="T47"><text:line-break/></text:span><text:span text:style-name="T47">and decoder</text:span></text:p>
        </draw:rect>
        <draw:connector draw:style-name="gr36" draw:text-style-name="P7" draw:layer="layout" draw:type="curve" svg:x1="-14.145cm" svg:y1="51.602cm" svg:x2="-13.444cm" svg:y2="42.727cm" draw:start-shape="id406" draw:start-glue-point="1" draw:end-shape="id407" draw:end-glue-point="1" svg:d="M-14145 51602c1839 0 1488-8875 701-8875" svg:viewBox="0 0 1341 8876">
          <text:p/>
        </draw:connector>
        <draw:connector draw:style-name="gr36" draw:text-style-name="P7" draw:layer="layout" draw:type="curve" svg:x1="-20.271cm" svg:y1="42.727cm" svg:x2="-22.444cm" svg:y2="42.727cm" draw:start-shape="id408" draw:start-glue-point="3" draw:end-shape="id409" draw:end-glue-point="1" svg:d="M-20271 42727h-2173" svg:viewBox="0 0 2174 1">
          <text:p/>
        </draw:connector>
        <draw:connector draw:style-name="gr36" draw:text-style-name="P7" draw:layer="layout" draw:type="curve" svg:x1="-16.018cm" svg:y1="42.727cm" svg:x2="-17.697cm" svg:y2="42.727cm" draw:start-shape="id407" draw:start-glue-point="3" draw:end-shape="id408" draw:end-glue-point="1" svg:d="M-16018 42727h-1679" svg:viewBox="0 0 1680 1">
          <text:p/>
        </draw:connector>
        <draw:connector draw:style-name="gr36" draw:text-style-name="P7" draw:layer="layout" draw:type="curve" svg:x1="-27.822cm" svg:y1="42.794cm" svg:x2="-29.02cm" svg:y2="42.816cm" draw:start-shape="id410" draw:end-shape="id393" draw:end-glue-point="1" svg:d="M-27822 42794c-912 0-313 22-1198 22" svg:viewBox="0 0 1199 23">
          <text:p/>
        </draw:connector>
        <draw:path draw:style-name="gr508" draw:text-style-name="P143" xml:id="id411" draw:id="id411" draw:layer="layout" svg:width="20.74cm" svg:height="6.044cm" svg:x="-41.793cm" svg:y="49.187cm" svg:viewBox="0 0 20741 6045" svg:d="M1758 639c1326-369 1681-360 3425-516 1242-111 2575-107 3881-121 886-10 1741 21 2588 68 752 41 1487 104 2207 175 670 65 1516 171 1630 405 97 197 230 313 863 455 501 113 1018 38 1628 61 643 25 1318 286 1775 415 421 119 711 285 767 459 63 202 197 405 190 608-6 183 185 408-333 567-479 146-450 515-689 698-201 158-183 1160-625 1378-433 678-434 216-1038 300-1092 151-2316 222-3498 310-589 44-1176 97-1773 135-697 45-1311-91-1919-162-625-74-1239-165-1916-203-580-31-1186-33-1774 14-684 53-1383 128-2107 108-577-16-1168 59-1629-149-355-159-909-166-1278-318-462-193-1105-392-1392-616-214-168-372-443-496-618-171-243-68-497-191-743-82-165-17-333-46-499-62-340 267-667 431-999 104-214 116-432 96-648-32-50 1223-564 1223-564z">
          <text:p/>
        </draw:path>
        <draw:frame draw:style-name="gr509" draw:text-style-name="P13" draw:layer="layout" svg:width="3.475cm" svg:height="0.878cm" svg:x="-36.072cm" svg:y="39.061cm">
          <draw:text-box>
            <text:p text:style-name="P3"><text:span text:style-name="T7">Robot 1</text:span></text:p>
          </draw:text-box>
        </draw:frame>
        <draw:connector draw:style-name="gr510" draw:text-style-name="P7" draw:layer="layout" draw:type="curve" svg:x1="-21.051cm" svg:y1="52.209cm" svg:x2="-18.296cm" svg:y2="51.602cm" draw:start-shape="id411" draw:start-glue-point="1" draw:end-shape="id406" draw:end-glue-point="3" svg:d="M-21051 52209c2086 0 709-607 2755-607" svg:viewBox="0 0 2756 608">
          <text:p text:style-name="P5"><text:span text:style-name="T4">Robot 1</text:span><text:span text:style-name="T4"><text:line-break/></text:span><text:span text:style-name="T4">utters</text:span></text:p>
        </draw:connector>
        <draw:frame draw:style-name="gr511" draw:text-style-name="P13" draw:layer="layout" svg:width="3.475cm" svg:height="0.878cm" svg:x="-30.214cm" svg:y="49.736cm">
          <draw:text-box>
            <text:p text:style-name="P3"><text:span text:style-name="T7">Robot 2</text:span></text:p>
          </draw:text-box>
        </draw:frame>
        <draw:g draw:style-name="gr31">
          <draw:custom-shape draw:style-name="gr512" draw:text-style-name="P145" xml:id="id412" draw:id="id412" draw:layer="layout" svg:width="0.891cm" svg:height="0.97cm" svg:x="-56.868cm" svg:y="46.203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14" draw:id="id414" draw:layer="layout" svg:width="0.891cm" svg:height="0.97cm" svg:x="-56.867cm" svg:y="47.503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16" draw:id="id416" draw:layer="layout" svg:width="0.891cm" svg:height="0.97cm" svg:x="-56.866cm" svg:y="48.803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18" draw:id="id418" draw:layer="layout" svg:width="0.891cm" svg:height="0.97cm" svg:x="-56.865cm" svg:y="50.103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46" xml:id="id413" draw:id="id413"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46" xml:id="id415" draw:id="id415"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46" xml:id="id417" draw:id="id417"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55.977cm" svg:y1="46.688cm" svg:x2="-53.964cm" svg:y2="47.988cm" draw:start-shape="id412" draw:start-glue-point="10" draw:end-shape="id413" draw:end-glue-point="6" svg:d="M-55977 46688l2013 1300" svg:viewBox="0 0 2014 1301">
            <text:p/>
          </draw:connector>
          <draw:connector draw:style-name="gr514" draw:text-style-name="P15" draw:layer="layout" draw:type="line" svg:x1="-55.976cm" svg:y1="47.988cm" svg:x2="-53.963cm" svg:y2="49.088cm" draw:start-shape="id414" draw:start-glue-point="10" draw:end-shape="id415" draw:end-glue-point="6" svg:d="M-55976 47988l2013 1100" svg:viewBox="0 0 2014 1101">
            <text:p/>
          </draw:connector>
          <draw:connector draw:style-name="gr514" draw:text-style-name="P15" draw:layer="layout" draw:type="line" svg:x1="-55.975cm" svg:y1="49.288cm" svg:x2="-53.962cm" svg:y2="50.188cm" draw:start-shape="id416" draw:start-glue-point="10" draw:end-shape="id417" draw:end-glue-point="6" svg:d="M-55975 49288l2013 900" svg:viewBox="0 0 2014 901">
            <text:p/>
          </draw:connector>
          <draw:connector draw:style-name="gr514" draw:text-style-name="P15" draw:layer="layout" draw:type="line" svg:x1="-55.974cm" svg:y1="50.588cm" svg:x2="-53.962cm" svg:y2="50.188cm" draw:start-shape="id418" draw:start-glue-point="10" draw:end-shape="id417" draw:end-glue-point="6" svg:d="M-55974 50588l2012-400" svg:viewBox="0 0 2013 401">
            <text:p/>
          </draw:connector>
          <draw:connector draw:style-name="gr514" draw:text-style-name="P15" draw:layer="layout" draw:type="line" svg:x1="-55.974cm" svg:y1="50.588cm" svg:x2="-53.963cm" svg:y2="49.088cm" draw:start-shape="id418" draw:start-glue-point="10" draw:end-shape="id415" draw:end-glue-point="6" svg:d="M-55974 50588l2011-1500" svg:viewBox="0 0 2012 1501">
            <text:p/>
          </draw:connector>
          <draw:connector draw:style-name="gr514" draw:text-style-name="P15" draw:layer="layout" draw:type="line" svg:x1="-55.974cm" svg:y1="50.588cm" svg:x2="-53.964cm" svg:y2="47.988cm" draw:start-shape="id418" draw:start-glue-point="10" draw:end-shape="id413" draw:end-glue-point="6" svg:d="M-55974 50588l2010-2600" svg:viewBox="0 0 2011 2601">
            <text:p/>
          </draw:connector>
          <draw:connector draw:style-name="gr514" draw:text-style-name="P15" draw:layer="layout" draw:type="line" svg:x1="-55.975cm" svg:y1="49.288cm" svg:x2="-53.963cm" svg:y2="49.088cm" draw:start-shape="id416" draw:start-glue-point="10" draw:end-shape="id415" draw:end-glue-point="6" svg:d="M-55975 49288l2012-200" svg:viewBox="0 0 2013 201">
            <text:p/>
          </draw:connector>
          <draw:connector draw:style-name="gr514" draw:text-style-name="P15" draw:layer="layout" draw:type="line" svg:x1="-55.975cm" svg:y1="49.288cm" svg:x2="-53.964cm" svg:y2="47.988cm" draw:start-shape="id416" draw:start-glue-point="10" draw:end-shape="id413" draw:end-glue-point="6" svg:d="M-55975 49288l2011-1300" svg:viewBox="0 0 2012 1301">
            <text:p/>
          </draw:connector>
          <draw:connector draw:style-name="gr514" draw:text-style-name="P15" draw:layer="layout" draw:type="line" svg:x1="-55.976cm" svg:y1="47.988cm" svg:x2="-53.964cm" svg:y2="47.988cm" draw:start-shape="id414" draw:start-glue-point="10" draw:end-shape="id413" draw:end-glue-point="6" svg:d="M-55976 47988h2012" svg:viewBox="0 0 2013 1">
            <text:p/>
          </draw:connector>
          <draw:connector draw:style-name="gr514" draw:text-style-name="P15" draw:layer="layout" draw:type="line" svg:x1="-55.976cm" svg:y1="47.988cm" svg:x2="-53.962cm" svg:y2="50.188cm" draw:start-shape="id414" draw:start-glue-point="10" draw:end-shape="id417" draw:end-glue-point="6" svg:d="M-55976 47988l2014 2200" svg:viewBox="0 0 2015 2201">
            <text:p/>
          </draw:connector>
          <draw:connector draw:style-name="gr514" draw:text-style-name="P15" draw:layer="layout" draw:type="line" svg:x1="-55.977cm" svg:y1="46.688cm" svg:x2="-53.963cm" svg:y2="49.088cm" draw:start-shape="id412" draw:start-glue-point="10" draw:end-shape="id415" draw:end-glue-point="6" svg:d="M-55977 46688l2014 2400" svg:viewBox="0 0 2015 2401">
            <text:p/>
          </draw:connector>
          <draw:connector draw:style-name="gr514" draw:text-style-name="P15" draw:layer="layout" draw:type="line" svg:x1="-55.977cm" svg:y1="46.688cm" svg:x2="-53.962cm" svg:y2="50.188cm" draw:start-shape="id412" draw:start-glue-point="10" draw:end-shape="id417" draw:end-glue-point="6" svg:d="M-55977 46688l2015 3500" svg:viewBox="0 0 2016 3501">
            <text:p/>
          </draw:connector>
          <draw:custom-shape draw:style-name="gr512" draw:text-style-name="P145" xml:id="id419" draw:id="id419" draw:layer="layout" svg:width="0.891cm" svg:height="0.97cm" svg:x="-51.068cm" svg:y="46.203cm">
            <text:p text:style-name="P147"><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20" draw:id="id420" draw:layer="layout" svg:width="0.891cm" svg:height="0.97cm" svg:x="-51.067cm" svg:y="47.503cm">
            <text:p text:style-name="P147"><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21" draw:id="id421" draw:layer="layout" svg:width="0.891cm" svg:height="0.97cm" svg:x="-51.066cm" svg:y="48.803cm">
            <text:p text:style-name="P147"><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22" draw:id="id422" draw:layer="layout" svg:width="0.891cm" svg:height="0.97cm" svg:x="-51.065cm" svg:y="50.103cm">
            <text:p text:style-name="P147"><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53.073cm" svg:y1="47.988cm" svg:x2="-51.068cm" svg:y2="46.688cm" draw:start-shape="id413" draw:start-glue-point="10" draw:end-shape="id419" draw:end-glue-point="6" svg:d="M-53073 47988l2005-1300" svg:viewBox="0 0 2006 1301">
            <text:p/>
          </draw:connector>
          <draw:connector draw:style-name="gr514" draw:text-style-name="P15" draw:layer="layout" draw:type="line" svg:x1="-53.072cm" svg:y1="47.988cm" svg:x2="-51.067cm" svg:y2="47.988cm" draw:end-shape="id420" draw:end-glue-point="6" svg:d="M-53072 47988h2005" svg:viewBox="0 0 2006 1">
            <text:p/>
          </draw:connector>
          <draw:connector draw:style-name="gr514" draw:text-style-name="P15" draw:layer="layout" draw:type="line" svg:x1="-53.071cm" svg:y1="47.988cm" svg:x2="-51.066cm" svg:y2="49.288cm" draw:end-shape="id421" draw:end-glue-point="6" svg:d="M-53071 47988l2005 1300" svg:viewBox="0 0 2006 1301">
            <text:p/>
          </draw:connector>
          <draw:connector draw:style-name="gr514" draw:text-style-name="P15" xml:id="id442" draw:id="id442" draw:layer="layout" draw:type="line" svg:x1="-53.07cm" svg:y1="47.988cm" svg:x2="-51.065cm" svg:y2="50.588cm" draw:end-shape="id422" draw:end-glue-point="6" svg:d="M-53070 47988l2005 2600" svg:viewBox="0 0 2006 2601">
            <text:p/>
          </draw:connector>
          <draw:connector draw:style-name="gr514" draw:text-style-name="P15" draw:layer="layout" draw:type="line" svg:x1="-53.072cm" svg:y1="49.088cm" svg:x2="-51.068cm" svg:y2="46.688cm" draw:start-shape="id415" draw:start-glue-point="10" draw:end-shape="id419" draw:end-glue-point="6" svg:d="M-53072 49088l2004-2400" svg:viewBox="0 0 2005 2401">
            <text:p/>
          </draw:connector>
          <draw:connector draw:style-name="gr514" draw:text-style-name="P15" draw:layer="layout" draw:type="line" svg:x1="-53.071cm" svg:y1="49.088cm" svg:x2="-51.067cm" svg:y2="47.988cm" draw:end-shape="id420" draw:end-glue-point="6" svg:d="M-53071 49088l2004-1100" svg:viewBox="0 0 2005 1101">
            <text:p/>
          </draw:connector>
          <draw:connector draw:style-name="gr514" draw:text-style-name="P15" draw:layer="layout" draw:type="line" svg:x1="-53.071cm" svg:y1="49.088cm" svg:x2="-51.066cm" svg:y2="49.288cm" draw:end-shape="id421" draw:end-glue-point="6" svg:d="M-53071 49088l2005 200" svg:viewBox="0 0 2006 201">
            <text:p/>
          </draw:connector>
          <draw:connector draw:style-name="gr514" draw:text-style-name="P15" xml:id="id441" draw:id="id441" draw:layer="layout" draw:type="line" svg:x1="-53.07cm" svg:y1="49.088cm" svg:x2="-51.065cm" svg:y2="50.588cm" draw:end-shape="id422" draw:end-glue-point="6" svg:d="M-53070 49088l2005 1500" svg:viewBox="0 0 2006 1501">
            <text:p/>
          </draw:connector>
          <draw:connector draw:style-name="gr514" draw:text-style-name="P15" draw:layer="layout" draw:type="line" svg:x1="-53.071cm" svg:y1="50.188cm" svg:x2="-51.065cm" svg:y2="50.588cm" draw:start-shape="id417" draw:start-glue-point="10" draw:end-shape="id422" draw:end-glue-point="6" svg:d="M-53071 50188l2006 400" svg:viewBox="0 0 2007 401">
            <text:p/>
          </draw:connector>
          <draw:connector draw:style-name="gr514" draw:text-style-name="P15" draw:layer="layout" draw:type="line" svg:x1="-53.07cm" svg:y1="50.188cm" svg:x2="-51.066cm" svg:y2="49.288cm" draw:end-shape="id421" draw:end-glue-point="6" svg:d="M-53070 50188l2004-900" svg:viewBox="0 0 2005 901">
            <text:p/>
          </draw:connector>
          <draw:connector draw:style-name="gr514" draw:text-style-name="P15" draw:layer="layout" draw:type="line" svg:x1="-53.07cm" svg:y1="50.188cm" svg:x2="-51.067cm" svg:y2="47.988cm" draw:end-shape="id420" draw:end-glue-point="6" svg:d="M-53070 50188l2003-2200" svg:viewBox="0 0 2004 2201">
            <text:p/>
          </draw:connector>
          <draw:connector draw:style-name="gr514" draw:text-style-name="P15" draw:layer="layout" draw:type="line" svg:x1="-53.069cm" svg:y1="50.188cm" svg:x2="-51.068cm" svg:y2="46.688cm" draw:end-shape="id419" draw:end-glue-point="6" svg:d="M-53069 50188l2001-3500" svg:viewBox="0 0 2002 3501">
            <text:p/>
          </draw:connector>
          <draw:frame draw:style-name="gr515" draw:text-style-name="P38" draw:layer="layout" svg:width="2.903cm" svg:height="0.725cm" svg:x="-55.131cm" svg:y="55.801cm">
            <draw:text-box>
              <text:p>Autoencoder</text:p>
            </draw:text-box>
          </draw:frame>
          <draw:line draw:style-name="gr516" draw:text-style-name="P15" draw:layer="layout" svg:x1="-53.817cm" svg:y1="55.405cm" svg:x2="-56.935cm" svg:y2="55.396cm">
            <text:p/>
          </draw:line>
          <draw:line draw:style-name="gr517" draw:text-style-name="P15" draw:layer="layout" svg:x1="-53.417cm" svg:y1="55.406cm" svg:x2="-50.377cm" svg:y2="55.352cm">
            <text:p/>
          </draw:line>
          <draw:frame draw:style-name="gr518" draw:text-style-name="P38" draw:layer="layout" svg:width="2.22cm" svg:height="0.725cm" svg:x="-53.071cm" svg:y="54.787cm">
            <draw:text-box>
              <text:p>decoding</text:p>
            </draw:text-box>
          </draw:frame>
          <draw:frame draw:style-name="gr518" draw:text-style-name="P38" draw:layer="layout" svg:width="2.22cm" svg:height="0.725cm" svg:x="-56.152cm" svg:y="54.77cm">
            <draw:text-box>
              <text:p>encoding</text:p>
            </draw:text-box>
          </draw:frame>
          <draw:polygon draw:style-name="gr519" draw:text-style-name="P148" draw:layer="layout" svg:width="1.215cm" svg:height="1.383cm" svg:x="-55.977cm" svg:y="56.878cm" svg:viewBox="0 0 1216 1384" draw:points="1216,1384 0,792 0,591 1216,0">
            <text:p/>
          </draw:polygon>
          <draw:frame draw:style-name="gr520" draw:text-style-name="P149" draw:layer="layout" svg:width="1.527cm" svg:height="0.569cm" svg:x="-56.078cm" svg:y="57.276cm">
            <draw:text-box>
              <text:p><text:span text:style-name="T50">decoder</text:span></text:p>
            </draw:text-box>
          </draw:frame>
          <draw:g draw:style-name="gr31">
            <draw:g draw:style-name="gr23">
              <draw:polygon draw:style-name="gr521" draw:text-style-name="P115" draw:layer="layout" svg:width="1.179cm" svg:height="1.358cm" svg:x="-52.824cm" svg:y="56.987cm" svg:viewBox="0 0 1180 1359" draw:points="0,0 1180,581 1180,777 0,1359">
                <text:p/>
              </draw:polygon>
            </draw:g>
            <draw:frame draw:style-name="gr498" draw:text-style-name="P11" draw:layer="layout" svg:width="1.527cm" svg:height="0.57cm" svg:x="-53.055cm" svg:y="57.35cm">
              <draw:text-box>
                <text:p><text:span text:style-name="T50">encoder</text:span></text:p>
              </draw:text-box>
            </draw:frame>
          </draw:g>
          <draw:custom-shape draw:style-name="gr512" draw:text-style-name="P145" xml:id="id423" draw:id="id423" draw:layer="layout" svg:width="0.891cm" svg:height="0.97cm" svg:x="-66.045cm" svg:y="53.631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25" draw:id="id425" draw:layer="layout" svg:width="0.891cm" svg:height="0.97cm" svg:x="-66.045cm" svg:y="54.931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27" draw:id="id427" draw:layer="layout" svg:width="0.891cm" svg:height="0.97cm" svg:x="-66.045cm" svg:y="56.231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29" draw:id="id429" draw:layer="layout" svg:width="0.891cm" svg:height="0.97cm" svg:x="-66.045cm" svg:y="57.531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46" xml:id="id424" draw:id="id424" draw:layer="layout" svg:width="0.891cm" svg:height="0.97cm" svg:x="-63.141cm" svg:y="53.831cm">
            <text:p text:style-name="P150"><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46" xml:id="id426" draw:id="id426" draw:layer="layout" svg:width="0.891cm" svg:height="0.97cm" svg:x="-63.141cm" svg:y="54.931cm">
            <text:p text:style-name="P150"><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46" xml:id="id428" draw:id="id428" draw:layer="layout" svg:width="0.891cm" svg:height="0.97cm" svg:x="-63.141cm" svg:y="56.031cm">
            <text:p text:style-name="P150"><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65.154cm" svg:y1="54.116cm" svg:x2="-63.141cm" svg:y2="54.316cm" draw:start-shape="id423" draw:start-glue-point="10" draw:end-shape="id424" draw:end-glue-point="6" svg:d="M-65154 54116l2013 200" svg:viewBox="0 0 2014 201">
            <text:p/>
          </draw:connector>
          <draw:connector draw:style-name="gr514" draw:text-style-name="P15" draw:layer="layout" draw:type="line" svg:x1="-65.154cm" svg:y1="55.416cm" svg:x2="-63.141cm" svg:y2="55.416cm" draw:start-shape="id425" draw:start-glue-point="10" draw:end-shape="id426" draw:end-glue-point="6" svg:d="M-65154 55416h2013" svg:viewBox="0 0 2014 1">
            <text:p/>
          </draw:connector>
          <draw:connector draw:style-name="gr514" draw:text-style-name="P15" draw:layer="layout" draw:type="line" svg:x1="-65.154cm" svg:y1="56.716cm" svg:x2="-63.141cm" svg:y2="56.516cm" draw:start-shape="id427" draw:start-glue-point="10" draw:end-shape="id428" draw:end-glue-point="6" svg:d="M-65154 56716l2013-200" svg:viewBox="0 0 2014 201">
            <text:p/>
          </draw:connector>
          <draw:connector draw:style-name="gr514" draw:text-style-name="P15" draw:layer="layout" draw:type="line" svg:x1="-65.154cm" svg:y1="58.016cm" svg:x2="-63.141cm" svg:y2="56.516cm" draw:start-shape="id429" draw:start-glue-point="10" draw:end-shape="id428" draw:end-glue-point="6" svg:d="M-65154 58016l2013-1500" svg:viewBox="0 0 2014 1501">
            <text:p/>
          </draw:connector>
          <draw:connector draw:style-name="gr514" draw:text-style-name="P15" draw:layer="layout" draw:type="line" svg:x1="-65.154cm" svg:y1="58.016cm" svg:x2="-63.141cm" svg:y2="55.416cm" draw:start-shape="id429" draw:start-glue-point="10" draw:end-shape="id426" draw:end-glue-point="6" svg:d="M-65154 58016l2013-2600" svg:viewBox="0 0 2014 2601">
            <text:p/>
          </draw:connector>
          <draw:connector draw:style-name="gr514" draw:text-style-name="P15" draw:layer="layout" draw:type="line" svg:x1="-65.154cm" svg:y1="58.016cm" svg:x2="-63.141cm" svg:y2="54.316cm" draw:start-shape="id429" draw:start-glue-point="10" draw:end-shape="id424" draw:end-glue-point="6" svg:d="M-65154 58016l2013-3700" svg:viewBox="0 0 2014 3701">
            <text:p/>
          </draw:connector>
          <draw:connector draw:style-name="gr514" draw:text-style-name="P15" draw:layer="layout" draw:type="line" svg:x1="-65.154cm" svg:y1="56.716cm" svg:x2="-63.141cm" svg:y2="55.416cm" draw:start-shape="id427" draw:start-glue-point="10" draw:end-shape="id426" draw:end-glue-point="6" svg:d="M-65154 56716l2013-1300" svg:viewBox="0 0 2014 1301">
            <text:p/>
          </draw:connector>
          <draw:connector draw:style-name="gr514" draw:text-style-name="P15" draw:layer="layout" draw:type="line" svg:x1="-65.154cm" svg:y1="56.716cm" svg:x2="-63.141cm" svg:y2="54.316cm" draw:start-shape="id427" draw:start-glue-point="10" draw:end-shape="id424" draw:end-glue-point="6" svg:d="M-65154 56716l2013-2400" svg:viewBox="0 0 2014 2401">
            <text:p/>
          </draw:connector>
          <draw:connector draw:style-name="gr514" draw:text-style-name="P15" draw:layer="layout" draw:type="line" svg:x1="-65.154cm" svg:y1="55.416cm" svg:x2="-63.141cm" svg:y2="54.316cm" draw:start-shape="id425" draw:start-glue-point="10" draw:end-shape="id424" draw:end-glue-point="6" svg:d="M-65154 55416l2013-1100" svg:viewBox="0 0 2014 1101">
            <text:p/>
          </draw:connector>
          <draw:connector draw:style-name="gr514" draw:text-style-name="P15" draw:layer="layout" draw:type="line" svg:x1="-65.154cm" svg:y1="55.416cm" svg:x2="-63.141cm" svg:y2="56.516cm" draw:start-shape="id425" draw:start-glue-point="10" draw:end-shape="id428" draw:end-glue-point="6" svg:d="M-65154 55416l2013 1100" svg:viewBox="0 0 2014 1101">
            <text:p/>
          </draw:connector>
          <draw:connector draw:style-name="gr514" draw:text-style-name="P15" draw:layer="layout" draw:type="line" svg:x1="-65.154cm" svg:y1="54.116cm" svg:x2="-63.141cm" svg:y2="55.416cm" draw:start-shape="id423" draw:start-glue-point="10" draw:end-shape="id426" draw:end-glue-point="6" svg:d="M-65154 54116l2013 1300" svg:viewBox="0 0 2014 1301">
            <text:p/>
          </draw:connector>
          <draw:connector draw:style-name="gr514" draw:text-style-name="P15" draw:layer="layout" draw:type="line" svg:x1="-65.154cm" svg:y1="54.116cm" svg:x2="-63.141cm" svg:y2="56.516cm" draw:start-shape="id423" draw:start-glue-point="10" draw:end-shape="id428" draw:end-glue-point="6" svg:d="M-65154 54116l2013 2400" svg:viewBox="0 0 2014 2401">
            <text:p/>
          </draw:connector>
          <draw:custom-shape draw:style-name="gr522" draw:text-style-name="P152" xml:id="id430" draw:id="id430" draw:layer="layout" svg:width="0.891cm" svg:height="0.97cm" svg:x="-60.242cm" svg:y="53.631cm">
            <text:p text:style-name="P151"><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2" xml:id="id431" draw:id="id431" draw:layer="layout" svg:width="0.891cm" svg:height="0.97cm" svg:x="-60.242cm" svg:y="54.931cm">
            <text:p text:style-name="P151"><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2" xml:id="id432" draw:id="id432" draw:layer="layout" svg:width="0.891cm" svg:height="0.97cm" svg:x="-60.242cm" svg:y="56.231cm">
            <text:p text:style-name="P151"><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2" xml:id="id433" draw:id="id433" draw:layer="layout" svg:width="0.891cm" svg:height="0.97cm" svg:x="-60.242cm" svg:y="57.531cm">
            <text:p text:style-name="P151"><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62.25cm" svg:y1="54.316cm" svg:x2="-60.242cm" svg:y2="54.116cm" draw:start-shape="id424" draw:start-glue-point="10" draw:end-shape="id430" draw:end-glue-point="6" svg:d="M-62250 54316l2008-200" svg:viewBox="0 0 2009 201">
            <text:p/>
          </draw:connector>
          <draw:connector draw:style-name="gr514" draw:text-style-name="P15" draw:layer="layout" draw:type="line" svg:x1="-62.25cm" svg:y1="54.316cm" svg:x2="-60.242cm" svg:y2="55.416cm" draw:start-shape="id424" draw:start-glue-point="10" draw:end-shape="id431" draw:end-glue-point="6" svg:d="M-62250 54316l2008 1100" svg:viewBox="0 0 2009 1101">
            <text:p/>
          </draw:connector>
          <draw:connector draw:style-name="gr514" draw:text-style-name="P15" draw:layer="layout" draw:type="line" svg:x1="-62.25cm" svg:y1="54.316cm" svg:x2="-60.242cm" svg:y2="56.716cm" draw:start-shape="id424" draw:start-glue-point="10" draw:end-shape="id432" draw:end-glue-point="6" svg:d="M-62250 54316l2008 2400" svg:viewBox="0 0 2009 2401">
            <text:p/>
          </draw:connector>
          <draw:connector draw:style-name="gr514" draw:text-style-name="P15" draw:layer="layout" draw:type="line" svg:x1="-62.25cm" svg:y1="54.316cm" svg:x2="-60.242cm" svg:y2="58.016cm" draw:start-shape="id424" draw:start-glue-point="10" draw:end-shape="id433" draw:end-glue-point="6" svg:d="M-62250 54316l2008 3700" svg:viewBox="0 0 2009 3701">
            <text:p/>
          </draw:connector>
          <draw:connector draw:style-name="gr514" draw:text-style-name="P15" xml:id="id434" draw:id="id434" draw:layer="layout" draw:type="line" svg:x1="-62.25cm" svg:y1="55.416cm" svg:x2="-60.244cm" svg:y2="54.116cm" draw:start-shape="id426" draw:start-glue-point="10" svg:d="M-62250 55416l2006-1300" svg:viewBox="0 0 2007 1301">
            <text:p/>
          </draw:connector>
          <draw:connector draw:style-name="gr514" draw:text-style-name="P15" draw:layer="layout" draw:type="line" svg:x1="-62.25cm" svg:y1="55.416cm" svg:x2="-60.242cm" svg:y2="55.416cm" draw:start-shape="id426" draw:start-glue-point="10" draw:end-shape="id431" draw:end-glue-point="6" svg:d="M-62250 55416h2008" svg:viewBox="0 0 2009 1">
            <text:p/>
          </draw:connector>
          <draw:connector draw:style-name="gr514" draw:text-style-name="P15" draw:layer="layout" draw:type="line" svg:x1="-62.25cm" svg:y1="55.416cm" svg:x2="-60.242cm" svg:y2="56.716cm" draw:start-shape="id426" draw:start-glue-point="10" draw:end-shape="id432" draw:end-glue-point="6" svg:d="M-62250 55416l2008 1300" svg:viewBox="0 0 2009 1301">
            <text:p/>
          </draw:connector>
          <draw:connector draw:style-name="gr514" draw:text-style-name="P15" draw:layer="layout" draw:type="line" svg:x1="-62.25cm" svg:y1="55.416cm" svg:x2="-60.242cm" svg:y2="58.016cm" draw:start-shape="id426" draw:start-glue-point="10" draw:end-shape="id433" draw:end-glue-point="6" svg:d="M-62250 55416l2008 2600" svg:viewBox="0 0 2009 2601">
            <text:p/>
          </draw:connector>
          <draw:connector draw:style-name="gr514" draw:text-style-name="P15" xml:id="id436" draw:id="id436" draw:layer="layout" draw:type="line" svg:x1="-62.25cm" svg:y1="56.516cm" svg:x2="-60.241cm" svg:y2="58.016cm" draw:start-shape="id428" draw:start-glue-point="10" svg:d="M-62250 56516l2009 1500" svg:viewBox="0 0 2010 1501">
            <text:p/>
          </draw:connector>
          <draw:connector draw:style-name="gr514" draw:text-style-name="P15" draw:layer="layout" draw:type="line" svg:x1="-62.25cm" svg:y1="56.516cm" svg:x2="-60.242cm" svg:y2="56.716cm" draw:start-shape="id428" draw:start-glue-point="10" draw:end-shape="id432" draw:end-glue-point="6" svg:d="M-62250 56516l2008 200" svg:viewBox="0 0 2009 201">
            <text:p/>
          </draw:connector>
          <draw:connector draw:style-name="gr514" draw:text-style-name="P15" draw:layer="layout" draw:type="line" svg:x1="-62.25cm" svg:y1="56.516cm" svg:x2="-60.242cm" svg:y2="55.416cm" draw:start-shape="id428" draw:start-glue-point="10" draw:end-shape="id431" draw:end-glue-point="6" svg:d="M-62250 56516l2008-1100" svg:viewBox="0 0 2009 1101">
            <text:p/>
          </draw:connector>
          <draw:connector draw:style-name="gr514" draw:text-style-name="P15" draw:layer="layout" draw:type="line" svg:x1="-62.25cm" svg:y1="56.516cm" svg:x2="-60.244cm" svg:y2="54.116cm" draw:start-shape="id428" draw:start-glue-point="10" draw:end-shape="id434" draw:end-glue-point="3" svg:d="M-62250 56516l2006-2400" svg:viewBox="0 0 2007 2401">
            <text:p/>
          </draw:connector>
          <draw:g draw:style-name="gr23">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135" draw:text-style-name="P41" draw:layer="layout" svg:width="9.073cm" svg:height="1.083cm" svg:x="-66.994cm" svg:y="46.481cm">
              <draw:image xlink:href="Pictures/1000000000000157000000297E1E39E4.png" xlink:type="simple" xlink:show="embed" xlink:actuate="onLoad" draw:mime-type="image/png">
                <text:p/>
              </draw:image>
            </draw:frame>
            <draw:frame draw:style-name="gr526"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g>
          <draw:custom-shape draw:style-name="gr513" draw:text-style-name="P153" xml:id="id435" draw:id="id435" draw:layer="layout" svg:width="0.891cm" svg:height="0.97cm" svg:x="-63.141cm" svg:y="57.231cm">
            <text:p text:style-name="P150"><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xml:id="id438" draw:id="id438" draw:layer="layout" draw:type="line" svg:x1="-62.25cm" svg:y1="57.716cm" svg:x2="-60.244cm" svg:y2="54.116cm" draw:start-shape="id435" draw:start-glue-point="10" svg:d="M-62250 57716l2006-3600" svg:viewBox="0 0 2007 3601">
            <text:p/>
          </draw:connector>
          <draw:connector draw:style-name="gr514" draw:text-style-name="P15" draw:layer="layout" draw:type="line" svg:x1="-62.25cm" svg:y1="57.716cm" svg:x2="-60.241cm" svg:y2="58.016cm" draw:start-shape="id435" draw:start-glue-point="10" draw:end-shape="id436" draw:end-glue-point="3" svg:d="M-62250 57716l2009 300" svg:viewBox="0 0 2010 301">
            <text:p/>
          </draw:connector>
          <draw:connector draw:style-name="gr514" draw:text-style-name="P15" draw:layer="layout" draw:type="line" svg:x1="-62.25cm" svg:y1="57.716cm" svg:x2="-60.242cm" svg:y2="56.716cm" draw:start-shape="id435" draw:start-glue-point="10" draw:end-shape="id432" draw:end-glue-point="6" svg:d="M-62250 57716l2008-1000" svg:viewBox="0 0 2009 1001">
            <text:p/>
          </draw:connector>
          <draw:connector draw:style-name="gr514" draw:text-style-name="P15" draw:layer="layout" draw:type="line" svg:x1="-62.25cm" svg:y1="57.716cm" svg:x2="-60.242cm" svg:y2="55.416cm" draw:start-shape="id435" draw:start-glue-point="10" draw:end-shape="id431" draw:end-glue-point="6" svg:d="M-62250 57716l2008-2300" svg:viewBox="0 0 2009 2301">
            <text:p/>
          </draw:connector>
          <draw:connector draw:style-name="gr514" draw:text-style-name="P15" draw:layer="layout" draw:type="line" svg:x1="-65.151cm" svg:y1="58.016cm" svg:x2="-63.141cm" svg:y2="57.716cm" draw:end-shape="id435" draw:end-glue-point="6" svg:d="M-65151 58016l2010-300" svg:viewBox="0 0 2011 301">
            <text:p/>
          </draw:connector>
          <draw:connector draw:style-name="gr514" draw:text-style-name="P15" draw:layer="layout" draw:type="line" svg:x1="-65.154cm" svg:y1="56.716cm" svg:x2="-63.141cm" svg:y2="57.716cm" draw:start-shape="id427" draw:start-glue-point="10" draw:end-shape="id435" draw:end-glue-point="6" svg:d="M-65154 56716l2013 1000" svg:viewBox="0 0 2014 1001">
            <text:p/>
          </draw:connector>
          <draw:connector draw:style-name="gr514" draw:text-style-name="P15" draw:layer="layout" draw:type="line" svg:x1="-65.154cm" svg:y1="55.416cm" svg:x2="-63.141cm" svg:y2="57.716cm" draw:start-shape="id425" draw:start-glue-point="10" draw:end-shape="id435" draw:end-glue-point="6" svg:d="M-65154 55416l2013 2300" svg:viewBox="0 0 2014 2301">
            <text:p/>
          </draw:connector>
          <draw:connector draw:style-name="gr514" draw:text-style-name="P15" draw:layer="layout" draw:type="line" svg:x1="-65.154cm" svg:y1="54.116cm" svg:x2="-63.141cm" svg:y2="57.716cm" draw:start-shape="id423" draw:start-glue-point="10" draw:end-shape="id435" draw:end-glue-point="6" svg:d="M-65154 54116l2013 3600" svg:viewBox="0 0 2014 3601">
            <text:p/>
          </draw:connector>
          <draw:custom-shape draw:style-name="gr513" draw:text-style-name="P153" xml:id="id437" draw:id="id437" draw:layer="layout" svg:width="0.891cm" svg:height="0.97cm" svg:x="-63.141cm" svg:y="58.431cm">
            <text:p text:style-name="P150"><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62.25cm" svg:y1="58.916cm" svg:x2="-60.241cm" svg:y2="58.016cm" draw:start-shape="id437" draw:start-glue-point="10" svg:d="M-62250 58916l2009-900" svg:viewBox="0 0 2010 901">
            <text:p/>
          </draw:connector>
          <draw:connector draw:style-name="gr514" draw:text-style-name="P15" draw:layer="layout" draw:type="line" svg:x1="-62.25cm" svg:y1="58.916cm" svg:x2="-60.242cm" svg:y2="56.716cm" draw:start-shape="id437" draw:start-glue-point="10" draw:end-shape="id432" draw:end-glue-point="6" svg:d="M-62250 58916l2008-2200" svg:viewBox="0 0 2009 2201">
            <text:p/>
          </draw:connector>
          <draw:connector draw:style-name="gr514" draw:text-style-name="P15" draw:layer="layout" draw:type="line" svg:x1="-62.25cm" svg:y1="58.916cm" svg:x2="-60.242cm" svg:y2="55.416cm" draw:start-shape="id437" draw:start-glue-point="10" draw:end-shape="id431" draw:end-glue-point="6" svg:d="M-62250 58916l2008-3500" svg:viewBox="0 0 2009 3501">
            <text:p/>
          </draw:connector>
          <draw:connector draw:style-name="gr514" draw:text-style-name="P15" draw:layer="layout" draw:type="line" svg:x1="-62.25cm" svg:y1="58.916cm" svg:x2="-60.244cm" svg:y2="54.116cm" draw:start-shape="id437" draw:start-glue-point="10" draw:end-shape="id438" draw:end-glue-point="3" svg:d="M-62250 58916l2006-4800" svg:viewBox="0 0 2007 4801">
            <text:p/>
          </draw:connector>
          <draw:connector draw:style-name="gr514" draw:text-style-name="P15" draw:layer="layout" draw:type="line" svg:x1="-65.15cm" svg:y1="58.016cm" svg:x2="-63.141cm" svg:y2="58.916cm" draw:end-shape="id437" draw:end-glue-point="6" svg:d="M-65150 58016l2009 900" svg:viewBox="0 0 2010 901">
            <text:p/>
          </draw:connector>
          <draw:connector draw:style-name="gr514" draw:text-style-name="P15" draw:layer="layout" draw:type="line" svg:x1="-65.154cm" svg:y1="56.716cm" svg:x2="-63.141cm" svg:y2="58.916cm" draw:start-shape="id427" draw:start-glue-point="10" draw:end-shape="id437" draw:end-glue-point="6" svg:d="M-65154 56716l2013 2200" svg:viewBox="0 0 2014 2201">
            <text:p/>
          </draw:connector>
          <draw:connector draw:style-name="gr514" draw:text-style-name="P15" draw:layer="layout" draw:type="line" svg:x1="-65.154cm" svg:y1="55.416cm" svg:x2="-63.141cm" svg:y2="58.916cm" draw:start-shape="id425" draw:start-glue-point="10" draw:end-shape="id437" draw:end-glue-point="6" svg:d="M-65154 55416l2013 3500" svg:viewBox="0 0 2014 3501">
            <text:p/>
          </draw:connector>
          <draw:connector draw:style-name="gr514" draw:text-style-name="P15" draw:layer="layout" draw:type="line" svg:x1="-65.154cm" svg:y1="54.116cm" svg:x2="-63.141cm" svg:y2="58.916cm" draw:start-shape="id423" draw:start-glue-point="10" draw:end-shape="id437" draw:end-glue-point="6" svg:d="M-65154 54116l2013 4800" svg:viewBox="0 0 2014 4801">
            <text:p/>
          </draw:connector>
          <draw:frame draw:style-name="gr527" draw:text-style-name="P129" draw:layer="layout" svg:width="6.856cm" svg:height="1.673cm" svg:x="-66.089cm" svg:y="59.426cm">
            <draw:text-box>
              <text:p text:style-name="P5">To produce<text:line-break/> five clusters<text:line-break/>(Encoding is called neural coding)</text:p>
            </draw:text-box>
          </draw:frame>
          <draw:custom-shape draw:style-name="gr512" draw:text-style-name="P145" xml:id="id439" draw:id="id439" draw:layer="layout" svg:width="0.891cm" svg:height="0.97cm" svg:x="-56.864cm" svg:y="51.303cm">
            <text:p text:style-name="P144"><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40" draw:id="id440" draw:layer="layout" svg:width="0.891cm" svg:height="0.97cm" svg:x="-51.063cm" svg:y="51.303cm">
            <text:p text:style-name="P144"><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55.973cm" svg:y1="51.788cm" svg:x2="-53.962cm" svg:y2="50.188cm" draw:start-shape="id439" draw:start-glue-point="10" svg:d="M-55973 51788l2011-1600" svg:viewBox="0 0 2012 1601">
            <text:p/>
          </draw:connector>
          <draw:connector draw:style-name="gr514" draw:text-style-name="P15" draw:layer="layout" draw:type="line" svg:x1="-55.973cm" svg:y1="51.788cm" svg:x2="-53.963cm" svg:y2="49.088cm" draw:start-shape="id439" draw:start-glue-point="10" draw:end-shape="id415" draw:end-glue-point="6" svg:d="M-55973 51788l2010-2700" svg:viewBox="0 0 2011 2701">
            <text:p/>
          </draw:connector>
          <draw:connector draw:style-name="gr514" draw:text-style-name="P15" draw:layer="layout" draw:type="line" svg:x1="-55.973cm" svg:y1="51.788cm" svg:x2="-53.964cm" svg:y2="47.988cm" draw:start-shape="id439" draw:start-glue-point="10" draw:end-shape="id413" draw:end-glue-point="6" svg:d="M-55973 51788l2009-3800" svg:viewBox="0 0 2010 3801">
            <text:p/>
          </draw:connector>
          <draw:connector draw:style-name="gr514" draw:text-style-name="P15" draw:layer="layout" draw:type="line" svg:x1="-53.07cm" svg:y1="50.188cm" svg:x2="-51.063cm" svg:y2="51.788cm" draw:end-shape="id440" draw:end-glue-point="6" svg:d="M-53070 50188l2007 1600" svg:viewBox="0 0 2008 1601">
            <text:p/>
          </draw:connector>
          <draw:connector draw:style-name="gr514" draw:text-style-name="P15" draw:layer="layout" draw:type="line" svg:x1="-53.07cm" svg:y1="49.088cm" svg:x2="-51.063cm" svg:y2="51.788cm" draw:start-shape="id441" draw:start-glue-point="2" draw:end-shape="id440" draw:end-glue-point="6" svg:d="M-53070 49088l2007 2700" svg:viewBox="0 0 2008 2701">
            <text:p/>
          </draw:connector>
          <draw:connector draw:style-name="gr514" draw:text-style-name="P15" draw:layer="layout" draw:type="line" svg:x1="-53.07cm" svg:y1="47.988cm" svg:x2="-51.063cm" svg:y2="51.788cm" draw:start-shape="id442" draw:start-glue-point="2" draw:end-shape="id440" draw:end-glue-point="6" svg:d="M-53070 47988l2007 3800" svg:viewBox="0 0 2008 3801">
            <text:p/>
          </draw:connector>
          <draw:custom-shape draw:style-name="gr512" draw:text-style-name="P145" xml:id="id444" draw:id="id444" draw:layer="layout" svg:width="0.891cm" svg:height="0.97cm" svg:x="-60.228cm" svg:y="58.768cm">
            <text:p text:style-name="P144"><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5" xml:id="id443" draw:id="id443" draw:layer="layout" svg:width="0.891cm" svg:height="0.97cm" svg:x="-66.027cm" svg:y="58.768cm">
            <text:p text:style-name="P144"><text:span text:style-name="T48">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4" draw:text-style-name="P15" draw:layer="layout" draw:type="line" svg:x1="-65.136cm" svg:y1="59.253cm" svg:x2="-63.141cm" svg:y2="58.916cm" draw:start-shape="id443" draw:start-glue-point="10" draw:end-shape="id437" draw:end-glue-point="6" svg:d="M-65136 59253l1995-337" svg:viewBox="0 0 1996 338">
            <text:p/>
          </draw:connector>
          <draw:connector draw:style-name="gr514" draw:text-style-name="P15" draw:layer="layout" draw:type="line" svg:x1="-65.136cm" svg:y1="59.254cm" svg:x2="-63.141cm" svg:y2="57.716cm" draw:end-shape="id435" draw:end-glue-point="6" svg:d="M-65136 59254l1995-1538" svg:viewBox="0 0 1996 1539">
            <text:p/>
          </draw:connector>
          <draw:connector draw:style-name="gr514" draw:text-style-name="P15" draw:layer="layout" draw:type="line" svg:x1="-65.135cm" svg:y1="59.254cm" svg:x2="-63.141cm" svg:y2="56.516cm" draw:end-shape="id428" draw:end-glue-point="6" svg:d="M-65135 59254l1994-2738" svg:viewBox="0 0 1995 2739">
            <text:p/>
          </draw:connector>
          <draw:connector draw:style-name="gr514" draw:text-style-name="P15" draw:layer="layout" draw:type="line" svg:x1="-65.135cm" svg:y1="59.254cm" svg:x2="-63.141cm" svg:y2="55.416cm" draw:end-shape="id426" draw:end-glue-point="6" svg:d="M-65135 59254l1994-3838" svg:viewBox="0 0 1995 3839">
            <text:p/>
          </draw:connector>
          <draw:connector draw:style-name="gr514" draw:text-style-name="P15" draw:layer="layout" draw:type="line" svg:x1="-65.135cm" svg:y1="59.254cm" svg:x2="-63.141cm" svg:y2="54.316cm" draw:end-shape="id424" draw:end-glue-point="6" svg:d="M-65135 59254l1994-4938" svg:viewBox="0 0 1995 4939">
            <text:p/>
          </draw:connector>
          <draw:connector draw:style-name="gr514" draw:text-style-name="P15" draw:layer="layout" draw:type="line" svg:x1="-62.25cm" svg:y1="58.916cm" svg:x2="-60.228cm" svg:y2="59.253cm" draw:start-shape="id437" draw:start-glue-point="10" draw:end-shape="id444" draw:end-glue-point="6" svg:d="M-62250 58916l2022 337" svg:viewBox="0 0 2023 338">
            <text:p/>
          </draw:connector>
          <draw:connector draw:style-name="gr514" draw:text-style-name="P15" draw:layer="layout" draw:type="line" svg:x1="-62.25cm" svg:y1="57.716cm" svg:x2="-60.227cm" svg:y2="59.254cm" draw:start-shape="id435" draw:start-glue-point="10" svg:d="M-62250 57716l2023 1538" svg:viewBox="0 0 2024 1539">
            <text:p/>
          </draw:connector>
          <draw:connector draw:style-name="gr514" draw:text-style-name="P15" draw:layer="layout" draw:type="line" svg:x1="-62.25cm" svg:y1="56.516cm" svg:x2="-60.226cm" svg:y2="59.254cm" draw:start-shape="id428" draw:start-glue-point="10" svg:d="M-62250 56516l2024 2738" svg:viewBox="0 0 2025 2739">
            <text:p/>
          </draw:connector>
          <draw:connector draw:style-name="gr514" draw:text-style-name="P15" draw:layer="layout" draw:type="line" svg:x1="-62.25cm" svg:y1="55.416cm" svg:x2="-60.226cm" svg:y2="59.254cm" draw:start-shape="id426" draw:start-glue-point="10" svg:d="M-62250 55416l2024 3838" svg:viewBox="0 0 2025 3839">
            <text:p/>
          </draw:connector>
          <draw:connector draw:style-name="gr514" draw:text-style-name="P15" draw:layer="layout" draw:type="line" svg:x1="-62.25cm" svg:y1="54.316cm" svg:x2="-60.226cm" svg:y2="59.254cm" draw:start-shape="id424" draw:start-glue-point="10" svg:d="M-62250 54316l2024 4938" svg:viewBox="0 0 2025 4939">
            <text:p/>
          </draw:connector>
          <draw:custom-shape draw:style-name="gr528"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9" draw:text-style-name="P38" draw:layer="layout" svg:width="1.89cm" svg:height="1.673cm" svg:x="-49.438cm" svg:y="48.435cm">
            <draw:text-box>
              <text:p>Fusion <text:line-break/>from <text:line-break/>traces</text:p>
            </draw:text-box>
          </draw:frame>
          <draw:custom-shape draw:style-name="gr530"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31" draw:text-style-name="P38" draw:layer="layout" svg:width="3.216cm" svg:height="2.621cm" svg:x="-70.171cm" svg:y="55.412cm">
            <draw:text-box>
              <text:p>Conversion<text:line-break/>to action <text:line-break/>potentials<text:line-break/>(We just need|<text:line-break/>five clusters)</text:p>
            </draw:text-box>
          </draw:frame>
        </draw:g>
        <draw:rect draw:style-name="gr478" draw:text-style-name="P19" xml:id="id484" draw:id="id484" draw:layer="layout" svg:width="2.349cm" svg:height="1.195cm" svg:x="-25.318cm" svg:y="50.819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78" draw:text-style-name="P19" xml:id="id446" draw:id="id446" draw:layer="layout" svg:width="2.574cm" svg:height="1.396cm" svg:x="-25.372cm" svg:y="52.617cm">
          <text:p text:style-name="P5"><text:span text:style-name="T4">Robot 2</text:span><text:span text:style-name="T4"><text:line-break/></text:span><text:span text:style-name="T4">language</text:span></text:p>
        </draw:rect>
        <draw:custom-shape draw:style-name="gr495" draw:text-style-name="P137" xml:id="id488" draw:id="id488" draw:layer="layout" svg:width="4.16cm" svg:height="0.97cm" svg:x="-41.5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0" draw:text-style-name="P20" draw:layer="layout" svg:width="0.571cm" svg:height="0.535cm" svg:x="-41.381cm" svg:y="52.134cm">
            <text:p text:style-name="P19"><text:span text:style-name="T4">D</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75cm" svg:height="0.535cm" svg:x="-40.336cm" svg:y="52.134cm">
            <text:p text:style-name="P19"><text:span text:style-name="T4">D</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20" draw:layer="layout" svg:width="0.643cm" svg:height="0.535cm" svg:x="-39.357cm" svg:y="52.134cm">
            <text:p text:style-name="P19"><text:span text:style-name="T4">D</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68cm" svg:height="0.535cm" svg:x="-38.233cm" svg:y="52.134cm">
            <text:p text:style-name="P19"><text:span text:style-name="T4">D</text:span><text:span text:style-name="T43">l</text:span><text:span text:style-name="T4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2" draw:text-style-name="P15" draw:layer="layout" svg:x1="-40.826cm" svg:y1="52.402cm" svg:x2="-40.376cm" svg:y2="52.392cm">
            <text:p/>
          </draw:line>
          <draw:line draw:style-name="gr502" draw:text-style-name="P15" draw:layer="layout" svg:x1="-39.754cm" svg:y1="52.416cm" svg:x2="-39.331cm" svg:y2="52.405cm">
            <text:p/>
          </draw:line>
          <draw:line draw:style-name="gr502" draw:text-style-name="P15" draw:layer="layout" svg:x1="-38.708cm" svg:y1="52.416cm" svg:x2="-38.193cm" svg:y2="52.419cm">
            <text:p/>
          </draw:line>
        </draw:g>
        <draw:connector draw:style-name="gr36" draw:text-style-name="P7" draw:layer="layout" draw:type="curve" svg:x1="-26.952cm" svg:y1="52.421cm" svg:x2="-25.372cm" svg:y2="53.315cm" draw:start-shape="id445" draw:start-glue-point="10" draw:end-shape="id446" draw:end-glue-point="3" svg:d="M-26952 52421c1168 0 379 894 1580 894" svg:viewBox="0 0 1581 895">
          <text:p/>
        </draw:connector>
        <draw:connector draw:style-name="gr532" draw:text-style-name="P15" draw:layer="layout" draw:type="curve" svg:x1="-6.807cm" svg:y1="79.267cm" svg:x2="-7.209cm" svg:y2="77.954cm" draw:start-shape="id447" draw:start-glue-point="0" draw:end-shape="id372" draw:end-glue-point="2" svg:d="M-6807 79267c0-984-402-328-402-1313" svg:viewBox="0 0 403 1314">
          <text:p/>
        </draw:connector>
        <draw:g draw:style-name="gr23">
          <draw:path draw:style-name="gr533" draw:text-style-name="P21" draw:layer="layout" svg:width="6.657cm" svg:height="8.127cm" svg:x="-43.854cm" svg:y="22.08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534" draw:text-style-name="P21" draw:layer="layout" svg:width="6.704cm" svg:height="8.177cm" svg:x="-43.876cm" svg:y="22.05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custom-shape draw:name="comment box 15" draw:style-name="gr535" draw:text-style-name="P155" xml:id="id448" draw:id="id448" draw:layer="layout" svg:width="1.885cm" svg:height="1.575cm" svg:x="-48.78cm" svg:y="76.294cm">
          <text:p text:style-name="P154"><text:span text:style-name="T4">DBSCAN</text:span><text:span text:style-name="T4"><text:line-break/></text:span><text:span text:style-name="T4">on 2</text:span><text:span text:style-name="T44">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48" draw:end-glue-point="4" svg:d="M-47452 75549c0 168-385-204-385 745" svg:viewBox="0 0 386 746">
          <text:p/>
        </draw:connector>
        <draw:connector draw:style-name="gr29" draw:text-style-name="P15" draw:layer="layout" draw:type="curve" svg:x1="-49.453cm" svg:y1="75.549cm" svg:x2="-49.92cm" svg:y2="76.336cm" draw:end-shape="id449" draw:end-glue-point="4" svg:d="M-49453 75549c0 199-467-194-467 787" svg:viewBox="0 0 468 788">
          <text:p/>
        </draw:connector>
        <draw:custom-shape draw:name="comment box 14" draw:style-name="gr536" draw:text-style-name="P155" xml:id="id449" draw:id="id449" draw:layer="layout" svg:width="1.884cm" svg:height="1.523cm" svg:x="-50.862cm" svg:y="76.336cm">
          <text:p text:style-name="P154"><text:span text:style-name="T4">DBSCAN</text:span><text:span text:style-name="T4"><text:line-break/></text:span><text:span text:style-name="T4">on 0</text:span><text:span text:style-name="T44">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21" draw:text-style-name="P115" draw:layer="layout" svg:width="1.179cm" svg:height="1.358cm" svg:x="-51.118cm" svg:y="80.163cm" svg:viewBox="0 0 1180 1359" draw:points="0,0 1180,581 1180,777 0,1359">
              <text:p/>
            </draw:polygon>
          </draw:g>
          <draw:frame draw:style-name="gr498" draw:text-style-name="P11" draw:layer="layout" svg:width="1.527cm" svg:height="0.57cm" svg:x="-51.349cm" svg:y="80.526cm">
            <draw:text-box>
              <text:p><text:span text:style-name="T50">encoder</text:span></text:p>
            </draw:text-box>
          </draw:frame>
        </draw:g>
        <draw:frame draw:style-name="gr537" draw:text-style-name="P41" draw:layer="layout" svg:width="3.653cm" svg:height="2.221cm" svg:x="-48.741cm" svg:y="79.993cm">
          <draw:text-box>
            <text:p text:style-name="P5"><text:span text:style-name="T12">Fusion (with autoencoder)</text:span><text:span text:style-name="T12"><text:line-break/></text:span><text:span text:style-name="T12">and</text:span><text:span text:style-name="T12"><text:line-break/></text:span><text:span text:style-name="T12">observation matrix</text:span></text:p>
          </draw:text-box>
        </draw:frame>
        <draw:rect draw:style-name="gr292" draw:text-style-name="P35" xml:id="id450" draw:id="id450" draw:layer="layout" svg:width="2.3cm" svg:height="1cm" svg:x="25.604cm" svg:y="73.828cm">
          <text:p text:style-name="P5">IMU</text:p>
        </draw:rect>
        <draw:rect draw:style-name="gr292" draw:text-style-name="P35" xml:id="id451" draw:id="id451" draw:layer="layout" svg:width="2.3cm" svg:height="1cm" svg:x="28.604cm" svg:y="73.828cm">
          <text:p text:style-name="P5">Battery</text:p>
        </draw:rect>
        <draw:connector draw:style-name="gr293" draw:text-style-name="P15" draw:layer="layout" draw:type="curve" svg:x1="25.654cm" svg:y1="72.628cm" svg:x2="26.754cm" svg:y2="73.828cm" draw:start-shape="id241" draw:start-glue-point="2" draw:end-shape="id450" svg:d="M25654 72628c0 900 1100 300 1100 1200" svg:viewBox="0 0 1101 1201">
          <text:p/>
        </draw:connector>
        <draw:connector draw:style-name="gr293" draw:text-style-name="P15" draw:layer="layout" draw:type="curve" svg:x1="25.654cm" svg:y1="72.628cm" svg:x2="29.754cm" svg:y2="73.828cm" draw:start-shape="id241" draw:start-glue-point="2" draw:end-shape="id451" draw:end-glue-point="0" svg:d="M25654 72628c0 900 4100 300 4100 1200" svg:viewBox="0 0 4101 1201">
          <text:p/>
        </draw:connector>
        <draw:g draw:style-name="gr31">
          <draw:polygon draw:style-name="gr538" draw:text-style-name="P5" draw:layer="layout" svg:width="2.947cm" svg:height="4.308cm" svg:x="-67.336cm" svg:y="63.837cm" svg:viewBox="0 0 2948 4309" draw:points="0,3742 18,699 2891,0 2948,4309">
            <text:p/>
          </draw:polygon>
          <draw:g draw:style-name="gr31">
            <draw:custom-shape draw:style-name="gr539" draw:text-style-name="P156"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0" draw:text-style-name="P16" draw:layer="layout" svg:width="1.101cm" svg:height="0.569cm" svg:x="-70.578cm" svg:y="64.374cm">
              <draw:text-box>
                <text:p><text:span text:style-name="T4">GPS</text:span></text:p>
              </draw:text-box>
            </draw:frame>
          </draw:g>
          <draw:g draw:style-name="gr31">
            <draw:custom-shape draw:style-name="gr541" draw:text-style-name="P108"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2" draw:text-style-name="P16" draw:layer="layout" svg:width="1.337cm" svg:height="0.569cm" svg:x="-70.552cm" svg:y="63.867cm">
              <draw:text-box>
                <text:p><text:span text:style-name="T4">LIDAR</text:span></text:p>
              </draw:text-box>
            </draw:frame>
          </draw:g>
          <draw:custom-shape draw:style-name="gr541" draw:text-style-name="P108"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3" draw:text-style-name="P16" draw:layer="layout" svg:width="2.047cm" svg:height="0.569cm" svg:x="-69.068cm" svg:y="65.669cm">
            <draw:text-box>
              <text:p><text:span text:style-name="T4">AE mapping</text:span></text:p>
            </draw:text-box>
          </draw:frame>
          <draw:polygon draw:style-name="gr538" draw:text-style-name="P5" draw:layer="layout" svg:width="3.884cm" svg:height="5.678cm" svg:x="-62.495cm" svg:y="63.044cm" svg:viewBox="0 0 3885 5679" draw:points="0,4931 24,921 3810,0 3885,5679">
            <text:p/>
          </draw:polygon>
          <draw:custom-shape draw:style-name="gr544"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5"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6"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8" draw:text-style-name="P15" draw:layer="layout" svg:x1="-64.389cm" svg:y1="66.216cm" svg:x2="-60.887cm" svg:y2="66.178cm">
            <text:p/>
          </draw:line>
          <draw:frame draw:style-name="gr549" draw:text-style-name="P157"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3" draw:id="id453">
            <draw:custom-shape draw:style-name="gr541" draw:text-style-name="P108"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108"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156"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8" draw:text-style-name="P15" draw:layer="layout" svg:x1="-68.887cm" svg:y1="66.21cm" svg:x2="-65.987cm" svg:y2="66.178cm">
            <text:p/>
          </draw:line>
          <draw:frame draw:style-name="gr550"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51" draw:text-style-name="P158" draw:layer="layout" svg:width="2.126cm" svg:height="0.569cm" svg:x="-66.998cm" svg:y="64.443cm">
            <draw:text-box>
              <text:p><text:span text:style-name="T51">Latent space</text:span></text:p>
            </draw:text-box>
          </draw:frame>
          <draw:frame draw:style-name="gr552" draw:text-style-name="P160" draw:layer="layout" svg:width="0.87cm" svg:height="0.73cm" svg:x="-60.594cm" svg:y="66.792cm">
            <draw:text-box>
              <text:p text:style-name="P159"><text:span text:style-name="T4">μ</text:span><text:span text:style-name="T44">’</text:span><text:span text:style-name="T43">G</text:span></text:p>
            </draw:text-box>
          </draw:frame>
          <draw:frame draw:style-name="gr553" draw:text-style-name="P160" draw:layer="layout" svg:width="0.87cm" svg:height="0.73cm" svg:x="-61.02cm" svg:y="65.8cm">
            <draw:text-box>
              <text:p text:style-name="P159"><text:span text:style-name="T4">μ</text:span><text:span text:style-name="T44">’</text:span><text:span text:style-name="T43">L</text:span></text:p>
            </draw:text-box>
          </draw:frame>
          <draw:frame draw:style-name="gr554" draw:text-style-name="P158" draw:layer="layout" svg:width="2.346cm" svg:height="0.887cm" svg:x="-62.04cm" svg:y="63.872cm">
            <draw:text-box>
              <text:p><text:span text:style-name="T51">clusters mean</text:span><text:span text:style-name="T51"><text:line-break/></text:span><text:span text:style-name="T51">in latent space</text:span></text:p>
            </draw:text-box>
          </draw:frame>
          <draw:custom-shape draw:style-name="gr539" draw:text-style-name="P156" xml:id="id452" draw:id="id452"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5" draw:text-style-name="P5" draw:layer="layout" svg:x1="-60.818cm" svg:y1="66.23cm" svg:x2="-60.463cm" svg:y2="66.837cm">
            <text:p/>
          </draw:line>
          <draw:frame draw:style-name="gr556" draw:text-style-name="P16" draw:layer="layout" svg:width="0.697cm" svg:height="0.569cm" svg:x="-61.055cm" svg:y="66.382cm">
            <draw:text-box>
              <text:p><text:span text:style-name="T4">d</text:span><text:span text:style-name="T44">’</text:span></text:p>
            </draw:text-box>
          </draw:frame>
          <draw:connector draw:style-name="gr557" draw:text-style-name="P15" draw:layer="layout" draw:type="curve" draw:line-skew="0.315cm" svg:x1="-60.43cm" svg:y1="66.974cm" svg:x2="-66.07cm" svg:y2="66.595cm" draw:start-shape="id452" draw:start-glue-point="8" draw:end-shape="id453" draw:end-glue-point="2" svg:d="M-60430 66974c0 1224-5640 1413-5640-379" svg:viewBox="0 0 5641 1323">
            <text:p/>
          </draw:connector>
          <draw:frame draw:style-name="gr558" draw:text-style-name="P16" draw:layer="layout" svg:width="1.595cm" svg:height="0.887cm" svg:x="-64.183cm" svg:y="67.81cm">
            <draw:text-box>
              <text:p text:style-name="P159"><text:span text:style-name="T10">Decode</text:span><text:span text:style-name="T10"><text:line-break/></text:span><text:span text:style-name="T10">GPS+</text:span><text:span text:style-name="T4">μ</text:span><text:span text:style-name="T44">’</text:span><text:span text:style-name="T43">G</text:span></text:p>
            </draw:text-box>
          </draw:frame>
          <draw:frame draw:style-name="gr559" draw:text-style-name="P161" draw:layer="layout" svg:width="5.09cm" svg:height="1.039cm" svg:x="-65.813cm" svg:y="68.792cm">
            <draw:text-box>
              <text:p text:style-name="P5"><text:span text:style-name="T52">Mapping GPS to the center </text:span><text:span text:style-name="T52"><text:line-break/></text:span><text:span text:style-name="T52">of mapped LIDAR-class</text:span></text:p>
            </draw:text-box>
          </draw:frame>
        </draw:g>
        <draw:g draw:style-name="gr23">
          <draw:rect draw:style-name="gr41" draw:text-style-name="P5" xml:id="id455" draw:id="id455" draw:layer="layout" svg:width="1.283cm" svg:height="1.495cm" svg:x="-4.81cm" svg:y="66.803cm">
            <text:p text:style-name="P5">Robot</text:p>
          </draw:rect>
          <draw:line draw:style-name="gr560" draw:text-style-name="P5" xml:id="id454" draw:id="id454" draw:layer="layout" svg:x1="-3.554cm" svg:y1="67.543cm" svg:x2="-1.86cm" svg:y2="67.517cm">
            <text:p/>
          </draw:line>
          <draw:connector draw:style-name="gr561" draw:text-style-name="P15" draw:layer="layout" svg:x1="-2.707cm" svg:y1="67.543cm" svg:x2="-4.168cm" svg:y2="68.298cm" draw:start-shape="id454" draw:start-glue-point="2" draw:end-shape="id455" svg:d="M-2707 67543v1256h-1461v-501" svg:viewBox="0 0 1462 1257">
            <text:p/>
          </draw:connector>
          <draw:line draw:style-name="gr560" draw:text-style-name="P5" draw:layer="layout" svg:x1="-6.305cm" svg:y1="67.517cm" svg:x2="-4.824cm" svg:y2="67.517cm">
            <text:p/>
          </draw:line>
          <draw:frame draw:style-name="gr562" draw:text-style-name="P16" draw:layer="layout" svg:width="1.117cm" svg:height="0.569cm" svg:x="-6.072cm" svg:y="67.029cm">
            <draw:text-box>
              <text:p><text:span text:style-name="T4">input</text:span></text:p>
            </draw:text-box>
          </draw:frame>
          <draw:frame draw:style-name="gr563" draw:text-style-name="P16" draw:layer="layout" svg:width="1.291cm" svg:height="0.569cm" svg:x="-3.471cm" svg:y="67.03cm">
            <draw:text-box>
              <text:p><text:span text:style-name="T4">output</text:span></text:p>
            </draw:text-box>
          </draw:frame>
          <draw:frame draw:style-name="gr564" draw:text-style-name="P16" draw:layer="layout" svg:width="1.748cm" svg:height="0.569cm" svg:x="-4.27cm" svg:y="68.731cm">
            <draw:text-box>
              <text:p><text:span text:style-name="T4">Feedback</text:span></text:p>
            </draw:text-box>
          </draw:frame>
        </draw:g>
        <draw:line draw:style-name="gr565" draw:text-style-name="P15" draw:layer="layout" svg:x1="-51.273cm" svg:y1="82.253cm" svg:x2="-35.038cm" svg:y2="82.253cm">
          <text:p/>
        </draw:line>
        <draw:frame draw:style-name="gr566" draw:text-style-name="P162" draw:layer="layout" svg:width="4.884cm" svg:height="2.015cm" svg:x="-45.762cm" svg:y="82.29cm">
          <draw:text-box>
            <text:p text:style-name="P5"><text:span text:style-name="T53">Predictive model </text:span><text:span text:style-name="T53"><text:line-break/></text:span><text:span text:style-name="T53">building with </text:span><text:span text:style-name="T53"><text:line-break/></text:span><text:span text:style-name="T53">transformers</text:span></text:p>
          </draw:text-box>
        </draw:frame>
        <draw:line draw:style-name="gr567" draw:text-style-name="P15" draw:layer="layout" svg:x1="-34.727cm" svg:y1="66.427cm" svg:x2="-34.694cm" svg:y2="81.856cm">
          <text:p/>
        </draw:line>
        <draw:frame draw:style-name="gr568" draw:text-style-name="P163" draw:layer="layout" svg:width="5.588cm" svg:height="1.038cm" draw:transform="rotate (1.5707963267949) translate (-34.753cm 76.743cm)">
          <draw:text-box>
            <text:p><text:span text:style-name="T53">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7" draw:id="id457"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6" draw:id="id456"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6" draw:start-glue-point="6" draw:end-shape="id457" draw:end-glue-point="10" svg:d="M-47897 100065h-1110" svg:viewBox="0 0 1111 1">
            <text:p/>
          </draw:connector>
          <draw:custom-shape draw:style-name="gr34" draw:text-style-name="P26" xml:id="id459" draw:id="id459"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8" draw:id="id458"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8" draw:start-glue-point="6" draw:end-shape="id459" draw:end-glue-point="10" svg:d="M-43897 100065h-1110" svg:viewBox="0 0 1111 1">
            <text:p/>
          </draw:connector>
          <draw:connector draw:style-name="gr36" draw:text-style-name="P7" draw:layer="layout" draw:type="curve" svg:x1="-45.898cm" svg:y1="100.065cm" svg:x2="-47.006cm" svg:y2="100.065cm" draw:start-shape="id459" draw:start-glue-point="6" draw:end-shape="id456" draw:end-glue-point="10" svg:d="M-45898 100065h-1108" svg:viewBox="0 0 1109 1">
            <text:p/>
          </draw:connector>
          <draw:custom-shape draw:style-name="gr34" draw:text-style-name="P26" xml:id="id461" draw:id="id461"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0" draw:start-glue-point="6" draw:end-shape="id461" draw:end-glue-point="10" svg:d="M-36897 100065h-1110" svg:viewBox="0 0 1111 1">
            <text:p/>
          </draw:connector>
          <draw:custom-shape draw:style-name="gr493" draw:text-style-name="P108" draw:layer="layout" svg:width="16.317cm" svg:height="1.952cm" svg:x="-51.302cm" svg:y="97.114cm">
            <text:p/>
            <draw:enhanced-geometry svg:viewBox="0 0 21600 21600" draw:type="rectangle" draw:enhanced-path="M 0 0 L 21600 0 21600 21600 0 21600 0 0 Z N"/>
          </draw:custom-shape>
          <draw:custom-shape draw:style-name="gr495" draw:text-style-name="P137"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137"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0" draw:text-style-name="P20" draw:layer="layout" svg:width="0.526cm" svg:height="0.535cm" svg:x="-45.092cm" svg:y="95.68cm">
              <text:p text:style-name="P19"><text:span text:style-name="T4">P</text:span><text:span text:style-name="T43">i</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25cm" svg:height="0.535cm" svg:x="-44.042cm" svg:y="95.68cm">
              <text:p text:style-name="P19"><text:span text:style-name="T4">P</text:span><text:span text:style-name="T43">j</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20" draw:layer="layout" svg:width="0.53cm" svg:height="0.535cm" svg:x="-43cm" svg:y="95.68cm">
              <text:p text:style-name="P19"><text:span text:style-name="T4">P</text:span><text:span text:style-name="T43">k</text:span><text:span text:style-name="T4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26cm" svg:height="0.535cm" svg:x="-41.947cm" svg:y="95.68cm">
              <text:p text:style-name="P19"><text:span text:style-name="T4">P</text:span><text:span text:style-name="T43">l</text:span><text:span text:style-name="T4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2" draw:text-style-name="P15" draw:layer="layout" svg:x1="-44.563cm" svg:y1="95.945cm" svg:x2="-44.058cm" svg:y2="95.963cm">
              <text:p/>
            </draw:line>
            <draw:line draw:style-name="gr502" draw:text-style-name="P15" draw:layer="layout" svg:x1="-43.51cm" svg:y1="95.962cm" svg:x2="-43.012cm" svg:y2="95.957cm">
              <text:p/>
            </draw:line>
            <draw:line draw:style-name="gr502" draw:text-style-name="P15" draw:layer="layout" svg:x1="-42.464cm" svg:y1="95.962cm" svg:x2="-41.947cm" svg:y2="95.957cm">
              <text:p/>
            </draw:line>
          </draw:g>
          <draw:connector draw:style-name="gr503" draw:text-style-name="P7" draw:layer="layout" draw:type="curve" svg:x1="-39.311cm" svg:y1="100.024cm" svg:x2="-42.624cm" svg:y2="100.027cm" svg:d="M-39311 100024c-2484 0-828 3-3313 3" svg:viewBox="0 0 3314 4">
            <text:p/>
          </draw:connector>
          <draw:connector draw:style-name="gr503" draw:text-style-name="P7" draw:layer="layout" draw:type="curve" svg:x1="-45.796cm" svg:y1="95.924cm" svg:x2="-46.877cm" svg:y2="95.928cm" svg:d="M-45796 95924c-810 0-270 4-1081 4" svg:viewBox="0 0 1082 5">
            <text:p/>
          </draw:connector>
          <draw:connector draw:style-name="gr503" draw:text-style-name="P7" draw:layer="layout" draw:type="curve" svg:x1="-39.806cm" svg:y1="95.924cm" svg:x2="-40.887cm" svg:y2="95.928cm" svg:d="M-39806 95924c-810 0-270 4-1081 4" svg:viewBox="0 0 1082 5">
            <text:p/>
          </draw:connector>
          <draw:custom-shape draw:style-name="gr495" draw:text-style-name="P137"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108" draw:layer="layout" svg:width="16.317cm" svg:height="1.952cm" svg:x="-51.301cm" svg:y="101.114cm">
            <text:p/>
            <draw:enhanced-geometry svg:viewBox="0 0 21600 21600" draw:type="rectangle" draw:enhanced-path="M 0 0 L 21600 0 21600 21600 0 21600 0 0 Z N"/>
          </draw:custom-shape>
          <draw:custom-shape draw:style-name="gr504" draw:text-style-name="P138"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4" draw:text-style-name="P138"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08" draw:layer="layout" svg:width="16.317cm" svg:height="1.952cm" svg:x="-51.302cm" svg:y="93.114cm">
            <text:p/>
            <draw:enhanced-geometry svg:viewBox="0 0 21600 21600" draw:type="rectangle" draw:enhanced-path="M 0 0 L 21600 0 21600 21600 0 21600 0 0 Z N"/>
          </draw:custom-shape>
          <draw:custom-shape draw:style-name="gr504" draw:text-style-name="P138"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95" draw:text-style-name="P137"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137"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0" draw:text-style-name="P20" draw:layer="layout" svg:width="0.571cm" svg:height="0.535cm" svg:x="-45.137cm" svg:y="91.681cm">
              <text:p text:style-name="P19"><text:span text:style-name="T4">W</text:span><text:span text:style-name="T4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75cm" svg:height="0.535cm" svg:x="-44.092cm" svg:y="91.681cm">
              <text:p text:style-name="P19"><text:span text:style-name="T4">W</text:span><text:span text:style-name="T43">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20" draw:layer="layout" svg:width="0.643cm" svg:height="0.535cm" svg:x="-43.113cm" svg:y="91.681cm">
              <text:p text:style-name="P19"><text:span text:style-name="T4">W</text:span><text:span text:style-name="T43">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39" draw:layer="layout" svg:width="0.568cm" svg:height="0.535cm" svg:x="-41.989cm" svg:y="91.681cm">
              <text:p text:style-name="P19"><text:span text:style-name="T4">W</text:span><text:span text:style-name="T43">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2" draw:text-style-name="P15" draw:layer="layout" svg:x1="-44.582cm" svg:y1="91.949cm" svg:x2="-44.132cm" svg:y2="91.939cm">
              <text:p/>
            </draw:line>
            <draw:line draw:style-name="gr502" draw:text-style-name="P15" draw:layer="layout" svg:x1="-43.51cm" svg:y1="91.963cm" svg:x2="-43.087cm" svg:y2="91.952cm">
              <text:p/>
            </draw:line>
            <draw:line draw:style-name="gr502" draw:text-style-name="P15" draw:layer="layout" svg:x1="-42.464cm" svg:y1="91.963cm" svg:x2="-41.949cm" svg:y2="91.966cm">
              <text:p/>
            </draw:line>
          </draw:g>
          <draw:connector draw:style-name="gr503" draw:text-style-name="P7" draw:layer="layout" draw:type="curve" svg:x1="-45.796cm" svg:y1="91.925cm" svg:x2="-46.877cm" svg:y2="91.929cm" svg:d="M-45796 91925c-810 0-270 4-1081 4" svg:viewBox="0 0 1082 5">
            <text:p/>
          </draw:connector>
          <draw:connector draw:style-name="gr503" draw:text-style-name="P7" draw:layer="layout" draw:type="curve" svg:x1="-39.806cm" svg:y1="91.925cm" svg:x2="-40.887cm" svg:y2="91.929cm" svg:d="M-39806 91925c-810 0-270 4-1081 4" svg:viewBox="0 0 1082 5">
            <text:p/>
          </draw:connector>
          <draw:custom-shape draw:style-name="gr495" draw:text-style-name="P137"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5" draw:text-style-name="P15" draw:layer="layout" svg:x1="-34.76cm" svg:y1="88.884cm" svg:x2="-34.671cm" svg:y2="102.989cm">
            <text:p/>
          </draw:line>
          <draw:frame draw:style-name="gr569" draw:text-style-name="P162" draw:layer="layout" svg:width="5.06cm" svg:height="2.015cm" draw:transform="rotate (1.5707963267949) translate (-34.659cm 98.445cm)">
            <draw:text-box>
              <text:p text:style-name="P5"><text:span text:style-name="T53">Live remembering</text:span><text:span text:style-name="T53"><text:line-break/></text:span><text:span text:style-name="T53">and</text:span><text:span text:style-name="T53"><text:line-break/></text:span><text:span text:style-name="T53">State estimation</text:span></text:p>
            </draw:text-box>
          </draw:frame>
          <draw:custom-shape draw:style-name="gr493" draw:text-style-name="P108" draw:layer="layout" svg:width="16.317cm" svg:height="1.952cm" svg:x="-51.299cm" svg:y="88.915cm">
            <text:p/>
            <draw:enhanced-geometry svg:viewBox="0 0 21600 21600" draw:type="rectangle" draw:enhanced-path="M 0 0 L 21600 0 21600 21600 0 21600 0 0 Z N"/>
          </draw:custom-shape>
          <draw:custom-shape draw:style-name="gr505" draw:text-style-name="P138"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70" draw:text-style-name="P141" draw:layer="layout" svg:width="1.818cm" svg:height="1.705cm" svg:x="-44.455cm" svg:y="89.094cm">
            <text:p text:style-name="P140"><text:span text:style-name="T46">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21" draw:text-style-name="P115" draw:layer="layout" svg:width="1.179cm" svg:height="1.358cm" svg:x="-51.116cm" svg:y="89.165cm" svg:viewBox="0 0 1180 1359" draw:points="0,0 1180,581 1180,777 0,1359">
                <text:p/>
              </draw:polygon>
            </draw:g>
            <draw:frame draw:style-name="gr498" draw:text-style-name="P11" draw:layer="layout" svg:width="1.527cm" svg:height="0.57cm" svg:x="-51.347cm" svg:y="89.528cm">
              <draw:text-box>
                <text:p><text:span text:style-name="T50">encoder</text:span></text:p>
              </draw:text-box>
            </draw:frame>
          </draw:g>
          <draw:frame draw:style-name="gr571"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71"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71"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71"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72" draw:text-style-name="P27" xml:id="id462" draw:id="id462"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2" draw:text-style-name="P27" xml:id="id463" draw:id="id463"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3" draw:text-style-name="P15" draw:layer="layout" draw:type="curve" svg:x1="-39.402cm" svg:y1="89.666cm" svg:x2="-39.402cm" svg:y2="90.138cm" draw:start-shape="id462" draw:start-glue-point="8" draw:end-shape="id463" draw:end-glue-point="4" svg:d="M-39402 89666v472" svg:viewBox="0 0 1 473">
            <text:p/>
          </draw:connector>
          <draw:frame draw:style-name="gr574"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5" draw:id="id465"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5" draw:text-style-name="P164" draw:layer="layout" svg:width="3.958cm" svg:height="0.645cm" svg:x="-39.467cm" svg:y="89.59cm">
            <draw:text-box>
              <text:p><text:span text:style-name="T12">H </text:span><text:span text:style-name="T54">(observation matrix)</text:span></text:p>
            </draw:text-box>
          </draw:frame>
          <draw:custom-shape draw:style-name="gr34" draw:text-style-name="P26" xml:id="id464" draw:id="id464"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4" draw:start-glue-point="6" draw:end-shape="id465" draw:end-glue-point="10" svg:d="M-42586 102121c-786 0-261 1-1050 1" svg:viewBox="0 0 1051 2">
            <text:p/>
          </draw:connector>
          <draw:g draw:style-name="gr31">
            <draw:custom-shape draw:style-name="gr576" draw:text-style-name="P26" xml:id="id469" draw:id="id469"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7" draw:text-style-name="P165" xml:id="id471" draw:id="id471"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8" draw:text-style-name="P27" xml:id="id466" draw:id="id466"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9" draw:text-style-name="P27" xml:id="id467" draw:id="id467"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0" draw:text-style-name="P7" draw:layer="layout" draw:type="curve" svg:x1="-47.286cm" svg:y1="104.685cm" svg:x2="-46.42cm" svg:y2="104.691cm" draw:start-shape="id466" draw:start-glue-point="10" draw:end-shape="id467" draw:end-glue-point="6" svg:d="M-47286 104685c651 0 218 6 866 6" svg:viewBox="0 0 867 7">
              <text:p/>
            </draw:connector>
            <draw:custom-shape draw:style-name="gr579" draw:text-style-name="P27" xml:id="id468" draw:id="id468"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26" xml:id="id470" draw:id="id470"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4"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98" draw:text-style-name="P11" draw:layer="layout" svg:width="0.707cm" svg:height="0.57cm" svg:x="-47.292cm" svg:y="104.207cm">
              <draw:text-box>
                <text:p><text:span text:style-name="T4">H</text:span></text:p>
              </draw:text-box>
            </draw:frame>
            <draw:connector draw:style-name="gr573" draw:text-style-name="P15" draw:layer="layout" draw:type="curve" svg:x1="-45.602cm" svg:y1="104.692cm" svg:x2="-44.106cm" svg:y2="105.584cm" draw:start-shape="id468" draw:start-glue-point="10" draw:end-shape="id469" draw:end-glue-point="6" svg:d="M-45602 104692c1123 0 376 892 1496 892" svg:viewBox="0 0 1497 893">
              <text:p/>
            </draw:connector>
            <draw:connector draw:style-name="gr573" draw:text-style-name="P15" draw:layer="layout" draw:type="curve" svg:x1="-45.602cm" svg:y1="104.692cm" svg:x2="-44.157cm" svg:y2="103.694cm" draw:start-shape="id468" draw:start-glue-point="10" draw:end-shape="id470" draw:end-glue-point="6" svg:d="M-45602 104692c1086 0 364-998 1445-998" svg:viewBox="0 0 1446 999">
              <text:p/>
            </draw:connector>
            <draw:connector draw:style-name="gr573" draw:text-style-name="P15" draw:layer="layout" draw:type="curve" svg:x1="-42.156cm" svg:y1="103.694cm" svg:x2="-40.648cm" svg:y2="104.697cm" draw:start-shape="id470" draw:start-glue-point="10" draw:end-shape="id471" draw:end-glue-point="6" svg:d="M-42156 103694c1132 0 379 1003 1508 1003" svg:viewBox="0 0 1509 1004">
              <text:p/>
            </draw:connector>
            <draw:connector draw:style-name="gr573" draw:text-style-name="P15" draw:layer="layout" draw:type="curve" svg:x1="-42.105cm" svg:y1="105.584cm" svg:x2="-40.648cm" svg:y2="104.697cm" draw:start-shape="id469" draw:end-shape="id471" draw:end-glue-point="6" svg:d="M-42105 105584c1095 0 367-887 1457-887" svg:viewBox="0 0 1458 888">
              <text:p/>
            </draw:connector>
            <draw:frame draw:style-name="gr574"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2" draw:id="id472">
              <draw:custom-shape draw:style-name="gr581"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4"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73" draw:text-style-name="P15" draw:layer="layout" draw:type="curve" svg:x1="-39.757cm" svg:y1="104.697cm" svg:x2="-38.671cm" svg:y2="104.679cm" draw:start-shape="id471" draw:start-glue-point="10" draw:end-shape="id472" draw:end-glue-point="3" svg:d="M-39757 104697c816 0 273-18 1086-18" svg:viewBox="0 0 1087 19">
              <text:p/>
            </draw:connector>
            <draw:custom-shape draw:style-name="gr578" draw:text-style-name="P27" xml:id="id473" draw:id="id473"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9"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0" draw:text-style-name="P7" draw:layer="layout" draw:type="curve" svg:x1="-43.106cm" svg:y1="108.048cm" svg:x2="-43.094cm" svg:y2="107.208cm" draw:start-shape="id473" draw:start-glue-point="4" draw:end-shape="id474" draw:end-glue-point="8" svg:d="M-43106 108048c0-630 12-210 12-840" svg:viewBox="0 0 13 841">
              <text:p/>
            </draw:connector>
            <draw:custom-shape draw:style-name="gr579" draw:text-style-name="P27" xml:id="id474" draw:id="id474"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8" draw:text-style-name="P11" draw:layer="layout" svg:width="0.707cm" svg:height="0.57cm" svg:x="-43.61cm" svg:y="107.393cm">
              <draw:text-box>
                <text:p><text:span text:style-name="T4">H</text:span></text:p>
              </draw:text-box>
            </draw:frame>
            <draw:connector draw:style-name="gr580" draw:text-style-name="P7" draw:layer="layout" draw:type="curve" svg:x1="-43.094cm" svg:y1="106.509cm" svg:x2="-43.105cm" svg:y2="106.029cm" draw:start-shape="id474" draw:start-glue-point="4" draw:end-shape="id469" draw:end-glue-point="8" svg:d="M-43094 106509c0-360-11-120-11-480" svg:viewBox="0 0 12 481">
              <text:p/>
            </draw:connector>
            <draw:measure draw:style-name="gr582" draw:text-style-name="P167" draw:layer="measurelines" svg:x1="-42.622cm" svg:y1="108.335cm" svg:x2="-38.396cm" svg:y2="105.093cm">
              <text:p text:style-name="P166"><text:span text:style-name="T55">Suprise</text:span><text:span text:style-name="T55"><text:line-break/></text:span><text:span text:style-name="T55"><text:measure text:kind="gap"/></text:span><text:span text:style-name="T55">Wasserstein</text:span></text:p>
            </draw:measure>
          </draw:g>
        </draw:g>
        <draw:rect draw:style-name="gr41" draw:text-style-name="P5" xml:id="id475" draw:id="id475" draw:layer="layout" svg:width="2.064cm" svg:height="1.085cm" svg:x="-26.879cm" svg:y="74.622cm">
          <text:p text:style-name="P5">close-loop</text:p>
        </draw:rect>
        <draw:connector draw:style-name="gr293" draw:text-style-name="P15" draw:layer="layout" draw:type="curve" svg:x1="-21.159cm" svg:y1="71.636cm" svg:x2="-25.847cm" svg:y2="74.622cm" draw:start-shape="id361" draw:start-glue-point="2" draw:end-shape="id475" draw:end-glue-point="0" svg:d="M-21159 71636c0 2239-4688 747-4688 2986" svg:viewBox="0 0 4689 2987">
          <text:p/>
        </draw:connector>
        <draw:path draw:style-name="gr583" draw:text-style-name="P168"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83" draw:text-style-name="P168"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83" draw:text-style-name="P168" draw:layer="layout" svg:width="0.168cm" svg:height="0.432cm" svg:x="-28.37cm" svg:y="91.818cm" svg:viewBox="0 0 169 433" svg:d="M169 425c-19 5-39 8-59 8-46 0-70-26-70-79v-234h-40v-42h43l17-78h38v78h65v42h-65v221c0 17 3 29 9 36 5 6 15 10 28 10 8 0 19-2 34-5z">
          <text:p/>
        </draw:path>
        <draw:path draw:style-name="gr583" draw:text-style-name="P168"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83" draw:text-style-name="P168"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83" draw:text-style-name="P168" draw:layer="layout" svg:width="0.057cm" svg:height="0.479cm" svg:x="-27.161cm" svg:y="91.767cm" svg:viewBox="0 0 58 480" svg:d="M0 56c0-19 0-37 0-56 19 0 39 0 58 0 0 19 0 37 0 56-19 0-39 0-58 0zM0 480c0-117 0-233 0-350 19 0 39 0 58 0 0 117 0 233 0 350-19 0-39 0-58 0z">
          <text:p/>
        </draw:path>
        <draw:path draw:style-name="gr583" draw:text-style-name="P168"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83" draw:text-style-name="P168" draw:layer="layout" svg:width="0.168cm" svg:height="0.432cm" svg:x="-26.682cm" svg:y="91.818cm" svg:viewBox="0 0 169 433" svg:d="M169 425c-19 5-39 8-59 8-46 0-70-26-70-79v-234h-40v-42h43l17-78h38v78h65v42h-65v221c0 17 3 29 9 36 5 6 15 10 28 10 8 0 19-2 34-5z">
          <text:p/>
        </draw:path>
        <draw:g draw:style-name="gr23">
          <draw:path draw:style-name="gr584" draw:text-style-name="P169" draw:layer="layout" svg:width="0.194cm" svg:height="0.298cm" svg:x="-26.733cm" svg:y="92.957cm" svg:viewBox="0 0 195 299" svg:d="M186 45c-8-3-16-4-25-4-19 0-36 10-51 30s-26 45-31 75l-30 153h-49l44-225 7-38 5-31h46l-10 60h1c12-24 24-41 36-50 11-10 25-15 40-15 8 0 17 1 26 4z">
            <text:p/>
          </draw:path>
          <draw:path draw:style-name="gr584" draw:text-style-name="P169" draw:layer="layout" svg:width="0.205cm" svg:height="0.517cm" svg:x="-26.531cm" svg:y="92.853cm" svg:viewBox="0 0 206 518" svg:d="M206 0c-105 92-157 203-157 332 0 70 19 132 56 186h-47c-39-54-58-117-58-191 0-67 14-128 41-184 27-55 66-103 118-143z">
            <text:p/>
          </draw:path>
          <draw:path draw:style-name="gr584" draw:text-style-name="P169"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84" draw:text-style-name="P169" draw:layer="layout" svg:width="0.205cm" svg:height="0.517cm" svg:x="-26.273cm" svg:y="92.853cm" svg:viewBox="0 0 206 518" svg:d="M0 518c105-92 157-203 157-332 0-70-19-132-56-186h47c39 54 58 117 58 191 0 67-14 128-41 184-27 55-66 103-118 143z">
            <text:p/>
          </draw:path>
        </draw:g>
        <draw:path draw:style-name="gr585" draw:text-style-name="P5" draw:layer="layout" svg:width="4.073cm" svg:height="0cm" svg:x="-29.294cm" svg:y="92.706cm" svg:viewBox="0 0 4074 0" svg:d="M0 0c1358 0 2716 0 4074 0">
          <text:p/>
        </draw:path>
        <draw:path draw:style-name="gr586" draw:text-style-name="P170" draw:layer="layout" svg:width="0.316cm" svg:height="0.316cm" svg:x="-25.484cm" svg:y="92.547cm" svg:viewBox="0 0 317 317" svg:d="M0 0c106 53 211 106 317 159-106 53-211 105-317 158 0-106 0-211 0-317z">
          <text:p/>
        </draw:path>
        <draw:path draw:style-name="gr587" draw:text-style-name="P171"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8" draw:text-style-name="P129"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9" draw:text-style-name="P168"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9" draw:text-style-name="P168" draw:layer="layout" svg:width="0.32cm" svg:height="0.046cm" svg:x="-25.287cm" svg:y="93.431cm" svg:viewBox="0 0 321 47" svg:d="M0 47c0-16 0-31 0-47 107 0 214 0 321 0 0 16 0 31 0 47-107 0-214 0-321 0z">
          <text:p/>
        </draw:path>
        <draw:g draw:style-name="gr23">
          <draw:path draw:style-name="gr590" draw:text-style-name="P168"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90" draw:text-style-name="P168"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90" draw:text-style-name="P168"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90" draw:text-style-name="P168"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90" draw:text-style-name="P168"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90" draw:text-style-name="P168" draw:layer="layout" svg:width="0.123cm" svg:height="0.266cm" svg:x="-23.015cm" svg:y="89.987cm" svg:viewBox="0 0 124 267" svg:d="M2 267v-201c0-19-1-39-2-61h41c2 30 2 48 2 54h1c7-23 15-39 24-47 9-7 22-12 39-12 5 0 11 1 17 2v41c-5-2-14-3-23-3-18 0-32 8-42 23-9 16-14 38-14 68v136z">
            <text:p/>
          </draw:path>
          <draw:path draw:style-name="gr590" draw:text-style-name="P168"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90" draw:text-style-name="P168"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91" draw:text-style-name="P168"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91" draw:text-style-name="P168" draw:layer="layout" svg:width="0.123cm" svg:height="0.266cm" svg:x="-23.696cm" svg:y="90.683cm" svg:viewBox="0 0 124 267" svg:d="M2 267v-201c0-19-1-39-2-61h41c2 30 2 48 2 54h1c7-23 15-39 24-47 9-7 22-12 39-12 5 0 11 1 17 2v41c-5-2-14-3-23-3-18 0-32 8-42 23-9 16-14 38-14 68v136z">
            <text:p/>
          </draw:path>
          <draw:path draw:style-name="gr591" draw:text-style-name="P168" draw:layer="layout" svg:width="0.123cm" svg:height="0.266cm" svg:x="-23.531cm" svg:y="90.683cm" svg:viewBox="0 0 124 267" svg:d="M2 267v-201c0-19-1-39-2-61h41c2 30 2 48 2 54h1c7-23 15-39 24-47 9-7 22-12 39-12 5 0 11 1 17 2v41c-5-2-14-3-23-3-18 0-32 8-42 23-9 16-14 38-14 68v136z">
            <text:p/>
          </draw:path>
          <draw:path draw:style-name="gr591" draw:text-style-name="P168"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91" draw:text-style-name="P168"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92" draw:text-style-name="P169"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92" draw:text-style-name="P169" draw:layer="layout" svg:width="0.205cm" svg:height="0.517cm" svg:x="-23.721cm" svg:y="91.749cm" svg:viewBox="0 0 206 518" svg:d="M206 0c-105 92-157 203-157 332 0 70 19 132 56 186h-47c-39-54-58-117-58-191 0-67 14-128 41-184 27-55 66-103 118-143z">
            <text:p/>
          </draw:path>
          <draw:path draw:style-name="gr592" draw:text-style-name="P169"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92" draw:text-style-name="P169" draw:layer="layout" svg:width="0.205cm" svg:height="0.517cm" svg:x="-23.462cm" svg:y="91.749cm" svg:viewBox="0 0 206 518" svg:d="M0 518c105-92 157-203 157-332 0-70-19-132-56-186h47c39 54 58 117 58 191 0 67-14 128-41 184-27 55-66 103-118 143z">
            <text:p/>
          </draw:path>
        </draw:g>
        <draw:path draw:style-name="gr585" draw:text-style-name="P5" draw:layer="layout" svg:width="1.904cm" svg:height="0cm" svg:x="-24.161cm" svg:y="92.706cm" svg:viewBox="0 0 1905 0" svg:d="M0 0c635 0 1270 0 1905 0">
          <text:p/>
        </draw:path>
        <draw:path draw:style-name="gr586" draw:text-style-name="P170" draw:layer="layout" svg:width="0.317cm" svg:height="0.316cm" svg:x="-22.521cm" svg:y="92.547cm" svg:viewBox="0 0 318 317" svg:d="M0 0c106 53 212 106 318 159-106 53-212 105-318 158 0-106 0-211 0-317z">
          <text:p/>
        </draw:path>
        <draw:path draw:style-name="gr586" draw:text-style-name="P170" draw:layer="layout" svg:width="0.317cm" svg:height="0.316cm" svg:x="-22.521cm" svg:y="92.547cm" svg:viewBox="0 0 318 317" svg:d="M0 0c106 53 212 106 318 159-106 53-212 105-318 158 0-106 0-211 0-317z">
          <text:p/>
        </draw:path>
        <draw:path draw:style-name="gr593" draw:text-style-name="P172" draw:layer="layout" svg:width="4.629cm" svg:height="1.772cm" svg:x="-22.15cm" svg:y="91.595cm" svg:viewBox="0 0 4630 1773" svg:d="M0 0c1543 0 3087 0 4630 0 0 591 0 1182 0 1773-1543 0-3087 0-4630 0 0-591 0-1182 0-1773z">
          <text:p/>
        </draw:path>
        <draw:path draw:style-name="gr594" draw:text-style-name="P173" draw:layer="layout" svg:width="4.629cm" svg:height="1.772cm" svg:x="-22.15cm" svg:y="91.595cm" svg:viewBox="0 0 4630 1773" svg:d="M0 0c1543 0 3087 0 4630 0 0 591 0 1182 0 1773-1543 0-3087 0-4630 0 0-591 0-1182 0-1773z">
          <text:p/>
        </draw:path>
        <draw:g draw:style-name="gr23">
          <draw:path draw:style-name="gr595" draw:text-style-name="P174"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95" draw:text-style-name="P174"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95" draw:text-style-name="P174"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95" draw:text-style-name="P174" draw:layer="layout" svg:width="0.183cm" svg:height="0.471cm" svg:x="-20.2cm" svg:y="92.303cm" svg:viewBox="0 0 184 472" svg:d="M184 463c-21 6-42 9-64 9-51 0-76-30-76-87v-254h-44v-45h47l18-86h42v86h71v45h-71v240c0 19 3 32 10 39 6 7 15 11 31 11 8 0 20-1 36-5z">
            <text:p/>
          </draw:path>
          <draw:path draw:style-name="gr595" draw:text-style-name="P174" draw:layer="layout" svg:width="0.179cm" svg:height="0.387cm" svg:x="-19.962cm" svg:y="92.381cm" svg:viewBox="0 0 180 388" svg:d="M2 388v-293c0-26-1-55-2-88h60c1 44 2 69 2 78h2c10-32 22-55 35-67s31-18 56-18c8 0 16 1 25 4v57c-8-2-20-3-33-3-26 0-47 11-60 34-15 23-22 55-22 98v198z">
            <text:p/>
          </draw:path>
          <draw:path draw:style-name="gr595" draw:text-style-name="P174"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95" draw:text-style-name="P174" draw:layer="layout" svg:width="0.062cm" svg:height="0.522cm" svg:x="-19.321cm" svg:y="92.247cm" svg:viewBox="0 0 63 523" svg:d="M0 523c0-175 0-349 0-523 21 0 42 0 63 0 0 174 0 348 0 523-21 0-42 0-63 0z">
            <text:p/>
          </draw:path>
          <draw:path draw:style-name="gr595" draw:text-style-name="P174" draw:layer="layout" svg:width="0.062cm" svg:height="0.522cm" svg:x="-19.161cm" svg:y="92.247cm" svg:viewBox="0 0 63 523" svg:d="M0 523c0-175 0-349 0-523 21 0 42 0 63 0 0 174 0 348 0 523-21 0-42 0-63 0z">
            <text:p/>
          </draw:path>
          <draw:path draw:style-name="gr595" draw:text-style-name="P174"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95" draw:text-style-name="P174"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96" draw:text-style-name="P168"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96" draw:text-style-name="P168"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96" draw:text-style-name="P168"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96" draw:text-style-name="P168" draw:layer="layout" svg:width="0.113cm" svg:height="0.29cm" svg:x="-16.968cm" svg:y="90.242cm" svg:viewBox="0 0 114 291" svg:d="M114 286c-13 3-27 5-40 5-31 0-47-18-47-53v-157h-27v-29h29l11-52h26v52h44v29h-44v148c0 12 2 20 6 24 3 4 10 7 19 7 5 0 12-1 23-3z">
            <text:p/>
          </draw:path>
          <draw:path draw:style-name="gr596" draw:text-style-name="P168" draw:layer="layout" svg:width="0.11cm" svg:height="0.238cm" svg:x="-16.821cm" svg:y="90.291cm" svg:viewBox="0 0 111 239" svg:d="M1 239v-180c0-17 0-35-1-55h37c1 27 1 43 1 48h2c6-20 13-34 21-41s20-11 34-11c5 0 10 1 16 2v36c-5-2-12-2-21-2-16 0-28 7-37 20-9 15-13 35-13 61v122z">
            <text:p/>
          </draw:path>
          <draw:path draw:style-name="gr596" draw:text-style-name="P168"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96" draw:text-style-name="P168" draw:layer="layout" svg:width="0.038cm" svg:height="0.321cm" svg:x="-16.426cm" svg:y="90.208cm" svg:viewBox="0 0 39 322" svg:d="M0 322c0-107 0-215 0-322 13 0 26 0 39 0 0 107 0 215 0 322-13 0-26 0-39 0z">
            <text:p/>
          </draw:path>
          <draw:path draw:style-name="gr596" draw:text-style-name="P168" draw:layer="layout" svg:width="0.038cm" svg:height="0.321cm" svg:x="-16.328cm" svg:y="90.208cm" svg:viewBox="0 0 39 322" svg:d="M0 322c0-107 0-215 0-322 13 0 26 0 39 0 0 107 0 215 0 322-13 0-26 0-39 0z">
            <text:p/>
          </draw:path>
          <draw:path draw:style-name="gr596" draw:text-style-name="P168"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96" draw:text-style-name="P168" draw:layer="layout" svg:width="0.11cm" svg:height="0.238cm" svg:x="-15.983cm" svg:y="90.291cm" svg:viewBox="0 0 111 239" svg:d="M1 239v-180c0-17 0-35-1-55h37c1 27 1 43 1 48h2c6-20 13-34 21-41s20-11 34-11c5 0 10 1 16 2v36c-5-2-12-2-21-2-16 0-28 7-37 20-9 15-13 35-13 61v122z">
            <text:p/>
          </draw:path>
          <draw:path draw:style-name="gr597" draw:text-style-name="P168"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7" draw:text-style-name="P168"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7" draw:text-style-name="P168" draw:layer="layout" svg:width="0.113cm" svg:height="0.29cm" svg:x="-16.887cm" svg:y="90.864cm" svg:viewBox="0 0 114 291" svg:d="M114 286c-13 3-27 5-40 5-31 0-47-18-47-53v-157h-27v-29h29l11-52h26v52h44v29h-44v148c0 12 2 20 6 24 3 4 10 7 19 7 5 0 12-1 23-3z">
            <text:p/>
          </draw:path>
          <draw:path draw:style-name="gr597" draw:text-style-name="P168"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7" draw:text-style-name="P168"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7" draw:text-style-name="P168" draw:layer="layout" svg:width="0.113cm" svg:height="0.29cm" svg:x="-16.27cm" svg:y="90.864cm" svg:viewBox="0 0 114 291" svg:d="M114 286c-13 3-27 5-40 5-31 0-47-18-47-53v-157h-27v-29h29l11-52h26v52h44v29h-44v148c0 12 2 20 6 24 3 4 10 7 19 7 5 0 12-1 23-3z">
            <text:p/>
          </draw:path>
        </draw:g>
        <draw:path draw:style-name="gr592" draw:text-style-name="P169"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92" draw:text-style-name="P169" draw:layer="layout" svg:width="0.205cm" svg:height="0.517cm" svg:x="-16.895cm" svg:y="91.749cm" svg:viewBox="0 0 206 518" svg:d="M206 0c-105 92-157 203-157 332 0 70 19 132 56 186h-47c-39-54-58-117-58-191 0-67 14-128 41-184 27-55 66-103 118-143z">
          <text:p/>
        </draw:path>
        <draw:path draw:style-name="gr592" draw:text-style-name="P169"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92" draw:text-style-name="P169" draw:layer="layout" svg:width="0.205cm" svg:height="0.517cm" svg:x="-16.636cm" svg:y="91.749cm" svg:viewBox="0 0 206 518" svg:d="M0 518c105-92 157-203 157-332 0-70-19-132-56-186h47c39 54 58 117 58 191 0 67-14 128-41 184-27 55-66 103-118 143z">
          <text:p/>
        </draw:path>
        <draw:path draw:style-name="gr585" draw:text-style-name="P5" draw:layer="layout" svg:width="1.692cm" svg:height="0cm" svg:x="-17.52cm" svg:y="92.706cm" svg:viewBox="0 0 1693 0" svg:d="M0 0c564 0 1129 0 1693 0">
          <text:p/>
        </draw:path>
        <draw:path draw:style-name="gr586" draw:text-style-name="P170" draw:layer="layout" svg:width="0.317cm" svg:height="0.316cm" svg:x="-16.092cm" svg:y="92.547cm" svg:viewBox="0 0 318 317" svg:d="M0 0c106 53 212 106 318 159-106 53-212 105-318 158 0-106 0-211 0-317z">
          <text:p/>
        </draw:path>
        <draw:path draw:style-name="gr586" draw:text-style-name="P170" draw:layer="layout" svg:width="0.317cm" svg:height="0.316cm" svg:x="-16.092cm" svg:y="92.547cm" svg:viewBox="0 0 318 317" svg:d="M0 0c106 53 212 106 318 159-106 53-212 105-318 158 0-106 0-211 0-317z">
          <text:p/>
        </draw:path>
        <draw:path draw:style-name="gr586" draw:text-style-name="P170" draw:layer="layout" svg:width="0.317cm" svg:height="0.316cm" svg:x="-16.092cm" svg:y="92.547cm" svg:viewBox="0 0 318 317" svg:d="M0 0c106 53 212 106 318 159-106 53-212 105-318 158 0-106 0-211 0-317z">
          <text:p/>
        </draw:path>
        <draw:path draw:style-name="gr598" draw:text-style-name="P175" draw:layer="layout" svg:width="4.1cm" svg:height="1.772cm" svg:x="-15.721cm" svg:y="91.595cm" svg:viewBox="0 0 4101 1773" svg:d="M0 0c1367 0 2734 0 4101 0 0 591 0 1182 0 1773-1367 0-2734 0-4101 0 0-591 0-1182 0-1773z">
          <text:p/>
        </draw:path>
        <draw:path draw:style-name="gr599" draw:text-style-name="P176" draw:layer="layout" svg:width="4.1cm" svg:height="1.772cm" svg:x="-15.721cm" svg:y="91.595cm" svg:viewBox="0 0 4101 1773" svg:d="M0 0c1367 0 2734 0 4101 0 0 591 0 1182 0 1773-1367 0-2734 0-4101 0 0-591 0-1182 0-1773z">
          <text:p/>
        </draw:path>
        <draw:g draw:style-name="gr23">
          <draw:path draw:style-name="gr600" draw:text-style-name="P174" draw:layer="layout" svg:width="0.43cm" svg:height="0.447cm" svg:x="-14.995cm" svg:y="92.224cm" svg:viewBox="0 0 431 448" svg:d="M370 448l-51-131h-205l-51 131h-63l183-448h69l179 448zM216 46l-3 8c-5 18-13 41-23 68l-57 148h167l-58-148c-5-15-11-32-17-50z">
            <text:p/>
          </draw:path>
          <draw:path draw:style-name="gr600" draw:text-style-name="P174"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600" draw:text-style-name="P174" draw:layer="layout" svg:width="0.165cm" svg:height="0.425cm" svg:x="-14.227cm" svg:y="92.251cm" svg:viewBox="0 0 166 426" svg:d="M166 418c-18 5-38 8-58 8-46 0-68-26-68-78v-229h-40v-42h42l17-77h38v77h64v42h-64v216c0 17 2 29 8 36 6 6 14 9 28 9 8 0 19-1 33-4z">
            <text:p/>
          </draw:path>
          <draw:path draw:style-name="gr600" draw:text-style-name="P174"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600" draw:text-style-name="P174"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600" draw:text-style-name="P174" draw:layer="layout" svg:width="0.165cm" svg:height="0.425cm" svg:x="-13.322cm" svg:y="92.251cm" svg:viewBox="0 0 166 426" svg:d="M166 418c-18 5-38 8-58 8-46 0-68-26-68-78v-229h-40v-42h42l17-77h38v77h64v42h-64v216c0 17 2 29 8 36 6 6 14 9 28 9 8 0 19-1 33-4z">
            <text:p/>
          </draw:path>
          <draw:path draw:style-name="gr600" draw:text-style-name="P174"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600" draw:text-style-name="P174"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601" draw:text-style-name="P168"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601" draw:text-style-name="P168"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601" draw:text-style-name="P168"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601" draw:text-style-name="P168" draw:layer="layout" svg:width="0.125cm" svg:height="0.322cm" svg:x="-10.922cm" svg:y="90.298cm" svg:viewBox="0 0 126 323" svg:d="M126 317c-14 4-29 6-44 6-34 0-52-19-52-59v-174h-30v-32h32l13-58h28v58h49v32h-49v165c0 12 2 21 7 27 4 4 11 7 21 7 6 0 14-1 25-4z">
            <text:p/>
          </draw:path>
          <draw:path draw:style-name="gr601" draw:text-style-name="P168"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601" draw:text-style-name="P168"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91" draw:text-style-name="P168" draw:layer="layout" svg:width="0.045cm" svg:height="0.339cm" svg:x="-11.43cm" svg:y="90.97cm" svg:viewBox="0 0 46 340" svg:d="M0 340c0-114 0-226 0-340 16 0 31 0 46 0 0 114 0 226 0 340-15 0-30 0-46 0z">
            <text:p/>
          </draw:path>
          <draw:path draw:style-name="gr591" draw:text-style-name="P168"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91" draw:text-style-name="P168"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91" draw:text-style-name="P168"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91" draw:text-style-name="P168" draw:layer="layout" svg:width="0.125cm" svg:height="0.322cm" svg:x="-10.509cm" svg:y="90.99cm" svg:viewBox="0 0 126 323" svg:d="M126 317c-14 4-29 6-44 6-34 0-52-19-52-59v-174h-30v-32h32l13-58h28v58h49v32h-49v165c0 12 2 21 7 27 4 4 11 7 21 7 6 0 14-1 25-4z">
            <text:p/>
          </draw:path>
        </draw:g>
        <draw:path draw:style-name="gr602" draw:text-style-name="P169"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603" draw:text-style-name="P177"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604" draw:text-style-name="P169" draw:layer="layout" svg:width="0.205cm" svg:height="0.517cm" svg:x="-10.775cm" svg:y="91.749cm" svg:viewBox="0 0 206 518" svg:d="M206 0c-105 92-157 203-157 332 0 70 19 132 56 186h-47c-39-54-58-117-58-191 0-67 14-128 41-184 27-55 66-103 118-143z">
          <text:p/>
        </draw:path>
        <draw:path draw:style-name="gr604" draw:text-style-name="P169"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604" draw:text-style-name="P169" draw:layer="layout" svg:width="0.205cm" svg:height="0.517cm" svg:x="-10.516cm" svg:y="91.749cm" svg:viewBox="0 0 206 518" svg:d="M0 518c105-92 157-203 157-332 0-70-19-132-56-186h47c39 54 58 117 58 191 0 67-14 128-41 184-27 55-66 103-118 143z">
          <text:p/>
        </draw:path>
        <draw:path draw:style-name="gr585" draw:text-style-name="P5" draw:layer="layout" svg:width="2.3cm" svg:height="0cm" svg:x="-11.621cm" svg:y="92.706cm" svg:viewBox="0 0 2301 0" svg:d="M0 0c767 0 1534 0 2301 0">
          <text:p/>
        </draw:path>
        <draw:path draw:style-name="gr586" draw:text-style-name="P170" draw:layer="layout" svg:width="0.316cm" svg:height="0.316cm" svg:x="-9.584cm" svg:y="92.547cm" svg:viewBox="0 0 317 317" svg:d="M0 0c106 53 211 106 317 159-106 53-211 105-317 158 0-106 0-211 0-317z">
          <text:p/>
        </draw:path>
        <draw:path draw:style-name="gr586" draw:text-style-name="P170" draw:layer="layout" svg:width="0.316cm" svg:height="0.316cm" svg:x="-9.584cm" svg:y="92.547cm" svg:viewBox="0 0 317 317" svg:d="M0 0c106 53 211 106 317 159-106 53-211 105-317 158 0-106 0-211 0-317z">
          <text:p/>
        </draw:path>
        <draw:path draw:style-name="gr586" draw:text-style-name="P170" draw:layer="layout" svg:width="0.316cm" svg:height="0.316cm" svg:x="-9.584cm" svg:y="92.547cm" svg:viewBox="0 0 317 317" svg:d="M0 0c106 53 211 106 317 159-106 53-211 105-317 158 0-106 0-211 0-317z">
          <text:p/>
        </draw:path>
        <draw:path draw:style-name="gr586" draw:text-style-name="P170" draw:layer="layout" svg:width="0.316cm" svg:height="0.316cm" svg:x="-9.584cm" svg:y="92.547cm" svg:viewBox="0 0 317 317" svg:d="M0 0c106 53 211 106 317 159-106 53-211 105-317 158 0-106 0-211 0-317z">
          <text:p/>
        </draw:path>
        <draw:g draw:style-name="gr23">
          <draw:path draw:style-name="gr605" draw:text-style-name="P168"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605" draw:text-style-name="P168" draw:layer="layout" svg:width="0.049cm" svg:height="0.357cm" svg:x="-9.082cm" svg:y="88.46cm" svg:viewBox="0 0 50 358" svg:d="M0 42c0-14 0-28 0-42 16 0 33 0 50 0 0 14 0 28 0 42-17 0-34 0-50 0zM0 358c0-88 0-174 0-261 16 0 33 0 50 0 0 87 0 173 0 261-17 0-34 0-50 0z">
            <text:p/>
          </draw:path>
          <draw:path draw:style-name="gr605" draw:text-style-name="P168"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605" draw:text-style-name="P168" draw:layer="layout" svg:width="0.144cm" svg:height="0.322cm" svg:x="-8.703cm" svg:y="88.498cm" svg:viewBox="0 0 145 323" svg:d="M145 317c-17 3-34 6-51 6-39 0-60-20-60-59v-175h-34v-31h37l14-58h33v58h56v31h-56v165c0 13 3 22 8 27 4 4 12 7 24 7 6 0 16-1 29-3z">
            <text:p/>
          </draw:path>
          <draw:path draw:style-name="gr605" draw:text-style-name="P168"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605" draw:text-style-name="P168" draw:layer="layout" svg:width="0.14cm" svg:height="0.264cm" svg:x="-8.202cm" svg:y="88.552cm" svg:viewBox="0 0 141 265" svg:d="M2 265v-199c0-19-1-39-2-62h47c2 30 2 48 2 54h2c7-22 17-38 27-46s25-12 44-12c6 0 12 1 19 2v40c-6-2-15-3-26-3-21 0-36 9-47 24s-17 38-17 67v135z">
            <text:p/>
          </draw:path>
          <draw:path draw:style-name="gr605" draw:text-style-name="P168"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605" draw:text-style-name="P168"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605" draw:text-style-name="P168"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605" draw:text-style-name="P168"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605" draw:text-style-name="P168"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92" draw:text-style-name="P169"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92" draw:text-style-name="P169" draw:layer="layout" svg:width="0.205cm" svg:height="0.517cm" svg:x="-7.61cm" svg:y="89.765cm" svg:viewBox="0 0 206 518" svg:d="M206 0c-105 92-157 203-157 332 0 70 19 132 56 186h-47c-39-54-58-117-58-191 0-67 14-128 41-184 27-55 66-103 118-143z">
          <text:p/>
        </draw:path>
        <draw:path draw:style-name="gr592" draw:text-style-name="P169"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92" draw:text-style-name="P169" draw:layer="layout" svg:width="0.205cm" svg:height="0.517cm" svg:x="-7.351cm" svg:y="89.765cm" svg:viewBox="0 0 206 518" svg:d="M0 518c105-92 157-203 157-332 0-70-19-132-56-186h47c39 54 58 117 58 191 0 67-14 128-41 184-27 55-66 103-118 143z">
          <text:p/>
        </draw:path>
        <draw:path draw:style-name="gr606" draw:text-style-name="P5" draw:layer="layout" svg:width="2.3cm" svg:height="0cm" draw:transform="rotate (-1.5707963267949) translate (-8.0757565784782cm 89.0559062241644cm)" svg:viewBox="0 0 2301 0" svg:d="M0 0c767 0 1534 0 2301 0">
          <text:p/>
        </draw:path>
        <draw:path draw:style-name="gr607" draw:text-style-name="P178" draw:layer="layout" svg:width="0.317cm" svg:height="0.316cm" svg:x="-8.235cm" svg:y="91.093cm" svg:viewBox="0 0 318 317" svg:d="M318 0c-53 106-106 211-159 317-53-106-106-211-159-317 106 0 212 0 318 0z">
          <text:p/>
        </draw:path>
        <draw:path draw:style-name="gr608" draw:text-style-name="P179" draw:layer="layout" svg:width="4.497cm" svg:height="1.772cm" svg:x="-9.214cm" svg:y="91.595cm" svg:viewBox="0 0 4498 1773" svg:d="M0 0c1499 0 2999 0 4498 0 0 591 0 1182 0 1773-1499 0-2999 0-4498 0 0-591 0-1182 0-1773z">
          <text:p/>
        </draw:path>
        <draw:path draw:style-name="gr609" draw:text-style-name="P180" draw:layer="layout" svg:width="4.497cm" svg:height="1.772cm" svg:x="-9.214cm" svg:y="91.595cm" svg:viewBox="0 0 4498 1773" svg:d="M0 0c1499 0 2999 0 4498 0 0 591 0 1182 0 1773-1499 0-2999 0-4498 0 0-591 0-1182 0-1773z">
          <text:p/>
        </draw:path>
        <draw:path draw:style-name="gr610" draw:text-style-name="P169"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10" draw:text-style-name="P169" draw:layer="layout" svg:width="0.205cm" svg:height="0.517cm" svg:x="-4.175cm" svg:y="91.749cm" svg:viewBox="0 0 206 518" svg:d="M206 0c-105 92-157 203-157 332 0 70 19 132 56 186h-47c-39-54-58-117-58-191 0-67 14-128 41-184 27-55 66-103 118-143z">
          <text:p/>
        </draw:path>
        <draw:path draw:style-name="gr610" draw:text-style-name="P169"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10" draw:text-style-name="P169" draw:layer="layout" svg:width="0.205cm" svg:height="0.517cm" svg:x="-3.916cm" svg:y="91.749cm" svg:viewBox="0 0 206 518" svg:d="M0 518c105-92 157-203 157-332 0-70-19-132-56-186h47c39 54 58 117 58 191 0 67-14 128-41 184-27 55-66 103-118 143z">
          <text:p/>
        </draw:path>
        <draw:path draw:style-name="gr585" draw:text-style-name="P5" draw:layer="layout" svg:width="3.095cm" svg:height="0cm" svg:x="-4.716cm" svg:y="92.706cm" svg:viewBox="0 0 3096 0" svg:d="M0 0c1032 0 2064 0 3096 0">
          <text:p/>
        </draw:path>
        <draw:path draw:style-name="gr586" draw:text-style-name="P170" draw:layer="layout" svg:width="0.317cm" svg:height="0.316cm" svg:x="-1.885cm" svg:y="92.547cm" svg:viewBox="0 0 318 317" svg:d="M0 0c106 53 212 106 318 159-106 53-212 105-318 158 0-106 0-211 0-317z">
          <text:p/>
        </draw:path>
        <draw:path draw:style-name="gr586" draw:text-style-name="P170" draw:layer="layout" svg:width="0.317cm" svg:height="0.316cm" svg:x="-1.885cm" svg:y="92.547cm" svg:viewBox="0 0 318 317" svg:d="M0 0c106 53 212 106 318 159-106 53-212 105-318 158 0-106 0-211 0-317z">
          <text:p/>
        </draw:path>
        <draw:path draw:style-name="gr586" draw:text-style-name="P170" draw:layer="layout" svg:width="0.317cm" svg:height="0.316cm" svg:x="-1.885cm" svg:y="92.547cm" svg:viewBox="0 0 318 317" svg:d="M0 0c106 53 212 106 318 159-106 53-212 105-318 158 0-106 0-211 0-317z">
          <text:p/>
        </draw:path>
        <draw:path draw:style-name="gr586" draw:text-style-name="P170" draw:layer="layout" svg:width="0.317cm" svg:height="0.316cm" svg:x="-1.885cm" svg:y="92.547cm" svg:viewBox="0 0 318 317" svg:d="M0 0c106 53 212 106 318 159-106 53-212 105-318 158 0-106 0-211 0-317z">
          <text:p/>
        </draw:path>
        <draw:path draw:style-name="gr586" draw:text-style-name="P170" draw:layer="layout" svg:width="0.317cm" svg:height="0.316cm" svg:x="-1.885cm" svg:y="92.547cm" svg:viewBox="0 0 318 317" svg:d="M0 0c106 53 212 106 318 159-106 53-212 105-318 158 0-106 0-211 0-317z">
          <text:p/>
        </draw:path>
        <draw:path draw:style-name="gr585" draw:text-style-name="P5" draw:layer="layout" svg:width="7.169cm" svg:height="2.406cm" svg:x="-10.272cm" svg:y="92.706cm" svg:viewBox="0 0 7170 2407" svg:d="M7170 0c0 802 0 1604 0 2407-2390 0-4780 0-7170 0">
          <text:p/>
        </draw:path>
        <draw:path draw:style-name="gr586" draw:text-style-name="P170" draw:layer="layout" svg:width="0.317cm" svg:height="0.317cm" svg:x="-10.325cm" svg:y="94.954cm" svg:viewBox="0 0 318 318" svg:d="M318 318c-106-53-212-106-318-159 106-53 212-106 318-159 0 106 0 212 0 318z">
          <text:p/>
        </draw:path>
        <draw:path draw:style-name="gr586" draw:text-style-name="P170" draw:layer="layout" svg:width="0.317cm" svg:height="0.317cm" svg:x="-10.325cm" svg:y="94.954cm" svg:viewBox="0 0 318 318" svg:d="M318 318c-106-53-212-106-318-159 106-53 212-106 318-159 0 106 0 212 0 318z">
          <text:p/>
        </draw:path>
        <draw:path draw:style-name="gr586" draw:text-style-name="P170" draw:layer="layout" svg:width="0.317cm" svg:height="0.317cm" svg:x="-10.325cm" svg:y="94.954cm" svg:viewBox="0 0 318 318" svg:d="M318 318c-106-53-212-106-318-159 106-53 212-106 318-159 0 106 0 212 0 318z">
          <text:p/>
        </draw:path>
        <draw:path draw:style-name="gr586" draw:text-style-name="P170" draw:layer="layout" svg:width="0.317cm" svg:height="0.317cm" svg:x="-10.325cm" svg:y="94.954cm" svg:viewBox="0 0 318 318" svg:d="M318 318c-106-53-212-106-318-159 106-53 212-106 318-159 0 106 0 212 0 318z">
          <text:p/>
        </draw:path>
        <draw:path draw:style-name="gr586" draw:text-style-name="P170" draw:layer="layout" svg:width="0.317cm" svg:height="0.317cm" svg:x="-10.325cm" svg:y="94.954cm" svg:viewBox="0 0 318 318" svg:d="M318 318c-106-53-212-106-318-159 106-53 212-106 318-159 0 106 0 212 0 318z">
          <text:p/>
        </draw:path>
        <draw:path draw:style-name="gr586" draw:text-style-name="P170" draw:layer="layout" svg:width="0.317cm" svg:height="0.317cm" svg:x="-10.325cm" svg:y="94.954cm" svg:viewBox="0 0 318 318" svg:d="M318 318c-106-53-212-106-318-159 106-53 212-106 318-159 0 106 0 212 0 318z">
          <text:p/>
        </draw:path>
        <draw:path draw:style-name="gr611" draw:text-style-name="P181" draw:layer="layout" svg:width="5.185cm" svg:height="1.533cm" svg:x="-15.536cm" svg:y="94.346cm" svg:viewBox="0 0 5186 1534" svg:d="M0 0c1729 0 3457 0 5186 0 0 511 0 1023 0 1534-1729 0-3457 0-5186 0 0-511 0-1023 0-1534z">
          <text:p/>
        </draw:path>
        <draw:path draw:style-name="gr612" draw:text-style-name="P182" draw:layer="layout" svg:width="5.185cm" svg:height="1.533cm" svg:x="-15.536cm" svg:y="94.346cm" svg:viewBox="0 0 5186 1534" svg:d="M0 0c1729 0 3457 0 5186 0 0 511 0 1023 0 1534-1729 0-3457 0-5186 0 0-511 0-1023 0-1534z">
          <text:p/>
        </draw:path>
        <draw:g draw:style-name="gr23">
          <draw:path draw:style-name="gr613" draw:text-style-name="P174"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13" draw:text-style-name="P174"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13" draw:text-style-name="P174"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13" draw:text-style-name="P174"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13" draw:text-style-name="P174"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13" draw:text-style-name="P174" draw:layer="layout" svg:width="0.184cm" svg:height="0.398cm" svg:x="-12.073cm" svg:y="94.987cm" svg:viewBox="0 0 185 399" svg:d="M2 399v-301c0-27-1-57-2-91h62c1 45 2 71 2 80h2c10-33 22-56 36-69 13-12 32-18 57-18 9 0 17 1 26 4v59c-8-2-20-3-34-3-27 0-48 11-62 35-15 23-22 56-22 100v204z">
            <text:p/>
          </draw:path>
        </draw:g>
        <draw:path draw:style-name="gr585" draw:text-style-name="P5" draw:layer="layout" svg:width="9.127cm" svg:height="1.904cm" svg:x="-24.664cm" svg:y="93.208cm" svg:viewBox="0 0 9128 1905" svg:d="M9128 1905c-3043 0-6085 0-9128 0 0-635 0-1270 0-1905">
          <text:p/>
        </draw:path>
        <draw:path draw:style-name="gr586" draw:text-style-name="P170" draw:layer="layout" svg:width="0.317cm" svg:height="0.317cm" svg:x="-24.823cm" svg:y="93.155cm" svg:viewBox="0 0 318 318" svg:d="M0 318c53-106 106-212 159-318 53 106 106 212 159 318-106 0-212 0-318 0z">
          <text:p/>
        </draw:path>
        <draw:path draw:style-name="gr586" draw:text-style-name="P170" draw:layer="layout" svg:width="0.317cm" svg:height="0.317cm" svg:x="-24.823cm" svg:y="93.155cm" svg:viewBox="0 0 318 318" svg:d="M0 318c53-106 106-212 159-318 53 106 106 212 159 318-106 0-212 0-318 0z">
          <text:p/>
        </draw:path>
        <draw:path draw:style-name="gr586" draw:text-style-name="P170" draw:layer="layout" svg:width="0.317cm" svg:height="0.317cm" svg:x="-24.823cm" svg:y="93.155cm" svg:viewBox="0 0 318 318" svg:d="M0 318c53-106 106-212 159-318 53 106 106 212 159 318-106 0-212 0-318 0z">
          <text:p/>
        </draw:path>
        <draw:path draw:style-name="gr586" draw:text-style-name="P170" draw:layer="layout" svg:width="0.317cm" svg:height="0.317cm" svg:x="-24.823cm" svg:y="93.155cm" svg:viewBox="0 0 318 318" svg:d="M0 318c53-106 106-212 159-318 53 106 106 212 159 318-106 0-212 0-318 0z">
          <text:p/>
        </draw:path>
        <draw:path draw:style-name="gr586" draw:text-style-name="P170" draw:layer="layout" svg:width="0.317cm" svg:height="0.317cm" svg:x="-24.823cm" svg:y="93.155cm" svg:viewBox="0 0 318 318" svg:d="M0 318c53-106 106-212 159-318 53 106 106 212 159 318-106 0-212 0-318 0z">
          <text:p/>
        </draw:path>
        <draw:path draw:style-name="gr586" draw:text-style-name="P170" draw:layer="layout" svg:width="0.317cm" svg:height="0.317cm" svg:x="-24.823cm" svg:y="93.155cm" svg:viewBox="0 0 318 318" svg:d="M0 318c53-106 106-212 159-318 53 106 106 212 159 318-106 0-212 0-318 0z">
          <text:p/>
        </draw:path>
        <draw:path draw:style-name="gr586" draw:text-style-name="P170" draw:layer="layout" svg:width="0.317cm" svg:height="0.317cm" svg:x="-24.823cm" svg:y="93.155cm" svg:viewBox="0 0 318 318" svg:d="M0 318c53-106 106-212 159-318 53 106 106 212 159 318-106 0-212 0-318 0z">
          <text:p/>
        </draw:path>
        <draw:g draw:style-name="gr23">
          <draw:path draw:style-name="gr614" draw:text-style-name="P168"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14" draw:text-style-name="P168"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14" draw:text-style-name="P168"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14" draw:text-style-name="P168"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14" draw:text-style-name="P168"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14" draw:text-style-name="P168" draw:layer="layout" svg:width="0.116cm" svg:height="0.25cm" svg:x="-20.632cm" svg:y="94.666cm" svg:viewBox="0 0 117 251" svg:d="M1 251v-189c0-17 0-37-1-58h39c1 28 1 45 1 51h2c6-21 14-36 22-44 9-7 21-11 36-11 5 0 11 1 17 2v38c-5-2-13-3-22-3-17 0-30 8-39 22-9 15-14 36-14 64v128z">
            <text:p/>
          </draw:path>
          <draw:path draw:style-name="gr614" draw:text-style-name="P168"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14" draw:text-style-name="P168"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14" draw:text-style-name="P168"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14" draw:text-style-name="P168"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14" draw:text-style-name="P168" draw:layer="layout" svg:width="0.118cm" svg:height="0.305cm" svg:x="-19.23cm" svg:y="94.615cm" svg:viewBox="0 0 119 306" svg:d="M119 300c-13 4-27 6-41 6-33 0-50-19-50-56v-165h-28v-30h30l12-55h27v55h46v30h-46v156c0 12 2 20 7 25 3 5 10 7 19 7 6 0 14-1 24-3z">
            <text:p/>
          </draw:path>
          <draw:path draw:style-name="gr614" draw:text-style-name="P168"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14" draw:text-style-name="P168"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14" draw:text-style-name="P168" draw:layer="layout" svg:width="0.118cm" svg:height="0.305cm" svg:x="-18.581cm" svg:y="94.615cm" svg:viewBox="0 0 119 306" svg:d="M119 300c-13 4-27 6-41 6-33 0-50-19-50-56v-165h-28v-30h30l12-55h27v55h46v30h-46v156c0 12 2 20 7 25 3 5 10 7 19 7 6 0 14-1 24-3z">
            <text:p/>
          </draw:path>
        </draw:g>
        <draw:path draw:style-name="gr615" draw:text-style-name="P169"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16" draw:text-style-name="P177"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604" draw:text-style-name="P169" draw:layer="layout" svg:width="0.205cm" svg:height="0.517cm" svg:x="-19.717cm" svg:y="95.399cm" svg:viewBox="0 0 206 518" svg:d="M206 0c-105 92-157 203-157 332 0 70 19 132 56 186h-47c-39-54-58-117-58-191 0-67 14-128 41-184 27-55 66-103 118-143z">
          <text:p/>
        </draw:path>
        <draw:path draw:style-name="gr604" draw:text-style-name="P169"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604" draw:text-style-name="P169" draw:layer="layout" svg:width="0.205cm" svg:height="0.517cm" svg:x="-19.458cm" svg:y="95.399cm" svg:viewBox="0 0 206 518" svg:d="M0 518c105-92 157-203 157-332 0-70-19-132-56-186h47c39 54 58 117 58 191 0 67-14 128-41 184-27 55-66 103-118 143z">
          <text:p/>
        </draw:path>
        <draw:frame draw:style-name="gr617" draw:text-style-name="P183" draw:layer="layout" svg:width="2.196cm" svg:height="0.962cm" svg:x="-8.062cm" svg:y="91.966cm">
          <draw:text-box>
            <text:p><text:span text:style-name="T56">Robot</text:span></text:p>
          </draw:text-box>
        </draw:frame>
        <draw:g draw:style-name="gr31">
          <draw:frame draw:style-name="gr135" draw:text-style-name="P41" draw:layer="layout" svg:width="11.057cm" svg:height="1.903cm" svg:x="-19.898cm" svg:y="98.753cm">
            <draw:image xlink:href="Pictures/10000000000001A200000048E815E1E3.png" xlink:type="simple" xlink:show="embed" xlink:actuate="onLoad" draw:mime-type="image/png">
              <text:p/>
            </draw:image>
          </draw:frame>
          <draw:custom-shape draw:style-name="gr618" draw:text-style-name="P41" xml:id="id476" draw:id="id476" draw:layer="layout" svg:width="0.613cm" svg:height="2.033cm" draw:transform="rotate (-1.5707963267949) translate (-15.255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9" draw:text-style-name="P38" xml:id="id477" draw:id="id477" draw:layer="layout" svg:width="3.869cm" svg:height="1.838cm" svg:x="-16.453cm" svg:y="102.017cm">
            <draw:text-box>
              <text:p text:style-name="P66"><text:span text:style-name="T57">Replace with</text:span><text:span text:style-name="T57"><text:line-break/></text:span><text:span text:style-name="T57">anomaly value</text:span><text:span text:style-name="T57"><text:line-break/></text:span><text:span text:style-name="T57">(Wasserstein)</text:span></text:p>
            </draw:text-box>
          </draw:frame>
          <draw:custom-shape draw:style-name="gr618" draw:text-style-name="P41" xml:id="id478" draw:id="id478" draw:layer="layout" svg:width="0.613cm" svg:height="2.033cm" draw:transform="rotate (-1.5707963267949) translate (-12.054cm 100.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20" draw:text-style-name="P15" draw:layer="layout" draw:type="curve" svg:x1="-16.271cm" svg:y1="100.902cm" svg:x2="-14.518cm" svg:y2="102.017cm" draw:start-shape="id476" draw:start-glue-point="6" draw:end-shape="id477" draw:end-glue-point="0" svg:d="M-16271 100902c0 837 1753 280 1753 1115" svg:viewBox="0 0 1754 1116">
            <text:p/>
          </draw:connector>
          <draw:connector draw:style-name="gr621" draw:text-style-name="P15" draw:layer="layout" draw:type="curve" svg:x1="-13.07cm" svg:y1="100.903cm" svg:x2="-14.518cm" svg:y2="102.017cm" draw:start-shape="id478" draw:start-glue-point="6" draw:end-shape="id477" draw:end-glue-point="0" svg:d="M-13070 100903c0 837-1448 280-1448 1114" svg:viewBox="0 0 1449 1115">
            <text:p/>
          </draw:connector>
          <draw:frame draw:style-name="gr622" draw:text-style-name="P38" draw:layer="layout" svg:width="4.869cm" svg:height="1.199cm" svg:x="-10.776cm" svg:y="100.023cm">
            <draw:text-box>
              <text:p>U<text:span text:style-name="T58">k is from the second derivative</text:span><text:span text:style-name="T58"><text:line-break/></text:span><text:span text:style-name="T58">(nu clustering is need for 2</text:span><text:span text:style-name="T59">nd</text:span><text:span text:style-name="T58"> derivative)</text:span></text:p>
            </draw:text-box>
          </draw:frame>
          <draw:frame draw:style-name="gr623" draw:text-style-name="P38" draw:layer="layout" svg:width="4.973cm" svg:height="1.199cm" svg:x="-19.683cm" svg:y="104.526cm">
            <draw:text-box>
              <text:p>MPC cost function used<text:line-break/>in PX4</text:p>
            </draw:text-box>
          </draw:frame>
          <draw:frame draw:style-name="gr574" draw:text-style-name="P5" draw:layer="layout" svg:width="6.644cm" svg:height="1.142cm" svg:x="-12.575cm" svg:y="104.393cm">
            <draw:object xlink:href="./Object 5" xlink:type="simple" xlink:show="embed" xlink:actuate="onLoad">
              <loext:p/>
            </draw:object>
            <draw:image xlink:href="./ObjectReplacements/Object 5" xlink:type="simple" xlink:show="embed" xlink:actuate="onLoad"/>
          </draw:frame>
        </draw:g>
        <draw:rect draw:style-name="gr298" draw:text-style-name="P75" xml:id="id480" draw:id="id480" draw:layer="layout" svg:width="2.927cm" svg:height="1cm" svg:x="86.678cm" svg:y="57.757cm">
          <text:p text:style-name="P184">remembering</text:p>
        </draw:rect>
        <draw:connector draw:style-name="gr293" draw:text-style-name="P15" draw:layer="layout" draw:type="curve" svg:x1="78.254cm" svg:y1="58.328cm" svg:x2="84.054cm" svg:y2="60.528cm" draw:start-shape="id253" draw:start-glue-point="2" draw:end-shape="id479" draw:end-glue-point="0" svg:d="M78254 58328c0 1650 5800 550 5800 2200" svg:viewBox="0 0 5801 2201">
          <text:p/>
        </draw:connector>
        <draw:connector draw:style-name="gr293" draw:text-style-name="P15" draw:layer="layout" draw:type="curve" svg:x1="73.005cm" svg:y1="52.445cm" svg:x2="88.141cm" svg:y2="57.757cm" draw:start-shape="id252" draw:start-glue-point="2" draw:end-shape="id480" draw:end-glue-point="0" svg:d="M73005 52445c0 3984 15136 1328 15136 5312" svg:viewBox="0 0 15137 5313">
          <text:p/>
        </draw:connector>
        <draw:rect draw:style-name="gr41" draw:text-style-name="P5" xml:id="id481" draw:id="id481" draw:layer="layout" svg:width="2.47cm" svg:height="1.058cm" svg:x="86.113cm" svg:y="60.289cm">
          <text:p text:style-name="P5">By<text:line-break/>stimulus</text:p>
        </draw:rect>
        <draw:connector draw:style-name="gr293" draw:text-style-name="P15" draw:layer="layout" draw:type="curve" svg:x1="88.141cm" svg:y1="58.757cm" svg:x2="87.348cm" svg:y2="60.289cm" draw:start-shape="id480" draw:start-glue-point="2" draw:end-shape="id481" draw:end-glue-point="0" svg:d="M88141 58757c0 1149-793 383-793 1532" svg:viewBox="0 0 794 1533">
          <text:p/>
        </draw:connector>
        <draw:rect draw:style-name="gr41" draw:text-style-name="P5" xml:id="id482" draw:id="id482" draw:layer="layout" svg:width="2.47cm" svg:height="1.763cm" svg:x="89.113cm" svg:y="60.284cm">
          <text:p text:style-name="P5">Stimulus<text:line-break/>independent <text:line-break/>thought</text:p>
        </draw:rect>
        <draw:connector draw:style-name="gr293" draw:text-style-name="P15" draw:layer="layout" draw:type="curve" svg:x1="88.141cm" svg:y1="58.757cm" svg:x2="90.348cm" svg:y2="60.284cm" draw:start-shape="id480" draw:start-glue-point="2" draw:end-shape="id482" draw:end-glue-point="0" svg:d="M88141 58757c0 1146 2207 383 2207 1527" svg:viewBox="0 0 2208 1528">
          <text:p/>
        </draw:connector>
        <draw:rect draw:style-name="gr41" draw:text-style-name="P5" xml:id="id483" draw:id="id483" draw:layer="layout" svg:width="2.61cm" svg:height="1.235cm" svg:x="85.725cm" svg:y="63.888cm">
          <text:p text:style-name="P5">Mind<text:line-break/>wandering</text:p>
        </draw:rect>
        <draw:connector draw:style-name="gr293" draw:text-style-name="P15" draw:layer="layout" draw:type="curve" svg:x1="90.348cm" svg:y1="62.047cm" svg:x2="87.03cm" svg:y2="63.888cm" draw:start-shape="id482" draw:start-glue-point="2" draw:end-shape="id483" draw:end-glue-point="0" svg:d="M90348 62047c0 1381-3318 461-3318 1841" svg:viewBox="0 0 3319 1842">
          <text:p/>
        </draw:connector>
        <draw:connector draw:style-name="gr510" draw:text-style-name="P7" draw:layer="layout" draw:type="curve" svg:x1="-26.952cm" svg:y1="52.421cm" svg:x2="-25.318cm" svg:y2="51.416cm" draw:start-shape="id445" draw:start-glue-point="10" draw:end-shape="id484" draw:end-glue-point="3" svg:d="M-26952 52421c1209 0 392-1005 1634-1005" svg:viewBox="0 0 1635 1006">
          <text:p text:style-name="P19">Including<text:line-break/>time</text:p>
        </draw:connector>
        <draw:custom-shape draw:style-name="gr624" draw:text-style-name="P137" xml:id="id445" draw:id="id445" draw:layer="layout" svg:width="2.674cm" svg:height="0.97cm" svg:x="-29.626cm" svg:y="51.936cm">
          <text:p text:style-name="P25">Action<text:line-break/>potentia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mment box 1" draw:style-name="gr625" draw:text-style-name="P20" xml:id="id485" draw:id="id485" draw:layer="layout" svg:width="2.572cm" svg:height="1.356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24" draw:text-style-name="P137" xml:id="id486" draw:id="id486" draw:layer="layout" svg:width="2.674cm" svg:height="0.97cm" svg:x="-33.226cm" svg:y="51.936cm">
          <text:p text:style-name="P25">Superposition<text:line-break/>of AP wave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4" draw:text-style-name="P137" xml:id="id487" draw:id="id487" draw:layer="layout" svg:width="2.674cm" svg:height="0.97cm" svg:x="-36.526cm" svg:y="51.936cm">
          <text:p text:style-name="P25">Language<text:line-break/>building</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561cm" draw:start-shape="id388" draw:start-glue-point="3" draw:end-shape="id485" draw:end-glue-point="7" svg:d="M-40740 44855c-1263 0-411 1706-1705 1706" svg:viewBox="0 0 1706 1707">
          <text:p/>
        </draw:connector>
        <draw:connector draw:style-name="gr36" draw:text-style-name="P7" draw:layer="layout" draw:type="curve" svg:x1="-30.552cm" svg:y1="52.421cm" svg:x2="-29.626cm" svg:y2="52.421cm" draw:start-shape="id486" draw:start-glue-point="10" draw:end-shape="id445" draw:end-glue-point="6" svg:d="M-30552 52421h926" svg:viewBox="0 0 927 1">
          <text:p/>
        </draw:connector>
        <draw:connector draw:style-name="gr36" draw:text-style-name="P7" draw:layer="layout" draw:type="curve" svg:x1="-33.852cm" svg:y1="52.421cm" svg:x2="-33.226cm" svg:y2="52.421cm" draw:start-shape="id487" draw:start-glue-point="10" draw:end-shape="id486" draw:end-glue-point="6" svg:d="M-33852 52421h626" svg:viewBox="0 0 627 1">
          <text:p/>
        </draw:connector>
        <draw:connector draw:style-name="gr36" draw:text-style-name="P7" draw:layer="layout" draw:type="curve" svg:x1="-37.434cm" svg:y1="52.389cm" svg:x2="-36.526cm" svg:y2="52.421cm" draw:start-shape="id488" draw:start-glue-point="10" draw:end-shape="id487" draw:end-glue-point="6" svg:d="M-37434 52389c682 0 229 32 908 32" svg:viewBox="0 0 909 33">
          <text:p/>
        </draw:connector>
        <draw:g draw:style-name="gr31">
          <draw:rect draw:style-name="gr626" draw:text-style-name="P185" draw:layer="layout" svg:width="19.38cm" svg:height="1.608cm" svg:x="-39.952cm" svg:y="59.066cm">
            <text:p/>
          </draw:rect>
          <draw:rect draw:style-name="gr627" draw:text-style-name="P186" draw:layer="layout" svg:width="18.349cm" svg:height="1.608cm" svg:x="-34.991cm" svg:y="59.066cm">
            <text:p/>
          </draw:rect>
          <draw:g draw:style-name="gr31">
            <draw:custom-shape draw:style-name="gr34" draw:text-style-name="P26" xml:id="id490" draw:id="id490" draw:layer="layout" svg:width="0.891cm" svg:height="0.97cm" svg:x="-34.648cm" svg:y="59.423cm">
              <text:p text:style-name="P25"><text:span text:style-name="T12">P</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9" draw:id="id489" draw:layer="layout" svg:width="0.891cm" svg:height="0.97cm" svg:x="-32.647cm" svg:y="59.423cm">
              <text:p text:style-name="P25"><text:span text:style-name="T12">P</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89" draw:start-glue-point="6" draw:end-shape="id490" draw:end-glue-point="10" svg:d="M-32647 59908h-1110" svg:viewBox="0 0 1111 1">
              <text:p/>
            </draw:connector>
            <draw:custom-shape draw:style-name="gr34" draw:text-style-name="P26" xml:id="id492" draw:id="id492" draw:layer="layout" svg:width="0.891cm" svg:height="0.97cm" svg:x="-30.648cm" svg:y="59.423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1" draw:id="id491" draw:layer="layout" svg:width="0.891cm" svg:height="0.97cm" svg:x="-28.647cm" svg:y="59.423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1" draw:start-glue-point="6" draw:end-shape="id492" draw:end-glue-point="10" svg:d="M-28647 59908h-1110" svg:viewBox="0 0 1111 1">
              <text:p/>
            </draw:connector>
            <draw:connector draw:style-name="gr36" draw:text-style-name="P7" draw:layer="layout" draw:type="curve" svg:x1="-30.648cm" svg:y1="59.908cm" svg:x2="-31.756cm" svg:y2="59.908cm" draw:start-shape="id492" draw:start-glue-point="6" draw:end-shape="id489" draw:end-glue-point="10" svg:d="M-30648 59908h-1108" svg:viewBox="0 0 1109 1">
              <text:p/>
            </draw:connector>
            <draw:custom-shape draw:style-name="gr34" draw:text-style-name="P26" xml:id="id494" draw:id="id494" draw:layer="layout" svg:width="0.891cm" svg:height="0.97cm" svg:x="-23.648cm" svg:y="59.423cm">
              <text:p text:style-name="P25"><text:span text:style-name="T12">P</text:span><text:span text:style-name="T13">t+l</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21.647cm" svg:y="59.423cm">
              <text:p text:style-name="P25"><text:span text:style-name="T12">P</text:span><text:span text:style-name="T13">t+l</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3" draw:start-glue-point="6" draw:end-shape="id494" draw:end-glue-point="10" svg:d="M-21647 59908h-1110" svg:viewBox="0 0 1111 1">
              <text:p/>
            </draw:connector>
            <draw:connector draw:style-name="gr503" draw:text-style-name="P7" draw:layer="layout" draw:type="curve" svg:x1="-24.061cm" svg:y1="59.867cm" svg:x2="-27.374cm" svg:y2="59.87cm" svg:d="M-24061 59867c-2484 0-828 3-3313 3" svg:viewBox="0 0 3314 4">
              <text:p/>
            </draw:connector>
            <draw:connector draw:style-name="gr503"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7" draw:layer="layout" draw:type="curve" svg:x1="-17.866cm" svg:y1="59.873cm" svg:x2="-20.446cm" svg:y2="59.898cm" svg:d="M-17866 59873c-1933 0-644 25-2580 25" svg:viewBox="0 0 2581 26">
              <text:p/>
            </draw:connector>
          </draw:g>
          <draw:line draw:style-name="gr565" draw:text-style-name="P15" draw:layer="layout" svg:x1="-39.972cm" svg:y1="61.16cm" svg:x2="-16.587cm" svg:y2="61.119cm">
            <text:p/>
          </draw:line>
          <draw:frame draw:style-name="gr628" draw:text-style-name="P187" draw:layer="layout" svg:width="7.416cm" svg:height="1.038cm" svg:x="-30.706cm" svg:y="61.252cm">
            <draw:text-box>
              <text:p><text:span text:style-name="T60">Transformer training</text:span></text:p>
            </draw:text-box>
          </draw:frame>
          <draw:connector draw:style-name="gr629" draw:text-style-name="P15" draw:layer="layout" draw:type="line" svg:x1="-34.912cm" svg:y1="58.763cm" svg:x2="-20.638cm" svg:y2="58.797cm" svg:d="M-34912 58763l14274 34" svg:viewBox="0 0 14275 35">
            <text:p/>
          </draw:connector>
          <draw:connector draw:style-name="gr630" draw:text-style-name="P15" draw:layer="layout" draw:type="line" svg:x1="-39.939cm" svg:y1="58.763cm" svg:x2="-35.203cm" svg:y2="58.782cm" svg:d="M-39939 58763l4736 19" svg:viewBox="0 0 4737 20">
            <text:p/>
          </draw:connector>
          <draw:frame draw:style-name="gr622" draw:text-style-name="P188" draw:layer="layout" svg:width="3.919cm" svg:height="0.645cm" svg:x="-28.867cm" svg:y="58.206cm">
            <draw:text-box>
              <text:p><text:span text:style-name="T12">Overlap (with length l)</text:span></text:p>
            </draw:text-box>
          </draw:frame>
          <draw:connector draw:style-name="gr631" draw:text-style-name="P15" draw:layer="layout" draw:type="line" svg:x1="-20.489cm" svg:y1="58.763cm" svg:x2="-16.591cm" svg:y2="58.773cm" svg:d="M-20489 58763l3898 10" svg:viewBox="0 0 3899 11">
            <text:p/>
          </draw:connector>
          <draw:frame draw:style-name="gr622" draw:text-style-name="P188" draw:layer="layout" svg:width="1.264cm" svg:height="0.645cm" svg:x="-38.08cm" svg:y="58.192cm">
            <draw:text-box>
              <text:p><text:span text:style-name="T12">input</text:span></text:p>
            </draw:text-box>
          </draw:frame>
          <draw:frame draw:style-name="gr622" draw:text-style-name="P188" draw:layer="layout" svg:width="1.479cm" svg:height="0.645cm" svg:x="-19.38cm" svg:y="58.193cm">
            <draw:text-box>
              <text:p><text:span text:style-name="T12">output</text:span></text:p>
            </draw:text-box>
          </draw:frame>
        </draw:g>
        <draw:custom-shape draw:name="comment box 2" draw:style-name="gr632" draw:text-style-name="P20" xml:id="id495" draw:id="id495" draw:layer="layout" svg:width="3.874cm" svg:height="2.839cm" svg:x="-19.542cm" svg:y="55.238cm">
          <text:p text:style-name="P19"><text:span text:style-name="T4">Unscientifically</text:span><text:span text:style-name="T4"><text:line-break/></text:span><text:span text:style-name="T4">sharing encoder</text:span><text:span text:style-name="T4"><text:line-break/></text:span><text:span text:style-name="T4">is can be</text:span><text:span text:style-name="T4"><text:line-break/></text:span><text:span text:style-name="T4">compared</text:span><text:span text:style-name="T4"><text:line-break/></text:span><text:span text:style-name="T4">to previous</text:span><text:span text:style-name="T4"><text:line-break/></text:span><text:span text:style-name="T4">knowledge about another</text:span><text:span text:style-name="T4"><text:line-break/></text:span><text:span text:style-name="T4">person personalit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2cm" svg:y1="53.007cm" svg:x2="-15.668cm" svg:y2="56.658cm" draw:start-shape="id406" draw:start-glue-point="2" draw:end-shape="id495" draw:end-glue-point="7" svg:d="M-16220 53007c0 1677 537 1397 870 1891s463 1760-318 1760" svg:viewBox="0 0 1133 365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0DT21M7S</meta:editing-duration>
    <meta:editing-cycles>660</meta:editing-cycles>
    <meta:generator>LibreOffice/25.8.0.4$Linux_X86_64 LibreOffice_project/48f00303701489684e67c38c28aff00cd5929e67</meta:generator>
    <dc:title>diagram</dc:title>
    <dc:date>2026-04-30T23:04:08.461024351</dc:date>
    <meta:document-statistic meta:object-count="1765"/>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